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300000001C4EF2158.png" manifest:media-type="image/png"/>
  <manifest:file-entry manifest:full-path="Pictures/10000001000002530000034ADF9FE721.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ystem" style:font-pitch="variable"/>
    <style:font-face style:name="Inter" svg:font-family="Inter"/>
    <style:font-face style:name="JetBrainsMono" svg:font-family="JetBrainsMono"/>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ColorEmoji" svg:font-family="NotoColorEmoji"/>
  </office:font-face-decls>
  <office:automatic-styles>
    <style:style style:name="dp1" style:family="drawing-page"/>
    <style:style style:name="gr1" style:family="graphic" style:parent-style-name="standard">
      <style:graphic-properties draw:stroke="none" draw:fill="solid" draw:fill-color="#0f172b" loext:decorative="false"/>
    </style:style>
    <style:style style:name="gr2" style:family="graphic" style:parent-style-name="standard">
      <style:graphic-properties draw:stroke="none" draw:fill="solid" draw:fill-color="#10182c" loext:decorative="false"/>
    </style:style>
    <style:style style:name="gr3" style:family="graphic" style:parent-style-name="standard">
      <style:graphic-properties draw:stroke="none" draw:fill="solid" draw:fill-color="#10182d" loext:decorative="false"/>
    </style:style>
    <style:style style:name="gr4" style:family="graphic" style:parent-style-name="standard">
      <style:graphic-properties draw:stroke="none" draw:fill="solid" draw:fill-color="#11182e" loext:decorative="false"/>
    </style:style>
    <style:style style:name="gr5" style:family="graphic" style:parent-style-name="standard">
      <style:graphic-properties draw:stroke="none" draw:fill="solid" draw:fill-color="#11182f" loext:decorative="false"/>
    </style:style>
    <style:style style:name="gr6" style:family="graphic" style:parent-style-name="standard">
      <style:graphic-properties draw:stroke="none" draw:fill="solid" draw:fill-color="#111930" loext:decorative="false"/>
    </style:style>
    <style:style style:name="gr7" style:family="graphic" style:parent-style-name="standard">
      <style:graphic-properties draw:stroke="none" draw:fill="solid" draw:fill-color="#121931" loext:decorative="false"/>
    </style:style>
    <style:style style:name="gr8" style:family="graphic" style:parent-style-name="standard">
      <style:graphic-properties draw:stroke="none" draw:fill="solid" draw:fill-color="#121932" loext:decorative="false"/>
    </style:style>
    <style:style style:name="gr9" style:family="graphic" style:parent-style-name="standard">
      <style:graphic-properties draw:stroke="none" draw:fill="solid" draw:fill-color="#121933" loext:decorative="false"/>
    </style:style>
    <style:style style:name="gr10" style:family="graphic" style:parent-style-name="standard">
      <style:graphic-properties draw:stroke="none" draw:fill="solid" draw:fill-color="#131a34" loext:decorative="false"/>
    </style:style>
    <style:style style:name="gr11" style:family="graphic" style:parent-style-name="standard">
      <style:graphic-properties draw:stroke="none" draw:fill="solid" draw:fill-color="#131a35" loext:decorative="false"/>
    </style:style>
    <style:style style:name="gr12" style:family="graphic" style:parent-style-name="standard">
      <style:graphic-properties draw:stroke="none" draw:fill="solid" draw:fill-color="#141a36" loext:decorative="false"/>
    </style:style>
    <style:style style:name="gr13" style:family="graphic" style:parent-style-name="standard">
      <style:graphic-properties draw:stroke="none" draw:fill="solid" draw:fill-color="#141a37" loext:decorative="false"/>
    </style:style>
    <style:style style:name="gr14" style:family="graphic" style:parent-style-name="standard">
      <style:graphic-properties draw:stroke="none" draw:fill="solid" draw:fill-color="#141b38" loext:decorative="false"/>
    </style:style>
    <style:style style:name="gr15" style:family="graphic" style:parent-style-name="standard">
      <style:graphic-properties draw:stroke="none" draw:fill="solid" draw:fill-color="#151b39" loext:decorative="false"/>
    </style:style>
    <style:style style:name="gr16" style:family="graphic" style:parent-style-name="standard">
      <style:graphic-properties draw:stroke="none" draw:fill="solid" draw:fill-color="#151b3a" loext:decorative="false"/>
    </style:style>
    <style:style style:name="gr17" style:family="graphic" style:parent-style-name="standard">
      <style:graphic-properties draw:stroke="none" draw:fill="solid" draw:fill-color="#161c3b" loext:decorative="false"/>
    </style:style>
    <style:style style:name="gr18" style:family="graphic" style:parent-style-name="standard">
      <style:graphic-properties draw:stroke="none" draw:fill="solid" draw:fill-color="#161c3c" loext:decorative="false"/>
    </style:style>
    <style:style style:name="gr19" style:family="graphic" style:parent-style-name="standard">
      <style:graphic-properties draw:stroke="none" draw:fill="solid" draw:fill-color="#171c3d" loext:decorative="false"/>
    </style:style>
    <style:style style:name="gr20" style:family="graphic" style:parent-style-name="standard">
      <style:graphic-properties draw:stroke="none" draw:fill="solid" draw:fill-color="#171c3e" loext:decorative="false"/>
    </style:style>
    <style:style style:name="gr21" style:family="graphic" style:parent-style-name="standard">
      <style:graphic-properties draw:stroke="none" draw:fill="solid" draw:fill-color="#171d3f" loext:decorative="false"/>
    </style:style>
    <style:style style:name="gr22" style:family="graphic" style:parent-style-name="standard">
      <style:graphic-properties draw:stroke="none" draw:fill="solid" draw:fill-color="#181d40" loext:decorative="false"/>
    </style:style>
    <style:style style:name="gr23" style:family="graphic" style:parent-style-name="standard">
      <style:graphic-properties draw:stroke="none" draw:fill="solid" draw:fill-color="#181d41" loext:decorative="false"/>
    </style:style>
    <style:style style:name="gr24" style:family="graphic" style:parent-style-name="standard">
      <style:graphic-properties draw:stroke="none" draw:fill="solid" draw:fill-color="#181d42" loext:decorative="false"/>
    </style:style>
    <style:style style:name="gr25" style:family="graphic" style:parent-style-name="standard">
      <style:graphic-properties draw:stroke="none" draw:fill="solid" draw:fill-color="#191e43" loext:decorative="false"/>
    </style:style>
    <style:style style:name="gr26" style:family="graphic" style:parent-style-name="standard">
      <style:graphic-properties draw:stroke="none" draw:fill="solid" draw:fill-color="#191e44" loext:decorative="false"/>
    </style:style>
    <style:style style:name="gr27" style:family="graphic" style:parent-style-name="standard">
      <style:graphic-properties draw:stroke="none" draw:fill="solid" draw:fill-color="#1a1e45" loext:decorative="false"/>
    </style:style>
    <style:style style:name="gr28" style:family="graphic" style:parent-style-name="standard">
      <style:graphic-properties draw:stroke="none" draw:fill="solid" draw:fill-color="#1a1e46" loext:decorative="false"/>
    </style:style>
    <style:style style:name="gr29" style:family="graphic" style:parent-style-name="standard">
      <style:graphic-properties draw:stroke="none" draw:fill="solid" draw:fill-color="#1a1f47" loext:decorative="false"/>
    </style:style>
    <style:style style:name="gr30" style:family="graphic" style:parent-style-name="standard">
      <style:graphic-properties draw:stroke="none" draw:fill="solid" draw:fill-color="#1b1f48" loext:decorative="false"/>
    </style:style>
    <style:style style:name="gr31" style:family="graphic" style:parent-style-name="standard">
      <style:graphic-properties draw:stroke="none" draw:fill="solid" draw:fill-color="#1b1f49" loext:decorative="false"/>
    </style:style>
    <style:style style:name="gr32" style:family="graphic" style:parent-style-name="standard">
      <style:graphic-properties draw:stroke="none" draw:fill="solid" draw:fill-color="#1b1f4a" loext:decorative="false"/>
    </style:style>
    <style:style style:name="gr33" style:family="graphic" style:parent-style-name="standard">
      <style:graphic-properties draw:stroke="none" draw:fill="solid" draw:fill-color="#1c204b" loext:decorative="false"/>
    </style:style>
    <style:style style:name="gr34" style:family="graphic" style:parent-style-name="standard">
      <style:graphic-properties draw:stroke="none" draw:fill="solid" draw:fill-color="#1c204c" loext:decorative="false"/>
    </style:style>
    <style:style style:name="gr35" style:family="graphic" style:parent-style-name="standard">
      <style:graphic-properties draw:stroke="none" draw:fill="solid" draw:fill-color="#1d204d" loext:decorative="false"/>
    </style:style>
    <style:style style:name="gr36" style:family="graphic" style:parent-style-name="standard">
      <style:graphic-properties draw:stroke="none" draw:fill="solid" draw:fill-color="#1d204e" loext:decorative="false"/>
    </style:style>
    <style:style style:name="gr37" style:family="graphic" style:parent-style-name="standard">
      <style:graphic-properties draw:stroke="none" draw:fill="solid" draw:fill-color="#1d214f" loext:decorative="false"/>
    </style:style>
    <style:style style:name="gr38" style:family="graphic" style:parent-style-name="standard">
      <style:graphic-properties draw:stroke="none" draw:fill="solid" draw:fill-color="#1e2150" loext:decorative="false"/>
    </style:style>
    <style:style style:name="gr39" style:family="graphic" style:parent-style-name="standard">
      <style:graphic-properties draw:stroke="none" draw:fill="solid" draw:fill-color="#1e2151" loext:decorative="false"/>
    </style:style>
    <style:style style:name="gr40" style:family="graphic" style:parent-style-name="standard">
      <style:graphic-properties draw:stroke="none" draw:fill="solid" draw:fill-color="#1f2252" loext:decorative="false"/>
    </style:style>
    <style:style style:name="gr41" style:family="graphic" style:parent-style-name="standard">
      <style:graphic-properties draw:stroke="none" draw:fill="solid" draw:fill-color="#1f2253" loext:decorative="false"/>
    </style:style>
    <style:style style:name="gr42" style:family="graphic" style:parent-style-name="standard">
      <style:graphic-properties draw:stroke="none" draw:fill="solid" draw:fill-color="#1f2254" loext:decorative="false"/>
    </style:style>
    <style:style style:name="gr43" style:family="graphic" style:parent-style-name="standard">
      <style:graphic-properties draw:stroke="none" draw:fill="solid" draw:fill-color="#202255" loext:decorative="false"/>
    </style:style>
    <style:style style:name="gr44" style:family="graphic" style:parent-style-name="standard">
      <style:graphic-properties draw:stroke="none" draw:fill="solid" draw:fill-color="#202356" loext:decorative="false"/>
    </style:style>
    <style:style style:name="gr45" style:family="graphic" style:parent-style-name="standard">
      <style:graphic-properties draw:stroke="none" draw:fill="solid" draw:fill-color="#202357" loext:decorative="false"/>
    </style:style>
    <style:style style:name="gr46" style:family="graphic" style:parent-style-name="standard">
      <style:graphic-properties draw:stroke="none" draw:fill="solid" draw:fill-color="#212358" loext:decorative="false"/>
    </style:style>
    <style:style style:name="gr47" style:family="graphic" style:parent-style-name="standard">
      <style:graphic-properties draw:stroke="none" draw:fill="solid" draw:fill-color="#212359" loext:decorative="false"/>
    </style:style>
    <style:style style:name="gr48" style:family="graphic" style:parent-style-name="standard">
      <style:graphic-properties draw:stroke="none" draw:fill="solid" draw:fill-color="#222459" loext:decorative="false"/>
    </style:style>
    <style:style style:name="gr49" style:family="graphic" style:parent-style-name="standard">
      <style:graphic-properties draw:stroke="none" draw:fill="solid" draw:fill-color="#22245a" loext:decorative="false"/>
    </style:style>
    <style:style style:name="gr50" style:family="graphic" style:parent-style-name="standard">
      <style:graphic-properties draw:stroke="none" draw:fill="solid" draw:fill-color="#22245b" loext:decorative="false"/>
    </style:style>
    <style:style style:name="gr51" style:family="graphic" style:parent-style-name="standard">
      <style:graphic-properties draw:stroke="none" draw:fill="solid" draw:fill-color="#23245c" loext:decorative="false"/>
    </style:style>
    <style:style style:name="gr52" style:family="graphic" style:parent-style-name="standard">
      <style:graphic-properties draw:stroke="none" draw:fill="solid" draw:fill-color="#23255d" loext:decorative="false"/>
    </style:style>
    <style:style style:name="gr53" style:family="graphic" style:parent-style-name="standard">
      <style:graphic-properties draw:stroke="none" draw:fill="solid" draw:fill-color="#23255e" loext:decorative="false"/>
    </style:style>
    <style:style style:name="gr54" style:family="graphic" style:parent-style-name="standard">
      <style:graphic-properties draw:stroke="none" draw:fill="solid" draw:fill-color="#24255f" loext:decorative="false"/>
    </style:style>
    <style:style style:name="gr55" style:family="graphic" style:parent-style-name="standard">
      <style:graphic-properties draw:stroke="none" draw:fill="solid" draw:fill-color="#242560" loext:decorative="false"/>
    </style:style>
    <style:style style:name="gr56" style:family="graphic" style:parent-style-name="standard">
      <style:graphic-properties draw:stroke="none" draw:fill="solid" draw:fill-color="#252661" loext:decorative="false"/>
    </style:style>
    <style:style style:name="gr57" style:family="graphic" style:parent-style-name="standard">
      <style:graphic-properties draw:stroke="none" draw:fill="solid" draw:fill-color="#252662" loext:decorative="false"/>
    </style:style>
    <style:style style:name="gr58" style:family="graphic" style:parent-style-name="standard">
      <style:graphic-properties draw:stroke="none" draw:fill="solid" draw:fill-color="#252663" loext:decorative="false"/>
    </style:style>
    <style:style style:name="gr59" style:family="graphic" style:parent-style-name="standard">
      <style:graphic-properties draw:stroke="none" draw:fill="solid" draw:fill-color="#262664" loext:decorative="false"/>
    </style:style>
    <style:style style:name="gr60" style:family="graphic" style:parent-style-name="standard">
      <style:graphic-properties draw:stroke="none" draw:fill="solid" draw:fill-color="#262765" loext:decorative="false"/>
    </style:style>
    <style:style style:name="gr61" style:family="graphic" style:parent-style-name="standard">
      <style:graphic-properties draw:stroke="none" draw:fill="solid" draw:fill-color="#262766" loext:decorative="false"/>
    </style:style>
    <style:style style:name="gr62" style:family="graphic" style:parent-style-name="standard">
      <style:graphic-properties draw:stroke="none" draw:fill="solid" draw:fill-color="#272767" loext:decorative="false"/>
    </style:style>
    <style:style style:name="gr63" style:family="graphic" style:parent-style-name="standard">
      <style:graphic-properties draw:stroke="none" draw:fill="solid" draw:fill-color="#272768" loext:decorative="false"/>
    </style:style>
    <style:style style:name="gr64" style:family="graphic" style:parent-style-name="standard">
      <style:graphic-properties draw:stroke="none" draw:fill="solid" draw:fill-color="#282869" loext:decorative="false"/>
    </style:style>
    <style:style style:name="gr65" style:family="graphic" style:parent-style-name="standard">
      <style:graphic-properties draw:stroke="none" draw:fill="solid" draw:fill-color="#28286a" loext:decorative="false"/>
    </style:style>
    <style:style style:name="gr66" style:family="graphic" style:parent-style-name="standard">
      <style:graphic-properties draw:stroke="none" draw:fill="solid" draw:fill-color="#28286b" loext:decorative="false"/>
    </style:style>
    <style:style style:name="gr67" style:family="graphic" style:parent-style-name="standard">
      <style:graphic-properties draw:stroke="none" draw:fill="solid" draw:fill-color="#29286c" loext:decorative="false"/>
    </style:style>
    <style:style style:name="gr68" style:family="graphic" style:parent-style-name="standard">
      <style:graphic-properties draw:stroke="none" draw:fill="solid" draw:fill-color="#29296d" loext:decorative="false"/>
    </style:style>
    <style:style style:name="gr69" style:family="graphic" style:parent-style-name="standard">
      <style:graphic-properties draw:stroke="none" draw:fill="solid" draw:fill-color="#2a296e" loext:decorative="false"/>
    </style:style>
    <style:style style:name="gr70" style:family="graphic" style:parent-style-name="standard">
      <style:graphic-properties draw:stroke="none" draw:fill="solid" draw:fill-color="#2a296f" loext:decorative="false"/>
    </style:style>
    <style:style style:name="gr71" style:family="graphic" style:parent-style-name="standard">
      <style:graphic-properties draw:stroke="none" draw:fill="solid" draw:fill-color="#2a2970" loext:decorative="false"/>
    </style:style>
    <style:style style:name="gr72" style:family="graphic" style:parent-style-name="standard">
      <style:graphic-properties draw:stroke="none" draw:fill="solid" draw:fill-color="#2b2a71" loext:decorative="false"/>
    </style:style>
    <style:style style:name="gr73" style:family="graphic" style:parent-style-name="standard">
      <style:graphic-properties draw:stroke="none" draw:fill="solid" draw:fill-color="#2b2a72" loext:decorative="false"/>
    </style:style>
    <style:style style:name="gr74" style:family="graphic" style:parent-style-name="standard">
      <style:graphic-properties draw:stroke="none" draw:fill="solid" draw:fill-color="#2b2a73" loext:decorative="false"/>
    </style:style>
    <style:style style:name="gr75" style:family="graphic" style:parent-style-name="standard">
      <style:graphic-properties draw:stroke="none" draw:fill="solid" draw:fill-color="#2c2a74" loext:decorative="false"/>
    </style:style>
    <style:style style:name="gr76" style:family="graphic" style:parent-style-name="standard">
      <style:graphic-properties draw:stroke="none" draw:fill="solid" draw:fill-color="#2c2b75" loext:decorative="false"/>
    </style:style>
    <style:style style:name="gr77" style:family="graphic" style:parent-style-name="standard">
      <style:graphic-properties draw:stroke="none" draw:fill="solid" draw:fill-color="#2d2b76" loext:decorative="false"/>
    </style:style>
    <style:style style:name="gr78" style:family="graphic" style:parent-style-name="standard">
      <style:graphic-properties draw:stroke="none" draw:fill="solid" draw:fill-color="#2d2b77" loext:decorative="false"/>
    </style:style>
    <style:style style:name="gr79" style:family="graphic" style:parent-style-name="standard">
      <style:graphic-properties draw:stroke="none" draw:fill="solid" draw:fill-color="#2d2b78" loext:decorative="false"/>
    </style:style>
    <style:style style:name="gr80" style:family="graphic" style:parent-style-name="standard">
      <style:graphic-properties draw:stroke="none" draw:fill="solid" draw:fill-color="#2e2c78" loext:decorative="false"/>
    </style:style>
    <style:style style:name="gr81" style:family="graphic" style:parent-style-name="standard">
      <style:graphic-properties draw:stroke="none" draw:fill="solid" draw:fill-color="#2e2c79" loext:decorative="false"/>
    </style:style>
    <style:style style:name="gr82" style:family="graphic" style:parent-style-name="standard">
      <style:graphic-properties draw:stroke="none" draw:fill="solid" draw:fill-color="#2e2c7a" loext:decorative="false"/>
    </style:style>
    <style:style style:name="gr83" style:family="graphic" style:parent-style-name="standard">
      <style:graphic-properties draw:stroke="none" draw:fill="solid" draw:fill-color="#2f2d7b" loext:decorative="false"/>
    </style:style>
    <style:style style:name="gr84" style:family="graphic" style:parent-style-name="standard">
      <style:graphic-properties draw:stroke="none" draw:fill="solid" draw:fill-color="#2f2d7c" loext:decorative="false"/>
    </style:style>
    <style:style style:name="gr85" style:family="graphic" style:parent-style-name="standard">
      <style:graphic-properties draw:stroke="none" draw:fill="solid" draw:fill-color="#302d7d" loext:decorative="false"/>
    </style:style>
    <style:style style:name="gr86" style:family="graphic" style:parent-style-name="standard">
      <style:graphic-properties draw:stroke="none" draw:fill="solid" draw:fill-color="#302d7e" loext:decorative="false"/>
    </style:style>
    <style:style style:name="gr87" style:family="graphic" style:parent-style-name="standard">
      <style:graphic-properties draw:stroke="none" draw:fill="solid" draw:fill-color="#302e7f" loext:decorative="false"/>
    </style:style>
    <style:style style:name="gr88" style:family="graphic" style:parent-style-name="standard">
      <style:graphic-properties draw:stroke="none" draw:fill="solid" draw:fill-color="#312e80" loext:decorative="false"/>
    </style:style>
    <style:style style:name="gr89" style:family="graphic" style:parent-style-name="standard">
      <style:graphic-properties draw:stroke="none" draw:fill="solid" draw:fill-color="#312e81" loext:decorative="false"/>
    </style:style>
    <style:style style:name="gr90" style:family="graphic" style:parent-style-name="standard">
      <style:graphic-properties draw:stroke="none" draw:fill="solid" draw:fill-color="#312e83" loext:decorative="false"/>
    </style:style>
    <style:style style:name="gr91" style:family="graphic" style:parent-style-name="standard">
      <style:graphic-properties draw:stroke="none" draw:fill="solid" draw:fill-color="#322f84" loext:decorative="false"/>
    </style:style>
    <style:style style:name="gr92" style:family="graphic" style:parent-style-name="standard">
      <style:graphic-properties draw:stroke="none" draw:fill="solid" draw:fill-color="#322f85" loext:decorative="false"/>
    </style:style>
    <style:style style:name="gr93" style:family="graphic" style:parent-style-name="standard">
      <style:graphic-properties draw:stroke="none" draw:fill="solid" draw:fill-color="#332f86" loext:decorative="false"/>
    </style:style>
    <style:style style:name="gr94" style:family="graphic" style:parent-style-name="standard">
      <style:graphic-properties draw:stroke="none" draw:fill="solid" draw:fill-color="#333088" loext:decorative="false"/>
    </style:style>
    <style:style style:name="gr95" style:family="graphic" style:parent-style-name="standard">
      <style:graphic-properties draw:stroke="none" draw:fill="solid" draw:fill-color="#333089" loext:decorative="false"/>
    </style:style>
    <style:style style:name="gr96" style:family="graphic" style:parent-style-name="standard">
      <style:graphic-properties draw:stroke="none" draw:fill="solid" draw:fill-color="#34308a" loext:decorative="false"/>
    </style:style>
    <style:style style:name="gr97" style:family="graphic" style:parent-style-name="standard">
      <style:graphic-properties draw:stroke="none" draw:fill="solid" draw:fill-color="#34318c" loext:decorative="false"/>
    </style:style>
    <style:style style:name="gr98" style:family="graphic" style:parent-style-name="standard">
      <style:graphic-properties draw:stroke="none" draw:fill="solid" draw:fill-color="#35318d" loext:decorative="false"/>
    </style:style>
    <style:style style:name="gr99" style:family="graphic" style:parent-style-name="standard">
      <style:graphic-properties draw:stroke="none" draw:fill="solid" draw:fill-color="#35318e" loext:decorative="false"/>
    </style:style>
    <style:style style:name="gr100" style:family="graphic" style:parent-style-name="standard">
      <style:graphic-properties draw:stroke="none" draw:fill="solid" draw:fill-color="#353190" loext:decorative="false"/>
    </style:style>
    <style:style style:name="gr101" style:family="graphic" style:parent-style-name="standard">
      <style:graphic-properties draw:stroke="none" draw:fill="solid" draw:fill-color="#363291" loext:decorative="false"/>
    </style:style>
    <style:style style:name="gr102" style:family="graphic" style:parent-style-name="standard">
      <style:graphic-properties draw:stroke="none" draw:fill="solid" draw:fill-color="#363292" loext:decorative="false"/>
    </style:style>
    <style:style style:name="gr103" style:family="graphic" style:parent-style-name="standard">
      <style:graphic-properties draw:stroke="none" draw:fill="solid" draw:fill-color="#373293" loext:decorative="false"/>
    </style:style>
    <style:style style:name="gr104" style:family="graphic" style:parent-style-name="standard">
      <style:graphic-properties draw:stroke="none" draw:fill="solid" draw:fill-color="#373395" loext:decorative="false"/>
    </style:style>
    <style:style style:name="gr105" style:family="graphic" style:parent-style-name="standard">
      <style:graphic-properties draw:stroke="none" draw:fill="solid" draw:fill-color="#373396" loext:decorative="false"/>
    </style:style>
    <style:style style:name="gr106" style:family="graphic" style:parent-style-name="standard">
      <style:graphic-properties draw:stroke="none" draw:fill="solid" draw:fill-color="#383397" loext:decorative="false"/>
    </style:style>
    <style:style style:name="gr107" style:family="graphic" style:parent-style-name="standard">
      <style:graphic-properties draw:stroke="none" draw:fill="solid" draw:fill-color="#383499" loext:decorative="false"/>
    </style:style>
    <style:style style:name="gr108" style:family="graphic" style:parent-style-name="standard">
      <style:graphic-properties draw:stroke="none" draw:fill="solid" draw:fill-color="#38349a" loext:decorative="false"/>
    </style:style>
    <style:style style:name="gr109" style:family="graphic" style:parent-style-name="standard">
      <style:graphic-properties draw:stroke="none" draw:fill="solid" draw:fill-color="#39349b" loext:decorative="false"/>
    </style:style>
    <style:style style:name="gr110" style:family="graphic" style:parent-style-name="standard">
      <style:graphic-properties draw:stroke="none" draw:fill="solid" draw:fill-color="#39359d" loext:decorative="false"/>
    </style:style>
    <style:style style:name="gr111" style:family="graphic" style:parent-style-name="standard">
      <style:graphic-properties draw:stroke="none" draw:fill="solid" draw:fill-color="#3a359e" loext:decorative="false"/>
    </style:style>
    <style:style style:name="gr112" style:family="graphic" style:parent-style-name="standard">
      <style:graphic-properties draw:stroke="none" draw:fill="solid" draw:fill-color="#3a359f" loext:decorative="false"/>
    </style:style>
    <style:style style:name="gr113" style:family="graphic" style:parent-style-name="standard">
      <style:graphic-properties draw:stroke="none" draw:fill="solid" draw:fill-color="#3a36a0" loext:decorative="false"/>
    </style:style>
    <style:style style:name="gr114" style:family="graphic" style:parent-style-name="standard">
      <style:graphic-properties draw:stroke="none" draw:fill="solid" draw:fill-color="#3b36a2" loext:decorative="false"/>
    </style:style>
    <style:style style:name="gr115" style:family="graphic" style:parent-style-name="standard">
      <style:graphic-properties draw:stroke="none" draw:fill="solid" draw:fill-color="#3b36a3" loext:decorative="false"/>
    </style:style>
    <style:style style:name="gr116" style:family="graphic" style:parent-style-name="standard">
      <style:graphic-properties draw:stroke="none" draw:fill="solid" draw:fill-color="#3c36a4" loext:decorative="false"/>
    </style:style>
    <style:style style:name="gr117" style:family="graphic" style:parent-style-name="standard">
      <style:graphic-properties draw:stroke="none" draw:fill="solid" draw:fill-color="#3c37a6" loext:decorative="false"/>
    </style:style>
    <style:style style:name="gr118" style:family="graphic" style:parent-style-name="standard">
      <style:graphic-properties draw:stroke="none" draw:fill="solid" draw:fill-color="#3c37a7" loext:decorative="false"/>
    </style:style>
    <style:style style:name="gr119" style:family="graphic" style:parent-style-name="standard">
      <style:graphic-properties draw:stroke="none" draw:fill="solid" draw:fill-color="#3d37a8" loext:decorative="false"/>
    </style:style>
    <style:style style:name="gr120" style:family="graphic" style:parent-style-name="standard">
      <style:graphic-properties draw:stroke="none" draw:fill="solid" draw:fill-color="#3d38aa" loext:decorative="false"/>
    </style:style>
    <style:style style:name="gr121" style:family="graphic" style:parent-style-name="standard">
      <style:graphic-properties draw:stroke="none" draw:fill="solid" draw:fill-color="#3e38ab" loext:decorative="false"/>
    </style:style>
    <style:style style:name="gr122" style:family="graphic" style:parent-style-name="standard">
      <style:graphic-properties draw:stroke="none" draw:fill="solid" draw:fill-color="#3e38ac" loext:decorative="false"/>
    </style:style>
    <style:style style:name="gr123" style:family="graphic" style:parent-style-name="standard">
      <style:graphic-properties draw:stroke="none" draw:fill="solid" draw:fill-color="#3e39ad" loext:decorative="false"/>
    </style:style>
    <style:style style:name="gr124" style:family="graphic" style:parent-style-name="standard">
      <style:graphic-properties draw:stroke="none" draw:fill="solid" draw:fill-color="#3f39af" loext:decorative="false"/>
    </style:style>
    <style:style style:name="gr125" style:family="graphic" style:parent-style-name="standard">
      <style:graphic-properties draw:stroke="none" draw:fill="solid" draw:fill-color="#3f39b0" loext:decorative="false"/>
    </style:style>
    <style:style style:name="gr126" style:family="graphic" style:parent-style-name="standard">
      <style:graphic-properties draw:stroke="none" draw:fill="solid" draw:fill-color="#403ab1" loext:decorative="false"/>
    </style:style>
    <style:style style:name="gr127" style:family="graphic" style:parent-style-name="standard">
      <style:graphic-properties draw:stroke="none" draw:fill="solid" draw:fill-color="#403ab3" loext:decorative="false"/>
    </style:style>
    <style:style style:name="gr128" style:family="graphic" style:parent-style-name="standard">
      <style:graphic-properties draw:stroke="none" draw:fill="solid" draw:fill-color="#403ab4" loext:decorative="false"/>
    </style:style>
    <style:style style:name="gr129" style:family="graphic" style:parent-style-name="standard">
      <style:graphic-properties draw:stroke="none" draw:fill="solid" draw:fill-color="#413bb5" loext:decorative="false"/>
    </style:style>
    <style:style style:name="gr130" style:family="graphic" style:parent-style-name="standard">
      <style:graphic-properties draw:stroke="none" draw:fill="solid" draw:fill-color="#413bb7" loext:decorative="false"/>
    </style:style>
    <style:style style:name="gr131" style:family="graphic" style:parent-style-name="standard">
      <style:graphic-properties draw:stroke="none" draw:fill="solid" draw:fill-color="#413bb8" loext:decorative="false"/>
    </style:style>
    <style:style style:name="gr132" style:family="graphic" style:parent-style-name="standard">
      <style:graphic-properties draw:stroke="none" draw:fill="solid" draw:fill-color="#423bb9" loext:decorative="false"/>
    </style:style>
    <style:style style:name="gr133" style:family="graphic" style:parent-style-name="standard">
      <style:graphic-properties draw:stroke="none" draw:fill="solid" draw:fill-color="#423cba" loext:decorative="false"/>
    </style:style>
    <style:style style:name="gr134" style:family="graphic" style:parent-style-name="standard">
      <style:graphic-properties draw:stroke="none" draw:fill="solid" draw:fill-color="#433cbc" loext:decorative="false"/>
    </style:style>
    <style:style style:name="gr135" style:family="graphic" style:parent-style-name="standard">
      <style:graphic-properties draw:stroke="none" draw:fill="solid" draw:fill-color="#433cbd" loext:decorative="false"/>
    </style:style>
    <style:style style:name="gr136" style:family="graphic" style:parent-style-name="standard">
      <style:graphic-properties draw:stroke="none" draw:fill="solid" draw:fill-color="#433dbe" loext:decorative="false"/>
    </style:style>
    <style:style style:name="gr137" style:family="graphic" style:parent-style-name="standard">
      <style:graphic-properties draw:stroke="none" draw:fill="solid" draw:fill-color="#443dc0" loext:decorative="false"/>
    </style:style>
    <style:style style:name="gr138" style:family="graphic" style:parent-style-name="standard">
      <style:graphic-properties draw:stroke="none" draw:fill="solid" draw:fill-color="#443dc1" loext:decorative="false"/>
    </style:style>
    <style:style style:name="gr139" style:family="graphic" style:parent-style-name="standard">
      <style:graphic-properties draw:stroke="none" draw:fill="solid" draw:fill-color="#453ec2" loext:decorative="false"/>
    </style:style>
    <style:style style:name="gr140" style:family="graphic" style:parent-style-name="standard">
      <style:graphic-properties draw:stroke="none" draw:fill="solid" draw:fill-color="#453ec4" loext:decorative="false"/>
    </style:style>
    <style:style style:name="gr141" style:family="graphic" style:parent-style-name="standard">
      <style:graphic-properties draw:stroke="none" draw:fill="solid" draw:fill-color="#453ec5" loext:decorative="false"/>
    </style:style>
    <style:style style:name="gr142" style:family="graphic" style:parent-style-name="standard">
      <style:graphic-properties draw:stroke="none" draw:fill="solid" draw:fill-color="#463fc6" loext:decorative="false"/>
    </style:style>
    <style:style style:name="gr143" style:family="graphic" style:parent-style-name="standard">
      <style:graphic-properties draw:stroke="none" draw:fill="solid" draw:fill-color="#463fc7" loext:decorative="false"/>
    </style:style>
    <style:style style:name="gr144" style:family="graphic" style:parent-style-name="standard">
      <style:graphic-properties draw:stroke="none" draw:fill="solid" draw:fill-color="#473fc9" loext:decorative="false"/>
    </style:style>
    <style:style style:name="gr145" style:family="graphic" style:parent-style-name="standard">
      <style:graphic-properties draw:stroke="none" draw:fill="solid" draw:fill-color="#4740ca" loext:decorative="false"/>
    </style:style>
    <style:style style:name="gr146" style:family="graphic" style:parent-style-name="standard">
      <style:graphic-properties draw:stroke="none" draw:fill="solid" draw:fill-color="#4740cb" loext:decorative="false"/>
    </style:style>
    <style:style style:name="gr147" style:family="graphic" style:parent-style-name="standard">
      <style:graphic-properties draw:stroke="none" draw:fill="solid" draw:fill-color="#4840cd" loext:decorative="false"/>
    </style:style>
    <style:style style:name="gr148" style:family="graphic" style:parent-style-name="standard">
      <style:graphic-properties draw:stroke="none" draw:fill="solid" draw:fill-color="#4840ce" loext:decorative="false"/>
    </style:style>
    <style:style style:name="gr149" style:family="graphic" style:parent-style-name="standard">
      <style:graphic-properties draw:stroke="none" draw:fill="solid" draw:fill-color="#4841cf" loext:decorative="false"/>
    </style:style>
    <style:style style:name="gr150" style:family="graphic" style:parent-style-name="standard">
      <style:graphic-properties draw:stroke="none" draw:fill="solid" draw:fill-color="#4941d0" loext:decorative="false"/>
    </style:style>
    <style:style style:name="gr151" style:family="graphic" style:parent-style-name="standard">
      <style:graphic-properties draw:stroke="none" draw:fill="solid" draw:fill-color="#4941d2" loext:decorative="false"/>
    </style:style>
    <style:style style:name="gr152" style:family="graphic" style:parent-style-name="standard">
      <style:graphic-properties draw:stroke="none" draw:fill="solid" draw:fill-color="#4a42d3" loext:decorative="false"/>
    </style:style>
    <style:style style:name="gr153" style:family="graphic" style:parent-style-name="standard">
      <style:graphic-properties draw:stroke="none" draw:fill="solid" draw:fill-color="#4a42d4" loext:decorative="false"/>
    </style:style>
    <style:style style:name="gr154" style:family="graphic" style:parent-style-name="standard">
      <style:graphic-properties draw:stroke="none" draw:fill="solid" draw:fill-color="#4a42d6" loext:decorative="false"/>
    </style:style>
    <style:style style:name="gr155" style:family="graphic" style:parent-style-name="standard">
      <style:graphic-properties draw:stroke="none" draw:fill="solid" draw:fill-color="#4b43d7" loext:decorative="false"/>
    </style:style>
    <style:style style:name="gr156" style:family="graphic" style:parent-style-name="standard">
      <style:graphic-properties draw:stroke="none" draw:fill="solid" draw:fill-color="#4b43d8" loext:decorative="false"/>
    </style:style>
    <style:style style:name="gr157" style:family="graphic" style:parent-style-name="standard">
      <style:graphic-properties draw:stroke="none" draw:fill="solid" draw:fill-color="#4c43da" loext:decorative="false"/>
    </style:style>
    <style:style style:name="gr158" style:family="graphic" style:parent-style-name="standard">
      <style:graphic-properties draw:stroke="none" draw:fill="solid" draw:fill-color="#4c44db" loext:decorative="false"/>
    </style:style>
    <style:style style:name="gr159" style:family="graphic" style:parent-style-name="standard">
      <style:graphic-properties draw:stroke="none" draw:fill="solid" draw:fill-color="#4c44dc" loext:decorative="false"/>
    </style:style>
    <style:style style:name="gr160" style:family="graphic" style:parent-style-name="standard">
      <style:graphic-properties draw:stroke="none" draw:fill="solid" draw:fill-color="#4d44dd" loext:decorative="false"/>
    </style:style>
    <style:style style:name="gr161" style:family="graphic" style:parent-style-name="standard">
      <style:graphic-properties draw:stroke="none" draw:fill="solid" draw:fill-color="#4d45df" loext:decorative="false"/>
    </style:style>
    <style:style style:name="gr162" style:family="graphic" style:parent-style-name="standard">
      <style:graphic-properties draw:stroke="none" draw:fill="solid" draw:fill-color="#4e45e0" loext:decorative="false"/>
    </style:style>
    <style:style style:name="gr163" style:family="graphic" style:parent-style-name="standard">
      <style:graphic-properties draw:stroke="none" draw:fill="solid" draw:fill-color="#4e45e1" loext:decorative="false"/>
    </style:style>
    <style:style style:name="gr164" style:family="graphic" style:parent-style-name="standard">
      <style:graphic-properties draw:stroke="none" draw:fill="solid" draw:fill-color="#4e45e3" loext:decorative="false"/>
    </style:style>
    <style:style style:name="gr165" style:family="graphic" style:parent-style-name="standard">
      <style:graphic-properties draw:stroke="none" draw:fill="solid" draw:fill-color="#4f46e4" loext:decorative="false"/>
    </style:style>
    <style:style style:name="gr166" style:family="graphic" style:parent-style-name="standard">
      <style:graphic-properties draw:stroke="none" draw:fill="solid" draw:fill-color="#4f46e5" loext:decorative="false"/>
    </style:style>
    <style:style style:name="gr167" style:family="graphic" style:parent-style-name="standard">
      <style:graphic-properties draw:stroke="none" draw:fill="solid" draw:fill-color="#4f47e5" loext:decorative="false"/>
    </style:style>
    <style:style style:name="gr168" style:family="graphic" style:parent-style-name="standard">
      <style:graphic-properties draw:stroke="none" draw:fill="solid" draw:fill-color="#5048e6" loext:decorative="false"/>
    </style:style>
    <style:style style:name="gr169" style:family="graphic" style:parent-style-name="standard">
      <style:graphic-properties draw:stroke="none" draw:fill="solid" draw:fill-color="#5149e6" loext:decorative="false"/>
    </style:style>
    <style:style style:name="gr170" style:family="graphic" style:parent-style-name="standard">
      <style:graphic-properties draw:stroke="none" draw:fill="solid" draw:fill-color="#514ae6" loext:decorative="false"/>
    </style:style>
    <style:style style:name="gr171" style:family="graphic" style:parent-style-name="standard">
      <style:graphic-properties draw:stroke="none" draw:fill="solid" draw:fill-color="#524ae7" loext:decorative="false"/>
    </style:style>
    <style:style style:name="gr172" style:family="graphic" style:parent-style-name="standard">
      <style:graphic-properties draw:stroke="none" draw:fill="solid" draw:fill-color="#524be7" loext:decorative="false"/>
    </style:style>
    <style:style style:name="gr173" style:family="graphic" style:parent-style-name="standard">
      <style:graphic-properties draw:stroke="none" draw:fill="solid" draw:fill-color="#534ce7" loext:decorative="false"/>
    </style:style>
    <style:style style:name="gr174" style:family="graphic" style:parent-style-name="standard">
      <style:graphic-properties draw:stroke="none" draw:fill="solid" draw:fill-color="#544de8" loext:decorative="false"/>
    </style:style>
    <style:style style:name="gr175" style:family="graphic" style:parent-style-name="standard">
      <style:graphic-properties draw:stroke="none" draw:fill="solid" draw:fill-color="#544ee8" loext:decorative="false"/>
    </style:style>
    <style:style style:name="gr176" style:family="graphic" style:parent-style-name="standard">
      <style:graphic-properties draw:stroke="none" draw:fill="solid" draw:fill-color="#544fe8" loext:decorative="false"/>
    </style:style>
    <style:style style:name="gr177" style:family="graphic" style:parent-style-name="standard">
      <style:graphic-properties draw:stroke="none" draw:fill="solid" draw:fill-color="#554fe8" loext:decorative="false"/>
    </style:style>
    <style:style style:name="gr178" style:family="graphic" style:parent-style-name="standard">
      <style:graphic-properties draw:stroke="none" draw:fill="solid" draw:fill-color="#5550e9" loext:decorative="false"/>
    </style:style>
    <style:style style:name="gr179" style:family="graphic" style:parent-style-name="standard">
      <style:graphic-properties draw:stroke="none" draw:fill="solid" draw:fill-color="#5651e9" loext:decorative="false"/>
    </style:style>
    <style:style style:name="gr180" style:family="graphic" style:parent-style-name="standard">
      <style:graphic-properties draw:stroke="none" draw:fill="solid" draw:fill-color="#5752ea" loext:decorative="false"/>
    </style:style>
    <style:style style:name="gr181" style:family="graphic" style:parent-style-name="standard">
      <style:graphic-properties draw:stroke="none" draw:fill="solid" draw:fill-color="#5753ea" loext:decorative="false"/>
    </style:style>
    <style:style style:name="gr182" style:family="graphic" style:parent-style-name="standard">
      <style:graphic-properties draw:stroke="none" draw:fill="solid" draw:fill-color="#5854ea" loext:decorative="false"/>
    </style:style>
    <style:style style:name="gr183" style:family="graphic" style:parent-style-name="standard">
      <style:graphic-properties draw:stroke="none" draw:fill="solid" draw:fill-color="#5855eb" loext:decorative="false"/>
    </style:style>
    <style:style style:name="gr184" style:family="graphic" style:parent-style-name="standard">
      <style:graphic-properties draw:stroke="none" draw:fill="solid" draw:fill-color="#5956eb" loext:decorative="false"/>
    </style:style>
    <style:style style:name="gr185" style:family="graphic" style:parent-style-name="standard">
      <style:graphic-properties draw:stroke="none" draw:fill="solid" draw:fill-color="#5a57eb" loext:decorative="false"/>
    </style:style>
    <style:style style:name="gr186" style:family="graphic" style:parent-style-name="standard">
      <style:graphic-properties draw:stroke="none" draw:fill="solid" draw:fill-color="#5a58ec" loext:decorative="false"/>
    </style:style>
    <style:style style:name="gr187" style:family="graphic" style:parent-style-name="standard">
      <style:graphic-properties draw:stroke="none" draw:fill="solid" draw:fill-color="#5b59ec" loext:decorative="false"/>
    </style:style>
    <style:style style:name="gr188" style:family="graphic" style:parent-style-name="standard">
      <style:graphic-properties draw:stroke="none" draw:fill="solid" draw:fill-color="#5c5aed" loext:decorative="false"/>
    </style:style>
    <style:style style:name="gr189" style:family="graphic" style:parent-style-name="standard">
      <style:graphic-properties draw:stroke="none" draw:fill="solid" draw:fill-color="#5c5bed" loext:decorative="false"/>
    </style:style>
    <style:style style:name="gr190" style:family="graphic" style:parent-style-name="standard">
      <style:graphic-properties draw:stroke="none" draw:fill="solid" draw:fill-color="#5d5ced" loext:decorative="false"/>
    </style:style>
    <style:style style:name="gr191" style:family="graphic" style:parent-style-name="standard">
      <style:graphic-properties draw:stroke="none" draw:fill="solid" draw:fill-color="#5d5dee" loext:decorative="false"/>
    </style:style>
    <style:style style:name="gr192" style:family="graphic" style:parent-style-name="standard">
      <style:graphic-properties draw:stroke="none" draw:fill="solid" draw:fill-color="#5e5eee" loext:decorative="false"/>
    </style:style>
    <style:style style:name="gr193" style:family="graphic" style:parent-style-name="standard">
      <style:graphic-properties draw:stroke="none" draw:fill="solid" draw:fill-color="#5f5fee" loext:decorative="false"/>
    </style:style>
    <style:style style:name="gr194" style:family="graphic" style:parent-style-name="standard">
      <style:graphic-properties draw:stroke="none" draw:fill="solid" draw:fill-color="#5f60ef" loext:decorative="false"/>
    </style:style>
    <style:style style:name="gr195" style:family="graphic" style:parent-style-name="standard">
      <style:graphic-properties draw:stroke="none" draw:fill="solid" draw:fill-color="#6060ef" loext:decorative="false"/>
    </style:style>
    <style:style style:name="gr196" style:family="graphic" style:parent-style-name="standard">
      <style:graphic-properties draw:stroke="none" draw:fill="solid" draw:fill-color="#6061ef" loext:decorative="false"/>
    </style:style>
    <style:style style:name="gr197" style:family="graphic" style:parent-style-name="standard">
      <style:graphic-properties draw:stroke="none" draw:fill="solid" draw:fill-color="#6062ef" loext:decorative="false"/>
    </style:style>
    <style:style style:name="gr198" style:family="graphic" style:parent-style-name="standard">
      <style:graphic-properties draw:stroke="none" draw:fill="solid" draw:fill-color="#6163f0" loext:decorative="false"/>
    </style:style>
    <style:style style:name="gr199" style:family="graphic" style:parent-style-name="standard">
      <style:graphic-properties draw:stroke="none" draw:fill="solid" draw:fill-color="#6264f0" loext:decorative="false"/>
    </style:style>
    <style:style style:name="gr200" style:family="graphic" style:parent-style-name="standard">
      <style:graphic-properties draw:stroke="none" draw:fill="solid" draw:fill-color="#6265f1" loext:decorative="false"/>
    </style:style>
    <style:style style:name="gr201" style:family="graphic" style:parent-style-name="standard">
      <style:graphic-properties draw:stroke="none" draw:fill="solid" draw:fill-color="#6365f1" loext:decorative="false"/>
    </style:style>
    <style:style style:name="gr202" style:family="graphic" style:parent-style-name="standard">
      <style:graphic-properties draw:stroke="solid" svg:stroke-width="0.026cm" svg:stroke-color="#a5b4fc" svg:stroke-opacity="10%" draw:stroke-linejoin="miter" svg:stroke-linecap="butt" draw:fill="none" fo:padding-top="0.013cm" fo:padding-bottom="0.013cm" fo:padding-left="0.013cm" fo:padding-right="0.013cm" loext:decorative="false"/>
    </style:style>
    <style:style style:name="gr20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204" style:family="graphic" style:parent-style-name="standard">
      <style:graphic-properties draw:stroke="none" draw:fill="solid" draw:fill-color="#818cf8" loext:decorative="false"/>
    </style:style>
    <style:style style:name="gr205" style:family="graphic" style:parent-style-name="standard">
      <style:graphic-properties draw:stroke="none" draw:fill="solid" draw:fill-color="#808bf8" loext:decorative="false"/>
    </style:style>
    <style:style style:name="gr206" style:family="graphic" style:parent-style-name="standard">
      <style:graphic-properties draw:stroke="none" draw:fill="solid" draw:fill-color="#7f8af8" loext:decorative="false"/>
    </style:style>
    <style:style style:name="gr207" style:family="graphic" style:parent-style-name="standard">
      <style:graphic-properties draw:stroke="none" draw:fill="solid" draw:fill-color="#7f89f7" loext:decorative="false"/>
    </style:style>
    <style:style style:name="gr208" style:family="graphic" style:parent-style-name="standard">
      <style:graphic-properties draw:stroke="none" draw:fill="solid" draw:fill-color="#7e89f7" loext:decorative="false"/>
    </style:style>
    <style:style style:name="gr209" style:family="graphic" style:parent-style-name="standard">
      <style:graphic-properties draw:stroke="none" draw:fill="solid" draw:fill-color="#7e88f7" loext:decorative="false"/>
    </style:style>
    <style:style style:name="gr210" style:family="graphic" style:parent-style-name="standard">
      <style:graphic-properties draw:stroke="none" draw:fill="solid" draw:fill-color="#7d88f7" loext:decorative="false"/>
    </style:style>
    <style:style style:name="gr211" style:family="graphic" style:parent-style-name="standard">
      <style:graphic-properties draw:stroke="none" draw:fill="solid" draw:fill-color="#7d87f7" loext:decorative="false"/>
    </style:style>
    <style:style style:name="gr212" style:family="graphic" style:parent-style-name="standard">
      <style:graphic-properties draw:stroke="none" draw:fill="solid" draw:fill-color="#7d86f7" loext:decorative="false"/>
    </style:style>
    <style:style style:name="gr213" style:family="graphic" style:parent-style-name="standard">
      <style:graphic-properties draw:stroke="none" draw:fill="solid" draw:fill-color="#7c86f7" loext:decorative="false"/>
    </style:style>
    <style:style style:name="gr214" style:family="graphic" style:parent-style-name="standard">
      <style:graphic-properties draw:stroke="none" draw:fill="solid" draw:fill-color="#7c85f7" loext:decorative="false"/>
    </style:style>
    <style:style style:name="gr215" style:family="graphic" style:parent-style-name="standard">
      <style:graphic-properties draw:stroke="none" draw:fill="solid" draw:fill-color="#7b85f7" loext:decorative="false"/>
    </style:style>
    <style:style style:name="gr216" style:family="graphic" style:parent-style-name="standard">
      <style:graphic-properties draw:stroke="none" draw:fill="solid" draw:fill-color="#7b84f7" loext:decorative="false"/>
    </style:style>
    <style:style style:name="gr217" style:family="graphic" style:parent-style-name="standard">
      <style:graphic-properties draw:stroke="none" draw:fill="solid" draw:fill-color="#7a83f6" loext:decorative="false"/>
    </style:style>
    <style:style style:name="gr218" style:family="graphic" style:parent-style-name="standard">
      <style:graphic-properties draw:stroke="none" draw:fill="solid" draw:fill-color="#7982f6" loext:decorative="false"/>
    </style:style>
    <style:style style:name="gr219" style:family="graphic" style:parent-style-name="standard">
      <style:graphic-properties draw:stroke="none" draw:fill="solid" draw:fill-color="#7881f6" loext:decorative="false"/>
    </style:style>
    <style:style style:name="gr220" style:family="graphic" style:parent-style-name="standard">
      <style:graphic-properties draw:stroke="none" draw:fill="solid" draw:fill-color="#7880f6" loext:decorative="false"/>
    </style:style>
    <style:style style:name="gr221" style:family="graphic" style:parent-style-name="standard">
      <style:graphic-properties draw:stroke="none" draw:fill="solid" draw:fill-color="#7780f6" loext:decorative="false"/>
    </style:style>
    <style:style style:name="gr222" style:family="graphic" style:parent-style-name="standard">
      <style:graphic-properties draw:stroke="none" draw:fill="solid" draw:fill-color="#777ff6" loext:decorative="false"/>
    </style:style>
    <style:style style:name="gr223" style:family="graphic" style:parent-style-name="standard">
      <style:graphic-properties draw:stroke="none" draw:fill="solid" draw:fill-color="#767ff6" loext:decorative="false"/>
    </style:style>
    <style:style style:name="gr224" style:family="graphic" style:parent-style-name="standard">
      <style:graphic-properties draw:stroke="none" draw:fill="solid" draw:fill-color="#767ef5" loext:decorative="false"/>
    </style:style>
    <style:style style:name="gr225" style:family="graphic" style:parent-style-name="standard">
      <style:graphic-properties draw:stroke="none" draw:fill="solid" draw:fill-color="#767df5" loext:decorative="false"/>
    </style:style>
    <style:style style:name="gr226" style:family="graphic" style:parent-style-name="standard">
      <style:graphic-properties draw:stroke="none" draw:fill="solid" draw:fill-color="#757df5" loext:decorative="false"/>
    </style:style>
    <style:style style:name="gr227" style:family="graphic" style:parent-style-name="standard">
      <style:graphic-properties draw:stroke="none" draw:fill="solid" draw:fill-color="#757cf5" loext:decorative="false"/>
    </style:style>
    <style:style style:name="gr228" style:family="graphic" style:parent-style-name="standard">
      <style:graphic-properties draw:stroke="none" draw:fill="solid" draw:fill-color="#747cf5" loext:decorative="false"/>
    </style:style>
    <style:style style:name="gr229" style:family="graphic" style:parent-style-name="standard">
      <style:graphic-properties draw:stroke="none" draw:fill="solid" draw:fill-color="#747bf5" loext:decorative="false"/>
    </style:style>
    <style:style style:name="gr230" style:family="graphic" style:parent-style-name="standard">
      <style:graphic-properties draw:stroke="none" draw:fill="solid" draw:fill-color="#737af5" loext:decorative="false"/>
    </style:style>
    <style:style style:name="gr231" style:family="graphic" style:parent-style-name="standard">
      <style:graphic-properties draw:stroke="none" draw:fill="solid" draw:fill-color="#7279f5" loext:decorative="false"/>
    </style:style>
    <style:style style:name="gr232" style:family="graphic" style:parent-style-name="standard">
      <style:graphic-properties draw:stroke="none" draw:fill="solid" draw:fill-color="#7279f4" loext:decorative="false"/>
    </style:style>
    <style:style style:name="gr233" style:family="graphic" style:parent-style-name="standard">
      <style:graphic-properties draw:stroke="none" draw:fill="solid" draw:fill-color="#7178f4" loext:decorative="false"/>
    </style:style>
    <style:style style:name="gr234" style:family="graphic" style:parent-style-name="standard">
      <style:graphic-properties draw:stroke="none" draw:fill="solid" draw:fill-color="#7077f4" loext:decorative="false"/>
    </style:style>
    <style:style style:name="gr235" style:family="graphic" style:parent-style-name="standard">
      <style:graphic-properties draw:stroke="none" draw:fill="solid" draw:fill-color="#7076f4" loext:decorative="false"/>
    </style:style>
    <style:style style:name="gr236" style:family="graphic" style:parent-style-name="standard">
      <style:graphic-properties draw:stroke="none" draw:fill="solid" draw:fill-color="#6f76f4" loext:decorative="false"/>
    </style:style>
    <style:style style:name="gr237" style:family="graphic" style:parent-style-name="standard">
      <style:graphic-properties draw:stroke="none" draw:fill="solid" draw:fill-color="#6f75f4" loext:decorative="false"/>
    </style:style>
    <style:style style:name="gr238" style:family="graphic" style:parent-style-name="standard">
      <style:graphic-properties draw:stroke="none" draw:fill="solid" draw:fill-color="#6e75f4" loext:decorative="false"/>
    </style:style>
    <style:style style:name="gr239" style:family="graphic" style:parent-style-name="standard">
      <style:graphic-properties draw:stroke="none" draw:fill="solid" draw:fill-color="#6e74f4" loext:decorative="false"/>
    </style:style>
    <style:style style:name="gr240" style:family="graphic" style:parent-style-name="standard">
      <style:graphic-properties draw:stroke="none" draw:fill="solid" draw:fill-color="#6e73f3" loext:decorative="false"/>
    </style:style>
    <style:style style:name="gr241" style:family="graphic" style:parent-style-name="standard">
      <style:graphic-properties draw:stroke="none" draw:fill="solid" draw:fill-color="#6d73f3" loext:decorative="false"/>
    </style:style>
    <style:style style:name="gr242" style:family="graphic" style:parent-style-name="standard">
      <style:graphic-properties draw:stroke="none" draw:fill="solid" draw:fill-color="#6d72f3" loext:decorative="false"/>
    </style:style>
    <style:style style:name="gr243" style:family="graphic" style:parent-style-name="standard">
      <style:graphic-properties draw:stroke="none" draw:fill="solid" draw:fill-color="#6c72f3" loext:decorative="false"/>
    </style:style>
    <style:style style:name="gr244" style:family="graphic" style:parent-style-name="standard">
      <style:graphic-properties draw:stroke="none" draw:fill="solid" draw:fill-color="#6c71f3" loext:decorative="false"/>
    </style:style>
    <style:style style:name="gr245" style:family="graphic" style:parent-style-name="standard">
      <style:graphic-properties draw:stroke="none" draw:fill="solid" draw:fill-color="#6b70f3" loext:decorative="false"/>
    </style:style>
    <style:style style:name="gr246" style:family="graphic" style:parent-style-name="standard">
      <style:graphic-properties draw:stroke="none" draw:fill="solid" draw:fill-color="#6a6ff3" loext:decorative="false"/>
    </style:style>
    <style:style style:name="gr247" style:family="graphic" style:parent-style-name="standard">
      <style:graphic-properties draw:stroke="none" draw:fill="solid" draw:fill-color="#696ef2" loext:decorative="false"/>
    </style:style>
    <style:style style:name="gr248" style:family="graphic" style:parent-style-name="standard">
      <style:graphic-properties draw:stroke="none" draw:fill="solid" draw:fill-color="#696df2" loext:decorative="false"/>
    </style:style>
    <style:style style:name="gr249" style:family="graphic" style:parent-style-name="standard">
      <style:graphic-properties draw:stroke="none" draw:fill="solid" draw:fill-color="#686df2" loext:decorative="false"/>
    </style:style>
    <style:style style:name="gr250" style:family="graphic" style:parent-style-name="standard">
      <style:graphic-properties draw:stroke="none" draw:fill="solid" draw:fill-color="#686cf2" loext:decorative="false"/>
    </style:style>
    <style:style style:name="gr251" style:family="graphic" style:parent-style-name="standard">
      <style:graphic-properties draw:stroke="none" draw:fill="solid" draw:fill-color="#676cf2" loext:decorative="false"/>
    </style:style>
    <style:style style:name="gr252" style:family="graphic" style:parent-style-name="standard">
      <style:graphic-properties draw:stroke="none" draw:fill="solid" draw:fill-color="#676bf2" loext:decorative="false"/>
    </style:style>
    <style:style style:name="gr253" style:family="graphic" style:parent-style-name="standard">
      <style:graphic-properties draw:stroke="none" draw:fill="solid" draw:fill-color="#676af2" loext:decorative="false"/>
    </style:style>
    <style:style style:name="gr254" style:family="graphic" style:parent-style-name="standard">
      <style:graphic-properties draw:stroke="none" draw:fill="solid" draw:fill-color="#666af2" loext:decorative="false"/>
    </style:style>
    <style:style style:name="gr255" style:family="graphic" style:parent-style-name="standard">
      <style:graphic-properties draw:stroke="none" draw:fill="solid" draw:fill-color="#6669f2" loext:decorative="false"/>
    </style:style>
    <style:style style:name="gr256" style:family="graphic" style:parent-style-name="standard">
      <style:graphic-properties draw:stroke="none" draw:fill="solid" draw:fill-color="#6569f1" loext:decorative="false"/>
    </style:style>
    <style:style style:name="gr257" style:family="graphic" style:parent-style-name="standard">
      <style:graphic-properties draw:stroke="none" draw:fill="solid" draw:fill-color="#6568f1" loext:decorative="false"/>
    </style:style>
    <style:style style:name="gr258" style:family="graphic" style:parent-style-name="standard">
      <style:graphic-properties draw:stroke="none" draw:fill="solid" draw:fill-color="#6467f1" loext:decorative="false"/>
    </style:style>
    <style:style style:name="gr259" style:family="graphic" style:parent-style-name="standard">
      <style:graphic-properties draw:stroke="none" draw:fill="solid" draw:fill-color="#6366f1" loext:decorative="false"/>
    </style:style>
    <style:style style:name="gr260" style:family="graphic" style:parent-style-name="standard">
      <style:graphic-properties draw:stroke="solid" svg:stroke-width="0.026cm" svg:stroke-color="#a5b4fc" svg:stroke-opacity="20%" draw:stroke-linejoin="miter" svg:stroke-linecap="butt" draw:fill="none" fo:padding-top="0.013cm" fo:padding-bottom="0.013cm" fo:padding-left="0.013cm" fo:padding-right="0.013cm" loext:decorative="false"/>
    </style:style>
    <style:style style:name="gr261" style:family="graphic" style:parent-style-name="standard">
      <style:graphic-properties draw:stroke="none" draw:fill="solid" draw:fill-color="#a5b4fc" draw:opacity="10%" loext:decorative="false"/>
    </style:style>
    <style:style style:name="gr262" style:family="graphic" style:parent-style-name="standard">
      <style:graphic-properties draw:stroke="solid" svg:stroke-width="0.026cm" svg:stroke-color="#818cf8" svg:stroke-opacity="12%" draw:stroke-linejoin="miter" svg:stroke-linecap="butt" draw:fill="none" fo:padding-top="0.013cm" fo:padding-bottom="0.013cm" fo:padding-left="0.013cm" fo:padding-right="0.013cm" loext:decorative="false"/>
    </style:style>
    <style:style style:name="gr263" style:family="graphic" style:parent-style-name="standard">
      <style:graphic-properties draw:stroke="none" draw:fill="solid" draw:fill-color="#a5b4fc" draw:opacity="25%" loext:decorative="false"/>
    </style:style>
    <style:style style:name="gr264"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loext:decorative="false"/>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1.271cm" fo:min-width="1.271cm" fo:padding-top="0cm" fo:padding-bottom="0cm" fo:padding-left="0cm" fo:padding-right="0cm" loext:decorative="false"/>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494cm" fo:min-width="0.494cm" fo:padding-top="0cm" fo:padding-bottom="0cm" fo:padding-left="0cm" fo:padding-right="0cm" loext:decorative="false"/>
      <style:paragraph-properties style:writing-mode="lr-tb"/>
    </style:style>
    <style:style style:name="gr267" style:family="graphic" style:parent-style-name="standard">
      <style:graphic-properties draw:stroke="none" draw:fill="solid" draw:fill-color="#a5b4fc" draw:opacity="15%" loext:decorative="false"/>
    </style:style>
    <style:style style:name="gr268"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loext:decorative="false"/>
      <style:paragraph-properties style:writing-mode="lr-tb"/>
    </style:style>
    <style:style style:name="gr269" style:family="graphic" style:parent-style-name="standard">
      <style:graphic-properties draw:stroke="none" draw:fill="solid" draw:fill-color="#cbd5e1" loext:decorative="false"/>
    </style:style>
    <style:style style:name="gr270" style:family="graphic" style:parent-style-name="standard">
      <style:graphic-properties draw:stroke="none" draw:fill="none" draw:textarea-horizontal-align="left" draw:textarea-vertical-align="top" draw:auto-grow-height="true" draw:auto-grow-width="true" fo:min-height="0.706cm" fo:min-width="0.706cm" fo:padding-top="0cm" fo:padding-bottom="0cm" fo:padding-left="0cm" fo:padding-right="0cm" loext:decorative="false"/>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loext:decorative="false"/>
      <style:paragraph-properties style:writing-mode="lr-tb"/>
    </style:style>
    <style:style style:name="gr272" style:family="graphic" style:parent-style-name="standard">
      <style:graphic-properties draw:stroke="none" draw:fill="solid" draw:fill-color="#eff6ff" loext:decorative="false"/>
    </style:style>
    <style:style style:name="gr273" style:family="graphic" style:parent-style-name="standard">
      <style:graphic-properties draw:stroke="none" draw:fill="solid" draw:fill-color="#3b82f6" loext:decorative="false"/>
    </style:style>
    <style:style style:name="gr274" style:family="graphic" style:parent-style-name="standard">
      <style:graphic-properties draw:stroke="none" draw:fill="solid" draw:fill-color="#fff7ed" loext:decorative="false"/>
    </style:style>
    <style:style style:name="gr275" style:family="graphic" style:parent-style-name="standard">
      <style:graphic-properties draw:stroke="none" draw:fill="solid" draw:fill-color="#f97316" loext:decorative="false"/>
    </style:style>
    <style:style style:name="gr276" style:family="graphic" style:parent-style-name="standard">
      <style:graphic-properties draw:stroke="none" draw:fill="solid" draw:fill-color="#e2e8f0" loext:decorative="false"/>
    </style:style>
    <style:style style:name="gr277" style:family="graphic" style:parent-style-name="standard">
      <style:graphic-properties draw:stroke="none" draw:fill="none" draw:textarea-horizontal-align="left" draw:textarea-vertical-align="top" draw:auto-grow-height="true" draw:auto-grow-width="true" fo:min-height="0.776cm" fo:min-width="0.776cm" fo:padding-top="0cm" fo:padding-bottom="0cm" fo:padding-left="0cm" fo:padding-right="0cm" loext:decorative="false"/>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37cm" fo:min-width="0.37cm" fo:padding-top="0cm" fo:padding-bottom="0cm" fo:padding-left="0cm" fo:padding-right="0cm" loext:decorative="false"/>
      <style:paragraph-properties style:writing-mode="lr-tb"/>
    </style:style>
    <style:style style:name="gr279" style:family="graphic" style:parent-style-name="standard">
      <style:graphic-properties draw:stroke="none" draw:fill="solid" draw:fill-color="#f0fdf4" loext:decorative="false"/>
    </style:style>
    <style:style style:name="gr280" style:family="graphic" style:parent-style-name="standard">
      <style:graphic-properties draw:stroke="solid" svg:stroke-width="0.026cm" svg:stroke-color="#bbf7d0" draw:stroke-linejoin="miter" svg:stroke-linecap="butt" draw:fill="none" fo:padding-top="0.013cm" fo:padding-bottom="0.013cm" fo:padding-left="0.013cm" fo:padding-right="0.013cm" loext:decorative="false"/>
    </style:style>
    <style:style style:name="gr281" style:family="graphic" style:parent-style-name="standard">
      <style:graphic-properties draw:stroke="none" draw:fill="none" draw:textarea-horizontal-align="left" draw:textarea-vertical-align="top" draw:auto-grow-height="true" draw:auto-grow-width="true" fo:min-height="0.529cm" fo:min-width="0.529cm" fo:padding-top="0cm" fo:padding-bottom="0cm" fo:padding-left="0cm" fo:padding-right="0cm" loext:decorative="false"/>
      <style:paragraph-properties style:writing-mode="lr-tb"/>
    </style:style>
    <style:style style:name="gr282" style:family="graphic" style:parent-style-name="standard">
      <style:graphic-properties draw:stroke="none" draw:fill="solid" draw:fill-color="#f8fafc" loext:decorative="false"/>
    </style:style>
    <style:style style:name="gr283" style:family="graphic" style:parent-style-name="standard">
      <style:graphic-properties draw:stroke="solid" svg:stroke-width="0.026cm" svg:stroke-color="#e2e8f0" draw:stroke-linejoin="miter" svg:stroke-linecap="butt" draw:fill="none" fo:padding-top="0.013cm" fo:padding-bottom="0.013cm" fo:padding-left="0.013cm" fo:padding-right="0.013cm" loext:decorative="false"/>
    </style:style>
    <style:style style:name="gr284" style:family="graphic" style:parent-style-name="standard">
      <style:graphic-properties draw:stroke="none" draw:fill="solid" draw:fill-color="#f1f5f9" loext:decorative="false"/>
    </style:style>
    <style:style style:name="gr285" style:family="graphic" style:parent-style-name="standard">
      <style:graphic-properties draw:stroke="none" draw:fill="none" draw:textarea-horizontal-align="left" draw:textarea-vertical-align="top" draw:auto-grow-height="true" draw:auto-grow-width="true" fo:min-height="0.282cm" fo:min-width="0.282cm" fo:padding-top="0cm" fo:padding-bottom="0cm" fo:padding-left="0cm" fo:padding-right="0cm" loext:decorative="false"/>
      <style:paragraph-properties style:writing-mode="lr-tb"/>
    </style:style>
    <style:style style:name="gr286" style:family="graphic" style:parent-style-name="standard">
      <style:graphic-properties draw:stroke="none" draw:fill="solid" draw:fill-color="#22c55e" loext:decorative="false"/>
    </style:style>
    <style:style style:name="gr287" style:family="graphic" style:parent-style-name="standard">
      <style:graphic-properties draw:stroke="none" draw:fill="solid" draw:fill-color="#0f172a" loext:decorative="false"/>
    </style:style>
    <style:style style:name="gr288" style:family="graphic" style:parent-style-name="standard">
      <style:graphic-properties draw:stroke="none" draw:fill="solid" draw:fill-color="#f0fdfa" loext:decorative="false"/>
    </style:style>
    <style:style style:name="gr289" style:family="graphic" style:parent-style-name="standard">
      <style:graphic-properties draw:stroke="solid" svg:stroke-width="0.026cm" svg:stroke-color="#99f6e4" draw:stroke-linejoin="miter" svg:stroke-linecap="butt" draw:fill="none" fo:padding-top="0.013cm" fo:padding-bottom="0.013cm" fo:padding-left="0.013cm" fo:padding-right="0.013cm" loext:decorative="false"/>
    </style:style>
    <style:style style:name="gr290" style:family="graphic" style:parent-style-name="standard">
      <style:graphic-properties draw:stroke="none" draw:fill="solid" draw:fill-color="#faf5ff" loext:decorative="false"/>
    </style:style>
    <style:style style:name="gr291" style:family="graphic" style:parent-style-name="standard">
      <style:graphic-properties draw:stroke="none" draw:fill="solid" draw:fill-color="#a855f7" loext:decorative="false"/>
    </style:style>
    <style:style style:name="gr292" style:family="graphic" style:parent-style-name="standard">
      <style:graphic-properties draw:stroke="solid" svg:stroke-width="0.026cm" svg:stroke-color="#e9d5ff" draw:stroke-linejoin="miter" svg:stroke-linecap="butt" draw:fill="none" fo:padding-top="0.013cm" fo:padding-bottom="0.013cm" fo:padding-left="0.013cm" fo:padding-right="0.013cm" loext:decorative="false"/>
    </style:style>
    <style:style style:name="gr293" style:family="graphic" style:parent-style-name="standard">
      <style:graphic-properties draw:stroke="none" draw:fill="none" draw:textarea-horizontal-align="left" draw:textarea-vertical-align="top" draw:auto-grow-height="true" draw:auto-grow-width="true" fo:min-height="0.423cm" fo:min-width="0.423cm" fo:padding-top="0cm" fo:padding-bottom="0cm" fo:padding-left="0cm" fo:padding-right="0cm" loext:decorative="false"/>
      <style:paragraph-properties style:writing-mode="lr-tb"/>
    </style:style>
    <style:style style:name="gr294" style:family="graphic" style:parent-style-name="standard">
      <style:graphic-properties draw:stroke="none" draw:fill="solid" draw:fill-color="#1e293b" loext:decorative="false"/>
    </style:style>
    <style:style style:name="P1" style:family="paragraph">
      <loext:graphic-properties draw:fill="solid" draw:fill-color="#0f172b"/>
    </style:style>
    <style:style style:name="P2" style:family="paragraph">
      <loext:graphic-properties draw:fill="solid" draw:fill-color="#10182c"/>
    </style:style>
    <style:style style:name="P3" style:family="paragraph">
      <loext:graphic-properties draw:fill="solid" draw:fill-color="#10182d"/>
    </style:style>
    <style:style style:name="P4" style:family="paragraph">
      <loext:graphic-properties draw:fill="solid" draw:fill-color="#11182e"/>
    </style:style>
    <style:style style:name="P5" style:family="paragraph">
      <loext:graphic-properties draw:fill="solid" draw:fill-color="#11182f"/>
    </style:style>
    <style:style style:name="P6" style:family="paragraph">
      <loext:graphic-properties draw:fill="solid" draw:fill-color="#111930"/>
    </style:style>
    <style:style style:name="P7" style:family="paragraph">
      <loext:graphic-properties draw:fill="solid" draw:fill-color="#121931"/>
    </style:style>
    <style:style style:name="P8" style:family="paragraph">
      <loext:graphic-properties draw:fill="solid" draw:fill-color="#121932"/>
    </style:style>
    <style:style style:name="P9" style:family="paragraph">
      <loext:graphic-properties draw:fill="solid" draw:fill-color="#121933"/>
    </style:style>
    <style:style style:name="P10" style:family="paragraph">
      <loext:graphic-properties draw:fill="solid" draw:fill-color="#131a34"/>
    </style:style>
    <style:style style:name="P11" style:family="paragraph">
      <loext:graphic-properties draw:fill="solid" draw:fill-color="#131a35"/>
    </style:style>
    <style:style style:name="P12" style:family="paragraph">
      <loext:graphic-properties draw:fill="solid" draw:fill-color="#141a36"/>
    </style:style>
    <style:style style:name="P13" style:family="paragraph">
      <loext:graphic-properties draw:fill="solid" draw:fill-color="#141a37"/>
    </style:style>
    <style:style style:name="P14" style:family="paragraph">
      <loext:graphic-properties draw:fill="solid" draw:fill-color="#141b38"/>
    </style:style>
    <style:style style:name="P15" style:family="paragraph">
      <loext:graphic-properties draw:fill="solid" draw:fill-color="#151b39"/>
    </style:style>
    <style:style style:name="P16" style:family="paragraph">
      <loext:graphic-properties draw:fill="solid" draw:fill-color="#151b3a"/>
    </style:style>
    <style:style style:name="P17" style:family="paragraph">
      <loext:graphic-properties draw:fill="solid" draw:fill-color="#161c3b"/>
    </style:style>
    <style:style style:name="P18" style:family="paragraph">
      <loext:graphic-properties draw:fill="solid" draw:fill-color="#161c3c"/>
    </style:style>
    <style:style style:name="P19" style:family="paragraph">
      <loext:graphic-properties draw:fill="solid" draw:fill-color="#171c3d"/>
    </style:style>
    <style:style style:name="P20" style:family="paragraph">
      <loext:graphic-properties draw:fill="solid" draw:fill-color="#171c3e"/>
    </style:style>
    <style:style style:name="P21" style:family="paragraph">
      <loext:graphic-properties draw:fill="solid" draw:fill-color="#171d3f"/>
    </style:style>
    <style:style style:name="P22" style:family="paragraph">
      <loext:graphic-properties draw:fill="solid" draw:fill-color="#181d40"/>
    </style:style>
    <style:style style:name="P23" style:family="paragraph">
      <loext:graphic-properties draw:fill="solid" draw:fill-color="#181d41"/>
    </style:style>
    <style:style style:name="P24" style:family="paragraph">
      <loext:graphic-properties draw:fill="solid" draw:fill-color="#181d42"/>
    </style:style>
    <style:style style:name="P25" style:family="paragraph">
      <loext:graphic-properties draw:fill="solid" draw:fill-color="#191e43"/>
    </style:style>
    <style:style style:name="P26" style:family="paragraph">
      <loext:graphic-properties draw:fill="solid" draw:fill-color="#191e44"/>
    </style:style>
    <style:style style:name="P27" style:family="paragraph">
      <loext:graphic-properties draw:fill="solid" draw:fill-color="#1a1e45"/>
    </style:style>
    <style:style style:name="P28" style:family="paragraph">
      <loext:graphic-properties draw:fill="solid" draw:fill-color="#1a1e46"/>
    </style:style>
    <style:style style:name="P29" style:family="paragraph">
      <loext:graphic-properties draw:fill="solid" draw:fill-color="#1a1f47"/>
    </style:style>
    <style:style style:name="P30" style:family="paragraph">
      <loext:graphic-properties draw:fill="solid" draw:fill-color="#1b1f48"/>
    </style:style>
    <style:style style:name="P31" style:family="paragraph">
      <loext:graphic-properties draw:fill="solid" draw:fill-color="#1b1f49"/>
    </style:style>
    <style:style style:name="P32" style:family="paragraph">
      <loext:graphic-properties draw:fill="solid" draw:fill-color="#1b1f4a"/>
    </style:style>
    <style:style style:name="P33" style:family="paragraph">
      <loext:graphic-properties draw:fill="solid" draw:fill-color="#1c204b"/>
    </style:style>
    <style:style style:name="P34" style:family="paragraph">
      <loext:graphic-properties draw:fill="solid" draw:fill-color="#1c204c"/>
    </style:style>
    <style:style style:name="P35" style:family="paragraph">
      <loext:graphic-properties draw:fill="solid" draw:fill-color="#1d204d"/>
    </style:style>
    <style:style style:name="P36" style:family="paragraph">
      <loext:graphic-properties draw:fill="solid" draw:fill-color="#1d204e"/>
    </style:style>
    <style:style style:name="P37" style:family="paragraph">
      <loext:graphic-properties draw:fill="solid" draw:fill-color="#1d214f"/>
    </style:style>
    <style:style style:name="P38" style:family="paragraph">
      <loext:graphic-properties draw:fill="solid" draw:fill-color="#1e2150"/>
    </style:style>
    <style:style style:name="P39" style:family="paragraph">
      <loext:graphic-properties draw:fill="solid" draw:fill-color="#1e2151"/>
    </style:style>
    <style:style style:name="P40" style:family="paragraph">
      <loext:graphic-properties draw:fill="solid" draw:fill-color="#1f2252"/>
    </style:style>
    <style:style style:name="P41" style:family="paragraph">
      <loext:graphic-properties draw:fill="solid" draw:fill-color="#1f2253"/>
    </style:style>
    <style:style style:name="P42" style:family="paragraph">
      <loext:graphic-properties draw:fill="solid" draw:fill-color="#1f2254"/>
    </style:style>
    <style:style style:name="P43" style:family="paragraph">
      <loext:graphic-properties draw:fill="solid" draw:fill-color="#202255"/>
    </style:style>
    <style:style style:name="P44" style:family="paragraph">
      <loext:graphic-properties draw:fill="solid" draw:fill-color="#202356"/>
    </style:style>
    <style:style style:name="P45" style:family="paragraph">
      <loext:graphic-properties draw:fill="solid" draw:fill-color="#202357"/>
    </style:style>
    <style:style style:name="P46" style:family="paragraph">
      <loext:graphic-properties draw:fill="solid" draw:fill-color="#212358"/>
    </style:style>
    <style:style style:name="P47" style:family="paragraph">
      <loext:graphic-properties draw:fill="solid" draw:fill-color="#212359"/>
    </style:style>
    <style:style style:name="P48" style:family="paragraph">
      <loext:graphic-properties draw:fill="solid" draw:fill-color="#222459"/>
    </style:style>
    <style:style style:name="P49" style:family="paragraph">
      <loext:graphic-properties draw:fill="solid" draw:fill-color="#22245a"/>
    </style:style>
    <style:style style:name="P50" style:family="paragraph">
      <loext:graphic-properties draw:fill="solid" draw:fill-color="#22245b"/>
    </style:style>
    <style:style style:name="P51" style:family="paragraph">
      <loext:graphic-properties draw:fill="solid" draw:fill-color="#23245c"/>
    </style:style>
    <style:style style:name="P52" style:family="paragraph">
      <loext:graphic-properties draw:fill="solid" draw:fill-color="#23255d"/>
    </style:style>
    <style:style style:name="P53" style:family="paragraph">
      <loext:graphic-properties draw:fill="solid" draw:fill-color="#23255e"/>
    </style:style>
    <style:style style:name="P54" style:family="paragraph">
      <loext:graphic-properties draw:fill="solid" draw:fill-color="#24255f"/>
    </style:style>
    <style:style style:name="P55" style:family="paragraph">
      <loext:graphic-properties draw:fill="solid" draw:fill-color="#242560"/>
    </style:style>
    <style:style style:name="P56" style:family="paragraph">
      <loext:graphic-properties draw:fill="solid" draw:fill-color="#252661"/>
    </style:style>
    <style:style style:name="P57" style:family="paragraph">
      <loext:graphic-properties draw:fill="solid" draw:fill-color="#252662"/>
    </style:style>
    <style:style style:name="P58" style:family="paragraph">
      <loext:graphic-properties draw:fill="solid" draw:fill-color="#252663"/>
    </style:style>
    <style:style style:name="P59" style:family="paragraph">
      <loext:graphic-properties draw:fill="solid" draw:fill-color="#262664"/>
    </style:style>
    <style:style style:name="P60" style:family="paragraph">
      <loext:graphic-properties draw:fill="solid" draw:fill-color="#262765"/>
    </style:style>
    <style:style style:name="P61" style:family="paragraph">
      <loext:graphic-properties draw:fill="solid" draw:fill-color="#262766"/>
    </style:style>
    <style:style style:name="P62" style:family="paragraph">
      <loext:graphic-properties draw:fill="solid" draw:fill-color="#272767"/>
    </style:style>
    <style:style style:name="P63" style:family="paragraph">
      <loext:graphic-properties draw:fill="solid" draw:fill-color="#272768"/>
    </style:style>
    <style:style style:name="P64" style:family="paragraph">
      <loext:graphic-properties draw:fill="solid" draw:fill-color="#282869"/>
    </style:style>
    <style:style style:name="P65" style:family="paragraph">
      <loext:graphic-properties draw:fill="solid" draw:fill-color="#28286a"/>
    </style:style>
    <style:style style:name="P66" style:family="paragraph">
      <loext:graphic-properties draw:fill="solid" draw:fill-color="#28286b"/>
    </style:style>
    <style:style style:name="P67" style:family="paragraph">
      <loext:graphic-properties draw:fill="solid" draw:fill-color="#29286c"/>
    </style:style>
    <style:style style:name="P68" style:family="paragraph">
      <loext:graphic-properties draw:fill="solid" draw:fill-color="#29296d"/>
    </style:style>
    <style:style style:name="P69" style:family="paragraph">
      <loext:graphic-properties draw:fill="solid" draw:fill-color="#2a296e"/>
    </style:style>
    <style:style style:name="P70" style:family="paragraph">
      <loext:graphic-properties draw:fill="solid" draw:fill-color="#2a296f"/>
    </style:style>
    <style:style style:name="P71" style:family="paragraph">
      <loext:graphic-properties draw:fill="solid" draw:fill-color="#2a2970"/>
    </style:style>
    <style:style style:name="P72" style:family="paragraph">
      <loext:graphic-properties draw:fill="solid" draw:fill-color="#2b2a71"/>
    </style:style>
    <style:style style:name="P73" style:family="paragraph">
      <loext:graphic-properties draw:fill="solid" draw:fill-color="#2b2a72"/>
    </style:style>
    <style:style style:name="P74" style:family="paragraph">
      <loext:graphic-properties draw:fill="solid" draw:fill-color="#2b2a73"/>
    </style:style>
    <style:style style:name="P75" style:family="paragraph">
      <loext:graphic-properties draw:fill="solid" draw:fill-color="#2c2a74"/>
    </style:style>
    <style:style style:name="P76" style:family="paragraph">
      <loext:graphic-properties draw:fill="solid" draw:fill-color="#2c2b75"/>
    </style:style>
    <style:style style:name="P77" style:family="paragraph">
      <loext:graphic-properties draw:fill="solid" draw:fill-color="#2d2b76"/>
    </style:style>
    <style:style style:name="P78" style:family="paragraph">
      <loext:graphic-properties draw:fill="solid" draw:fill-color="#2d2b77"/>
    </style:style>
    <style:style style:name="P79" style:family="paragraph">
      <loext:graphic-properties draw:fill="solid" draw:fill-color="#2d2b78"/>
    </style:style>
    <style:style style:name="P80" style:family="paragraph">
      <loext:graphic-properties draw:fill="solid" draw:fill-color="#2e2c78"/>
    </style:style>
    <style:style style:name="P81" style:family="paragraph">
      <loext:graphic-properties draw:fill="solid" draw:fill-color="#2e2c79"/>
    </style:style>
    <style:style style:name="P82" style:family="paragraph">
      <loext:graphic-properties draw:fill="solid" draw:fill-color="#2e2c7a"/>
    </style:style>
    <style:style style:name="P83" style:family="paragraph">
      <loext:graphic-properties draw:fill="solid" draw:fill-color="#2f2d7b"/>
    </style:style>
    <style:style style:name="P84" style:family="paragraph">
      <loext:graphic-properties draw:fill="solid" draw:fill-color="#2f2d7c"/>
    </style:style>
    <style:style style:name="P85" style:family="paragraph">
      <loext:graphic-properties draw:fill="solid" draw:fill-color="#302d7d"/>
    </style:style>
    <style:style style:name="P86" style:family="paragraph">
      <loext:graphic-properties draw:fill="solid" draw:fill-color="#302d7e"/>
    </style:style>
    <style:style style:name="P87" style:family="paragraph">
      <loext:graphic-properties draw:fill="solid" draw:fill-color="#302e7f"/>
    </style:style>
    <style:style style:name="P88" style:family="paragraph">
      <loext:graphic-properties draw:fill="solid" draw:fill-color="#312e80"/>
    </style:style>
    <style:style style:name="P89" style:family="paragraph">
      <loext:graphic-properties draw:fill="solid" draw:fill-color="#312e81"/>
    </style:style>
    <style:style style:name="P90" style:family="paragraph">
      <loext:graphic-properties draw:fill="solid" draw:fill-color="#312e83"/>
    </style:style>
    <style:style style:name="P91" style:family="paragraph">
      <loext:graphic-properties draw:fill="solid" draw:fill-color="#322f84"/>
    </style:style>
    <style:style style:name="P92" style:family="paragraph">
      <loext:graphic-properties draw:fill="solid" draw:fill-color="#322f85"/>
    </style:style>
    <style:style style:name="P93" style:family="paragraph">
      <loext:graphic-properties draw:fill="solid" draw:fill-color="#332f86"/>
    </style:style>
    <style:style style:name="P94" style:family="paragraph">
      <loext:graphic-properties draw:fill="solid" draw:fill-color="#333088"/>
    </style:style>
    <style:style style:name="P95" style:family="paragraph">
      <loext:graphic-properties draw:fill="solid" draw:fill-color="#333089"/>
    </style:style>
    <style:style style:name="P96" style:family="paragraph">
      <loext:graphic-properties draw:fill="solid" draw:fill-color="#34308a"/>
    </style:style>
    <style:style style:name="P97" style:family="paragraph">
      <loext:graphic-properties draw:fill="solid" draw:fill-color="#34318c"/>
    </style:style>
    <style:style style:name="P98" style:family="paragraph">
      <loext:graphic-properties draw:fill="solid" draw:fill-color="#35318d"/>
    </style:style>
    <style:style style:name="P99" style:family="paragraph">
      <loext:graphic-properties draw:fill="solid" draw:fill-color="#35318e"/>
    </style:style>
    <style:style style:name="P100" style:family="paragraph">
      <loext:graphic-properties draw:fill="solid" draw:fill-color="#353190"/>
    </style:style>
    <style:style style:name="P101" style:family="paragraph">
      <loext:graphic-properties draw:fill="solid" draw:fill-color="#363291"/>
    </style:style>
    <style:style style:name="P102" style:family="paragraph">
      <loext:graphic-properties draw:fill="solid" draw:fill-color="#363292"/>
    </style:style>
    <style:style style:name="P103" style:family="paragraph">
      <loext:graphic-properties draw:fill="solid" draw:fill-color="#373293"/>
    </style:style>
    <style:style style:name="P104" style:family="paragraph">
      <loext:graphic-properties draw:fill="solid" draw:fill-color="#373395"/>
    </style:style>
    <style:style style:name="P105" style:family="paragraph">
      <loext:graphic-properties draw:fill="solid" draw:fill-color="#373396"/>
    </style:style>
    <style:style style:name="P106" style:family="paragraph">
      <loext:graphic-properties draw:fill="solid" draw:fill-color="#383397"/>
    </style:style>
    <style:style style:name="P107" style:family="paragraph">
      <loext:graphic-properties draw:fill="solid" draw:fill-color="#383499"/>
    </style:style>
    <style:style style:name="P108" style:family="paragraph">
      <loext:graphic-properties draw:fill="solid" draw:fill-color="#38349a"/>
    </style:style>
    <style:style style:name="P109" style:family="paragraph">
      <loext:graphic-properties draw:fill="solid" draw:fill-color="#39349b"/>
    </style:style>
    <style:style style:name="P110" style:family="paragraph">
      <loext:graphic-properties draw:fill="solid" draw:fill-color="#39359d"/>
    </style:style>
    <style:style style:name="P111" style:family="paragraph">
      <loext:graphic-properties draw:fill="solid" draw:fill-color="#3a359e"/>
    </style:style>
    <style:style style:name="P112" style:family="paragraph">
      <loext:graphic-properties draw:fill="solid" draw:fill-color="#3a359f"/>
    </style:style>
    <style:style style:name="P113" style:family="paragraph">
      <loext:graphic-properties draw:fill="solid" draw:fill-color="#3a36a0"/>
    </style:style>
    <style:style style:name="P114" style:family="paragraph">
      <loext:graphic-properties draw:fill="solid" draw:fill-color="#3b36a2"/>
    </style:style>
    <style:style style:name="P115" style:family="paragraph">
      <loext:graphic-properties draw:fill="solid" draw:fill-color="#3b36a3"/>
    </style:style>
    <style:style style:name="P116" style:family="paragraph">
      <loext:graphic-properties draw:fill="solid" draw:fill-color="#3c36a4"/>
    </style:style>
    <style:style style:name="P117" style:family="paragraph">
      <loext:graphic-properties draw:fill="solid" draw:fill-color="#3c37a6"/>
    </style:style>
    <style:style style:name="P118" style:family="paragraph">
      <loext:graphic-properties draw:fill="solid" draw:fill-color="#3c37a7"/>
    </style:style>
    <style:style style:name="P119" style:family="paragraph">
      <loext:graphic-properties draw:fill="solid" draw:fill-color="#3d37a8"/>
    </style:style>
    <style:style style:name="P120" style:family="paragraph">
      <loext:graphic-properties draw:fill="solid" draw:fill-color="#3d38aa"/>
    </style:style>
    <style:style style:name="P121" style:family="paragraph">
      <loext:graphic-properties draw:fill="solid" draw:fill-color="#3e38ab"/>
    </style:style>
    <style:style style:name="P122" style:family="paragraph">
      <loext:graphic-properties draw:fill="solid" draw:fill-color="#3e38ac"/>
    </style:style>
    <style:style style:name="P123" style:family="paragraph">
      <loext:graphic-properties draw:fill="solid" draw:fill-color="#3e39ad"/>
    </style:style>
    <style:style style:name="P124" style:family="paragraph">
      <loext:graphic-properties draw:fill="solid" draw:fill-color="#3f39af"/>
    </style:style>
    <style:style style:name="P125" style:family="paragraph">
      <loext:graphic-properties draw:fill="solid" draw:fill-color="#3f39b0"/>
    </style:style>
    <style:style style:name="P126" style:family="paragraph">
      <loext:graphic-properties draw:fill="solid" draw:fill-color="#403ab1"/>
    </style:style>
    <style:style style:name="P127" style:family="paragraph">
      <loext:graphic-properties draw:fill="solid" draw:fill-color="#403ab3"/>
    </style:style>
    <style:style style:name="P128" style:family="paragraph">
      <loext:graphic-properties draw:fill="solid" draw:fill-color="#403ab4"/>
    </style:style>
    <style:style style:name="P129" style:family="paragraph">
      <loext:graphic-properties draw:fill="solid" draw:fill-color="#413bb5"/>
    </style:style>
    <style:style style:name="P130" style:family="paragraph">
      <loext:graphic-properties draw:fill="solid" draw:fill-color="#413bb7"/>
    </style:style>
    <style:style style:name="P131" style:family="paragraph">
      <loext:graphic-properties draw:fill="solid" draw:fill-color="#413bb8"/>
    </style:style>
    <style:style style:name="P132" style:family="paragraph">
      <loext:graphic-properties draw:fill="solid" draw:fill-color="#423bb9"/>
    </style:style>
    <style:style style:name="P133" style:family="paragraph">
      <loext:graphic-properties draw:fill="solid" draw:fill-color="#423cba"/>
    </style:style>
    <style:style style:name="P134" style:family="paragraph">
      <loext:graphic-properties draw:fill="solid" draw:fill-color="#433cbc"/>
    </style:style>
    <style:style style:name="P135" style:family="paragraph">
      <loext:graphic-properties draw:fill="solid" draw:fill-color="#433cbd"/>
    </style:style>
    <style:style style:name="P136" style:family="paragraph">
      <loext:graphic-properties draw:fill="solid" draw:fill-color="#433dbe"/>
    </style:style>
    <style:style style:name="P137" style:family="paragraph">
      <loext:graphic-properties draw:fill="solid" draw:fill-color="#443dc0"/>
    </style:style>
    <style:style style:name="P138" style:family="paragraph">
      <loext:graphic-properties draw:fill="solid" draw:fill-color="#443dc1"/>
    </style:style>
    <style:style style:name="P139" style:family="paragraph">
      <loext:graphic-properties draw:fill="solid" draw:fill-color="#453ec2"/>
    </style:style>
    <style:style style:name="P140" style:family="paragraph">
      <loext:graphic-properties draw:fill="solid" draw:fill-color="#453ec4"/>
    </style:style>
    <style:style style:name="P141" style:family="paragraph">
      <loext:graphic-properties draw:fill="solid" draw:fill-color="#453ec5"/>
    </style:style>
    <style:style style:name="P142" style:family="paragraph">
      <loext:graphic-properties draw:fill="solid" draw:fill-color="#463fc6"/>
    </style:style>
    <style:style style:name="P143" style:family="paragraph">
      <loext:graphic-properties draw:fill="solid" draw:fill-color="#463fc7"/>
    </style:style>
    <style:style style:name="P144" style:family="paragraph">
      <loext:graphic-properties draw:fill="solid" draw:fill-color="#473fc9"/>
    </style:style>
    <style:style style:name="P145" style:family="paragraph">
      <loext:graphic-properties draw:fill="solid" draw:fill-color="#4740ca"/>
    </style:style>
    <style:style style:name="P146" style:family="paragraph">
      <loext:graphic-properties draw:fill="solid" draw:fill-color="#4740cb"/>
    </style:style>
    <style:style style:name="P147" style:family="paragraph">
      <loext:graphic-properties draw:fill="solid" draw:fill-color="#4840cd"/>
    </style:style>
    <style:style style:name="P148" style:family="paragraph">
      <loext:graphic-properties draw:fill="solid" draw:fill-color="#4840ce"/>
    </style:style>
    <style:style style:name="P149" style:family="paragraph">
      <loext:graphic-properties draw:fill="solid" draw:fill-color="#4841cf"/>
    </style:style>
    <style:style style:name="P150" style:family="paragraph">
      <loext:graphic-properties draw:fill="solid" draw:fill-color="#4941d0"/>
    </style:style>
    <style:style style:name="P151" style:family="paragraph">
      <loext:graphic-properties draw:fill="solid" draw:fill-color="#4941d2"/>
    </style:style>
    <style:style style:name="P152" style:family="paragraph">
      <loext:graphic-properties draw:fill="solid" draw:fill-color="#4a42d3"/>
    </style:style>
    <style:style style:name="P153" style:family="paragraph">
      <loext:graphic-properties draw:fill="solid" draw:fill-color="#4a42d4"/>
    </style:style>
    <style:style style:name="P154" style:family="paragraph">
      <loext:graphic-properties draw:fill="solid" draw:fill-color="#4a42d6"/>
    </style:style>
    <style:style style:name="P155" style:family="paragraph">
      <loext:graphic-properties draw:fill="solid" draw:fill-color="#4b43d7"/>
    </style:style>
    <style:style style:name="P156" style:family="paragraph">
      <loext:graphic-properties draw:fill="solid" draw:fill-color="#4b43d8"/>
    </style:style>
    <style:style style:name="P157" style:family="paragraph">
      <loext:graphic-properties draw:fill="solid" draw:fill-color="#4c43da"/>
    </style:style>
    <style:style style:name="P158" style:family="paragraph">
      <loext:graphic-properties draw:fill="solid" draw:fill-color="#4c44db"/>
    </style:style>
    <style:style style:name="P159" style:family="paragraph">
      <loext:graphic-properties draw:fill="solid" draw:fill-color="#4c44dc"/>
    </style:style>
    <style:style style:name="P160" style:family="paragraph">
      <loext:graphic-properties draw:fill="solid" draw:fill-color="#4d44dd"/>
    </style:style>
    <style:style style:name="P161" style:family="paragraph">
      <loext:graphic-properties draw:fill="solid" draw:fill-color="#4d45df"/>
    </style:style>
    <style:style style:name="P162" style:family="paragraph">
      <loext:graphic-properties draw:fill="solid" draw:fill-color="#4e45e0"/>
    </style:style>
    <style:style style:name="P163" style:family="paragraph">
      <loext:graphic-properties draw:fill="solid" draw:fill-color="#4e45e1"/>
    </style:style>
    <style:style style:name="P164" style:family="paragraph">
      <loext:graphic-properties draw:fill="solid" draw:fill-color="#4e45e3"/>
    </style:style>
    <style:style style:name="P165" style:family="paragraph">
      <loext:graphic-properties draw:fill="solid" draw:fill-color="#4f46e4"/>
    </style:style>
    <style:style style:name="P166" style:family="paragraph">
      <loext:graphic-properties draw:fill="solid" draw:fill-color="#4f46e5"/>
    </style:style>
    <style:style style:name="P167" style:family="paragraph">
      <loext:graphic-properties draw:fill="solid" draw:fill-color="#4f47e5"/>
    </style:style>
    <style:style style:name="P168" style:family="paragraph">
      <loext:graphic-properties draw:fill="solid" draw:fill-color="#5048e6"/>
    </style:style>
    <style:style style:name="P169" style:family="paragraph">
      <loext:graphic-properties draw:fill="solid" draw:fill-color="#5149e6"/>
    </style:style>
    <style:style style:name="P170" style:family="paragraph">
      <loext:graphic-properties draw:fill="solid" draw:fill-color="#514ae6"/>
    </style:style>
    <style:style style:name="P171" style:family="paragraph">
      <loext:graphic-properties draw:fill="solid" draw:fill-color="#524ae7"/>
    </style:style>
    <style:style style:name="P172" style:family="paragraph">
      <loext:graphic-properties draw:fill="solid" draw:fill-color="#524be7"/>
    </style:style>
    <style:style style:name="P173" style:family="paragraph">
      <loext:graphic-properties draw:fill="solid" draw:fill-color="#534ce7"/>
    </style:style>
    <style:style style:name="P174" style:family="paragraph">
      <loext:graphic-properties draw:fill="solid" draw:fill-color="#544de8"/>
    </style:style>
    <style:style style:name="P175" style:family="paragraph">
      <loext:graphic-properties draw:fill="solid" draw:fill-color="#544ee8"/>
    </style:style>
    <style:style style:name="P176" style:family="paragraph">
      <loext:graphic-properties draw:fill="solid" draw:fill-color="#544fe8"/>
    </style:style>
    <style:style style:name="P177" style:family="paragraph">
      <loext:graphic-properties draw:fill="solid" draw:fill-color="#554fe8"/>
    </style:style>
    <style:style style:name="P178" style:family="paragraph">
      <loext:graphic-properties draw:fill="solid" draw:fill-color="#5550e9"/>
    </style:style>
    <style:style style:name="P179" style:family="paragraph">
      <loext:graphic-properties draw:fill="solid" draw:fill-color="#5651e9"/>
    </style:style>
    <style:style style:name="P180" style:family="paragraph">
      <loext:graphic-properties draw:fill="solid" draw:fill-color="#5752ea"/>
    </style:style>
    <style:style style:name="P181" style:family="paragraph">
      <loext:graphic-properties draw:fill="solid" draw:fill-color="#5753ea"/>
    </style:style>
    <style:style style:name="P182" style:family="paragraph">
      <loext:graphic-properties draw:fill="solid" draw:fill-color="#5854ea"/>
    </style:style>
    <style:style style:name="P183" style:family="paragraph">
      <loext:graphic-properties draw:fill="solid" draw:fill-color="#5855eb"/>
    </style:style>
    <style:style style:name="P184" style:family="paragraph">
      <loext:graphic-properties draw:fill="solid" draw:fill-color="#5956eb"/>
    </style:style>
    <style:style style:name="P185" style:family="paragraph">
      <loext:graphic-properties draw:fill="solid" draw:fill-color="#5a57eb"/>
    </style:style>
    <style:style style:name="P186" style:family="paragraph">
      <loext:graphic-properties draw:fill="solid" draw:fill-color="#5a58ec"/>
    </style:style>
    <style:style style:name="P187" style:family="paragraph">
      <loext:graphic-properties draw:fill="solid" draw:fill-color="#5b59ec"/>
    </style:style>
    <style:style style:name="P188" style:family="paragraph">
      <loext:graphic-properties draw:fill="solid" draw:fill-color="#5c5aed"/>
    </style:style>
    <style:style style:name="P189" style:family="paragraph">
      <loext:graphic-properties draw:fill="solid" draw:fill-color="#5c5bed"/>
    </style:style>
    <style:style style:name="P190" style:family="paragraph">
      <loext:graphic-properties draw:fill="solid" draw:fill-color="#5d5ced"/>
    </style:style>
    <style:style style:name="P191" style:family="paragraph">
      <loext:graphic-properties draw:fill="solid" draw:fill-color="#5d5dee"/>
    </style:style>
    <style:style style:name="P192" style:family="paragraph">
      <loext:graphic-properties draw:fill="solid" draw:fill-color="#5e5eee"/>
    </style:style>
    <style:style style:name="P193" style:family="paragraph">
      <loext:graphic-properties draw:fill="solid" draw:fill-color="#5f5fee"/>
    </style:style>
    <style:style style:name="P194" style:family="paragraph">
      <loext:graphic-properties draw:fill="solid" draw:fill-color="#5f60ef"/>
    </style:style>
    <style:style style:name="P195" style:family="paragraph">
      <loext:graphic-properties draw:fill="solid" draw:fill-color="#6060ef"/>
    </style:style>
    <style:style style:name="P196" style:family="paragraph">
      <loext:graphic-properties draw:fill="solid" draw:fill-color="#6061ef"/>
    </style:style>
    <style:style style:name="P197" style:family="paragraph">
      <loext:graphic-properties draw:fill="solid" draw:fill-color="#6062ef"/>
    </style:style>
    <style:style style:name="P198" style:family="paragraph">
      <loext:graphic-properties draw:fill="solid" draw:fill-color="#6163f0"/>
    </style:style>
    <style:style style:name="P199" style:family="paragraph">
      <loext:graphic-properties draw:fill="solid" draw:fill-color="#6264f0"/>
    </style:style>
    <style:style style:name="P200" style:family="paragraph">
      <loext:graphic-properties draw:fill="solid" draw:fill-color="#6265f1"/>
    </style:style>
    <style:style style:name="P201" style:family="paragraph">
      <loext:graphic-properties draw:fill="solid" draw:fill-color="#6365f1"/>
    </style:style>
    <style:style style:name="P202" style:family="paragraph">
      <loext:graphic-properties draw:fill="none"/>
    </style:style>
    <style:style style:name="P203" style:family="paragraph">
      <loext:graphic-properties draw:fill="solid" draw:fill-color="#818cf8"/>
    </style:style>
    <style:style style:name="P204" style:family="paragraph">
      <loext:graphic-properties draw:fill="solid" draw:fill-color="#808bf8"/>
    </style:style>
    <style:style style:name="P205" style:family="paragraph">
      <loext:graphic-properties draw:fill="solid" draw:fill-color="#7f8af8"/>
    </style:style>
    <style:style style:name="P206" style:family="paragraph">
      <loext:graphic-properties draw:fill="solid" draw:fill-color="#7f89f7"/>
    </style:style>
    <style:style style:name="P207" style:family="paragraph">
      <loext:graphic-properties draw:fill="solid" draw:fill-color="#7e89f7"/>
    </style:style>
    <style:style style:name="P208" style:family="paragraph">
      <loext:graphic-properties draw:fill="solid" draw:fill-color="#7e88f7"/>
    </style:style>
    <style:style style:name="P209" style:family="paragraph">
      <loext:graphic-properties draw:fill="solid" draw:fill-color="#7d88f7"/>
    </style:style>
    <style:style style:name="P210" style:family="paragraph">
      <loext:graphic-properties draw:fill="solid" draw:fill-color="#7d87f7"/>
    </style:style>
    <style:style style:name="P211" style:family="paragraph">
      <loext:graphic-properties draw:fill="solid" draw:fill-color="#7d86f7"/>
    </style:style>
    <style:style style:name="P212" style:family="paragraph">
      <loext:graphic-properties draw:fill="solid" draw:fill-color="#7c86f7"/>
    </style:style>
    <style:style style:name="P213" style:family="paragraph">
      <loext:graphic-properties draw:fill="solid" draw:fill-color="#7c85f7"/>
    </style:style>
    <style:style style:name="P214" style:family="paragraph">
      <loext:graphic-properties draw:fill="solid" draw:fill-color="#7b85f7"/>
    </style:style>
    <style:style style:name="P215" style:family="paragraph">
      <loext:graphic-properties draw:fill="solid" draw:fill-color="#7b84f7"/>
    </style:style>
    <style:style style:name="P216" style:family="paragraph">
      <loext:graphic-properties draw:fill="solid" draw:fill-color="#7a83f6"/>
    </style:style>
    <style:style style:name="P217" style:family="paragraph">
      <loext:graphic-properties draw:fill="solid" draw:fill-color="#7982f6"/>
    </style:style>
    <style:style style:name="P218" style:family="paragraph">
      <loext:graphic-properties draw:fill="solid" draw:fill-color="#7881f6"/>
    </style:style>
    <style:style style:name="P219" style:family="paragraph">
      <loext:graphic-properties draw:fill="solid" draw:fill-color="#7880f6"/>
    </style:style>
    <style:style style:name="P220" style:family="paragraph">
      <loext:graphic-properties draw:fill="solid" draw:fill-color="#7780f6"/>
    </style:style>
    <style:style style:name="P221" style:family="paragraph">
      <loext:graphic-properties draw:fill="solid" draw:fill-color="#777ff6"/>
    </style:style>
    <style:style style:name="P222" style:family="paragraph">
      <loext:graphic-properties draw:fill="solid" draw:fill-color="#767ff6"/>
    </style:style>
    <style:style style:name="P223" style:family="paragraph">
      <loext:graphic-properties draw:fill="solid" draw:fill-color="#767ef5"/>
    </style:style>
    <style:style style:name="P224" style:family="paragraph">
      <loext:graphic-properties draw:fill="solid" draw:fill-color="#767df5"/>
    </style:style>
    <style:style style:name="P225" style:family="paragraph">
      <loext:graphic-properties draw:fill="solid" draw:fill-color="#757df5"/>
    </style:style>
    <style:style style:name="P226" style:family="paragraph">
      <loext:graphic-properties draw:fill="solid" draw:fill-color="#757cf5"/>
    </style:style>
    <style:style style:name="P227" style:family="paragraph">
      <loext:graphic-properties draw:fill="solid" draw:fill-color="#747cf5"/>
    </style:style>
    <style:style style:name="P228" style:family="paragraph">
      <loext:graphic-properties draw:fill="solid" draw:fill-color="#747bf5"/>
    </style:style>
    <style:style style:name="P229" style:family="paragraph">
      <loext:graphic-properties draw:fill="solid" draw:fill-color="#737af5"/>
    </style:style>
    <style:style style:name="P230" style:family="paragraph">
      <loext:graphic-properties draw:fill="solid" draw:fill-color="#7279f5"/>
    </style:style>
    <style:style style:name="P231" style:family="paragraph">
      <loext:graphic-properties draw:fill="solid" draw:fill-color="#7279f4"/>
    </style:style>
    <style:style style:name="P232" style:family="paragraph">
      <loext:graphic-properties draw:fill="solid" draw:fill-color="#7178f4"/>
    </style:style>
    <style:style style:name="P233" style:family="paragraph">
      <loext:graphic-properties draw:fill="solid" draw:fill-color="#7077f4"/>
    </style:style>
    <style:style style:name="P234" style:family="paragraph">
      <loext:graphic-properties draw:fill="solid" draw:fill-color="#7076f4"/>
    </style:style>
    <style:style style:name="P235" style:family="paragraph">
      <loext:graphic-properties draw:fill="solid" draw:fill-color="#6f76f4"/>
    </style:style>
    <style:style style:name="P236" style:family="paragraph">
      <loext:graphic-properties draw:fill="solid" draw:fill-color="#6f75f4"/>
    </style:style>
    <style:style style:name="P237" style:family="paragraph">
      <loext:graphic-properties draw:fill="solid" draw:fill-color="#6e75f4"/>
    </style:style>
    <style:style style:name="P238" style:family="paragraph">
      <loext:graphic-properties draw:fill="solid" draw:fill-color="#6e74f4"/>
    </style:style>
    <style:style style:name="P239" style:family="paragraph">
      <loext:graphic-properties draw:fill="solid" draw:fill-color="#6e73f3"/>
    </style:style>
    <style:style style:name="P240" style:family="paragraph">
      <loext:graphic-properties draw:fill="solid" draw:fill-color="#6d73f3"/>
    </style:style>
    <style:style style:name="P241" style:family="paragraph">
      <loext:graphic-properties draw:fill="solid" draw:fill-color="#6d72f3"/>
    </style:style>
    <style:style style:name="P242" style:family="paragraph">
      <loext:graphic-properties draw:fill="solid" draw:fill-color="#6c72f3"/>
    </style:style>
    <style:style style:name="P243" style:family="paragraph">
      <loext:graphic-properties draw:fill="solid" draw:fill-color="#6c71f3"/>
    </style:style>
    <style:style style:name="P244" style:family="paragraph">
      <loext:graphic-properties draw:fill="solid" draw:fill-color="#6b70f3"/>
    </style:style>
    <style:style style:name="P245" style:family="paragraph">
      <loext:graphic-properties draw:fill="solid" draw:fill-color="#6a6ff3"/>
    </style:style>
    <style:style style:name="P246" style:family="paragraph">
      <loext:graphic-properties draw:fill="solid" draw:fill-color="#696ef2"/>
    </style:style>
    <style:style style:name="P247" style:family="paragraph">
      <loext:graphic-properties draw:fill="solid" draw:fill-color="#696df2"/>
    </style:style>
    <style:style style:name="P248" style:family="paragraph">
      <loext:graphic-properties draw:fill="solid" draw:fill-color="#686df2"/>
    </style:style>
    <style:style style:name="P249" style:family="paragraph">
      <loext:graphic-properties draw:fill="solid" draw:fill-color="#686cf2"/>
    </style:style>
    <style:style style:name="P250" style:family="paragraph">
      <loext:graphic-properties draw:fill="solid" draw:fill-color="#676cf2"/>
    </style:style>
    <style:style style:name="P251" style:family="paragraph">
      <loext:graphic-properties draw:fill="solid" draw:fill-color="#676bf2"/>
    </style:style>
    <style:style style:name="P252" style:family="paragraph">
      <loext:graphic-properties draw:fill="solid" draw:fill-color="#676af2"/>
    </style:style>
    <style:style style:name="P253" style:family="paragraph">
      <loext:graphic-properties draw:fill="solid" draw:fill-color="#666af2"/>
    </style:style>
    <style:style style:name="P254" style:family="paragraph">
      <loext:graphic-properties draw:fill="solid" draw:fill-color="#6669f2"/>
    </style:style>
    <style:style style:name="P255" style:family="paragraph">
      <loext:graphic-properties draw:fill="solid" draw:fill-color="#6569f1"/>
    </style:style>
    <style:style style:name="P256" style:family="paragraph">
      <loext:graphic-properties draw:fill="solid" draw:fill-color="#6568f1"/>
    </style:style>
    <style:style style:name="P257" style:family="paragraph">
      <loext:graphic-properties draw:fill="solid" draw:fill-color="#6467f1"/>
    </style:style>
    <style:style style:name="P258" style:family="paragraph">
      <loext:graphic-properties draw:fill="solid" draw:fill-color="#6366f1"/>
    </style:style>
    <style:style style:name="P259" style:family="paragraph">
      <loext:graphic-properties draw:fill="solid" draw:fill-color="#a5b4fc" draw:opacity="10%"/>
    </style:style>
    <style:style style:name="P260" style:family="paragraph">
      <loext:graphic-properties draw:fill="solid" draw:fill-color="#a5b4fc" draw:opacity="25%"/>
    </style:style>
    <style:style style:name="P261" style:family="paragraph">
      <style:paragraph-properties fo:text-align="start" style:writing-mode="lr-tb"/>
    </style:style>
    <style:style style:name="P262" style:family="paragraph">
      <loext:graphic-properties draw:fill="none"/>
      <style:text-properties fo:font-size="10pt" style:font-size-asian="10pt" style:font-size-complex="10pt"/>
    </style:style>
    <style:style style:name="P263" style:family="paragraph">
      <loext:graphic-properties draw:fill="none"/>
      <style:text-properties fo:font-size="36.0999984741211pt" style:font-size-asian="36.0999984741211pt" style:font-size-complex="36.0999984741211pt"/>
    </style:style>
    <style:style style:name="P264" style:family="paragraph">
      <loext:graphic-properties draw:fill="none"/>
      <style:text-properties fo:font-size="14pt" style:font-size-asian="14pt" style:font-size-complex="14pt"/>
    </style:style>
    <style:style style:name="P265" style:family="paragraph">
      <loext:graphic-properties draw:fill="solid" draw:fill-color="#a5b4fc" draw:opacity="15%"/>
    </style:style>
    <style:style style:name="P266" style:family="paragraph">
      <loext:graphic-properties draw:fill="none"/>
      <style:text-properties fo:font-size="9pt" style:font-size-asian="9pt" style:font-size-complex="9pt"/>
    </style:style>
    <style:style style:name="P267" style:family="paragraph">
      <loext:graphic-properties draw:fill="solid" draw:fill-color="#cbd5e1"/>
    </style:style>
    <style:style style:name="P268" style:family="paragraph">
      <loext:graphic-properties draw:fill="none"/>
      <style:text-properties fo:font-size="20pt" style:font-size-asian="20pt" style:font-size-complex="20pt"/>
    </style:style>
    <style:style style:name="P269" style:family="paragraph">
      <loext:graphic-properties draw:fill="none"/>
      <style:text-properties fo:font-size="11pt" style:font-size-asian="11pt" style:font-size-complex="11pt"/>
    </style:style>
    <style:style style:name="P270" style:family="paragraph">
      <loext:graphic-properties draw:fill="none"/>
      <style:text-properties fo:font-size="9.30000019073486pt" style:font-size-asian="9.30000019073486pt" style:font-size-complex="9.30000019073486pt"/>
    </style:style>
    <style:style style:name="P271" style:family="paragraph">
      <loext:graphic-properties draw:fill="solid" draw:fill-color="#eff6ff"/>
    </style:style>
    <style:style style:name="P272" style:family="paragraph">
      <loext:graphic-properties draw:fill="solid" draw:fill-color="#3b82f6"/>
    </style:style>
    <style:style style:name="P273" style:family="paragraph">
      <loext:graphic-properties draw:fill="solid" draw:fill-color="#fff7ed"/>
    </style:style>
    <style:style style:name="P274" style:family="paragraph">
      <loext:graphic-properties draw:fill="solid" draw:fill-color="#f97316"/>
    </style:style>
    <style:style style:name="P275" style:family="paragraph">
      <loext:graphic-properties draw:fill="solid" draw:fill-color="#e2e8f0"/>
    </style:style>
    <style:style style:name="P276" style:family="paragraph">
      <loext:graphic-properties draw:fill="none"/>
      <style:text-properties fo:font-size="22.1000003814697pt" style:font-size-asian="22.1000003814697pt" style:font-size-complex="22.1000003814697pt"/>
    </style:style>
    <style:style style:name="P277" style:family="paragraph">
      <loext:graphic-properties draw:fill="none"/>
      <style:text-properties fo:font-size="10.5pt" style:font-size-asian="10.5pt" style:font-size-complex="10.5pt"/>
    </style:style>
    <style:style style:name="P278" style:family="paragraph">
      <loext:graphic-properties draw:fill="solid" draw:fill-color="#f0fdf4"/>
    </style:style>
    <style:style style:name="P279" style:family="paragraph">
      <loext:graphic-properties draw:fill="none"/>
      <style:text-properties fo:font-size="15pt" style:font-size-asian="15pt" style:font-size-complex="15pt"/>
    </style:style>
    <style:style style:name="P280" style:family="paragraph">
      <loext:graphic-properties draw:fill="solid" draw:fill-color="#f8fafc"/>
    </style:style>
    <style:style style:name="P281" style:family="paragraph">
      <loext:graphic-properties draw:fill="solid" draw:fill-color="#f1f5f9"/>
    </style:style>
    <style:style style:name="P282" style:family="paragraph">
      <loext:graphic-properties draw:fill="none"/>
      <style:text-properties fo:font-size="8pt" style:font-size-asian="8pt" style:font-size-complex="8pt"/>
    </style:style>
    <style:style style:name="P283" style:family="paragraph">
      <loext:graphic-properties draw:fill="solid" draw:fill-color="#22c55e"/>
    </style:style>
    <style:style style:name="P284" style:family="paragraph">
      <loext:graphic-properties draw:fill="solid" draw:fill-color="#0f172a"/>
    </style:style>
    <style:style style:name="P285" style:family="paragraph">
      <loext:graphic-properties draw:fill="solid" draw:fill-color="#f0fdfa"/>
    </style:style>
    <style:style style:name="P286" style:family="paragraph">
      <loext:graphic-properties draw:fill="solid" draw:fill-color="#faf5ff"/>
    </style:style>
    <style:style style:name="P287" style:family="paragraph">
      <loext:graphic-properties draw:fill="solid" draw:fill-color="#a855f7"/>
    </style:style>
    <style:style style:name="P288" style:family="paragraph">
      <loext:graphic-properties draw:fill="none"/>
      <style:text-properties fo:font-size="12pt" style:font-size-asian="12pt" style:font-size-complex="12pt"/>
    </style:style>
    <style:style style:name="P289" style:family="paragraph">
      <loext:graphic-properties draw:fill="solid" draw:fill-color="#1e293b"/>
    </style:style>
    <style:style style:name="T1" style:family="text">
      <style:text-properties fo:color="#a5b4fc" loext:opacity="100%" style:font-name="Inter" fo:font-size="10pt" fo:font-weight="normal" style:font-name-asian="Inter" style:font-size-asian="10pt" style:font-weight-asian="normal" style:font-name-complex="Inter" style:font-size-complex="10pt" style:font-weight-complex="normal"/>
    </style:style>
    <style:style style:name="T2" style:family="text">
      <style:text-properties fo:color="#f8fafc" loext:opacity="100%" style:font-name="Inter" fo:font-size="36.0999984741211pt" fo:font-weight="normal" style:font-name-asian="Inter" style:font-size-asian="36.0999984741211pt" style:font-weight-asian="normal" style:font-name-complex="Inter" style:font-size-complex="36.0999984741211pt" style:font-weight-complex="normal"/>
    </style:style>
    <style:style style:name="T3" style:family="text">
      <style:text-properties fo:color="#a5b4fc" loext:opacity="100%" style:font-name="Inter" fo:font-size="36.0999984741211pt" fo:font-weight="normal" style:font-name-asian="Inter" style:font-size-asian="36.0999984741211pt" style:font-weight-asian="normal" style:font-name-complex="Inter" style:font-size-complex="36.0999984741211pt" style:font-weight-complex="normal"/>
    </style:style>
    <style:style style:name="T4" style:family="text">
      <style:text-properties fo:color="#c7d2fe" loext:opacity="100%" style:font-name="Inter" fo:font-size="14pt" fo:font-weight="normal" style:font-name-asian="Inter" style:font-size-asian="14pt" style:font-weight-asian="normal" style:font-name-complex="Inter" style:font-size-complex="14pt" style:font-weight-complex="normal"/>
    </style:style>
    <style:style style:name="T5" style:family="text">
      <style:text-properties fo:color="#818cf8" loext:opacity="100%" style:font-name="Inter" fo:font-size="9pt" fo:font-weight="normal" style:font-name-asian="Inter" style:font-size-asian="9pt" style:font-weight-asian="normal" style:font-name-complex="Inter" style:font-size-complex="9pt" style:font-weight-complex="normal"/>
    </style:style>
    <style:style style:name="T6" style:family="text">
      <style:text-properties fo:color="#0f172a" loext:opacity="100%" style:font-name="Inter" fo:font-size="20pt" fo:font-weight="normal" style:font-name-asian="Inter" style:font-size-asian="20pt" style:font-weight-asian="normal" style:font-name-complex="Inter" style:font-size-complex="20pt" style:font-weight-complex="normal"/>
    </style:style>
    <style:style style:name="T7" style:family="text">
      <style:text-properties fo:color="#334155" loext:opacity="100%" style:font-name="Inter" fo:font-size="11pt" fo:font-weight="normal" style:font-name-asian="Inter" style:font-size-asian="11pt" style:font-weight-asian="normal" style:font-name-complex="Inter" style:font-size-complex="11pt" style:font-weight-complex="normal"/>
    </style:style>
    <style:style style:name="T8" style:family="text">
      <style:text-properties fo:color="#64748b" loext:opacity="100%" style:font-name="Inter" fo:font-size="9.30000019073486pt" fo:font-weight="normal" style:font-name-asian="Inter" style:font-size-asian="9.30000019073486pt" style:font-weight-asian="normal" style:font-name-complex="Inter" style:font-size-complex="9.30000019073486pt" style:font-weight-complex="normal"/>
    </style:style>
    <style:style style:name="T9" style:family="text">
      <style:text-properties fo:color="#64748b" loext:opacity="100%" style:font-name="Inter" fo:font-size="9pt" fo:font-weight="normal" style:font-name-asian="Inter" style:font-size-asian="9pt" style:font-weight-asian="normal" style:font-name-complex="Inter" style:font-size-complex="9pt" style:font-weight-complex="normal"/>
    </style:style>
    <style:style style:name="T10" style:family="text">
      <style:text-properties fo:color="#0f172a" loext:opacity="100%" style:font-name="Inter" fo:font-size="22.1000003814697pt" fo:font-weight="normal" style:font-name-asian="Inter" style:font-size-asian="22.1000003814697pt" style:font-weight-asian="normal" style:font-name-complex="Inter" style:font-size-complex="22.1000003814697pt" style:font-weight-complex="normal"/>
    </style:style>
    <style:style style:name="T11" style:family="text">
      <style:text-properties fo:color="#1e293b" loext:opacity="100%" style:font-name="Inter" fo:font-size="10.5pt" fo:font-weight="normal" style:font-name-asian="Inter" style:font-size-asian="10.5pt" style:font-weight-asian="normal" style:font-name-complex="Inter" style:font-size-complex="10.5pt" style:font-weight-complex="normal"/>
    </style:style>
    <style:style style:name="T12" style:family="text">
      <style:text-properties fo:color="#1e293b" loext:opacity="100%" style:font-name="NotoColorEmoji" fo:font-size="10.5pt" fo:font-weight="normal" style:font-name-asian="NotoColorEmoji" style:font-size-asian="10.5pt" style:font-weight-asian="normal" style:font-name-complex="NotoColorEmoji" style:font-size-complex="10.5pt" style:font-weight-complex="normal"/>
    </style:style>
    <style:style style:name="T13" style:family="text">
      <style:text-properties fo:color="#1d4ed8" loext:opacity="100%" style:font-name="Inter" fo:font-size="10.5pt" fo:font-weight="normal" style:font-name-asian="Inter" style:font-size-asian="10.5pt" style:font-weight-asian="normal" style:font-name-complex="Inter" style:font-size-complex="10.5pt" style:font-weight-complex="normal"/>
    </style:style>
    <style:style style:name="T14" style:family="text">
      <style:text-properties fo:color="#0f172a" loext:opacity="100%" style:font-name="Inter" fo:font-size="10pt" fo:font-weight="normal" style:font-name-asian="Inter" style:font-size-asian="10pt" style:font-weight-asian="normal" style:font-name-complex="Inter" style:font-size-complex="10pt" style:font-weight-complex="normal"/>
    </style:style>
    <style:style style:name="T15" style:family="text">
      <style:text-properties fo:color="#1e293b" loext:opacity="100%" style:font-name="Inter" fo:font-size="10pt" fo:font-weight="normal" style:font-name-asian="Inter" style:font-size-asian="10pt" style:font-weight-asian="normal" style:font-name-complex="Inter" style:font-size-complex="10pt" style:font-weight-complex="normal"/>
    </style:style>
    <style:style style:name="T16" style:family="text">
      <style:text-properties fo:color="#c2410c" loext:opacity="100%" style:font-name="Inter" fo:font-size="10.5pt" fo:font-weight="normal" style:font-name-asian="Inter" style:font-size-asian="10.5pt" style:font-weight-asian="normal" style:font-name-complex="Inter" style:font-size-complex="10.5pt" style:font-weight-complex="normal"/>
    </style:style>
    <style:style style:name="T17" style:family="text">
      <style:text-properties fo:color="#1e293b" loext:opacity="100%" style:font-name="Inter" fo:font-size="15pt" fo:font-weight="normal" style:font-name-asian="Inter" style:font-size-asian="15pt" style:font-weight-asian="normal" style:font-name-complex="Inter" style:font-size-complex="15pt" style:font-weight-complex="normal"/>
    </style:style>
    <style:style style:name="T18" style:family="text">
      <style:text-properties fo:color="#15803d" loext:opacity="100%" style:font-name="Inter" fo:font-size="9pt" fo:font-weight="normal" style:font-name-asian="Inter" style:font-size-asian="9pt" style:font-weight-asian="normal" style:font-name-complex="Inter" style:font-size-complex="9pt" style:font-weight-complex="normal"/>
    </style:style>
    <style:style style:name="T19" style:family="text">
      <style:text-properties fo:color="#475569" loext:opacity="100%" style:font-name="Inter" fo:font-size="11pt" fo:font-weight="normal" style:font-name-asian="Inter" style:font-size-asian="11pt" style:font-weight-asian="normal" style:font-name-complex="Inter" style:font-size-complex="11pt" style:font-weight-complex="normal"/>
    </style:style>
    <style:style style:name="T20" style:family="text">
      <style:text-properties fo:color="#334155" loext:opacity="100%" style:font-name="JetBrainsMono" fo:font-size="9pt" fo:font-weight="normal" style:font-name-asian="JetBrainsMono" style:font-size-asian="9pt" style:font-weight-asian="normal" style:font-name-complex="JetBrainsMono" style:font-size-complex="9pt" style:font-weight-complex="normal"/>
    </style:style>
    <style:style style:name="T21" style:family="text">
      <style:text-properties fo:color="#0f172a" loext:opacity="100%" style:font-name="Inter" fo:font-size="10.5pt" fo:font-weight="normal" style:font-name-asian="Inter" style:font-size-asian="10.5pt" style:font-weight-asian="normal" style:font-name-complex="Inter" style:font-size-complex="10.5pt" style:font-weight-complex="normal"/>
    </style:style>
    <style:style style:name="T22" style:family="text">
      <style:text-properties fo:color="#475569" loext:opacity="100%" style:font-name="Inter" fo:font-size="8pt" fo:font-weight="normal" style:font-name-asian="Inter" style:font-size-asian="8pt" style:font-weight-asian="normal" style:font-name-complex="Inter" style:font-size-complex="8pt" style:font-weight-complex="normal"/>
    </style:style>
    <style:style style:name="T23" style:family="text">
      <style:text-properties fo:color="#1e293b" loext:opacity="100%" style:font-name="JetBrainsMono" fo:font-size="9pt" fo:font-weight="normal" style:font-name-asian="JetBrainsMono" style:font-size-asian="9pt" style:font-weight-asian="normal" style:font-name-complex="JetBrainsMono" style:font-size-complex="9pt" style:font-weight-complex="normal"/>
    </style:style>
    <style:style style:name="T24" style:family="text">
      <style:text-properties fo:color="#15803d" loext:opacity="100%" style:font-name="Inter" fo:font-size="10.5pt" fo:font-weight="normal" style:font-name-asian="Inter" style:font-size-asian="10.5pt" style:font-weight-asian="normal" style:font-name-complex="Inter" style:font-size-complex="10.5pt" style:font-weight-complex="normal"/>
    </style:style>
    <style:style style:name="T25" style:family="text">
      <style:text-properties fo:color="#0f766e" loext:opacity="100%" style:font-name="Inter" fo:font-size="9pt" fo:font-weight="normal" style:font-name-asian="Inter" style:font-size-asian="9pt" style:font-weight-asian="normal" style:font-name-complex="Inter" style:font-size-complex="9pt" style:font-weight-complex="normal"/>
    </style:style>
    <style:style style:name="T26" style:family="text">
      <style:text-properties fo:color="#334155" loext:opacity="100%" style:font-name="Inter" fo:font-size="10.5pt" fo:font-weight="normal" style:font-name-asian="Inter" style:font-size-asian="10.5pt" style:font-weight-asian="normal" style:font-name-complex="Inter" style:font-size-complex="10.5pt" style:font-weight-complex="normal"/>
    </style:style>
    <style:style style:name="T27" style:family="text">
      <style:text-properties fo:color="#7e22ce" loext:opacity="100%" style:font-name="Inter" fo:font-size="10.5pt" fo:font-weight="normal" style:font-name-asian="Inter" style:font-size-asian="10.5pt" style:font-weight-asian="normal" style:font-name-complex="Inter" style:font-size-complex="10.5pt" style:font-weight-complex="normal"/>
    </style:style>
    <style:style style:name="T28" style:family="text">
      <style:text-properties fo:color="#7e22ce" loext:opacity="100%" style:font-name="Inter" fo:font-size="9pt" fo:font-weight="normal" style:font-name-asian="Inter" style:font-size-asian="9pt" style:font-weight-asian="normal" style:font-name-complex="Inter" style:font-size-complex="9pt" style:font-weight-complex="normal"/>
    </style:style>
    <style:style style:name="T29" style:family="text">
      <style:text-properties fo:color="#334155" loext:opacity="100%" style:font-name="Inter" fo:font-size="12pt" fo:font-weight="normal" style:font-name-asian="Inter" style:font-size-asian="12pt" style:font-weight-asian="normal" style:font-name-complex="Inter" style:font-size-complex="12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0.247cm" svg:height="0.173cm" svg:x="0cm" svg:y="0cm" svg:viewBox="0 0 248 174" draw:points="0,0 0,174 248,0">
          <text:p/>
        </draw:polygon>
        <draw:polygon draw:style-name="gr2" draw:text-style-name="P2" draw:layer="layout" svg:width="0.495cm" svg:height="0.346cm" svg:x="0cm" svg:y="0cm" svg:viewBox="0 0 496 347" draw:points="247,0 0,173 0,347 496,0">
          <text:p/>
        </draw:polygon>
        <draw:polygon draw:style-name="gr3" draw:text-style-name="P3" draw:layer="layout" svg:width="0.743cm" svg:height="0.52cm" svg:x="0cm" svg:y="0cm" svg:viewBox="0 0 744 521" draw:points="496,0 0,347 0,521 744,0">
          <text:p/>
        </draw:polygon>
        <draw:polygon draw:style-name="gr4" draw:text-style-name="P4" draw:layer="layout" svg:width="0.99cm" svg:height="0.693cm" svg:x="0cm" svg:y="0cm" svg:viewBox="0 0 991 694" draw:points="744,0 0,521 0,694 991,0">
          <text:p/>
        </draw:polygon>
        <draw:polygon draw:style-name="gr5" draw:text-style-name="P5" draw:layer="layout" svg:width="1.238cm" svg:height="0.867cm" svg:x="0cm" svg:y="0cm" svg:viewBox="0 0 1239 868" draw:points="991,0 0,694 0,868 1239,0">
          <text:p/>
        </draw:polygon>
        <draw:polygon draw:style-name="gr6" draw:text-style-name="P6" draw:layer="layout" svg:width="1.486cm" svg:height="1.04cm" svg:x="0cm" svg:y="0cm" svg:viewBox="0 0 1487 1041" draw:points="1239,0 0,868 0,1041 1487,0">
          <text:p/>
        </draw:polygon>
        <draw:polygon draw:style-name="gr7" draw:text-style-name="P7" draw:layer="layout" svg:width="1.733cm" svg:height="1.213cm" svg:x="0cm" svg:y="0cm" svg:viewBox="0 0 1734 1214" draw:points="1487,0 0,1041 0,1214 1734,0">
          <text:p/>
        </draw:polygon>
        <draw:polygon draw:style-name="gr8" draw:text-style-name="P8" draw:layer="layout" svg:width="1.981cm" svg:height="1.387cm" svg:x="0cm" svg:y="0cm" svg:viewBox="0 0 1982 1388" draw:points="1734,0 0,1214 0,1388 1982,0">
          <text:p/>
        </draw:polygon>
        <draw:polygon draw:style-name="gr9" draw:text-style-name="P9" draw:layer="layout" svg:width="2.229cm" svg:height="1.56cm" svg:x="0cm" svg:y="0cm" svg:viewBox="0 0 2230 1561" draw:points="1982,0 0,1388 0,1561 2230,0">
          <text:p/>
        </draw:polygon>
        <draw:polygon draw:style-name="gr10" draw:text-style-name="P10" draw:layer="layout" svg:width="2.476cm" svg:height="1.734cm" svg:x="0cm" svg:y="0cm" svg:viewBox="0 0 2477 1735" draw:points="2230,0 0,1561 0,1735 2477,0">
          <text:p/>
        </draw:polygon>
        <draw:polygon draw:style-name="gr11" draw:text-style-name="P11" draw:layer="layout" svg:width="2.724cm" svg:height="1.907cm" svg:x="0cm" svg:y="0cm" svg:viewBox="0 0 2725 1908" draw:points="2477,0 0,1735 0,1908 2725,0">
          <text:p/>
        </draw:polygon>
        <draw:polygon draw:style-name="gr12" draw:text-style-name="P12" draw:layer="layout" svg:width="2.972cm" svg:height="2.081cm" svg:x="0cm" svg:y="0cm" svg:viewBox="0 0 2973 2082" draw:points="2725,0 0,1908 0,2082 2973,0">
          <text:p/>
        </draw:polygon>
        <draw:polygon draw:style-name="gr13" draw:text-style-name="P13" draw:layer="layout" svg:width="3.219cm" svg:height="2.254cm" svg:x="0cm" svg:y="0cm" svg:viewBox="0 0 3220 2255" draw:points="2973,0 0,2082 0,2255 3220,0">
          <text:p/>
        </draw:polygon>
        <draw:polygon draw:style-name="gr14" draw:text-style-name="P14" draw:layer="layout" svg:width="3.467cm" svg:height="2.427cm" svg:x="0cm" svg:y="0cm" svg:viewBox="0 0 3468 2428" draw:points="3220,0 0,2255 0,2428 3468,0">
          <text:p/>
        </draw:polygon>
        <draw:polygon draw:style-name="gr15" draw:text-style-name="P15" draw:layer="layout" svg:width="3.715cm" svg:height="2.601cm" svg:x="0cm" svg:y="0cm" svg:viewBox="0 0 3716 2602" draw:points="3468,0 0,2428 0,2602 3716,0">
          <text:p/>
        </draw:polygon>
        <draw:polygon draw:style-name="gr15" draw:text-style-name="P15" draw:layer="layout" svg:width="3.962cm" svg:height="2.774cm" svg:x="0cm" svg:y="0cm" svg:viewBox="0 0 3963 2775" draw:points="3716,0 0,2602 0,2775 3963,0">
          <text:p/>
        </draw:polygon>
        <draw:polygon draw:style-name="gr16" draw:text-style-name="P16" draw:layer="layout" svg:width="4.21cm" svg:height="2.948cm" svg:x="0cm" svg:y="0cm" svg:viewBox="0 0 4211 2949" draw:points="3963,0 0,2775 0,2949 4211,0">
          <text:p/>
        </draw:polygon>
        <draw:polygon draw:style-name="gr17" draw:text-style-name="P17" draw:layer="layout" svg:width="4.458cm" svg:height="3.121cm" svg:x="0cm" svg:y="0cm" svg:viewBox="0 0 4459 3122" draw:points="4211,0 0,2949 0,3122 4459,0">
          <text:p/>
        </draw:polygon>
        <draw:polygon draw:style-name="gr18" draw:text-style-name="P18" draw:layer="layout" svg:width="4.705cm" svg:height="3.295cm" svg:x="0cm" svg:y="0cm" svg:viewBox="0 0 4706 3296" draw:points="4459,0 0,3122 0,3296 4706,0">
          <text:p/>
        </draw:polygon>
        <draw:polygon draw:style-name="gr19" draw:text-style-name="P19" draw:layer="layout" svg:width="4.953cm" svg:height="3.468cm" svg:x="0cm" svg:y="0cm" svg:viewBox="0 0 4954 3469" draw:points="4706,0 0,3296 0,3469 4954,0">
          <text:p/>
        </draw:polygon>
        <draw:polygon draw:style-name="gr20" draw:text-style-name="P20" draw:layer="layout" svg:width="5.201cm" svg:height="3.641cm" svg:x="0cm" svg:y="0cm" svg:viewBox="0 0 5202 3642" draw:points="4954,0 0,3469 0,3642 5202,0">
          <text:p/>
        </draw:polygon>
        <draw:polygon draw:style-name="gr21" draw:text-style-name="P21" draw:layer="layout" svg:width="5.448cm" svg:height="3.815cm" svg:x="0cm" svg:y="0cm" svg:viewBox="0 0 5449 3816" draw:points="5202,0 0,3642 0,3816 5449,0">
          <text:p/>
        </draw:polygon>
        <draw:polygon draw:style-name="gr22" draw:text-style-name="P22" draw:layer="layout" svg:width="5.696cm" svg:height="3.988cm" svg:x="0cm" svg:y="0cm" svg:viewBox="0 0 5697 3989" draw:points="5449,0 0,3816 0,3989 5697,0">
          <text:p/>
        </draw:polygon>
        <draw:polygon draw:style-name="gr23" draw:text-style-name="P23" draw:layer="layout" svg:width="5.944cm" svg:height="4.162cm" svg:x="0cm" svg:y="0cm" svg:viewBox="0 0 5945 4163" draw:points="5697,0 0,3989 0,4163 5945,0">
          <text:p/>
        </draw:polygon>
        <draw:polygon draw:style-name="gr24" draw:text-style-name="P24" draw:layer="layout" svg:width="6.191cm" svg:height="4.335cm" svg:x="0cm" svg:y="0cm" svg:viewBox="0 0 6192 4336" draw:points="5945,0 0,4163 0,4336 6192,0">
          <text:p/>
        </draw:polygon>
        <draw:polygon draw:style-name="gr25" draw:text-style-name="P25" draw:layer="layout" svg:width="6.439cm" svg:height="4.508cm" svg:x="0cm" svg:y="0cm" svg:viewBox="0 0 6440 4509" draw:points="6192,0 0,4336 0,4509 6440,0">
          <text:p/>
        </draw:polygon>
        <draw:polygon draw:style-name="gr26" draw:text-style-name="P26" draw:layer="layout" svg:width="6.687cm" svg:height="4.682cm" svg:x="0cm" svg:y="0cm" svg:viewBox="0 0 6688 4683" draw:points="6440,0 0,4509 0,4683 6688,0">
          <text:p/>
        </draw:polygon>
        <draw:polygon draw:style-name="gr27" draw:text-style-name="P27" draw:layer="layout" svg:width="6.934cm" svg:height="4.855cm" svg:x="0cm" svg:y="0cm" svg:viewBox="0 0 6935 4856" draw:points="6688,0 0,4683 0,4856 6935,0">
          <text:p/>
        </draw:polygon>
        <draw:polygon draw:style-name="gr28" draw:text-style-name="P28" draw:layer="layout" svg:width="7.182cm" svg:height="5.029cm" svg:x="0cm" svg:y="0cm" svg:viewBox="0 0 7183 5030" draw:points="6935,0 0,4856 0,5030 7183,0">
          <text:p/>
        </draw:polygon>
        <draw:polygon draw:style-name="gr29" draw:text-style-name="P29" draw:layer="layout" svg:width="7.43cm" svg:height="5.202cm" svg:x="0cm" svg:y="0cm" svg:viewBox="0 0 7431 5203" draw:points="7183,0 0,5030 0,5203 7431,0">
          <text:p/>
        </draw:polygon>
        <draw:polygon draw:style-name="gr30" draw:text-style-name="P30" draw:layer="layout" svg:width="7.677cm" svg:height="5.376cm" svg:x="0cm" svg:y="0cm" svg:viewBox="0 0 7678 5377" draw:points="7431,0 0,5203 0,5377 7678,0">
          <text:p/>
        </draw:polygon>
        <draw:polygon draw:style-name="gr31" draw:text-style-name="P31" draw:layer="layout" svg:width="7.925cm" svg:height="5.549cm" svg:x="0cm" svg:y="0cm" svg:viewBox="0 0 7926 5550" draw:points="7678,0 0,5377 0,5550 7926,0">
          <text:p/>
        </draw:polygon>
        <draw:polygon draw:style-name="gr32" draw:text-style-name="P32" draw:layer="layout" svg:width="8.173cm" svg:height="5.722cm" svg:x="0cm" svg:y="0cm" svg:viewBox="0 0 8174 5723" draw:points="7926,0 0,5550 0,5723 8174,0">
          <text:p/>
        </draw:polygon>
        <draw:polygon draw:style-name="gr33" draw:text-style-name="P33" draw:layer="layout" svg:width="8.42cm" svg:height="5.896cm" svg:x="0cm" svg:y="0cm" svg:viewBox="0 0 8421 5897" draw:points="8174,0 0,5723 0,5897 8421,0">
          <text:p/>
        </draw:polygon>
        <draw:polygon draw:style-name="gr34" draw:text-style-name="P34" draw:layer="layout" svg:width="8.668cm" svg:height="6.069cm" svg:x="0cm" svg:y="0cm" svg:viewBox="0 0 8669 6070" draw:points="8421,0 0,5897 0,6070 8669,0">
          <text:p/>
        </draw:polygon>
        <draw:polygon draw:style-name="gr35" draw:text-style-name="P35" draw:layer="layout" svg:width="8.916cm" svg:height="6.243cm" svg:x="0cm" svg:y="0cm" svg:viewBox="0 0 8917 6244" draw:points="8669,0 0,6070 0,6244 8917,0">
          <text:p/>
        </draw:polygon>
        <draw:polygon draw:style-name="gr36" draw:text-style-name="P36" draw:layer="layout" svg:width="9.163cm" svg:height="6.416cm" svg:x="0cm" svg:y="0cm" svg:viewBox="0 0 9164 6417" draw:points="8917,0 0,6244 0,6417 9164,0">
          <text:p/>
        </draw:polygon>
        <draw:polygon draw:style-name="gr37" draw:text-style-name="P37" draw:layer="layout" svg:width="9.411cm" svg:height="6.59cm" svg:x="0cm" svg:y="0cm" svg:viewBox="0 0 9412 6591" draw:points="9164,0 0,6417 0,6591 9412,0">
          <text:p/>
        </draw:polygon>
        <draw:polygon draw:style-name="gr38" draw:text-style-name="P38" draw:layer="layout" svg:width="9.659cm" svg:height="6.763cm" svg:x="0cm" svg:y="0cm" svg:viewBox="0 0 9660 6764" draw:points="9412,0 0,6591 0,6764 9660,0">
          <text:p/>
        </draw:polygon>
        <draw:polygon draw:style-name="gr39" draw:text-style-name="P39" draw:layer="layout" svg:width="9.906cm" svg:height="6.936cm" svg:x="0cm" svg:y="0cm" svg:viewBox="0 0 9907 6937" draw:points="9660,0 0,6764 0,6937 9907,0">
          <text:p/>
        </draw:polygon>
        <draw:polygon draw:style-name="gr40" draw:text-style-name="P40" draw:layer="layout" svg:width="10.154cm" svg:height="7.11cm" svg:x="0cm" svg:y="0cm" svg:viewBox="0 0 10155 7111" draw:points="9907,0 0,6937 0,7111 10155,0">
          <text:p/>
        </draw:polygon>
        <draw:polygon draw:style-name="gr41" draw:text-style-name="P41" draw:layer="layout" svg:width="10.402cm" svg:height="7.283cm" svg:x="0cm" svg:y="0cm" svg:viewBox="0 0 10403 7284" draw:points="10155,0 0,7111 0,7284 10403,0">
          <text:p/>
        </draw:polygon>
        <draw:polygon draw:style-name="gr42" draw:text-style-name="P42" draw:layer="layout" svg:width="10.649cm" svg:height="7.457cm" svg:x="0cm" svg:y="0cm" svg:viewBox="0 0 10650 7458" draw:points="10403,0 0,7284 0,7458 10650,0">
          <text:p/>
        </draw:polygon>
        <draw:polygon draw:style-name="gr43" draw:text-style-name="P43" draw:layer="layout" svg:width="10.897cm" svg:height="7.63cm" svg:x="0cm" svg:y="0cm" svg:viewBox="0 0 10898 7631" draw:points="10650,0 0,7458 0,7631 10898,0">
          <text:p/>
        </draw:polygon>
        <draw:polygon draw:style-name="gr44" draw:text-style-name="P44" draw:layer="layout" svg:width="11.145cm" svg:height="7.803cm" svg:x="0cm" svg:y="0cm" svg:viewBox="0 0 11146 7804" draw:points="10898,0 0,7631 0,7804 11146,0">
          <text:p/>
        </draw:polygon>
        <draw:polygon draw:style-name="gr45" draw:text-style-name="P45" draw:layer="layout" svg:width="11.392cm" svg:height="7.977cm" svg:x="0cm" svg:y="0cm" svg:viewBox="0 0 11393 7978" draw:points="11146,0 0,7804 0,7978 11393,0">
          <text:p/>
        </draw:polygon>
        <draw:polygon draw:style-name="gr46" draw:text-style-name="P46" draw:layer="layout" svg:width="11.64cm" svg:height="8.15cm" svg:x="0cm" svg:y="0cm" svg:viewBox="0 0 11641 8151" draw:points="11393,0 0,7978 0,8151 11641,0">
          <text:p/>
        </draw:polygon>
        <draw:polygon draw:style-name="gr47" draw:text-style-name="P47" draw:layer="layout" svg:width="11.888cm" svg:height="8.324cm" svg:x="0cm" svg:y="0cm" svg:viewBox="0 0 11889 8325" draw:points="11641,0 0,8151 0,8325 11889,0">
          <text:p/>
        </draw:polygon>
        <draw:polygon draw:style-name="gr48" draw:text-style-name="P48" draw:layer="layout" svg:width="12.135cm" svg:height="8.497cm" svg:x="0cm" svg:y="0cm" svg:viewBox="0 0 12136 8498" draw:points="11889,0 0,8325 0,8498 12136,0">
          <text:p/>
        </draw:polygon>
        <draw:polygon draw:style-name="gr49" draw:text-style-name="P49" draw:layer="layout" svg:width="12.383cm" svg:height="8.671cm" svg:x="0cm" svg:y="0cm" svg:viewBox="0 0 12384 8672" draw:points="12136,0 0,8498 0,8672 12384,0">
          <text:p/>
        </draw:polygon>
        <draw:polygon draw:style-name="gr50" draw:text-style-name="P50" draw:layer="layout" svg:width="12.631cm" svg:height="8.844cm" svg:x="0cm" svg:y="0cm" svg:viewBox="0 0 12632 8845" draw:points="12384,0 0,8672 0,8845 12632,0">
          <text:p/>
        </draw:polygon>
        <draw:polygon draw:style-name="gr51" draw:text-style-name="P51" draw:layer="layout" svg:width="12.878cm" svg:height="9.017cm" svg:x="0cm" svg:y="0cm" svg:viewBox="0 0 12879 9018" draw:points="12632,0 0,8845 0,9018 12879,0">
          <text:p/>
        </draw:polygon>
        <draw:polygon draw:style-name="gr52" draw:text-style-name="P52" draw:layer="layout" svg:width="13.126cm" svg:height="9.191cm" svg:x="0cm" svg:y="0cm" svg:viewBox="0 0 13127 9192" draw:points="12879,0 0,9018 0,9192 13127,0">
          <text:p/>
        </draw:polygon>
        <draw:polygon draw:style-name="gr53" draw:text-style-name="P53" draw:layer="layout" svg:width="13.374cm" svg:height="9.364cm" svg:x="0cm" svg:y="0cm" svg:viewBox="0 0 13375 9365" draw:points="13127,0 0,9192 0,9365 13375,0">
          <text:p/>
        </draw:polygon>
        <draw:polygon draw:style-name="gr54" draw:text-style-name="P54" draw:layer="layout" svg:width="13.621cm" svg:height="9.538cm" svg:x="0cm" svg:y="0cm" svg:viewBox="0 0 13622 9539" draw:points="13375,0 0,9365 0,9539 13622,0">
          <text:p/>
        </draw:polygon>
        <draw:polygon draw:style-name="gr55" draw:text-style-name="P55" draw:layer="layout" svg:width="13.869cm" svg:height="9.711cm" svg:x="0cm" svg:y="0cm" svg:viewBox="0 0 13870 9712" draw:points="13622,0 0,9539 0,9712 13870,0">
          <text:p/>
        </draw:polygon>
        <draw:polygon draw:style-name="gr56" draw:text-style-name="P56" draw:layer="layout" svg:width="14.117cm" svg:height="9.885cm" svg:x="0cm" svg:y="0cm" svg:viewBox="0 0 14118 9886" draw:points="13870,0 0,9712 0,9886 14118,0">
          <text:p/>
        </draw:polygon>
        <draw:polygon draw:style-name="gr57" draw:text-style-name="P57" draw:layer="layout" svg:width="14.364cm" svg:height="10.058cm" svg:x="0cm" svg:y="0cm" svg:viewBox="0 0 14365 10059" draw:points="14118,0 0,9886 0,10059 14365,0">
          <text:p/>
        </draw:polygon>
        <draw:polygon draw:style-name="gr58" draw:text-style-name="P58" draw:layer="layout" svg:width="14.612cm" svg:height="10.231cm" svg:x="0cm" svg:y="0cm" svg:viewBox="0 0 14613 10232" draw:points="14365,0 0,10059 0,10232 14613,0">
          <text:p/>
        </draw:polygon>
        <draw:polygon draw:style-name="gr59" draw:text-style-name="P59" draw:layer="layout" svg:width="14.86cm" svg:height="10.405cm" svg:x="0cm" svg:y="0cm" svg:viewBox="0 0 14861 10406" draw:points="14613,0 0,10232 0,10406 14861,0">
          <text:p/>
        </draw:polygon>
        <draw:polygon draw:style-name="gr60" draw:text-style-name="P60" draw:layer="layout" svg:width="15.108cm" svg:height="10.578cm" svg:x="0cm" svg:y="0cm" svg:viewBox="0 0 15109 10579" draw:points="14861,0 0,10406 0,10579 15109,0">
          <text:p/>
        </draw:polygon>
        <draw:polygon draw:style-name="gr61" draw:text-style-name="P61" draw:layer="layout" svg:width="15.355cm" svg:height="10.752cm" svg:x="0cm" svg:y="0cm" svg:viewBox="0 0 15356 10753" draw:points="15109,0 0,10579 0,10753 15356,0">
          <text:p/>
        </draw:polygon>
        <draw:polygon draw:style-name="gr62" draw:text-style-name="P62" draw:layer="layout" svg:width="15.603cm" svg:height="10.925cm" svg:x="0cm" svg:y="0cm" svg:viewBox="0 0 15604 10926" draw:points="15356,0 0,10753 0,10926 15604,0">
          <text:p/>
        </draw:polygon>
        <draw:polygon draw:style-name="gr63" draw:text-style-name="P63" draw:layer="layout" svg:width="15.851cm" svg:height="11.099cm" svg:x="0cm" svg:y="0cm" svg:viewBox="0 0 15852 11100" draw:points="15604,0 0,10926 0,11100 15852,0">
          <text:p/>
        </draw:polygon>
        <draw:polygon draw:style-name="gr64" draw:text-style-name="P64" draw:layer="layout" svg:width="16.098cm" svg:height="11.272cm" svg:x="0cm" svg:y="0cm" svg:viewBox="0 0 16099 11273" draw:points="15852,0 0,11100 0,11273 16099,0">
          <text:p/>
        </draw:polygon>
        <draw:polygon draw:style-name="gr65" draw:text-style-name="P65" draw:layer="layout" svg:width="16.346cm" svg:height="11.445cm" svg:x="0cm" svg:y="0cm" svg:viewBox="0 0 16347 11446" draw:points="16099,0 0,11273 0,11446 16347,0">
          <text:p/>
        </draw:polygon>
        <draw:polygon draw:style-name="gr66" draw:text-style-name="P66" draw:layer="layout" svg:width="16.594cm" svg:height="11.619cm" svg:x="0cm" svg:y="0cm" svg:viewBox="0 0 16595 11620" draw:points="16347,0 0,11446 0,11620 16595,0">
          <text:p/>
        </draw:polygon>
        <draw:polygon draw:style-name="gr67" draw:text-style-name="P67" draw:layer="layout" svg:width="16.841cm" svg:height="11.792cm" svg:x="0cm" svg:y="0cm" svg:viewBox="0 0 16842 11793" draw:points="16595,0 0,11620 0,11793 16842,0">
          <text:p/>
        </draw:polygon>
        <draw:polygon draw:style-name="gr68" draw:text-style-name="P68" draw:layer="layout" svg:width="17.089cm" svg:height="11.966cm" svg:x="0cm" svg:y="0cm" svg:viewBox="0 0 17090 11967" draw:points="16842,0 0,11793 0,11967 17090,0">
          <text:p/>
        </draw:polygon>
        <draw:polygon draw:style-name="gr69" draw:text-style-name="P69" draw:layer="layout" svg:width="17.337cm" svg:height="12.139cm" svg:x="0cm" svg:y="0cm" svg:viewBox="0 0 17338 12140" draw:points="17090,0 0,11967 0,12140 17338,0">
          <text:p/>
        </draw:polygon>
        <draw:polygon draw:style-name="gr70" draw:text-style-name="P70" draw:layer="layout" svg:width="17.584cm" svg:height="12.312cm" svg:x="0cm" svg:y="0cm" svg:viewBox="0 0 17585 12313" draw:points="17338,0 0,12140 0,12313 17585,0">
          <text:p/>
        </draw:polygon>
        <draw:polygon draw:style-name="gr71" draw:text-style-name="P71" draw:layer="layout" svg:width="17.832cm" svg:height="12.486cm" svg:x="0cm" svg:y="0cm" svg:viewBox="0 0 17833 12487" draw:points="17585,0 0,12313 0,12487 17833,0">
          <text:p/>
        </draw:polygon>
        <draw:polygon draw:style-name="gr72" draw:text-style-name="P72" draw:layer="layout" svg:width="18.08cm" svg:height="12.659cm" svg:x="0cm" svg:y="0cm" svg:viewBox="0 0 18081 12660" draw:points="17833,0 0,12487 0,12660 18081,0">
          <text:p/>
        </draw:polygon>
        <draw:polygon draw:style-name="gr73" draw:text-style-name="P73" draw:layer="layout" svg:width="18.327cm" svg:height="12.833cm" svg:x="0cm" svg:y="0cm" svg:viewBox="0 0 18328 12834" draw:points="18081,0 0,12660 0,12834 18328,0">
          <text:p/>
        </draw:polygon>
        <draw:polygon draw:style-name="gr74" draw:text-style-name="P74" draw:layer="layout" svg:width="18.575cm" svg:height="13.006cm" svg:x="0cm" svg:y="0cm" svg:viewBox="0 0 18576 13007" draw:points="18328,0 0,12834 0,13007 18576,0">
          <text:p/>
        </draw:polygon>
        <draw:polygon draw:style-name="gr75" draw:text-style-name="P75" draw:layer="layout" svg:width="18.823cm" svg:height="13.18cm" svg:x="0cm" svg:y="0cm" svg:viewBox="0 0 18824 13181" draw:points="18576,0 0,13007 0,13181 18824,0">
          <text:p/>
        </draw:polygon>
        <draw:polygon draw:style-name="gr76" draw:text-style-name="P76" draw:layer="layout" svg:width="19.07cm" svg:height="13.353cm" svg:x="0cm" svg:y="0cm" svg:viewBox="0 0 19071 13354" draw:points="18824,0 0,13181 0,13354 19071,0">
          <text:p/>
        </draw:polygon>
        <draw:polygon draw:style-name="gr77" draw:text-style-name="P77" draw:layer="layout" svg:width="19.318cm" svg:height="13.526cm" svg:x="0cm" svg:y="0cm" svg:viewBox="0 0 19319 13527" draw:points="19071,0 0,13354 0,13527 19319,0">
          <text:p/>
        </draw:polygon>
        <draw:polygon draw:style-name="gr78" draw:text-style-name="P78" draw:layer="layout" svg:width="19.566cm" svg:height="13.7cm" svg:x="0cm" svg:y="0cm" svg:viewBox="0 0 19567 13701" draw:points="19319,0 0,13527 0,13701 19567,0">
          <text:p/>
        </draw:polygon>
        <draw:polygon draw:style-name="gr79" draw:text-style-name="P79" draw:layer="layout" svg:width="19.813cm" svg:height="13.873cm" svg:x="0cm" svg:y="0cm" svg:viewBox="0 0 19814 13874" draw:points="19567,0 0,13701 0,13874 19814,0">
          <text:p/>
        </draw:polygon>
        <draw:polygon draw:style-name="gr80" draw:text-style-name="P80" draw:layer="layout" svg:width="20.061cm" svg:height="14.047cm" svg:x="0cm" svg:y="0cm" svg:viewBox="0 0 20062 14048" draw:points="19814,0 0,13874 0,14048 20062,0">
          <text:p/>
        </draw:polygon>
        <draw:polygon draw:style-name="gr81" draw:text-style-name="P81" draw:layer="layout" svg:width="20.309cm" svg:height="14.22cm" svg:x="0cm" svg:y="0cm" svg:viewBox="0 0 20310 14221" draw:points="20062,0 0,14048 0,14221 20310,0">
          <text:p/>
        </draw:polygon>
        <draw:polygon draw:style-name="gr82" draw:text-style-name="P82" draw:layer="layout" svg:width="20.556cm" svg:height="14.394cm" svg:x="0cm" svg:y="0cm" svg:viewBox="0 0 20557 14395" draw:points="20310,0 0,14221 0,14395 20557,0">
          <text:p/>
        </draw:polygon>
        <draw:polygon draw:style-name="gr83" draw:text-style-name="P83" draw:layer="layout" svg:width="20.804cm" svg:height="14.567cm" svg:x="0cm" svg:y="0cm" svg:viewBox="0 0 20805 14568" draw:points="20557,0 0,14395 0,14568 20805,0">
          <text:p/>
        </draw:polygon>
        <draw:polygon draw:style-name="gr84" draw:text-style-name="P84" draw:layer="layout" svg:width="20.988cm" svg:height="14.74cm" svg:x="0cm" svg:y="0cm" svg:viewBox="0 0 20989 14741" draw:points="20805,0 0,14568 0,14741 20989,44">
          <text:p/>
        </draw:polygon>
        <draw:polygon draw:style-name="gr85" draw:text-style-name="P85" draw:layer="layout" svg:width="20.988cm" svg:height="14.87cm" svg:x="0cm" svg:y="0.044cm" svg:viewBox="0 0 20989 14871" draw:points="20989,0 0,14697 0,14871 20989,173">
          <text:p/>
        </draw:polygon>
        <draw:polygon draw:style-name="gr86" draw:text-style-name="P86" draw:layer="layout" svg:width="20.988cm" svg:height="14.87cm" svg:x="0cm" svg:y="0.217cm" svg:viewBox="0 0 20989 14871" draw:points="20989,0 0,14698 0,14871 20989,174">
          <text:p/>
        </draw:polygon>
        <draw:polygon draw:style-name="gr87" draw:text-style-name="P87" draw:layer="layout" svg:width="20.988cm" svg:height="14.87cm" svg:x="0cm" svg:y="0.391cm" svg:viewBox="0 0 20989 14871" draw:points="20989,0 0,14697 0,14871 20989,173">
          <text:p/>
        </draw:polygon>
        <draw:polygon draw:style-name="gr88" draw:text-style-name="P88" draw:layer="layout" svg:width="20.988cm" svg:height="14.87cm" svg:x="0cm" svg:y="0.564cm" svg:viewBox="0 0 20989 14871" draw:points="20989,0 0,14698 0,14871 20989,173">
          <text:p/>
        </draw:polygon>
        <draw:polygon draw:style-name="gr89" draw:text-style-name="P89" draw:layer="layout" svg:width="20.988cm" svg:height="14.87cm" svg:x="0cm" svg:y="0.737cm" svg:viewBox="0 0 20989 14871" draw:points="20989,0 0,14698 0,14871 20989,174">
          <text:p/>
        </draw:polygon>
        <draw:polygon draw:style-name="gr90" draw:text-style-name="P90" draw:layer="layout" svg:width="20.988cm" svg:height="14.87cm" svg:x="0cm" svg:y="0.911cm" svg:viewBox="0 0 20989 14871" draw:points="20989,0 0,14697 0,14871 20989,173">
          <text:p/>
        </draw:polygon>
        <draw:polygon draw:style-name="gr91" draw:text-style-name="P91" draw:layer="layout" svg:width="20.988cm" svg:height="14.87cm" svg:x="0cm" svg:y="1.084cm" svg:viewBox="0 0 20989 14871" draw:points="20989,0 0,14698 0,14871 20989,174">
          <text:p/>
        </draw:polygon>
        <draw:polygon draw:style-name="gr92" draw:text-style-name="P92" draw:layer="layout" svg:width="20.988cm" svg:height="14.87cm" svg:x="0cm" svg:y="1.258cm" svg:viewBox="0 0 20989 14871" draw:points="20989,0 0,14697 0,14871 20989,173">
          <text:p/>
        </draw:polygon>
        <draw:polygon draw:style-name="gr93" draw:text-style-name="P93" draw:layer="layout" svg:width="20.988cm" svg:height="14.87cm" svg:x="0cm" svg:y="1.431cm" svg:viewBox="0 0 20989 14871" draw:points="20989,0 0,14698 0,14871 20989,174">
          <text:p/>
        </draw:polygon>
        <draw:polygon draw:style-name="gr94" draw:text-style-name="P94" draw:layer="layout" svg:width="20.988cm" svg:height="14.87cm" svg:x="0cm" svg:y="1.605cm" svg:viewBox="0 0 20989 14871" draw:points="20989,0 0,14697 0,14871 20989,173">
          <text:p/>
        </draw:polygon>
        <draw:polygon draw:style-name="gr95" draw:text-style-name="P95" draw:layer="layout" svg:width="20.988cm" svg:height="14.87cm" svg:x="0cm" svg:y="1.778cm" svg:viewBox="0 0 20989 14871" draw:points="20989,0 0,14698 0,14871 20989,173">
          <text:p/>
        </draw:polygon>
        <draw:polygon draw:style-name="gr96" draw:text-style-name="P96" draw:layer="layout" svg:width="20.988cm" svg:height="14.87cm" svg:x="0cm" svg:y="1.951cm" svg:viewBox="0 0 20989 14871" draw:points="20989,0 0,14698 0,14871 20989,174">
          <text:p/>
        </draw:polygon>
        <draw:polygon draw:style-name="gr97" draw:text-style-name="P97" draw:layer="layout" svg:width="20.988cm" svg:height="14.87cm" svg:x="0cm" svg:y="2.125cm" svg:viewBox="0 0 20989 14871" draw:points="20989,0 0,14697 0,14871 20989,173">
          <text:p/>
        </draw:polygon>
        <draw:polygon draw:style-name="gr98" draw:text-style-name="P98" draw:layer="layout" svg:width="20.988cm" svg:height="14.87cm" svg:x="0cm" svg:y="2.298cm" svg:viewBox="0 0 20989 14871" draw:points="20989,0 0,14698 0,14871 20989,174">
          <text:p/>
        </draw:polygon>
        <draw:polygon draw:style-name="gr99" draw:text-style-name="P99" draw:layer="layout" svg:width="20.988cm" svg:height="14.87cm" svg:x="0cm" svg:y="2.472cm" svg:viewBox="0 0 20989 14871" draw:points="20989,0 0,14697 0,14871 20989,173">
          <text:p/>
        </draw:polygon>
        <draw:polygon draw:style-name="gr100" draw:text-style-name="P100" draw:layer="layout" svg:width="20.988cm" svg:height="14.87cm" svg:x="0cm" svg:y="2.645cm" svg:viewBox="0 0 20989 14871" draw:points="20989,0 0,14698 0,14871 20989,174">
          <text:p/>
        </draw:polygon>
        <draw:polygon draw:style-name="gr101" draw:text-style-name="P101" draw:layer="layout" svg:width="20.988cm" svg:height="14.87cm" svg:x="0cm" svg:y="2.819cm" svg:viewBox="0 0 20989 14871" draw:points="20989,0 0,14697 0,14871 20989,173">
          <text:p/>
        </draw:polygon>
        <draw:polygon draw:style-name="gr102" draw:text-style-name="P102" draw:layer="layout" svg:width="20.988cm" svg:height="14.87cm" svg:x="0cm" svg:y="2.992cm" svg:viewBox="0 0 20989 14871" draw:points="20989,0 0,14698 0,14871 20989,173">
          <text:p/>
        </draw:polygon>
        <draw:polygon draw:style-name="gr103" draw:text-style-name="P103" draw:layer="layout" svg:width="20.988cm" svg:height="14.87cm" svg:x="0cm" svg:y="3.165cm" svg:viewBox="0 0 20989 14871" draw:points="20989,0 0,14698 0,14871 20989,174">
          <text:p/>
        </draw:polygon>
        <draw:polygon draw:style-name="gr104" draw:text-style-name="P104" draw:layer="layout" svg:width="20.988cm" svg:height="14.87cm" svg:x="0cm" svg:y="3.339cm" svg:viewBox="0 0 20989 14871" draw:points="20989,0 0,14697 0,14871 20989,173">
          <text:p/>
        </draw:polygon>
        <draw:polygon draw:style-name="gr105" draw:text-style-name="P105" draw:layer="layout" svg:width="20.988cm" svg:height="14.87cm" svg:x="0cm" svg:y="3.512cm" svg:viewBox="0 0 20989 14871" draw:points="20989,0 0,14698 0,14871 20989,174">
          <text:p/>
        </draw:polygon>
        <draw:polygon draw:style-name="gr106" draw:text-style-name="P106" draw:layer="layout" svg:width="20.988cm" svg:height="14.87cm" svg:x="0cm" svg:y="3.686cm" svg:viewBox="0 0 20989 14871" draw:points="20989,0 0,14697 0,14871 20989,173">
          <text:p/>
        </draw:polygon>
        <draw:polygon draw:style-name="gr107" draw:text-style-name="P107" draw:layer="layout" svg:width="20.988cm" svg:height="14.87cm" svg:x="0cm" svg:y="3.859cm" svg:viewBox="0 0 20989 14871" draw:points="20989,0 0,14698 0,14871 20989,174">
          <text:p/>
        </draw:polygon>
        <draw:polygon draw:style-name="gr108" draw:text-style-name="P108" draw:layer="layout" svg:width="20.988cm" svg:height="14.87cm" svg:x="0cm" svg:y="4.033cm" svg:viewBox="0 0 20989 14871" draw:points="20989,0 0,14697 0,14871 20989,173">
          <text:p/>
        </draw:polygon>
        <draw:polygon draw:style-name="gr109" draw:text-style-name="P109" draw:layer="layout" svg:width="20.988cm" svg:height="14.87cm" svg:x="0cm" svg:y="4.206cm" svg:viewBox="0 0 20989 14871" draw:points="20989,0 0,14698 0,14871 20989,173">
          <text:p/>
        </draw:polygon>
        <draw:polygon draw:style-name="gr110" draw:text-style-name="P110" draw:layer="layout" svg:width="20.988cm" svg:height="14.87cm" svg:x="0cm" svg:y="4.379cm" svg:viewBox="0 0 20989 14871" draw:points="20989,0 0,14698 0,14871 20989,174">
          <text:p/>
        </draw:polygon>
        <draw:polygon draw:style-name="gr111" draw:text-style-name="P111" draw:layer="layout" svg:width="20.988cm" svg:height="14.87cm" svg:x="0cm" svg:y="4.553cm" svg:viewBox="0 0 20989 14871" draw:points="20989,0 0,14697 0,14871 20989,173">
          <text:p/>
        </draw:polygon>
        <draw:polygon draw:style-name="gr112" draw:text-style-name="P112" draw:layer="layout" svg:width="20.988cm" svg:height="14.87cm" svg:x="0cm" svg:y="4.726cm" svg:viewBox="0 0 20989 14871" draw:points="20989,0 0,14698 0,14871 20989,174">
          <text:p/>
        </draw:polygon>
        <draw:polygon draw:style-name="gr113" draw:text-style-name="P113" draw:layer="layout" svg:width="20.988cm" svg:height="14.87cm" svg:x="0cm" svg:y="4.9cm" svg:viewBox="0 0 20989 14871" draw:points="20989,0 0,14697 0,14871 20989,173">
          <text:p/>
        </draw:polygon>
        <draw:polygon draw:style-name="gr114" draw:text-style-name="P114" draw:layer="layout" svg:width="20.988cm" svg:height="14.87cm" svg:x="0cm" svg:y="5.073cm" svg:viewBox="0 0 20989 14871" draw:points="20989,0 0,14698 0,14871 20989,173">
          <text:p/>
        </draw:polygon>
        <draw:polygon draw:style-name="gr115" draw:text-style-name="P115" draw:layer="layout" svg:width="20.988cm" svg:height="14.87cm" svg:x="0cm" svg:y="5.246cm" svg:viewBox="0 0 20989 14871" draw:points="20989,0 0,14698 0,14871 20989,174">
          <text:p/>
        </draw:polygon>
        <draw:polygon draw:style-name="gr116" draw:text-style-name="P116" draw:layer="layout" svg:width="20.988cm" svg:height="14.87cm" svg:x="0cm" svg:y="5.42cm" svg:viewBox="0 0 20989 14871" draw:points="20989,0 0,14697 0,14871 20989,173">
          <text:p/>
        </draw:polygon>
        <draw:polygon draw:style-name="gr117" draw:text-style-name="P117" draw:layer="layout" svg:width="20.988cm" svg:height="14.87cm" svg:x="0cm" svg:y="5.593cm" svg:viewBox="0 0 20989 14871" draw:points="20989,0 0,14698 0,14871 20989,174">
          <text:p/>
        </draw:polygon>
        <draw:polygon draw:style-name="gr118" draw:text-style-name="P118" draw:layer="layout" svg:width="20.988cm" svg:height="14.87cm" svg:x="0cm" svg:y="5.767cm" svg:viewBox="0 0 20989 14871" draw:points="20989,0 0,14697 0,14871 20989,173">
          <text:p/>
        </draw:polygon>
        <draw:polygon draw:style-name="gr119" draw:text-style-name="P119" draw:layer="layout" svg:width="20.988cm" svg:height="14.87cm" svg:x="0cm" svg:y="5.94cm" svg:viewBox="0 0 20989 14871" draw:points="20989,0 0,14698 0,14871 20989,174">
          <text:p/>
        </draw:polygon>
        <draw:polygon draw:style-name="gr120" draw:text-style-name="P120" draw:layer="layout" svg:width="20.988cm" svg:height="14.87cm" svg:x="0cm" svg:y="6.114cm" svg:viewBox="0 0 20989 14871" draw:points="20989,0 0,14697 0,14871 20989,173">
          <text:p/>
        </draw:polygon>
        <draw:polygon draw:style-name="gr121" draw:text-style-name="P121" draw:layer="layout" svg:width="20.988cm" svg:height="14.87cm" svg:x="0cm" svg:y="6.287cm" svg:viewBox="0 0 20989 14871" draw:points="20989,0 0,14698 0,14871 20989,173">
          <text:p/>
        </draw:polygon>
        <draw:polygon draw:style-name="gr122" draw:text-style-name="P122" draw:layer="layout" svg:width="20.988cm" svg:height="14.87cm" svg:x="0cm" svg:y="6.46cm" svg:viewBox="0 0 20989 14871" draw:points="20989,0 0,14698 0,14871 20989,174">
          <text:p/>
        </draw:polygon>
        <draw:polygon draw:style-name="gr123" draw:text-style-name="P123" draw:layer="layout" svg:width="20.988cm" svg:height="14.87cm" svg:x="0cm" svg:y="6.634cm" svg:viewBox="0 0 20989 14871" draw:points="20989,0 0,14697 0,14871 20989,173">
          <text:p/>
        </draw:polygon>
        <draw:polygon draw:style-name="gr124" draw:text-style-name="P124" draw:layer="layout" svg:width="20.988cm" svg:height="14.87cm" svg:x="0cm" svg:y="6.807cm" svg:viewBox="0 0 20989 14871" draw:points="20989,0 0,14698 0,14871 20989,174">
          <text:p/>
        </draw:polygon>
        <draw:polygon draw:style-name="gr125" draw:text-style-name="P125" draw:layer="layout" svg:width="20.988cm" svg:height="14.87cm" svg:x="0cm" svg:y="6.981cm" svg:viewBox="0 0 20989 14871" draw:points="20989,0 0,14697 0,14871 20989,173">
          <text:p/>
        </draw:polygon>
        <draw:polygon draw:style-name="gr126" draw:text-style-name="P126" draw:layer="layout" svg:width="20.988cm" svg:height="14.87cm" svg:x="0cm" svg:y="7.154cm" svg:viewBox="0 0 20989 14871" draw:points="20989,0 0,14698 0,14871 20989,174">
          <text:p/>
        </draw:polygon>
        <draw:polygon draw:style-name="gr127" draw:text-style-name="P127" draw:layer="layout" svg:width="20.988cm" svg:height="14.87cm" svg:x="0cm" svg:y="7.328cm" svg:viewBox="0 0 20989 14871" draw:points="20989,0 0,14697 0,14871 20989,174">
          <text:p/>
        </draw:polygon>
        <draw:polygon draw:style-name="gr128" draw:text-style-name="P128" draw:layer="layout" svg:width="20.988cm" svg:height="14.87cm" svg:x="0cm" svg:y="7.501cm" svg:viewBox="0 0 20989 14871" draw:points="20989,0 0,14697 0,14871 20989,173">
          <text:p/>
        </draw:polygon>
        <draw:polygon draw:style-name="gr129" draw:text-style-name="P129" draw:layer="layout" svg:width="20.988cm" svg:height="14.87cm" svg:x="0cm" svg:y="7.674cm" svg:viewBox="0 0 20989 14871" draw:points="20989,0 0,14698 0,14871 20989,174">
          <text:p/>
        </draw:polygon>
        <draw:polygon draw:style-name="gr130" draw:text-style-name="P130" draw:layer="layout" svg:width="20.988cm" svg:height="14.87cm" svg:x="0cm" svg:y="7.848cm" svg:viewBox="0 0 20989 14871" draw:points="20989,0 0,14697 0,14871 20989,173">
          <text:p/>
        </draw:polygon>
        <draw:polygon draw:style-name="gr131" draw:text-style-name="P131" draw:layer="layout" svg:width="20.988cm" svg:height="14.87cm" svg:x="0cm" svg:y="8.021cm" svg:viewBox="0 0 20989 14871" draw:points="20989,0 0,14698 0,14871 20989,174">
          <text:p/>
        </draw:polygon>
        <draw:polygon draw:style-name="gr132" draw:text-style-name="P132" draw:layer="layout" svg:width="20.988cm" svg:height="14.87cm" svg:x="0cm" svg:y="8.195cm" svg:viewBox="0 0 20989 14871" draw:points="20989,0 0,14697 0,14871 20989,173">
          <text:p/>
        </draw:polygon>
        <draw:polygon draw:style-name="gr133" draw:text-style-name="P133" draw:layer="layout" svg:width="20.988cm" svg:height="14.87cm" svg:x="0cm" svg:y="8.368cm" svg:viewBox="0 0 20989 14871" draw:points="20989,0 0,14698 0,14871 20989,173">
          <text:p/>
        </draw:polygon>
        <draw:polygon draw:style-name="gr134" draw:text-style-name="P134" draw:layer="layout" svg:width="20.988cm" svg:height="14.87cm" svg:x="0cm" svg:y="8.541cm" svg:viewBox="0 0 20989 14871" draw:points="20989,0 0,14698 0,14871 20989,174">
          <text:p/>
        </draw:polygon>
        <draw:polygon draw:style-name="gr135" draw:text-style-name="P135" draw:layer="layout" svg:width="20.988cm" svg:height="14.87cm" svg:x="0cm" svg:y="8.715cm" svg:viewBox="0 0 20989 14871" draw:points="20989,0 0,14697 0,14871 20989,173">
          <text:p/>
        </draw:polygon>
        <draw:polygon draw:style-name="gr136" draw:text-style-name="P136" draw:layer="layout" svg:width="20.988cm" svg:height="14.87cm" svg:x="0cm" svg:y="8.888cm" svg:viewBox="0 0 20989 14871" draw:points="20989,0 0,14698 0,14871 20989,174">
          <text:p/>
        </draw:polygon>
        <draw:polygon draw:style-name="gr137" draw:text-style-name="P137" draw:layer="layout" svg:width="20.988cm" svg:height="14.87cm" svg:x="0cm" svg:y="9.062cm" svg:viewBox="0 0 20989 14871" draw:points="20989,0 0,14697 0,14871 20989,173">
          <text:p/>
        </draw:polygon>
        <draw:polygon draw:style-name="gr138" draw:text-style-name="P138" draw:layer="layout" svg:width="20.988cm" svg:height="14.87cm" svg:x="0cm" svg:y="9.235cm" svg:viewBox="0 0 20989 14871" draw:points="20989,0 0,14698 0,14871 20989,174">
          <text:p/>
        </draw:polygon>
        <draw:polygon draw:style-name="gr139" draw:text-style-name="P139" draw:layer="layout" svg:width="20.988cm" svg:height="14.87cm" svg:x="0cm" svg:y="9.409cm" svg:viewBox="0 0 20989 14871" draw:points="20989,0 0,14697 0,14871 20989,173">
          <text:p/>
        </draw:polygon>
        <draw:polygon draw:style-name="gr140" draw:text-style-name="P140" draw:layer="layout" svg:width="20.988cm" svg:height="14.87cm" svg:x="0cm" svg:y="9.582cm" svg:viewBox="0 0 20989 14871" draw:points="20989,0 0,14698 0,14871 20989,173">
          <text:p/>
        </draw:polygon>
        <draw:polygon draw:style-name="gr141" draw:text-style-name="P141" draw:layer="layout" svg:width="20.988cm" svg:height="14.87cm" svg:x="0cm" svg:y="9.755cm" svg:viewBox="0 0 20989 14871" draw:points="20989,0 0,14698 0,14871 20989,174">
          <text:p/>
        </draw:polygon>
        <draw:polygon draw:style-name="gr142" draw:text-style-name="P142" draw:layer="layout" svg:width="20.988cm" svg:height="14.87cm" svg:x="0cm" svg:y="9.929cm" svg:viewBox="0 0 20989 14871" draw:points="20989,0 0,14697 0,14871 20989,173">
          <text:p/>
        </draw:polygon>
        <draw:polygon draw:style-name="gr143" draw:text-style-name="P143" draw:layer="layout" svg:width="20.988cm" svg:height="14.87cm" svg:x="0cm" svg:y="10.102cm" svg:viewBox="0 0 20989 14871" draw:points="20989,0 0,14698 0,14871 20989,174">
          <text:p/>
        </draw:polygon>
        <draw:polygon draw:style-name="gr144" draw:text-style-name="P144" draw:layer="layout" svg:width="20.988cm" svg:height="14.87cm" svg:x="0cm" svg:y="10.276cm" svg:viewBox="0 0 20989 14871" draw:points="20989,0 0,14697 0,14871 20989,173">
          <text:p/>
        </draw:polygon>
        <draw:polygon draw:style-name="gr145" draw:text-style-name="P145" draw:layer="layout" svg:width="20.988cm" svg:height="14.87cm" svg:x="0cm" svg:y="10.449cm" svg:viewBox="0 0 20989 14871" draw:points="20989,0 0,14698 0,14871 20989,174">
          <text:p/>
        </draw:polygon>
        <draw:polygon draw:style-name="gr146" draw:text-style-name="P146" draw:layer="layout" svg:width="20.988cm" svg:height="14.87cm" svg:x="0cm" svg:y="10.623cm" svg:viewBox="0 0 20989 14871" draw:points="20989,0 0,14697 0,14871 20989,173">
          <text:p/>
        </draw:polygon>
        <draw:polygon draw:style-name="gr147" draw:text-style-name="P147" draw:layer="layout" svg:width="20.988cm" svg:height="14.87cm" svg:x="0cm" svg:y="10.796cm" svg:viewBox="0 0 20989 14871" draw:points="20989,0 0,14698 0,14871 20989,173">
          <text:p/>
        </draw:polygon>
        <draw:polygon draw:style-name="gr148" draw:text-style-name="P148" draw:layer="layout" svg:width="20.988cm" svg:height="14.87cm" svg:x="0cm" svg:y="10.969cm" svg:viewBox="0 0 20989 14871" draw:points="20989,0 0,14698 0,14871 20989,174">
          <text:p/>
        </draw:polygon>
        <draw:polygon draw:style-name="gr149" draw:text-style-name="P149" draw:layer="layout" svg:width="20.988cm" svg:height="14.87cm" svg:x="0cm" svg:y="11.143cm" svg:viewBox="0 0 20989 14871" draw:points="20989,0 0,14697 0,14871 20989,173">
          <text:p/>
        </draw:polygon>
        <draw:polygon draw:style-name="gr150" draw:text-style-name="P150" draw:layer="layout" svg:width="20.988cm" svg:height="14.87cm" svg:x="0cm" svg:y="11.316cm" svg:viewBox="0 0 20989 14871" draw:points="20989,0 0,14698 0,14871 20989,174">
          <text:p/>
        </draw:polygon>
        <draw:polygon draw:style-name="gr151" draw:text-style-name="P151" draw:layer="layout" svg:width="20.988cm" svg:height="14.87cm" svg:x="0cm" svg:y="11.49cm" svg:viewBox="0 0 20989 14871" draw:points="20989,0 0,14697 0,14871 20989,173">
          <text:p/>
        </draw:polygon>
        <draw:polygon draw:style-name="gr152" draw:text-style-name="P152" draw:layer="layout" svg:width="20.988cm" svg:height="14.87cm" svg:x="0cm" svg:y="11.663cm" svg:viewBox="0 0 20989 14871" draw:points="20989,0 0,14698 0,14871 20989,174">
          <text:p/>
        </draw:polygon>
        <draw:polygon draw:style-name="gr153" draw:text-style-name="P153" draw:layer="layout" svg:width="20.988cm" svg:height="14.869cm" svg:x="0cm" svg:y="11.837cm" svg:viewBox="0 0 20989 14870" draw:points="20989,0 0,14697 0,14870 20989,173">
          <text:p/>
        </draw:polygon>
        <draw:polygon draw:style-name="gr154" draw:text-style-name="P154" draw:layer="layout" svg:width="20.988cm" svg:height="14.87cm" svg:x="0cm" svg:y="12.01cm" svg:viewBox="0 0 20989 14871" draw:points="20989,0 0,14697 0,14871 20989,173">
          <text:p/>
        </draw:polygon>
        <draw:polygon draw:style-name="gr155" draw:text-style-name="P155" draw:layer="layout" svg:width="20.988cm" svg:height="14.87cm" svg:x="0cm" svg:y="12.183cm" svg:viewBox="0 0 20989 14871" draw:points="20989,0 0,14698 0,14871 20989,174">
          <text:p/>
        </draw:polygon>
        <draw:polygon draw:style-name="gr156" draw:text-style-name="P156" draw:layer="layout" svg:width="20.988cm" svg:height="14.87cm" svg:x="0cm" svg:y="12.357cm" svg:viewBox="0 0 20989 14871" draw:points="20989,0 0,14697 0,14871 20989,173">
          <text:p/>
        </draw:polygon>
        <draw:polygon draw:style-name="gr157" draw:text-style-name="P157" draw:layer="layout" svg:width="20.988cm" svg:height="14.87cm" svg:x="0cm" svg:y="12.53cm" svg:viewBox="0 0 20989 14871" draw:points="20989,0 0,14698 0,14871 20989,174">
          <text:p/>
        </draw:polygon>
        <draw:polygon draw:style-name="gr158" draw:text-style-name="P158" draw:layer="layout" svg:width="20.988cm" svg:height="14.87cm" svg:x="0cm" svg:y="12.704cm" svg:viewBox="0 0 20989 14871" draw:points="20989,0 0,14697 0,14871 20989,173">
          <text:p/>
        </draw:polygon>
        <draw:polygon draw:style-name="gr159" draw:text-style-name="P159" draw:layer="layout" svg:width="20.988cm" svg:height="14.87cm" svg:x="0cm" svg:y="12.877cm" svg:viewBox="0 0 20989 14871" draw:points="20989,0 0,14698 0,14871 20989,173">
          <text:p/>
        </draw:polygon>
        <draw:polygon draw:style-name="gr160" draw:text-style-name="P160" draw:layer="layout" svg:width="20.988cm" svg:height="14.87cm" svg:x="0cm" svg:y="13.05cm" svg:viewBox="0 0 20989 14871" draw:points="20989,0 0,14698 0,14871 20989,174">
          <text:p/>
        </draw:polygon>
        <draw:polygon draw:style-name="gr161" draw:text-style-name="P161" draw:layer="layout" svg:width="20.988cm" svg:height="14.87cm" svg:x="0cm" svg:y="13.224cm" svg:viewBox="0 0 20989 14871" draw:points="20989,0 0,14697 0,14871 20989,173">
          <text:p/>
        </draw:polygon>
        <draw:polygon draw:style-name="gr162" draw:text-style-name="P162" draw:layer="layout" svg:width="20.988cm" svg:height="14.87cm" svg:x="0cm" svg:y="13.397cm" svg:viewBox="0 0 20989 14871" draw:points="20989,0 0,14698 0,14871 20989,174">
          <text:p/>
        </draw:polygon>
        <draw:polygon draw:style-name="gr163" draw:text-style-name="P163" draw:layer="layout" svg:width="20.988cm" svg:height="14.87cm" svg:x="0cm" svg:y="13.571cm" svg:viewBox="0 0 20989 14871" draw:points="20989,0 0,14697 0,14871 20989,173">
          <text:p/>
        </draw:polygon>
        <draw:polygon draw:style-name="gr164" draw:text-style-name="P164" draw:layer="layout" svg:width="20.988cm" svg:height="14.87cm" svg:x="0cm" svg:y="13.744cm" svg:viewBox="0 0 20989 14871" draw:points="20989,0 0,14698 0,14871 20989,174">
          <text:p/>
        </draw:polygon>
        <draw:polygon draw:style-name="gr165" draw:text-style-name="P165" draw:layer="layout" svg:width="20.988cm" svg:height="14.87cm" svg:x="0cm" svg:y="13.918cm" svg:viewBox="0 0 20989 14871" draw:points="20989,0 0,14697 0,14871 20989,173">
          <text:p/>
        </draw:polygon>
        <draw:polygon draw:style-name="gr166" draw:text-style-name="P166" draw:layer="layout" svg:width="20.988cm" svg:height="14.87cm" svg:x="0cm" svg:y="14.091cm" svg:viewBox="0 0 20989 14871" draw:points="20989,0 0,14698 0,14871 20989,173">
          <text:p/>
        </draw:polygon>
        <draw:polygon draw:style-name="gr166" draw:text-style-name="P166" draw:layer="layout" svg:width="20.988cm" svg:height="14.87cm" svg:x="0cm" svg:y="14.264cm" svg:viewBox="0 0 20989 14871" draw:points="20989,0 0,14698 0,14871 20989,174">
          <text:p/>
        </draw:polygon>
        <draw:polygon draw:style-name="gr167" draw:text-style-name="P167" draw:layer="layout" svg:width="20.988cm" svg:height="15.043cm" svg:x="0cm" svg:y="14.438cm" svg:viewBox="0 0 20989 15044" draw:points="20989,0 0,14697 0,15044 20989,347">
          <text:p/>
        </draw:polygon>
        <draw:polygon draw:style-name="gr168" draw:text-style-name="P168" draw:layer="layout" svg:width="20.988cm" svg:height="14.914cm" svg:x="0cm" svg:y="14.785cm" svg:viewBox="0 0 20989 14915" draw:points="20989,0 0,14697 0,14915 20989,217">
          <text:p/>
        </draw:polygon>
        <draw:polygon draw:style-name="gr168" draw:text-style-name="P168" draw:layer="layout" svg:width="20.988cm" svg:height="14.697cm" svg:x="0cm" svg:y="15.002cm" svg:viewBox="0 0 20989 14698" draw:points="20989,0 0,14698 184,14698 20989,130">
          <text:p/>
        </draw:polygon>
        <draw:polygon draw:style-name="gr168" draw:text-style-name="P168" draw:layer="layout" svg:width="20.804cm" svg:height="14.567cm" svg:x="0.184cm" svg:y="15.132cm" svg:viewBox="0 0 20805 14568" draw:points="20805,0 0,14568 495,14568 20805,346">
          <text:p/>
        </draw:polygon>
        <draw:polygon draw:style-name="gr169" draw:text-style-name="P169" draw:layer="layout" svg:width="20.309cm" svg:height="14.221cm" svg:x="0.679cm" svg:y="15.478cm" svg:viewBox="0 0 20310 14222" draw:points="20310,0 0,14222 496,14222 20310,347">
          <text:p/>
        </draw:polygon>
        <draw:polygon draw:style-name="gr170" draw:text-style-name="P170" draw:layer="layout" svg:width="19.813cm" svg:height="13.874cm" svg:x="1.175cm" svg:y="15.825cm" svg:viewBox="0 0 19814 13875" draw:points="19814,0 0,13875 495,13875 19814,347">
          <text:p/>
        </draw:polygon>
        <draw:polygon draw:style-name="gr171" draw:text-style-name="P171" draw:layer="layout" svg:width="19.318cm" svg:height="13.527cm" svg:x="1.67cm" svg:y="16.172cm" svg:viewBox="0 0 19319 13528" draw:points="19319,0 0,13528 495,13528 19319,347">
          <text:p/>
        </draw:polygon>
        <draw:polygon draw:style-name="gr172" draw:text-style-name="P172" draw:layer="layout" svg:width="18.823cm" svg:height="13.18cm" svg:x="2.165cm" svg:y="16.519cm" svg:viewBox="0 0 18824 13181" draw:points="18824,0 0,13181 496,13181 18824,347">
          <text:p/>
        </draw:polygon>
        <draw:polygon draw:style-name="gr173" draw:text-style-name="P173" draw:layer="layout" svg:width="18.327cm" svg:height="12.833cm" svg:x="2.661cm" svg:y="16.866cm" svg:viewBox="0 0 18328 12834" draw:points="18328,0 0,12834 495,12834 18328,347">
          <text:p/>
        </draw:polygon>
        <draw:polygon draw:style-name="gr173" draw:text-style-name="P173" draw:layer="layout" svg:width="17.832cm" svg:height="12.486cm" svg:x="3.156cm" svg:y="17.213cm" svg:viewBox="0 0 17833 12487" draw:points="17833,0 0,12487 495,12487 17833,346">
          <text:p/>
        </draw:polygon>
        <draw:polygon draw:style-name="gr174" draw:text-style-name="P174" draw:layer="layout" svg:width="17.337cm" svg:height="12.14cm" svg:x="3.651cm" svg:y="17.559cm" svg:viewBox="0 0 17338 12141" draw:points="17338,0 0,12141 496,12141 17338,347">
          <text:p/>
        </draw:polygon>
        <draw:polygon draw:style-name="gr175" draw:text-style-name="P175" draw:layer="layout" svg:width="16.841cm" svg:height="11.793cm" svg:x="4.147cm" svg:y="17.906cm" svg:viewBox="0 0 16842 11794" draw:points="16842,0 0,11794 495,11794 16842,347">
          <text:p/>
        </draw:polygon>
        <draw:polygon draw:style-name="gr176" draw:text-style-name="P176" draw:layer="layout" svg:width="16.346cm" svg:height="11.446cm" svg:x="4.642cm" svg:y="18.253cm" svg:viewBox="0 0 16347 11447" draw:points="16347,0 0,11447 495,11447 16347,347">
          <text:p/>
        </draw:polygon>
        <draw:polygon draw:style-name="gr177" draw:text-style-name="P177" draw:layer="layout" svg:width="15.851cm" svg:height="11.099cm" svg:x="5.137cm" svg:y="18.6cm" svg:viewBox="0 0 15852 11100" draw:points="15852,0 0,11100 496,11100 15852,347">
          <text:p/>
        </draw:polygon>
        <draw:polygon draw:style-name="gr178" draw:text-style-name="P178" draw:layer="layout" svg:width="15.355cm" svg:height="10.752cm" svg:x="5.633cm" svg:y="18.947cm" svg:viewBox="0 0 15356 10753" draw:points="15356,0 0,10753 495,10753 15356,347">
          <text:p/>
        </draw:polygon>
        <draw:polygon draw:style-name="gr179" draw:text-style-name="P179" draw:layer="layout" svg:width="14.86cm" svg:height="10.405cm" svg:x="6.128cm" svg:y="19.294cm" svg:viewBox="0 0 14861 10406" draw:points="14861,0 0,10406 495,10406 14861,347">
          <text:p/>
        </draw:polygon>
        <draw:polygon draw:style-name="gr179" draw:text-style-name="P179" draw:layer="layout" svg:width="14.365cm" svg:height="10.058cm" svg:x="6.623cm" svg:y="19.641cm" svg:viewBox="0 0 14366 10059" draw:points="14366,0 0,10059 496,10059 14366,346">
          <text:p/>
        </draw:polygon>
        <draw:polygon draw:style-name="gr180" draw:text-style-name="P180" draw:layer="layout" svg:width="13.869cm" svg:height="9.712cm" svg:x="7.119cm" svg:y="19.987cm" svg:viewBox="0 0 13870 9713" draw:points="13870,0 0,9713 495,9713 13870,347">
          <text:p/>
        </draw:polygon>
        <draw:polygon draw:style-name="gr181" draw:text-style-name="P181" draw:layer="layout" svg:width="13.374cm" svg:height="9.365cm" svg:x="7.614cm" svg:y="20.334cm" svg:viewBox="0 0 13375 9366" draw:points="13375,0 0,9366 495,9366 13375,347">
          <text:p/>
        </draw:polygon>
        <draw:polygon draw:style-name="gr182" draw:text-style-name="P182" draw:layer="layout" svg:width="12.879cm" svg:height="9.018cm" svg:x="8.109cm" svg:y="20.681cm" svg:viewBox="0 0 12880 9019" draw:points="12880,0 0,9019 496,9019 12880,347">
          <text:p/>
        </draw:polygon>
        <draw:polygon draw:style-name="gr182" draw:text-style-name="P182" draw:layer="layout" svg:width="12.383cm" svg:height="8.671cm" svg:x="8.605cm" svg:y="21.028cm" svg:viewBox="0 0 12384 8672" draw:points="12384,0 0,8672 495,8672 12384,347">
          <text:p/>
        </draw:polygon>
        <draw:polygon draw:style-name="gr183" draw:text-style-name="P183" draw:layer="layout" svg:width="11.888cm" svg:height="8.324cm" svg:x="9.1cm" svg:y="21.375cm" svg:viewBox="0 0 11889 8325" draw:points="11889,0 0,8325 495,8325 11889,347">
          <text:p/>
        </draw:polygon>
        <draw:polygon draw:style-name="gr184" draw:text-style-name="P184" draw:layer="layout" svg:width="11.393cm" svg:height="7.977cm" svg:x="9.595cm" svg:y="21.722cm" svg:viewBox="0 0 11394 7978" draw:points="11394,0 0,7978 496,7978 11394,346">
          <text:p/>
        </draw:polygon>
        <draw:polygon draw:style-name="gr184" draw:text-style-name="P184" draw:layer="layout" svg:width="10.897cm" svg:height="7.631cm" svg:x="10.091cm" svg:y="22.068cm" svg:viewBox="0 0 10898 7632" draw:points="10898,0 0,7632 495,7632 10898,347">
          <text:p/>
        </draw:polygon>
        <draw:polygon draw:style-name="gr185" draw:text-style-name="P185" draw:layer="layout" svg:width="10.402cm" svg:height="7.284cm" svg:x="10.586cm" svg:y="22.415cm" svg:viewBox="0 0 10403 7285" draw:points="10403,0 0,7285 495,7285 10403,347">
          <text:p/>
        </draw:polygon>
        <draw:polygon draw:style-name="gr186" draw:text-style-name="P186" draw:layer="layout" svg:width="9.907cm" svg:height="6.937cm" svg:x="11.081cm" svg:y="22.762cm" svg:viewBox="0 0 9908 6938" draw:points="9908,0 0,6938 496,6938 9908,347">
          <text:p/>
        </draw:polygon>
        <draw:polygon draw:style-name="gr187" draw:text-style-name="P187" draw:layer="layout" svg:width="9.411cm" svg:height="6.59cm" svg:x="11.577cm" svg:y="23.109cm" svg:viewBox="0 0 9412 6591" draw:points="9412,0 0,6591 495,6591 9412,347">
          <text:p/>
        </draw:polygon>
        <draw:polygon draw:style-name="gr187" draw:text-style-name="P187" draw:layer="layout" svg:width="8.916cm" svg:height="6.243cm" svg:x="12.072cm" svg:y="23.456cm" svg:viewBox="0 0 8917 6244" draw:points="8917,0 0,6244 496,6244 8917,347">
          <text:p/>
        </draw:polygon>
        <draw:polygon draw:style-name="gr188" draw:text-style-name="P188" draw:layer="layout" svg:width="8.42cm" svg:height="5.896cm" svg:x="12.568cm" svg:y="23.803cm" svg:viewBox="0 0 8421 5897" draw:points="8421,0 0,5897 496,5897 8421,346">
          <text:p/>
        </draw:polygon>
        <draw:polygon draw:style-name="gr189" draw:text-style-name="P189" draw:layer="layout" svg:width="7.925cm" svg:height="5.55cm" svg:x="13.063cm" svg:y="24.149cm" svg:viewBox="0 0 7926 5551" draw:points="7926,0 0,5551 495,5551 7926,347">
          <text:p/>
        </draw:polygon>
        <draw:polygon draw:style-name="gr189" draw:text-style-name="P189" draw:layer="layout" svg:width="7.43cm" svg:height="5.203cm" svg:x="13.558cm" svg:y="24.496cm" svg:viewBox="0 0 7431 5204" draw:points="7431,0 0,5204 496,5204 7431,347">
          <text:p/>
        </draw:polygon>
        <draw:polygon draw:style-name="gr190" draw:text-style-name="P190" draw:layer="layout" svg:width="6.934cm" svg:height="4.856cm" svg:x="14.054cm" svg:y="24.843cm" svg:viewBox="0 0 6935 4857" draw:points="6935,0 0,4857 495,4857 6935,347">
          <text:p/>
        </draw:polygon>
        <draw:polygon draw:style-name="gr191" draw:text-style-name="P191" draw:layer="layout" svg:width="6.439cm" svg:height="4.509cm" svg:x="14.549cm" svg:y="25.19cm" svg:viewBox="0 0 6440 4510" draw:points="6440,0 0,4510 495,4510 6440,347">
          <text:p/>
        </draw:polygon>
        <draw:polygon draw:style-name="gr192" draw:text-style-name="P192" draw:layer="layout" svg:width="5.944cm" svg:height="4.162cm" svg:x="15.044cm" svg:y="25.537cm" svg:viewBox="0 0 5945 4163" draw:points="5945,0 0,4163 496,4163 5945,347">
          <text:p/>
        </draw:polygon>
        <draw:polygon draw:style-name="gr192" draw:text-style-name="P192" draw:layer="layout" svg:width="5.448cm" svg:height="3.815cm" svg:x="15.54cm" svg:y="25.884cm" svg:viewBox="0 0 5449 3816" draw:points="5449,0 0,3816 495,3816 5449,347">
          <text:p/>
        </draw:polygon>
        <draw:polygon draw:style-name="gr193" draw:text-style-name="P193" draw:layer="layout" svg:width="4.953cm" svg:height="3.468cm" svg:x="16.035cm" svg:y="26.231cm" svg:viewBox="0 0 4954 3469" draw:points="4954,0 0,3469 495,3469 4954,346">
          <text:p/>
        </draw:polygon>
        <draw:polygon draw:style-name="gr194" draw:text-style-name="P194" draw:layer="layout" svg:width="4.458cm" svg:height="3.122cm" svg:x="16.53cm" svg:y="26.577cm" svg:viewBox="0 0 4459 3123" draw:points="4459,0 0,3123 496,3123 4459,347">
          <text:p/>
        </draw:polygon>
        <draw:polygon draw:style-name="gr195" draw:text-style-name="P195" draw:layer="layout" svg:width="3.962cm" svg:height="2.775cm" svg:x="17.026cm" svg:y="26.924cm" svg:viewBox="0 0 3963 2776" draw:points="3963,0 0,2776 495,2776 3963,347">
          <text:p/>
        </draw:polygon>
        <draw:polygon draw:style-name="gr196" draw:text-style-name="P196" draw:layer="layout" svg:width="3.467cm" svg:height="2.428cm" svg:x="17.521cm" svg:y="27.271cm" svg:viewBox="0 0 3468 2429" draw:points="3468,0 0,2429 495,2429 3468,347">
          <text:p/>
        </draw:polygon>
        <draw:polygon draw:style-name="gr197" draw:text-style-name="P197" draw:layer="layout" svg:width="2.972cm" svg:height="2.081cm" svg:x="18.016cm" svg:y="27.618cm" svg:viewBox="0 0 2973 2082" draw:points="2973,0 0,2082 496,2082 2973,347">
          <text:p/>
        </draw:polygon>
        <draw:polygon draw:style-name="gr198" draw:text-style-name="P198" draw:layer="layout" svg:width="2.476cm" svg:height="1.734cm" svg:x="18.512cm" svg:y="27.965cm" svg:viewBox="0 0 2477 1735" draw:points="2477,0 0,1735 496,1735 2477,347">
          <text:p/>
        </draw:polygon>
        <draw:polygon draw:style-name="gr198" draw:text-style-name="P198" draw:layer="layout" svg:width="1.981cm" svg:height="1.387cm" svg:x="19.007cm" svg:y="28.312cm" svg:viewBox="0 0 1982 1388" draw:points="1982,0 0,1388 495,1388 1982,347">
          <text:p/>
        </draw:polygon>
        <draw:polygon draw:style-name="gr199" draw:text-style-name="P199" draw:layer="layout" svg:width="1.486cm" svg:height="1.041cm" svg:x="19.502cm" svg:y="28.658cm" svg:viewBox="0 0 1487 1042" draw:points="1487,0 0,1042 496,1042 1487,347">
          <text:p/>
        </draw:polygon>
        <draw:polygon draw:style-name="gr200" draw:text-style-name="P200" draw:layer="layout" svg:width="0.99cm" svg:height="0.694cm" svg:x="19.998cm" svg:y="29.005cm" svg:viewBox="0 0 991 695" draw:points="991,0 0,695 496,695 991,347">
          <text:p/>
        </draw:polygon>
        <draw:polygon draw:style-name="gr201" draw:text-style-name="P201" draw:layer="layout" svg:width="0.495cm" svg:height="0.347cm" svg:x="20.493cm" svg:y="29.352cm" svg:viewBox="0 0 496 348" draw:points="496,0 0,348 496,348">
          <text:p/>
        </draw:polygon>
        <draw:path draw:style-name="gr202" draw:text-style-name="P202" draw:layer="layout" svg:width="11.116cm" svg:height="12.761cm" svg:x="9.872cm" svg:y="-0.001cm" svg:viewBox="0 0 11117 12762" svg:d="M11117 12112c-35 15-70 29-105 44-120 50-242 97-365 141-122 44-246 84-371 122s-250 73-377 105c-126 31-253 60-381 85-128 26-256 48-385 67s-258 35-388 48-260 22-390 29c-130 6-260 9-391 9-130 0-260-3-390-9-131-7-260-16-390-29s-259-29-389-48c-129-19-257-41-385-67-128-25-255-54-382-85-126-32-252-67-376-105-125-38-249-78-372-122-122-44-244-91-364-141-121-50-240-103-358-158-117-56-234-115-349-176-115-62-228-126-340-193s-222-136-330-209c-108-72-215-147-320-225-104-78-207-158-308-240-101-83-199-168-296-256-96-87-191-177-283-269s-182-187-269-283c-88-97-173-196-256-296-82-101-163-204-240-309-78-104-153-211-225-319-73-109-142-219-209-330-67-112-132-226-193-340-62-115-120-232-176-350-56-117-108-237-158-357s-97-242-141-365c-44-122-85-246-123-371-37-125-72-250-104-377-31-126-60-253-85-382-26-128-48-256-67-385s-35-258-48-388-22-260-29-390c-6-130-9-260-9-391 0-130 3-260 9-390 7-131 16-261 29-390 13-130 29-259 48-388s41-257 67-385c25-128 54-255 85-382 32-126 67-252 104-376 38-125 79-249 123-372 44-122 91-244 141-364 50-121 102-240 158-358 56-117 114-234 176-349 61-115 126-228 193-340s136-222 209-330c72-108 147-215 225-320 13-17 26-35 39-52l9511-1z">
          <text:p/>
        </draw:path>
        <draw:frame draw:style-name="gr203" draw:text-style-name="P202" draw:layer="layout" svg:width="20.989cm" svg:height="29.703cm" svg:x="-20.99cm" svg:y="-0.003cm">
          <draw:image xlink:href="Pictures/10000001000002530000034ADF9FE721.png" xlink:type="simple" xlink:show="embed" xlink:actuate="onLoad" draw:mime-type="image/png">
            <text:p/>
          </draw:image>
        </draw:frame>
        <draw:frame draw:style-name="gr203" draw:text-style-name="P202" draw:layer="layout" svg:width="20.989cm" svg:height="0cm" svg:x="-20.99cm" svg:y="29.701cm">
          <draw:image xlink:href="Pictures/100000010000025300000001C4EF2158.png" xlink:type="simple" xlink:show="embed" xlink:actuate="onLoad" draw:mime-type="image/png">
            <text:p/>
          </draw:image>
        </draw:frame>
        <draw:frame draw:style-name="gr203" draw:text-style-name="P202" draw:layer="layout" svg:width="20.989cm" svg:height="29.703cm" svg:x="0cm" svg:y="-0.003cm">
          <draw:image xlink:href="Pictures/10000001000002530000034ADF9FE721.png" xlink:type="simple" xlink:show="embed" xlink:actuate="onLoad" draw:mime-type="image/png">
            <text:p/>
          </draw:image>
        </draw:frame>
        <draw:frame draw:style-name="gr203" draw:text-style-name="P202" draw:layer="layout" svg:width="20.989cm" svg:height="0cm" svg:x="0cm" svg:y="29.701cm">
          <draw:image xlink:href="Pictures/100000010000025300000001C4EF2158.png" xlink:type="simple" xlink:show="embed" xlink:actuate="onLoad" draw:mime-type="image/png">
            <text:p/>
          </draw:image>
        </draw:frame>
        <draw:path draw:style-name="gr204" draw:text-style-name="P203" draw:layer="layout" svg:width="0.106cm" svg:height="0.058cm" svg:x="1.457cm" svg:y="4.24cm" svg:viewBox="0 0 107 59" svg:d="M0 54c0-15 5-27 16-38 10-11 22-16 37-16s28 5 39 16c10 11 15 23 15 38v5h-107z">
          <text:p/>
        </draw:path>
        <draw:polygon draw:style-name="gr205" draw:text-style-name="P204" draw:layer="layout" svg:width="0.106cm" svg:height="0.058cm" svg:x="1.457cm" svg:y="4.298cm" svg:viewBox="0 0 107 59" draw:points="0,0 107,0 107,59 0,59">
          <text:p/>
        </draw:polygon>
        <draw:polygon draw:style-name="gr205" draw:text-style-name="P204" draw:layer="layout" svg:width="0.106cm" svg:height="0.058cm" svg:x="1.457cm" svg:y="4.356cm" svg:viewBox="0 0 107 59" draw:points="0,0 107,0 107,59 0,59">
          <text:p/>
        </draw:polygon>
        <draw:polygon draw:style-name="gr206" draw:text-style-name="P205" draw:layer="layout" svg:width="0.106cm" svg:height="0.058cm" svg:x="1.457cm" svg:y="4.414cm" svg:viewBox="0 0 107 59" draw:points="0,0 107,0 107,59 0,59">
          <text:p/>
        </draw:polygon>
        <draw:polygon draw:style-name="gr207" draw:text-style-name="P206" draw:layer="layout" svg:width="0.106cm" svg:height="0.058cm" svg:x="1.457cm" svg:y="4.472cm" svg:viewBox="0 0 107 59" draw:points="0,0 107,0 107,59 0,59">
          <text:p/>
        </draw:polygon>
        <draw:polygon draw:style-name="gr208" draw:text-style-name="P207" draw:layer="layout" svg:width="0.106cm" svg:height="0.058cm" svg:x="1.457cm" svg:y="4.53cm" svg:viewBox="0 0 107 59" draw:points="0,0 107,0 107,59 0,59">
          <text:p/>
        </draw:polygon>
        <draw:polygon draw:style-name="gr209" draw:text-style-name="P208" draw:layer="layout" svg:width="0.106cm" svg:height="0.059cm" svg:x="1.457cm" svg:y="4.588cm" svg:viewBox="0 0 107 60" draw:points="0,0 107,0 107,60 0,60">
          <text:p/>
        </draw:polygon>
        <draw:polygon draw:style-name="gr210" draw:text-style-name="P209" draw:layer="layout" svg:width="0.106cm" svg:height="0.058cm" svg:x="1.457cm" svg:y="4.646cm" svg:viewBox="0 0 107 59" draw:points="0,0 107,0 107,59 0,59">
          <text:p/>
        </draw:polygon>
        <draw:polygon draw:style-name="gr211" draw:text-style-name="P210" draw:layer="layout" svg:width="0.106cm" svg:height="0.058cm" svg:x="1.457cm" svg:y="4.704cm" svg:viewBox="0 0 107 59" draw:points="0,0 107,0 107,59 0,59">
          <text:p/>
        </draw:polygon>
        <draw:polygon draw:style-name="gr212" draw:text-style-name="P211" draw:layer="layout" svg:width="0.106cm" svg:height="0.058cm" svg:x="1.457cm" svg:y="4.762cm" svg:viewBox="0 0 107 59" draw:points="0,0 107,0 107,59 0,59">
          <text:p/>
        </draw:polygon>
        <draw:polygon draw:style-name="gr213" draw:text-style-name="P212" draw:layer="layout" svg:width="0.106cm" svg:height="0.058cm" svg:x="1.457cm" svg:y="4.82cm" svg:viewBox="0 0 107 59" draw:points="0,0 107,0 107,59 0,59">
          <text:p/>
        </draw:polygon>
        <draw:polygon draw:style-name="gr214" draw:text-style-name="P213" draw:layer="layout" svg:width="0.106cm" svg:height="0.058cm" svg:x="1.457cm" svg:y="4.878cm" svg:viewBox="0 0 107 59" draw:points="0,0 107,0 107,59 0,59">
          <text:p/>
        </draw:polygon>
        <draw:polygon draw:style-name="gr215" draw:text-style-name="P214" draw:layer="layout" svg:width="0.106cm" svg:height="0.057cm" svg:x="1.457cm" svg:y="4.936cm" svg:viewBox="0 0 107 58" draw:points="0,0 107,0 107,58 0,58">
          <text:p/>
        </draw:polygon>
        <draw:polygon draw:style-name="gr216" draw:text-style-name="P215" draw:layer="layout" svg:width="0.106cm" svg:height="0.058cm" svg:x="1.457cm" svg:y="4.993cm" svg:viewBox="0 0 107 59" draw:points="0,0 107,0 107,59 0,59">
          <text:p/>
        </draw:polygon>
        <draw:polygon draw:style-name="gr217" draw:text-style-name="P216" draw:layer="layout" svg:width="0.106cm" svg:height="0.058cm" svg:x="1.457cm" svg:y="5.051cm" svg:viewBox="0 0 107 59" draw:points="0,0 107,0 107,59 0,59">
          <text:p/>
        </draw:polygon>
        <draw:polygon draw:style-name="gr217" draw:text-style-name="P216" draw:layer="layout" svg:width="0.106cm" svg:height="0.058cm" svg:x="1.457cm" svg:y="5.109cm" svg:viewBox="0 0 107 59" draw:points="0,0 107,0 107,59 0,59">
          <text:p/>
        </draw:polygon>
        <draw:polygon draw:style-name="gr218" draw:text-style-name="P217" draw:layer="layout" svg:width="0.106cm" svg:height="0.058cm" svg:x="1.457cm" svg:y="5.167cm" svg:viewBox="0 0 107 59" draw:points="0,0 107,0 107,59 0,59">
          <text:p/>
        </draw:polygon>
        <draw:polygon draw:style-name="gr218" draw:text-style-name="P217" draw:layer="layout" svg:width="0.106cm" svg:height="0.058cm" svg:x="1.457cm" svg:y="5.225cm" svg:viewBox="0 0 107 59" draw:points="0,0 107,0 107,59 0,59">
          <text:p/>
        </draw:polygon>
        <draw:polygon draw:style-name="gr219" draw:text-style-name="P218" draw:layer="layout" svg:width="0.106cm" svg:height="0.058cm" svg:x="1.457cm" svg:y="5.283cm" svg:viewBox="0 0 107 59" draw:points="0,0 107,0 107,59 0,59">
          <text:p/>
        </draw:polygon>
        <draw:polygon draw:style-name="gr220" draw:text-style-name="P219" draw:layer="layout" svg:width="0.106cm" svg:height="0.058cm" svg:x="1.457cm" svg:y="5.341cm" svg:viewBox="0 0 107 59" draw:points="0,0 107,0 107,59 0,59">
          <text:p/>
        </draw:polygon>
        <draw:polygon draw:style-name="gr221" draw:text-style-name="P220" draw:layer="layout" svg:width="0.106cm" svg:height="0.058cm" svg:x="1.457cm" svg:y="5.399cm" svg:viewBox="0 0 107 59" draw:points="0,0 107,0 107,59 0,59">
          <text:p/>
        </draw:polygon>
        <draw:polygon draw:style-name="gr222" draw:text-style-name="P221" draw:layer="layout" svg:width="0.106cm" svg:height="0.058cm" svg:x="1.457cm" svg:y="5.457cm" svg:viewBox="0 0 107 59" draw:points="0,0 107,0 107,59 0,59">
          <text:p/>
        </draw:polygon>
        <draw:polygon draw:style-name="gr223" draw:text-style-name="P222" draw:layer="layout" svg:width="0.106cm" svg:height="0.058cm" svg:x="1.457cm" svg:y="5.515cm" svg:viewBox="0 0 107 59" draw:points="0,0 107,0 107,59 0,59">
          <text:p/>
        </draw:polygon>
        <draw:polygon draw:style-name="gr224" draw:text-style-name="P223" draw:layer="layout" svg:width="0.106cm" svg:height="0.058cm" svg:x="1.457cm" svg:y="5.573cm" svg:viewBox="0 0 107 59" draw:points="0,0 107,0 107,59 0,59">
          <text:p/>
        </draw:polygon>
        <draw:polygon draw:style-name="gr225" draw:text-style-name="P224" draw:layer="layout" svg:width="0.106cm" svg:height="0.058cm" svg:x="1.457cm" svg:y="5.631cm" svg:viewBox="0 0 107 59" draw:points="0,0 107,0 107,59 0,59">
          <text:p/>
        </draw:polygon>
        <draw:polygon draw:style-name="gr226" draw:text-style-name="P225" draw:layer="layout" svg:width="0.106cm" svg:height="0.058cm" svg:x="1.457cm" svg:y="5.689cm" svg:viewBox="0 0 107 59" draw:points="0,0 107,0 107,59 0,59">
          <text:p/>
        </draw:polygon>
        <draw:polygon draw:style-name="gr227" draw:text-style-name="P226" draw:layer="layout" svg:width="0.106cm" svg:height="0.058cm" svg:x="1.457cm" svg:y="5.747cm" svg:viewBox="0 0 107 59" draw:points="0,0 107,0 107,59 0,59">
          <text:p/>
        </draw:polygon>
        <draw:polygon draw:style-name="gr228" draw:text-style-name="P227" draw:layer="layout" svg:width="0.106cm" svg:height="0.058cm" svg:x="1.457cm" svg:y="5.805cm" svg:viewBox="0 0 107 59" draw:points="0,0 107,0 107,59 0,59">
          <text:p/>
        </draw:polygon>
        <draw:polygon draw:style-name="gr229" draw:text-style-name="P228" draw:layer="layout" svg:width="0.106cm" svg:height="0.058cm" svg:x="1.457cm" svg:y="5.863cm" svg:viewBox="0 0 107 59" draw:points="0,0 107,0 107,59 0,59">
          <text:p/>
        </draw:polygon>
        <draw:polygon draw:style-name="gr230" draw:text-style-name="P229" draw:layer="layout" svg:width="0.106cm" svg:height="0.058cm" svg:x="1.457cm" svg:y="5.921cm" svg:viewBox="0 0 107 59" draw:points="0,0 107,0 107,59 0,59">
          <text:p/>
        </draw:polygon>
        <draw:polygon draw:style-name="gr230" draw:text-style-name="P229" draw:layer="layout" svg:width="0.106cm" svg:height="0.058cm" svg:x="1.457cm" svg:y="5.979cm" svg:viewBox="0 0 107 59" draw:points="0,0 107,0 107,59 0,59">
          <text:p/>
        </draw:polygon>
        <draw:polygon draw:style-name="gr231" draw:text-style-name="P230" draw:layer="layout" svg:width="0.106cm" svg:height="0.058cm" svg:x="1.457cm" svg:y="6.037cm" svg:viewBox="0 0 107 59" draw:points="0,0 107,0 107,59 0,59">
          <text:p/>
        </draw:polygon>
        <draw:polygon draw:style-name="gr232" draw:text-style-name="P231" draw:layer="layout" svg:width="0.106cm" svg:height="0.058cm" svg:x="1.457cm" svg:y="6.095cm" svg:viewBox="0 0 107 59" draw:points="0,0 107,0 107,59 0,59">
          <text:p/>
        </draw:polygon>
        <draw:polygon draw:style-name="gr233" draw:text-style-name="P232" draw:layer="layout" svg:width="0.106cm" svg:height="0.058cm" svg:x="1.457cm" svg:y="6.153cm" svg:viewBox="0 0 107 59" draw:points="0,0 107,0 107,59 0,59">
          <text:p/>
        </draw:polygon>
        <draw:polygon draw:style-name="gr233" draw:text-style-name="P232" draw:layer="layout" svg:width="0.106cm" svg:height="0.058cm" svg:x="1.457cm" svg:y="6.211cm" svg:viewBox="0 0 107 59" draw:points="0,0 107,0 107,59 0,59">
          <text:p/>
        </draw:polygon>
        <draw:polygon draw:style-name="gr234" draw:text-style-name="P233" draw:layer="layout" svg:width="0.106cm" svg:height="0.058cm" svg:x="1.457cm" svg:y="6.269cm" svg:viewBox="0 0 107 59" draw:points="0,0 107,0 107,59 0,59">
          <text:p/>
        </draw:polygon>
        <draw:polygon draw:style-name="gr235" draw:text-style-name="P234" draw:layer="layout" svg:width="0.106cm" svg:height="0.058cm" svg:x="1.457cm" svg:y="6.327cm" svg:viewBox="0 0 107 59" draw:points="0,0 107,0 107,59 0,59">
          <text:p/>
        </draw:polygon>
        <draw:polygon draw:style-name="gr236" draw:text-style-name="P235" draw:layer="layout" svg:width="0.106cm" svg:height="0.058cm" svg:x="1.457cm" svg:y="6.385cm" svg:viewBox="0 0 107 59" draw:points="0,0 107,0 107,59 0,59">
          <text:p/>
        </draw:polygon>
        <draw:polygon draw:style-name="gr237" draw:text-style-name="P236" draw:layer="layout" svg:width="0.106cm" svg:height="0.058cm" svg:x="1.457cm" svg:y="6.443cm" svg:viewBox="0 0 107 59" draw:points="0,0 107,0 107,59 0,59">
          <text:p/>
        </draw:polygon>
        <draw:polygon draw:style-name="gr238" draw:text-style-name="P237" draw:layer="layout" svg:width="0.106cm" svg:height="0.058cm" svg:x="1.457cm" svg:y="6.501cm" svg:viewBox="0 0 107 59" draw:points="0,0 107,0 107,59 0,59">
          <text:p/>
        </draw:polygon>
        <draw:polygon draw:style-name="gr239" draw:text-style-name="P238" draw:layer="layout" svg:width="0.106cm" svg:height="0.058cm" svg:x="1.457cm" svg:y="6.559cm" svg:viewBox="0 0 107 59" draw:points="0,0 107,0 107,59 0,59">
          <text:p/>
        </draw:polygon>
        <draw:polygon draw:style-name="gr240" draw:text-style-name="P239" draw:layer="layout" svg:width="0.106cm" svg:height="0.058cm" svg:x="1.457cm" svg:y="6.617cm" svg:viewBox="0 0 107 59" draw:points="0,0 107,0 107,59 0,59">
          <text:p/>
        </draw:polygon>
        <draw:polygon draw:style-name="gr241" draw:text-style-name="P240" draw:layer="layout" svg:width="0.106cm" svg:height="0.058cm" svg:x="1.457cm" svg:y="6.675cm" svg:viewBox="0 0 107 59" draw:points="0,0 107,0 107,59 0,59">
          <text:p/>
        </draw:polygon>
        <draw:polygon draw:style-name="gr242" draw:text-style-name="P241" draw:layer="layout" svg:width="0.106cm" svg:height="0.058cm" svg:x="1.457cm" svg:y="6.733cm" svg:viewBox="0 0 107 59" draw:points="0,0 107,0 107,59 0,59">
          <text:p/>
        </draw:polygon>
        <draw:polygon draw:style-name="gr243" draw:text-style-name="P242" draw:layer="layout" svg:width="0.106cm" svg:height="0.058cm" svg:x="1.457cm" svg:y="6.791cm" svg:viewBox="0 0 107 59" draw:points="0,0 107,0 107,59 0,59">
          <text:p/>
        </draw:polygon>
        <draw:polygon draw:style-name="gr244" draw:text-style-name="P243" draw:layer="layout" svg:width="0.106cm" svg:height="0.058cm" svg:x="1.457cm" svg:y="6.849cm" svg:viewBox="0 0 107 59" draw:points="0,0 107,0 107,59 0,59">
          <text:p/>
        </draw:polygon>
        <draw:polygon draw:style-name="gr245" draw:text-style-name="P244" draw:layer="layout" svg:width="0.106cm" svg:height="0.058cm" svg:x="1.457cm" svg:y="6.907cm" svg:viewBox="0 0 107 59" draw:points="0,0 107,0 107,59 0,59">
          <text:p/>
        </draw:polygon>
        <draw:polygon draw:style-name="gr245" draw:text-style-name="P244" draw:layer="layout" svg:width="0.106cm" svg:height="0.058cm" svg:x="1.457cm" svg:y="6.965cm" svg:viewBox="0 0 107 59" draw:points="0,0 107,0 107,59 0,59">
          <text:p/>
        </draw:polygon>
        <draw:polygon draw:style-name="gr246" draw:text-style-name="P245" draw:layer="layout" svg:width="0.106cm" svg:height="0.058cm" svg:x="1.457cm" svg:y="7.023cm" svg:viewBox="0 0 107 59" draw:points="0,0 107,0 107,59 0,59">
          <text:p/>
        </draw:polygon>
        <draw:polygon draw:style-name="gr246" draw:text-style-name="P245" draw:layer="layout" svg:width="0.106cm" svg:height="0.057cm" svg:x="1.457cm" svg:y="7.081cm" svg:viewBox="0 0 107 58" draw:points="0,0 107,0 107,58 0,58">
          <text:p/>
        </draw:polygon>
        <draw:polygon draw:style-name="gr247" draw:text-style-name="P246" draw:layer="layout" svg:width="0.106cm" svg:height="0.058cm" svg:x="1.457cm" svg:y="7.138cm" svg:viewBox="0 0 107 59" draw:points="0,0 107,0 107,59 0,59">
          <text:p/>
        </draw:polygon>
        <draw:polygon draw:style-name="gr248" draw:text-style-name="P247" draw:layer="layout" svg:width="0.106cm" svg:height="0.058cm" svg:x="1.457cm" svg:y="7.196cm" svg:viewBox="0 0 107 59" draw:points="0,0 107,0 107,59 0,59">
          <text:p/>
        </draw:polygon>
        <draw:polygon draw:style-name="gr249" draw:text-style-name="P248" draw:layer="layout" svg:width="0.106cm" svg:height="0.058cm" svg:x="1.457cm" svg:y="7.254cm" svg:viewBox="0 0 107 59" draw:points="0,0 107,0 107,59 0,59">
          <text:p/>
        </draw:polygon>
        <draw:polygon draw:style-name="gr250" draw:text-style-name="P249" draw:layer="layout" svg:width="0.106cm" svg:height="0.058cm" svg:x="1.457cm" svg:y="7.312cm" svg:viewBox="0 0 107 59" draw:points="0,0 107,0 107,59 0,59">
          <text:p/>
        </draw:polygon>
        <draw:polygon draw:style-name="gr251" draw:text-style-name="P250" draw:layer="layout" svg:width="0.106cm" svg:height="0.058cm" svg:x="1.457cm" svg:y="7.37cm" svg:viewBox="0 0 107 59" draw:points="0,0 107,0 107,59 0,59">
          <text:p/>
        </draw:polygon>
        <draw:polygon draw:style-name="gr252" draw:text-style-name="P251" draw:layer="layout" svg:width="0.106cm" svg:height="0.058cm" svg:x="1.457cm" svg:y="7.428cm" svg:viewBox="0 0 107 59" draw:points="0,0 107,0 107,59 0,59">
          <text:p/>
        </draw:polygon>
        <draw:polygon draw:style-name="gr253" draw:text-style-name="P252" draw:layer="layout" svg:width="0.106cm" svg:height="0.058cm" svg:x="1.457cm" svg:y="7.486cm" svg:viewBox="0 0 107 59" draw:points="0,0 107,0 107,59 0,59">
          <text:p/>
        </draw:polygon>
        <draw:polygon draw:style-name="gr254" draw:text-style-name="P253" draw:layer="layout" svg:width="0.106cm" svg:height="0.058cm" svg:x="1.457cm" svg:y="7.544cm" svg:viewBox="0 0 107 59" draw:points="0,0 107,0 107,59 0,59">
          <text:p/>
        </draw:polygon>
        <draw:polygon draw:style-name="gr255" draw:text-style-name="P254" draw:layer="layout" svg:width="0.106cm" svg:height="0.058cm" svg:x="1.457cm" svg:y="7.602cm" svg:viewBox="0 0 107 59" draw:points="0,0 107,0 107,59 0,59">
          <text:p/>
        </draw:polygon>
        <draw:polygon draw:style-name="gr256" draw:text-style-name="P255" draw:layer="layout" svg:width="0.106cm" svg:height="0.058cm" svg:x="1.457cm" svg:y="7.66cm" svg:viewBox="0 0 107 59" draw:points="0,0 107,0 107,59 0,59">
          <text:p/>
        </draw:polygon>
        <draw:polygon draw:style-name="gr257" draw:text-style-name="P256" draw:layer="layout" svg:width="0.106cm" svg:height="0.058cm" svg:x="1.457cm" svg:y="7.718cm" svg:viewBox="0 0 107 59" draw:points="0,0 107,0 107,59 0,59">
          <text:p/>
        </draw:polygon>
        <draw:polygon draw:style-name="gr258" draw:text-style-name="P257" draw:layer="layout" svg:width="0.106cm" svg:height="0.058cm" svg:x="1.457cm" svg:y="7.776cm" svg:viewBox="0 0 107 59" draw:points="0,0 107,0 107,59 0,59">
          <text:p/>
        </draw:polygon>
        <draw:polygon draw:style-name="gr258" draw:text-style-name="P257" draw:layer="layout" svg:width="0.106cm" svg:height="0.058cm" svg:x="1.457cm" svg:y="7.834cm" svg:viewBox="0 0 107 59" draw:points="0,0 107,0 107,59 0,59">
          <text:p/>
        </draw:polygon>
        <draw:path draw:style-name="gr259" draw:text-style-name="P258" draw:layer="layout" svg:width="0.106cm" svg:height="0.058cm" svg:x="1.457cm" svg:y="7.892cm" svg:viewBox="0 0 107 59" svg:d="M0 6v-6h107v6c0 15-5 27-15 38-11 10-24 15-39 15s-27-5-37-15c-11-11-16-23-16-38z">
          <text:p/>
        </draw:path>
        <draw:polygon draw:style-name="gr260" draw:text-style-name="P202" draw:layer="layout" svg:width="1.564cm" svg:height="1.563cm" svg:x="17.61cm" svg:y="1.338cm" svg:viewBox="0 0 1565 1564" draw:points="1565,382 1565,1183 801,1564 748,1564 0,1191 0,373 748,0 801,0">
          <text:p/>
        </draw:polygon>
        <draw:polygon draw:style-name="gr261" draw:text-style-name="P259" draw:layer="layout" svg:width="0.954cm" svg:height="0.795cm" svg:x="17.438cm" svg:y="24.726cm" svg:viewBox="0 0 955 796" draw:points="0,796 955,796 478,0">
          <text:p/>
        </draw:polygon>
        <draw:path draw:style-name="gr262" draw:text-style-name="P202" draw:layer="layout" svg:width="10.11cm" svg:height="10.578cm" svg:x="0cm" svg:y="19.121cm" svg:viewBox="0 0 10111 10579" svg:d="M10111 6639c0 108-3 217-8 325-5 109-13 217-24 325-11 109-24 217-40 325-16 107-34 214-56 321-21 106-45 212-71 318-26 105-55 210-87 314-31 104-65 207-102 309s-76 204-117 304c-42 100-86 200-132 298-47 98-96 195-147 291s-105 190-160 284c-56 93-114 184-175 275-57 85-115 169-176 251h-8816v-9599c19-12 39-24 58-36 93-56 188-109 284-160 96-52 193-100 291-147 98-46 197-90 298-132 100-41 201-81 304-117 102-37 205-71 309-102 104-32 209-61 314-87 106-27 212-50 318-72 107-21 214-39 321-55 108-16 215-30 324-40 108-11 216-19 325-24 108-6 217-8 325-8 109 0 218 2 326 8 109 5 217 13 325 24 108 10 216 24 323 40 108 16 215 34 321 55 107 22 213 45 319 72 106 26 210 55 314 87 104 31 208 65 310 102 102 36 203 76 304 117 100 42 199 86 298 132 98 47 195 95 291 147 96 51 190 104 283 160s185 114 276 175c90 60 179 122 266 187s173 132 257 201 166 140 247 213c80 72 159 147 236 224 76 77 151 156 224 236 73 81 144 163 213 247s136 170 201 257c64 87 127 176 187 266 61 91 119 182 175 276 55 93 109 187 160 283s100 193 147 291c46 98 90 198 132 298 41 100 80 202 117 304s71 205 102 309c32 104 61 209 87 314 26 106 50 212 71 318 22 107 40 214 56 321 16 108 29 216 40 324s19 216 24 325c5 108 8 217 8 326z">
          <text:p/>
        </draw:path>
        <draw:path draw:style-name="gr261" draw:text-style-name="P259" draw:layer="layout" svg:width="6.149cm" svg:height="0.954cm" svg:x="1.457cm" svg:y="10.728cm" svg:viewBox="0 0 6150 955" svg:d="M0 849v-743c0-29 10-54 31-75 21-20 46-31 75-31h5938c29 0 54 11 75 31 20 21 31 46 31 75v743c0 30-11 55-31 75-21 21-46 31-75 31h-5938c-29 0-54-10-75-31-21-20-31-45-31-75z">
          <text:p/>
        </draw:path>
        <draw:path draw:style-name="gr263" draw:text-style-name="P260" draw:layer="layout" svg:width="6.149cm" svg:height="0.954cm" svg:x="1.457cm" svg:y="10.728cm" svg:viewBox="0 0 6150 955" svg:d="M0 849v-743c0-29 10-54 31-75 21-20 46-31 75-31h5938c29 0 54 11 75 31 20 21 31 46 31 75v743c0 30-11 55-31 75-21 21-46 31-75 31h-5938c-29 0-54-10-75-31-21-20-31-45-31-75zM27 106v743c0 11 2 21 6 31s9 18 17 26c7 7 16 13 26 17 9 4 20 6 30 6h5938c10 0 20-2 30-6s18-10 26-17c7-8 13-16 17-26s6-20 6-31v-743c0-10-2-20-6-30s-10-18-17-26c-8-7-16-13-26-17s-20-6-30-6h-5938c-10 0-21 2-30 6-10 4-19 10-26 17-8 8-13 16-17 26s-6 20-6 30z">
          <text:p/>
        </draw:path>
        <draw:frame draw:style-name="gr264" draw:text-style-name="P262" draw:layer="layout" svg:width="4.459cm" svg:height="0.48cm" svg:x="1.908cm" svg:y="10.934cm">
          <draw:text-box>
            <text:p text:style-name="P261"><text:span text:style-name="T1">BUG BOUNTY FIELD GUIDE</text:span></text:p>
          </draw:text-box>
        </draw:frame>
        <draw:frame draw:style-name="gr265" draw:text-style-name="P263" draw:layer="layout" svg:width="5.817cm" svg:height="1.733cm" svg:x="1.458cm" svg:y="12.152cm">
          <draw:text-box>
            <text:p text:style-name="P261"><text:span text:style-name="T2">JavaScript</text:span></text:p>
          </draw:text-box>
        </draw:frame>
        <draw:frame draw:style-name="gr265" draw:text-style-name="P263" draw:layer="layout" svg:width="9.536cm" svg:height="1.733cm" svg:x="1.458cm" svg:y="13.609cm">
          <draw:text-box>
            <text:p text:style-name="P261"><text:span text:style-name="T3">Reconnaissance</text:span></text:p>
          </draw:text-box>
        </draw:frame>
        <draw:frame draw:style-name="gr266" draw:text-style-name="P264" draw:layer="layout" svg:width="11.691cm" svg:height="0.674cm" svg:x="1.458cm" svg:y="15.686cm">
          <draw:text-box>
            <text:p text:style-name="P261"><text:span text:style-name="T4">Extracting <text:s/>API <text:s/>Keys, <text:s/>Tokens, <text:s/>Endpoints, <text:s/>URLs <text:s/>&amp;</text:span></text:p>
          </draw:text-box>
        </draw:frame>
        <draw:path draw:style-name="gr204" draw:text-style-name="P203" draw:layer="layout" svg:width="0.159cm" svg:height="0.159cm" svg:x="1.457cm" svg:y="18.652cm" svg:viewBox="0 0 160 160" svg:d="M160 81c0 10-2 21-6 30-4 10-10 19-17 26-8 8-16 13-26 17s-20 6-30 6c-11 0-21-2-32-6-10-4-18-9-26-17-7-7-13-16-17-26-4-9-6-20-6-30 0-11 2-21 6-31 4-9 10-18 17-26 8-8 16-14 26-18 11-4 21-6 32-6 10 0 20 2 30 6s18 10 26 18c7 8 13 17 17 26 4 10 6 20 6 31z">
          <text:p/>
        </draw:path>
        <draw:frame draw:style-name="gr266" draw:text-style-name="P264" draw:layer="layout" svg:width="11.021cm" svg:height="0.674cm" svg:x="1.458cm" svg:y="16.428cm">
          <draw:text-box>
            <text:p text:style-name="P261"><text:span text:style-name="T4">Secrets from JavaScript for Bug Bounty Hunters</text:span></text:p>
          </draw:text-box>
        </draw:frame>
        <draw:path draw:style-name="gr204" draw:text-style-name="P203" draw:layer="layout" svg:width="0.159cm" svg:height="0.159cm" svg:x="5.75cm" svg:y="18.652cm" svg:viewBox="0 0 160 160" svg:d="M160 81c0 10-2 21-6 30-4 10-9 19-17 26-7 8-16 13-26 17-9 4-19 6-30 6s-21-2-31-6-19-9-26-17c-8-7-13-16-17-26-5-9-7-20-7-30 0-11 2-21 7-31 4-9 9-18 17-26 7-8 16-14 26-18s20-6 31-6 21 2 30 6c10 4 19 10 26 18 8 8 13 17 17 26 4 10 6 20 6 31z">
          <text:p/>
        </draw:path>
        <draw:frame draw:style-name="gr264" draw:text-style-name="P262" draw:layer="layout" svg:width="2.899cm" svg:height="0.48cm" svg:x="1.829cm" svg:y="18.461cm">
          <draw:text-box>
            <text:p text:style-name="P261"><text:span text:style-name="T1">Client-Side OSINT</text:span></text:p>
          </draw:text-box>
        </draw:frame>
        <draw:polygon draw:style-name="gr267" draw:text-style-name="P265" draw:layer="layout" svg:width="9.567cm" svg:height="0.026cm" svg:x="1.457cm" svg:y="28.145cm" svg:viewBox="0 0 9568 27" draw:points="0,0 9568,0 9568,27 0,27">
          <text:p/>
        </draw:polygon>
        <draw:frame draw:style-name="gr264" draw:text-style-name="P262" draw:layer="layout" svg:width="2.047cm" svg:height="0.48cm" svg:x="6.122cm" svg:y="18.461cm">
          <draw:text-box>
            <text:p text:style-name="P261"><text:span text:style-name="T1">2025 Edition</text:span></text:p>
          </draw:text-box>
        </draw:frame>
        <draw:frame draw:style-name="gr268" draw:text-style-name="P266" draw:layer="layout" svg:width="7.108cm" svg:height="0.433cm" svg:x="11.547cm" svg:y="27.938cm">
          <draw:text-box>
            <text:p text:style-name="P261"><text:span text:style-name="T5">SOURCE CODE ANALYSIS &amp; CLIENT-SIDE RECON</text:span></text:p>
          </draw:text-box>
        </draw:frame>
      </draw:page>
      <draw:page draw:name="page2" draw:style-name="dp1" draw:master-page-name="master-page556">
        <draw:polygon draw:style-name="gr269" draw:text-style-name="P267" draw:layer="layout" svg:width="0.053cm" svg:height="0.027cm" svg:x="2.014cm" svg:y="5.167cm" svg:viewBox="0 0 54 28" draw:points="0,0 54,0 54,28 0,28">
          <text:p/>
        </draw:polygon>
        <draw:polygon draw:style-name="gr269" draw:text-style-name="P267" draw:layer="layout" svg:width="0.027cm" svg:height="0.027cm" svg:x="2.093cm" svg:y="5.167cm" svg:viewBox="0 0 28 28" draw:points="0,0 28,0 28,28 0,28">
          <text:p/>
        </draw:polygon>
        <draw:polygon draw:style-name="gr269" draw:text-style-name="P267" draw:layer="layout" svg:width="0.027cm" svg:height="0.027cm" svg:x="2.146cm" svg:y="5.167cm" svg:viewBox="0 0 28 28" draw:points="0,0 28,0 28,28 0,28">
          <text:p/>
        </draw:polygon>
        <draw:polygon draw:style-name="gr269" draw:text-style-name="P267" draw:layer="layout" svg:width="0.027cm" svg:height="0.027cm" svg:x="2.199cm" svg:y="5.167cm" svg:viewBox="0 0 28 28" draw:points="0,0 28,0 28,28 0,28">
          <text:p/>
        </draw:polygon>
        <draw:polygon draw:style-name="gr269" draw:text-style-name="P267" draw:layer="layout" svg:width="0.027cm" svg:height="0.027cm" svg:x="2.252cm" svg:y="5.167cm" svg:viewBox="0 0 28 28" draw:points="0,0 28,0 28,28 0,28">
          <text:p/>
        </draw:polygon>
        <draw:polygon draw:style-name="gr269" draw:text-style-name="P267" draw:layer="layout" svg:width="0.027cm" svg:height="0.027cm" svg:x="2.305cm" svg:y="5.167cm" svg:viewBox="0 0 28 28" draw:points="0,0 28,0 28,28 0,28">
          <text:p/>
        </draw:polygon>
        <draw:polygon draw:style-name="gr269" draw:text-style-name="P267" draw:layer="layout" svg:width="0.027cm" svg:height="0.027cm" svg:x="2.358cm" svg:y="5.167cm" svg:viewBox="0 0 28 28" draw:points="0,0 28,0 28,28 0,28">
          <text:p/>
        </draw:polygon>
        <draw:polygon draw:style-name="gr269" draw:text-style-name="P267" draw:layer="layout" svg:width="0.027cm" svg:height="0.027cm" svg:x="2.411cm" svg:y="5.167cm" svg:viewBox="0 0 28 28" draw:points="0,0 28,0 28,28 0,28">
          <text:p/>
        </draw:polygon>
        <draw:polygon draw:style-name="gr269" draw:text-style-name="P267" draw:layer="layout" svg:width="0.027cm" svg:height="0.027cm" svg:x="2.464cm" svg:y="5.167cm" svg:viewBox="0 0 28 28" draw:points="0,0 28,0 28,28 0,28">
          <text:p/>
        </draw:polygon>
        <draw:polygon draw:style-name="gr269" draw:text-style-name="P267" draw:layer="layout" svg:width="0.027cm" svg:height="0.027cm" svg:x="2.517cm" svg:y="5.167cm" svg:viewBox="0 0 28 28" draw:points="0,0 28,0 28,28 0,28">
          <text:p/>
        </draw:polygon>
        <draw:polygon draw:style-name="gr269" draw:text-style-name="P267" draw:layer="layout" svg:width="0.027cm" svg:height="0.027cm" svg:x="2.57cm" svg:y="5.167cm" svg:viewBox="0 0 28 28" draw:points="0,0 28,0 28,28 0,28">
          <text:p/>
        </draw:polygon>
        <draw:polygon draw:style-name="gr269" draw:text-style-name="P267" draw:layer="layout" svg:width="0.027cm" svg:height="0.027cm" svg:x="2.623cm" svg:y="5.167cm" svg:viewBox="0 0 28 28" draw:points="0,0 28,0 28,28 0,28">
          <text:p/>
        </draw:polygon>
        <draw:polygon draw:style-name="gr269" draw:text-style-name="P267" draw:layer="layout" svg:width="0.027cm" svg:height="0.027cm" svg:x="2.676cm" svg:y="5.167cm" svg:viewBox="0 0 28 28" draw:points="0,0 28,0 28,28 0,28">
          <text:p/>
        </draw:polygon>
        <draw:polygon draw:style-name="gr269" draw:text-style-name="P267" draw:layer="layout" svg:width="0.027cm" svg:height="0.027cm" svg:x="2.729cm" svg:y="5.167cm" svg:viewBox="0 0 28 28" draw:points="0,0 28,0 28,28 0,28">
          <text:p/>
        </draw:polygon>
        <draw:polygon draw:style-name="gr269" draw:text-style-name="P267" draw:layer="layout" svg:width="0.027cm" svg:height="0.027cm" svg:x="2.782cm" svg:y="5.167cm" svg:viewBox="0 0 28 28" draw:points="0,0 28,0 28,28 0,28">
          <text:p/>
        </draw:polygon>
        <draw:polygon draw:style-name="gr269" draw:text-style-name="P267" draw:layer="layout" svg:width="0.027cm" svg:height="0.027cm" svg:x="2.835cm" svg:y="5.167cm" svg:viewBox="0 0 28 28" draw:points="0,0 28,0 28,28 0,28">
          <text:p/>
        </draw:polygon>
        <draw:polygon draw:style-name="gr269" draw:text-style-name="P267" draw:layer="layout" svg:width="0.027cm" svg:height="0.027cm" svg:x="2.888cm" svg:y="5.167cm" svg:viewBox="0 0 28 28" draw:points="0,0 28,0 28,28 0,28">
          <text:p/>
        </draw:polygon>
        <draw:polygon draw:style-name="gr269" draw:text-style-name="P267" draw:layer="layout" svg:width="0.027cm" svg:height="0.027cm" svg:x="2.941cm" svg:y="5.167cm" svg:viewBox="0 0 28 28" draw:points="0,0 28,0 28,28 0,28">
          <text:p/>
        </draw:polygon>
        <draw:polygon draw:style-name="gr269" draw:text-style-name="P267" draw:layer="layout" svg:width="0.027cm" svg:height="0.027cm" svg:x="2.994cm" svg:y="5.167cm" svg:viewBox="0 0 28 28" draw:points="0,0 28,0 28,28 0,28">
          <text:p/>
        </draw:polygon>
        <draw:polygon draw:style-name="gr269" draw:text-style-name="P267" draw:layer="layout" svg:width="0.027cm" svg:height="0.027cm" svg:x="3.047cm" svg:y="5.167cm" svg:viewBox="0 0 28 28" draw:points="0,0 28,0 28,28 0,28">
          <text:p/>
        </draw:polygon>
        <draw:polygon draw:style-name="gr269" draw:text-style-name="P267" draw:layer="layout" svg:width="0.027cm" svg:height="0.027cm" svg:x="3.1cm" svg:y="5.167cm" svg:viewBox="0 0 28 28" draw:points="0,0 28,0 28,28 0,28">
          <text:p/>
        </draw:polygon>
        <draw:polygon draw:style-name="gr269" draw:text-style-name="P267" draw:layer="layout" svg:width="0.027cm" svg:height="0.027cm" svg:x="3.153cm" svg:y="5.167cm" svg:viewBox="0 0 28 28" draw:points="0,0 28,0 28,28 0,28">
          <text:p/>
        </draw:polygon>
        <draw:polygon draw:style-name="gr269" draw:text-style-name="P267" draw:layer="layout" svg:width="0.027cm" svg:height="0.027cm" svg:x="3.206cm" svg:y="5.167cm" svg:viewBox="0 0 28 28" draw:points="0,0 28,0 28,28 0,28">
          <text:p/>
        </draw:polygon>
        <draw:polygon draw:style-name="gr269" draw:text-style-name="P267" draw:layer="layout" svg:width="0.027cm" svg:height="0.027cm" svg:x="3.259cm" svg:y="5.167cm" svg:viewBox="0 0 28 28" draw:points="0,0 28,0 28,28 0,28">
          <text:p/>
        </draw:polygon>
        <draw:polygon draw:style-name="gr269" draw:text-style-name="P267" draw:layer="layout" svg:width="0.027cm" svg:height="0.027cm" svg:x="3.312cm" svg:y="5.167cm" svg:viewBox="0 0 28 28" draw:points="0,0 28,0 28,28 0,28">
          <text:p/>
        </draw:polygon>
        <draw:polygon draw:style-name="gr269" draw:text-style-name="P267" draw:layer="layout" svg:width="0.027cm" svg:height="0.027cm" svg:x="3.365cm" svg:y="5.167cm" svg:viewBox="0 0 28 28" draw:points="0,0 28,0 28,28 0,28">
          <text:p/>
        </draw:polygon>
        <draw:polygon draw:style-name="gr269" draw:text-style-name="P267" draw:layer="layout" svg:width="0.028cm" svg:height="0.027cm" svg:x="3.418cm" svg:y="5.167cm" svg:viewBox="0 0 29 28" draw:points="0,0 29,0 29,28 0,28">
          <text:p/>
        </draw:polygon>
        <draw:polygon draw:style-name="gr269" draw:text-style-name="P267" draw:layer="layout" svg:width="0.027cm" svg:height="0.027cm" svg:x="3.471cm" svg:y="5.167cm" svg:viewBox="0 0 28 28" draw:points="0,0 28,0 28,28 0,28">
          <text:p/>
        </draw:polygon>
        <draw:polygon draw:style-name="gr269" draw:text-style-name="P267" draw:layer="layout" svg:width="0.027cm" svg:height="0.027cm" svg:x="3.524cm" svg:y="5.167cm" svg:viewBox="0 0 28 28" draw:points="0,0 28,0 28,28 0,28">
          <text:p/>
        </draw:polygon>
        <draw:polygon draw:style-name="gr269" draw:text-style-name="P267" draw:layer="layout" svg:width="0.027cm" svg:height="0.027cm" svg:x="3.577cm" svg:y="5.167cm" svg:viewBox="0 0 28 28" draw:points="0,0 28,0 28,28 0,28">
          <text:p/>
        </draw:polygon>
        <draw:polygon draw:style-name="gr269" draw:text-style-name="P267" draw:layer="layout" svg:width="0.027cm" svg:height="0.027cm" svg:x="3.63cm" svg:y="5.167cm" svg:viewBox="0 0 28 28" draw:points="0,0 28,0 28,28 0,28">
          <text:p/>
        </draw:polygon>
        <draw:polygon draw:style-name="gr269" draw:text-style-name="P267" draw:layer="layout" svg:width="0.027cm" svg:height="0.027cm" svg:x="3.683cm" svg:y="5.167cm" svg:viewBox="0 0 28 28" draw:points="0,0 28,0 28,28 0,28">
          <text:p/>
        </draw:polygon>
        <draw:polygon draw:style-name="gr269" draw:text-style-name="P267" draw:layer="layout" svg:width="0.027cm" svg:height="0.027cm" svg:x="3.736cm" svg:y="5.167cm" svg:viewBox="0 0 28 28" draw:points="0,0 28,0 28,28 0,28">
          <text:p/>
        </draw:polygon>
        <draw:polygon draw:style-name="gr269" draw:text-style-name="P267" draw:layer="layout" svg:width="0.027cm" svg:height="0.027cm" svg:x="3.789cm" svg:y="5.167cm" svg:viewBox="0 0 28 28" draw:points="0,0 28,0 28,28 0,28">
          <text:p/>
        </draw:polygon>
        <draw:polygon draw:style-name="gr269" draw:text-style-name="P267" draw:layer="layout" svg:width="0.027cm" svg:height="0.027cm" svg:x="3.842cm" svg:y="5.167cm" svg:viewBox="0 0 28 28" draw:points="0,0 28,0 28,28 0,28">
          <text:p/>
        </draw:polygon>
        <draw:polygon draw:style-name="gr269" draw:text-style-name="P267" draw:layer="layout" svg:width="0.027cm" svg:height="0.027cm" svg:x="3.895cm" svg:y="5.167cm" svg:viewBox="0 0 28 28" draw:points="0,0 28,0 28,28 0,28">
          <text:p/>
        </draw:polygon>
        <draw:polygon draw:style-name="gr269" draw:text-style-name="P267" draw:layer="layout" svg:width="0.027cm" svg:height="0.027cm" svg:x="3.948cm" svg:y="5.167cm" svg:viewBox="0 0 28 28" draw:points="0,0 28,0 28,28 0,28">
          <text:p/>
        </draw:polygon>
        <draw:polygon draw:style-name="gr269" draw:text-style-name="P267" draw:layer="layout" svg:width="0.027cm" svg:height="0.027cm" svg:x="4.001cm" svg:y="5.167cm" svg:viewBox="0 0 28 28" draw:points="0,0 28,0 28,28 0,28">
          <text:p/>
        </draw:polygon>
        <draw:polygon draw:style-name="gr269" draw:text-style-name="P267" draw:layer="layout" svg:width="0.027cm" svg:height="0.027cm" svg:x="4.054cm" svg:y="5.167cm" svg:viewBox="0 0 28 28" draw:points="0,0 28,0 28,28 0,28">
          <text:p/>
        </draw:polygon>
        <draw:polygon draw:style-name="gr269" draw:text-style-name="P267" draw:layer="layout" svg:width="0.027cm" svg:height="0.027cm" svg:x="4.107cm" svg:y="5.167cm" svg:viewBox="0 0 28 28" draw:points="0,0 28,0 28,28 0,28">
          <text:p/>
        </draw:polygon>
        <draw:polygon draw:style-name="gr269" draw:text-style-name="P267" draw:layer="layout" svg:width="0.027cm" svg:height="0.027cm" svg:x="4.16cm" svg:y="5.167cm" svg:viewBox="0 0 28 28" draw:points="0,0 28,0 28,28 0,28">
          <text:p/>
        </draw:polygon>
        <draw:polygon draw:style-name="gr269" draw:text-style-name="P267" draw:layer="layout" svg:width="0.027cm" svg:height="0.027cm" svg:x="4.213cm" svg:y="5.167cm" svg:viewBox="0 0 28 28" draw:points="0,0 28,0 28,28 0,28">
          <text:p/>
        </draw:polygon>
        <draw:polygon draw:style-name="gr269" draw:text-style-name="P267" draw:layer="layout" svg:width="0.027cm" svg:height="0.027cm" svg:x="4.266cm" svg:y="5.167cm" svg:viewBox="0 0 28 28" draw:points="0,0 28,0 28,28 0,28">
          <text:p/>
        </draw:polygon>
        <draw:polygon draw:style-name="gr269" draw:text-style-name="P267" draw:layer="layout" svg:width="0.027cm" svg:height="0.027cm" svg:x="4.319cm" svg:y="5.167cm" svg:viewBox="0 0 28 28" draw:points="0,0 28,0 28,28 0,28">
          <text:p/>
        </draw:polygon>
        <draw:polygon draw:style-name="gr269" draw:text-style-name="P267" draw:layer="layout" svg:width="0.027cm" svg:height="0.027cm" svg:x="4.372cm" svg:y="5.167cm" svg:viewBox="0 0 28 28" draw:points="0,0 28,0 28,28 0,28">
          <text:p/>
        </draw:polygon>
        <draw:polygon draw:style-name="gr269" draw:text-style-name="P267" draw:layer="layout" svg:width="0.027cm" svg:height="0.027cm" svg:x="4.425cm" svg:y="5.167cm" svg:viewBox="0 0 28 28" draw:points="0,0 28,0 28,28 0,28">
          <text:p/>
        </draw:polygon>
        <draw:polygon draw:style-name="gr269" draw:text-style-name="P267" draw:layer="layout" svg:width="0.027cm" svg:height="0.027cm" svg:x="4.478cm" svg:y="5.167cm" svg:viewBox="0 0 28 28" draw:points="0,0 28,0 28,28 0,28">
          <text:p/>
        </draw:polygon>
        <draw:polygon draw:style-name="gr269" draw:text-style-name="P267" draw:layer="layout" svg:width="0.027cm" svg:height="0.027cm" svg:x="4.531cm" svg:y="5.167cm" svg:viewBox="0 0 28 28" draw:points="0,0 28,0 28,28 0,28">
          <text:p/>
        </draw:polygon>
        <draw:polygon draw:style-name="gr269" draw:text-style-name="P267" draw:layer="layout" svg:width="0.027cm" svg:height="0.027cm" svg:x="4.584cm" svg:y="5.167cm" svg:viewBox="0 0 28 28" draw:points="0,0 28,0 28,28 0,28">
          <text:p/>
        </draw:polygon>
        <draw:polygon draw:style-name="gr269" draw:text-style-name="P267" draw:layer="layout" svg:width="0.027cm" svg:height="0.027cm" svg:x="4.637cm" svg:y="5.167cm" svg:viewBox="0 0 28 28" draw:points="0,0 28,0 28,28 0,28">
          <text:p/>
        </draw:polygon>
        <draw:polygon draw:style-name="gr269" draw:text-style-name="P267" draw:layer="layout" svg:width="0.027cm" svg:height="0.027cm" svg:x="4.69cm" svg:y="5.167cm" svg:viewBox="0 0 28 28" draw:points="0,0 28,0 28,28 0,28">
          <text:p/>
        </draw:polygon>
        <draw:polygon draw:style-name="gr269" draw:text-style-name="P267" draw:layer="layout" svg:width="0.027cm" svg:height="0.027cm" svg:x="4.743cm" svg:y="5.167cm" svg:viewBox="0 0 28 28" draw:points="0,0 28,0 28,28 0,28">
          <text:p/>
        </draw:polygon>
        <draw:polygon draw:style-name="gr269" draw:text-style-name="P267" draw:layer="layout" svg:width="0.028cm" svg:height="0.027cm" svg:x="4.796cm" svg:y="5.167cm" svg:viewBox="0 0 29 28" draw:points="0,0 29,0 29,28 0,28">
          <text:p/>
        </draw:polygon>
        <draw:polygon draw:style-name="gr269" draw:text-style-name="P267" draw:layer="layout" svg:width="0.027cm" svg:height="0.027cm" svg:x="4.849cm" svg:y="5.167cm" svg:viewBox="0 0 28 28" draw:points="0,0 28,0 28,28 0,28">
          <text:p/>
        </draw:polygon>
        <draw:polygon draw:style-name="gr269" draw:text-style-name="P267" draw:layer="layout" svg:width="0.027cm" svg:height="0.027cm" svg:x="4.902cm" svg:y="5.167cm" svg:viewBox="0 0 28 28" draw:points="0,0 28,0 28,28 0,28">
          <text:p/>
        </draw:polygon>
        <draw:polygon draw:style-name="gr269" draw:text-style-name="P267" draw:layer="layout" svg:width="0.027cm" svg:height="0.027cm" svg:x="4.955cm" svg:y="5.167cm" svg:viewBox="0 0 28 28" draw:points="0,0 28,0 28,28 0,28">
          <text:p/>
        </draw:polygon>
        <draw:polygon draw:style-name="gr269" draw:text-style-name="P267" draw:layer="layout" svg:width="0.027cm" svg:height="0.027cm" svg:x="5.008cm" svg:y="5.167cm" svg:viewBox="0 0 28 28" draw:points="0,0 28,0 28,28 0,28">
          <text:p/>
        </draw:polygon>
        <draw:polygon draw:style-name="gr269" draw:text-style-name="P267" draw:layer="layout" svg:width="0.027cm" svg:height="0.027cm" svg:x="5.061cm" svg:y="5.167cm" svg:viewBox="0 0 28 28" draw:points="0,0 28,0 28,28 0,28">
          <text:p/>
        </draw:polygon>
        <draw:polygon draw:style-name="gr269" draw:text-style-name="P267" draw:layer="layout" svg:width="0.027cm" svg:height="0.027cm" svg:x="5.114cm" svg:y="5.167cm" svg:viewBox="0 0 28 28" draw:points="0,0 28,0 28,28 0,28">
          <text:p/>
        </draw:polygon>
        <draw:polygon draw:style-name="gr269" draw:text-style-name="P267" draw:layer="layout" svg:width="0.027cm" svg:height="0.027cm" svg:x="5.167cm" svg:y="5.167cm" svg:viewBox="0 0 28 28" draw:points="0,0 28,0 28,28 0,28">
          <text:p/>
        </draw:polygon>
        <draw:polygon draw:style-name="gr269" draw:text-style-name="P267" draw:layer="layout" svg:width="0.027cm" svg:height="0.027cm" svg:x="5.22cm" svg:y="5.167cm" svg:viewBox="0 0 28 28" draw:points="0,0 28,0 28,28 0,28">
          <text:p/>
        </draw:polygon>
        <draw:polygon draw:style-name="gr269" draw:text-style-name="P267" draw:layer="layout" svg:width="0.027cm" svg:height="0.027cm" svg:x="5.273cm" svg:y="5.167cm" svg:viewBox="0 0 28 28" draw:points="0,0 28,0 28,28 0,28">
          <text:p/>
        </draw:polygon>
        <draw:polygon draw:style-name="gr269" draw:text-style-name="P267" draw:layer="layout" svg:width="0.027cm" svg:height="0.027cm" svg:x="5.326cm" svg:y="5.167cm" svg:viewBox="0 0 28 28" draw:points="0,0 28,0 28,28 0,28">
          <text:p/>
        </draw:polygon>
        <draw:polygon draw:style-name="gr269" draw:text-style-name="P267" draw:layer="layout" svg:width="0.027cm" svg:height="0.027cm" svg:x="5.379cm" svg:y="5.167cm" svg:viewBox="0 0 28 28" draw:points="0,0 28,0 28,28 0,28">
          <text:p/>
        </draw:polygon>
        <draw:polygon draw:style-name="gr269" draw:text-style-name="P267" draw:layer="layout" svg:width="0.027cm" svg:height="0.027cm" svg:x="5.432cm" svg:y="5.167cm" svg:viewBox="0 0 28 28" draw:points="0,0 28,0 28,28 0,28">
          <text:p/>
        </draw:polygon>
        <draw:polygon draw:style-name="gr269" draw:text-style-name="P267" draw:layer="layout" svg:width="0.027cm" svg:height="0.027cm" svg:x="5.485cm" svg:y="5.167cm" svg:viewBox="0 0 28 28" draw:points="0,0 28,0 28,28 0,28">
          <text:p/>
        </draw:polygon>
        <draw:polygon draw:style-name="gr269" draw:text-style-name="P267" draw:layer="layout" svg:width="0.027cm" svg:height="0.027cm" svg:x="5.538cm" svg:y="5.167cm" svg:viewBox="0 0 28 28" draw:points="0,0 28,0 28,28 0,28">
          <text:p/>
        </draw:polygon>
        <draw:polygon draw:style-name="gr269" draw:text-style-name="P267" draw:layer="layout" svg:width="0.027cm" svg:height="0.027cm" svg:x="5.591cm" svg:y="5.167cm" svg:viewBox="0 0 28 28" draw:points="0,0 28,0 28,28 0,28">
          <text:p/>
        </draw:polygon>
        <draw:polygon draw:style-name="gr269" draw:text-style-name="P267" draw:layer="layout" svg:width="0.027cm" svg:height="0.027cm" svg:x="5.644cm" svg:y="5.167cm" svg:viewBox="0 0 28 28" draw:points="0,0 28,0 28,28 0,28">
          <text:p/>
        </draw:polygon>
        <draw:polygon draw:style-name="gr269" draw:text-style-name="P267" draw:layer="layout" svg:width="0.027cm" svg:height="0.027cm" svg:x="5.697cm" svg:y="5.167cm" svg:viewBox="0 0 28 28" draw:points="0,0 28,0 28,28 0,28">
          <text:p/>
        </draw:polygon>
        <draw:polygon draw:style-name="gr269" draw:text-style-name="P267" draw:layer="layout" svg:width="0.027cm" svg:height="0.027cm" svg:x="5.75cm" svg:y="5.167cm" svg:viewBox="0 0 28 28" draw:points="0,0 28,0 28,28 0,28">
          <text:p/>
        </draw:polygon>
        <draw:polygon draw:style-name="gr269" draw:text-style-name="P267" draw:layer="layout" svg:width="0.027cm" svg:height="0.027cm" svg:x="5.803cm" svg:y="5.167cm" svg:viewBox="0 0 28 28" draw:points="0,0 28,0 28,28 0,28">
          <text:p/>
        </draw:polygon>
        <draw:polygon draw:style-name="gr269" draw:text-style-name="P267" draw:layer="layout" svg:width="0.027cm" svg:height="0.027cm" svg:x="5.856cm" svg:y="5.167cm" svg:viewBox="0 0 28 28" draw:points="0,0 28,0 28,28 0,28">
          <text:p/>
        </draw:polygon>
        <draw:polygon draw:style-name="gr269" draw:text-style-name="P267" draw:layer="layout" svg:width="0.027cm" svg:height="0.027cm" svg:x="5.909cm" svg:y="5.167cm" svg:viewBox="0 0 28 28" draw:points="0,0 28,0 28,28 0,28">
          <text:p/>
        </draw:polygon>
        <draw:polygon draw:style-name="gr269" draw:text-style-name="P267" draw:layer="layout" svg:width="0.027cm" svg:height="0.027cm" svg:x="5.962cm" svg:y="5.167cm" svg:viewBox="0 0 28 28" draw:points="0,0 28,0 28,28 0,28">
          <text:p/>
        </draw:polygon>
        <draw:polygon draw:style-name="gr269" draw:text-style-name="P267" draw:layer="layout" svg:width="0.027cm" svg:height="0.027cm" svg:x="6.015cm" svg:y="5.167cm" svg:viewBox="0 0 28 28" draw:points="0,0 28,0 28,28 0,28">
          <text:p/>
        </draw:polygon>
        <draw:polygon draw:style-name="gr269" draw:text-style-name="P267" draw:layer="layout" svg:width="0.027cm" svg:height="0.027cm" svg:x="6.068cm" svg:y="5.167cm" svg:viewBox="0 0 28 28" draw:points="0,0 28,0 28,28 0,28">
          <text:p/>
        </draw:polygon>
        <draw:polygon draw:style-name="gr269" draw:text-style-name="P267" draw:layer="layout" svg:width="0.027cm" svg:height="0.027cm" svg:x="6.121cm" svg:y="5.167cm" svg:viewBox="0 0 28 28" draw:points="0,0 28,0 28,28 0,28">
          <text:p/>
        </draw:polygon>
        <draw:polygon draw:style-name="gr269" draw:text-style-name="P267" draw:layer="layout" svg:width="0.028cm" svg:height="0.027cm" svg:x="6.174cm" svg:y="5.167cm" svg:viewBox="0 0 29 28" draw:points="0,0 29,0 29,28 0,28">
          <text:p/>
        </draw:polygon>
        <draw:polygon draw:style-name="gr269" draw:text-style-name="P267" draw:layer="layout" svg:width="0.027cm" svg:height="0.027cm" svg:x="6.227cm" svg:y="5.167cm" svg:viewBox="0 0 28 28" draw:points="0,0 28,0 28,28 0,28">
          <text:p/>
        </draw:polygon>
        <draw:polygon draw:style-name="gr269" draw:text-style-name="P267" draw:layer="layout" svg:width="0.027cm" svg:height="0.027cm" svg:x="6.28cm" svg:y="5.167cm" svg:viewBox="0 0 28 28" draw:points="0,0 28,0 28,28 0,28">
          <text:p/>
        </draw:polygon>
        <draw:polygon draw:style-name="gr269" draw:text-style-name="P267" draw:layer="layout" svg:width="0.027cm" svg:height="0.027cm" svg:x="6.333cm" svg:y="5.167cm" svg:viewBox="0 0 28 28" draw:points="0,0 28,0 28,28 0,28">
          <text:p/>
        </draw:polygon>
        <draw:polygon draw:style-name="gr269" draw:text-style-name="P267" draw:layer="layout" svg:width="0.026cm" svg:height="0.027cm" svg:x="6.387cm" svg:y="5.167cm" svg:viewBox="0 0 27 28" draw:points="0,0 27,0 27,28 0,28">
          <text:p/>
        </draw:polygon>
        <draw:polygon draw:style-name="gr269" draw:text-style-name="P267" draw:layer="layout" svg:width="0.026cm" svg:height="0.027cm" svg:x="6.44cm" svg:y="5.167cm" svg:viewBox="0 0 27 28" draw:points="0,0 27,0 27,28 0,28">
          <text:p/>
        </draw:polygon>
        <draw:polygon draw:style-name="gr269" draw:text-style-name="P267" draw:layer="layout" svg:width="0.026cm" svg:height="0.027cm" svg:x="6.493cm" svg:y="5.167cm" svg:viewBox="0 0 27 28" draw:points="0,0 27,0 27,28 0,28">
          <text:p/>
        </draw:polygon>
        <draw:polygon draw:style-name="gr269" draw:text-style-name="P267" draw:layer="layout" svg:width="0.026cm" svg:height="0.027cm" svg:x="6.546cm" svg:y="5.167cm" svg:viewBox="0 0 27 28" draw:points="0,0 27,0 27,28 0,28">
          <text:p/>
        </draw:polygon>
        <draw:polygon draw:style-name="gr269" draw:text-style-name="P267" draw:layer="layout" svg:width="0.026cm" svg:height="0.027cm" svg:x="6.599cm" svg:y="5.167cm" svg:viewBox="0 0 27 28" draw:points="0,0 27,0 27,28 0,28">
          <text:p/>
        </draw:polygon>
        <draw:polygon draw:style-name="gr269" draw:text-style-name="P267" draw:layer="layout" svg:width="0.026cm" svg:height="0.027cm" svg:x="6.652cm" svg:y="5.167cm" svg:viewBox="0 0 27 28" draw:points="0,0 27,0 27,28 0,28">
          <text:p/>
        </draw:polygon>
        <draw:polygon draw:style-name="gr269" draw:text-style-name="P267" draw:layer="layout" svg:width="0.026cm" svg:height="0.027cm" svg:x="6.705cm" svg:y="5.167cm" svg:viewBox="0 0 27 28" draw:points="0,0 27,0 27,28 0,28">
          <text:p/>
        </draw:polygon>
        <draw:polygon draw:style-name="gr269" draw:text-style-name="P267" draw:layer="layout" svg:width="0.026cm" svg:height="0.027cm" svg:x="6.758cm" svg:y="5.167cm" svg:viewBox="0 0 27 28" draw:points="0,0 27,0 27,28 0,28">
          <text:p/>
        </draw:polygon>
        <draw:polygon draw:style-name="gr269" draw:text-style-name="P267" draw:layer="layout" svg:width="0.026cm" svg:height="0.027cm" svg:x="6.811cm" svg:y="5.167cm" svg:viewBox="0 0 27 28" draw:points="0,0 27,0 27,28 0,28">
          <text:p/>
        </draw:polygon>
        <draw:polygon draw:style-name="gr269" draw:text-style-name="P267" draw:layer="layout" svg:width="0.026cm" svg:height="0.027cm" svg:x="6.864cm" svg:y="5.167cm" svg:viewBox="0 0 27 28" draw:points="0,0 27,0 27,28 0,28">
          <text:p/>
        </draw:polygon>
        <draw:polygon draw:style-name="gr269" draw:text-style-name="P267" draw:layer="layout" svg:width="0.026cm" svg:height="0.027cm" svg:x="6.917cm" svg:y="5.167cm" svg:viewBox="0 0 27 28" draw:points="0,0 27,0 27,28 0,28">
          <text:p/>
        </draw:polygon>
        <draw:polygon draw:style-name="gr269" draw:text-style-name="P267" draw:layer="layout" svg:width="0.026cm" svg:height="0.027cm" svg:x="6.97cm" svg:y="5.167cm" svg:viewBox="0 0 27 28" draw:points="0,0 27,0 27,28 0,28">
          <text:p/>
        </draw:polygon>
        <draw:polygon draw:style-name="gr269" draw:text-style-name="P267" draw:layer="layout" svg:width="0.026cm" svg:height="0.027cm" svg:x="7.023cm" svg:y="5.167cm" svg:viewBox="0 0 27 28" draw:points="0,0 27,0 27,28 0,28">
          <text:p/>
        </draw:polygon>
        <draw:polygon draw:style-name="gr269" draw:text-style-name="P267" draw:layer="layout" svg:width="0.026cm" svg:height="0.027cm" svg:x="7.076cm" svg:y="5.167cm" svg:viewBox="0 0 27 28" draw:points="0,0 27,0 27,28 0,28">
          <text:p/>
        </draw:polygon>
        <draw:polygon draw:style-name="gr269" draw:text-style-name="P267" draw:layer="layout" svg:width="0.026cm" svg:height="0.027cm" svg:x="7.129cm" svg:y="5.167cm" svg:viewBox="0 0 27 28" draw:points="0,0 27,0 27,28 0,28">
          <text:p/>
        </draw:polygon>
        <draw:polygon draw:style-name="gr269" draw:text-style-name="P267" draw:layer="layout" svg:width="0.026cm" svg:height="0.027cm" svg:x="7.182cm" svg:y="5.167cm" svg:viewBox="0 0 27 28" draw:points="0,0 27,0 27,28 0,28">
          <text:p/>
        </draw:polygon>
        <draw:polygon draw:style-name="gr269" draw:text-style-name="P267" draw:layer="layout" svg:width="0.026cm" svg:height="0.027cm" svg:x="7.235cm" svg:y="5.167cm" svg:viewBox="0 0 27 28" draw:points="0,0 27,0 27,28 0,28">
          <text:p/>
        </draw:polygon>
        <draw:polygon draw:style-name="gr269" draw:text-style-name="P267" draw:layer="layout" svg:width="0.026cm" svg:height="0.027cm" svg:x="7.288cm" svg:y="5.167cm" svg:viewBox="0 0 27 28" draw:points="0,0 27,0 27,28 0,28">
          <text:p/>
        </draw:polygon>
        <draw:polygon draw:style-name="gr269" draw:text-style-name="P267" draw:layer="layout" svg:width="0.026cm" svg:height="0.027cm" svg:x="7.341cm" svg:y="5.167cm" svg:viewBox="0 0 27 28" draw:points="0,0 27,0 27,28 0,28">
          <text:p/>
        </draw:polygon>
        <draw:polygon draw:style-name="gr269" draw:text-style-name="P267" draw:layer="layout" svg:width="0.026cm" svg:height="0.027cm" svg:x="7.394cm" svg:y="5.167cm" svg:viewBox="0 0 27 28" draw:points="0,0 27,0 27,28 0,28">
          <text:p/>
        </draw:polygon>
        <draw:polygon draw:style-name="gr269" draw:text-style-name="P267" draw:layer="layout" svg:width="0.026cm" svg:height="0.027cm" svg:x="7.447cm" svg:y="5.167cm" svg:viewBox="0 0 27 28" draw:points="0,0 27,0 27,28 0,28">
          <text:p/>
        </draw:polygon>
        <draw:polygon draw:style-name="gr269" draw:text-style-name="P267" draw:layer="layout" svg:width="0.026cm" svg:height="0.027cm" svg:x="7.5cm" svg:y="5.167cm" svg:viewBox="0 0 27 28" draw:points="0,0 27,0 27,28 0,28">
          <text:p/>
        </draw:polygon>
        <draw:polygon draw:style-name="gr269" draw:text-style-name="P267" draw:layer="layout" svg:width="0.026cm" svg:height="0.027cm" svg:x="7.553cm" svg:y="5.167cm" svg:viewBox="0 0 27 28" draw:points="0,0 27,0 27,28 0,28">
          <text:p/>
        </draw:polygon>
        <draw:polygon draw:style-name="gr269" draw:text-style-name="P267" draw:layer="layout" svg:width="0.026cm" svg:height="0.027cm" svg:x="7.606cm" svg:y="5.167cm" svg:viewBox="0 0 27 28" draw:points="0,0 27,0 27,28 0,28">
          <text:p/>
        </draw:polygon>
        <draw:polygon draw:style-name="gr269" draw:text-style-name="P267" draw:layer="layout" svg:width="0.026cm" svg:height="0.027cm" svg:x="7.659cm" svg:y="5.167cm" svg:viewBox="0 0 27 28" draw:points="0,0 27,0 27,28 0,28">
          <text:p/>
        </draw:polygon>
        <draw:polygon draw:style-name="gr269" draw:text-style-name="P267" draw:layer="layout" svg:width="0.026cm" svg:height="0.027cm" svg:x="7.712cm" svg:y="5.167cm" svg:viewBox="0 0 27 28" draw:points="0,0 27,0 27,28 0,28">
          <text:p/>
        </draw:polygon>
        <draw:polygon draw:style-name="gr269" draw:text-style-name="P267" draw:layer="layout" svg:width="0.026cm" svg:height="0.027cm" svg:x="7.765cm" svg:y="5.167cm" svg:viewBox="0 0 27 28" draw:points="0,0 27,0 27,28 0,28">
          <text:p/>
        </draw:polygon>
        <draw:polygon draw:style-name="gr269" draw:text-style-name="P267" draw:layer="layout" svg:width="0.026cm" svg:height="0.027cm" svg:x="7.818cm" svg:y="5.167cm" svg:viewBox="0 0 27 28" draw:points="0,0 27,0 27,28 0,28">
          <text:p/>
        </draw:polygon>
        <draw:polygon draw:style-name="gr269" draw:text-style-name="P267" draw:layer="layout" svg:width="0.026cm" svg:height="0.027cm" svg:x="7.871cm" svg:y="5.167cm" svg:viewBox="0 0 27 28" draw:points="0,0 27,0 27,28 0,28">
          <text:p/>
        </draw:polygon>
        <draw:polygon draw:style-name="gr269" draw:text-style-name="P267" draw:layer="layout" svg:width="0.026cm" svg:height="0.027cm" svg:x="7.924cm" svg:y="5.167cm" svg:viewBox="0 0 27 28" draw:points="0,0 27,0 27,28 0,28">
          <text:p/>
        </draw:polygon>
        <draw:polygon draw:style-name="gr269" draw:text-style-name="P267" draw:layer="layout" svg:width="0.026cm" svg:height="0.027cm" svg:x="7.977cm" svg:y="5.167cm" svg:viewBox="0 0 27 28" draw:points="0,0 27,0 27,28 0,28">
          <text:p/>
        </draw:polygon>
        <draw:polygon draw:style-name="gr269" draw:text-style-name="P267" draw:layer="layout" svg:width="0.026cm" svg:height="0.027cm" svg:x="8.03cm" svg:y="5.167cm" svg:viewBox="0 0 27 28" draw:points="0,0 27,0 27,28 0,28">
          <text:p/>
        </draw:polygon>
        <draw:polygon draw:style-name="gr269" draw:text-style-name="P267" draw:layer="layout" svg:width="0.026cm" svg:height="0.027cm" svg:x="8.083cm" svg:y="5.167cm" svg:viewBox="0 0 27 28" draw:points="0,0 27,0 27,28 0,28">
          <text:p/>
        </draw:polygon>
        <draw:polygon draw:style-name="gr269" draw:text-style-name="P267" draw:layer="layout" svg:width="0.026cm" svg:height="0.027cm" svg:x="8.136cm" svg:y="5.167cm" svg:viewBox="0 0 27 28" draw:points="0,0 27,0 27,28 0,28">
          <text:p/>
        </draw:polygon>
        <draw:polygon draw:style-name="gr269" draw:text-style-name="P267" draw:layer="layout" svg:width="0.026cm" svg:height="0.027cm" svg:x="8.189cm" svg:y="5.167cm" svg:viewBox="0 0 27 28" draw:points="0,0 27,0 27,28 0,28">
          <text:p/>
        </draw:polygon>
        <draw:polygon draw:style-name="gr269" draw:text-style-name="P267" draw:layer="layout" svg:width="0.026cm" svg:height="0.027cm" svg:x="8.242cm" svg:y="5.167cm" svg:viewBox="0 0 27 28" draw:points="0,0 27,0 27,28 0,28">
          <text:p/>
        </draw:polygon>
        <draw:polygon draw:style-name="gr269" draw:text-style-name="P267" draw:layer="layout" svg:width="0.026cm" svg:height="0.027cm" svg:x="8.295cm" svg:y="5.167cm" svg:viewBox="0 0 27 28" draw:points="0,0 27,0 27,28 0,28">
          <text:p/>
        </draw:polygon>
        <draw:polygon draw:style-name="gr269" draw:text-style-name="P267" draw:layer="layout" svg:width="0.026cm" svg:height="0.027cm" svg:x="8.348cm" svg:y="5.167cm" svg:viewBox="0 0 27 28" draw:points="0,0 27,0 27,28 0,28">
          <text:p/>
        </draw:polygon>
        <draw:polygon draw:style-name="gr269" draw:text-style-name="P267" draw:layer="layout" svg:width="0.026cm" svg:height="0.027cm" svg:x="8.401cm" svg:y="5.167cm" svg:viewBox="0 0 27 28" draw:points="0,0 27,0 27,28 0,28">
          <text:p/>
        </draw:polygon>
        <draw:polygon draw:style-name="gr269" draw:text-style-name="P267" draw:layer="layout" svg:width="0.026cm" svg:height="0.027cm" svg:x="8.454cm" svg:y="5.167cm" svg:viewBox="0 0 27 28" draw:points="0,0 27,0 27,28 0,28">
          <text:p/>
        </draw:polygon>
        <draw:polygon draw:style-name="gr269" draw:text-style-name="P267" draw:layer="layout" svg:width="0.026cm" svg:height="0.027cm" svg:x="8.507cm" svg:y="5.167cm" svg:viewBox="0 0 27 28" draw:points="0,0 27,0 27,28 0,28">
          <text:p/>
        </draw:polygon>
        <draw:polygon draw:style-name="gr269" draw:text-style-name="P267" draw:layer="layout" svg:width="0.026cm" svg:height="0.027cm" svg:x="8.56cm" svg:y="5.167cm" svg:viewBox="0 0 27 28" draw:points="0,0 27,0 27,28 0,28">
          <text:p/>
        </draw:polygon>
        <draw:polygon draw:style-name="gr269" draw:text-style-name="P267" draw:layer="layout" svg:width="0.026cm" svg:height="0.027cm" svg:x="8.613cm" svg:y="5.167cm" svg:viewBox="0 0 27 28" draw:points="0,0 27,0 27,28 0,28">
          <text:p/>
        </draw:polygon>
        <draw:polygon draw:style-name="gr269" draw:text-style-name="P267" draw:layer="layout" svg:width="0.026cm" svg:height="0.027cm" svg:x="8.666cm" svg:y="5.167cm" svg:viewBox="0 0 27 28" draw:points="0,0 27,0 27,28 0,28">
          <text:p/>
        </draw:polygon>
        <draw:polygon draw:style-name="gr269" draw:text-style-name="P267" draw:layer="layout" svg:width="0.026cm" svg:height="0.027cm" svg:x="8.719cm" svg:y="5.167cm" svg:viewBox="0 0 27 28" draw:points="0,0 27,0 27,28 0,28">
          <text:p/>
        </draw:polygon>
        <draw:polygon draw:style-name="gr269" draw:text-style-name="P267" draw:layer="layout" svg:width="0.026cm" svg:height="0.027cm" svg:x="8.772cm" svg:y="5.167cm" svg:viewBox="0 0 27 28" draw:points="0,0 27,0 27,28 0,28">
          <text:p/>
        </draw:polygon>
        <draw:polygon draw:style-name="gr269" draw:text-style-name="P267" draw:layer="layout" svg:width="0.026cm" svg:height="0.027cm" svg:x="8.825cm" svg:y="5.167cm" svg:viewBox="0 0 27 28" draw:points="0,0 27,0 27,28 0,28">
          <text:p/>
        </draw:polygon>
        <draw:polygon draw:style-name="gr269" draw:text-style-name="P267" draw:layer="layout" svg:width="0.026cm" svg:height="0.027cm" svg:x="8.878cm" svg:y="5.167cm" svg:viewBox="0 0 27 28" draw:points="0,0 27,0 27,28 0,28">
          <text:p/>
        </draw:polygon>
        <draw:polygon draw:style-name="gr269" draw:text-style-name="P267" draw:layer="layout" svg:width="0.026cm" svg:height="0.027cm" svg:x="8.931cm" svg:y="5.167cm" svg:viewBox="0 0 27 28" draw:points="0,0 27,0 27,28 0,28">
          <text:p/>
        </draw:polygon>
        <draw:polygon draw:style-name="gr269" draw:text-style-name="P267" draw:layer="layout" svg:width="0.026cm" svg:height="0.027cm" svg:x="8.984cm" svg:y="5.167cm" svg:viewBox="0 0 27 28" draw:points="0,0 27,0 27,28 0,28">
          <text:p/>
        </draw:polygon>
        <draw:polygon draw:style-name="gr269" draw:text-style-name="P267" draw:layer="layout" svg:width="0.026cm" svg:height="0.027cm" svg:x="9.037cm" svg:y="5.167cm" svg:viewBox="0 0 27 28" draw:points="0,0 27,0 27,28 0,28">
          <text:p/>
        </draw:polygon>
        <draw:polygon draw:style-name="gr269" draw:text-style-name="P267" draw:layer="layout" svg:width="0.026cm" svg:height="0.027cm" svg:x="9.09cm" svg:y="5.167cm" svg:viewBox="0 0 27 28" draw:points="0,0 27,0 27,28 0,28">
          <text:p/>
        </draw:polygon>
        <draw:polygon draw:style-name="gr269" draw:text-style-name="P267" draw:layer="layout" svg:width="0.026cm" svg:height="0.027cm" svg:x="9.143cm" svg:y="5.167cm" svg:viewBox="0 0 27 28" draw:points="0,0 27,0 27,28 0,28">
          <text:p/>
        </draw:polygon>
        <draw:polygon draw:style-name="gr269" draw:text-style-name="P267" draw:layer="layout" svg:width="0.026cm" svg:height="0.027cm" svg:x="9.196cm" svg:y="5.167cm" svg:viewBox="0 0 27 28" draw:points="0,0 27,0 27,28 0,28">
          <text:p/>
        </draw:polygon>
        <draw:polygon draw:style-name="gr269" draw:text-style-name="P267" draw:layer="layout" svg:width="0.026cm" svg:height="0.027cm" svg:x="9.249cm" svg:y="5.167cm" svg:viewBox="0 0 27 28" draw:points="0,0 27,0 27,28 0,28">
          <text:p/>
        </draw:polygon>
        <draw:polygon draw:style-name="gr269" draw:text-style-name="P267" draw:layer="layout" svg:width="0.026cm" svg:height="0.027cm" svg:x="9.302cm" svg:y="5.167cm" svg:viewBox="0 0 27 28" draw:points="0,0 27,0 27,28 0,28">
          <text:p/>
        </draw:polygon>
        <draw:polygon draw:style-name="gr269" draw:text-style-name="P267" draw:layer="layout" svg:width="0.026cm" svg:height="0.027cm" svg:x="9.355cm" svg:y="5.167cm" svg:viewBox="0 0 27 28" draw:points="0,0 27,0 27,28 0,28">
          <text:p/>
        </draw:polygon>
        <draw:polygon draw:style-name="gr269" draw:text-style-name="P267" draw:layer="layout" svg:width="0.026cm" svg:height="0.027cm" svg:x="9.408cm" svg:y="5.167cm" svg:viewBox="0 0 27 28" draw:points="0,0 27,0 27,28 0,28">
          <text:p/>
        </draw:polygon>
        <draw:polygon draw:style-name="gr269" draw:text-style-name="P267" draw:layer="layout" svg:width="0.026cm" svg:height="0.027cm" svg:x="9.461cm" svg:y="5.167cm" svg:viewBox="0 0 27 28" draw:points="0,0 27,0 27,28 0,28">
          <text:p/>
        </draw:polygon>
        <draw:polygon draw:style-name="gr269" draw:text-style-name="P267" draw:layer="layout" svg:width="0.026cm" svg:height="0.027cm" svg:x="9.514cm" svg:y="5.167cm" svg:viewBox="0 0 27 28" draw:points="0,0 27,0 27,28 0,28">
          <text:p/>
        </draw:polygon>
        <draw:polygon draw:style-name="gr269" draw:text-style-name="P267" draw:layer="layout" svg:width="0.026cm" svg:height="0.027cm" svg:x="9.567cm" svg:y="5.167cm" svg:viewBox="0 0 27 28" draw:points="0,0 27,0 27,28 0,28">
          <text:p/>
        </draw:polygon>
        <draw:polygon draw:style-name="gr269" draw:text-style-name="P267" draw:layer="layout" svg:width="0.026cm" svg:height="0.027cm" svg:x="9.62cm" svg:y="5.167cm" svg:viewBox="0 0 27 28" draw:points="0,0 27,0 27,28 0,28">
          <text:p/>
        </draw:polygon>
        <draw:polygon draw:style-name="gr269" draw:text-style-name="P267" draw:layer="layout" svg:width="0.026cm" svg:height="0.027cm" svg:x="9.673cm" svg:y="5.167cm" svg:viewBox="0 0 27 28" draw:points="0,0 27,0 27,28 0,28">
          <text:p/>
        </draw:polygon>
        <draw:polygon draw:style-name="gr269" draw:text-style-name="P267" draw:layer="layout" svg:width="0.026cm" svg:height="0.027cm" svg:x="9.726cm" svg:y="5.167cm" svg:viewBox="0 0 27 28" draw:points="0,0 27,0 27,28 0,28">
          <text:p/>
        </draw:polygon>
        <draw:polygon draw:style-name="gr269" draw:text-style-name="P267" draw:layer="layout" svg:width="0.026cm" svg:height="0.027cm" svg:x="9.779cm" svg:y="5.167cm" svg:viewBox="0 0 27 28" draw:points="0,0 27,0 27,28 0,28">
          <text:p/>
        </draw:polygon>
        <draw:polygon draw:style-name="gr269" draw:text-style-name="P267" draw:layer="layout" svg:width="0.026cm" svg:height="0.027cm" svg:x="9.832cm" svg:y="5.167cm" svg:viewBox="0 0 27 28" draw:points="0,0 27,0 27,28 0,28">
          <text:p/>
        </draw:polygon>
        <draw:polygon draw:style-name="gr269" draw:text-style-name="P267" draw:layer="layout" svg:width="0.026cm" svg:height="0.027cm" svg:x="9.885cm" svg:y="5.167cm" svg:viewBox="0 0 27 28" draw:points="0,0 27,0 27,28 0,28">
          <text:p/>
        </draw:polygon>
        <draw:polygon draw:style-name="gr269" draw:text-style-name="P267" draw:layer="layout" svg:width="0.026cm" svg:height="0.027cm" svg:x="9.938cm" svg:y="5.167cm" svg:viewBox="0 0 27 28" draw:points="0,0 27,0 27,28 0,28">
          <text:p/>
        </draw:polygon>
        <draw:polygon draw:style-name="gr269" draw:text-style-name="P267" draw:layer="layout" svg:width="0.026cm" svg:height="0.027cm" svg:x="9.991cm" svg:y="5.167cm" svg:viewBox="0 0 27 28" draw:points="0,0 27,0 27,28 0,28">
          <text:p/>
        </draw:polygon>
        <draw:polygon draw:style-name="gr269" draw:text-style-name="P267" draw:layer="layout" svg:width="0.026cm" svg:height="0.027cm" svg:x="10.044cm" svg:y="5.167cm" svg:viewBox="0 0 27 28" draw:points="0,0 27,0 27,28 0,28">
          <text:p/>
        </draw:polygon>
        <draw:polygon draw:style-name="gr269" draw:text-style-name="P267" draw:layer="layout" svg:width="0.026cm" svg:height="0.027cm" svg:x="10.097cm" svg:y="5.167cm" svg:viewBox="0 0 27 28" draw:points="0,0 27,0 27,28 0,28">
          <text:p/>
        </draw:polygon>
        <draw:polygon draw:style-name="gr269" draw:text-style-name="P267" draw:layer="layout" svg:width="0.026cm" svg:height="0.027cm" svg:x="10.15cm" svg:y="5.167cm" svg:viewBox="0 0 27 28" draw:points="0,0 27,0 27,28 0,28">
          <text:p/>
        </draw:polygon>
        <draw:polygon draw:style-name="gr269" draw:text-style-name="P267" draw:layer="layout" svg:width="0.026cm" svg:height="0.027cm" svg:x="10.203cm" svg:y="5.167cm" svg:viewBox="0 0 27 28" draw:points="0,0 27,0 27,28 0,28">
          <text:p/>
        </draw:polygon>
        <draw:polygon draw:style-name="gr269" draw:text-style-name="P267" draw:layer="layout" svg:width="0.026cm" svg:height="0.027cm" svg:x="10.256cm" svg:y="5.167cm" svg:viewBox="0 0 27 28" draw:points="0,0 27,0 27,28 0,28">
          <text:p/>
        </draw:polygon>
        <draw:polygon draw:style-name="gr269" draw:text-style-name="P267" draw:layer="layout" svg:width="0.026cm" svg:height="0.027cm" svg:x="10.309cm" svg:y="5.167cm" svg:viewBox="0 0 27 28" draw:points="0,0 27,0 27,28 0,28">
          <text:p/>
        </draw:polygon>
        <draw:polygon draw:style-name="gr269" draw:text-style-name="P267" draw:layer="layout" svg:width="0.026cm" svg:height="0.027cm" svg:x="10.362cm" svg:y="5.167cm" svg:viewBox="0 0 27 28" draw:points="0,0 27,0 27,28 0,28">
          <text:p/>
        </draw:polygon>
        <draw:polygon draw:style-name="gr269" draw:text-style-name="P267" draw:layer="layout" svg:width="0.026cm" svg:height="0.027cm" svg:x="10.415cm" svg:y="5.167cm" svg:viewBox="0 0 27 28" draw:points="0,0 27,0 27,28 0,28">
          <text:p/>
        </draw:polygon>
        <draw:polygon draw:style-name="gr269" draw:text-style-name="P267" draw:layer="layout" svg:width="0.026cm" svg:height="0.027cm" svg:x="10.468cm" svg:y="5.167cm" svg:viewBox="0 0 27 28" draw:points="0,0 27,0 27,28 0,28">
          <text:p/>
        </draw:polygon>
        <draw:polygon draw:style-name="gr269" draw:text-style-name="P267" draw:layer="layout" svg:width="0.026cm" svg:height="0.027cm" svg:x="10.521cm" svg:y="5.167cm" svg:viewBox="0 0 27 28" draw:points="0,0 27,0 27,28 0,28">
          <text:p/>
        </draw:polygon>
        <draw:polygon draw:style-name="gr269" draw:text-style-name="P267" draw:layer="layout" svg:width="0.026cm" svg:height="0.027cm" svg:x="10.574cm" svg:y="5.167cm" svg:viewBox="0 0 27 28" draw:points="0,0 27,0 27,28 0,28">
          <text:p/>
        </draw:polygon>
        <draw:polygon draw:style-name="gr269" draw:text-style-name="P267" draw:layer="layout" svg:width="0.026cm" svg:height="0.027cm" svg:x="10.627cm" svg:y="5.167cm" svg:viewBox="0 0 27 28" draw:points="0,0 27,0 27,28 0,28">
          <text:p/>
        </draw:polygon>
        <draw:polygon draw:style-name="gr269" draw:text-style-name="P267" draw:layer="layout" svg:width="0.026cm" svg:height="0.027cm" svg:x="10.68cm" svg:y="5.167cm" svg:viewBox="0 0 27 28" draw:points="0,0 27,0 27,28 0,28">
          <text:p/>
        </draw:polygon>
        <draw:polygon draw:style-name="gr269" draw:text-style-name="P267" draw:layer="layout" svg:width="0.026cm" svg:height="0.027cm" svg:x="10.733cm" svg:y="5.167cm" svg:viewBox="0 0 27 28" draw:points="0,0 27,0 27,28 0,28">
          <text:p/>
        </draw:polygon>
        <draw:polygon draw:style-name="gr269" draw:text-style-name="P267" draw:layer="layout" svg:width="0.026cm" svg:height="0.027cm" svg:x="10.786cm" svg:y="5.167cm" svg:viewBox="0 0 27 28" draw:points="0,0 27,0 27,28 0,28">
          <text:p/>
        </draw:polygon>
        <draw:polygon draw:style-name="gr269" draw:text-style-name="P267" draw:layer="layout" svg:width="0.026cm" svg:height="0.027cm" svg:x="10.839cm" svg:y="5.167cm" svg:viewBox="0 0 27 28" draw:points="0,0 27,0 27,28 0,28">
          <text:p/>
        </draw:polygon>
        <draw:polygon draw:style-name="gr269" draw:text-style-name="P267" draw:layer="layout" svg:width="0.026cm" svg:height="0.027cm" svg:x="10.892cm" svg:y="5.167cm" svg:viewBox="0 0 27 28" draw:points="0,0 27,0 27,28 0,28">
          <text:p/>
        </draw:polygon>
        <draw:polygon draw:style-name="gr269" draw:text-style-name="P267" draw:layer="layout" svg:width="0.026cm" svg:height="0.027cm" svg:x="10.945cm" svg:y="5.167cm" svg:viewBox="0 0 27 28" draw:points="0,0 27,0 27,28 0,28">
          <text:p/>
        </draw:polygon>
        <draw:polygon draw:style-name="gr269" draw:text-style-name="P267" draw:layer="layout" svg:width="0.026cm" svg:height="0.027cm" svg:x="10.998cm" svg:y="5.167cm" svg:viewBox="0 0 27 28" draw:points="0,0 27,0 27,28 0,28">
          <text:p/>
        </draw:polygon>
        <draw:polygon draw:style-name="gr269" draw:text-style-name="P267" draw:layer="layout" svg:width="0.026cm" svg:height="0.027cm" svg:x="11.051cm" svg:y="5.167cm" svg:viewBox="0 0 27 28" draw:points="0,0 27,0 27,28 0,28">
          <text:p/>
        </draw:polygon>
        <draw:polygon draw:style-name="gr269" draw:text-style-name="P267" draw:layer="layout" svg:width="0.026cm" svg:height="0.027cm" svg:x="11.104cm" svg:y="5.167cm" svg:viewBox="0 0 27 28" draw:points="0,0 27,0 27,28 0,28">
          <text:p/>
        </draw:polygon>
        <draw:polygon draw:style-name="gr269" draw:text-style-name="P267" draw:layer="layout" svg:width="0.026cm" svg:height="0.027cm" svg:x="11.157cm" svg:y="5.167cm" svg:viewBox="0 0 27 28" draw:points="0,0 27,0 27,28 0,28">
          <text:p/>
        </draw:polygon>
        <draw:polygon draw:style-name="gr269" draw:text-style-name="P267" draw:layer="layout" svg:width="0.026cm" svg:height="0.027cm" svg:x="11.21cm" svg:y="5.167cm" svg:viewBox="0 0 27 28" draw:points="0,0 27,0 27,28 0,28">
          <text:p/>
        </draw:polygon>
        <draw:polygon draw:style-name="gr269" draw:text-style-name="P267" draw:layer="layout" svg:width="0.026cm" svg:height="0.027cm" svg:x="11.263cm" svg:y="5.167cm" svg:viewBox="0 0 27 28" draw:points="0,0 27,0 27,28 0,28">
          <text:p/>
        </draw:polygon>
        <draw:polygon draw:style-name="gr269" draw:text-style-name="P267" draw:layer="layout" svg:width="0.026cm" svg:height="0.027cm" svg:x="11.316cm" svg:y="5.167cm" svg:viewBox="0 0 27 28" draw:points="0,0 27,0 27,28 0,28">
          <text:p/>
        </draw:polygon>
        <draw:polygon draw:style-name="gr269" draw:text-style-name="P267" draw:layer="layout" svg:width="0.026cm" svg:height="0.027cm" svg:x="11.369cm" svg:y="5.167cm" svg:viewBox="0 0 27 28" draw:points="0,0 27,0 27,28 0,28">
          <text:p/>
        </draw:polygon>
        <draw:polygon draw:style-name="gr269" draw:text-style-name="P267" draw:layer="layout" svg:width="0.026cm" svg:height="0.027cm" svg:x="11.422cm" svg:y="5.167cm" svg:viewBox="0 0 27 28" draw:points="0,0 27,0 27,28 0,28">
          <text:p/>
        </draw:polygon>
        <draw:polygon draw:style-name="gr269" draw:text-style-name="P267" draw:layer="layout" svg:width="0.026cm" svg:height="0.027cm" svg:x="11.475cm" svg:y="5.167cm" svg:viewBox="0 0 27 28" draw:points="0,0 27,0 27,28 0,28">
          <text:p/>
        </draw:polygon>
        <draw:polygon draw:style-name="gr269" draw:text-style-name="P267" draw:layer="layout" svg:width="0.026cm" svg:height="0.027cm" svg:x="11.528cm" svg:y="5.167cm" svg:viewBox="0 0 27 28" draw:points="0,0 27,0 27,28 0,28">
          <text:p/>
        </draw:polygon>
        <draw:polygon draw:style-name="gr269" draw:text-style-name="P267" draw:layer="layout" svg:width="0.026cm" svg:height="0.027cm" svg:x="11.581cm" svg:y="5.167cm" svg:viewBox="0 0 27 28" draw:points="0,0 27,0 27,28 0,28">
          <text:p/>
        </draw:polygon>
        <draw:polygon draw:style-name="gr269" draw:text-style-name="P267" draw:layer="layout" svg:width="0.026cm" svg:height="0.027cm" svg:x="11.634cm" svg:y="5.167cm" svg:viewBox="0 0 27 28" draw:points="0,0 27,0 27,28 0,28">
          <text:p/>
        </draw:polygon>
        <draw:polygon draw:style-name="gr269" draw:text-style-name="P267" draw:layer="layout" svg:width="0.026cm" svg:height="0.027cm" svg:x="11.687cm" svg:y="5.167cm" svg:viewBox="0 0 27 28" draw:points="0,0 27,0 27,28 0,28">
          <text:p/>
        </draw:polygon>
        <draw:polygon draw:style-name="gr269" draw:text-style-name="P267" draw:layer="layout" svg:width="0.026cm" svg:height="0.027cm" svg:x="11.74cm" svg:y="5.167cm" svg:viewBox="0 0 27 28" draw:points="0,0 27,0 27,28 0,28">
          <text:p/>
        </draw:polygon>
        <draw:polygon draw:style-name="gr269" draw:text-style-name="P267" draw:layer="layout" svg:width="0.026cm" svg:height="0.027cm" svg:x="11.793cm" svg:y="5.167cm" svg:viewBox="0 0 27 28" draw:points="0,0 27,0 27,28 0,28">
          <text:p/>
        </draw:polygon>
        <draw:polygon draw:style-name="gr269" draw:text-style-name="P267" draw:layer="layout" svg:width="0.026cm" svg:height="0.027cm" svg:x="11.846cm" svg:y="5.167cm" svg:viewBox="0 0 27 28" draw:points="0,0 27,0 27,28 0,28">
          <text:p/>
        </draw:polygon>
        <draw:polygon draw:style-name="gr269" draw:text-style-name="P267" draw:layer="layout" svg:width="0.026cm" svg:height="0.027cm" svg:x="11.899cm" svg:y="5.167cm" svg:viewBox="0 0 27 28" draw:points="0,0 27,0 27,28 0,28">
          <text:p/>
        </draw:polygon>
        <draw:polygon draw:style-name="gr269" draw:text-style-name="P267" draw:layer="layout" svg:width="0.026cm" svg:height="0.027cm" svg:x="11.952cm" svg:y="5.167cm" svg:viewBox="0 0 27 28" draw:points="0,0 27,0 27,28 0,28">
          <text:p/>
        </draw:polygon>
        <draw:polygon draw:style-name="gr269" draw:text-style-name="P267" draw:layer="layout" svg:width="0.026cm" svg:height="0.027cm" svg:x="12.005cm" svg:y="5.167cm" svg:viewBox="0 0 27 28" draw:points="0,0 27,0 27,28 0,28">
          <text:p/>
        </draw:polygon>
        <draw:polygon draw:style-name="gr269" draw:text-style-name="P267" draw:layer="layout" svg:width="0.026cm" svg:height="0.027cm" svg:x="12.058cm" svg:y="5.167cm" svg:viewBox="0 0 27 28" draw:points="0,0 27,0 27,28 0,28">
          <text:p/>
        </draw:polygon>
        <draw:polygon draw:style-name="gr269" draw:text-style-name="P267" draw:layer="layout" svg:width="0.026cm" svg:height="0.027cm" svg:x="12.111cm" svg:y="5.167cm" svg:viewBox="0 0 27 28" draw:points="0,0 27,0 27,28 0,28">
          <text:p/>
        </draw:polygon>
        <draw:polygon draw:style-name="gr269" draw:text-style-name="P267" draw:layer="layout" svg:width="0.026cm" svg:height="0.027cm" svg:x="12.164cm" svg:y="5.167cm" svg:viewBox="0 0 27 28" draw:points="0,0 27,0 27,28 0,28">
          <text:p/>
        </draw:polygon>
        <draw:polygon draw:style-name="gr269" draw:text-style-name="P267" draw:layer="layout" svg:width="0.026cm" svg:height="0.027cm" svg:x="12.217cm" svg:y="5.167cm" svg:viewBox="0 0 27 28" draw:points="0,0 27,0 27,28 0,28">
          <text:p/>
        </draw:polygon>
        <draw:polygon draw:style-name="gr269" draw:text-style-name="P267" draw:layer="layout" svg:width="0.026cm" svg:height="0.027cm" svg:x="12.27cm" svg:y="5.167cm" svg:viewBox="0 0 27 28" draw:points="0,0 27,0 27,28 0,28">
          <text:p/>
        </draw:polygon>
        <draw:polygon draw:style-name="gr269" draw:text-style-name="P267" draw:layer="layout" svg:width="0.026cm" svg:height="0.027cm" svg:x="12.323cm" svg:y="5.167cm" svg:viewBox="0 0 27 28" draw:points="0,0 27,0 27,28 0,28">
          <text:p/>
        </draw:polygon>
        <draw:polygon draw:style-name="gr269" draw:text-style-name="P267" draw:layer="layout" svg:width="0.026cm" svg:height="0.027cm" svg:x="12.376cm" svg:y="5.167cm" svg:viewBox="0 0 27 28" draw:points="0,0 27,0 27,28 0,28">
          <text:p/>
        </draw:polygon>
        <draw:polygon draw:style-name="gr269" draw:text-style-name="P267" draw:layer="layout" svg:width="0.026cm" svg:height="0.027cm" svg:x="12.429cm" svg:y="5.167cm" svg:viewBox="0 0 27 28" draw:points="0,0 27,0 27,28 0,28">
          <text:p/>
        </draw:polygon>
        <draw:polygon draw:style-name="gr269" draw:text-style-name="P267" draw:layer="layout" svg:width="0.026cm" svg:height="0.027cm" svg:x="12.482cm" svg:y="5.167cm" svg:viewBox="0 0 27 28" draw:points="0,0 27,0 27,28 0,28">
          <text:p/>
        </draw:polygon>
        <draw:polygon draw:style-name="gr269" draw:text-style-name="P267" draw:layer="layout" svg:width="0.026cm" svg:height="0.027cm" svg:x="12.535cm" svg:y="5.167cm" svg:viewBox="0 0 27 28" draw:points="0,0 27,0 27,28 0,28">
          <text:p/>
        </draw:polygon>
        <draw:polygon draw:style-name="gr269" draw:text-style-name="P267" draw:layer="layout" svg:width="0.026cm" svg:height="0.027cm" svg:x="12.588cm" svg:y="5.167cm" svg:viewBox="0 0 27 28" draw:points="0,0 27,0 27,28 0,28">
          <text:p/>
        </draw:polygon>
        <draw:polygon draw:style-name="gr269" draw:text-style-name="P267" draw:layer="layout" svg:width="0.026cm" svg:height="0.027cm" svg:x="12.641cm" svg:y="5.167cm" svg:viewBox="0 0 27 28" draw:points="0,0 27,0 27,28 0,28">
          <text:p/>
        </draw:polygon>
        <draw:polygon draw:style-name="gr269" draw:text-style-name="P267" draw:layer="layout" svg:width="0.027cm" svg:height="0.027cm" svg:x="12.694cm" svg:y="5.167cm" svg:viewBox="0 0 28 28" draw:points="0,0 28,0 28,28 0,28">
          <text:p/>
        </draw:polygon>
        <draw:polygon draw:style-name="gr269" draw:text-style-name="P267" draw:layer="layout" svg:width="0.027cm" svg:height="0.027cm" svg:x="12.747cm" svg:y="5.167cm" svg:viewBox="0 0 28 28" draw:points="0,0 28,0 28,28 0,28">
          <text:p/>
        </draw:polygon>
        <draw:polygon draw:style-name="gr269" draw:text-style-name="P267" draw:layer="layout" svg:width="0.027cm" svg:height="0.027cm" svg:x="12.8cm" svg:y="5.167cm" svg:viewBox="0 0 28 28" draw:points="0,0 28,0 28,28 0,28">
          <text:p/>
        </draw:polygon>
        <draw:polygon draw:style-name="gr269" draw:text-style-name="P267" draw:layer="layout" svg:width="0.027cm" svg:height="0.027cm" svg:x="12.853cm" svg:y="5.167cm" svg:viewBox="0 0 28 28" draw:points="0,0 28,0 28,28 0,28">
          <text:p/>
        </draw:polygon>
        <draw:polygon draw:style-name="gr269" draw:text-style-name="P267" draw:layer="layout" svg:width="0.027cm" svg:height="0.027cm" svg:x="12.906cm" svg:y="5.167cm" svg:viewBox="0 0 28 28" draw:points="0,0 28,0 28,28 0,28">
          <text:p/>
        </draw:polygon>
        <draw:polygon draw:style-name="gr269" draw:text-style-name="P267" draw:layer="layout" svg:width="0.027cm" svg:height="0.027cm" svg:x="12.959cm" svg:y="5.167cm" svg:viewBox="0 0 28 28" draw:points="0,0 28,0 28,28 0,28">
          <text:p/>
        </draw:polygon>
        <draw:polygon draw:style-name="gr269" draw:text-style-name="P267" draw:layer="layout" svg:width="0.028cm" svg:height="0.027cm" svg:x="13.012cm" svg:y="5.167cm" svg:viewBox="0 0 29 28" draw:points="0,0 29,0 29,28 0,28">
          <text:p/>
        </draw:polygon>
        <draw:polygon draw:style-name="gr269" draw:text-style-name="P267" draw:layer="layout" svg:width="0.027cm" svg:height="0.027cm" svg:x="13.065cm" svg:y="5.167cm" svg:viewBox="0 0 28 28" draw:points="0,0 28,0 28,28 0,28">
          <text:p/>
        </draw:polygon>
        <draw:polygon draw:style-name="gr269" draw:text-style-name="P267" draw:layer="layout" svg:width="0.027cm" svg:height="0.027cm" svg:x="13.118cm" svg:y="5.167cm" svg:viewBox="0 0 28 28" draw:points="0,0 28,0 28,28 0,28">
          <text:p/>
        </draw:polygon>
        <draw:polygon draw:style-name="gr269" draw:text-style-name="P267" draw:layer="layout" svg:width="0.027cm" svg:height="0.027cm" svg:x="13.171cm" svg:y="5.167cm" svg:viewBox="0 0 28 28" draw:points="0,0 28,0 28,28 0,28">
          <text:p/>
        </draw:polygon>
        <draw:polygon draw:style-name="gr269" draw:text-style-name="P267" draw:layer="layout" svg:width="0.027cm" svg:height="0.027cm" svg:x="13.224cm" svg:y="5.167cm" svg:viewBox="0 0 28 28" draw:points="0,0 28,0 28,28 0,28">
          <text:p/>
        </draw:polygon>
        <draw:polygon draw:style-name="gr269" draw:text-style-name="P267" draw:layer="layout" svg:width="0.027cm" svg:height="0.027cm" svg:x="13.277cm" svg:y="5.167cm" svg:viewBox="0 0 28 28" draw:points="0,0 28,0 28,28 0,28">
          <text:p/>
        </draw:polygon>
        <draw:polygon draw:style-name="gr269" draw:text-style-name="P267" draw:layer="layout" svg:width="0.027cm" svg:height="0.027cm" svg:x="13.33cm" svg:y="5.167cm" svg:viewBox="0 0 28 28" draw:points="0,0 28,0 28,28 0,28">
          <text:p/>
        </draw:polygon>
        <draw:polygon draw:style-name="gr269" draw:text-style-name="P267" draw:layer="layout" svg:width="0.027cm" svg:height="0.027cm" svg:x="13.383cm" svg:y="5.167cm" svg:viewBox="0 0 28 28" draw:points="0,0 28,0 28,28 0,28">
          <text:p/>
        </draw:polygon>
        <draw:polygon draw:style-name="gr269" draw:text-style-name="P267" draw:layer="layout" svg:width="0.027cm" svg:height="0.027cm" svg:x="13.436cm" svg:y="5.167cm" svg:viewBox="0 0 28 28" draw:points="0,0 28,0 28,28 0,28">
          <text:p/>
        </draw:polygon>
        <draw:polygon draw:style-name="gr269" draw:text-style-name="P267" draw:layer="layout" svg:width="0.027cm" svg:height="0.027cm" svg:x="13.489cm" svg:y="5.167cm" svg:viewBox="0 0 28 28" draw:points="0,0 28,0 28,28 0,28">
          <text:p/>
        </draw:polygon>
        <draw:polygon draw:style-name="gr269" draw:text-style-name="P267" draw:layer="layout" svg:width="0.027cm" svg:height="0.027cm" svg:x="13.542cm" svg:y="5.167cm" svg:viewBox="0 0 28 28" draw:points="0,0 28,0 28,28 0,28">
          <text:p/>
        </draw:polygon>
        <draw:polygon draw:style-name="gr269" draw:text-style-name="P267" draw:layer="layout" svg:width="0.027cm" svg:height="0.027cm" svg:x="13.595cm" svg:y="5.167cm" svg:viewBox="0 0 28 28" draw:points="0,0 28,0 28,28 0,28">
          <text:p/>
        </draw:polygon>
        <draw:polygon draw:style-name="gr269" draw:text-style-name="P267" draw:layer="layout" svg:width="0.027cm" svg:height="0.027cm" svg:x="13.648cm" svg:y="5.167cm" svg:viewBox="0 0 28 28" draw:points="0,0 28,0 28,28 0,28">
          <text:p/>
        </draw:polygon>
        <draw:polygon draw:style-name="gr269" draw:text-style-name="P267" draw:layer="layout" svg:width="0.027cm" svg:height="0.027cm" svg:x="13.701cm" svg:y="5.167cm" svg:viewBox="0 0 28 28" draw:points="0,0 28,0 28,28 0,28">
          <text:p/>
        </draw:polygon>
        <draw:polygon draw:style-name="gr269" draw:text-style-name="P267" draw:layer="layout" svg:width="0.027cm" svg:height="0.027cm" svg:x="13.754cm" svg:y="5.167cm" svg:viewBox="0 0 28 28" draw:points="0,0 28,0 28,28 0,28">
          <text:p/>
        </draw:polygon>
        <draw:polygon draw:style-name="gr269" draw:text-style-name="P267" draw:layer="layout" svg:width="0.027cm" svg:height="0.027cm" svg:x="13.807cm" svg:y="5.167cm" svg:viewBox="0 0 28 28" draw:points="0,0 28,0 28,28 0,28">
          <text:p/>
        </draw:polygon>
        <draw:polygon draw:style-name="gr269" draw:text-style-name="P267" draw:layer="layout" svg:width="0.027cm" svg:height="0.027cm" svg:x="13.86cm" svg:y="5.167cm" svg:viewBox="0 0 28 28" draw:points="0,0 28,0 28,28 0,28">
          <text:p/>
        </draw:polygon>
        <draw:polygon draw:style-name="gr269" draw:text-style-name="P267" draw:layer="layout" svg:width="0.027cm" svg:height="0.027cm" svg:x="13.913cm" svg:y="5.167cm" svg:viewBox="0 0 28 28" draw:points="0,0 28,0 28,28 0,28">
          <text:p/>
        </draw:polygon>
        <draw:polygon draw:style-name="gr269" draw:text-style-name="P267" draw:layer="layout" svg:width="0.027cm" svg:height="0.027cm" svg:x="13.966cm" svg:y="5.167cm" svg:viewBox="0 0 28 28" draw:points="0,0 28,0 28,28 0,28">
          <text:p/>
        </draw:polygon>
        <draw:polygon draw:style-name="gr269" draw:text-style-name="P267" draw:layer="layout" svg:width="0.027cm" svg:height="0.027cm" svg:x="14.019cm" svg:y="5.167cm" svg:viewBox="0 0 28 28" draw:points="0,0 28,0 28,28 0,28">
          <text:p/>
        </draw:polygon>
        <draw:polygon draw:style-name="gr269" draw:text-style-name="P267" draw:layer="layout" svg:width="0.027cm" svg:height="0.027cm" svg:x="14.072cm" svg:y="5.167cm" svg:viewBox="0 0 28 28" draw:points="0,0 28,0 28,28 0,28">
          <text:p/>
        </draw:polygon>
        <draw:polygon draw:style-name="gr269" draw:text-style-name="P267" draw:layer="layout" svg:width="0.027cm" svg:height="0.027cm" svg:x="14.125cm" svg:y="5.167cm" svg:viewBox="0 0 28 28" draw:points="0,0 28,0 28,28 0,28">
          <text:p/>
        </draw:polygon>
        <draw:polygon draw:style-name="gr269" draw:text-style-name="P267" draw:layer="layout" svg:width="0.027cm" svg:height="0.027cm" svg:x="14.178cm" svg:y="5.167cm" svg:viewBox="0 0 28 28" draw:points="0,0 28,0 28,28 0,28">
          <text:p/>
        </draw:polygon>
        <draw:polygon draw:style-name="gr269" draw:text-style-name="P267" draw:layer="layout" svg:width="0.027cm" svg:height="0.027cm" svg:x="14.231cm" svg:y="5.167cm" svg:viewBox="0 0 28 28" draw:points="0,0 28,0 28,28 0,28">
          <text:p/>
        </draw:polygon>
        <draw:polygon draw:style-name="gr269" draw:text-style-name="P267" draw:layer="layout" svg:width="0.027cm" svg:height="0.027cm" svg:x="14.284cm" svg:y="5.167cm" svg:viewBox="0 0 28 28" draw:points="0,0 28,0 28,28 0,28">
          <text:p/>
        </draw:polygon>
        <draw:polygon draw:style-name="gr269" draw:text-style-name="P267" draw:layer="layout" svg:width="0.027cm" svg:height="0.027cm" svg:x="14.337cm" svg:y="5.167cm" svg:viewBox="0 0 28 28" draw:points="0,0 28,0 28,28 0,28">
          <text:p/>
        </draw:polygon>
        <draw:polygon draw:style-name="gr269" draw:text-style-name="P267" draw:layer="layout" svg:width="0.028cm" svg:height="0.027cm" svg:x="14.39cm" svg:y="5.167cm" svg:viewBox="0 0 29 28" draw:points="0,0 29,0 29,28 0,28">
          <text:p/>
        </draw:polygon>
        <draw:polygon draw:style-name="gr269" draw:text-style-name="P267" draw:layer="layout" svg:width="0.027cm" svg:height="0.027cm" svg:x="14.443cm" svg:y="5.167cm" svg:viewBox="0 0 28 28" draw:points="0,0 28,0 28,28 0,28">
          <text:p/>
        </draw:polygon>
        <draw:polygon draw:style-name="gr269" draw:text-style-name="P267" draw:layer="layout" svg:width="0.027cm" svg:height="0.027cm" svg:x="14.496cm" svg:y="5.167cm" svg:viewBox="0 0 28 28" draw:points="0,0 28,0 28,28 0,28">
          <text:p/>
        </draw:polygon>
        <draw:polygon draw:style-name="gr269" draw:text-style-name="P267" draw:layer="layout" svg:width="0.027cm" svg:height="0.027cm" svg:x="14.549cm" svg:y="5.167cm" svg:viewBox="0 0 28 28" draw:points="0,0 28,0 28,28 0,28">
          <text:p/>
        </draw:polygon>
        <draw:polygon draw:style-name="gr269" draw:text-style-name="P267" draw:layer="layout" svg:width="0.027cm" svg:height="0.027cm" svg:x="14.602cm" svg:y="5.167cm" svg:viewBox="0 0 28 28" draw:points="0,0 28,0 28,28 0,28">
          <text:p/>
        </draw:polygon>
        <draw:polygon draw:style-name="gr269" draw:text-style-name="P267" draw:layer="layout" svg:width="0.027cm" svg:height="0.027cm" svg:x="14.655cm" svg:y="5.167cm" svg:viewBox="0 0 28 28" draw:points="0,0 28,0 28,28 0,28">
          <text:p/>
        </draw:polygon>
        <draw:polygon draw:style-name="gr269" draw:text-style-name="P267" draw:layer="layout" svg:width="0.027cm" svg:height="0.027cm" svg:x="14.708cm" svg:y="5.167cm" svg:viewBox="0 0 28 28" draw:points="0,0 28,0 28,28 0,28">
          <text:p/>
        </draw:polygon>
        <draw:polygon draw:style-name="gr269" draw:text-style-name="P267" draw:layer="layout" svg:width="0.027cm" svg:height="0.027cm" svg:x="14.761cm" svg:y="5.167cm" svg:viewBox="0 0 28 28" draw:points="0,0 28,0 28,28 0,28">
          <text:p/>
        </draw:polygon>
        <draw:polygon draw:style-name="gr269" draw:text-style-name="P267" draw:layer="layout" svg:width="0.027cm" svg:height="0.027cm" svg:x="14.814cm" svg:y="5.167cm" svg:viewBox="0 0 28 28" draw:points="0,0 28,0 28,28 0,28">
          <text:p/>
        </draw:polygon>
        <draw:polygon draw:style-name="gr269" draw:text-style-name="P267" draw:layer="layout" svg:width="0.027cm" svg:height="0.027cm" svg:x="14.867cm" svg:y="5.167cm" svg:viewBox="0 0 28 28" draw:points="0,0 28,0 28,28 0,28">
          <text:p/>
        </draw:polygon>
        <draw:polygon draw:style-name="gr269" draw:text-style-name="P267" draw:layer="layout" svg:width="0.027cm" svg:height="0.027cm" svg:x="14.92cm" svg:y="5.167cm" svg:viewBox="0 0 28 28" draw:points="0,0 28,0 28,28 0,28">
          <text:p/>
        </draw:polygon>
        <draw:polygon draw:style-name="gr269" draw:text-style-name="P267" draw:layer="layout" svg:width="0.027cm" svg:height="0.027cm" svg:x="14.973cm" svg:y="5.167cm" svg:viewBox="0 0 28 28" draw:points="0,0 28,0 28,28 0,28">
          <text:p/>
        </draw:polygon>
        <draw:polygon draw:style-name="gr269" draw:text-style-name="P267" draw:layer="layout" svg:width="0.027cm" svg:height="0.027cm" svg:x="15.026cm" svg:y="5.167cm" svg:viewBox="0 0 28 28" draw:points="0,0 28,0 28,28 0,28">
          <text:p/>
        </draw:polygon>
        <draw:polygon draw:style-name="gr269" draw:text-style-name="P267" draw:layer="layout" svg:width="0.027cm" svg:height="0.027cm" svg:x="15.079cm" svg:y="5.167cm" svg:viewBox="0 0 28 28" draw:points="0,0 28,0 28,28 0,28">
          <text:p/>
        </draw:polygon>
        <draw:polygon draw:style-name="gr269" draw:text-style-name="P267" draw:layer="layout" svg:width="0.027cm" svg:height="0.027cm" svg:x="15.132cm" svg:y="5.167cm" svg:viewBox="0 0 28 28" draw:points="0,0 28,0 28,28 0,28">
          <text:p/>
        </draw:polygon>
        <draw:polygon draw:style-name="gr269" draw:text-style-name="P267" draw:layer="layout" svg:width="0.027cm" svg:height="0.027cm" svg:x="15.185cm" svg:y="5.167cm" svg:viewBox="0 0 28 28" draw:points="0,0 28,0 28,28 0,28">
          <text:p/>
        </draw:polygon>
        <draw:polygon draw:style-name="gr269" draw:text-style-name="P267" draw:layer="layout" svg:width="0.027cm" svg:height="0.027cm" svg:x="15.238cm" svg:y="5.167cm" svg:viewBox="0 0 28 28" draw:points="0,0 28,0 28,28 0,28">
          <text:p/>
        </draw:polygon>
        <draw:polygon draw:style-name="gr269" draw:text-style-name="P267" draw:layer="layout" svg:width="0.027cm" svg:height="0.027cm" svg:x="15.291cm" svg:y="5.167cm" svg:viewBox="0 0 28 28" draw:points="0,0 28,0 28,28 0,28">
          <text:p/>
        </draw:polygon>
        <draw:polygon draw:style-name="gr269" draw:text-style-name="P267" draw:layer="layout" svg:width="0.027cm" svg:height="0.027cm" svg:x="15.344cm" svg:y="5.167cm" svg:viewBox="0 0 28 28" draw:points="0,0 28,0 28,28 0,28">
          <text:p/>
        </draw:polygon>
        <draw:polygon draw:style-name="gr269" draw:text-style-name="P267" draw:layer="layout" svg:width="0.027cm" svg:height="0.027cm" svg:x="15.397cm" svg:y="5.167cm" svg:viewBox="0 0 28 28" draw:points="0,0 28,0 28,28 0,28">
          <text:p/>
        </draw:polygon>
        <draw:polygon draw:style-name="gr269" draw:text-style-name="P267" draw:layer="layout" svg:width="0.027cm" svg:height="0.027cm" svg:x="15.45cm" svg:y="5.167cm" svg:viewBox="0 0 28 28" draw:points="0,0 28,0 28,28 0,28">
          <text:p/>
        </draw:polygon>
        <draw:polygon draw:style-name="gr269" draw:text-style-name="P267" draw:layer="layout" svg:width="0.027cm" svg:height="0.027cm" svg:x="15.503cm" svg:y="5.167cm" svg:viewBox="0 0 28 28" draw:points="0,0 28,0 28,28 0,28">
          <text:p/>
        </draw:polygon>
        <draw:polygon draw:style-name="gr269" draw:text-style-name="P267" draw:layer="layout" svg:width="0.027cm" svg:height="0.027cm" svg:x="15.556cm" svg:y="5.167cm" svg:viewBox="0 0 28 28" draw:points="0,0 28,0 28,28 0,28">
          <text:p/>
        </draw:polygon>
        <draw:polygon draw:style-name="gr269" draw:text-style-name="P267" draw:layer="layout" svg:width="0.027cm" svg:height="0.027cm" svg:x="15.609cm" svg:y="5.167cm" svg:viewBox="0 0 28 28" draw:points="0,0 28,0 28,28 0,28">
          <text:p/>
        </draw:polygon>
        <draw:polygon draw:style-name="gr269" draw:text-style-name="P267" draw:layer="layout" svg:width="0.027cm" svg:height="0.027cm" svg:x="15.662cm" svg:y="5.167cm" svg:viewBox="0 0 28 28" draw:points="0,0 28,0 28,28 0,28">
          <text:p/>
        </draw:polygon>
        <draw:polygon draw:style-name="gr269" draw:text-style-name="P267" draw:layer="layout" svg:width="0.027cm" svg:height="0.027cm" svg:x="15.715cm" svg:y="5.167cm" svg:viewBox="0 0 28 28" draw:points="0,0 28,0 28,28 0,28">
          <text:p/>
        </draw:polygon>
        <draw:polygon draw:style-name="gr269" draw:text-style-name="P267" draw:layer="layout" svg:width="0.028cm" svg:height="0.027cm" svg:x="15.768cm" svg:y="5.167cm" svg:viewBox="0 0 29 28" draw:points="0,0 29,0 29,28 0,28">
          <text:p/>
        </draw:polygon>
        <draw:polygon draw:style-name="gr269" draw:text-style-name="P267" draw:layer="layout" svg:width="0.027cm" svg:height="0.027cm" svg:x="15.821cm" svg:y="5.167cm" svg:viewBox="0 0 28 28" draw:points="0,0 28,0 28,28 0,28">
          <text:p/>
        </draw:polygon>
        <draw:polygon draw:style-name="gr269" draw:text-style-name="P267" draw:layer="layout" svg:width="0.027cm" svg:height="0.027cm" svg:x="15.874cm" svg:y="5.167cm" svg:viewBox="0 0 28 28" draw:points="0,0 28,0 28,28 0,28">
          <text:p/>
        </draw:polygon>
        <draw:polygon draw:style-name="gr269" draw:text-style-name="P267" draw:layer="layout" svg:width="0.027cm" svg:height="0.027cm" svg:x="15.927cm" svg:y="5.167cm" svg:viewBox="0 0 28 28" draw:points="0,0 28,0 28,28 0,28">
          <text:p/>
        </draw:polygon>
        <draw:polygon draw:style-name="gr269" draw:text-style-name="P267" draw:layer="layout" svg:width="0.027cm" svg:height="0.027cm" svg:x="15.98cm" svg:y="5.167cm" svg:viewBox="0 0 28 28" draw:points="0,0 28,0 28,28 0,28">
          <text:p/>
        </draw:polygon>
        <draw:polygon draw:style-name="gr269" draw:text-style-name="P267" draw:layer="layout" svg:width="0.027cm" svg:height="0.027cm" svg:x="16.033cm" svg:y="5.167cm" svg:viewBox="0 0 28 28" draw:points="0,0 28,0 28,28 0,28">
          <text:p/>
        </draw:polygon>
        <draw:polygon draw:style-name="gr269" draw:text-style-name="P267" draw:layer="layout" svg:width="0.027cm" svg:height="0.027cm" svg:x="16.086cm" svg:y="5.167cm" svg:viewBox="0 0 28 28" draw:points="0,0 28,0 28,28 0,28">
          <text:p/>
        </draw:polygon>
        <draw:polygon draw:style-name="gr269" draw:text-style-name="P267" draw:layer="layout" svg:width="0.027cm" svg:height="0.027cm" svg:x="16.139cm" svg:y="5.167cm" svg:viewBox="0 0 28 28" draw:points="0,0 28,0 28,28 0,28">
          <text:p/>
        </draw:polygon>
        <draw:polygon draw:style-name="gr269" draw:text-style-name="P267" draw:layer="layout" svg:width="0.027cm" svg:height="0.027cm" svg:x="16.192cm" svg:y="5.167cm" svg:viewBox="0 0 28 28" draw:points="0,0 28,0 28,28 0,28">
          <text:p/>
        </draw:polygon>
        <draw:polygon draw:style-name="gr269" draw:text-style-name="P267" draw:layer="layout" svg:width="0.027cm" svg:height="0.027cm" svg:x="16.245cm" svg:y="5.167cm" svg:viewBox="0 0 28 28" draw:points="0,0 28,0 28,28 0,28">
          <text:p/>
        </draw:polygon>
        <draw:polygon draw:style-name="gr269" draw:text-style-name="P267" draw:layer="layout" svg:width="0.027cm" svg:height="0.027cm" svg:x="16.298cm" svg:y="5.167cm" svg:viewBox="0 0 28 28" draw:points="0,0 28,0 28,28 0,28">
          <text:p/>
        </draw:polygon>
        <draw:polygon draw:style-name="gr269" draw:text-style-name="P267" draw:layer="layout" svg:width="0.027cm" svg:height="0.027cm" svg:x="16.351cm" svg:y="5.167cm" svg:viewBox="0 0 28 28" draw:points="0,0 28,0 28,28 0,28">
          <text:p/>
        </draw:polygon>
        <draw:polygon draw:style-name="gr269" draw:text-style-name="P267" draw:layer="layout" svg:width="0.027cm" svg:height="0.027cm" svg:x="16.404cm" svg:y="5.167cm" svg:viewBox="0 0 28 28" draw:points="0,0 28,0 28,28 0,28">
          <text:p/>
        </draw:polygon>
        <draw:polygon draw:style-name="gr269" draw:text-style-name="P267" draw:layer="layout" svg:width="0.027cm" svg:height="0.027cm" svg:x="16.457cm" svg:y="5.167cm" svg:viewBox="0 0 28 28" draw:points="0,0 28,0 28,28 0,28">
          <text:p/>
        </draw:polygon>
        <draw:polygon draw:style-name="gr269" draw:text-style-name="P267" draw:layer="layout" svg:width="0.027cm" svg:height="0.027cm" svg:x="16.51cm" svg:y="5.167cm" svg:viewBox="0 0 28 28" draw:points="0,0 28,0 28,28 0,28">
          <text:p/>
        </draw:polygon>
        <draw:polygon draw:style-name="gr269" draw:text-style-name="P267" draw:layer="layout" svg:width="0.027cm" svg:height="0.027cm" svg:x="16.563cm" svg:y="5.167cm" svg:viewBox="0 0 28 28" draw:points="0,0 28,0 28,28 0,28">
          <text:p/>
        </draw:polygon>
        <draw:polygon draw:style-name="gr269" draw:text-style-name="P267" draw:layer="layout" svg:width="0.027cm" svg:height="0.027cm" svg:x="16.616cm" svg:y="5.167cm" svg:viewBox="0 0 28 28" draw:points="0,0 28,0 28,28 0,28">
          <text:p/>
        </draw:polygon>
        <draw:polygon draw:style-name="gr269" draw:text-style-name="P267" draw:layer="layout" svg:width="0.027cm" svg:height="0.027cm" svg:x="16.669cm" svg:y="5.167cm" svg:viewBox="0 0 28 28" draw:points="0,0 28,0 28,28 0,28">
          <text:p/>
        </draw:polygon>
        <draw:polygon draw:style-name="gr269" draw:text-style-name="P267" draw:layer="layout" svg:width="0.027cm" svg:height="0.027cm" svg:x="16.722cm" svg:y="5.167cm" svg:viewBox="0 0 28 28" draw:points="0,0 28,0 28,28 0,28">
          <text:p/>
        </draw:polygon>
        <draw:polygon draw:style-name="gr269" draw:text-style-name="P267" draw:layer="layout" svg:width="0.027cm" svg:height="0.027cm" svg:x="16.775cm" svg:y="5.167cm" svg:viewBox="0 0 28 28" draw:points="0,0 28,0 28,28 0,28">
          <text:p/>
        </draw:polygon>
        <draw:polygon draw:style-name="gr269" draw:text-style-name="P267" draw:layer="layout" svg:width="0.027cm" svg:height="0.027cm" svg:x="16.828cm" svg:y="5.167cm" svg:viewBox="0 0 28 28" draw:points="0,0 28,0 28,28 0,28">
          <text:p/>
        </draw:polygon>
        <draw:polygon draw:style-name="gr269" draw:text-style-name="P267" draw:layer="layout" svg:width="0.027cm" svg:height="0.027cm" svg:x="16.881cm" svg:y="5.167cm" svg:viewBox="0 0 28 28" draw:points="0,0 28,0 28,28 0,28">
          <text:p/>
        </draw:polygon>
        <draw:polygon draw:style-name="gr269" draw:text-style-name="P267" draw:layer="layout" svg:width="0.027cm" svg:height="0.027cm" svg:x="16.934cm" svg:y="5.167cm" svg:viewBox="0 0 28 28" draw:points="0,0 28,0 28,28 0,28">
          <text:p/>
        </draw:polygon>
        <draw:polygon draw:style-name="gr269" draw:text-style-name="P267" draw:layer="layout" svg:width="0.027cm" svg:height="0.027cm" svg:x="16.987cm" svg:y="5.167cm" svg:viewBox="0 0 28 28" draw:points="0,0 28,0 28,28 0,28">
          <text:p/>
        </draw:polygon>
        <draw:polygon draw:style-name="gr269" draw:text-style-name="P267" draw:layer="layout" svg:width="0.027cm" svg:height="0.027cm" svg:x="17.04cm" svg:y="5.167cm" svg:viewBox="0 0 28 28" draw:points="0,0 28,0 28,28 0,28">
          <text:p/>
        </draw:polygon>
        <draw:polygon draw:style-name="gr269" draw:text-style-name="P267" draw:layer="layout" svg:width="0.027cm" svg:height="0.027cm" svg:x="17.093cm" svg:y="5.167cm" svg:viewBox="0 0 28 28" draw:points="0,0 28,0 28,28 0,28">
          <text:p/>
        </draw:polygon>
        <draw:polygon draw:style-name="gr269" draw:text-style-name="P267" draw:layer="layout" svg:width="0.028cm" svg:height="0.027cm" svg:x="17.146cm" svg:y="5.167cm" svg:viewBox="0 0 29 28" draw:points="0,0 29,0 29,28 0,28">
          <text:p/>
        </draw:polygon>
        <draw:polygon draw:style-name="gr269" draw:text-style-name="P267" draw:layer="layout" svg:width="0.027cm" svg:height="0.027cm" svg:x="17.199cm" svg:y="5.167cm" svg:viewBox="0 0 28 28" draw:points="0,0 28,0 28,28 0,28">
          <text:p/>
        </draw:polygon>
        <draw:polygon draw:style-name="gr269" draw:text-style-name="P267" draw:layer="layout" svg:width="0.027cm" svg:height="0.027cm" svg:x="17.252cm" svg:y="5.167cm" svg:viewBox="0 0 28 28" draw:points="0,0 28,0 28,28 0,28">
          <text:p/>
        </draw:polygon>
        <draw:polygon draw:style-name="gr269" draw:text-style-name="P267" draw:layer="layout" svg:width="0.027cm" svg:height="0.027cm" svg:x="17.305cm" svg:y="5.167cm" svg:viewBox="0 0 28 28" draw:points="0,0 28,0 28,28 0,28">
          <text:p/>
        </draw:polygon>
        <draw:polygon draw:style-name="gr269" draw:text-style-name="P267" draw:layer="layout" svg:width="0.027cm" svg:height="0.027cm" svg:x="17.358cm" svg:y="5.167cm" svg:viewBox="0 0 28 28" draw:points="0,0 28,0 28,28 0,28">
          <text:p/>
        </draw:polygon>
        <draw:polygon draw:style-name="gr269" draw:text-style-name="P267" draw:layer="layout" svg:width="0.027cm" svg:height="0.027cm" svg:x="17.411cm" svg:y="5.167cm" svg:viewBox="0 0 28 28" draw:points="0,0 28,0 28,28 0,28">
          <text:p/>
        </draw:polygon>
        <draw:polygon draw:style-name="gr269" draw:text-style-name="P267" draw:layer="layout" svg:width="0.027cm" svg:height="0.027cm" svg:x="17.464cm" svg:y="5.167cm" svg:viewBox="0 0 28 28" draw:points="0,0 28,0 28,28 0,28">
          <text:p/>
        </draw:polygon>
        <draw:polygon draw:style-name="gr269" draw:text-style-name="P267" draw:layer="layout" svg:width="0.027cm" svg:height="0.027cm" svg:x="17.517cm" svg:y="5.167cm" svg:viewBox="0 0 28 28" draw:points="0,0 28,0 28,28 0,28">
          <text:p/>
        </draw:polygon>
        <draw:polygon draw:style-name="gr269" draw:text-style-name="P267" draw:layer="layout" svg:width="0.027cm" svg:height="0.027cm" svg:x="17.57cm" svg:y="5.167cm" svg:viewBox="0 0 28 28" draw:points="0,0 28,0 28,28 0,28">
          <text:p/>
        </draw:polygon>
        <draw:polygon draw:style-name="gr269" draw:text-style-name="P267" draw:layer="layout" svg:width="0.027cm" svg:height="0.027cm" svg:x="17.623cm" svg:y="5.167cm" svg:viewBox="0 0 28 28" draw:points="0,0 28,0 28,28 0,28">
          <text:p/>
        </draw:polygon>
        <draw:polygon draw:style-name="gr269" draw:text-style-name="P267" draw:layer="layout" svg:width="0.027cm" svg:height="0.027cm" svg:x="17.676cm" svg:y="5.167cm" svg:viewBox="0 0 28 28" draw:points="0,0 28,0 28,28 0,28">
          <text:p/>
        </draw:polygon>
        <draw:polygon draw:style-name="gr269" draw:text-style-name="P267" draw:layer="layout" svg:width="0.027cm" svg:height="0.027cm" svg:x="17.729cm" svg:y="5.167cm" svg:viewBox="0 0 28 28" draw:points="0,0 28,0 28,28 0,28">
          <text:p/>
        </draw:polygon>
        <draw:polygon draw:style-name="gr269" draw:text-style-name="P267" draw:layer="layout" svg:width="0.027cm" svg:height="0.027cm" svg:x="17.782cm" svg:y="5.167cm" svg:viewBox="0 0 28 28" draw:points="0,0 28,0 28,28 0,28">
          <text:p/>
        </draw:polygon>
        <draw:polygon draw:style-name="gr269" draw:text-style-name="P267" draw:layer="layout" svg:width="0.027cm" svg:height="0.027cm" svg:x="17.835cm" svg:y="5.167cm" svg:viewBox="0 0 28 28" draw:points="0,0 28,0 28,28 0,28">
          <text:p/>
        </draw:polygon>
        <draw:polygon draw:style-name="gr269" draw:text-style-name="P267" draw:layer="layout" svg:width="0.027cm" svg:height="0.027cm" svg:x="17.888cm" svg:y="5.167cm" svg:viewBox="0 0 28 28" draw:points="0,0 28,0 28,28 0,28">
          <text:p/>
        </draw:polygon>
        <draw:polygon draw:style-name="gr269" draw:text-style-name="P267" draw:layer="layout" svg:width="0.027cm" svg:height="0.027cm" svg:x="17.941cm" svg:y="5.167cm" svg:viewBox="0 0 28 28" draw:points="0,0 28,0 28,28 0,28">
          <text:p/>
        </draw:polygon>
        <draw:polygon draw:style-name="gr269" draw:text-style-name="P267" draw:layer="layout" svg:width="0.027cm" svg:height="0.027cm" svg:x="17.994cm" svg:y="5.167cm" svg:viewBox="0 0 28 28" draw:points="0,0 28,0 28,28 0,28">
          <text:p/>
        </draw:polygon>
        <draw:polygon draw:style-name="gr269" draw:text-style-name="P267" draw:layer="layout" svg:width="0.027cm" svg:height="0.027cm" svg:x="18.047cm" svg:y="5.167cm" svg:viewBox="0 0 28 28" draw:points="0,0 28,0 28,28 0,28">
          <text:p/>
        </draw:polygon>
        <draw:polygon draw:style-name="gr269" draw:text-style-name="P267" draw:layer="layout" svg:width="0.027cm" svg:height="0.027cm" svg:x="18.1cm" svg:y="5.167cm" svg:viewBox="0 0 28 28" draw:points="0,0 28,0 28,28 0,28">
          <text:p/>
        </draw:polygon>
        <draw:polygon draw:style-name="gr269" draw:text-style-name="P267" draw:layer="layout" svg:width="0.027cm" svg:height="0.027cm" svg:x="18.153cm" svg:y="5.167cm" svg:viewBox="0 0 28 28" draw:points="0,0 28,0 28,28 0,28">
          <text:p/>
        </draw:polygon>
        <draw:polygon draw:style-name="gr269" draw:text-style-name="P267" draw:layer="layout" svg:width="0.027cm" svg:height="0.027cm" svg:x="18.206cm" svg:y="5.167cm" svg:viewBox="0 0 28 28" draw:points="0,0 28,0 28,28 0,28">
          <text:p/>
        </draw:polygon>
        <draw:polygon draw:style-name="gr269" draw:text-style-name="P267" draw:layer="layout" svg:width="0.027cm" svg:height="0.027cm" svg:x="18.259cm" svg:y="5.167cm" svg:viewBox="0 0 28 28" draw:points="0,0 28,0 28,28 0,28">
          <text:p/>
        </draw:polygon>
        <draw:polygon draw:style-name="gr269" draw:text-style-name="P267" draw:layer="layout" svg:width="0.027cm" svg:height="0.027cm" svg:x="18.312cm" svg:y="5.167cm" svg:viewBox="0 0 28 28" draw:points="0,0 28,0 28,28 0,28">
          <text:p/>
        </draw:polygon>
        <draw:polygon draw:style-name="gr269" draw:text-style-name="P267" draw:layer="layout" svg:width="0.027cm" svg:height="0.027cm" svg:x="18.365cm" svg:y="5.167cm" svg:viewBox="0 0 28 28" draw:points="0,0 28,0 28,28 0,28">
          <text:p/>
        </draw:polygon>
        <draw:polygon draw:style-name="gr269" draw:text-style-name="P267" draw:layer="layout" svg:width="0.027cm" svg:height="0.027cm" svg:x="18.418cm" svg:y="5.167cm" svg:viewBox="0 0 28 28" draw:points="0,0 28,0 28,28 0,28">
          <text:p/>
        </draw:polygon>
        <draw:polygon draw:style-name="gr269" draw:text-style-name="P267" draw:layer="layout" svg:width="0.027cm" svg:height="0.027cm" svg:x="18.471cm" svg:y="5.167cm" svg:viewBox="0 0 28 28" draw:points="0,0 28,0 28,28 0,28">
          <text:p/>
        </draw:polygon>
        <draw:polygon draw:style-name="gr269" draw:text-style-name="P267" draw:layer="layout" svg:width="0.028cm" svg:height="0.027cm" svg:x="18.524cm" svg:y="5.167cm" svg:viewBox="0 0 29 28" draw:points="0,0 29,0 29,28 0,28">
          <text:p/>
        </draw:polygon>
        <draw:polygon draw:style-name="gr269" draw:text-style-name="P267" draw:layer="layout" svg:width="0.027cm" svg:height="0.027cm" svg:x="18.577cm" svg:y="5.167cm" svg:viewBox="0 0 28 28" draw:points="0,0 28,0 28,28 0,28">
          <text:p/>
        </draw:polygon>
        <draw:polygon draw:style-name="gr269" draw:text-style-name="P267" draw:layer="layout" svg:width="0.027cm" svg:height="0.027cm" svg:x="18.63cm" svg:y="5.167cm" svg:viewBox="0 0 28 28" draw:points="0,0 28,0 28,28 0,28">
          <text:p/>
        </draw:polygon>
        <draw:polygon draw:style-name="gr269" draw:text-style-name="P267" draw:layer="layout" svg:width="0.027cm" svg:height="0.027cm" svg:x="18.683cm" svg:y="5.167cm" svg:viewBox="0 0 28 28" draw:points="0,0 28,0 28,28 0,28">
          <text:p/>
        </draw:polygon>
        <draw:polygon draw:style-name="gr269" draw:text-style-name="P267" draw:layer="layout" svg:width="0.027cm" svg:height="0.027cm" svg:x="18.736cm" svg:y="5.167cm" svg:viewBox="0 0 28 28" draw:points="0,0 28,0 28,28 0,28">
          <text:p/>
        </draw:polygon>
        <draw:polygon draw:style-name="gr269" draw:text-style-name="P267" draw:layer="layout" svg:width="0.027cm" svg:height="0.027cm" svg:x="18.789cm" svg:y="5.167cm" svg:viewBox="0 0 28 28" draw:points="0,0 28,0 28,28 0,28">
          <text:p/>
        </draw:polygon>
        <draw:polygon draw:style-name="gr269" draw:text-style-name="P267" draw:layer="layout" svg:width="0.027cm" svg:height="0.027cm" svg:x="18.842cm" svg:y="5.167cm" svg:viewBox="0 0 28 28" draw:points="0,0 28,0 28,28 0,28">
          <text:p/>
        </draw:polygon>
        <draw:polygon draw:style-name="gr269" draw:text-style-name="P267" draw:layer="layout" svg:width="0.027cm" svg:height="0.027cm" svg:x="18.895cm" svg:y="5.167cm" svg:viewBox="0 0 28 28" draw:points="0,0 28,0 28,28 0,28">
          <text:p/>
        </draw:polygon>
        <draw:polygon draw:style-name="gr269" draw:text-style-name="P267" draw:layer="layout" svg:width="0.027cm" svg:height="0.027cm" svg:x="18.948cm" svg:y="5.167cm" svg:viewBox="0 0 28 28" draw:points="0,0 28,0 28,28 0,28">
          <text:p/>
        </draw:polygon>
        <draw:polygon draw:style-name="gr269" draw:text-style-name="P267" draw:layer="layout" svg:width="0.027cm" svg:height="0.027cm" svg:x="19.001cm" svg:y="5.167cm" svg:viewBox="0 0 28 28" draw:points="0,0 28,0 28,28 0,28">
          <text:p/>
        </draw:polygon>
        <draw:polygon draw:style-name="gr269" draw:text-style-name="P267" draw:layer="layout" svg:width="0.053cm" svg:height="0.028cm" svg:x="2.014cm" svg:y="6.174cm" svg:viewBox="0 0 54 29" draw:points="0,0 54,0 54,29 0,29">
          <text:p/>
        </draw:polygon>
        <draw:polygon draw:style-name="gr269" draw:text-style-name="P267" draw:layer="layout" svg:width="0.027cm" svg:height="0.028cm" svg:x="2.093cm" svg:y="6.174cm" svg:viewBox="0 0 28 29" draw:points="0,0 28,0 28,29 0,29">
          <text:p/>
        </draw:polygon>
        <draw:polygon draw:style-name="gr269" draw:text-style-name="P267" draw:layer="layout" svg:width="0.027cm" svg:height="0.028cm" svg:x="2.146cm" svg:y="6.174cm" svg:viewBox="0 0 28 29" draw:points="0,0 28,0 28,29 0,29">
          <text:p/>
        </draw:polygon>
        <draw:polygon draw:style-name="gr269" draw:text-style-name="P267" draw:layer="layout" svg:width="0.027cm" svg:height="0.028cm" svg:x="2.199cm" svg:y="6.174cm" svg:viewBox="0 0 28 29" draw:points="0,0 28,0 28,29 0,29">
          <text:p/>
        </draw:polygon>
        <draw:polygon draw:style-name="gr269" draw:text-style-name="P267" draw:layer="layout" svg:width="0.027cm" svg:height="0.028cm" svg:x="2.252cm" svg:y="6.174cm" svg:viewBox="0 0 28 29" draw:points="0,0 28,0 28,29 0,29">
          <text:p/>
        </draw:polygon>
        <draw:polygon draw:style-name="gr269" draw:text-style-name="P267" draw:layer="layout" svg:width="0.027cm" svg:height="0.028cm" svg:x="2.305cm" svg:y="6.174cm" svg:viewBox="0 0 28 29" draw:points="0,0 28,0 28,29 0,29">
          <text:p/>
        </draw:polygon>
        <draw:polygon draw:style-name="gr269" draw:text-style-name="P267" draw:layer="layout" svg:width="0.027cm" svg:height="0.028cm" svg:x="2.358cm" svg:y="6.174cm" svg:viewBox="0 0 28 29" draw:points="0,0 28,0 28,29 0,29">
          <text:p/>
        </draw:polygon>
        <draw:polygon draw:style-name="gr269" draw:text-style-name="P267" draw:layer="layout" svg:width="0.027cm" svg:height="0.028cm" svg:x="2.411cm" svg:y="6.174cm" svg:viewBox="0 0 28 29" draw:points="0,0 28,0 28,29 0,29">
          <text:p/>
        </draw:polygon>
        <draw:polygon draw:style-name="gr269" draw:text-style-name="P267" draw:layer="layout" svg:width="0.027cm" svg:height="0.028cm" svg:x="2.464cm" svg:y="6.174cm" svg:viewBox="0 0 28 29" draw:points="0,0 28,0 28,29 0,29">
          <text:p/>
        </draw:polygon>
        <draw:polygon draw:style-name="gr269" draw:text-style-name="P267" draw:layer="layout" svg:width="0.027cm" svg:height="0.028cm" svg:x="2.517cm" svg:y="6.174cm" svg:viewBox="0 0 28 29" draw:points="0,0 28,0 28,29 0,29">
          <text:p/>
        </draw:polygon>
        <draw:polygon draw:style-name="gr269" draw:text-style-name="P267" draw:layer="layout" svg:width="0.027cm" svg:height="0.028cm" svg:x="2.57cm" svg:y="6.174cm" svg:viewBox="0 0 28 29" draw:points="0,0 28,0 28,29 0,29">
          <text:p/>
        </draw:polygon>
        <draw:polygon draw:style-name="gr269" draw:text-style-name="P267" draw:layer="layout" svg:width="0.027cm" svg:height="0.028cm" svg:x="2.623cm" svg:y="6.174cm" svg:viewBox="0 0 28 29" draw:points="0,0 28,0 28,29 0,29">
          <text:p/>
        </draw:polygon>
        <draw:polygon draw:style-name="gr269" draw:text-style-name="P267" draw:layer="layout" svg:width="0.027cm" svg:height="0.028cm" svg:x="2.676cm" svg:y="6.174cm" svg:viewBox="0 0 28 29" draw:points="0,0 28,0 28,29 0,29">
          <text:p/>
        </draw:polygon>
        <draw:polygon draw:style-name="gr269" draw:text-style-name="P267" draw:layer="layout" svg:width="0.027cm" svg:height="0.028cm" svg:x="2.729cm" svg:y="6.174cm" svg:viewBox="0 0 28 29" draw:points="0,0 28,0 28,29 0,29">
          <text:p/>
        </draw:polygon>
        <draw:polygon draw:style-name="gr269" draw:text-style-name="P267" draw:layer="layout" svg:width="0.027cm" svg:height="0.028cm" svg:x="2.782cm" svg:y="6.174cm" svg:viewBox="0 0 28 29" draw:points="0,0 28,0 28,29 0,29">
          <text:p/>
        </draw:polygon>
        <draw:polygon draw:style-name="gr269" draw:text-style-name="P267" draw:layer="layout" svg:width="0.027cm" svg:height="0.028cm" svg:x="2.835cm" svg:y="6.174cm" svg:viewBox="0 0 28 29" draw:points="0,0 28,0 28,29 0,29">
          <text:p/>
        </draw:polygon>
        <draw:polygon draw:style-name="gr269" draw:text-style-name="P267" draw:layer="layout" svg:width="0.027cm" svg:height="0.028cm" svg:x="2.888cm" svg:y="6.174cm" svg:viewBox="0 0 28 29" draw:points="0,0 28,0 28,29 0,29">
          <text:p/>
        </draw:polygon>
        <draw:polygon draw:style-name="gr269" draw:text-style-name="P267" draw:layer="layout" svg:width="0.027cm" svg:height="0.028cm" svg:x="2.941cm" svg:y="6.174cm" svg:viewBox="0 0 28 29" draw:points="0,0 28,0 28,29 0,29">
          <text:p/>
        </draw:polygon>
        <draw:polygon draw:style-name="gr269" draw:text-style-name="P267" draw:layer="layout" svg:width="0.027cm" svg:height="0.028cm" svg:x="2.994cm" svg:y="6.174cm" svg:viewBox="0 0 28 29" draw:points="0,0 28,0 28,29 0,29">
          <text:p/>
        </draw:polygon>
        <draw:polygon draw:style-name="gr269" draw:text-style-name="P267" draw:layer="layout" svg:width="0.027cm" svg:height="0.028cm" svg:x="3.047cm" svg:y="6.174cm" svg:viewBox="0 0 28 29" draw:points="0,0 28,0 28,29 0,29">
          <text:p/>
        </draw:polygon>
        <draw:polygon draw:style-name="gr269" draw:text-style-name="P267" draw:layer="layout" svg:width="0.027cm" svg:height="0.028cm" svg:x="3.1cm" svg:y="6.174cm" svg:viewBox="0 0 28 29" draw:points="0,0 28,0 28,29 0,29">
          <text:p/>
        </draw:polygon>
        <draw:polygon draw:style-name="gr269" draw:text-style-name="P267" draw:layer="layout" svg:width="0.027cm" svg:height="0.028cm" svg:x="3.153cm" svg:y="6.174cm" svg:viewBox="0 0 28 29" draw:points="0,0 28,0 28,29 0,29">
          <text:p/>
        </draw:polygon>
        <draw:polygon draw:style-name="gr269" draw:text-style-name="P267" draw:layer="layout" svg:width="0.027cm" svg:height="0.028cm" svg:x="3.206cm" svg:y="6.174cm" svg:viewBox="0 0 28 29" draw:points="0,0 28,0 28,29 0,29">
          <text:p/>
        </draw:polygon>
        <draw:polygon draw:style-name="gr269" draw:text-style-name="P267" draw:layer="layout" svg:width="0.027cm" svg:height="0.028cm" svg:x="3.259cm" svg:y="6.174cm" svg:viewBox="0 0 28 29" draw:points="0,0 28,0 28,29 0,29">
          <text:p/>
        </draw:polygon>
        <draw:polygon draw:style-name="gr269" draw:text-style-name="P267" draw:layer="layout" svg:width="0.027cm" svg:height="0.028cm" svg:x="3.312cm" svg:y="6.174cm" svg:viewBox="0 0 28 29" draw:points="0,0 28,0 28,29 0,29">
          <text:p/>
        </draw:polygon>
        <draw:polygon draw:style-name="gr269" draw:text-style-name="P267" draw:layer="layout" svg:width="0.027cm" svg:height="0.028cm" svg:x="3.365cm" svg:y="6.174cm" svg:viewBox="0 0 28 29" draw:points="0,0 28,0 28,29 0,29">
          <text:p/>
        </draw:polygon>
        <draw:polygon draw:style-name="gr269" draw:text-style-name="P267" draw:layer="layout" svg:width="0.028cm" svg:height="0.028cm" svg:x="3.418cm" svg:y="6.174cm" svg:viewBox="0 0 29 29" draw:points="0,0 29,0 29,29 0,29">
          <text:p/>
        </draw:polygon>
        <draw:polygon draw:style-name="gr269" draw:text-style-name="P267" draw:layer="layout" svg:width="0.027cm" svg:height="0.028cm" svg:x="3.471cm" svg:y="6.174cm" svg:viewBox="0 0 28 29" draw:points="0,0 28,0 28,29 0,29">
          <text:p/>
        </draw:polygon>
        <draw:polygon draw:style-name="gr269" draw:text-style-name="P267" draw:layer="layout" svg:width="0.027cm" svg:height="0.028cm" svg:x="3.524cm" svg:y="6.174cm" svg:viewBox="0 0 28 29" draw:points="0,0 28,0 28,29 0,29">
          <text:p/>
        </draw:polygon>
        <draw:polygon draw:style-name="gr269" draw:text-style-name="P267" draw:layer="layout" svg:width="0.027cm" svg:height="0.028cm" svg:x="3.577cm" svg:y="6.174cm" svg:viewBox="0 0 28 29" draw:points="0,0 28,0 28,29 0,29">
          <text:p/>
        </draw:polygon>
        <draw:polygon draw:style-name="gr269" draw:text-style-name="P267" draw:layer="layout" svg:width="0.027cm" svg:height="0.028cm" svg:x="3.63cm" svg:y="6.174cm" svg:viewBox="0 0 28 29" draw:points="0,0 28,0 28,29 0,29">
          <text:p/>
        </draw:polygon>
        <draw:polygon draw:style-name="gr269" draw:text-style-name="P267" draw:layer="layout" svg:width="0.027cm" svg:height="0.028cm" svg:x="3.683cm" svg:y="6.174cm" svg:viewBox="0 0 28 29" draw:points="0,0 28,0 28,29 0,29">
          <text:p/>
        </draw:polygon>
        <draw:polygon draw:style-name="gr269" draw:text-style-name="P267" draw:layer="layout" svg:width="0.027cm" svg:height="0.028cm" svg:x="3.736cm" svg:y="6.174cm" svg:viewBox="0 0 28 29" draw:points="0,0 28,0 28,29 0,29">
          <text:p/>
        </draw:polygon>
        <draw:polygon draw:style-name="gr269" draw:text-style-name="P267" draw:layer="layout" svg:width="0.027cm" svg:height="0.028cm" svg:x="3.789cm" svg:y="6.174cm" svg:viewBox="0 0 28 29" draw:points="0,0 28,0 28,29 0,29">
          <text:p/>
        </draw:polygon>
        <draw:polygon draw:style-name="gr269" draw:text-style-name="P267" draw:layer="layout" svg:width="0.027cm" svg:height="0.028cm" svg:x="3.842cm" svg:y="6.174cm" svg:viewBox="0 0 28 29" draw:points="0,0 28,0 28,29 0,29">
          <text:p/>
        </draw:polygon>
        <draw:polygon draw:style-name="gr269" draw:text-style-name="P267" draw:layer="layout" svg:width="0.027cm" svg:height="0.028cm" svg:x="3.895cm" svg:y="6.174cm" svg:viewBox="0 0 28 29" draw:points="0,0 28,0 28,29 0,29">
          <text:p/>
        </draw:polygon>
        <draw:polygon draw:style-name="gr269" draw:text-style-name="P267" draw:layer="layout" svg:width="0.027cm" svg:height="0.028cm" svg:x="3.948cm" svg:y="6.174cm" svg:viewBox="0 0 28 29" draw:points="0,0 28,0 28,29 0,29">
          <text:p/>
        </draw:polygon>
        <draw:polygon draw:style-name="gr269" draw:text-style-name="P267" draw:layer="layout" svg:width="0.027cm" svg:height="0.028cm" svg:x="4.001cm" svg:y="6.174cm" svg:viewBox="0 0 28 29" draw:points="0,0 28,0 28,29 0,29">
          <text:p/>
        </draw:polygon>
        <draw:polygon draw:style-name="gr269" draw:text-style-name="P267" draw:layer="layout" svg:width="0.027cm" svg:height="0.028cm" svg:x="4.054cm" svg:y="6.174cm" svg:viewBox="0 0 28 29" draw:points="0,0 28,0 28,29 0,29">
          <text:p/>
        </draw:polygon>
        <draw:polygon draw:style-name="gr269" draw:text-style-name="P267" draw:layer="layout" svg:width="0.027cm" svg:height="0.028cm" svg:x="4.107cm" svg:y="6.174cm" svg:viewBox="0 0 28 29" draw:points="0,0 28,0 28,29 0,29">
          <text:p/>
        </draw:polygon>
        <draw:polygon draw:style-name="gr269" draw:text-style-name="P267" draw:layer="layout" svg:width="0.027cm" svg:height="0.028cm" svg:x="4.16cm" svg:y="6.174cm" svg:viewBox="0 0 28 29" draw:points="0,0 28,0 28,29 0,29">
          <text:p/>
        </draw:polygon>
        <draw:polygon draw:style-name="gr269" draw:text-style-name="P267" draw:layer="layout" svg:width="0.027cm" svg:height="0.028cm" svg:x="4.213cm" svg:y="6.174cm" svg:viewBox="0 0 28 29" draw:points="0,0 28,0 28,29 0,29">
          <text:p/>
        </draw:polygon>
        <draw:polygon draw:style-name="gr269" draw:text-style-name="P267" draw:layer="layout" svg:width="0.027cm" svg:height="0.028cm" svg:x="4.266cm" svg:y="6.174cm" svg:viewBox="0 0 28 29" draw:points="0,0 28,0 28,29 0,29">
          <text:p/>
        </draw:polygon>
        <draw:polygon draw:style-name="gr269" draw:text-style-name="P267" draw:layer="layout" svg:width="0.027cm" svg:height="0.028cm" svg:x="4.319cm" svg:y="6.174cm" svg:viewBox="0 0 28 29" draw:points="0,0 28,0 28,29 0,29">
          <text:p/>
        </draw:polygon>
        <draw:polygon draw:style-name="gr269" draw:text-style-name="P267" draw:layer="layout" svg:width="0.027cm" svg:height="0.028cm" svg:x="4.372cm" svg:y="6.174cm" svg:viewBox="0 0 28 29" draw:points="0,0 28,0 28,29 0,29">
          <text:p/>
        </draw:polygon>
        <draw:polygon draw:style-name="gr269" draw:text-style-name="P267" draw:layer="layout" svg:width="0.027cm" svg:height="0.028cm" svg:x="4.425cm" svg:y="6.174cm" svg:viewBox="0 0 28 29" draw:points="0,0 28,0 28,29 0,29">
          <text:p/>
        </draw:polygon>
        <draw:polygon draw:style-name="gr269" draw:text-style-name="P267" draw:layer="layout" svg:width="0.027cm" svg:height="0.028cm" svg:x="4.478cm" svg:y="6.174cm" svg:viewBox="0 0 28 29" draw:points="0,0 28,0 28,29 0,29">
          <text:p/>
        </draw:polygon>
        <draw:polygon draw:style-name="gr269" draw:text-style-name="P267" draw:layer="layout" svg:width="0.027cm" svg:height="0.028cm" svg:x="4.531cm" svg:y="6.174cm" svg:viewBox="0 0 28 29" draw:points="0,0 28,0 28,29 0,29">
          <text:p/>
        </draw:polygon>
        <draw:polygon draw:style-name="gr269" draw:text-style-name="P267" draw:layer="layout" svg:width="0.027cm" svg:height="0.028cm" svg:x="4.584cm" svg:y="6.174cm" svg:viewBox="0 0 28 29" draw:points="0,0 28,0 28,29 0,29">
          <text:p/>
        </draw:polygon>
        <draw:polygon draw:style-name="gr269" draw:text-style-name="P267" draw:layer="layout" svg:width="0.027cm" svg:height="0.028cm" svg:x="4.637cm" svg:y="6.174cm" svg:viewBox="0 0 28 29" draw:points="0,0 28,0 28,29 0,29">
          <text:p/>
        </draw:polygon>
        <draw:polygon draw:style-name="gr269" draw:text-style-name="P267" draw:layer="layout" svg:width="0.027cm" svg:height="0.028cm" svg:x="4.69cm" svg:y="6.174cm" svg:viewBox="0 0 28 29" draw:points="0,0 28,0 28,29 0,29">
          <text:p/>
        </draw:polygon>
        <draw:polygon draw:style-name="gr269" draw:text-style-name="P267" draw:layer="layout" svg:width="0.027cm" svg:height="0.028cm" svg:x="4.743cm" svg:y="6.174cm" svg:viewBox="0 0 28 29" draw:points="0,0 28,0 28,29 0,29">
          <text:p/>
        </draw:polygon>
        <draw:polygon draw:style-name="gr269" draw:text-style-name="P267" draw:layer="layout" svg:width="0.028cm" svg:height="0.028cm" svg:x="4.796cm" svg:y="6.174cm" svg:viewBox="0 0 29 29" draw:points="0,0 29,0 29,29 0,29">
          <text:p/>
        </draw:polygon>
        <draw:polygon draw:style-name="gr269" draw:text-style-name="P267" draw:layer="layout" svg:width="0.027cm" svg:height="0.028cm" svg:x="4.849cm" svg:y="6.174cm" svg:viewBox="0 0 28 29" draw:points="0,0 28,0 28,29 0,29">
          <text:p/>
        </draw:polygon>
        <draw:polygon draw:style-name="gr269" draw:text-style-name="P267" draw:layer="layout" svg:width="0.027cm" svg:height="0.028cm" svg:x="4.902cm" svg:y="6.174cm" svg:viewBox="0 0 28 29" draw:points="0,0 28,0 28,29 0,29">
          <text:p/>
        </draw:polygon>
        <draw:polygon draw:style-name="gr269" draw:text-style-name="P267" draw:layer="layout" svg:width="0.027cm" svg:height="0.028cm" svg:x="4.955cm" svg:y="6.174cm" svg:viewBox="0 0 28 29" draw:points="0,0 28,0 28,29 0,29">
          <text:p/>
        </draw:polygon>
        <draw:polygon draw:style-name="gr269" draw:text-style-name="P267" draw:layer="layout" svg:width="0.027cm" svg:height="0.028cm" svg:x="5.008cm" svg:y="6.174cm" svg:viewBox="0 0 28 29" draw:points="0,0 28,0 28,29 0,29">
          <text:p/>
        </draw:polygon>
        <draw:polygon draw:style-name="gr269" draw:text-style-name="P267" draw:layer="layout" svg:width="0.027cm" svg:height="0.028cm" svg:x="5.061cm" svg:y="6.174cm" svg:viewBox="0 0 28 29" draw:points="0,0 28,0 28,29 0,29">
          <text:p/>
        </draw:polygon>
        <draw:polygon draw:style-name="gr269" draw:text-style-name="P267" draw:layer="layout" svg:width="0.027cm" svg:height="0.028cm" svg:x="5.114cm" svg:y="6.174cm" svg:viewBox="0 0 28 29" draw:points="0,0 28,0 28,29 0,29">
          <text:p/>
        </draw:polygon>
        <draw:polygon draw:style-name="gr269" draw:text-style-name="P267" draw:layer="layout" svg:width="0.027cm" svg:height="0.028cm" svg:x="5.167cm" svg:y="6.174cm" svg:viewBox="0 0 28 29" draw:points="0,0 28,0 28,29 0,29">
          <text:p/>
        </draw:polygon>
        <draw:polygon draw:style-name="gr269" draw:text-style-name="P267" draw:layer="layout" svg:width="0.027cm" svg:height="0.028cm" svg:x="5.22cm" svg:y="6.174cm" svg:viewBox="0 0 28 29" draw:points="0,0 28,0 28,29 0,29">
          <text:p/>
        </draw:polygon>
        <draw:polygon draw:style-name="gr269" draw:text-style-name="P267" draw:layer="layout" svg:width="0.027cm" svg:height="0.028cm" svg:x="5.273cm" svg:y="6.174cm" svg:viewBox="0 0 28 29" draw:points="0,0 28,0 28,29 0,29">
          <text:p/>
        </draw:polygon>
        <draw:polygon draw:style-name="gr269" draw:text-style-name="P267" draw:layer="layout" svg:width="0.027cm" svg:height="0.028cm" svg:x="5.326cm" svg:y="6.174cm" svg:viewBox="0 0 28 29" draw:points="0,0 28,0 28,29 0,29">
          <text:p/>
        </draw:polygon>
        <draw:polygon draw:style-name="gr269" draw:text-style-name="P267" draw:layer="layout" svg:width="0.027cm" svg:height="0.028cm" svg:x="5.379cm" svg:y="6.174cm" svg:viewBox="0 0 28 29" draw:points="0,0 28,0 28,29 0,29">
          <text:p/>
        </draw:polygon>
        <draw:polygon draw:style-name="gr269" draw:text-style-name="P267" draw:layer="layout" svg:width="0.027cm" svg:height="0.028cm" svg:x="5.432cm" svg:y="6.174cm" svg:viewBox="0 0 28 29" draw:points="0,0 28,0 28,29 0,29">
          <text:p/>
        </draw:polygon>
        <draw:polygon draw:style-name="gr269" draw:text-style-name="P267" draw:layer="layout" svg:width="0.027cm" svg:height="0.028cm" svg:x="5.485cm" svg:y="6.174cm" svg:viewBox="0 0 28 29" draw:points="0,0 28,0 28,29 0,29">
          <text:p/>
        </draw:polygon>
        <draw:polygon draw:style-name="gr269" draw:text-style-name="P267" draw:layer="layout" svg:width="0.027cm" svg:height="0.028cm" svg:x="5.538cm" svg:y="6.174cm" svg:viewBox="0 0 28 29" draw:points="0,0 28,0 28,29 0,29">
          <text:p/>
        </draw:polygon>
        <draw:polygon draw:style-name="gr269" draw:text-style-name="P267" draw:layer="layout" svg:width="0.027cm" svg:height="0.028cm" svg:x="5.591cm" svg:y="6.174cm" svg:viewBox="0 0 28 29" draw:points="0,0 28,0 28,29 0,29">
          <text:p/>
        </draw:polygon>
        <draw:polygon draw:style-name="gr269" draw:text-style-name="P267" draw:layer="layout" svg:width="0.027cm" svg:height="0.028cm" svg:x="5.644cm" svg:y="6.174cm" svg:viewBox="0 0 28 29" draw:points="0,0 28,0 28,29 0,29">
          <text:p/>
        </draw:polygon>
        <draw:polygon draw:style-name="gr269" draw:text-style-name="P267" draw:layer="layout" svg:width="0.027cm" svg:height="0.028cm" svg:x="5.697cm" svg:y="6.174cm" svg:viewBox="0 0 28 29" draw:points="0,0 28,0 28,29 0,29">
          <text:p/>
        </draw:polygon>
        <draw:polygon draw:style-name="gr269" draw:text-style-name="P267" draw:layer="layout" svg:width="0.027cm" svg:height="0.028cm" svg:x="5.75cm" svg:y="6.174cm" svg:viewBox="0 0 28 29" draw:points="0,0 28,0 28,29 0,29">
          <text:p/>
        </draw:polygon>
        <draw:polygon draw:style-name="gr269" draw:text-style-name="P267" draw:layer="layout" svg:width="0.027cm" svg:height="0.028cm" svg:x="5.803cm" svg:y="6.174cm" svg:viewBox="0 0 28 29" draw:points="0,0 28,0 28,29 0,29">
          <text:p/>
        </draw:polygon>
        <draw:polygon draw:style-name="gr269" draw:text-style-name="P267" draw:layer="layout" svg:width="0.027cm" svg:height="0.028cm" svg:x="5.856cm" svg:y="6.174cm" svg:viewBox="0 0 28 29" draw:points="0,0 28,0 28,29 0,29">
          <text:p/>
        </draw:polygon>
        <draw:polygon draw:style-name="gr269" draw:text-style-name="P267" draw:layer="layout" svg:width="0.027cm" svg:height="0.028cm" svg:x="5.909cm" svg:y="6.174cm" svg:viewBox="0 0 28 29" draw:points="0,0 28,0 28,29 0,29">
          <text:p/>
        </draw:polygon>
        <draw:polygon draw:style-name="gr269" draw:text-style-name="P267" draw:layer="layout" svg:width="0.027cm" svg:height="0.028cm" svg:x="5.962cm" svg:y="6.174cm" svg:viewBox="0 0 28 29" draw:points="0,0 28,0 28,29 0,29">
          <text:p/>
        </draw:polygon>
        <draw:polygon draw:style-name="gr269" draw:text-style-name="P267" draw:layer="layout" svg:width="0.027cm" svg:height="0.028cm" svg:x="6.015cm" svg:y="6.174cm" svg:viewBox="0 0 28 29" draw:points="0,0 28,0 28,29 0,29">
          <text:p/>
        </draw:polygon>
        <draw:polygon draw:style-name="gr269" draw:text-style-name="P267" draw:layer="layout" svg:width="0.027cm" svg:height="0.028cm" svg:x="6.068cm" svg:y="6.174cm" svg:viewBox="0 0 28 29" draw:points="0,0 28,0 28,29 0,29">
          <text:p/>
        </draw:polygon>
        <draw:polygon draw:style-name="gr269" draw:text-style-name="P267" draw:layer="layout" svg:width="0.027cm" svg:height="0.028cm" svg:x="6.121cm" svg:y="6.174cm" svg:viewBox="0 0 28 29" draw:points="0,0 28,0 28,29 0,29">
          <text:p/>
        </draw:polygon>
        <draw:polygon draw:style-name="gr269" draw:text-style-name="P267" draw:layer="layout" svg:width="0.028cm" svg:height="0.028cm" svg:x="6.174cm" svg:y="6.174cm" svg:viewBox="0 0 29 29" draw:points="0,0 29,0 29,29 0,29">
          <text:p/>
        </draw:polygon>
        <draw:polygon draw:style-name="gr269" draw:text-style-name="P267" draw:layer="layout" svg:width="0.027cm" svg:height="0.028cm" svg:x="6.227cm" svg:y="6.174cm" svg:viewBox="0 0 28 29" draw:points="0,0 28,0 28,29 0,29">
          <text:p/>
        </draw:polygon>
        <draw:polygon draw:style-name="gr269" draw:text-style-name="P267" draw:layer="layout" svg:width="0.027cm" svg:height="0.028cm" svg:x="6.28cm" svg:y="6.174cm" svg:viewBox="0 0 28 29" draw:points="0,0 28,0 28,29 0,29">
          <text:p/>
        </draw:polygon>
        <draw:polygon draw:style-name="gr269" draw:text-style-name="P267" draw:layer="layout" svg:width="0.027cm" svg:height="0.028cm" svg:x="6.333cm" svg:y="6.174cm" svg:viewBox="0 0 28 29" draw:points="0,0 28,0 28,29 0,29">
          <text:p/>
        </draw:polygon>
        <draw:polygon draw:style-name="gr269" draw:text-style-name="P267" draw:layer="layout" svg:width="0.026cm" svg:height="0.028cm" svg:x="6.387cm" svg:y="6.174cm" svg:viewBox="0 0 27 29" draw:points="0,0 27,0 27,29 0,29">
          <text:p/>
        </draw:polygon>
        <draw:polygon draw:style-name="gr269" draw:text-style-name="P267" draw:layer="layout" svg:width="0.026cm" svg:height="0.028cm" svg:x="6.44cm" svg:y="6.174cm" svg:viewBox="0 0 27 29" draw:points="0,0 27,0 27,29 0,29">
          <text:p/>
        </draw:polygon>
        <draw:polygon draw:style-name="gr269" draw:text-style-name="P267" draw:layer="layout" svg:width="0.026cm" svg:height="0.028cm" svg:x="6.493cm" svg:y="6.174cm" svg:viewBox="0 0 27 29" draw:points="0,0 27,0 27,29 0,29">
          <text:p/>
        </draw:polygon>
        <draw:polygon draw:style-name="gr269" draw:text-style-name="P267" draw:layer="layout" svg:width="0.026cm" svg:height="0.028cm" svg:x="6.546cm" svg:y="6.174cm" svg:viewBox="0 0 27 29" draw:points="0,0 27,0 27,29 0,29">
          <text:p/>
        </draw:polygon>
        <draw:polygon draw:style-name="gr269" draw:text-style-name="P267" draw:layer="layout" svg:width="0.026cm" svg:height="0.028cm" svg:x="6.599cm" svg:y="6.174cm" svg:viewBox="0 0 27 29" draw:points="0,0 27,0 27,29 0,29">
          <text:p/>
        </draw:polygon>
        <draw:polygon draw:style-name="gr269" draw:text-style-name="P267" draw:layer="layout" svg:width="0.026cm" svg:height="0.028cm" svg:x="6.652cm" svg:y="6.174cm" svg:viewBox="0 0 27 29" draw:points="0,0 27,0 27,29 0,29">
          <text:p/>
        </draw:polygon>
        <draw:polygon draw:style-name="gr269" draw:text-style-name="P267" draw:layer="layout" svg:width="0.026cm" svg:height="0.028cm" svg:x="6.705cm" svg:y="6.174cm" svg:viewBox="0 0 27 29" draw:points="0,0 27,0 27,29 0,29">
          <text:p/>
        </draw:polygon>
        <draw:polygon draw:style-name="gr269" draw:text-style-name="P267" draw:layer="layout" svg:width="0.026cm" svg:height="0.028cm" svg:x="6.758cm" svg:y="6.174cm" svg:viewBox="0 0 27 29" draw:points="0,0 27,0 27,29 0,29">
          <text:p/>
        </draw:polygon>
        <draw:polygon draw:style-name="gr269" draw:text-style-name="P267" draw:layer="layout" svg:width="0.026cm" svg:height="0.028cm" svg:x="6.811cm" svg:y="6.174cm" svg:viewBox="0 0 27 29" draw:points="0,0 27,0 27,29 0,29">
          <text:p/>
        </draw:polygon>
        <draw:polygon draw:style-name="gr269" draw:text-style-name="P267" draw:layer="layout" svg:width="0.026cm" svg:height="0.028cm" svg:x="6.864cm" svg:y="6.174cm" svg:viewBox="0 0 27 29" draw:points="0,0 27,0 27,29 0,29">
          <text:p/>
        </draw:polygon>
        <draw:polygon draw:style-name="gr269" draw:text-style-name="P267" draw:layer="layout" svg:width="0.026cm" svg:height="0.028cm" svg:x="6.917cm" svg:y="6.174cm" svg:viewBox="0 0 27 29" draw:points="0,0 27,0 27,29 0,29">
          <text:p/>
        </draw:polygon>
        <draw:polygon draw:style-name="gr269" draw:text-style-name="P267" draw:layer="layout" svg:width="0.026cm" svg:height="0.028cm" svg:x="6.97cm" svg:y="6.174cm" svg:viewBox="0 0 27 29" draw:points="0,0 27,0 27,29 0,29">
          <text:p/>
        </draw:polygon>
        <draw:polygon draw:style-name="gr269" draw:text-style-name="P267" draw:layer="layout" svg:width="0.026cm" svg:height="0.028cm" svg:x="7.023cm" svg:y="6.174cm" svg:viewBox="0 0 27 29" draw:points="0,0 27,0 27,29 0,29">
          <text:p/>
        </draw:polygon>
        <draw:polygon draw:style-name="gr269" draw:text-style-name="P267" draw:layer="layout" svg:width="0.026cm" svg:height="0.028cm" svg:x="7.076cm" svg:y="6.174cm" svg:viewBox="0 0 27 29" draw:points="0,0 27,0 27,29 0,29">
          <text:p/>
        </draw:polygon>
        <draw:polygon draw:style-name="gr269" draw:text-style-name="P267" draw:layer="layout" svg:width="0.026cm" svg:height="0.028cm" svg:x="7.129cm" svg:y="6.174cm" svg:viewBox="0 0 27 29" draw:points="0,0 27,0 27,29 0,29">
          <text:p/>
        </draw:polygon>
        <draw:polygon draw:style-name="gr269" draw:text-style-name="P267" draw:layer="layout" svg:width="0.026cm" svg:height="0.028cm" svg:x="7.182cm" svg:y="6.174cm" svg:viewBox="0 0 27 29" draw:points="0,0 27,0 27,29 0,29">
          <text:p/>
        </draw:polygon>
        <draw:polygon draw:style-name="gr269" draw:text-style-name="P267" draw:layer="layout" svg:width="0.026cm" svg:height="0.028cm" svg:x="7.235cm" svg:y="6.174cm" svg:viewBox="0 0 27 29" draw:points="0,0 27,0 27,29 0,29">
          <text:p/>
        </draw:polygon>
        <draw:polygon draw:style-name="gr269" draw:text-style-name="P267" draw:layer="layout" svg:width="0.026cm" svg:height="0.028cm" svg:x="7.288cm" svg:y="6.174cm" svg:viewBox="0 0 27 29" draw:points="0,0 27,0 27,29 0,29">
          <text:p/>
        </draw:polygon>
        <draw:polygon draw:style-name="gr269" draw:text-style-name="P267" draw:layer="layout" svg:width="0.026cm" svg:height="0.028cm" svg:x="7.341cm" svg:y="6.174cm" svg:viewBox="0 0 27 29" draw:points="0,0 27,0 27,29 0,29">
          <text:p/>
        </draw:polygon>
        <draw:polygon draw:style-name="gr269" draw:text-style-name="P267" draw:layer="layout" svg:width="0.026cm" svg:height="0.028cm" svg:x="7.394cm" svg:y="6.174cm" svg:viewBox="0 0 27 29" draw:points="0,0 27,0 27,29 0,29">
          <text:p/>
        </draw:polygon>
        <draw:polygon draw:style-name="gr269" draw:text-style-name="P267" draw:layer="layout" svg:width="0.026cm" svg:height="0.028cm" svg:x="7.447cm" svg:y="6.174cm" svg:viewBox="0 0 27 29" draw:points="0,0 27,0 27,29 0,29">
          <text:p/>
        </draw:polygon>
        <draw:polygon draw:style-name="gr269" draw:text-style-name="P267" draw:layer="layout" svg:width="0.026cm" svg:height="0.028cm" svg:x="7.5cm" svg:y="6.174cm" svg:viewBox="0 0 27 29" draw:points="0,0 27,0 27,29 0,29">
          <text:p/>
        </draw:polygon>
        <draw:polygon draw:style-name="gr269" draw:text-style-name="P267" draw:layer="layout" svg:width="0.026cm" svg:height="0.028cm" svg:x="7.553cm" svg:y="6.174cm" svg:viewBox="0 0 27 29" draw:points="0,0 27,0 27,29 0,29">
          <text:p/>
        </draw:polygon>
        <draw:polygon draw:style-name="gr269" draw:text-style-name="P267" draw:layer="layout" svg:width="0.026cm" svg:height="0.028cm" svg:x="7.606cm" svg:y="6.174cm" svg:viewBox="0 0 27 29" draw:points="0,0 27,0 27,29 0,29">
          <text:p/>
        </draw:polygon>
        <draw:polygon draw:style-name="gr269" draw:text-style-name="P267" draw:layer="layout" svg:width="0.026cm" svg:height="0.028cm" svg:x="7.659cm" svg:y="6.174cm" svg:viewBox="0 0 27 29" draw:points="0,0 27,0 27,29 0,29">
          <text:p/>
        </draw:polygon>
        <draw:polygon draw:style-name="gr269" draw:text-style-name="P267" draw:layer="layout" svg:width="0.026cm" svg:height="0.028cm" svg:x="7.712cm" svg:y="6.174cm" svg:viewBox="0 0 27 29" draw:points="0,0 27,0 27,29 0,29">
          <text:p/>
        </draw:polygon>
        <draw:polygon draw:style-name="gr269" draw:text-style-name="P267" draw:layer="layout" svg:width="0.026cm" svg:height="0.028cm" svg:x="7.765cm" svg:y="6.174cm" svg:viewBox="0 0 27 29" draw:points="0,0 27,0 27,29 0,29">
          <text:p/>
        </draw:polygon>
        <draw:polygon draw:style-name="gr269" draw:text-style-name="P267" draw:layer="layout" svg:width="0.026cm" svg:height="0.028cm" svg:x="7.818cm" svg:y="6.174cm" svg:viewBox="0 0 27 29" draw:points="0,0 27,0 27,29 0,29">
          <text:p/>
        </draw:polygon>
        <draw:polygon draw:style-name="gr269" draw:text-style-name="P267" draw:layer="layout" svg:width="0.026cm" svg:height="0.028cm" svg:x="7.871cm" svg:y="6.174cm" svg:viewBox="0 0 27 29" draw:points="0,0 27,0 27,29 0,29">
          <text:p/>
        </draw:polygon>
        <draw:polygon draw:style-name="gr269" draw:text-style-name="P267" draw:layer="layout" svg:width="0.026cm" svg:height="0.028cm" svg:x="7.924cm" svg:y="6.174cm" svg:viewBox="0 0 27 29" draw:points="0,0 27,0 27,29 0,29">
          <text:p/>
        </draw:polygon>
        <draw:polygon draw:style-name="gr269" draw:text-style-name="P267" draw:layer="layout" svg:width="0.026cm" svg:height="0.028cm" svg:x="7.977cm" svg:y="6.174cm" svg:viewBox="0 0 27 29" draw:points="0,0 27,0 27,29 0,29">
          <text:p/>
        </draw:polygon>
        <draw:polygon draw:style-name="gr269" draw:text-style-name="P267" draw:layer="layout" svg:width="0.026cm" svg:height="0.028cm" svg:x="8.03cm" svg:y="6.174cm" svg:viewBox="0 0 27 29" draw:points="0,0 27,0 27,29 0,29">
          <text:p/>
        </draw:polygon>
        <draw:polygon draw:style-name="gr269" draw:text-style-name="P267" draw:layer="layout" svg:width="0.026cm" svg:height="0.028cm" svg:x="8.083cm" svg:y="6.174cm" svg:viewBox="0 0 27 29" draw:points="0,0 27,0 27,29 0,29">
          <text:p/>
        </draw:polygon>
        <draw:polygon draw:style-name="gr269" draw:text-style-name="P267" draw:layer="layout" svg:width="0.026cm" svg:height="0.028cm" svg:x="8.136cm" svg:y="6.174cm" svg:viewBox="0 0 27 29" draw:points="0,0 27,0 27,29 0,29">
          <text:p/>
        </draw:polygon>
        <draw:polygon draw:style-name="gr269" draw:text-style-name="P267" draw:layer="layout" svg:width="0.026cm" svg:height="0.028cm" svg:x="8.189cm" svg:y="6.174cm" svg:viewBox="0 0 27 29" draw:points="0,0 27,0 27,29 0,29">
          <text:p/>
        </draw:polygon>
        <draw:polygon draw:style-name="gr269" draw:text-style-name="P267" draw:layer="layout" svg:width="0.026cm" svg:height="0.028cm" svg:x="8.242cm" svg:y="6.174cm" svg:viewBox="0 0 27 29" draw:points="0,0 27,0 27,29 0,29">
          <text:p/>
        </draw:polygon>
        <draw:polygon draw:style-name="gr269" draw:text-style-name="P267" draw:layer="layout" svg:width="0.026cm" svg:height="0.028cm" svg:x="8.295cm" svg:y="6.174cm" svg:viewBox="0 0 27 29" draw:points="0,0 27,0 27,29 0,29">
          <text:p/>
        </draw:polygon>
        <draw:polygon draw:style-name="gr269" draw:text-style-name="P267" draw:layer="layout" svg:width="0.026cm" svg:height="0.028cm" svg:x="8.348cm" svg:y="6.174cm" svg:viewBox="0 0 27 29" draw:points="0,0 27,0 27,29 0,29">
          <text:p/>
        </draw:polygon>
        <draw:polygon draw:style-name="gr269" draw:text-style-name="P267" draw:layer="layout" svg:width="0.026cm" svg:height="0.028cm" svg:x="8.401cm" svg:y="6.174cm" svg:viewBox="0 0 27 29" draw:points="0,0 27,0 27,29 0,29">
          <text:p/>
        </draw:polygon>
        <draw:polygon draw:style-name="gr269" draw:text-style-name="P267" draw:layer="layout" svg:width="0.026cm" svg:height="0.028cm" svg:x="8.454cm" svg:y="6.174cm" svg:viewBox="0 0 27 29" draw:points="0,0 27,0 27,29 0,29">
          <text:p/>
        </draw:polygon>
        <draw:polygon draw:style-name="gr269" draw:text-style-name="P267" draw:layer="layout" svg:width="0.026cm" svg:height="0.028cm" svg:x="8.507cm" svg:y="6.174cm" svg:viewBox="0 0 27 29" draw:points="0,0 27,0 27,29 0,29">
          <text:p/>
        </draw:polygon>
        <draw:polygon draw:style-name="gr269" draw:text-style-name="P267" draw:layer="layout" svg:width="0.026cm" svg:height="0.028cm" svg:x="8.56cm" svg:y="6.174cm" svg:viewBox="0 0 27 29" draw:points="0,0 27,0 27,29 0,29">
          <text:p/>
        </draw:polygon>
        <draw:polygon draw:style-name="gr269" draw:text-style-name="P267" draw:layer="layout" svg:width="0.026cm" svg:height="0.028cm" svg:x="8.613cm" svg:y="6.174cm" svg:viewBox="0 0 27 29" draw:points="0,0 27,0 27,29 0,29">
          <text:p/>
        </draw:polygon>
        <draw:polygon draw:style-name="gr269" draw:text-style-name="P267" draw:layer="layout" svg:width="0.026cm" svg:height="0.028cm" svg:x="8.666cm" svg:y="6.174cm" svg:viewBox="0 0 27 29" draw:points="0,0 27,0 27,29 0,29">
          <text:p/>
        </draw:polygon>
        <draw:polygon draw:style-name="gr269" draw:text-style-name="P267" draw:layer="layout" svg:width="0.026cm" svg:height="0.028cm" svg:x="8.719cm" svg:y="6.174cm" svg:viewBox="0 0 27 29" draw:points="0,0 27,0 27,29 0,29">
          <text:p/>
        </draw:polygon>
        <draw:polygon draw:style-name="gr269" draw:text-style-name="P267" draw:layer="layout" svg:width="0.026cm" svg:height="0.028cm" svg:x="8.772cm" svg:y="6.174cm" svg:viewBox="0 0 27 29" draw:points="0,0 27,0 27,29 0,29">
          <text:p/>
        </draw:polygon>
        <draw:polygon draw:style-name="gr269" draw:text-style-name="P267" draw:layer="layout" svg:width="0.026cm" svg:height="0.028cm" svg:x="8.825cm" svg:y="6.174cm" svg:viewBox="0 0 27 29" draw:points="0,0 27,0 27,29 0,29">
          <text:p/>
        </draw:polygon>
        <draw:polygon draw:style-name="gr269" draw:text-style-name="P267" draw:layer="layout" svg:width="0.026cm" svg:height="0.028cm" svg:x="8.878cm" svg:y="6.174cm" svg:viewBox="0 0 27 29" draw:points="0,0 27,0 27,29 0,29">
          <text:p/>
        </draw:polygon>
        <draw:polygon draw:style-name="gr269" draw:text-style-name="P267" draw:layer="layout" svg:width="0.026cm" svg:height="0.028cm" svg:x="8.931cm" svg:y="6.174cm" svg:viewBox="0 0 27 29" draw:points="0,0 27,0 27,29 0,29">
          <text:p/>
        </draw:polygon>
        <draw:polygon draw:style-name="gr269" draw:text-style-name="P267" draw:layer="layout" svg:width="0.026cm" svg:height="0.028cm" svg:x="8.984cm" svg:y="6.174cm" svg:viewBox="0 0 27 29" draw:points="0,0 27,0 27,29 0,29">
          <text:p/>
        </draw:polygon>
        <draw:polygon draw:style-name="gr269" draw:text-style-name="P267" draw:layer="layout" svg:width="0.026cm" svg:height="0.028cm" svg:x="9.037cm" svg:y="6.174cm" svg:viewBox="0 0 27 29" draw:points="0,0 27,0 27,29 0,29">
          <text:p/>
        </draw:polygon>
        <draw:polygon draw:style-name="gr269" draw:text-style-name="P267" draw:layer="layout" svg:width="0.026cm" svg:height="0.028cm" svg:x="9.09cm" svg:y="6.174cm" svg:viewBox="0 0 27 29" draw:points="0,0 27,0 27,29 0,29">
          <text:p/>
        </draw:polygon>
        <draw:polygon draw:style-name="gr269" draw:text-style-name="P267" draw:layer="layout" svg:width="0.026cm" svg:height="0.028cm" svg:x="9.143cm" svg:y="6.174cm" svg:viewBox="0 0 27 29" draw:points="0,0 27,0 27,29 0,29">
          <text:p/>
        </draw:polygon>
        <draw:polygon draw:style-name="gr269" draw:text-style-name="P267" draw:layer="layout" svg:width="0.026cm" svg:height="0.028cm" svg:x="9.196cm" svg:y="6.174cm" svg:viewBox="0 0 27 29" draw:points="0,0 27,0 27,29 0,29">
          <text:p/>
        </draw:polygon>
        <draw:polygon draw:style-name="gr269" draw:text-style-name="P267" draw:layer="layout" svg:width="0.026cm" svg:height="0.028cm" svg:x="9.249cm" svg:y="6.174cm" svg:viewBox="0 0 27 29" draw:points="0,0 27,0 27,29 0,29">
          <text:p/>
        </draw:polygon>
        <draw:polygon draw:style-name="gr269" draw:text-style-name="P267" draw:layer="layout" svg:width="0.026cm" svg:height="0.028cm" svg:x="9.302cm" svg:y="6.174cm" svg:viewBox="0 0 27 29" draw:points="0,0 27,0 27,29 0,29">
          <text:p/>
        </draw:polygon>
        <draw:polygon draw:style-name="gr269" draw:text-style-name="P267" draw:layer="layout" svg:width="0.026cm" svg:height="0.028cm" svg:x="9.355cm" svg:y="6.174cm" svg:viewBox="0 0 27 29" draw:points="0,0 27,0 27,29 0,29">
          <text:p/>
        </draw:polygon>
        <draw:polygon draw:style-name="gr269" draw:text-style-name="P267" draw:layer="layout" svg:width="0.026cm" svg:height="0.028cm" svg:x="9.408cm" svg:y="6.174cm" svg:viewBox="0 0 27 29" draw:points="0,0 27,0 27,29 0,29">
          <text:p/>
        </draw:polygon>
        <draw:polygon draw:style-name="gr269" draw:text-style-name="P267" draw:layer="layout" svg:width="0.026cm" svg:height="0.028cm" svg:x="9.461cm" svg:y="6.174cm" svg:viewBox="0 0 27 29" draw:points="0,0 27,0 27,29 0,29">
          <text:p/>
        </draw:polygon>
        <draw:polygon draw:style-name="gr269" draw:text-style-name="P267" draw:layer="layout" svg:width="0.026cm" svg:height="0.028cm" svg:x="9.514cm" svg:y="6.174cm" svg:viewBox="0 0 27 29" draw:points="0,0 27,0 27,29 0,29">
          <text:p/>
        </draw:polygon>
        <draw:polygon draw:style-name="gr269" draw:text-style-name="P267" draw:layer="layout" svg:width="0.026cm" svg:height="0.028cm" svg:x="9.567cm" svg:y="6.174cm" svg:viewBox="0 0 27 29" draw:points="0,0 27,0 27,29 0,29">
          <text:p/>
        </draw:polygon>
        <draw:polygon draw:style-name="gr269" draw:text-style-name="P267" draw:layer="layout" svg:width="0.026cm" svg:height="0.028cm" svg:x="9.62cm" svg:y="6.174cm" svg:viewBox="0 0 27 29" draw:points="0,0 27,0 27,29 0,29">
          <text:p/>
        </draw:polygon>
        <draw:polygon draw:style-name="gr269" draw:text-style-name="P267" draw:layer="layout" svg:width="0.026cm" svg:height="0.028cm" svg:x="9.673cm" svg:y="6.174cm" svg:viewBox="0 0 27 29" draw:points="0,0 27,0 27,29 0,29">
          <text:p/>
        </draw:polygon>
        <draw:polygon draw:style-name="gr269" draw:text-style-name="P267" draw:layer="layout" svg:width="0.026cm" svg:height="0.028cm" svg:x="9.726cm" svg:y="6.174cm" svg:viewBox="0 0 27 29" draw:points="0,0 27,0 27,29 0,29">
          <text:p/>
        </draw:polygon>
        <draw:polygon draw:style-name="gr269" draw:text-style-name="P267" draw:layer="layout" svg:width="0.026cm" svg:height="0.028cm" svg:x="9.779cm" svg:y="6.174cm" svg:viewBox="0 0 27 29" draw:points="0,0 27,0 27,29 0,29">
          <text:p/>
        </draw:polygon>
        <draw:polygon draw:style-name="gr269" draw:text-style-name="P267" draw:layer="layout" svg:width="0.026cm" svg:height="0.028cm" svg:x="9.832cm" svg:y="6.174cm" svg:viewBox="0 0 27 29" draw:points="0,0 27,0 27,29 0,29">
          <text:p/>
        </draw:polygon>
        <draw:polygon draw:style-name="gr269" draw:text-style-name="P267" draw:layer="layout" svg:width="0.026cm" svg:height="0.028cm" svg:x="9.885cm" svg:y="6.174cm" svg:viewBox="0 0 27 29" draw:points="0,0 27,0 27,29 0,29">
          <text:p/>
        </draw:polygon>
        <draw:polygon draw:style-name="gr269" draw:text-style-name="P267" draw:layer="layout" svg:width="0.026cm" svg:height="0.028cm" svg:x="9.938cm" svg:y="6.174cm" svg:viewBox="0 0 27 29" draw:points="0,0 27,0 27,29 0,29">
          <text:p/>
        </draw:polygon>
        <draw:polygon draw:style-name="gr269" draw:text-style-name="P267" draw:layer="layout" svg:width="0.026cm" svg:height="0.028cm" svg:x="9.991cm" svg:y="6.174cm" svg:viewBox="0 0 27 29" draw:points="0,0 27,0 27,29 0,29">
          <text:p/>
        </draw:polygon>
        <draw:polygon draw:style-name="gr269" draw:text-style-name="P267" draw:layer="layout" svg:width="0.026cm" svg:height="0.028cm" svg:x="10.044cm" svg:y="6.174cm" svg:viewBox="0 0 27 29" draw:points="0,0 27,0 27,29 0,29">
          <text:p/>
        </draw:polygon>
        <draw:polygon draw:style-name="gr269" draw:text-style-name="P267" draw:layer="layout" svg:width="0.026cm" svg:height="0.028cm" svg:x="10.097cm" svg:y="6.174cm" svg:viewBox="0 0 27 29" draw:points="0,0 27,0 27,29 0,29">
          <text:p/>
        </draw:polygon>
        <draw:polygon draw:style-name="gr269" draw:text-style-name="P267" draw:layer="layout" svg:width="0.026cm" svg:height="0.028cm" svg:x="10.15cm" svg:y="6.174cm" svg:viewBox="0 0 27 29" draw:points="0,0 27,0 27,29 0,29">
          <text:p/>
        </draw:polygon>
        <draw:polygon draw:style-name="gr269" draw:text-style-name="P267" draw:layer="layout" svg:width="0.026cm" svg:height="0.028cm" svg:x="10.203cm" svg:y="6.174cm" svg:viewBox="0 0 27 29" draw:points="0,0 27,0 27,29 0,29">
          <text:p/>
        </draw:polygon>
        <draw:polygon draw:style-name="gr269" draw:text-style-name="P267" draw:layer="layout" svg:width="0.026cm" svg:height="0.028cm" svg:x="10.256cm" svg:y="6.174cm" svg:viewBox="0 0 27 29" draw:points="0,0 27,0 27,29 0,29">
          <text:p/>
        </draw:polygon>
        <draw:polygon draw:style-name="gr269" draw:text-style-name="P267" draw:layer="layout" svg:width="0.026cm" svg:height="0.028cm" svg:x="10.309cm" svg:y="6.174cm" svg:viewBox="0 0 27 29" draw:points="0,0 27,0 27,29 0,29">
          <text:p/>
        </draw:polygon>
        <draw:polygon draw:style-name="gr269" draw:text-style-name="P267" draw:layer="layout" svg:width="0.026cm" svg:height="0.028cm" svg:x="10.362cm" svg:y="6.174cm" svg:viewBox="0 0 27 29" draw:points="0,0 27,0 27,29 0,29">
          <text:p/>
        </draw:polygon>
        <draw:polygon draw:style-name="gr269" draw:text-style-name="P267" draw:layer="layout" svg:width="0.026cm" svg:height="0.028cm" svg:x="10.415cm" svg:y="6.174cm" svg:viewBox="0 0 27 29" draw:points="0,0 27,0 27,29 0,29">
          <text:p/>
        </draw:polygon>
        <draw:polygon draw:style-name="gr269" draw:text-style-name="P267" draw:layer="layout" svg:width="0.026cm" svg:height="0.028cm" svg:x="10.468cm" svg:y="6.174cm" svg:viewBox="0 0 27 29" draw:points="0,0 27,0 27,29 0,29">
          <text:p/>
        </draw:polygon>
        <draw:polygon draw:style-name="gr269" draw:text-style-name="P267" draw:layer="layout" svg:width="0.026cm" svg:height="0.028cm" svg:x="10.521cm" svg:y="6.174cm" svg:viewBox="0 0 27 29" draw:points="0,0 27,0 27,29 0,29">
          <text:p/>
        </draw:polygon>
        <draw:polygon draw:style-name="gr269" draw:text-style-name="P267" draw:layer="layout" svg:width="0.026cm" svg:height="0.028cm" svg:x="10.574cm" svg:y="6.174cm" svg:viewBox="0 0 27 29" draw:points="0,0 27,0 27,29 0,29">
          <text:p/>
        </draw:polygon>
        <draw:polygon draw:style-name="gr269" draw:text-style-name="P267" draw:layer="layout" svg:width="0.026cm" svg:height="0.028cm" svg:x="10.627cm" svg:y="6.174cm" svg:viewBox="0 0 27 29" draw:points="0,0 27,0 27,29 0,29">
          <text:p/>
        </draw:polygon>
        <draw:polygon draw:style-name="gr269" draw:text-style-name="P267" draw:layer="layout" svg:width="0.026cm" svg:height="0.028cm" svg:x="10.68cm" svg:y="6.174cm" svg:viewBox="0 0 27 29" draw:points="0,0 27,0 27,29 0,29">
          <text:p/>
        </draw:polygon>
        <draw:polygon draw:style-name="gr269" draw:text-style-name="P267" draw:layer="layout" svg:width="0.026cm" svg:height="0.028cm" svg:x="10.733cm" svg:y="6.174cm" svg:viewBox="0 0 27 29" draw:points="0,0 27,0 27,29 0,29">
          <text:p/>
        </draw:polygon>
        <draw:polygon draw:style-name="gr269" draw:text-style-name="P267" draw:layer="layout" svg:width="0.026cm" svg:height="0.028cm" svg:x="10.786cm" svg:y="6.174cm" svg:viewBox="0 0 27 29" draw:points="0,0 27,0 27,29 0,29">
          <text:p/>
        </draw:polygon>
        <draw:polygon draw:style-name="gr269" draw:text-style-name="P267" draw:layer="layout" svg:width="0.026cm" svg:height="0.028cm" svg:x="10.839cm" svg:y="6.174cm" svg:viewBox="0 0 27 29" draw:points="0,0 27,0 27,29 0,29">
          <text:p/>
        </draw:polygon>
        <draw:polygon draw:style-name="gr269" draw:text-style-name="P267" draw:layer="layout" svg:width="0.026cm" svg:height="0.028cm" svg:x="10.892cm" svg:y="6.174cm" svg:viewBox="0 0 27 29" draw:points="0,0 27,0 27,29 0,29">
          <text:p/>
        </draw:polygon>
        <draw:polygon draw:style-name="gr269" draw:text-style-name="P267" draw:layer="layout" svg:width="0.026cm" svg:height="0.028cm" svg:x="10.945cm" svg:y="6.174cm" svg:viewBox="0 0 27 29" draw:points="0,0 27,0 27,29 0,29">
          <text:p/>
        </draw:polygon>
        <draw:polygon draw:style-name="gr269" draw:text-style-name="P267" draw:layer="layout" svg:width="0.026cm" svg:height="0.028cm" svg:x="10.998cm" svg:y="6.174cm" svg:viewBox="0 0 27 29" draw:points="0,0 27,0 27,29 0,29">
          <text:p/>
        </draw:polygon>
        <draw:polygon draw:style-name="gr269" draw:text-style-name="P267" draw:layer="layout" svg:width="0.026cm" svg:height="0.028cm" svg:x="11.051cm" svg:y="6.174cm" svg:viewBox="0 0 27 29" draw:points="0,0 27,0 27,29 0,29">
          <text:p/>
        </draw:polygon>
        <draw:polygon draw:style-name="gr269" draw:text-style-name="P267" draw:layer="layout" svg:width="0.026cm" svg:height="0.028cm" svg:x="11.104cm" svg:y="6.174cm" svg:viewBox="0 0 27 29" draw:points="0,0 27,0 27,29 0,29">
          <text:p/>
        </draw:polygon>
        <draw:polygon draw:style-name="gr269" draw:text-style-name="P267" draw:layer="layout" svg:width="0.026cm" svg:height="0.028cm" svg:x="11.157cm" svg:y="6.174cm" svg:viewBox="0 0 27 29" draw:points="0,0 27,0 27,29 0,29">
          <text:p/>
        </draw:polygon>
        <draw:polygon draw:style-name="gr269" draw:text-style-name="P267" draw:layer="layout" svg:width="0.026cm" svg:height="0.028cm" svg:x="11.21cm" svg:y="6.174cm" svg:viewBox="0 0 27 29" draw:points="0,0 27,0 27,29 0,29">
          <text:p/>
        </draw:polygon>
        <draw:polygon draw:style-name="gr269" draw:text-style-name="P267" draw:layer="layout" svg:width="0.026cm" svg:height="0.028cm" svg:x="11.263cm" svg:y="6.174cm" svg:viewBox="0 0 27 29" draw:points="0,0 27,0 27,29 0,29">
          <text:p/>
        </draw:polygon>
        <draw:polygon draw:style-name="gr269" draw:text-style-name="P267" draw:layer="layout" svg:width="0.026cm" svg:height="0.028cm" svg:x="11.316cm" svg:y="6.174cm" svg:viewBox="0 0 27 29" draw:points="0,0 27,0 27,29 0,29">
          <text:p/>
        </draw:polygon>
        <draw:polygon draw:style-name="gr269" draw:text-style-name="P267" draw:layer="layout" svg:width="0.026cm" svg:height="0.028cm" svg:x="11.369cm" svg:y="6.174cm" svg:viewBox="0 0 27 29" draw:points="0,0 27,0 27,29 0,29">
          <text:p/>
        </draw:polygon>
        <draw:polygon draw:style-name="gr269" draw:text-style-name="P267" draw:layer="layout" svg:width="0.026cm" svg:height="0.028cm" svg:x="11.422cm" svg:y="6.174cm" svg:viewBox="0 0 27 29" draw:points="0,0 27,0 27,29 0,29">
          <text:p/>
        </draw:polygon>
        <draw:polygon draw:style-name="gr269" draw:text-style-name="P267" draw:layer="layout" svg:width="0.026cm" svg:height="0.028cm" svg:x="11.475cm" svg:y="6.174cm" svg:viewBox="0 0 27 29" draw:points="0,0 27,0 27,29 0,29">
          <text:p/>
        </draw:polygon>
        <draw:polygon draw:style-name="gr269" draw:text-style-name="P267" draw:layer="layout" svg:width="0.026cm" svg:height="0.028cm" svg:x="11.528cm" svg:y="6.174cm" svg:viewBox="0 0 27 29" draw:points="0,0 27,0 27,29 0,29">
          <text:p/>
        </draw:polygon>
        <draw:polygon draw:style-name="gr269" draw:text-style-name="P267" draw:layer="layout" svg:width="0.026cm" svg:height="0.028cm" svg:x="11.581cm" svg:y="6.174cm" svg:viewBox="0 0 27 29" draw:points="0,0 27,0 27,29 0,29">
          <text:p/>
        </draw:polygon>
        <draw:polygon draw:style-name="gr269" draw:text-style-name="P267" draw:layer="layout" svg:width="0.026cm" svg:height="0.028cm" svg:x="11.634cm" svg:y="6.174cm" svg:viewBox="0 0 27 29" draw:points="0,0 27,0 27,29 0,29">
          <text:p/>
        </draw:polygon>
        <draw:polygon draw:style-name="gr269" draw:text-style-name="P267" draw:layer="layout" svg:width="0.026cm" svg:height="0.028cm" svg:x="11.687cm" svg:y="6.174cm" svg:viewBox="0 0 27 29" draw:points="0,0 27,0 27,29 0,29">
          <text:p/>
        </draw:polygon>
        <draw:polygon draw:style-name="gr269" draw:text-style-name="P267" draw:layer="layout" svg:width="0.026cm" svg:height="0.028cm" svg:x="11.74cm" svg:y="6.174cm" svg:viewBox="0 0 27 29" draw:points="0,0 27,0 27,29 0,29">
          <text:p/>
        </draw:polygon>
        <draw:polygon draw:style-name="gr269" draw:text-style-name="P267" draw:layer="layout" svg:width="0.026cm" svg:height="0.028cm" svg:x="11.793cm" svg:y="6.174cm" svg:viewBox="0 0 27 29" draw:points="0,0 27,0 27,29 0,29">
          <text:p/>
        </draw:polygon>
        <draw:polygon draw:style-name="gr269" draw:text-style-name="P267" draw:layer="layout" svg:width="0.026cm" svg:height="0.028cm" svg:x="11.846cm" svg:y="6.174cm" svg:viewBox="0 0 27 29" draw:points="0,0 27,0 27,29 0,29">
          <text:p/>
        </draw:polygon>
        <draw:polygon draw:style-name="gr269" draw:text-style-name="P267" draw:layer="layout" svg:width="0.026cm" svg:height="0.028cm" svg:x="11.899cm" svg:y="6.174cm" svg:viewBox="0 0 27 29" draw:points="0,0 27,0 27,29 0,29">
          <text:p/>
        </draw:polygon>
        <draw:polygon draw:style-name="gr269" draw:text-style-name="P267" draw:layer="layout" svg:width="0.026cm" svg:height="0.028cm" svg:x="11.952cm" svg:y="6.174cm" svg:viewBox="0 0 27 29" draw:points="0,0 27,0 27,29 0,29">
          <text:p/>
        </draw:polygon>
        <draw:polygon draw:style-name="gr269" draw:text-style-name="P267" draw:layer="layout" svg:width="0.026cm" svg:height="0.028cm" svg:x="12.005cm" svg:y="6.174cm" svg:viewBox="0 0 27 29" draw:points="0,0 27,0 27,29 0,29">
          <text:p/>
        </draw:polygon>
        <draw:polygon draw:style-name="gr269" draw:text-style-name="P267" draw:layer="layout" svg:width="0.026cm" svg:height="0.028cm" svg:x="12.058cm" svg:y="6.174cm" svg:viewBox="0 0 27 29" draw:points="0,0 27,0 27,29 0,29">
          <text:p/>
        </draw:polygon>
        <draw:polygon draw:style-name="gr269" draw:text-style-name="P267" draw:layer="layout" svg:width="0.026cm" svg:height="0.028cm" svg:x="12.111cm" svg:y="6.174cm" svg:viewBox="0 0 27 29" draw:points="0,0 27,0 27,29 0,29">
          <text:p/>
        </draw:polygon>
        <draw:polygon draw:style-name="gr269" draw:text-style-name="P267" draw:layer="layout" svg:width="0.026cm" svg:height="0.028cm" svg:x="12.164cm" svg:y="6.174cm" svg:viewBox="0 0 27 29" draw:points="0,0 27,0 27,29 0,29">
          <text:p/>
        </draw:polygon>
        <draw:polygon draw:style-name="gr269" draw:text-style-name="P267" draw:layer="layout" svg:width="0.026cm" svg:height="0.028cm" svg:x="12.217cm" svg:y="6.174cm" svg:viewBox="0 0 27 29" draw:points="0,0 27,0 27,29 0,29">
          <text:p/>
        </draw:polygon>
        <draw:polygon draw:style-name="gr269" draw:text-style-name="P267" draw:layer="layout" svg:width="0.026cm" svg:height="0.028cm" svg:x="12.27cm" svg:y="6.174cm" svg:viewBox="0 0 27 29" draw:points="0,0 27,0 27,29 0,29">
          <text:p/>
        </draw:polygon>
        <draw:polygon draw:style-name="gr269" draw:text-style-name="P267" draw:layer="layout" svg:width="0.026cm" svg:height="0.028cm" svg:x="12.323cm" svg:y="6.174cm" svg:viewBox="0 0 27 29" draw:points="0,0 27,0 27,29 0,29">
          <text:p/>
        </draw:polygon>
        <draw:polygon draw:style-name="gr269" draw:text-style-name="P267" draw:layer="layout" svg:width="0.026cm" svg:height="0.028cm" svg:x="12.376cm" svg:y="6.174cm" svg:viewBox="0 0 27 29" draw:points="0,0 27,0 27,29 0,29">
          <text:p/>
        </draw:polygon>
        <draw:polygon draw:style-name="gr269" draw:text-style-name="P267" draw:layer="layout" svg:width="0.026cm" svg:height="0.028cm" svg:x="12.429cm" svg:y="6.174cm" svg:viewBox="0 0 27 29" draw:points="0,0 27,0 27,29 0,29">
          <text:p/>
        </draw:polygon>
        <draw:polygon draw:style-name="gr269" draw:text-style-name="P267" draw:layer="layout" svg:width="0.026cm" svg:height="0.028cm" svg:x="12.482cm" svg:y="6.174cm" svg:viewBox="0 0 27 29" draw:points="0,0 27,0 27,29 0,29">
          <text:p/>
        </draw:polygon>
        <draw:polygon draw:style-name="gr269" draw:text-style-name="P267" draw:layer="layout" svg:width="0.026cm" svg:height="0.028cm" svg:x="12.535cm" svg:y="6.174cm" svg:viewBox="0 0 27 29" draw:points="0,0 27,0 27,29 0,29">
          <text:p/>
        </draw:polygon>
        <draw:polygon draw:style-name="gr269" draw:text-style-name="P267" draw:layer="layout" svg:width="0.026cm" svg:height="0.028cm" svg:x="12.588cm" svg:y="6.174cm" svg:viewBox="0 0 27 29" draw:points="0,0 27,0 27,29 0,29">
          <text:p/>
        </draw:polygon>
        <draw:polygon draw:style-name="gr269" draw:text-style-name="P267" draw:layer="layout" svg:width="0.026cm" svg:height="0.028cm" svg:x="12.641cm" svg:y="6.174cm" svg:viewBox="0 0 27 29" draw:points="0,0 27,0 27,29 0,29">
          <text:p/>
        </draw:polygon>
        <draw:polygon draw:style-name="gr269" draw:text-style-name="P267" draw:layer="layout" svg:width="0.027cm" svg:height="0.028cm" svg:x="12.694cm" svg:y="6.174cm" svg:viewBox="0 0 28 29" draw:points="0,0 28,0 28,29 0,29">
          <text:p/>
        </draw:polygon>
        <draw:polygon draw:style-name="gr269" draw:text-style-name="P267" draw:layer="layout" svg:width="0.027cm" svg:height="0.028cm" svg:x="12.747cm" svg:y="6.174cm" svg:viewBox="0 0 28 29" draw:points="0,0 28,0 28,29 0,29">
          <text:p/>
        </draw:polygon>
        <draw:polygon draw:style-name="gr269" draw:text-style-name="P267" draw:layer="layout" svg:width="0.027cm" svg:height="0.028cm" svg:x="12.8cm" svg:y="6.174cm" svg:viewBox="0 0 28 29" draw:points="0,0 28,0 28,29 0,29">
          <text:p/>
        </draw:polygon>
        <draw:polygon draw:style-name="gr269" draw:text-style-name="P267" draw:layer="layout" svg:width="0.027cm" svg:height="0.028cm" svg:x="12.853cm" svg:y="6.174cm" svg:viewBox="0 0 28 29" draw:points="0,0 28,0 28,29 0,29">
          <text:p/>
        </draw:polygon>
        <draw:polygon draw:style-name="gr269" draw:text-style-name="P267" draw:layer="layout" svg:width="0.027cm" svg:height="0.028cm" svg:x="12.906cm" svg:y="6.174cm" svg:viewBox="0 0 28 29" draw:points="0,0 28,0 28,29 0,29">
          <text:p/>
        </draw:polygon>
        <draw:polygon draw:style-name="gr269" draw:text-style-name="P267" draw:layer="layout" svg:width="0.027cm" svg:height="0.028cm" svg:x="12.959cm" svg:y="6.174cm" svg:viewBox="0 0 28 29" draw:points="0,0 28,0 28,29 0,29">
          <text:p/>
        </draw:polygon>
        <draw:polygon draw:style-name="gr269" draw:text-style-name="P267" draw:layer="layout" svg:width="0.028cm" svg:height="0.028cm" svg:x="13.012cm" svg:y="6.174cm" svg:viewBox="0 0 29 29" draw:points="0,0 29,0 29,29 0,29">
          <text:p/>
        </draw:polygon>
        <draw:polygon draw:style-name="gr269" draw:text-style-name="P267" draw:layer="layout" svg:width="0.027cm" svg:height="0.028cm" svg:x="13.065cm" svg:y="6.174cm" svg:viewBox="0 0 28 29" draw:points="0,0 28,0 28,29 0,29">
          <text:p/>
        </draw:polygon>
        <draw:polygon draw:style-name="gr269" draw:text-style-name="P267" draw:layer="layout" svg:width="0.027cm" svg:height="0.028cm" svg:x="13.118cm" svg:y="6.174cm" svg:viewBox="0 0 28 29" draw:points="0,0 28,0 28,29 0,29">
          <text:p/>
        </draw:polygon>
        <draw:polygon draw:style-name="gr269" draw:text-style-name="P267" draw:layer="layout" svg:width="0.027cm" svg:height="0.028cm" svg:x="13.171cm" svg:y="6.174cm" svg:viewBox="0 0 28 29" draw:points="0,0 28,0 28,29 0,29">
          <text:p/>
        </draw:polygon>
        <draw:polygon draw:style-name="gr269" draw:text-style-name="P267" draw:layer="layout" svg:width="0.027cm" svg:height="0.028cm" svg:x="13.224cm" svg:y="6.174cm" svg:viewBox="0 0 28 29" draw:points="0,0 28,0 28,29 0,29">
          <text:p/>
        </draw:polygon>
        <draw:polygon draw:style-name="gr269" draw:text-style-name="P267" draw:layer="layout" svg:width="0.027cm" svg:height="0.028cm" svg:x="13.277cm" svg:y="6.174cm" svg:viewBox="0 0 28 29" draw:points="0,0 28,0 28,29 0,29">
          <text:p/>
        </draw:polygon>
        <draw:polygon draw:style-name="gr269" draw:text-style-name="P267" draw:layer="layout" svg:width="0.027cm" svg:height="0.028cm" svg:x="13.33cm" svg:y="6.174cm" svg:viewBox="0 0 28 29" draw:points="0,0 28,0 28,29 0,29">
          <text:p/>
        </draw:polygon>
        <draw:polygon draw:style-name="gr269" draw:text-style-name="P267" draw:layer="layout" svg:width="0.027cm" svg:height="0.028cm" svg:x="13.383cm" svg:y="6.174cm" svg:viewBox="0 0 28 29" draw:points="0,0 28,0 28,29 0,29">
          <text:p/>
        </draw:polygon>
        <draw:polygon draw:style-name="gr269" draw:text-style-name="P267" draw:layer="layout" svg:width="0.027cm" svg:height="0.028cm" svg:x="13.436cm" svg:y="6.174cm" svg:viewBox="0 0 28 29" draw:points="0,0 28,0 28,29 0,29">
          <text:p/>
        </draw:polygon>
        <draw:polygon draw:style-name="gr269" draw:text-style-name="P267" draw:layer="layout" svg:width="0.027cm" svg:height="0.028cm" svg:x="13.489cm" svg:y="6.174cm" svg:viewBox="0 0 28 29" draw:points="0,0 28,0 28,29 0,29">
          <text:p/>
        </draw:polygon>
        <draw:polygon draw:style-name="gr269" draw:text-style-name="P267" draw:layer="layout" svg:width="0.027cm" svg:height="0.028cm" svg:x="13.542cm" svg:y="6.174cm" svg:viewBox="0 0 28 29" draw:points="0,0 28,0 28,29 0,29">
          <text:p/>
        </draw:polygon>
        <draw:polygon draw:style-name="gr269" draw:text-style-name="P267" draw:layer="layout" svg:width="0.027cm" svg:height="0.028cm" svg:x="13.595cm" svg:y="6.174cm" svg:viewBox="0 0 28 29" draw:points="0,0 28,0 28,29 0,29">
          <text:p/>
        </draw:polygon>
        <draw:polygon draw:style-name="gr269" draw:text-style-name="P267" draw:layer="layout" svg:width="0.027cm" svg:height="0.028cm" svg:x="13.648cm" svg:y="6.174cm" svg:viewBox="0 0 28 29" draw:points="0,0 28,0 28,29 0,29">
          <text:p/>
        </draw:polygon>
        <draw:polygon draw:style-name="gr269" draw:text-style-name="P267" draw:layer="layout" svg:width="0.027cm" svg:height="0.028cm" svg:x="13.701cm" svg:y="6.174cm" svg:viewBox="0 0 28 29" draw:points="0,0 28,0 28,29 0,29">
          <text:p/>
        </draw:polygon>
        <draw:polygon draw:style-name="gr269" draw:text-style-name="P267" draw:layer="layout" svg:width="0.027cm" svg:height="0.028cm" svg:x="13.754cm" svg:y="6.174cm" svg:viewBox="0 0 28 29" draw:points="0,0 28,0 28,29 0,29">
          <text:p/>
        </draw:polygon>
        <draw:polygon draw:style-name="gr269" draw:text-style-name="P267" draw:layer="layout" svg:width="0.027cm" svg:height="0.028cm" svg:x="13.807cm" svg:y="6.174cm" svg:viewBox="0 0 28 29" draw:points="0,0 28,0 28,29 0,29">
          <text:p/>
        </draw:polygon>
        <draw:polygon draw:style-name="gr269" draw:text-style-name="P267" draw:layer="layout" svg:width="0.027cm" svg:height="0.028cm" svg:x="13.86cm" svg:y="6.174cm" svg:viewBox="0 0 28 29" draw:points="0,0 28,0 28,29 0,29">
          <text:p/>
        </draw:polygon>
        <draw:polygon draw:style-name="gr269" draw:text-style-name="P267" draw:layer="layout" svg:width="0.027cm" svg:height="0.028cm" svg:x="13.913cm" svg:y="6.174cm" svg:viewBox="0 0 28 29" draw:points="0,0 28,0 28,29 0,29">
          <text:p/>
        </draw:polygon>
        <draw:polygon draw:style-name="gr269" draw:text-style-name="P267" draw:layer="layout" svg:width="0.027cm" svg:height="0.028cm" svg:x="13.966cm" svg:y="6.174cm" svg:viewBox="0 0 28 29" draw:points="0,0 28,0 28,29 0,29">
          <text:p/>
        </draw:polygon>
        <draw:polygon draw:style-name="gr269" draw:text-style-name="P267" draw:layer="layout" svg:width="0.027cm" svg:height="0.028cm" svg:x="14.019cm" svg:y="6.174cm" svg:viewBox="0 0 28 29" draw:points="0,0 28,0 28,29 0,29">
          <text:p/>
        </draw:polygon>
        <draw:polygon draw:style-name="gr269" draw:text-style-name="P267" draw:layer="layout" svg:width="0.027cm" svg:height="0.028cm" svg:x="14.072cm" svg:y="6.174cm" svg:viewBox="0 0 28 29" draw:points="0,0 28,0 28,29 0,29">
          <text:p/>
        </draw:polygon>
        <draw:polygon draw:style-name="gr269" draw:text-style-name="P267" draw:layer="layout" svg:width="0.027cm" svg:height="0.028cm" svg:x="14.125cm" svg:y="6.174cm" svg:viewBox="0 0 28 29" draw:points="0,0 28,0 28,29 0,29">
          <text:p/>
        </draw:polygon>
        <draw:polygon draw:style-name="gr269" draw:text-style-name="P267" draw:layer="layout" svg:width="0.027cm" svg:height="0.028cm" svg:x="14.178cm" svg:y="6.174cm" svg:viewBox="0 0 28 29" draw:points="0,0 28,0 28,29 0,29">
          <text:p/>
        </draw:polygon>
        <draw:polygon draw:style-name="gr269" draw:text-style-name="P267" draw:layer="layout" svg:width="0.027cm" svg:height="0.028cm" svg:x="14.231cm" svg:y="6.174cm" svg:viewBox="0 0 28 29" draw:points="0,0 28,0 28,29 0,29">
          <text:p/>
        </draw:polygon>
        <draw:polygon draw:style-name="gr269" draw:text-style-name="P267" draw:layer="layout" svg:width="0.027cm" svg:height="0.028cm" svg:x="14.284cm" svg:y="6.174cm" svg:viewBox="0 0 28 29" draw:points="0,0 28,0 28,29 0,29">
          <text:p/>
        </draw:polygon>
        <draw:polygon draw:style-name="gr269" draw:text-style-name="P267" draw:layer="layout" svg:width="0.027cm" svg:height="0.028cm" svg:x="14.337cm" svg:y="6.174cm" svg:viewBox="0 0 28 29" draw:points="0,0 28,0 28,29 0,29">
          <text:p/>
        </draw:polygon>
        <draw:polygon draw:style-name="gr269" draw:text-style-name="P267" draw:layer="layout" svg:width="0.028cm" svg:height="0.028cm" svg:x="14.39cm" svg:y="6.174cm" svg:viewBox="0 0 29 29" draw:points="0,0 29,0 29,29 0,29">
          <text:p/>
        </draw:polygon>
        <draw:polygon draw:style-name="gr269" draw:text-style-name="P267" draw:layer="layout" svg:width="0.027cm" svg:height="0.028cm" svg:x="14.443cm" svg:y="6.174cm" svg:viewBox="0 0 28 29" draw:points="0,0 28,0 28,29 0,29">
          <text:p/>
        </draw:polygon>
        <draw:polygon draw:style-name="gr269" draw:text-style-name="P267" draw:layer="layout" svg:width="0.027cm" svg:height="0.028cm" svg:x="14.496cm" svg:y="6.174cm" svg:viewBox="0 0 28 29" draw:points="0,0 28,0 28,29 0,29">
          <text:p/>
        </draw:polygon>
        <draw:polygon draw:style-name="gr269" draw:text-style-name="P267" draw:layer="layout" svg:width="0.027cm" svg:height="0.028cm" svg:x="14.549cm" svg:y="6.174cm" svg:viewBox="0 0 28 29" draw:points="0,0 28,0 28,29 0,29">
          <text:p/>
        </draw:polygon>
        <draw:polygon draw:style-name="gr269" draw:text-style-name="P267" draw:layer="layout" svg:width="0.027cm" svg:height="0.028cm" svg:x="14.602cm" svg:y="6.174cm" svg:viewBox="0 0 28 29" draw:points="0,0 28,0 28,29 0,29">
          <text:p/>
        </draw:polygon>
        <draw:polygon draw:style-name="gr269" draw:text-style-name="P267" draw:layer="layout" svg:width="0.027cm" svg:height="0.028cm" svg:x="14.655cm" svg:y="6.174cm" svg:viewBox="0 0 28 29" draw:points="0,0 28,0 28,29 0,29">
          <text:p/>
        </draw:polygon>
        <draw:polygon draw:style-name="gr269" draw:text-style-name="P267" draw:layer="layout" svg:width="0.027cm" svg:height="0.028cm" svg:x="14.708cm" svg:y="6.174cm" svg:viewBox="0 0 28 29" draw:points="0,0 28,0 28,29 0,29">
          <text:p/>
        </draw:polygon>
        <draw:polygon draw:style-name="gr269" draw:text-style-name="P267" draw:layer="layout" svg:width="0.027cm" svg:height="0.028cm" svg:x="14.761cm" svg:y="6.174cm" svg:viewBox="0 0 28 29" draw:points="0,0 28,0 28,29 0,29">
          <text:p/>
        </draw:polygon>
        <draw:polygon draw:style-name="gr269" draw:text-style-name="P267" draw:layer="layout" svg:width="0.027cm" svg:height="0.028cm" svg:x="14.814cm" svg:y="6.174cm" svg:viewBox="0 0 28 29" draw:points="0,0 28,0 28,29 0,29">
          <text:p/>
        </draw:polygon>
        <draw:polygon draw:style-name="gr269" draw:text-style-name="P267" draw:layer="layout" svg:width="0.027cm" svg:height="0.028cm" svg:x="14.867cm" svg:y="6.174cm" svg:viewBox="0 0 28 29" draw:points="0,0 28,0 28,29 0,29">
          <text:p/>
        </draw:polygon>
        <draw:polygon draw:style-name="gr269" draw:text-style-name="P267" draw:layer="layout" svg:width="0.027cm" svg:height="0.028cm" svg:x="14.92cm" svg:y="6.174cm" svg:viewBox="0 0 28 29" draw:points="0,0 28,0 28,29 0,29">
          <text:p/>
        </draw:polygon>
        <draw:polygon draw:style-name="gr269" draw:text-style-name="P267" draw:layer="layout" svg:width="0.027cm" svg:height="0.028cm" svg:x="14.973cm" svg:y="6.174cm" svg:viewBox="0 0 28 29" draw:points="0,0 28,0 28,29 0,29">
          <text:p/>
        </draw:polygon>
        <draw:polygon draw:style-name="gr269" draw:text-style-name="P267" draw:layer="layout" svg:width="0.027cm" svg:height="0.028cm" svg:x="15.026cm" svg:y="6.174cm" svg:viewBox="0 0 28 29" draw:points="0,0 28,0 28,29 0,29">
          <text:p/>
        </draw:polygon>
        <draw:polygon draw:style-name="gr269" draw:text-style-name="P267" draw:layer="layout" svg:width="0.027cm" svg:height="0.028cm" svg:x="15.079cm" svg:y="6.174cm" svg:viewBox="0 0 28 29" draw:points="0,0 28,0 28,29 0,29">
          <text:p/>
        </draw:polygon>
        <draw:polygon draw:style-name="gr269" draw:text-style-name="P267" draw:layer="layout" svg:width="0.027cm" svg:height="0.028cm" svg:x="15.132cm" svg:y="6.174cm" svg:viewBox="0 0 28 29" draw:points="0,0 28,0 28,29 0,29">
          <text:p/>
        </draw:polygon>
        <draw:polygon draw:style-name="gr269" draw:text-style-name="P267" draw:layer="layout" svg:width="0.027cm" svg:height="0.028cm" svg:x="15.185cm" svg:y="6.174cm" svg:viewBox="0 0 28 29" draw:points="0,0 28,0 28,29 0,29">
          <text:p/>
        </draw:polygon>
        <draw:polygon draw:style-name="gr269" draw:text-style-name="P267" draw:layer="layout" svg:width="0.027cm" svg:height="0.028cm" svg:x="15.238cm" svg:y="6.174cm" svg:viewBox="0 0 28 29" draw:points="0,0 28,0 28,29 0,29">
          <text:p/>
        </draw:polygon>
        <draw:polygon draw:style-name="gr269" draw:text-style-name="P267" draw:layer="layout" svg:width="0.027cm" svg:height="0.028cm" svg:x="15.291cm" svg:y="6.174cm" svg:viewBox="0 0 28 29" draw:points="0,0 28,0 28,29 0,29">
          <text:p/>
        </draw:polygon>
        <draw:polygon draw:style-name="gr269" draw:text-style-name="P267" draw:layer="layout" svg:width="0.027cm" svg:height="0.028cm" svg:x="15.344cm" svg:y="6.174cm" svg:viewBox="0 0 28 29" draw:points="0,0 28,0 28,29 0,29">
          <text:p/>
        </draw:polygon>
        <draw:polygon draw:style-name="gr269" draw:text-style-name="P267" draw:layer="layout" svg:width="0.027cm" svg:height="0.028cm" svg:x="15.397cm" svg:y="6.174cm" svg:viewBox="0 0 28 29" draw:points="0,0 28,0 28,29 0,29">
          <text:p/>
        </draw:polygon>
        <draw:polygon draw:style-name="gr269" draw:text-style-name="P267" draw:layer="layout" svg:width="0.027cm" svg:height="0.028cm" svg:x="15.45cm" svg:y="6.174cm" svg:viewBox="0 0 28 29" draw:points="0,0 28,0 28,29 0,29">
          <text:p/>
        </draw:polygon>
        <draw:polygon draw:style-name="gr269" draw:text-style-name="P267" draw:layer="layout" svg:width="0.027cm" svg:height="0.028cm" svg:x="15.503cm" svg:y="6.174cm" svg:viewBox="0 0 28 29" draw:points="0,0 28,0 28,29 0,29">
          <text:p/>
        </draw:polygon>
        <draw:polygon draw:style-name="gr269" draw:text-style-name="P267" draw:layer="layout" svg:width="0.027cm" svg:height="0.028cm" svg:x="15.556cm" svg:y="6.174cm" svg:viewBox="0 0 28 29" draw:points="0,0 28,0 28,29 0,29">
          <text:p/>
        </draw:polygon>
        <draw:polygon draw:style-name="gr269" draw:text-style-name="P267" draw:layer="layout" svg:width="0.027cm" svg:height="0.028cm" svg:x="15.609cm" svg:y="6.174cm" svg:viewBox="0 0 28 29" draw:points="0,0 28,0 28,29 0,29">
          <text:p/>
        </draw:polygon>
        <draw:polygon draw:style-name="gr269" draw:text-style-name="P267" draw:layer="layout" svg:width="0.027cm" svg:height="0.028cm" svg:x="15.662cm" svg:y="6.174cm" svg:viewBox="0 0 28 29" draw:points="0,0 28,0 28,29 0,29">
          <text:p/>
        </draw:polygon>
        <draw:polygon draw:style-name="gr269" draw:text-style-name="P267" draw:layer="layout" svg:width="0.027cm" svg:height="0.028cm" svg:x="15.715cm" svg:y="6.174cm" svg:viewBox="0 0 28 29" draw:points="0,0 28,0 28,29 0,29">
          <text:p/>
        </draw:polygon>
        <draw:polygon draw:style-name="gr269" draw:text-style-name="P267" draw:layer="layout" svg:width="0.028cm" svg:height="0.028cm" svg:x="15.768cm" svg:y="6.174cm" svg:viewBox="0 0 29 29" draw:points="0,0 29,0 29,29 0,29">
          <text:p/>
        </draw:polygon>
        <draw:polygon draw:style-name="gr269" draw:text-style-name="P267" draw:layer="layout" svg:width="0.027cm" svg:height="0.028cm" svg:x="15.821cm" svg:y="6.174cm" svg:viewBox="0 0 28 29" draw:points="0,0 28,0 28,29 0,29">
          <text:p/>
        </draw:polygon>
        <draw:polygon draw:style-name="gr269" draw:text-style-name="P267" draw:layer="layout" svg:width="0.027cm" svg:height="0.028cm" svg:x="15.874cm" svg:y="6.174cm" svg:viewBox="0 0 28 29" draw:points="0,0 28,0 28,29 0,29">
          <text:p/>
        </draw:polygon>
        <draw:polygon draw:style-name="gr269" draw:text-style-name="P267" draw:layer="layout" svg:width="0.027cm" svg:height="0.028cm" svg:x="15.927cm" svg:y="6.174cm" svg:viewBox="0 0 28 29" draw:points="0,0 28,0 28,29 0,29">
          <text:p/>
        </draw:polygon>
        <draw:polygon draw:style-name="gr269" draw:text-style-name="P267" draw:layer="layout" svg:width="0.027cm" svg:height="0.028cm" svg:x="15.98cm" svg:y="6.174cm" svg:viewBox="0 0 28 29" draw:points="0,0 28,0 28,29 0,29">
          <text:p/>
        </draw:polygon>
        <draw:polygon draw:style-name="gr269" draw:text-style-name="P267" draw:layer="layout" svg:width="0.027cm" svg:height="0.028cm" svg:x="16.033cm" svg:y="6.174cm" svg:viewBox="0 0 28 29" draw:points="0,0 28,0 28,29 0,29">
          <text:p/>
        </draw:polygon>
        <draw:polygon draw:style-name="gr269" draw:text-style-name="P267" draw:layer="layout" svg:width="0.027cm" svg:height="0.028cm" svg:x="16.086cm" svg:y="6.174cm" svg:viewBox="0 0 28 29" draw:points="0,0 28,0 28,29 0,29">
          <text:p/>
        </draw:polygon>
        <draw:polygon draw:style-name="gr269" draw:text-style-name="P267" draw:layer="layout" svg:width="0.027cm" svg:height="0.028cm" svg:x="16.139cm" svg:y="6.174cm" svg:viewBox="0 0 28 29" draw:points="0,0 28,0 28,29 0,29">
          <text:p/>
        </draw:polygon>
        <draw:polygon draw:style-name="gr269" draw:text-style-name="P267" draw:layer="layout" svg:width="0.027cm" svg:height="0.028cm" svg:x="16.192cm" svg:y="6.174cm" svg:viewBox="0 0 28 29" draw:points="0,0 28,0 28,29 0,29">
          <text:p/>
        </draw:polygon>
        <draw:polygon draw:style-name="gr269" draw:text-style-name="P267" draw:layer="layout" svg:width="0.027cm" svg:height="0.028cm" svg:x="16.245cm" svg:y="6.174cm" svg:viewBox="0 0 28 29" draw:points="0,0 28,0 28,29 0,29">
          <text:p/>
        </draw:polygon>
        <draw:polygon draw:style-name="gr269" draw:text-style-name="P267" draw:layer="layout" svg:width="0.027cm" svg:height="0.028cm" svg:x="16.298cm" svg:y="6.174cm" svg:viewBox="0 0 28 29" draw:points="0,0 28,0 28,29 0,29">
          <text:p/>
        </draw:polygon>
        <draw:polygon draw:style-name="gr269" draw:text-style-name="P267" draw:layer="layout" svg:width="0.027cm" svg:height="0.028cm" svg:x="16.351cm" svg:y="6.174cm" svg:viewBox="0 0 28 29" draw:points="0,0 28,0 28,29 0,29">
          <text:p/>
        </draw:polygon>
        <draw:polygon draw:style-name="gr269" draw:text-style-name="P267" draw:layer="layout" svg:width="0.027cm" svg:height="0.028cm" svg:x="16.404cm" svg:y="6.174cm" svg:viewBox="0 0 28 29" draw:points="0,0 28,0 28,29 0,29">
          <text:p/>
        </draw:polygon>
        <draw:polygon draw:style-name="gr269" draw:text-style-name="P267" draw:layer="layout" svg:width="0.027cm" svg:height="0.028cm" svg:x="16.457cm" svg:y="6.174cm" svg:viewBox="0 0 28 29" draw:points="0,0 28,0 28,29 0,29">
          <text:p/>
        </draw:polygon>
        <draw:polygon draw:style-name="gr269" draw:text-style-name="P267" draw:layer="layout" svg:width="0.027cm" svg:height="0.028cm" svg:x="16.51cm" svg:y="6.174cm" svg:viewBox="0 0 28 29" draw:points="0,0 28,0 28,29 0,29">
          <text:p/>
        </draw:polygon>
        <draw:polygon draw:style-name="gr269" draw:text-style-name="P267" draw:layer="layout" svg:width="0.027cm" svg:height="0.028cm" svg:x="16.563cm" svg:y="6.174cm" svg:viewBox="0 0 28 29" draw:points="0,0 28,0 28,29 0,29">
          <text:p/>
        </draw:polygon>
        <draw:polygon draw:style-name="gr269" draw:text-style-name="P267" draw:layer="layout" svg:width="0.027cm" svg:height="0.028cm" svg:x="16.616cm" svg:y="6.174cm" svg:viewBox="0 0 28 29" draw:points="0,0 28,0 28,29 0,29">
          <text:p/>
        </draw:polygon>
        <draw:polygon draw:style-name="gr269" draw:text-style-name="P267" draw:layer="layout" svg:width="0.027cm" svg:height="0.028cm" svg:x="16.669cm" svg:y="6.174cm" svg:viewBox="0 0 28 29" draw:points="0,0 28,0 28,29 0,29">
          <text:p/>
        </draw:polygon>
        <draw:polygon draw:style-name="gr269" draw:text-style-name="P267" draw:layer="layout" svg:width="0.027cm" svg:height="0.028cm" svg:x="16.722cm" svg:y="6.174cm" svg:viewBox="0 0 28 29" draw:points="0,0 28,0 28,29 0,29">
          <text:p/>
        </draw:polygon>
        <draw:polygon draw:style-name="gr269" draw:text-style-name="P267" draw:layer="layout" svg:width="0.027cm" svg:height="0.028cm" svg:x="16.775cm" svg:y="6.174cm" svg:viewBox="0 0 28 29" draw:points="0,0 28,0 28,29 0,29">
          <text:p/>
        </draw:polygon>
        <draw:polygon draw:style-name="gr269" draw:text-style-name="P267" draw:layer="layout" svg:width="0.027cm" svg:height="0.028cm" svg:x="16.828cm" svg:y="6.174cm" svg:viewBox="0 0 28 29" draw:points="0,0 28,0 28,29 0,29">
          <text:p/>
        </draw:polygon>
        <draw:polygon draw:style-name="gr269" draw:text-style-name="P267" draw:layer="layout" svg:width="0.027cm" svg:height="0.028cm" svg:x="16.881cm" svg:y="6.174cm" svg:viewBox="0 0 28 29" draw:points="0,0 28,0 28,29 0,29">
          <text:p/>
        </draw:polygon>
        <draw:polygon draw:style-name="gr269" draw:text-style-name="P267" draw:layer="layout" svg:width="0.027cm" svg:height="0.028cm" svg:x="16.934cm" svg:y="6.174cm" svg:viewBox="0 0 28 29" draw:points="0,0 28,0 28,29 0,29">
          <text:p/>
        </draw:polygon>
        <draw:polygon draw:style-name="gr269" draw:text-style-name="P267" draw:layer="layout" svg:width="0.027cm" svg:height="0.028cm" svg:x="16.987cm" svg:y="6.174cm" svg:viewBox="0 0 28 29" draw:points="0,0 28,0 28,29 0,29">
          <text:p/>
        </draw:polygon>
        <draw:polygon draw:style-name="gr269" draw:text-style-name="P267" draw:layer="layout" svg:width="0.027cm" svg:height="0.028cm" svg:x="17.04cm" svg:y="6.174cm" svg:viewBox="0 0 28 29" draw:points="0,0 28,0 28,29 0,29">
          <text:p/>
        </draw:polygon>
        <draw:polygon draw:style-name="gr269" draw:text-style-name="P267" draw:layer="layout" svg:width="0.027cm" svg:height="0.028cm" svg:x="17.093cm" svg:y="6.174cm" svg:viewBox="0 0 28 29" draw:points="0,0 28,0 28,29 0,29">
          <text:p/>
        </draw:polygon>
        <draw:polygon draw:style-name="gr269" draw:text-style-name="P267" draw:layer="layout" svg:width="0.028cm" svg:height="0.028cm" svg:x="17.146cm" svg:y="6.174cm" svg:viewBox="0 0 29 29" draw:points="0,0 29,0 29,29 0,29">
          <text:p/>
        </draw:polygon>
        <draw:polygon draw:style-name="gr269" draw:text-style-name="P267" draw:layer="layout" svg:width="0.027cm" svg:height="0.028cm" svg:x="17.199cm" svg:y="6.174cm" svg:viewBox="0 0 28 29" draw:points="0,0 28,0 28,29 0,29">
          <text:p/>
        </draw:polygon>
        <draw:polygon draw:style-name="gr269" draw:text-style-name="P267" draw:layer="layout" svg:width="0.027cm" svg:height="0.028cm" svg:x="17.252cm" svg:y="6.174cm" svg:viewBox="0 0 28 29" draw:points="0,0 28,0 28,29 0,29">
          <text:p/>
        </draw:polygon>
        <draw:polygon draw:style-name="gr269" draw:text-style-name="P267" draw:layer="layout" svg:width="0.027cm" svg:height="0.028cm" svg:x="17.305cm" svg:y="6.174cm" svg:viewBox="0 0 28 29" draw:points="0,0 28,0 28,29 0,29">
          <text:p/>
        </draw:polygon>
        <draw:polygon draw:style-name="gr269" draw:text-style-name="P267" draw:layer="layout" svg:width="0.027cm" svg:height="0.028cm" svg:x="17.358cm" svg:y="6.174cm" svg:viewBox="0 0 28 29" draw:points="0,0 28,0 28,29 0,29">
          <text:p/>
        </draw:polygon>
        <draw:polygon draw:style-name="gr269" draw:text-style-name="P267" draw:layer="layout" svg:width="0.027cm" svg:height="0.028cm" svg:x="17.411cm" svg:y="6.174cm" svg:viewBox="0 0 28 29" draw:points="0,0 28,0 28,29 0,29">
          <text:p/>
        </draw:polygon>
        <draw:polygon draw:style-name="gr269" draw:text-style-name="P267" draw:layer="layout" svg:width="0.027cm" svg:height="0.028cm" svg:x="17.464cm" svg:y="6.174cm" svg:viewBox="0 0 28 29" draw:points="0,0 28,0 28,29 0,29">
          <text:p/>
        </draw:polygon>
        <draw:polygon draw:style-name="gr269" draw:text-style-name="P267" draw:layer="layout" svg:width="0.027cm" svg:height="0.028cm" svg:x="17.517cm" svg:y="6.174cm" svg:viewBox="0 0 28 29" draw:points="0,0 28,0 28,29 0,29">
          <text:p/>
        </draw:polygon>
        <draw:polygon draw:style-name="gr269" draw:text-style-name="P267" draw:layer="layout" svg:width="0.027cm" svg:height="0.028cm" svg:x="17.57cm" svg:y="6.174cm" svg:viewBox="0 0 28 29" draw:points="0,0 28,0 28,29 0,29">
          <text:p/>
        </draw:polygon>
        <draw:polygon draw:style-name="gr269" draw:text-style-name="P267" draw:layer="layout" svg:width="0.027cm" svg:height="0.028cm" svg:x="17.623cm" svg:y="6.174cm" svg:viewBox="0 0 28 29" draw:points="0,0 28,0 28,29 0,29">
          <text:p/>
        </draw:polygon>
        <draw:polygon draw:style-name="gr269" draw:text-style-name="P267" draw:layer="layout" svg:width="0.027cm" svg:height="0.028cm" svg:x="17.676cm" svg:y="6.174cm" svg:viewBox="0 0 28 29" draw:points="0,0 28,0 28,29 0,29">
          <text:p/>
        </draw:polygon>
        <draw:polygon draw:style-name="gr269" draw:text-style-name="P267" draw:layer="layout" svg:width="0.027cm" svg:height="0.028cm" svg:x="17.729cm" svg:y="6.174cm" svg:viewBox="0 0 28 29" draw:points="0,0 28,0 28,29 0,29">
          <text:p/>
        </draw:polygon>
        <draw:polygon draw:style-name="gr269" draw:text-style-name="P267" draw:layer="layout" svg:width="0.027cm" svg:height="0.028cm" svg:x="17.782cm" svg:y="6.174cm" svg:viewBox="0 0 28 29" draw:points="0,0 28,0 28,29 0,29">
          <text:p/>
        </draw:polygon>
        <draw:polygon draw:style-name="gr269" draw:text-style-name="P267" draw:layer="layout" svg:width="0.027cm" svg:height="0.028cm" svg:x="17.835cm" svg:y="6.174cm" svg:viewBox="0 0 28 29" draw:points="0,0 28,0 28,29 0,29">
          <text:p/>
        </draw:polygon>
        <draw:polygon draw:style-name="gr269" draw:text-style-name="P267" draw:layer="layout" svg:width="0.027cm" svg:height="0.028cm" svg:x="17.888cm" svg:y="6.174cm" svg:viewBox="0 0 28 29" draw:points="0,0 28,0 28,29 0,29">
          <text:p/>
        </draw:polygon>
        <draw:polygon draw:style-name="gr269" draw:text-style-name="P267" draw:layer="layout" svg:width="0.027cm" svg:height="0.028cm" svg:x="17.941cm" svg:y="6.174cm" svg:viewBox="0 0 28 29" draw:points="0,0 28,0 28,29 0,29">
          <text:p/>
        </draw:polygon>
        <draw:polygon draw:style-name="gr269" draw:text-style-name="P267" draw:layer="layout" svg:width="0.027cm" svg:height="0.028cm" svg:x="17.994cm" svg:y="6.174cm" svg:viewBox="0 0 28 29" draw:points="0,0 28,0 28,29 0,29">
          <text:p/>
        </draw:polygon>
        <draw:polygon draw:style-name="gr269" draw:text-style-name="P267" draw:layer="layout" svg:width="0.027cm" svg:height="0.028cm" svg:x="18.047cm" svg:y="6.174cm" svg:viewBox="0 0 28 29" draw:points="0,0 28,0 28,29 0,29">
          <text:p/>
        </draw:polygon>
        <draw:polygon draw:style-name="gr269" draw:text-style-name="P267" draw:layer="layout" svg:width="0.027cm" svg:height="0.028cm" svg:x="18.1cm" svg:y="6.174cm" svg:viewBox="0 0 28 29" draw:points="0,0 28,0 28,29 0,29">
          <text:p/>
        </draw:polygon>
        <draw:polygon draw:style-name="gr269" draw:text-style-name="P267" draw:layer="layout" svg:width="0.027cm" svg:height="0.028cm" svg:x="18.153cm" svg:y="6.174cm" svg:viewBox="0 0 28 29" draw:points="0,0 28,0 28,29 0,29">
          <text:p/>
        </draw:polygon>
        <draw:polygon draw:style-name="gr269" draw:text-style-name="P267" draw:layer="layout" svg:width="0.027cm" svg:height="0.028cm" svg:x="18.206cm" svg:y="6.174cm" svg:viewBox="0 0 28 29" draw:points="0,0 28,0 28,29 0,29">
          <text:p/>
        </draw:polygon>
        <draw:polygon draw:style-name="gr269" draw:text-style-name="P267" draw:layer="layout" svg:width="0.027cm" svg:height="0.028cm" svg:x="18.259cm" svg:y="6.174cm" svg:viewBox="0 0 28 29" draw:points="0,0 28,0 28,29 0,29">
          <text:p/>
        </draw:polygon>
        <draw:polygon draw:style-name="gr269" draw:text-style-name="P267" draw:layer="layout" svg:width="0.027cm" svg:height="0.028cm" svg:x="18.312cm" svg:y="6.174cm" svg:viewBox="0 0 28 29" draw:points="0,0 28,0 28,29 0,29">
          <text:p/>
        </draw:polygon>
        <draw:polygon draw:style-name="gr269" draw:text-style-name="P267" draw:layer="layout" svg:width="0.027cm" svg:height="0.028cm" svg:x="18.365cm" svg:y="6.174cm" svg:viewBox="0 0 28 29" draw:points="0,0 28,0 28,29 0,29">
          <text:p/>
        </draw:polygon>
        <draw:polygon draw:style-name="gr269" draw:text-style-name="P267" draw:layer="layout" svg:width="0.027cm" svg:height="0.028cm" svg:x="18.418cm" svg:y="6.174cm" svg:viewBox="0 0 28 29" draw:points="0,0 28,0 28,29 0,29">
          <text:p/>
        </draw:polygon>
        <draw:polygon draw:style-name="gr269" draw:text-style-name="P267" draw:layer="layout" svg:width="0.027cm" svg:height="0.028cm" svg:x="18.471cm" svg:y="6.174cm" svg:viewBox="0 0 28 29" draw:points="0,0 28,0 28,29 0,29">
          <text:p/>
        </draw:polygon>
        <draw:polygon draw:style-name="gr269" draw:text-style-name="P267" draw:layer="layout" svg:width="0.028cm" svg:height="0.028cm" svg:x="18.524cm" svg:y="6.174cm" svg:viewBox="0 0 29 29" draw:points="0,0 29,0 29,29 0,29">
          <text:p/>
        </draw:polygon>
        <draw:polygon draw:style-name="gr269" draw:text-style-name="P267" draw:layer="layout" svg:width="0.027cm" svg:height="0.028cm" svg:x="18.577cm" svg:y="6.174cm" svg:viewBox="0 0 28 29" draw:points="0,0 28,0 28,29 0,29">
          <text:p/>
        </draw:polygon>
        <draw:polygon draw:style-name="gr269" draw:text-style-name="P267" draw:layer="layout" svg:width="0.027cm" svg:height="0.028cm" svg:x="18.63cm" svg:y="6.174cm" svg:viewBox="0 0 28 29" draw:points="0,0 28,0 28,29 0,29">
          <text:p/>
        </draw:polygon>
        <draw:polygon draw:style-name="gr269" draw:text-style-name="P267" draw:layer="layout" svg:width="0.027cm" svg:height="0.028cm" svg:x="18.683cm" svg:y="6.174cm" svg:viewBox="0 0 28 29" draw:points="0,0 28,0 28,29 0,29">
          <text:p/>
        </draw:polygon>
        <draw:polygon draw:style-name="gr269" draw:text-style-name="P267" draw:layer="layout" svg:width="0.027cm" svg:height="0.028cm" svg:x="18.736cm" svg:y="6.174cm" svg:viewBox="0 0 28 29" draw:points="0,0 28,0 28,29 0,29">
          <text:p/>
        </draw:polygon>
        <draw:polygon draw:style-name="gr269" draw:text-style-name="P267" draw:layer="layout" svg:width="0.027cm" svg:height="0.028cm" svg:x="18.789cm" svg:y="6.174cm" svg:viewBox="0 0 28 29" draw:points="0,0 28,0 28,29 0,29">
          <text:p/>
        </draw:polygon>
        <draw:polygon draw:style-name="gr269" draw:text-style-name="P267" draw:layer="layout" svg:width="0.027cm" svg:height="0.028cm" svg:x="18.842cm" svg:y="6.174cm" svg:viewBox="0 0 28 29" draw:points="0,0 28,0 28,29 0,29">
          <text:p/>
        </draw:polygon>
        <draw:polygon draw:style-name="gr269" draw:text-style-name="P267" draw:layer="layout" svg:width="0.027cm" svg:height="0.028cm" svg:x="18.895cm" svg:y="6.174cm" svg:viewBox="0 0 28 29" draw:points="0,0 28,0 28,29 0,29">
          <text:p/>
        </draw:polygon>
        <draw:polygon draw:style-name="gr269" draw:text-style-name="P267" draw:layer="layout" svg:width="0.027cm" svg:height="0.028cm" svg:x="18.948cm" svg:y="6.174cm" svg:viewBox="0 0 28 29" draw:points="0,0 28,0 28,29 0,29">
          <text:p/>
        </draw:polygon>
        <draw:polygon draw:style-name="gr269" draw:text-style-name="P267" draw:layer="layout" svg:width="0.027cm" svg:height="0.028cm" svg:x="19.001cm" svg:y="6.174cm" svg:viewBox="0 0 28 29" draw:points="0,0 28,0 28,29 0,29">
          <text:p/>
        </draw:polygon>
        <draw:polygon draw:style-name="gr269" draw:text-style-name="P267" draw:layer="layout" svg:width="0.053cm" svg:height="0.027cm" svg:x="2.014cm" svg:y="7.155cm" svg:viewBox="0 0 54 28" draw:points="0,0 54,0 54,28 0,28">
          <text:p/>
        </draw:polygon>
        <draw:polygon draw:style-name="gr269" draw:text-style-name="P267" draw:layer="layout" svg:width="0.027cm" svg:height="0.027cm" svg:x="2.093cm" svg:y="7.155cm" svg:viewBox="0 0 28 28" draw:points="0,0 28,0 28,28 0,28">
          <text:p/>
        </draw:polygon>
        <draw:polygon draw:style-name="gr269" draw:text-style-name="P267" draw:layer="layout" svg:width="0.027cm" svg:height="0.027cm" svg:x="2.146cm" svg:y="7.155cm" svg:viewBox="0 0 28 28" draw:points="0,0 28,0 28,28 0,28">
          <text:p/>
        </draw:polygon>
        <draw:polygon draw:style-name="gr269" draw:text-style-name="P267" draw:layer="layout" svg:width="0.027cm" svg:height="0.027cm" svg:x="2.199cm" svg:y="7.155cm" svg:viewBox="0 0 28 28" draw:points="0,0 28,0 28,28 0,28">
          <text:p/>
        </draw:polygon>
        <draw:polygon draw:style-name="gr269" draw:text-style-name="P267" draw:layer="layout" svg:width="0.027cm" svg:height="0.027cm" svg:x="2.252cm" svg:y="7.155cm" svg:viewBox="0 0 28 28" draw:points="0,0 28,0 28,28 0,28">
          <text:p/>
        </draw:polygon>
        <draw:polygon draw:style-name="gr269" draw:text-style-name="P267" draw:layer="layout" svg:width="0.027cm" svg:height="0.027cm" svg:x="2.305cm" svg:y="7.155cm" svg:viewBox="0 0 28 28" draw:points="0,0 28,0 28,28 0,28">
          <text:p/>
        </draw:polygon>
        <draw:polygon draw:style-name="gr269" draw:text-style-name="P267" draw:layer="layout" svg:width="0.027cm" svg:height="0.027cm" svg:x="2.358cm" svg:y="7.155cm" svg:viewBox="0 0 28 28" draw:points="0,0 28,0 28,28 0,28">
          <text:p/>
        </draw:polygon>
        <draw:polygon draw:style-name="gr269" draw:text-style-name="P267" draw:layer="layout" svg:width="0.027cm" svg:height="0.027cm" svg:x="2.411cm" svg:y="7.155cm" svg:viewBox="0 0 28 28" draw:points="0,0 28,0 28,28 0,28">
          <text:p/>
        </draw:polygon>
        <draw:polygon draw:style-name="gr269" draw:text-style-name="P267" draw:layer="layout" svg:width="0.027cm" svg:height="0.027cm" svg:x="2.464cm" svg:y="7.155cm" svg:viewBox="0 0 28 28" draw:points="0,0 28,0 28,28 0,28">
          <text:p/>
        </draw:polygon>
        <draw:polygon draw:style-name="gr269" draw:text-style-name="P267" draw:layer="layout" svg:width="0.027cm" svg:height="0.027cm" svg:x="2.517cm" svg:y="7.155cm" svg:viewBox="0 0 28 28" draw:points="0,0 28,0 28,28 0,28">
          <text:p/>
        </draw:polygon>
        <draw:polygon draw:style-name="gr269" draw:text-style-name="P267" draw:layer="layout" svg:width="0.027cm" svg:height="0.027cm" svg:x="2.57cm" svg:y="7.155cm" svg:viewBox="0 0 28 28" draw:points="0,0 28,0 28,28 0,28">
          <text:p/>
        </draw:polygon>
        <draw:polygon draw:style-name="gr269" draw:text-style-name="P267" draw:layer="layout" svg:width="0.027cm" svg:height="0.027cm" svg:x="2.623cm" svg:y="7.155cm" svg:viewBox="0 0 28 28" draw:points="0,0 28,0 28,28 0,28">
          <text:p/>
        </draw:polygon>
        <draw:polygon draw:style-name="gr269" draw:text-style-name="P267" draw:layer="layout" svg:width="0.027cm" svg:height="0.027cm" svg:x="2.676cm" svg:y="7.155cm" svg:viewBox="0 0 28 28" draw:points="0,0 28,0 28,28 0,28">
          <text:p/>
        </draw:polygon>
        <draw:polygon draw:style-name="gr269" draw:text-style-name="P267" draw:layer="layout" svg:width="0.027cm" svg:height="0.027cm" svg:x="2.729cm" svg:y="7.155cm" svg:viewBox="0 0 28 28" draw:points="0,0 28,0 28,28 0,28">
          <text:p/>
        </draw:polygon>
        <draw:polygon draw:style-name="gr269" draw:text-style-name="P267" draw:layer="layout" svg:width="0.027cm" svg:height="0.027cm" svg:x="2.782cm" svg:y="7.155cm" svg:viewBox="0 0 28 28" draw:points="0,0 28,0 28,28 0,28">
          <text:p/>
        </draw:polygon>
        <draw:polygon draw:style-name="gr269" draw:text-style-name="P267" draw:layer="layout" svg:width="0.027cm" svg:height="0.027cm" svg:x="2.835cm" svg:y="7.155cm" svg:viewBox="0 0 28 28" draw:points="0,0 28,0 28,28 0,28">
          <text:p/>
        </draw:polygon>
        <draw:polygon draw:style-name="gr269" draw:text-style-name="P267" draw:layer="layout" svg:width="0.027cm" svg:height="0.027cm" svg:x="2.888cm" svg:y="7.155cm" svg:viewBox="0 0 28 28" draw:points="0,0 28,0 28,28 0,28">
          <text:p/>
        </draw:polygon>
        <draw:polygon draw:style-name="gr269" draw:text-style-name="P267" draw:layer="layout" svg:width="0.027cm" svg:height="0.027cm" svg:x="2.941cm" svg:y="7.155cm" svg:viewBox="0 0 28 28" draw:points="0,0 28,0 28,28 0,28">
          <text:p/>
        </draw:polygon>
        <draw:polygon draw:style-name="gr269" draw:text-style-name="P267" draw:layer="layout" svg:width="0.027cm" svg:height="0.027cm" svg:x="2.994cm" svg:y="7.155cm" svg:viewBox="0 0 28 28" draw:points="0,0 28,0 28,28 0,28">
          <text:p/>
        </draw:polygon>
        <draw:polygon draw:style-name="gr269" draw:text-style-name="P267" draw:layer="layout" svg:width="0.027cm" svg:height="0.027cm" svg:x="3.047cm" svg:y="7.155cm" svg:viewBox="0 0 28 28" draw:points="0,0 28,0 28,28 0,28">
          <text:p/>
        </draw:polygon>
        <draw:polygon draw:style-name="gr269" draw:text-style-name="P267" draw:layer="layout" svg:width="0.027cm" svg:height="0.027cm" svg:x="3.1cm" svg:y="7.155cm" svg:viewBox="0 0 28 28" draw:points="0,0 28,0 28,28 0,28">
          <text:p/>
        </draw:polygon>
        <draw:polygon draw:style-name="gr269" draw:text-style-name="P267" draw:layer="layout" svg:width="0.027cm" svg:height="0.027cm" svg:x="3.153cm" svg:y="7.155cm" svg:viewBox="0 0 28 28" draw:points="0,0 28,0 28,28 0,28">
          <text:p/>
        </draw:polygon>
        <draw:polygon draw:style-name="gr269" draw:text-style-name="P267" draw:layer="layout" svg:width="0.027cm" svg:height="0.027cm" svg:x="3.206cm" svg:y="7.155cm" svg:viewBox="0 0 28 28" draw:points="0,0 28,0 28,28 0,28">
          <text:p/>
        </draw:polygon>
        <draw:polygon draw:style-name="gr269" draw:text-style-name="P267" draw:layer="layout" svg:width="0.027cm" svg:height="0.027cm" svg:x="3.259cm" svg:y="7.155cm" svg:viewBox="0 0 28 28" draw:points="0,0 28,0 28,28 0,28">
          <text:p/>
        </draw:polygon>
        <draw:polygon draw:style-name="gr269" draw:text-style-name="P267" draw:layer="layout" svg:width="0.027cm" svg:height="0.027cm" svg:x="3.312cm" svg:y="7.155cm" svg:viewBox="0 0 28 28" draw:points="0,0 28,0 28,28 0,28">
          <text:p/>
        </draw:polygon>
        <draw:polygon draw:style-name="gr269" draw:text-style-name="P267" draw:layer="layout" svg:width="0.027cm" svg:height="0.027cm" svg:x="3.365cm" svg:y="7.155cm" svg:viewBox="0 0 28 28" draw:points="0,0 28,0 28,28 0,28">
          <text:p/>
        </draw:polygon>
        <draw:polygon draw:style-name="gr269" draw:text-style-name="P267" draw:layer="layout" svg:width="0.028cm" svg:height="0.027cm" svg:x="3.418cm" svg:y="7.155cm" svg:viewBox="0 0 29 28" draw:points="0,0 29,0 29,28 0,28">
          <text:p/>
        </draw:polygon>
        <draw:polygon draw:style-name="gr269" draw:text-style-name="P267" draw:layer="layout" svg:width="0.027cm" svg:height="0.027cm" svg:x="3.471cm" svg:y="7.155cm" svg:viewBox="0 0 28 28" draw:points="0,0 28,0 28,28 0,28">
          <text:p/>
        </draw:polygon>
        <draw:polygon draw:style-name="gr269" draw:text-style-name="P267" draw:layer="layout" svg:width="0.027cm" svg:height="0.027cm" svg:x="3.524cm" svg:y="7.155cm" svg:viewBox="0 0 28 28" draw:points="0,0 28,0 28,28 0,28">
          <text:p/>
        </draw:polygon>
        <draw:polygon draw:style-name="gr269" draw:text-style-name="P267" draw:layer="layout" svg:width="0.027cm" svg:height="0.027cm" svg:x="3.577cm" svg:y="7.155cm" svg:viewBox="0 0 28 28" draw:points="0,0 28,0 28,28 0,28">
          <text:p/>
        </draw:polygon>
        <draw:polygon draw:style-name="gr269" draw:text-style-name="P267" draw:layer="layout" svg:width="0.027cm" svg:height="0.027cm" svg:x="3.63cm" svg:y="7.155cm" svg:viewBox="0 0 28 28" draw:points="0,0 28,0 28,28 0,28">
          <text:p/>
        </draw:polygon>
        <draw:polygon draw:style-name="gr269" draw:text-style-name="P267" draw:layer="layout" svg:width="0.027cm" svg:height="0.027cm" svg:x="3.683cm" svg:y="7.155cm" svg:viewBox="0 0 28 28" draw:points="0,0 28,0 28,28 0,28">
          <text:p/>
        </draw:polygon>
        <draw:polygon draw:style-name="gr269" draw:text-style-name="P267" draw:layer="layout" svg:width="0.027cm" svg:height="0.027cm" svg:x="3.736cm" svg:y="7.155cm" svg:viewBox="0 0 28 28" draw:points="0,0 28,0 28,28 0,28">
          <text:p/>
        </draw:polygon>
        <draw:polygon draw:style-name="gr269" draw:text-style-name="P267" draw:layer="layout" svg:width="0.027cm" svg:height="0.027cm" svg:x="3.789cm" svg:y="7.155cm" svg:viewBox="0 0 28 28" draw:points="0,0 28,0 28,28 0,28">
          <text:p/>
        </draw:polygon>
        <draw:polygon draw:style-name="gr269" draw:text-style-name="P267" draw:layer="layout" svg:width="0.027cm" svg:height="0.027cm" svg:x="3.842cm" svg:y="7.155cm" svg:viewBox="0 0 28 28" draw:points="0,0 28,0 28,28 0,28">
          <text:p/>
        </draw:polygon>
        <draw:polygon draw:style-name="gr269" draw:text-style-name="P267" draw:layer="layout" svg:width="0.027cm" svg:height="0.027cm" svg:x="3.895cm" svg:y="7.155cm" svg:viewBox="0 0 28 28" draw:points="0,0 28,0 28,28 0,28">
          <text:p/>
        </draw:polygon>
        <draw:polygon draw:style-name="gr269" draw:text-style-name="P267" draw:layer="layout" svg:width="0.027cm" svg:height="0.027cm" svg:x="3.948cm" svg:y="7.155cm" svg:viewBox="0 0 28 28" draw:points="0,0 28,0 28,28 0,28">
          <text:p/>
        </draw:polygon>
        <draw:polygon draw:style-name="gr269" draw:text-style-name="P267" draw:layer="layout" svg:width="0.027cm" svg:height="0.027cm" svg:x="4.001cm" svg:y="7.155cm" svg:viewBox="0 0 28 28" draw:points="0,0 28,0 28,28 0,28">
          <text:p/>
        </draw:polygon>
        <draw:polygon draw:style-name="gr269" draw:text-style-name="P267" draw:layer="layout" svg:width="0.027cm" svg:height="0.027cm" svg:x="4.054cm" svg:y="7.155cm" svg:viewBox="0 0 28 28" draw:points="0,0 28,0 28,28 0,28">
          <text:p/>
        </draw:polygon>
        <draw:polygon draw:style-name="gr269" draw:text-style-name="P267" draw:layer="layout" svg:width="0.027cm" svg:height="0.027cm" svg:x="4.107cm" svg:y="7.155cm" svg:viewBox="0 0 28 28" draw:points="0,0 28,0 28,28 0,28">
          <text:p/>
        </draw:polygon>
        <draw:polygon draw:style-name="gr269" draw:text-style-name="P267" draw:layer="layout" svg:width="0.027cm" svg:height="0.027cm" svg:x="4.16cm" svg:y="7.155cm" svg:viewBox="0 0 28 28" draw:points="0,0 28,0 28,28 0,28">
          <text:p/>
        </draw:polygon>
        <draw:polygon draw:style-name="gr269" draw:text-style-name="P267" draw:layer="layout" svg:width="0.027cm" svg:height="0.027cm" svg:x="4.213cm" svg:y="7.155cm" svg:viewBox="0 0 28 28" draw:points="0,0 28,0 28,28 0,28">
          <text:p/>
        </draw:polygon>
        <draw:polygon draw:style-name="gr269" draw:text-style-name="P267" draw:layer="layout" svg:width="0.027cm" svg:height="0.027cm" svg:x="4.266cm" svg:y="7.155cm" svg:viewBox="0 0 28 28" draw:points="0,0 28,0 28,28 0,28">
          <text:p/>
        </draw:polygon>
        <draw:polygon draw:style-name="gr269" draw:text-style-name="P267" draw:layer="layout" svg:width="0.027cm" svg:height="0.027cm" svg:x="4.319cm" svg:y="7.155cm" svg:viewBox="0 0 28 28" draw:points="0,0 28,0 28,28 0,28">
          <text:p/>
        </draw:polygon>
        <draw:polygon draw:style-name="gr269" draw:text-style-name="P267" draw:layer="layout" svg:width="0.027cm" svg:height="0.027cm" svg:x="4.372cm" svg:y="7.155cm" svg:viewBox="0 0 28 28" draw:points="0,0 28,0 28,28 0,28">
          <text:p/>
        </draw:polygon>
        <draw:polygon draw:style-name="gr269" draw:text-style-name="P267" draw:layer="layout" svg:width="0.027cm" svg:height="0.027cm" svg:x="4.425cm" svg:y="7.155cm" svg:viewBox="0 0 28 28" draw:points="0,0 28,0 28,28 0,28">
          <text:p/>
        </draw:polygon>
        <draw:polygon draw:style-name="gr269" draw:text-style-name="P267" draw:layer="layout" svg:width="0.027cm" svg:height="0.027cm" svg:x="4.478cm" svg:y="7.155cm" svg:viewBox="0 0 28 28" draw:points="0,0 28,0 28,28 0,28">
          <text:p/>
        </draw:polygon>
        <draw:polygon draw:style-name="gr269" draw:text-style-name="P267" draw:layer="layout" svg:width="0.027cm" svg:height="0.027cm" svg:x="4.531cm" svg:y="7.155cm" svg:viewBox="0 0 28 28" draw:points="0,0 28,0 28,28 0,28">
          <text:p/>
        </draw:polygon>
        <draw:polygon draw:style-name="gr269" draw:text-style-name="P267" draw:layer="layout" svg:width="0.027cm" svg:height="0.027cm" svg:x="4.584cm" svg:y="7.155cm" svg:viewBox="0 0 28 28" draw:points="0,0 28,0 28,28 0,28">
          <text:p/>
        </draw:polygon>
        <draw:polygon draw:style-name="gr269" draw:text-style-name="P267" draw:layer="layout" svg:width="0.027cm" svg:height="0.027cm" svg:x="4.637cm" svg:y="7.155cm" svg:viewBox="0 0 28 28" draw:points="0,0 28,0 28,28 0,28">
          <text:p/>
        </draw:polygon>
        <draw:polygon draw:style-name="gr269" draw:text-style-name="P267" draw:layer="layout" svg:width="0.027cm" svg:height="0.027cm" svg:x="4.69cm" svg:y="7.155cm" svg:viewBox="0 0 28 28" draw:points="0,0 28,0 28,28 0,28">
          <text:p/>
        </draw:polygon>
        <draw:polygon draw:style-name="gr269" draw:text-style-name="P267" draw:layer="layout" svg:width="0.027cm" svg:height="0.027cm" svg:x="4.743cm" svg:y="7.155cm" svg:viewBox="0 0 28 28" draw:points="0,0 28,0 28,28 0,28">
          <text:p/>
        </draw:polygon>
        <draw:polygon draw:style-name="gr269" draw:text-style-name="P267" draw:layer="layout" svg:width="0.028cm" svg:height="0.027cm" svg:x="4.796cm" svg:y="7.155cm" svg:viewBox="0 0 29 28" draw:points="0,0 29,0 29,28 0,28">
          <text:p/>
        </draw:polygon>
        <draw:polygon draw:style-name="gr269" draw:text-style-name="P267" draw:layer="layout" svg:width="0.027cm" svg:height="0.027cm" svg:x="4.849cm" svg:y="7.155cm" svg:viewBox="0 0 28 28" draw:points="0,0 28,0 28,28 0,28">
          <text:p/>
        </draw:polygon>
        <draw:polygon draw:style-name="gr269" draw:text-style-name="P267" draw:layer="layout" svg:width="0.027cm" svg:height="0.027cm" svg:x="4.902cm" svg:y="7.155cm" svg:viewBox="0 0 28 28" draw:points="0,0 28,0 28,28 0,28">
          <text:p/>
        </draw:polygon>
        <draw:polygon draw:style-name="gr269" draw:text-style-name="P267" draw:layer="layout" svg:width="0.027cm" svg:height="0.027cm" svg:x="4.955cm" svg:y="7.155cm" svg:viewBox="0 0 28 28" draw:points="0,0 28,0 28,28 0,28">
          <text:p/>
        </draw:polygon>
        <draw:polygon draw:style-name="gr269" draw:text-style-name="P267" draw:layer="layout" svg:width="0.027cm" svg:height="0.027cm" svg:x="5.008cm" svg:y="7.155cm" svg:viewBox="0 0 28 28" draw:points="0,0 28,0 28,28 0,28">
          <text:p/>
        </draw:polygon>
        <draw:polygon draw:style-name="gr269" draw:text-style-name="P267" draw:layer="layout" svg:width="0.027cm" svg:height="0.027cm" svg:x="5.061cm" svg:y="7.155cm" svg:viewBox="0 0 28 28" draw:points="0,0 28,0 28,28 0,28">
          <text:p/>
        </draw:polygon>
        <draw:polygon draw:style-name="gr269" draw:text-style-name="P267" draw:layer="layout" svg:width="0.027cm" svg:height="0.027cm" svg:x="5.114cm" svg:y="7.155cm" svg:viewBox="0 0 28 28" draw:points="0,0 28,0 28,28 0,28">
          <text:p/>
        </draw:polygon>
        <draw:polygon draw:style-name="gr269" draw:text-style-name="P267" draw:layer="layout" svg:width="0.027cm" svg:height="0.027cm" svg:x="5.167cm" svg:y="7.155cm" svg:viewBox="0 0 28 28" draw:points="0,0 28,0 28,28 0,28">
          <text:p/>
        </draw:polygon>
        <draw:polygon draw:style-name="gr269" draw:text-style-name="P267" draw:layer="layout" svg:width="0.027cm" svg:height="0.027cm" svg:x="5.22cm" svg:y="7.155cm" svg:viewBox="0 0 28 28" draw:points="0,0 28,0 28,28 0,28">
          <text:p/>
        </draw:polygon>
        <draw:polygon draw:style-name="gr269" draw:text-style-name="P267" draw:layer="layout" svg:width="0.027cm" svg:height="0.027cm" svg:x="5.273cm" svg:y="7.155cm" svg:viewBox="0 0 28 28" draw:points="0,0 28,0 28,28 0,28">
          <text:p/>
        </draw:polygon>
        <draw:polygon draw:style-name="gr269" draw:text-style-name="P267" draw:layer="layout" svg:width="0.027cm" svg:height="0.027cm" svg:x="5.326cm" svg:y="7.155cm" svg:viewBox="0 0 28 28" draw:points="0,0 28,0 28,28 0,28">
          <text:p/>
        </draw:polygon>
        <draw:polygon draw:style-name="gr269" draw:text-style-name="P267" draw:layer="layout" svg:width="0.027cm" svg:height="0.027cm" svg:x="5.379cm" svg:y="7.155cm" svg:viewBox="0 0 28 28" draw:points="0,0 28,0 28,28 0,28">
          <text:p/>
        </draw:polygon>
        <draw:polygon draw:style-name="gr269" draw:text-style-name="P267" draw:layer="layout" svg:width="0.027cm" svg:height="0.027cm" svg:x="5.432cm" svg:y="7.155cm" svg:viewBox="0 0 28 28" draw:points="0,0 28,0 28,28 0,28">
          <text:p/>
        </draw:polygon>
        <draw:polygon draw:style-name="gr269" draw:text-style-name="P267" draw:layer="layout" svg:width="0.027cm" svg:height="0.027cm" svg:x="5.485cm" svg:y="7.155cm" svg:viewBox="0 0 28 28" draw:points="0,0 28,0 28,28 0,28">
          <text:p/>
        </draw:polygon>
        <draw:polygon draw:style-name="gr269" draw:text-style-name="P267" draw:layer="layout" svg:width="0.027cm" svg:height="0.027cm" svg:x="5.538cm" svg:y="7.155cm" svg:viewBox="0 0 28 28" draw:points="0,0 28,0 28,28 0,28">
          <text:p/>
        </draw:polygon>
        <draw:polygon draw:style-name="gr269" draw:text-style-name="P267" draw:layer="layout" svg:width="0.027cm" svg:height="0.027cm" svg:x="5.591cm" svg:y="7.155cm" svg:viewBox="0 0 28 28" draw:points="0,0 28,0 28,28 0,28">
          <text:p/>
        </draw:polygon>
        <draw:polygon draw:style-name="gr269" draw:text-style-name="P267" draw:layer="layout" svg:width="0.027cm" svg:height="0.027cm" svg:x="5.644cm" svg:y="7.155cm" svg:viewBox="0 0 28 28" draw:points="0,0 28,0 28,28 0,28">
          <text:p/>
        </draw:polygon>
        <draw:polygon draw:style-name="gr269" draw:text-style-name="P267" draw:layer="layout" svg:width="0.027cm" svg:height="0.027cm" svg:x="5.697cm" svg:y="7.155cm" svg:viewBox="0 0 28 28" draw:points="0,0 28,0 28,28 0,28">
          <text:p/>
        </draw:polygon>
        <draw:polygon draw:style-name="gr269" draw:text-style-name="P267" draw:layer="layout" svg:width="0.027cm" svg:height="0.027cm" svg:x="5.75cm" svg:y="7.155cm" svg:viewBox="0 0 28 28" draw:points="0,0 28,0 28,28 0,28">
          <text:p/>
        </draw:polygon>
        <draw:polygon draw:style-name="gr269" draw:text-style-name="P267" draw:layer="layout" svg:width="0.027cm" svg:height="0.027cm" svg:x="5.803cm" svg:y="7.155cm" svg:viewBox="0 0 28 28" draw:points="0,0 28,0 28,28 0,28">
          <text:p/>
        </draw:polygon>
        <draw:polygon draw:style-name="gr269" draw:text-style-name="P267" draw:layer="layout" svg:width="0.027cm" svg:height="0.027cm" svg:x="5.856cm" svg:y="7.155cm" svg:viewBox="0 0 28 28" draw:points="0,0 28,0 28,28 0,28">
          <text:p/>
        </draw:polygon>
        <draw:polygon draw:style-name="gr269" draw:text-style-name="P267" draw:layer="layout" svg:width="0.027cm" svg:height="0.027cm" svg:x="5.909cm" svg:y="7.155cm" svg:viewBox="0 0 28 28" draw:points="0,0 28,0 28,28 0,28">
          <text:p/>
        </draw:polygon>
        <draw:polygon draw:style-name="gr269" draw:text-style-name="P267" draw:layer="layout" svg:width="0.027cm" svg:height="0.027cm" svg:x="5.962cm" svg:y="7.155cm" svg:viewBox="0 0 28 28" draw:points="0,0 28,0 28,28 0,28">
          <text:p/>
        </draw:polygon>
        <draw:polygon draw:style-name="gr269" draw:text-style-name="P267" draw:layer="layout" svg:width="0.027cm" svg:height="0.027cm" svg:x="6.015cm" svg:y="7.155cm" svg:viewBox="0 0 28 28" draw:points="0,0 28,0 28,28 0,28">
          <text:p/>
        </draw:polygon>
        <draw:polygon draw:style-name="gr269" draw:text-style-name="P267" draw:layer="layout" svg:width="0.027cm" svg:height="0.027cm" svg:x="6.068cm" svg:y="7.155cm" svg:viewBox="0 0 28 28" draw:points="0,0 28,0 28,28 0,28">
          <text:p/>
        </draw:polygon>
        <draw:polygon draw:style-name="gr269" draw:text-style-name="P267" draw:layer="layout" svg:width="0.027cm" svg:height="0.027cm" svg:x="6.121cm" svg:y="7.155cm" svg:viewBox="0 0 28 28" draw:points="0,0 28,0 28,28 0,28">
          <text:p/>
        </draw:polygon>
        <draw:polygon draw:style-name="gr269" draw:text-style-name="P267" draw:layer="layout" svg:width="0.028cm" svg:height="0.027cm" svg:x="6.174cm" svg:y="7.155cm" svg:viewBox="0 0 29 28" draw:points="0,0 29,0 29,28 0,28">
          <text:p/>
        </draw:polygon>
        <draw:polygon draw:style-name="gr269" draw:text-style-name="P267" draw:layer="layout" svg:width="0.027cm" svg:height="0.027cm" svg:x="6.227cm" svg:y="7.155cm" svg:viewBox="0 0 28 28" draw:points="0,0 28,0 28,28 0,28">
          <text:p/>
        </draw:polygon>
        <draw:polygon draw:style-name="gr269" draw:text-style-name="P267" draw:layer="layout" svg:width="0.027cm" svg:height="0.027cm" svg:x="6.28cm" svg:y="7.155cm" svg:viewBox="0 0 28 28" draw:points="0,0 28,0 28,28 0,28">
          <text:p/>
        </draw:polygon>
        <draw:polygon draw:style-name="gr269" draw:text-style-name="P267" draw:layer="layout" svg:width="0.027cm" svg:height="0.027cm" svg:x="6.333cm" svg:y="7.155cm" svg:viewBox="0 0 28 28" draw:points="0,0 28,0 28,28 0,28">
          <text:p/>
        </draw:polygon>
        <draw:polygon draw:style-name="gr269" draw:text-style-name="P267" draw:layer="layout" svg:width="0.026cm" svg:height="0.027cm" svg:x="6.387cm" svg:y="7.155cm" svg:viewBox="0 0 27 28" draw:points="0,0 27,0 27,28 0,28">
          <text:p/>
        </draw:polygon>
        <draw:polygon draw:style-name="gr269" draw:text-style-name="P267" draw:layer="layout" svg:width="0.026cm" svg:height="0.027cm" svg:x="6.44cm" svg:y="7.155cm" svg:viewBox="0 0 27 28" draw:points="0,0 27,0 27,28 0,28">
          <text:p/>
        </draw:polygon>
        <draw:polygon draw:style-name="gr269" draw:text-style-name="P267" draw:layer="layout" svg:width="0.026cm" svg:height="0.027cm" svg:x="6.493cm" svg:y="7.155cm" svg:viewBox="0 0 27 28" draw:points="0,0 27,0 27,28 0,28">
          <text:p/>
        </draw:polygon>
        <draw:polygon draw:style-name="gr269" draw:text-style-name="P267" draw:layer="layout" svg:width="0.026cm" svg:height="0.027cm" svg:x="6.546cm" svg:y="7.155cm" svg:viewBox="0 0 27 28" draw:points="0,0 27,0 27,28 0,28">
          <text:p/>
        </draw:polygon>
        <draw:polygon draw:style-name="gr269" draw:text-style-name="P267" draw:layer="layout" svg:width="0.026cm" svg:height="0.027cm" svg:x="6.599cm" svg:y="7.155cm" svg:viewBox="0 0 27 28" draw:points="0,0 27,0 27,28 0,28">
          <text:p/>
        </draw:polygon>
        <draw:polygon draw:style-name="gr269" draw:text-style-name="P267" draw:layer="layout" svg:width="0.026cm" svg:height="0.027cm" svg:x="6.652cm" svg:y="7.155cm" svg:viewBox="0 0 27 28" draw:points="0,0 27,0 27,28 0,28">
          <text:p/>
        </draw:polygon>
        <draw:polygon draw:style-name="gr269" draw:text-style-name="P267" draw:layer="layout" svg:width="0.026cm" svg:height="0.027cm" svg:x="6.705cm" svg:y="7.155cm" svg:viewBox="0 0 27 28" draw:points="0,0 27,0 27,28 0,28">
          <text:p/>
        </draw:polygon>
        <draw:polygon draw:style-name="gr269" draw:text-style-name="P267" draw:layer="layout" svg:width="0.026cm" svg:height="0.027cm" svg:x="6.758cm" svg:y="7.155cm" svg:viewBox="0 0 27 28" draw:points="0,0 27,0 27,28 0,28">
          <text:p/>
        </draw:polygon>
        <draw:polygon draw:style-name="gr269" draw:text-style-name="P267" draw:layer="layout" svg:width="0.026cm" svg:height="0.027cm" svg:x="6.811cm" svg:y="7.155cm" svg:viewBox="0 0 27 28" draw:points="0,0 27,0 27,28 0,28">
          <text:p/>
        </draw:polygon>
        <draw:polygon draw:style-name="gr269" draw:text-style-name="P267" draw:layer="layout" svg:width="0.026cm" svg:height="0.027cm" svg:x="6.864cm" svg:y="7.155cm" svg:viewBox="0 0 27 28" draw:points="0,0 27,0 27,28 0,28">
          <text:p/>
        </draw:polygon>
        <draw:polygon draw:style-name="gr269" draw:text-style-name="P267" draw:layer="layout" svg:width="0.026cm" svg:height="0.027cm" svg:x="6.917cm" svg:y="7.155cm" svg:viewBox="0 0 27 28" draw:points="0,0 27,0 27,28 0,28">
          <text:p/>
        </draw:polygon>
        <draw:polygon draw:style-name="gr269" draw:text-style-name="P267" draw:layer="layout" svg:width="0.026cm" svg:height="0.027cm" svg:x="6.97cm" svg:y="7.155cm" svg:viewBox="0 0 27 28" draw:points="0,0 27,0 27,28 0,28">
          <text:p/>
        </draw:polygon>
        <draw:polygon draw:style-name="gr269" draw:text-style-name="P267" draw:layer="layout" svg:width="0.026cm" svg:height="0.027cm" svg:x="7.023cm" svg:y="7.155cm" svg:viewBox="0 0 27 28" draw:points="0,0 27,0 27,28 0,28">
          <text:p/>
        </draw:polygon>
        <draw:polygon draw:style-name="gr269" draw:text-style-name="P267" draw:layer="layout" svg:width="0.026cm" svg:height="0.027cm" svg:x="7.076cm" svg:y="7.155cm" svg:viewBox="0 0 27 28" draw:points="0,0 27,0 27,28 0,28">
          <text:p/>
        </draw:polygon>
        <draw:polygon draw:style-name="gr269" draw:text-style-name="P267" draw:layer="layout" svg:width="0.026cm" svg:height="0.027cm" svg:x="7.129cm" svg:y="7.155cm" svg:viewBox="0 0 27 28" draw:points="0,0 27,0 27,28 0,28">
          <text:p/>
        </draw:polygon>
        <draw:polygon draw:style-name="gr269" draw:text-style-name="P267" draw:layer="layout" svg:width="0.026cm" svg:height="0.027cm" svg:x="7.182cm" svg:y="7.155cm" svg:viewBox="0 0 27 28" draw:points="0,0 27,0 27,28 0,28">
          <text:p/>
        </draw:polygon>
        <draw:polygon draw:style-name="gr269" draw:text-style-name="P267" draw:layer="layout" svg:width="0.026cm" svg:height="0.027cm" svg:x="7.235cm" svg:y="7.155cm" svg:viewBox="0 0 27 28" draw:points="0,0 27,0 27,28 0,28">
          <text:p/>
        </draw:polygon>
        <draw:polygon draw:style-name="gr269" draw:text-style-name="P267" draw:layer="layout" svg:width="0.026cm" svg:height="0.027cm" svg:x="7.288cm" svg:y="7.155cm" svg:viewBox="0 0 27 28" draw:points="0,0 27,0 27,28 0,28">
          <text:p/>
        </draw:polygon>
        <draw:polygon draw:style-name="gr269" draw:text-style-name="P267" draw:layer="layout" svg:width="0.026cm" svg:height="0.027cm" svg:x="7.341cm" svg:y="7.155cm" svg:viewBox="0 0 27 28" draw:points="0,0 27,0 27,28 0,28">
          <text:p/>
        </draw:polygon>
        <draw:polygon draw:style-name="gr269" draw:text-style-name="P267" draw:layer="layout" svg:width="0.026cm" svg:height="0.027cm" svg:x="7.394cm" svg:y="7.155cm" svg:viewBox="0 0 27 28" draw:points="0,0 27,0 27,28 0,28">
          <text:p/>
        </draw:polygon>
        <draw:polygon draw:style-name="gr269" draw:text-style-name="P267" draw:layer="layout" svg:width="0.026cm" svg:height="0.027cm" svg:x="7.447cm" svg:y="7.155cm" svg:viewBox="0 0 27 28" draw:points="0,0 27,0 27,28 0,28">
          <text:p/>
        </draw:polygon>
        <draw:polygon draw:style-name="gr269" draw:text-style-name="P267" draw:layer="layout" svg:width="0.026cm" svg:height="0.027cm" svg:x="7.5cm" svg:y="7.155cm" svg:viewBox="0 0 27 28" draw:points="0,0 27,0 27,28 0,28">
          <text:p/>
        </draw:polygon>
        <draw:polygon draw:style-name="gr269" draw:text-style-name="P267" draw:layer="layout" svg:width="0.026cm" svg:height="0.027cm" svg:x="7.553cm" svg:y="7.155cm" svg:viewBox="0 0 27 28" draw:points="0,0 27,0 27,28 0,28">
          <text:p/>
        </draw:polygon>
        <draw:polygon draw:style-name="gr269" draw:text-style-name="P267" draw:layer="layout" svg:width="0.026cm" svg:height="0.027cm" svg:x="7.606cm" svg:y="7.155cm" svg:viewBox="0 0 27 28" draw:points="0,0 27,0 27,28 0,28">
          <text:p/>
        </draw:polygon>
        <draw:polygon draw:style-name="gr269" draw:text-style-name="P267" draw:layer="layout" svg:width="0.026cm" svg:height="0.027cm" svg:x="7.659cm" svg:y="7.155cm" svg:viewBox="0 0 27 28" draw:points="0,0 27,0 27,28 0,28">
          <text:p/>
        </draw:polygon>
        <draw:polygon draw:style-name="gr269" draw:text-style-name="P267" draw:layer="layout" svg:width="0.026cm" svg:height="0.027cm" svg:x="7.712cm" svg:y="7.155cm" svg:viewBox="0 0 27 28" draw:points="0,0 27,0 27,28 0,28">
          <text:p/>
        </draw:polygon>
        <draw:polygon draw:style-name="gr269" draw:text-style-name="P267" draw:layer="layout" svg:width="0.026cm" svg:height="0.027cm" svg:x="7.765cm" svg:y="7.155cm" svg:viewBox="0 0 27 28" draw:points="0,0 27,0 27,28 0,28">
          <text:p/>
        </draw:polygon>
        <draw:polygon draw:style-name="gr269" draw:text-style-name="P267" draw:layer="layout" svg:width="0.026cm" svg:height="0.027cm" svg:x="7.818cm" svg:y="7.155cm" svg:viewBox="0 0 27 28" draw:points="0,0 27,0 27,28 0,28">
          <text:p/>
        </draw:polygon>
        <draw:polygon draw:style-name="gr269" draw:text-style-name="P267" draw:layer="layout" svg:width="0.026cm" svg:height="0.027cm" svg:x="7.871cm" svg:y="7.155cm" svg:viewBox="0 0 27 28" draw:points="0,0 27,0 27,28 0,28">
          <text:p/>
        </draw:polygon>
        <draw:polygon draw:style-name="gr269" draw:text-style-name="P267" draw:layer="layout" svg:width="0.026cm" svg:height="0.027cm" svg:x="7.924cm" svg:y="7.155cm" svg:viewBox="0 0 27 28" draw:points="0,0 27,0 27,28 0,28">
          <text:p/>
        </draw:polygon>
        <draw:polygon draw:style-name="gr269" draw:text-style-name="P267" draw:layer="layout" svg:width="0.026cm" svg:height="0.027cm" svg:x="7.977cm" svg:y="7.155cm" svg:viewBox="0 0 27 28" draw:points="0,0 27,0 27,28 0,28">
          <text:p/>
        </draw:polygon>
        <draw:polygon draw:style-name="gr269" draw:text-style-name="P267" draw:layer="layout" svg:width="0.026cm" svg:height="0.027cm" svg:x="8.03cm" svg:y="7.155cm" svg:viewBox="0 0 27 28" draw:points="0,0 27,0 27,28 0,28">
          <text:p/>
        </draw:polygon>
        <draw:polygon draw:style-name="gr269" draw:text-style-name="P267" draw:layer="layout" svg:width="0.026cm" svg:height="0.027cm" svg:x="8.083cm" svg:y="7.155cm" svg:viewBox="0 0 27 28" draw:points="0,0 27,0 27,28 0,28">
          <text:p/>
        </draw:polygon>
        <draw:polygon draw:style-name="gr269" draw:text-style-name="P267" draw:layer="layout" svg:width="0.026cm" svg:height="0.027cm" svg:x="8.136cm" svg:y="7.155cm" svg:viewBox="0 0 27 28" draw:points="0,0 27,0 27,28 0,28">
          <text:p/>
        </draw:polygon>
        <draw:polygon draw:style-name="gr269" draw:text-style-name="P267" draw:layer="layout" svg:width="0.026cm" svg:height="0.027cm" svg:x="8.189cm" svg:y="7.155cm" svg:viewBox="0 0 27 28" draw:points="0,0 27,0 27,28 0,28">
          <text:p/>
        </draw:polygon>
        <draw:polygon draw:style-name="gr269" draw:text-style-name="P267" draw:layer="layout" svg:width="0.026cm" svg:height="0.027cm" svg:x="8.242cm" svg:y="7.155cm" svg:viewBox="0 0 27 28" draw:points="0,0 27,0 27,28 0,28">
          <text:p/>
        </draw:polygon>
        <draw:polygon draw:style-name="gr269" draw:text-style-name="P267" draw:layer="layout" svg:width="0.026cm" svg:height="0.027cm" svg:x="8.295cm" svg:y="7.155cm" svg:viewBox="0 0 27 28" draw:points="0,0 27,0 27,28 0,28">
          <text:p/>
        </draw:polygon>
        <draw:polygon draw:style-name="gr269" draw:text-style-name="P267" draw:layer="layout" svg:width="0.026cm" svg:height="0.027cm" svg:x="8.348cm" svg:y="7.155cm" svg:viewBox="0 0 27 28" draw:points="0,0 27,0 27,28 0,28">
          <text:p/>
        </draw:polygon>
        <draw:polygon draw:style-name="gr269" draw:text-style-name="P267" draw:layer="layout" svg:width="0.026cm" svg:height="0.027cm" svg:x="8.401cm" svg:y="7.155cm" svg:viewBox="0 0 27 28" draw:points="0,0 27,0 27,28 0,28">
          <text:p/>
        </draw:polygon>
        <draw:polygon draw:style-name="gr269" draw:text-style-name="P267" draw:layer="layout" svg:width="0.026cm" svg:height="0.027cm" svg:x="8.454cm" svg:y="7.155cm" svg:viewBox="0 0 27 28" draw:points="0,0 27,0 27,28 0,28">
          <text:p/>
        </draw:polygon>
        <draw:polygon draw:style-name="gr269" draw:text-style-name="P267" draw:layer="layout" svg:width="0.026cm" svg:height="0.027cm" svg:x="8.507cm" svg:y="7.155cm" svg:viewBox="0 0 27 28" draw:points="0,0 27,0 27,28 0,28">
          <text:p/>
        </draw:polygon>
        <draw:polygon draw:style-name="gr269" draw:text-style-name="P267" draw:layer="layout" svg:width="0.026cm" svg:height="0.027cm" svg:x="8.56cm" svg:y="7.155cm" svg:viewBox="0 0 27 28" draw:points="0,0 27,0 27,28 0,28">
          <text:p/>
        </draw:polygon>
        <draw:polygon draw:style-name="gr269" draw:text-style-name="P267" draw:layer="layout" svg:width="0.026cm" svg:height="0.027cm" svg:x="8.613cm" svg:y="7.155cm" svg:viewBox="0 0 27 28" draw:points="0,0 27,0 27,28 0,28">
          <text:p/>
        </draw:polygon>
        <draw:polygon draw:style-name="gr269" draw:text-style-name="P267" draw:layer="layout" svg:width="0.026cm" svg:height="0.027cm" svg:x="8.666cm" svg:y="7.155cm" svg:viewBox="0 0 27 28" draw:points="0,0 27,0 27,28 0,28">
          <text:p/>
        </draw:polygon>
        <draw:polygon draw:style-name="gr269" draw:text-style-name="P267" draw:layer="layout" svg:width="0.026cm" svg:height="0.027cm" svg:x="8.719cm" svg:y="7.155cm" svg:viewBox="0 0 27 28" draw:points="0,0 27,0 27,28 0,28">
          <text:p/>
        </draw:polygon>
        <draw:polygon draw:style-name="gr269" draw:text-style-name="P267" draw:layer="layout" svg:width="0.026cm" svg:height="0.027cm" svg:x="8.772cm" svg:y="7.155cm" svg:viewBox="0 0 27 28" draw:points="0,0 27,0 27,28 0,28">
          <text:p/>
        </draw:polygon>
        <draw:polygon draw:style-name="gr269" draw:text-style-name="P267" draw:layer="layout" svg:width="0.026cm" svg:height="0.027cm" svg:x="8.825cm" svg:y="7.155cm" svg:viewBox="0 0 27 28" draw:points="0,0 27,0 27,28 0,28">
          <text:p/>
        </draw:polygon>
        <draw:polygon draw:style-name="gr269" draw:text-style-name="P267" draw:layer="layout" svg:width="0.026cm" svg:height="0.027cm" svg:x="8.878cm" svg:y="7.155cm" svg:viewBox="0 0 27 28" draw:points="0,0 27,0 27,28 0,28">
          <text:p/>
        </draw:polygon>
        <draw:polygon draw:style-name="gr269" draw:text-style-name="P267" draw:layer="layout" svg:width="0.026cm" svg:height="0.027cm" svg:x="8.931cm" svg:y="7.155cm" svg:viewBox="0 0 27 28" draw:points="0,0 27,0 27,28 0,28">
          <text:p/>
        </draw:polygon>
        <draw:polygon draw:style-name="gr269" draw:text-style-name="P267" draw:layer="layout" svg:width="0.026cm" svg:height="0.027cm" svg:x="8.984cm" svg:y="7.155cm" svg:viewBox="0 0 27 28" draw:points="0,0 27,0 27,28 0,28">
          <text:p/>
        </draw:polygon>
        <draw:polygon draw:style-name="gr269" draw:text-style-name="P267" draw:layer="layout" svg:width="0.026cm" svg:height="0.027cm" svg:x="9.037cm" svg:y="7.155cm" svg:viewBox="0 0 27 28" draw:points="0,0 27,0 27,28 0,28">
          <text:p/>
        </draw:polygon>
        <draw:polygon draw:style-name="gr269" draw:text-style-name="P267" draw:layer="layout" svg:width="0.026cm" svg:height="0.027cm" svg:x="9.09cm" svg:y="7.155cm" svg:viewBox="0 0 27 28" draw:points="0,0 27,0 27,28 0,28">
          <text:p/>
        </draw:polygon>
        <draw:polygon draw:style-name="gr269" draw:text-style-name="P267" draw:layer="layout" svg:width="0.026cm" svg:height="0.027cm" svg:x="9.143cm" svg:y="7.155cm" svg:viewBox="0 0 27 28" draw:points="0,0 27,0 27,28 0,28">
          <text:p/>
        </draw:polygon>
        <draw:polygon draw:style-name="gr269" draw:text-style-name="P267" draw:layer="layout" svg:width="0.026cm" svg:height="0.027cm" svg:x="9.196cm" svg:y="7.155cm" svg:viewBox="0 0 27 28" draw:points="0,0 27,0 27,28 0,28">
          <text:p/>
        </draw:polygon>
        <draw:polygon draw:style-name="gr269" draw:text-style-name="P267" draw:layer="layout" svg:width="0.026cm" svg:height="0.027cm" svg:x="9.249cm" svg:y="7.155cm" svg:viewBox="0 0 27 28" draw:points="0,0 27,0 27,28 0,28">
          <text:p/>
        </draw:polygon>
        <draw:polygon draw:style-name="gr269" draw:text-style-name="P267" draw:layer="layout" svg:width="0.026cm" svg:height="0.027cm" svg:x="9.302cm" svg:y="7.155cm" svg:viewBox="0 0 27 28" draw:points="0,0 27,0 27,28 0,28">
          <text:p/>
        </draw:polygon>
        <draw:polygon draw:style-name="gr269" draw:text-style-name="P267" draw:layer="layout" svg:width="0.026cm" svg:height="0.027cm" svg:x="9.355cm" svg:y="7.155cm" svg:viewBox="0 0 27 28" draw:points="0,0 27,0 27,28 0,28">
          <text:p/>
        </draw:polygon>
        <draw:polygon draw:style-name="gr269" draw:text-style-name="P267" draw:layer="layout" svg:width="0.026cm" svg:height="0.027cm" svg:x="9.408cm" svg:y="7.155cm" svg:viewBox="0 0 27 28" draw:points="0,0 27,0 27,28 0,28">
          <text:p/>
        </draw:polygon>
        <draw:polygon draw:style-name="gr269" draw:text-style-name="P267" draw:layer="layout" svg:width="0.026cm" svg:height="0.027cm" svg:x="9.461cm" svg:y="7.155cm" svg:viewBox="0 0 27 28" draw:points="0,0 27,0 27,28 0,28">
          <text:p/>
        </draw:polygon>
        <draw:polygon draw:style-name="gr269" draw:text-style-name="P267" draw:layer="layout" svg:width="0.026cm" svg:height="0.027cm" svg:x="9.514cm" svg:y="7.155cm" svg:viewBox="0 0 27 28" draw:points="0,0 27,0 27,28 0,28">
          <text:p/>
        </draw:polygon>
        <draw:polygon draw:style-name="gr269" draw:text-style-name="P267" draw:layer="layout" svg:width="0.026cm" svg:height="0.027cm" svg:x="9.567cm" svg:y="7.155cm" svg:viewBox="0 0 27 28" draw:points="0,0 27,0 27,28 0,28">
          <text:p/>
        </draw:polygon>
        <draw:polygon draw:style-name="gr269" draw:text-style-name="P267" draw:layer="layout" svg:width="0.026cm" svg:height="0.027cm" svg:x="9.62cm" svg:y="7.155cm" svg:viewBox="0 0 27 28" draw:points="0,0 27,0 27,28 0,28">
          <text:p/>
        </draw:polygon>
        <draw:polygon draw:style-name="gr269" draw:text-style-name="P267" draw:layer="layout" svg:width="0.026cm" svg:height="0.027cm" svg:x="9.673cm" svg:y="7.155cm" svg:viewBox="0 0 27 28" draw:points="0,0 27,0 27,28 0,28">
          <text:p/>
        </draw:polygon>
        <draw:polygon draw:style-name="gr269" draw:text-style-name="P267" draw:layer="layout" svg:width="0.026cm" svg:height="0.027cm" svg:x="9.726cm" svg:y="7.155cm" svg:viewBox="0 0 27 28" draw:points="0,0 27,0 27,28 0,28">
          <text:p/>
        </draw:polygon>
        <draw:polygon draw:style-name="gr269" draw:text-style-name="P267" draw:layer="layout" svg:width="0.026cm" svg:height="0.027cm" svg:x="9.779cm" svg:y="7.155cm" svg:viewBox="0 0 27 28" draw:points="0,0 27,0 27,28 0,28">
          <text:p/>
        </draw:polygon>
        <draw:polygon draw:style-name="gr269" draw:text-style-name="P267" draw:layer="layout" svg:width="0.026cm" svg:height="0.027cm" svg:x="9.832cm" svg:y="7.155cm" svg:viewBox="0 0 27 28" draw:points="0,0 27,0 27,28 0,28">
          <text:p/>
        </draw:polygon>
        <draw:polygon draw:style-name="gr269" draw:text-style-name="P267" draw:layer="layout" svg:width="0.026cm" svg:height="0.027cm" svg:x="9.885cm" svg:y="7.155cm" svg:viewBox="0 0 27 28" draw:points="0,0 27,0 27,28 0,28">
          <text:p/>
        </draw:polygon>
        <draw:polygon draw:style-name="gr269" draw:text-style-name="P267" draw:layer="layout" svg:width="0.026cm" svg:height="0.027cm" svg:x="9.938cm" svg:y="7.155cm" svg:viewBox="0 0 27 28" draw:points="0,0 27,0 27,28 0,28">
          <text:p/>
        </draw:polygon>
        <draw:polygon draw:style-name="gr269" draw:text-style-name="P267" draw:layer="layout" svg:width="0.026cm" svg:height="0.027cm" svg:x="9.991cm" svg:y="7.155cm" svg:viewBox="0 0 27 28" draw:points="0,0 27,0 27,28 0,28">
          <text:p/>
        </draw:polygon>
        <draw:polygon draw:style-name="gr269" draw:text-style-name="P267" draw:layer="layout" svg:width="0.026cm" svg:height="0.027cm" svg:x="10.044cm" svg:y="7.155cm" svg:viewBox="0 0 27 28" draw:points="0,0 27,0 27,28 0,28">
          <text:p/>
        </draw:polygon>
        <draw:polygon draw:style-name="gr269" draw:text-style-name="P267" draw:layer="layout" svg:width="0.026cm" svg:height="0.027cm" svg:x="10.097cm" svg:y="7.155cm" svg:viewBox="0 0 27 28" draw:points="0,0 27,0 27,28 0,28">
          <text:p/>
        </draw:polygon>
        <draw:polygon draw:style-name="gr269" draw:text-style-name="P267" draw:layer="layout" svg:width="0.026cm" svg:height="0.027cm" svg:x="10.15cm" svg:y="7.155cm" svg:viewBox="0 0 27 28" draw:points="0,0 27,0 27,28 0,28">
          <text:p/>
        </draw:polygon>
        <draw:polygon draw:style-name="gr269" draw:text-style-name="P267" draw:layer="layout" svg:width="0.026cm" svg:height="0.027cm" svg:x="10.203cm" svg:y="7.155cm" svg:viewBox="0 0 27 28" draw:points="0,0 27,0 27,28 0,28">
          <text:p/>
        </draw:polygon>
        <draw:polygon draw:style-name="gr269" draw:text-style-name="P267" draw:layer="layout" svg:width="0.026cm" svg:height="0.027cm" svg:x="10.256cm" svg:y="7.155cm" svg:viewBox="0 0 27 28" draw:points="0,0 27,0 27,28 0,28">
          <text:p/>
        </draw:polygon>
        <draw:polygon draw:style-name="gr269" draw:text-style-name="P267" draw:layer="layout" svg:width="0.026cm" svg:height="0.027cm" svg:x="10.309cm" svg:y="7.155cm" svg:viewBox="0 0 27 28" draw:points="0,0 27,0 27,28 0,28">
          <text:p/>
        </draw:polygon>
        <draw:polygon draw:style-name="gr269" draw:text-style-name="P267" draw:layer="layout" svg:width="0.026cm" svg:height="0.027cm" svg:x="10.362cm" svg:y="7.155cm" svg:viewBox="0 0 27 28" draw:points="0,0 27,0 27,28 0,28">
          <text:p/>
        </draw:polygon>
        <draw:polygon draw:style-name="gr269" draw:text-style-name="P267" draw:layer="layout" svg:width="0.026cm" svg:height="0.027cm" svg:x="10.415cm" svg:y="7.155cm" svg:viewBox="0 0 27 28" draw:points="0,0 27,0 27,28 0,28">
          <text:p/>
        </draw:polygon>
        <draw:polygon draw:style-name="gr269" draw:text-style-name="P267" draw:layer="layout" svg:width="0.026cm" svg:height="0.027cm" svg:x="10.468cm" svg:y="7.155cm" svg:viewBox="0 0 27 28" draw:points="0,0 27,0 27,28 0,28">
          <text:p/>
        </draw:polygon>
        <draw:polygon draw:style-name="gr269" draw:text-style-name="P267" draw:layer="layout" svg:width="0.026cm" svg:height="0.027cm" svg:x="10.521cm" svg:y="7.155cm" svg:viewBox="0 0 27 28" draw:points="0,0 27,0 27,28 0,28">
          <text:p/>
        </draw:polygon>
        <draw:polygon draw:style-name="gr269" draw:text-style-name="P267" draw:layer="layout" svg:width="0.026cm" svg:height="0.027cm" svg:x="10.574cm" svg:y="7.155cm" svg:viewBox="0 0 27 28" draw:points="0,0 27,0 27,28 0,28">
          <text:p/>
        </draw:polygon>
        <draw:polygon draw:style-name="gr269" draw:text-style-name="P267" draw:layer="layout" svg:width="0.026cm" svg:height="0.027cm" svg:x="10.627cm" svg:y="7.155cm" svg:viewBox="0 0 27 28" draw:points="0,0 27,0 27,28 0,28">
          <text:p/>
        </draw:polygon>
        <draw:polygon draw:style-name="gr269" draw:text-style-name="P267" draw:layer="layout" svg:width="0.026cm" svg:height="0.027cm" svg:x="10.68cm" svg:y="7.155cm" svg:viewBox="0 0 27 28" draw:points="0,0 27,0 27,28 0,28">
          <text:p/>
        </draw:polygon>
        <draw:polygon draw:style-name="gr269" draw:text-style-name="P267" draw:layer="layout" svg:width="0.026cm" svg:height="0.027cm" svg:x="10.733cm" svg:y="7.155cm" svg:viewBox="0 0 27 28" draw:points="0,0 27,0 27,28 0,28">
          <text:p/>
        </draw:polygon>
        <draw:polygon draw:style-name="gr269" draw:text-style-name="P267" draw:layer="layout" svg:width="0.026cm" svg:height="0.027cm" svg:x="10.786cm" svg:y="7.155cm" svg:viewBox="0 0 27 28" draw:points="0,0 27,0 27,28 0,28">
          <text:p/>
        </draw:polygon>
        <draw:polygon draw:style-name="gr269" draw:text-style-name="P267" draw:layer="layout" svg:width="0.026cm" svg:height="0.027cm" svg:x="10.839cm" svg:y="7.155cm" svg:viewBox="0 0 27 28" draw:points="0,0 27,0 27,28 0,28">
          <text:p/>
        </draw:polygon>
        <draw:polygon draw:style-name="gr269" draw:text-style-name="P267" draw:layer="layout" svg:width="0.026cm" svg:height="0.027cm" svg:x="10.892cm" svg:y="7.155cm" svg:viewBox="0 0 27 28" draw:points="0,0 27,0 27,28 0,28">
          <text:p/>
        </draw:polygon>
        <draw:polygon draw:style-name="gr269" draw:text-style-name="P267" draw:layer="layout" svg:width="0.026cm" svg:height="0.027cm" svg:x="10.945cm" svg:y="7.155cm" svg:viewBox="0 0 27 28" draw:points="0,0 27,0 27,28 0,28">
          <text:p/>
        </draw:polygon>
        <draw:polygon draw:style-name="gr269" draw:text-style-name="P267" draw:layer="layout" svg:width="0.026cm" svg:height="0.027cm" svg:x="10.998cm" svg:y="7.155cm" svg:viewBox="0 0 27 28" draw:points="0,0 27,0 27,28 0,28">
          <text:p/>
        </draw:polygon>
        <draw:polygon draw:style-name="gr269" draw:text-style-name="P267" draw:layer="layout" svg:width="0.026cm" svg:height="0.027cm" svg:x="11.051cm" svg:y="7.155cm" svg:viewBox="0 0 27 28" draw:points="0,0 27,0 27,28 0,28">
          <text:p/>
        </draw:polygon>
        <draw:polygon draw:style-name="gr269" draw:text-style-name="P267" draw:layer="layout" svg:width="0.026cm" svg:height="0.027cm" svg:x="11.104cm" svg:y="7.155cm" svg:viewBox="0 0 27 28" draw:points="0,0 27,0 27,28 0,28">
          <text:p/>
        </draw:polygon>
        <draw:polygon draw:style-name="gr269" draw:text-style-name="P267" draw:layer="layout" svg:width="0.026cm" svg:height="0.027cm" svg:x="11.157cm" svg:y="7.155cm" svg:viewBox="0 0 27 28" draw:points="0,0 27,0 27,28 0,28">
          <text:p/>
        </draw:polygon>
        <draw:polygon draw:style-name="gr269" draw:text-style-name="P267" draw:layer="layout" svg:width="0.026cm" svg:height="0.027cm" svg:x="11.21cm" svg:y="7.155cm" svg:viewBox="0 0 27 28" draw:points="0,0 27,0 27,28 0,28">
          <text:p/>
        </draw:polygon>
        <draw:polygon draw:style-name="gr269" draw:text-style-name="P267" draw:layer="layout" svg:width="0.026cm" svg:height="0.027cm" svg:x="11.263cm" svg:y="7.155cm" svg:viewBox="0 0 27 28" draw:points="0,0 27,0 27,28 0,28">
          <text:p/>
        </draw:polygon>
        <draw:polygon draw:style-name="gr269" draw:text-style-name="P267" draw:layer="layout" svg:width="0.026cm" svg:height="0.027cm" svg:x="11.316cm" svg:y="7.155cm" svg:viewBox="0 0 27 28" draw:points="0,0 27,0 27,28 0,28">
          <text:p/>
        </draw:polygon>
        <draw:polygon draw:style-name="gr269" draw:text-style-name="P267" draw:layer="layout" svg:width="0.026cm" svg:height="0.027cm" svg:x="11.369cm" svg:y="7.155cm" svg:viewBox="0 0 27 28" draw:points="0,0 27,0 27,28 0,28">
          <text:p/>
        </draw:polygon>
        <draw:polygon draw:style-name="gr269" draw:text-style-name="P267" draw:layer="layout" svg:width="0.026cm" svg:height="0.027cm" svg:x="11.422cm" svg:y="7.155cm" svg:viewBox="0 0 27 28" draw:points="0,0 27,0 27,28 0,28">
          <text:p/>
        </draw:polygon>
        <draw:polygon draw:style-name="gr269" draw:text-style-name="P267" draw:layer="layout" svg:width="0.026cm" svg:height="0.027cm" svg:x="11.475cm" svg:y="7.155cm" svg:viewBox="0 0 27 28" draw:points="0,0 27,0 27,28 0,28">
          <text:p/>
        </draw:polygon>
        <draw:polygon draw:style-name="gr269" draw:text-style-name="P267" draw:layer="layout" svg:width="0.026cm" svg:height="0.027cm" svg:x="11.528cm" svg:y="7.155cm" svg:viewBox="0 0 27 28" draw:points="0,0 27,0 27,28 0,28">
          <text:p/>
        </draw:polygon>
        <draw:polygon draw:style-name="gr269" draw:text-style-name="P267" draw:layer="layout" svg:width="0.026cm" svg:height="0.027cm" svg:x="11.581cm" svg:y="7.155cm" svg:viewBox="0 0 27 28" draw:points="0,0 27,0 27,28 0,28">
          <text:p/>
        </draw:polygon>
        <draw:polygon draw:style-name="gr269" draw:text-style-name="P267" draw:layer="layout" svg:width="0.026cm" svg:height="0.027cm" svg:x="11.634cm" svg:y="7.155cm" svg:viewBox="0 0 27 28" draw:points="0,0 27,0 27,28 0,28">
          <text:p/>
        </draw:polygon>
        <draw:polygon draw:style-name="gr269" draw:text-style-name="P267" draw:layer="layout" svg:width="0.026cm" svg:height="0.027cm" svg:x="11.687cm" svg:y="7.155cm" svg:viewBox="0 0 27 28" draw:points="0,0 27,0 27,28 0,28">
          <text:p/>
        </draw:polygon>
        <draw:polygon draw:style-name="gr269" draw:text-style-name="P267" draw:layer="layout" svg:width="0.026cm" svg:height="0.027cm" svg:x="11.74cm" svg:y="7.155cm" svg:viewBox="0 0 27 28" draw:points="0,0 27,0 27,28 0,28">
          <text:p/>
        </draw:polygon>
        <draw:polygon draw:style-name="gr269" draw:text-style-name="P267" draw:layer="layout" svg:width="0.026cm" svg:height="0.027cm" svg:x="11.793cm" svg:y="7.155cm" svg:viewBox="0 0 27 28" draw:points="0,0 27,0 27,28 0,28">
          <text:p/>
        </draw:polygon>
        <draw:polygon draw:style-name="gr269" draw:text-style-name="P267" draw:layer="layout" svg:width="0.026cm" svg:height="0.027cm" svg:x="11.846cm" svg:y="7.155cm" svg:viewBox="0 0 27 28" draw:points="0,0 27,0 27,28 0,28">
          <text:p/>
        </draw:polygon>
        <draw:polygon draw:style-name="gr269" draw:text-style-name="P267" draw:layer="layout" svg:width="0.026cm" svg:height="0.027cm" svg:x="11.899cm" svg:y="7.155cm" svg:viewBox="0 0 27 28" draw:points="0,0 27,0 27,28 0,28">
          <text:p/>
        </draw:polygon>
        <draw:polygon draw:style-name="gr269" draw:text-style-name="P267" draw:layer="layout" svg:width="0.026cm" svg:height="0.027cm" svg:x="11.952cm" svg:y="7.155cm" svg:viewBox="0 0 27 28" draw:points="0,0 27,0 27,28 0,28">
          <text:p/>
        </draw:polygon>
        <draw:polygon draw:style-name="gr269" draw:text-style-name="P267" draw:layer="layout" svg:width="0.026cm" svg:height="0.027cm" svg:x="12.005cm" svg:y="7.155cm" svg:viewBox="0 0 27 28" draw:points="0,0 27,0 27,28 0,28">
          <text:p/>
        </draw:polygon>
        <draw:polygon draw:style-name="gr269" draw:text-style-name="P267" draw:layer="layout" svg:width="0.026cm" svg:height="0.027cm" svg:x="12.058cm" svg:y="7.155cm" svg:viewBox="0 0 27 28" draw:points="0,0 27,0 27,28 0,28">
          <text:p/>
        </draw:polygon>
        <draw:polygon draw:style-name="gr269" draw:text-style-name="P267" draw:layer="layout" svg:width="0.026cm" svg:height="0.027cm" svg:x="12.111cm" svg:y="7.155cm" svg:viewBox="0 0 27 28" draw:points="0,0 27,0 27,28 0,28">
          <text:p/>
        </draw:polygon>
        <draw:polygon draw:style-name="gr269" draw:text-style-name="P267" draw:layer="layout" svg:width="0.026cm" svg:height="0.027cm" svg:x="12.164cm" svg:y="7.155cm" svg:viewBox="0 0 27 28" draw:points="0,0 27,0 27,28 0,28">
          <text:p/>
        </draw:polygon>
        <draw:polygon draw:style-name="gr269" draw:text-style-name="P267" draw:layer="layout" svg:width="0.026cm" svg:height="0.027cm" svg:x="12.217cm" svg:y="7.155cm" svg:viewBox="0 0 27 28" draw:points="0,0 27,0 27,28 0,28">
          <text:p/>
        </draw:polygon>
        <draw:polygon draw:style-name="gr269" draw:text-style-name="P267" draw:layer="layout" svg:width="0.026cm" svg:height="0.027cm" svg:x="12.27cm" svg:y="7.155cm" svg:viewBox="0 0 27 28" draw:points="0,0 27,0 27,28 0,28">
          <text:p/>
        </draw:polygon>
        <draw:polygon draw:style-name="gr269" draw:text-style-name="P267" draw:layer="layout" svg:width="0.026cm" svg:height="0.027cm" svg:x="12.323cm" svg:y="7.155cm" svg:viewBox="0 0 27 28" draw:points="0,0 27,0 27,28 0,28">
          <text:p/>
        </draw:polygon>
        <draw:polygon draw:style-name="gr269" draw:text-style-name="P267" draw:layer="layout" svg:width="0.026cm" svg:height="0.027cm" svg:x="12.376cm" svg:y="7.155cm" svg:viewBox="0 0 27 28" draw:points="0,0 27,0 27,28 0,28">
          <text:p/>
        </draw:polygon>
        <draw:polygon draw:style-name="gr269" draw:text-style-name="P267" draw:layer="layout" svg:width="0.026cm" svg:height="0.027cm" svg:x="12.429cm" svg:y="7.155cm" svg:viewBox="0 0 27 28" draw:points="0,0 27,0 27,28 0,28">
          <text:p/>
        </draw:polygon>
        <draw:polygon draw:style-name="gr269" draw:text-style-name="P267" draw:layer="layout" svg:width="0.026cm" svg:height="0.027cm" svg:x="12.482cm" svg:y="7.155cm" svg:viewBox="0 0 27 28" draw:points="0,0 27,0 27,28 0,28">
          <text:p/>
        </draw:polygon>
        <draw:polygon draw:style-name="gr269" draw:text-style-name="P267" draw:layer="layout" svg:width="0.026cm" svg:height="0.027cm" svg:x="12.535cm" svg:y="7.155cm" svg:viewBox="0 0 27 28" draw:points="0,0 27,0 27,28 0,28">
          <text:p/>
        </draw:polygon>
        <draw:polygon draw:style-name="gr269" draw:text-style-name="P267" draw:layer="layout" svg:width="0.026cm" svg:height="0.027cm" svg:x="12.588cm" svg:y="7.155cm" svg:viewBox="0 0 27 28" draw:points="0,0 27,0 27,28 0,28">
          <text:p/>
        </draw:polygon>
        <draw:polygon draw:style-name="gr269" draw:text-style-name="P267" draw:layer="layout" svg:width="0.026cm" svg:height="0.027cm" svg:x="12.641cm" svg:y="7.155cm" svg:viewBox="0 0 27 28" draw:points="0,0 27,0 27,28 0,28">
          <text:p/>
        </draw:polygon>
        <draw:polygon draw:style-name="gr269" draw:text-style-name="P267" draw:layer="layout" svg:width="0.027cm" svg:height="0.027cm" svg:x="12.694cm" svg:y="7.155cm" svg:viewBox="0 0 28 28" draw:points="0,0 28,0 28,28 0,28">
          <text:p/>
        </draw:polygon>
        <draw:polygon draw:style-name="gr269" draw:text-style-name="P267" draw:layer="layout" svg:width="0.027cm" svg:height="0.027cm" svg:x="12.747cm" svg:y="7.155cm" svg:viewBox="0 0 28 28" draw:points="0,0 28,0 28,28 0,28">
          <text:p/>
        </draw:polygon>
        <draw:polygon draw:style-name="gr269" draw:text-style-name="P267" draw:layer="layout" svg:width="0.027cm" svg:height="0.027cm" svg:x="12.8cm" svg:y="7.155cm" svg:viewBox="0 0 28 28" draw:points="0,0 28,0 28,28 0,28">
          <text:p/>
        </draw:polygon>
        <draw:polygon draw:style-name="gr269" draw:text-style-name="P267" draw:layer="layout" svg:width="0.027cm" svg:height="0.027cm" svg:x="12.853cm" svg:y="7.155cm" svg:viewBox="0 0 28 28" draw:points="0,0 28,0 28,28 0,28">
          <text:p/>
        </draw:polygon>
        <draw:polygon draw:style-name="gr269" draw:text-style-name="P267" draw:layer="layout" svg:width="0.027cm" svg:height="0.027cm" svg:x="12.906cm" svg:y="7.155cm" svg:viewBox="0 0 28 28" draw:points="0,0 28,0 28,28 0,28">
          <text:p/>
        </draw:polygon>
        <draw:polygon draw:style-name="gr269" draw:text-style-name="P267" draw:layer="layout" svg:width="0.027cm" svg:height="0.027cm" svg:x="12.959cm" svg:y="7.155cm" svg:viewBox="0 0 28 28" draw:points="0,0 28,0 28,28 0,28">
          <text:p/>
        </draw:polygon>
        <draw:polygon draw:style-name="gr269" draw:text-style-name="P267" draw:layer="layout" svg:width="0.028cm" svg:height="0.027cm" svg:x="13.012cm" svg:y="7.155cm" svg:viewBox="0 0 29 28" draw:points="0,0 29,0 29,28 0,28">
          <text:p/>
        </draw:polygon>
        <draw:polygon draw:style-name="gr269" draw:text-style-name="P267" draw:layer="layout" svg:width="0.027cm" svg:height="0.027cm" svg:x="13.065cm" svg:y="7.155cm" svg:viewBox="0 0 28 28" draw:points="0,0 28,0 28,28 0,28">
          <text:p/>
        </draw:polygon>
        <draw:polygon draw:style-name="gr269" draw:text-style-name="P267" draw:layer="layout" svg:width="0.027cm" svg:height="0.027cm" svg:x="13.118cm" svg:y="7.155cm" svg:viewBox="0 0 28 28" draw:points="0,0 28,0 28,28 0,28">
          <text:p/>
        </draw:polygon>
        <draw:polygon draw:style-name="gr269" draw:text-style-name="P267" draw:layer="layout" svg:width="0.027cm" svg:height="0.027cm" svg:x="13.171cm" svg:y="7.155cm" svg:viewBox="0 0 28 28" draw:points="0,0 28,0 28,28 0,28">
          <text:p/>
        </draw:polygon>
        <draw:polygon draw:style-name="gr269" draw:text-style-name="P267" draw:layer="layout" svg:width="0.027cm" svg:height="0.027cm" svg:x="13.224cm" svg:y="7.155cm" svg:viewBox="0 0 28 28" draw:points="0,0 28,0 28,28 0,28">
          <text:p/>
        </draw:polygon>
        <draw:polygon draw:style-name="gr269" draw:text-style-name="P267" draw:layer="layout" svg:width="0.027cm" svg:height="0.027cm" svg:x="13.277cm" svg:y="7.155cm" svg:viewBox="0 0 28 28" draw:points="0,0 28,0 28,28 0,28">
          <text:p/>
        </draw:polygon>
        <draw:polygon draw:style-name="gr269" draw:text-style-name="P267" draw:layer="layout" svg:width="0.027cm" svg:height="0.027cm" svg:x="13.33cm" svg:y="7.155cm" svg:viewBox="0 0 28 28" draw:points="0,0 28,0 28,28 0,28">
          <text:p/>
        </draw:polygon>
        <draw:polygon draw:style-name="gr269" draw:text-style-name="P267" draw:layer="layout" svg:width="0.027cm" svg:height="0.027cm" svg:x="13.383cm" svg:y="7.155cm" svg:viewBox="0 0 28 28" draw:points="0,0 28,0 28,28 0,28">
          <text:p/>
        </draw:polygon>
        <draw:polygon draw:style-name="gr269" draw:text-style-name="P267" draw:layer="layout" svg:width="0.027cm" svg:height="0.027cm" svg:x="13.436cm" svg:y="7.155cm" svg:viewBox="0 0 28 28" draw:points="0,0 28,0 28,28 0,28">
          <text:p/>
        </draw:polygon>
        <draw:polygon draw:style-name="gr269" draw:text-style-name="P267" draw:layer="layout" svg:width="0.027cm" svg:height="0.027cm" svg:x="13.489cm" svg:y="7.155cm" svg:viewBox="0 0 28 28" draw:points="0,0 28,0 28,28 0,28">
          <text:p/>
        </draw:polygon>
        <draw:polygon draw:style-name="gr269" draw:text-style-name="P267" draw:layer="layout" svg:width="0.027cm" svg:height="0.027cm" svg:x="13.542cm" svg:y="7.155cm" svg:viewBox="0 0 28 28" draw:points="0,0 28,0 28,28 0,28">
          <text:p/>
        </draw:polygon>
        <draw:polygon draw:style-name="gr269" draw:text-style-name="P267" draw:layer="layout" svg:width="0.027cm" svg:height="0.027cm" svg:x="13.595cm" svg:y="7.155cm" svg:viewBox="0 0 28 28" draw:points="0,0 28,0 28,28 0,28">
          <text:p/>
        </draw:polygon>
        <draw:polygon draw:style-name="gr269" draw:text-style-name="P267" draw:layer="layout" svg:width="0.027cm" svg:height="0.027cm" svg:x="13.648cm" svg:y="7.155cm" svg:viewBox="0 0 28 28" draw:points="0,0 28,0 28,28 0,28">
          <text:p/>
        </draw:polygon>
        <draw:polygon draw:style-name="gr269" draw:text-style-name="P267" draw:layer="layout" svg:width="0.027cm" svg:height="0.027cm" svg:x="13.701cm" svg:y="7.155cm" svg:viewBox="0 0 28 28" draw:points="0,0 28,0 28,28 0,28">
          <text:p/>
        </draw:polygon>
        <draw:polygon draw:style-name="gr269" draw:text-style-name="P267" draw:layer="layout" svg:width="0.027cm" svg:height="0.027cm" svg:x="13.754cm" svg:y="7.155cm" svg:viewBox="0 0 28 28" draw:points="0,0 28,0 28,28 0,28">
          <text:p/>
        </draw:polygon>
        <draw:polygon draw:style-name="gr269" draw:text-style-name="P267" draw:layer="layout" svg:width="0.027cm" svg:height="0.027cm" svg:x="13.807cm" svg:y="7.155cm" svg:viewBox="0 0 28 28" draw:points="0,0 28,0 28,28 0,28">
          <text:p/>
        </draw:polygon>
        <draw:polygon draw:style-name="gr269" draw:text-style-name="P267" draw:layer="layout" svg:width="0.027cm" svg:height="0.027cm" svg:x="13.86cm" svg:y="7.155cm" svg:viewBox="0 0 28 28" draw:points="0,0 28,0 28,28 0,28">
          <text:p/>
        </draw:polygon>
        <draw:polygon draw:style-name="gr269" draw:text-style-name="P267" draw:layer="layout" svg:width="0.027cm" svg:height="0.027cm" svg:x="13.913cm" svg:y="7.155cm" svg:viewBox="0 0 28 28" draw:points="0,0 28,0 28,28 0,28">
          <text:p/>
        </draw:polygon>
        <draw:polygon draw:style-name="gr269" draw:text-style-name="P267" draw:layer="layout" svg:width="0.027cm" svg:height="0.027cm" svg:x="13.966cm" svg:y="7.155cm" svg:viewBox="0 0 28 28" draw:points="0,0 28,0 28,28 0,28">
          <text:p/>
        </draw:polygon>
        <draw:polygon draw:style-name="gr269" draw:text-style-name="P267" draw:layer="layout" svg:width="0.027cm" svg:height="0.027cm" svg:x="14.019cm" svg:y="7.155cm" svg:viewBox="0 0 28 28" draw:points="0,0 28,0 28,28 0,28">
          <text:p/>
        </draw:polygon>
        <draw:polygon draw:style-name="gr269" draw:text-style-name="P267" draw:layer="layout" svg:width="0.027cm" svg:height="0.027cm" svg:x="14.072cm" svg:y="7.155cm" svg:viewBox="0 0 28 28" draw:points="0,0 28,0 28,28 0,28">
          <text:p/>
        </draw:polygon>
        <draw:polygon draw:style-name="gr269" draw:text-style-name="P267" draw:layer="layout" svg:width="0.027cm" svg:height="0.027cm" svg:x="14.125cm" svg:y="7.155cm" svg:viewBox="0 0 28 28" draw:points="0,0 28,0 28,28 0,28">
          <text:p/>
        </draw:polygon>
        <draw:polygon draw:style-name="gr269" draw:text-style-name="P267" draw:layer="layout" svg:width="0.027cm" svg:height="0.027cm" svg:x="14.178cm" svg:y="7.155cm" svg:viewBox="0 0 28 28" draw:points="0,0 28,0 28,28 0,28">
          <text:p/>
        </draw:polygon>
        <draw:polygon draw:style-name="gr269" draw:text-style-name="P267" draw:layer="layout" svg:width="0.027cm" svg:height="0.027cm" svg:x="14.231cm" svg:y="7.155cm" svg:viewBox="0 0 28 28" draw:points="0,0 28,0 28,28 0,28">
          <text:p/>
        </draw:polygon>
        <draw:polygon draw:style-name="gr269" draw:text-style-name="P267" draw:layer="layout" svg:width="0.027cm" svg:height="0.027cm" svg:x="14.284cm" svg:y="7.155cm" svg:viewBox="0 0 28 28" draw:points="0,0 28,0 28,28 0,28">
          <text:p/>
        </draw:polygon>
        <draw:polygon draw:style-name="gr269" draw:text-style-name="P267" draw:layer="layout" svg:width="0.027cm" svg:height="0.027cm" svg:x="14.337cm" svg:y="7.155cm" svg:viewBox="0 0 28 28" draw:points="0,0 28,0 28,28 0,28">
          <text:p/>
        </draw:polygon>
        <draw:polygon draw:style-name="gr269" draw:text-style-name="P267" draw:layer="layout" svg:width="0.028cm" svg:height="0.027cm" svg:x="14.39cm" svg:y="7.155cm" svg:viewBox="0 0 29 28" draw:points="0,0 29,0 29,28 0,28">
          <text:p/>
        </draw:polygon>
        <draw:polygon draw:style-name="gr269" draw:text-style-name="P267" draw:layer="layout" svg:width="0.027cm" svg:height="0.027cm" svg:x="14.443cm" svg:y="7.155cm" svg:viewBox="0 0 28 28" draw:points="0,0 28,0 28,28 0,28">
          <text:p/>
        </draw:polygon>
        <draw:polygon draw:style-name="gr269" draw:text-style-name="P267" draw:layer="layout" svg:width="0.027cm" svg:height="0.027cm" svg:x="14.496cm" svg:y="7.155cm" svg:viewBox="0 0 28 28" draw:points="0,0 28,0 28,28 0,28">
          <text:p/>
        </draw:polygon>
        <draw:polygon draw:style-name="gr269" draw:text-style-name="P267" draw:layer="layout" svg:width="0.027cm" svg:height="0.027cm" svg:x="14.549cm" svg:y="7.155cm" svg:viewBox="0 0 28 28" draw:points="0,0 28,0 28,28 0,28">
          <text:p/>
        </draw:polygon>
        <draw:polygon draw:style-name="gr269" draw:text-style-name="P267" draw:layer="layout" svg:width="0.027cm" svg:height="0.027cm" svg:x="14.602cm" svg:y="7.155cm" svg:viewBox="0 0 28 28" draw:points="0,0 28,0 28,28 0,28">
          <text:p/>
        </draw:polygon>
        <draw:polygon draw:style-name="gr269" draw:text-style-name="P267" draw:layer="layout" svg:width="0.027cm" svg:height="0.027cm" svg:x="14.655cm" svg:y="7.155cm" svg:viewBox="0 0 28 28" draw:points="0,0 28,0 28,28 0,28">
          <text:p/>
        </draw:polygon>
        <draw:polygon draw:style-name="gr269" draw:text-style-name="P267" draw:layer="layout" svg:width="0.027cm" svg:height="0.027cm" svg:x="14.708cm" svg:y="7.155cm" svg:viewBox="0 0 28 28" draw:points="0,0 28,0 28,28 0,28">
          <text:p/>
        </draw:polygon>
        <draw:polygon draw:style-name="gr269" draw:text-style-name="P267" draw:layer="layout" svg:width="0.027cm" svg:height="0.027cm" svg:x="14.761cm" svg:y="7.155cm" svg:viewBox="0 0 28 28" draw:points="0,0 28,0 28,28 0,28">
          <text:p/>
        </draw:polygon>
        <draw:polygon draw:style-name="gr269" draw:text-style-name="P267" draw:layer="layout" svg:width="0.027cm" svg:height="0.027cm" svg:x="14.814cm" svg:y="7.155cm" svg:viewBox="0 0 28 28" draw:points="0,0 28,0 28,28 0,28">
          <text:p/>
        </draw:polygon>
        <draw:polygon draw:style-name="gr269" draw:text-style-name="P267" draw:layer="layout" svg:width="0.027cm" svg:height="0.027cm" svg:x="14.867cm" svg:y="7.155cm" svg:viewBox="0 0 28 28" draw:points="0,0 28,0 28,28 0,28">
          <text:p/>
        </draw:polygon>
        <draw:polygon draw:style-name="gr269" draw:text-style-name="P267" draw:layer="layout" svg:width="0.027cm" svg:height="0.027cm" svg:x="14.92cm" svg:y="7.155cm" svg:viewBox="0 0 28 28" draw:points="0,0 28,0 28,28 0,28">
          <text:p/>
        </draw:polygon>
        <draw:polygon draw:style-name="gr269" draw:text-style-name="P267" draw:layer="layout" svg:width="0.027cm" svg:height="0.027cm" svg:x="14.973cm" svg:y="7.155cm" svg:viewBox="0 0 28 28" draw:points="0,0 28,0 28,28 0,28">
          <text:p/>
        </draw:polygon>
        <draw:polygon draw:style-name="gr269" draw:text-style-name="P267" draw:layer="layout" svg:width="0.027cm" svg:height="0.027cm" svg:x="15.026cm" svg:y="7.155cm" svg:viewBox="0 0 28 28" draw:points="0,0 28,0 28,28 0,28">
          <text:p/>
        </draw:polygon>
        <draw:polygon draw:style-name="gr269" draw:text-style-name="P267" draw:layer="layout" svg:width="0.027cm" svg:height="0.027cm" svg:x="15.079cm" svg:y="7.155cm" svg:viewBox="0 0 28 28" draw:points="0,0 28,0 28,28 0,28">
          <text:p/>
        </draw:polygon>
        <draw:polygon draw:style-name="gr269" draw:text-style-name="P267" draw:layer="layout" svg:width="0.027cm" svg:height="0.027cm" svg:x="15.132cm" svg:y="7.155cm" svg:viewBox="0 0 28 28" draw:points="0,0 28,0 28,28 0,28">
          <text:p/>
        </draw:polygon>
        <draw:polygon draw:style-name="gr269" draw:text-style-name="P267" draw:layer="layout" svg:width="0.027cm" svg:height="0.027cm" svg:x="15.185cm" svg:y="7.155cm" svg:viewBox="0 0 28 28" draw:points="0,0 28,0 28,28 0,28">
          <text:p/>
        </draw:polygon>
        <draw:polygon draw:style-name="gr269" draw:text-style-name="P267" draw:layer="layout" svg:width="0.027cm" svg:height="0.027cm" svg:x="15.238cm" svg:y="7.155cm" svg:viewBox="0 0 28 28" draw:points="0,0 28,0 28,28 0,28">
          <text:p/>
        </draw:polygon>
        <draw:polygon draw:style-name="gr269" draw:text-style-name="P267" draw:layer="layout" svg:width="0.027cm" svg:height="0.027cm" svg:x="15.291cm" svg:y="7.155cm" svg:viewBox="0 0 28 28" draw:points="0,0 28,0 28,28 0,28">
          <text:p/>
        </draw:polygon>
        <draw:polygon draw:style-name="gr269" draw:text-style-name="P267" draw:layer="layout" svg:width="0.027cm" svg:height="0.027cm" svg:x="15.344cm" svg:y="7.155cm" svg:viewBox="0 0 28 28" draw:points="0,0 28,0 28,28 0,28">
          <text:p/>
        </draw:polygon>
        <draw:polygon draw:style-name="gr269" draw:text-style-name="P267" draw:layer="layout" svg:width="0.027cm" svg:height="0.027cm" svg:x="15.397cm" svg:y="7.155cm" svg:viewBox="0 0 28 28" draw:points="0,0 28,0 28,28 0,28">
          <text:p/>
        </draw:polygon>
        <draw:polygon draw:style-name="gr269" draw:text-style-name="P267" draw:layer="layout" svg:width="0.027cm" svg:height="0.027cm" svg:x="15.45cm" svg:y="7.155cm" svg:viewBox="0 0 28 28" draw:points="0,0 28,0 28,28 0,28">
          <text:p/>
        </draw:polygon>
        <draw:polygon draw:style-name="gr269" draw:text-style-name="P267" draw:layer="layout" svg:width="0.027cm" svg:height="0.027cm" svg:x="15.503cm" svg:y="7.155cm" svg:viewBox="0 0 28 28" draw:points="0,0 28,0 28,28 0,28">
          <text:p/>
        </draw:polygon>
        <draw:polygon draw:style-name="gr269" draw:text-style-name="P267" draw:layer="layout" svg:width="0.027cm" svg:height="0.027cm" svg:x="15.556cm" svg:y="7.155cm" svg:viewBox="0 0 28 28" draw:points="0,0 28,0 28,28 0,28">
          <text:p/>
        </draw:polygon>
        <draw:polygon draw:style-name="gr269" draw:text-style-name="P267" draw:layer="layout" svg:width="0.027cm" svg:height="0.027cm" svg:x="15.609cm" svg:y="7.155cm" svg:viewBox="0 0 28 28" draw:points="0,0 28,0 28,28 0,28">
          <text:p/>
        </draw:polygon>
        <draw:polygon draw:style-name="gr269" draw:text-style-name="P267" draw:layer="layout" svg:width="0.027cm" svg:height="0.027cm" svg:x="15.662cm" svg:y="7.155cm" svg:viewBox="0 0 28 28" draw:points="0,0 28,0 28,28 0,28">
          <text:p/>
        </draw:polygon>
        <draw:polygon draw:style-name="gr269" draw:text-style-name="P267" draw:layer="layout" svg:width="0.027cm" svg:height="0.027cm" svg:x="15.715cm" svg:y="7.155cm" svg:viewBox="0 0 28 28" draw:points="0,0 28,0 28,28 0,28">
          <text:p/>
        </draw:polygon>
        <draw:polygon draw:style-name="gr269" draw:text-style-name="P267" draw:layer="layout" svg:width="0.028cm" svg:height="0.027cm" svg:x="15.768cm" svg:y="7.155cm" svg:viewBox="0 0 29 28" draw:points="0,0 29,0 29,28 0,28">
          <text:p/>
        </draw:polygon>
        <draw:polygon draw:style-name="gr269" draw:text-style-name="P267" draw:layer="layout" svg:width="0.027cm" svg:height="0.027cm" svg:x="15.821cm" svg:y="7.155cm" svg:viewBox="0 0 28 28" draw:points="0,0 28,0 28,28 0,28">
          <text:p/>
        </draw:polygon>
        <draw:polygon draw:style-name="gr269" draw:text-style-name="P267" draw:layer="layout" svg:width="0.027cm" svg:height="0.027cm" svg:x="15.874cm" svg:y="7.155cm" svg:viewBox="0 0 28 28" draw:points="0,0 28,0 28,28 0,28">
          <text:p/>
        </draw:polygon>
        <draw:polygon draw:style-name="gr269" draw:text-style-name="P267" draw:layer="layout" svg:width="0.027cm" svg:height="0.027cm" svg:x="15.927cm" svg:y="7.155cm" svg:viewBox="0 0 28 28" draw:points="0,0 28,0 28,28 0,28">
          <text:p/>
        </draw:polygon>
        <draw:polygon draw:style-name="gr269" draw:text-style-name="P267" draw:layer="layout" svg:width="0.027cm" svg:height="0.027cm" svg:x="15.98cm" svg:y="7.155cm" svg:viewBox="0 0 28 28" draw:points="0,0 28,0 28,28 0,28">
          <text:p/>
        </draw:polygon>
        <draw:polygon draw:style-name="gr269" draw:text-style-name="P267" draw:layer="layout" svg:width="0.027cm" svg:height="0.027cm" svg:x="16.033cm" svg:y="7.155cm" svg:viewBox="0 0 28 28" draw:points="0,0 28,0 28,28 0,28">
          <text:p/>
        </draw:polygon>
        <draw:polygon draw:style-name="gr269" draw:text-style-name="P267" draw:layer="layout" svg:width="0.027cm" svg:height="0.027cm" svg:x="16.086cm" svg:y="7.155cm" svg:viewBox="0 0 28 28" draw:points="0,0 28,0 28,28 0,28">
          <text:p/>
        </draw:polygon>
        <draw:polygon draw:style-name="gr269" draw:text-style-name="P267" draw:layer="layout" svg:width="0.027cm" svg:height="0.027cm" svg:x="16.139cm" svg:y="7.155cm" svg:viewBox="0 0 28 28" draw:points="0,0 28,0 28,28 0,28">
          <text:p/>
        </draw:polygon>
        <draw:polygon draw:style-name="gr269" draw:text-style-name="P267" draw:layer="layout" svg:width="0.027cm" svg:height="0.027cm" svg:x="16.192cm" svg:y="7.155cm" svg:viewBox="0 0 28 28" draw:points="0,0 28,0 28,28 0,28">
          <text:p/>
        </draw:polygon>
        <draw:polygon draw:style-name="gr269" draw:text-style-name="P267" draw:layer="layout" svg:width="0.027cm" svg:height="0.027cm" svg:x="16.245cm" svg:y="7.155cm" svg:viewBox="0 0 28 28" draw:points="0,0 28,0 28,28 0,28">
          <text:p/>
        </draw:polygon>
        <draw:polygon draw:style-name="gr269" draw:text-style-name="P267" draw:layer="layout" svg:width="0.027cm" svg:height="0.027cm" svg:x="16.298cm" svg:y="7.155cm" svg:viewBox="0 0 28 28" draw:points="0,0 28,0 28,28 0,28">
          <text:p/>
        </draw:polygon>
        <draw:polygon draw:style-name="gr269" draw:text-style-name="P267" draw:layer="layout" svg:width="0.027cm" svg:height="0.027cm" svg:x="16.351cm" svg:y="7.155cm" svg:viewBox="0 0 28 28" draw:points="0,0 28,0 28,28 0,28">
          <text:p/>
        </draw:polygon>
        <draw:polygon draw:style-name="gr269" draw:text-style-name="P267" draw:layer="layout" svg:width="0.027cm" svg:height="0.027cm" svg:x="16.404cm" svg:y="7.155cm" svg:viewBox="0 0 28 28" draw:points="0,0 28,0 28,28 0,28">
          <text:p/>
        </draw:polygon>
        <draw:polygon draw:style-name="gr269" draw:text-style-name="P267" draw:layer="layout" svg:width="0.027cm" svg:height="0.027cm" svg:x="16.457cm" svg:y="7.155cm" svg:viewBox="0 0 28 28" draw:points="0,0 28,0 28,28 0,28">
          <text:p/>
        </draw:polygon>
        <draw:polygon draw:style-name="gr269" draw:text-style-name="P267" draw:layer="layout" svg:width="0.027cm" svg:height="0.027cm" svg:x="16.51cm" svg:y="7.155cm" svg:viewBox="0 0 28 28" draw:points="0,0 28,0 28,28 0,28">
          <text:p/>
        </draw:polygon>
        <draw:polygon draw:style-name="gr269" draw:text-style-name="P267" draw:layer="layout" svg:width="0.027cm" svg:height="0.027cm" svg:x="16.563cm" svg:y="7.155cm" svg:viewBox="0 0 28 28" draw:points="0,0 28,0 28,28 0,28">
          <text:p/>
        </draw:polygon>
        <draw:polygon draw:style-name="gr269" draw:text-style-name="P267" draw:layer="layout" svg:width="0.027cm" svg:height="0.027cm" svg:x="16.616cm" svg:y="7.155cm" svg:viewBox="0 0 28 28" draw:points="0,0 28,0 28,28 0,28">
          <text:p/>
        </draw:polygon>
        <draw:polygon draw:style-name="gr269" draw:text-style-name="P267" draw:layer="layout" svg:width="0.027cm" svg:height="0.027cm" svg:x="16.669cm" svg:y="7.155cm" svg:viewBox="0 0 28 28" draw:points="0,0 28,0 28,28 0,28">
          <text:p/>
        </draw:polygon>
        <draw:polygon draw:style-name="gr269" draw:text-style-name="P267" draw:layer="layout" svg:width="0.027cm" svg:height="0.027cm" svg:x="16.722cm" svg:y="7.155cm" svg:viewBox="0 0 28 28" draw:points="0,0 28,0 28,28 0,28">
          <text:p/>
        </draw:polygon>
        <draw:polygon draw:style-name="gr269" draw:text-style-name="P267" draw:layer="layout" svg:width="0.027cm" svg:height="0.027cm" svg:x="16.775cm" svg:y="7.155cm" svg:viewBox="0 0 28 28" draw:points="0,0 28,0 28,28 0,28">
          <text:p/>
        </draw:polygon>
        <draw:polygon draw:style-name="gr269" draw:text-style-name="P267" draw:layer="layout" svg:width="0.027cm" svg:height="0.027cm" svg:x="16.828cm" svg:y="7.155cm" svg:viewBox="0 0 28 28" draw:points="0,0 28,0 28,28 0,28">
          <text:p/>
        </draw:polygon>
        <draw:polygon draw:style-name="gr269" draw:text-style-name="P267" draw:layer="layout" svg:width="0.027cm" svg:height="0.027cm" svg:x="16.881cm" svg:y="7.155cm" svg:viewBox="0 0 28 28" draw:points="0,0 28,0 28,28 0,28">
          <text:p/>
        </draw:polygon>
        <draw:polygon draw:style-name="gr269" draw:text-style-name="P267" draw:layer="layout" svg:width="0.027cm" svg:height="0.027cm" svg:x="16.934cm" svg:y="7.155cm" svg:viewBox="0 0 28 28" draw:points="0,0 28,0 28,28 0,28">
          <text:p/>
        </draw:polygon>
        <draw:polygon draw:style-name="gr269" draw:text-style-name="P267" draw:layer="layout" svg:width="0.027cm" svg:height="0.027cm" svg:x="16.987cm" svg:y="7.155cm" svg:viewBox="0 0 28 28" draw:points="0,0 28,0 28,28 0,28">
          <text:p/>
        </draw:polygon>
        <draw:polygon draw:style-name="gr269" draw:text-style-name="P267" draw:layer="layout" svg:width="0.027cm" svg:height="0.027cm" svg:x="17.04cm" svg:y="7.155cm" svg:viewBox="0 0 28 28" draw:points="0,0 28,0 28,28 0,28">
          <text:p/>
        </draw:polygon>
        <draw:polygon draw:style-name="gr269" draw:text-style-name="P267" draw:layer="layout" svg:width="0.027cm" svg:height="0.027cm" svg:x="17.093cm" svg:y="7.155cm" svg:viewBox="0 0 28 28" draw:points="0,0 28,0 28,28 0,28">
          <text:p/>
        </draw:polygon>
        <draw:polygon draw:style-name="gr269" draw:text-style-name="P267" draw:layer="layout" svg:width="0.028cm" svg:height="0.027cm" svg:x="17.146cm" svg:y="7.155cm" svg:viewBox="0 0 29 28" draw:points="0,0 29,0 29,28 0,28">
          <text:p/>
        </draw:polygon>
        <draw:polygon draw:style-name="gr269" draw:text-style-name="P267" draw:layer="layout" svg:width="0.027cm" svg:height="0.027cm" svg:x="17.199cm" svg:y="7.155cm" svg:viewBox="0 0 28 28" draw:points="0,0 28,0 28,28 0,28">
          <text:p/>
        </draw:polygon>
        <draw:polygon draw:style-name="gr269" draw:text-style-name="P267" draw:layer="layout" svg:width="0.027cm" svg:height="0.027cm" svg:x="17.252cm" svg:y="7.155cm" svg:viewBox="0 0 28 28" draw:points="0,0 28,0 28,28 0,28">
          <text:p/>
        </draw:polygon>
        <draw:polygon draw:style-name="gr269" draw:text-style-name="P267" draw:layer="layout" svg:width="0.027cm" svg:height="0.027cm" svg:x="17.305cm" svg:y="7.155cm" svg:viewBox="0 0 28 28" draw:points="0,0 28,0 28,28 0,28">
          <text:p/>
        </draw:polygon>
        <draw:polygon draw:style-name="gr269" draw:text-style-name="P267" draw:layer="layout" svg:width="0.027cm" svg:height="0.027cm" svg:x="17.358cm" svg:y="7.155cm" svg:viewBox="0 0 28 28" draw:points="0,0 28,0 28,28 0,28">
          <text:p/>
        </draw:polygon>
        <draw:polygon draw:style-name="gr269" draw:text-style-name="P267" draw:layer="layout" svg:width="0.027cm" svg:height="0.027cm" svg:x="17.411cm" svg:y="7.155cm" svg:viewBox="0 0 28 28" draw:points="0,0 28,0 28,28 0,28">
          <text:p/>
        </draw:polygon>
        <draw:polygon draw:style-name="gr269" draw:text-style-name="P267" draw:layer="layout" svg:width="0.027cm" svg:height="0.027cm" svg:x="17.464cm" svg:y="7.155cm" svg:viewBox="0 0 28 28" draw:points="0,0 28,0 28,28 0,28">
          <text:p/>
        </draw:polygon>
        <draw:polygon draw:style-name="gr269" draw:text-style-name="P267" draw:layer="layout" svg:width="0.027cm" svg:height="0.027cm" svg:x="17.517cm" svg:y="7.155cm" svg:viewBox="0 0 28 28" draw:points="0,0 28,0 28,28 0,28">
          <text:p/>
        </draw:polygon>
        <draw:polygon draw:style-name="gr269" draw:text-style-name="P267" draw:layer="layout" svg:width="0.027cm" svg:height="0.027cm" svg:x="17.57cm" svg:y="7.155cm" svg:viewBox="0 0 28 28" draw:points="0,0 28,0 28,28 0,28">
          <text:p/>
        </draw:polygon>
        <draw:polygon draw:style-name="gr269" draw:text-style-name="P267" draw:layer="layout" svg:width="0.027cm" svg:height="0.027cm" svg:x="17.623cm" svg:y="7.155cm" svg:viewBox="0 0 28 28" draw:points="0,0 28,0 28,28 0,28">
          <text:p/>
        </draw:polygon>
        <draw:polygon draw:style-name="gr269" draw:text-style-name="P267" draw:layer="layout" svg:width="0.027cm" svg:height="0.027cm" svg:x="17.676cm" svg:y="7.155cm" svg:viewBox="0 0 28 28" draw:points="0,0 28,0 28,28 0,28">
          <text:p/>
        </draw:polygon>
        <draw:polygon draw:style-name="gr269" draw:text-style-name="P267" draw:layer="layout" svg:width="0.027cm" svg:height="0.027cm" svg:x="17.729cm" svg:y="7.155cm" svg:viewBox="0 0 28 28" draw:points="0,0 28,0 28,28 0,28">
          <text:p/>
        </draw:polygon>
        <draw:polygon draw:style-name="gr269" draw:text-style-name="P267" draw:layer="layout" svg:width="0.027cm" svg:height="0.027cm" svg:x="17.782cm" svg:y="7.155cm" svg:viewBox="0 0 28 28" draw:points="0,0 28,0 28,28 0,28">
          <text:p/>
        </draw:polygon>
        <draw:polygon draw:style-name="gr269" draw:text-style-name="P267" draw:layer="layout" svg:width="0.027cm" svg:height="0.027cm" svg:x="17.835cm" svg:y="7.155cm" svg:viewBox="0 0 28 28" draw:points="0,0 28,0 28,28 0,28">
          <text:p/>
        </draw:polygon>
        <draw:polygon draw:style-name="gr269" draw:text-style-name="P267" draw:layer="layout" svg:width="0.027cm" svg:height="0.027cm" svg:x="17.888cm" svg:y="7.155cm" svg:viewBox="0 0 28 28" draw:points="0,0 28,0 28,28 0,28">
          <text:p/>
        </draw:polygon>
        <draw:polygon draw:style-name="gr269" draw:text-style-name="P267" draw:layer="layout" svg:width="0.027cm" svg:height="0.027cm" svg:x="17.941cm" svg:y="7.155cm" svg:viewBox="0 0 28 28" draw:points="0,0 28,0 28,28 0,28">
          <text:p/>
        </draw:polygon>
        <draw:polygon draw:style-name="gr269" draw:text-style-name="P267" draw:layer="layout" svg:width="0.027cm" svg:height="0.027cm" svg:x="17.994cm" svg:y="7.155cm" svg:viewBox="0 0 28 28" draw:points="0,0 28,0 28,28 0,28">
          <text:p/>
        </draw:polygon>
        <draw:polygon draw:style-name="gr269" draw:text-style-name="P267" draw:layer="layout" svg:width="0.027cm" svg:height="0.027cm" svg:x="18.047cm" svg:y="7.155cm" svg:viewBox="0 0 28 28" draw:points="0,0 28,0 28,28 0,28">
          <text:p/>
        </draw:polygon>
        <draw:polygon draw:style-name="gr269" draw:text-style-name="P267" draw:layer="layout" svg:width="0.027cm" svg:height="0.027cm" svg:x="18.1cm" svg:y="7.155cm" svg:viewBox="0 0 28 28" draw:points="0,0 28,0 28,28 0,28">
          <text:p/>
        </draw:polygon>
        <draw:polygon draw:style-name="gr269" draw:text-style-name="P267" draw:layer="layout" svg:width="0.027cm" svg:height="0.027cm" svg:x="18.153cm" svg:y="7.155cm" svg:viewBox="0 0 28 28" draw:points="0,0 28,0 28,28 0,28">
          <text:p/>
        </draw:polygon>
        <draw:polygon draw:style-name="gr269" draw:text-style-name="P267" draw:layer="layout" svg:width="0.027cm" svg:height="0.027cm" svg:x="18.206cm" svg:y="7.155cm" svg:viewBox="0 0 28 28" draw:points="0,0 28,0 28,28 0,28">
          <text:p/>
        </draw:polygon>
        <draw:polygon draw:style-name="gr269" draw:text-style-name="P267" draw:layer="layout" svg:width="0.027cm" svg:height="0.027cm" svg:x="18.259cm" svg:y="7.155cm" svg:viewBox="0 0 28 28" draw:points="0,0 28,0 28,28 0,28">
          <text:p/>
        </draw:polygon>
        <draw:polygon draw:style-name="gr269" draw:text-style-name="P267" draw:layer="layout" svg:width="0.027cm" svg:height="0.027cm" svg:x="18.312cm" svg:y="7.155cm" svg:viewBox="0 0 28 28" draw:points="0,0 28,0 28,28 0,28">
          <text:p/>
        </draw:polygon>
        <draw:polygon draw:style-name="gr269" draw:text-style-name="P267" draw:layer="layout" svg:width="0.027cm" svg:height="0.027cm" svg:x="18.365cm" svg:y="7.155cm" svg:viewBox="0 0 28 28" draw:points="0,0 28,0 28,28 0,28">
          <text:p/>
        </draw:polygon>
        <draw:polygon draw:style-name="gr269" draw:text-style-name="P267" draw:layer="layout" svg:width="0.027cm" svg:height="0.027cm" svg:x="18.418cm" svg:y="7.155cm" svg:viewBox="0 0 28 28" draw:points="0,0 28,0 28,28 0,28">
          <text:p/>
        </draw:polygon>
        <draw:polygon draw:style-name="gr269" draw:text-style-name="P267" draw:layer="layout" svg:width="0.027cm" svg:height="0.027cm" svg:x="18.471cm" svg:y="7.155cm" svg:viewBox="0 0 28 28" draw:points="0,0 28,0 28,28 0,28">
          <text:p/>
        </draw:polygon>
        <draw:polygon draw:style-name="gr269" draw:text-style-name="P267" draw:layer="layout" svg:width="0.028cm" svg:height="0.027cm" svg:x="18.524cm" svg:y="7.155cm" svg:viewBox="0 0 29 28" draw:points="0,0 29,0 29,28 0,28">
          <text:p/>
        </draw:polygon>
        <draw:polygon draw:style-name="gr269" draw:text-style-name="P267" draw:layer="layout" svg:width="0.027cm" svg:height="0.027cm" svg:x="18.577cm" svg:y="7.155cm" svg:viewBox="0 0 28 28" draw:points="0,0 28,0 28,28 0,28">
          <text:p/>
        </draw:polygon>
        <draw:polygon draw:style-name="gr269" draw:text-style-name="P267" draw:layer="layout" svg:width="0.027cm" svg:height="0.027cm" svg:x="18.63cm" svg:y="7.155cm" svg:viewBox="0 0 28 28" draw:points="0,0 28,0 28,28 0,28">
          <text:p/>
        </draw:polygon>
        <draw:polygon draw:style-name="gr269" draw:text-style-name="P267" draw:layer="layout" svg:width="0.027cm" svg:height="0.027cm" svg:x="18.683cm" svg:y="7.155cm" svg:viewBox="0 0 28 28" draw:points="0,0 28,0 28,28 0,28">
          <text:p/>
        </draw:polygon>
        <draw:polygon draw:style-name="gr269" draw:text-style-name="P267" draw:layer="layout" svg:width="0.027cm" svg:height="0.027cm" svg:x="18.736cm" svg:y="7.155cm" svg:viewBox="0 0 28 28" draw:points="0,0 28,0 28,28 0,28">
          <text:p/>
        </draw:polygon>
        <draw:polygon draw:style-name="gr269" draw:text-style-name="P267" draw:layer="layout" svg:width="0.027cm" svg:height="0.027cm" svg:x="18.789cm" svg:y="7.155cm" svg:viewBox="0 0 28 28" draw:points="0,0 28,0 28,28 0,28">
          <text:p/>
        </draw:polygon>
        <draw:polygon draw:style-name="gr269" draw:text-style-name="P267" draw:layer="layout" svg:width="0.027cm" svg:height="0.027cm" svg:x="18.842cm" svg:y="7.155cm" svg:viewBox="0 0 28 28" draw:points="0,0 28,0 28,28 0,28">
          <text:p/>
        </draw:polygon>
        <draw:polygon draw:style-name="gr269" draw:text-style-name="P267" draw:layer="layout" svg:width="0.027cm" svg:height="0.027cm" svg:x="18.895cm" svg:y="7.155cm" svg:viewBox="0 0 28 28" draw:points="0,0 28,0 28,28 0,28">
          <text:p/>
        </draw:polygon>
        <draw:polygon draw:style-name="gr269" draw:text-style-name="P267" draw:layer="layout" svg:width="0.027cm" svg:height="0.027cm" svg:x="18.948cm" svg:y="7.155cm" svg:viewBox="0 0 28 28" draw:points="0,0 28,0 28,28 0,28">
          <text:p/>
        </draw:polygon>
        <draw:polygon draw:style-name="gr269" draw:text-style-name="P267" draw:layer="layout" svg:width="0.027cm" svg:height="0.027cm" svg:x="19.001cm" svg:y="7.155cm" svg:viewBox="0 0 28 28" draw:points="0,0 28,0 28,28 0,28">
          <text:p/>
        </draw:polygon>
        <draw:polygon draw:style-name="gr269" draw:text-style-name="P267" draw:layer="layout" svg:width="0.053cm" svg:height="0.026cm" svg:x="2.014cm" svg:y="8.136cm" svg:viewBox="0 0 54 27" draw:points="0,0 54,0 54,27 0,27">
          <text:p/>
        </draw:polygon>
        <draw:polygon draw:style-name="gr269" draw:text-style-name="P267" draw:layer="layout" svg:width="0.027cm" svg:height="0.026cm" svg:x="2.093cm" svg:y="8.136cm" svg:viewBox="0 0 28 27" draw:points="0,0 28,0 28,27 0,27">
          <text:p/>
        </draw:polygon>
        <draw:polygon draw:style-name="gr269" draw:text-style-name="P267" draw:layer="layout" svg:width="0.027cm" svg:height="0.026cm" svg:x="2.146cm" svg:y="8.136cm" svg:viewBox="0 0 28 27" draw:points="0,0 28,0 28,27 0,27">
          <text:p/>
        </draw:polygon>
        <draw:polygon draw:style-name="gr269" draw:text-style-name="P267" draw:layer="layout" svg:width="0.027cm" svg:height="0.026cm" svg:x="2.199cm" svg:y="8.136cm" svg:viewBox="0 0 28 27" draw:points="0,0 28,0 28,27 0,27">
          <text:p/>
        </draw:polygon>
        <draw:polygon draw:style-name="gr269" draw:text-style-name="P267" draw:layer="layout" svg:width="0.027cm" svg:height="0.026cm" svg:x="2.252cm" svg:y="8.136cm" svg:viewBox="0 0 28 27" draw:points="0,0 28,0 28,27 0,27">
          <text:p/>
        </draw:polygon>
        <draw:polygon draw:style-name="gr269" draw:text-style-name="P267" draw:layer="layout" svg:width="0.027cm" svg:height="0.026cm" svg:x="2.305cm" svg:y="8.136cm" svg:viewBox="0 0 28 27" draw:points="0,0 28,0 28,27 0,27">
          <text:p/>
        </draw:polygon>
        <draw:polygon draw:style-name="gr269" draw:text-style-name="P267" draw:layer="layout" svg:width="0.027cm" svg:height="0.026cm" svg:x="2.358cm" svg:y="8.136cm" svg:viewBox="0 0 28 27" draw:points="0,0 28,0 28,27 0,27">
          <text:p/>
        </draw:polygon>
        <draw:polygon draw:style-name="gr269" draw:text-style-name="P267" draw:layer="layout" svg:width="0.027cm" svg:height="0.026cm" svg:x="2.411cm" svg:y="8.136cm" svg:viewBox="0 0 28 27" draw:points="0,0 28,0 28,27 0,27">
          <text:p/>
        </draw:polygon>
        <draw:polygon draw:style-name="gr269" draw:text-style-name="P267" draw:layer="layout" svg:width="0.027cm" svg:height="0.026cm" svg:x="2.464cm" svg:y="8.136cm" svg:viewBox="0 0 28 27" draw:points="0,0 28,0 28,27 0,27">
          <text:p/>
        </draw:polygon>
        <draw:polygon draw:style-name="gr269" draw:text-style-name="P267" draw:layer="layout" svg:width="0.027cm" svg:height="0.026cm" svg:x="2.517cm" svg:y="8.136cm" svg:viewBox="0 0 28 27" draw:points="0,0 28,0 28,27 0,27">
          <text:p/>
        </draw:polygon>
        <draw:polygon draw:style-name="gr269" draw:text-style-name="P267" draw:layer="layout" svg:width="0.027cm" svg:height="0.026cm" svg:x="2.57cm" svg:y="8.136cm" svg:viewBox="0 0 28 27" draw:points="0,0 28,0 28,27 0,27">
          <text:p/>
        </draw:polygon>
        <draw:polygon draw:style-name="gr269" draw:text-style-name="P267" draw:layer="layout" svg:width="0.027cm" svg:height="0.026cm" svg:x="2.623cm" svg:y="8.136cm" svg:viewBox="0 0 28 27" draw:points="0,0 28,0 28,27 0,27">
          <text:p/>
        </draw:polygon>
        <draw:polygon draw:style-name="gr269" draw:text-style-name="P267" draw:layer="layout" svg:width="0.027cm" svg:height="0.026cm" svg:x="2.676cm" svg:y="8.136cm" svg:viewBox="0 0 28 27" draw:points="0,0 28,0 28,27 0,27">
          <text:p/>
        </draw:polygon>
        <draw:polygon draw:style-name="gr269" draw:text-style-name="P267" draw:layer="layout" svg:width="0.027cm" svg:height="0.026cm" svg:x="2.729cm" svg:y="8.136cm" svg:viewBox="0 0 28 27" draw:points="0,0 28,0 28,27 0,27">
          <text:p/>
        </draw:polygon>
        <draw:polygon draw:style-name="gr269" draw:text-style-name="P267" draw:layer="layout" svg:width="0.027cm" svg:height="0.026cm" svg:x="2.782cm" svg:y="8.136cm" svg:viewBox="0 0 28 27" draw:points="0,0 28,0 28,27 0,27">
          <text:p/>
        </draw:polygon>
        <draw:polygon draw:style-name="gr269" draw:text-style-name="P267" draw:layer="layout" svg:width="0.027cm" svg:height="0.026cm" svg:x="2.835cm" svg:y="8.136cm" svg:viewBox="0 0 28 27" draw:points="0,0 28,0 28,27 0,27">
          <text:p/>
        </draw:polygon>
        <draw:polygon draw:style-name="gr269" draw:text-style-name="P267" draw:layer="layout" svg:width="0.027cm" svg:height="0.026cm" svg:x="2.888cm" svg:y="8.136cm" svg:viewBox="0 0 28 27" draw:points="0,0 28,0 28,27 0,27">
          <text:p/>
        </draw:polygon>
        <draw:polygon draw:style-name="gr269" draw:text-style-name="P267" draw:layer="layout" svg:width="0.027cm" svg:height="0.026cm" svg:x="2.941cm" svg:y="8.136cm" svg:viewBox="0 0 28 27" draw:points="0,0 28,0 28,27 0,27">
          <text:p/>
        </draw:polygon>
        <draw:polygon draw:style-name="gr269" draw:text-style-name="P267" draw:layer="layout" svg:width="0.027cm" svg:height="0.026cm" svg:x="2.994cm" svg:y="8.136cm" svg:viewBox="0 0 28 27" draw:points="0,0 28,0 28,27 0,27">
          <text:p/>
        </draw:polygon>
        <draw:polygon draw:style-name="gr269" draw:text-style-name="P267" draw:layer="layout" svg:width="0.027cm" svg:height="0.026cm" svg:x="3.047cm" svg:y="8.136cm" svg:viewBox="0 0 28 27" draw:points="0,0 28,0 28,27 0,27">
          <text:p/>
        </draw:polygon>
        <draw:polygon draw:style-name="gr269" draw:text-style-name="P267" draw:layer="layout" svg:width="0.027cm" svg:height="0.026cm" svg:x="3.1cm" svg:y="8.136cm" svg:viewBox="0 0 28 27" draw:points="0,0 28,0 28,27 0,27">
          <text:p/>
        </draw:polygon>
        <draw:polygon draw:style-name="gr269" draw:text-style-name="P267" draw:layer="layout" svg:width="0.027cm" svg:height="0.026cm" svg:x="3.153cm" svg:y="8.136cm" svg:viewBox="0 0 28 27" draw:points="0,0 28,0 28,27 0,27">
          <text:p/>
        </draw:polygon>
        <draw:polygon draw:style-name="gr269" draw:text-style-name="P267" draw:layer="layout" svg:width="0.027cm" svg:height="0.026cm" svg:x="3.206cm" svg:y="8.136cm" svg:viewBox="0 0 28 27" draw:points="0,0 28,0 28,27 0,27">
          <text:p/>
        </draw:polygon>
        <draw:polygon draw:style-name="gr269" draw:text-style-name="P267" draw:layer="layout" svg:width="0.027cm" svg:height="0.026cm" svg:x="3.259cm" svg:y="8.136cm" svg:viewBox="0 0 28 27" draw:points="0,0 28,0 28,27 0,27">
          <text:p/>
        </draw:polygon>
        <draw:polygon draw:style-name="gr269" draw:text-style-name="P267" draw:layer="layout" svg:width="0.027cm" svg:height="0.026cm" svg:x="3.312cm" svg:y="8.136cm" svg:viewBox="0 0 28 27" draw:points="0,0 28,0 28,27 0,27">
          <text:p/>
        </draw:polygon>
        <draw:polygon draw:style-name="gr269" draw:text-style-name="P267" draw:layer="layout" svg:width="0.027cm" svg:height="0.026cm" svg:x="3.365cm" svg:y="8.136cm" svg:viewBox="0 0 28 27" draw:points="0,0 28,0 28,27 0,27">
          <text:p/>
        </draw:polygon>
        <draw:polygon draw:style-name="gr269" draw:text-style-name="P267" draw:layer="layout" svg:width="0.028cm" svg:height="0.026cm" svg:x="3.418cm" svg:y="8.136cm" svg:viewBox="0 0 29 27" draw:points="0,0 29,0 29,27 0,27">
          <text:p/>
        </draw:polygon>
        <draw:polygon draw:style-name="gr269" draw:text-style-name="P267" draw:layer="layout" svg:width="0.027cm" svg:height="0.026cm" svg:x="3.471cm" svg:y="8.136cm" svg:viewBox="0 0 28 27" draw:points="0,0 28,0 28,27 0,27">
          <text:p/>
        </draw:polygon>
        <draw:polygon draw:style-name="gr269" draw:text-style-name="P267" draw:layer="layout" svg:width="0.027cm" svg:height="0.026cm" svg:x="3.524cm" svg:y="8.136cm" svg:viewBox="0 0 28 27" draw:points="0,0 28,0 28,27 0,27">
          <text:p/>
        </draw:polygon>
        <draw:polygon draw:style-name="gr269" draw:text-style-name="P267" draw:layer="layout" svg:width="0.027cm" svg:height="0.026cm" svg:x="3.577cm" svg:y="8.136cm" svg:viewBox="0 0 28 27" draw:points="0,0 28,0 28,27 0,27">
          <text:p/>
        </draw:polygon>
        <draw:polygon draw:style-name="gr269" draw:text-style-name="P267" draw:layer="layout" svg:width="0.027cm" svg:height="0.026cm" svg:x="3.63cm" svg:y="8.136cm" svg:viewBox="0 0 28 27" draw:points="0,0 28,0 28,27 0,27">
          <text:p/>
        </draw:polygon>
        <draw:polygon draw:style-name="gr269" draw:text-style-name="P267" draw:layer="layout" svg:width="0.027cm" svg:height="0.026cm" svg:x="3.683cm" svg:y="8.136cm" svg:viewBox="0 0 28 27" draw:points="0,0 28,0 28,27 0,27">
          <text:p/>
        </draw:polygon>
        <draw:polygon draw:style-name="gr269" draw:text-style-name="P267" draw:layer="layout" svg:width="0.027cm" svg:height="0.026cm" svg:x="3.736cm" svg:y="8.136cm" svg:viewBox="0 0 28 27" draw:points="0,0 28,0 28,27 0,27">
          <text:p/>
        </draw:polygon>
        <draw:polygon draw:style-name="gr269" draw:text-style-name="P267" draw:layer="layout" svg:width="0.027cm" svg:height="0.026cm" svg:x="3.789cm" svg:y="8.136cm" svg:viewBox="0 0 28 27" draw:points="0,0 28,0 28,27 0,27">
          <text:p/>
        </draw:polygon>
        <draw:polygon draw:style-name="gr269" draw:text-style-name="P267" draw:layer="layout" svg:width="0.027cm" svg:height="0.026cm" svg:x="3.842cm" svg:y="8.136cm" svg:viewBox="0 0 28 27" draw:points="0,0 28,0 28,27 0,27">
          <text:p/>
        </draw:polygon>
        <draw:polygon draw:style-name="gr269" draw:text-style-name="P267" draw:layer="layout" svg:width="0.027cm" svg:height="0.026cm" svg:x="3.895cm" svg:y="8.136cm" svg:viewBox="0 0 28 27" draw:points="0,0 28,0 28,27 0,27">
          <text:p/>
        </draw:polygon>
        <draw:polygon draw:style-name="gr269" draw:text-style-name="P267" draw:layer="layout" svg:width="0.027cm" svg:height="0.026cm" svg:x="3.948cm" svg:y="8.136cm" svg:viewBox="0 0 28 27" draw:points="0,0 28,0 28,27 0,27">
          <text:p/>
        </draw:polygon>
        <draw:polygon draw:style-name="gr269" draw:text-style-name="P267" draw:layer="layout" svg:width="0.027cm" svg:height="0.026cm" svg:x="4.001cm" svg:y="8.136cm" svg:viewBox="0 0 28 27" draw:points="0,0 28,0 28,27 0,27">
          <text:p/>
        </draw:polygon>
        <draw:polygon draw:style-name="gr269" draw:text-style-name="P267" draw:layer="layout" svg:width="0.027cm" svg:height="0.026cm" svg:x="4.054cm" svg:y="8.136cm" svg:viewBox="0 0 28 27" draw:points="0,0 28,0 28,27 0,27">
          <text:p/>
        </draw:polygon>
        <draw:polygon draw:style-name="gr269" draw:text-style-name="P267" draw:layer="layout" svg:width="0.027cm" svg:height="0.026cm" svg:x="4.107cm" svg:y="8.136cm" svg:viewBox="0 0 28 27" draw:points="0,0 28,0 28,27 0,27">
          <text:p/>
        </draw:polygon>
        <draw:polygon draw:style-name="gr269" draw:text-style-name="P267" draw:layer="layout" svg:width="0.027cm" svg:height="0.026cm" svg:x="4.16cm" svg:y="8.136cm" svg:viewBox="0 0 28 27" draw:points="0,0 28,0 28,27 0,27">
          <text:p/>
        </draw:polygon>
        <draw:polygon draw:style-name="gr269" draw:text-style-name="P267" draw:layer="layout" svg:width="0.027cm" svg:height="0.026cm" svg:x="4.213cm" svg:y="8.136cm" svg:viewBox="0 0 28 27" draw:points="0,0 28,0 28,27 0,27">
          <text:p/>
        </draw:polygon>
        <draw:polygon draw:style-name="gr269" draw:text-style-name="P267" draw:layer="layout" svg:width="0.027cm" svg:height="0.026cm" svg:x="4.266cm" svg:y="8.136cm" svg:viewBox="0 0 28 27" draw:points="0,0 28,0 28,27 0,27">
          <text:p/>
        </draw:polygon>
        <draw:polygon draw:style-name="gr269" draw:text-style-name="P267" draw:layer="layout" svg:width="0.027cm" svg:height="0.026cm" svg:x="4.319cm" svg:y="8.136cm" svg:viewBox="0 0 28 27" draw:points="0,0 28,0 28,27 0,27">
          <text:p/>
        </draw:polygon>
        <draw:polygon draw:style-name="gr269" draw:text-style-name="P267" draw:layer="layout" svg:width="0.027cm" svg:height="0.026cm" svg:x="4.372cm" svg:y="8.136cm" svg:viewBox="0 0 28 27" draw:points="0,0 28,0 28,27 0,27">
          <text:p/>
        </draw:polygon>
        <draw:polygon draw:style-name="gr269" draw:text-style-name="P267" draw:layer="layout" svg:width="0.027cm" svg:height="0.026cm" svg:x="4.425cm" svg:y="8.136cm" svg:viewBox="0 0 28 27" draw:points="0,0 28,0 28,27 0,27">
          <text:p/>
        </draw:polygon>
        <draw:polygon draw:style-name="gr269" draw:text-style-name="P267" draw:layer="layout" svg:width="0.027cm" svg:height="0.026cm" svg:x="4.478cm" svg:y="8.136cm" svg:viewBox="0 0 28 27" draw:points="0,0 28,0 28,27 0,27">
          <text:p/>
        </draw:polygon>
        <draw:polygon draw:style-name="gr269" draw:text-style-name="P267" draw:layer="layout" svg:width="0.027cm" svg:height="0.026cm" svg:x="4.531cm" svg:y="8.136cm" svg:viewBox="0 0 28 27" draw:points="0,0 28,0 28,27 0,27">
          <text:p/>
        </draw:polygon>
        <draw:polygon draw:style-name="gr269" draw:text-style-name="P267" draw:layer="layout" svg:width="0.027cm" svg:height="0.026cm" svg:x="4.584cm" svg:y="8.136cm" svg:viewBox="0 0 28 27" draw:points="0,0 28,0 28,27 0,27">
          <text:p/>
        </draw:polygon>
        <draw:polygon draw:style-name="gr269" draw:text-style-name="P267" draw:layer="layout" svg:width="0.027cm" svg:height="0.026cm" svg:x="4.637cm" svg:y="8.136cm" svg:viewBox="0 0 28 27" draw:points="0,0 28,0 28,27 0,27">
          <text:p/>
        </draw:polygon>
        <draw:polygon draw:style-name="gr269" draw:text-style-name="P267" draw:layer="layout" svg:width="0.027cm" svg:height="0.026cm" svg:x="4.69cm" svg:y="8.136cm" svg:viewBox="0 0 28 27" draw:points="0,0 28,0 28,27 0,27">
          <text:p/>
        </draw:polygon>
        <draw:polygon draw:style-name="gr269" draw:text-style-name="P267" draw:layer="layout" svg:width="0.027cm" svg:height="0.026cm" svg:x="4.743cm" svg:y="8.136cm" svg:viewBox="0 0 28 27" draw:points="0,0 28,0 28,27 0,27">
          <text:p/>
        </draw:polygon>
        <draw:polygon draw:style-name="gr269" draw:text-style-name="P267" draw:layer="layout" svg:width="0.028cm" svg:height="0.026cm" svg:x="4.796cm" svg:y="8.136cm" svg:viewBox="0 0 29 27" draw:points="0,0 29,0 29,27 0,27">
          <text:p/>
        </draw:polygon>
        <draw:polygon draw:style-name="gr269" draw:text-style-name="P267" draw:layer="layout" svg:width="0.027cm" svg:height="0.026cm" svg:x="4.849cm" svg:y="8.136cm" svg:viewBox="0 0 28 27" draw:points="0,0 28,0 28,27 0,27">
          <text:p/>
        </draw:polygon>
        <draw:polygon draw:style-name="gr269" draw:text-style-name="P267" draw:layer="layout" svg:width="0.027cm" svg:height="0.026cm" svg:x="4.902cm" svg:y="8.136cm" svg:viewBox="0 0 28 27" draw:points="0,0 28,0 28,27 0,27">
          <text:p/>
        </draw:polygon>
        <draw:polygon draw:style-name="gr269" draw:text-style-name="P267" draw:layer="layout" svg:width="0.027cm" svg:height="0.026cm" svg:x="4.955cm" svg:y="8.136cm" svg:viewBox="0 0 28 27" draw:points="0,0 28,0 28,27 0,27">
          <text:p/>
        </draw:polygon>
        <draw:polygon draw:style-name="gr269" draw:text-style-name="P267" draw:layer="layout" svg:width="0.027cm" svg:height="0.026cm" svg:x="5.008cm" svg:y="8.136cm" svg:viewBox="0 0 28 27" draw:points="0,0 28,0 28,27 0,27">
          <text:p/>
        </draw:polygon>
        <draw:polygon draw:style-name="gr269" draw:text-style-name="P267" draw:layer="layout" svg:width="0.027cm" svg:height="0.026cm" svg:x="5.061cm" svg:y="8.136cm" svg:viewBox="0 0 28 27" draw:points="0,0 28,0 28,27 0,27">
          <text:p/>
        </draw:polygon>
        <draw:polygon draw:style-name="gr269" draw:text-style-name="P267" draw:layer="layout" svg:width="0.027cm" svg:height="0.026cm" svg:x="5.114cm" svg:y="8.136cm" svg:viewBox="0 0 28 27" draw:points="0,0 28,0 28,27 0,27">
          <text:p/>
        </draw:polygon>
        <draw:polygon draw:style-name="gr269" draw:text-style-name="P267" draw:layer="layout" svg:width="0.027cm" svg:height="0.026cm" svg:x="5.167cm" svg:y="8.136cm" svg:viewBox="0 0 28 27" draw:points="0,0 28,0 28,27 0,27">
          <text:p/>
        </draw:polygon>
        <draw:polygon draw:style-name="gr269" draw:text-style-name="P267" draw:layer="layout" svg:width="0.027cm" svg:height="0.026cm" svg:x="5.22cm" svg:y="8.136cm" svg:viewBox="0 0 28 27" draw:points="0,0 28,0 28,27 0,27">
          <text:p/>
        </draw:polygon>
        <draw:polygon draw:style-name="gr269" draw:text-style-name="P267" draw:layer="layout" svg:width="0.027cm" svg:height="0.026cm" svg:x="5.273cm" svg:y="8.136cm" svg:viewBox="0 0 28 27" draw:points="0,0 28,0 28,27 0,27">
          <text:p/>
        </draw:polygon>
        <draw:polygon draw:style-name="gr269" draw:text-style-name="P267" draw:layer="layout" svg:width="0.027cm" svg:height="0.026cm" svg:x="5.326cm" svg:y="8.136cm" svg:viewBox="0 0 28 27" draw:points="0,0 28,0 28,27 0,27">
          <text:p/>
        </draw:polygon>
        <draw:polygon draw:style-name="gr269" draw:text-style-name="P267" draw:layer="layout" svg:width="0.027cm" svg:height="0.026cm" svg:x="5.379cm" svg:y="8.136cm" svg:viewBox="0 0 28 27" draw:points="0,0 28,0 28,27 0,27">
          <text:p/>
        </draw:polygon>
        <draw:polygon draw:style-name="gr269" draw:text-style-name="P267" draw:layer="layout" svg:width="0.027cm" svg:height="0.026cm" svg:x="5.432cm" svg:y="8.136cm" svg:viewBox="0 0 28 27" draw:points="0,0 28,0 28,27 0,27">
          <text:p/>
        </draw:polygon>
        <draw:polygon draw:style-name="gr269" draw:text-style-name="P267" draw:layer="layout" svg:width="0.027cm" svg:height="0.026cm" svg:x="5.485cm" svg:y="8.136cm" svg:viewBox="0 0 28 27" draw:points="0,0 28,0 28,27 0,27">
          <text:p/>
        </draw:polygon>
        <draw:polygon draw:style-name="gr269" draw:text-style-name="P267" draw:layer="layout" svg:width="0.027cm" svg:height="0.026cm" svg:x="5.538cm" svg:y="8.136cm" svg:viewBox="0 0 28 27" draw:points="0,0 28,0 28,27 0,27">
          <text:p/>
        </draw:polygon>
        <draw:polygon draw:style-name="gr269" draw:text-style-name="P267" draw:layer="layout" svg:width="0.027cm" svg:height="0.026cm" svg:x="5.591cm" svg:y="8.136cm" svg:viewBox="0 0 28 27" draw:points="0,0 28,0 28,27 0,27">
          <text:p/>
        </draw:polygon>
        <draw:polygon draw:style-name="gr269" draw:text-style-name="P267" draw:layer="layout" svg:width="0.027cm" svg:height="0.026cm" svg:x="5.644cm" svg:y="8.136cm" svg:viewBox="0 0 28 27" draw:points="0,0 28,0 28,27 0,27">
          <text:p/>
        </draw:polygon>
        <draw:polygon draw:style-name="gr269" draw:text-style-name="P267" draw:layer="layout" svg:width="0.027cm" svg:height="0.026cm" svg:x="5.697cm" svg:y="8.136cm" svg:viewBox="0 0 28 27" draw:points="0,0 28,0 28,27 0,27">
          <text:p/>
        </draw:polygon>
        <draw:polygon draw:style-name="gr269" draw:text-style-name="P267" draw:layer="layout" svg:width="0.027cm" svg:height="0.026cm" svg:x="5.75cm" svg:y="8.136cm" svg:viewBox="0 0 28 27" draw:points="0,0 28,0 28,27 0,27">
          <text:p/>
        </draw:polygon>
        <draw:polygon draw:style-name="gr269" draw:text-style-name="P267" draw:layer="layout" svg:width="0.027cm" svg:height="0.026cm" svg:x="5.803cm" svg:y="8.136cm" svg:viewBox="0 0 28 27" draw:points="0,0 28,0 28,27 0,27">
          <text:p/>
        </draw:polygon>
        <draw:polygon draw:style-name="gr269" draw:text-style-name="P267" draw:layer="layout" svg:width="0.027cm" svg:height="0.026cm" svg:x="5.856cm" svg:y="8.136cm" svg:viewBox="0 0 28 27" draw:points="0,0 28,0 28,27 0,27">
          <text:p/>
        </draw:polygon>
        <draw:polygon draw:style-name="gr269" draw:text-style-name="P267" draw:layer="layout" svg:width="0.027cm" svg:height="0.026cm" svg:x="5.909cm" svg:y="8.136cm" svg:viewBox="0 0 28 27" draw:points="0,0 28,0 28,27 0,27">
          <text:p/>
        </draw:polygon>
        <draw:polygon draw:style-name="gr269" draw:text-style-name="P267" draw:layer="layout" svg:width="0.027cm" svg:height="0.026cm" svg:x="5.962cm" svg:y="8.136cm" svg:viewBox="0 0 28 27" draw:points="0,0 28,0 28,27 0,27">
          <text:p/>
        </draw:polygon>
        <draw:polygon draw:style-name="gr269" draw:text-style-name="P267" draw:layer="layout" svg:width="0.027cm" svg:height="0.026cm" svg:x="6.015cm" svg:y="8.136cm" svg:viewBox="0 0 28 27" draw:points="0,0 28,0 28,27 0,27">
          <text:p/>
        </draw:polygon>
        <draw:polygon draw:style-name="gr269" draw:text-style-name="P267" draw:layer="layout" svg:width="0.027cm" svg:height="0.026cm" svg:x="6.068cm" svg:y="8.136cm" svg:viewBox="0 0 28 27" draw:points="0,0 28,0 28,27 0,27">
          <text:p/>
        </draw:polygon>
        <draw:polygon draw:style-name="gr269" draw:text-style-name="P267" draw:layer="layout" svg:width="0.027cm" svg:height="0.026cm" svg:x="6.121cm" svg:y="8.136cm" svg:viewBox="0 0 28 27" draw:points="0,0 28,0 28,27 0,27">
          <text:p/>
        </draw:polygon>
        <draw:polygon draw:style-name="gr269" draw:text-style-name="P267" draw:layer="layout" svg:width="0.028cm" svg:height="0.026cm" svg:x="6.174cm" svg:y="8.136cm" svg:viewBox="0 0 29 27" draw:points="0,0 29,0 29,27 0,27">
          <text:p/>
        </draw:polygon>
        <draw:polygon draw:style-name="gr269" draw:text-style-name="P267" draw:layer="layout" svg:width="0.027cm" svg:height="0.026cm" svg:x="6.227cm" svg:y="8.136cm" svg:viewBox="0 0 28 27" draw:points="0,0 28,0 28,27 0,27">
          <text:p/>
        </draw:polygon>
        <draw:polygon draw:style-name="gr269" draw:text-style-name="P267" draw:layer="layout" svg:width="0.027cm" svg:height="0.026cm" svg:x="6.28cm" svg:y="8.136cm" svg:viewBox="0 0 28 27" draw:points="0,0 28,0 28,27 0,27">
          <text:p/>
        </draw:polygon>
        <draw:polygon draw:style-name="gr269" draw:text-style-name="P267" draw:layer="layout" svg:width="0.027cm" svg:height="0.026cm" svg:x="6.333cm" svg:y="8.136cm" svg:viewBox="0 0 28 27" draw:points="0,0 28,0 28,27 0,27">
          <text:p/>
        </draw:polygon>
        <draw:polygon draw:style-name="gr269" draw:text-style-name="P267" draw:layer="layout" svg:width="0.026cm" svg:height="0.026cm" svg:x="6.387cm" svg:y="8.136cm" svg:viewBox="0 0 27 27" draw:points="0,0 27,0 27,27 0,27">
          <text:p/>
        </draw:polygon>
        <draw:polygon draw:style-name="gr269" draw:text-style-name="P267" draw:layer="layout" svg:width="0.026cm" svg:height="0.026cm" svg:x="6.44cm" svg:y="8.136cm" svg:viewBox="0 0 27 27" draw:points="0,0 27,0 27,27 0,27">
          <text:p/>
        </draw:polygon>
        <draw:polygon draw:style-name="gr269" draw:text-style-name="P267" draw:layer="layout" svg:width="0.026cm" svg:height="0.026cm" svg:x="6.493cm" svg:y="8.136cm" svg:viewBox="0 0 27 27" draw:points="0,0 27,0 27,27 0,27">
          <text:p/>
        </draw:polygon>
        <draw:polygon draw:style-name="gr269" draw:text-style-name="P267" draw:layer="layout" svg:width="0.026cm" svg:height="0.026cm" svg:x="6.546cm" svg:y="8.136cm" svg:viewBox="0 0 27 27" draw:points="0,0 27,0 27,27 0,27">
          <text:p/>
        </draw:polygon>
        <draw:polygon draw:style-name="gr269" draw:text-style-name="P267" draw:layer="layout" svg:width="0.026cm" svg:height="0.026cm" svg:x="6.599cm" svg:y="8.136cm" svg:viewBox="0 0 27 27" draw:points="0,0 27,0 27,27 0,27">
          <text:p/>
        </draw:polygon>
        <draw:polygon draw:style-name="gr269" draw:text-style-name="P267" draw:layer="layout" svg:width="0.026cm" svg:height="0.026cm" svg:x="6.652cm" svg:y="8.136cm" svg:viewBox="0 0 27 27" draw:points="0,0 27,0 27,27 0,27">
          <text:p/>
        </draw:polygon>
        <draw:polygon draw:style-name="gr269" draw:text-style-name="P267" draw:layer="layout" svg:width="0.026cm" svg:height="0.026cm" svg:x="6.705cm" svg:y="8.136cm" svg:viewBox="0 0 27 27" draw:points="0,0 27,0 27,27 0,27">
          <text:p/>
        </draw:polygon>
        <draw:polygon draw:style-name="gr269" draw:text-style-name="P267" draw:layer="layout" svg:width="0.026cm" svg:height="0.026cm" svg:x="6.758cm" svg:y="8.136cm" svg:viewBox="0 0 27 27" draw:points="0,0 27,0 27,27 0,27">
          <text:p/>
        </draw:polygon>
        <draw:polygon draw:style-name="gr269" draw:text-style-name="P267" draw:layer="layout" svg:width="0.026cm" svg:height="0.026cm" svg:x="6.811cm" svg:y="8.136cm" svg:viewBox="0 0 27 27" draw:points="0,0 27,0 27,27 0,27">
          <text:p/>
        </draw:polygon>
        <draw:polygon draw:style-name="gr269" draw:text-style-name="P267" draw:layer="layout" svg:width="0.026cm" svg:height="0.026cm" svg:x="6.864cm" svg:y="8.136cm" svg:viewBox="0 0 27 27" draw:points="0,0 27,0 27,27 0,27">
          <text:p/>
        </draw:polygon>
        <draw:polygon draw:style-name="gr269" draw:text-style-name="P267" draw:layer="layout" svg:width="0.026cm" svg:height="0.026cm" svg:x="6.917cm" svg:y="8.136cm" svg:viewBox="0 0 27 27" draw:points="0,0 27,0 27,27 0,27">
          <text:p/>
        </draw:polygon>
        <draw:polygon draw:style-name="gr269" draw:text-style-name="P267" draw:layer="layout" svg:width="0.026cm" svg:height="0.026cm" svg:x="6.97cm" svg:y="8.136cm" svg:viewBox="0 0 27 27" draw:points="0,0 27,0 27,27 0,27">
          <text:p/>
        </draw:polygon>
        <draw:polygon draw:style-name="gr269" draw:text-style-name="P267" draw:layer="layout" svg:width="0.026cm" svg:height="0.026cm" svg:x="7.023cm" svg:y="8.136cm" svg:viewBox="0 0 27 27" draw:points="0,0 27,0 27,27 0,27">
          <text:p/>
        </draw:polygon>
        <draw:polygon draw:style-name="gr269" draw:text-style-name="P267" draw:layer="layout" svg:width="0.026cm" svg:height="0.026cm" svg:x="7.076cm" svg:y="8.136cm" svg:viewBox="0 0 27 27" draw:points="0,0 27,0 27,27 0,27">
          <text:p/>
        </draw:polygon>
        <draw:polygon draw:style-name="gr269" draw:text-style-name="P267" draw:layer="layout" svg:width="0.026cm" svg:height="0.026cm" svg:x="7.129cm" svg:y="8.136cm" svg:viewBox="0 0 27 27" draw:points="0,0 27,0 27,27 0,27">
          <text:p/>
        </draw:polygon>
        <draw:polygon draw:style-name="gr269" draw:text-style-name="P267" draw:layer="layout" svg:width="0.026cm" svg:height="0.026cm" svg:x="7.182cm" svg:y="8.136cm" svg:viewBox="0 0 27 27" draw:points="0,0 27,0 27,27 0,27">
          <text:p/>
        </draw:polygon>
        <draw:polygon draw:style-name="gr269" draw:text-style-name="P267" draw:layer="layout" svg:width="0.026cm" svg:height="0.026cm" svg:x="7.235cm" svg:y="8.136cm" svg:viewBox="0 0 27 27" draw:points="0,0 27,0 27,27 0,27">
          <text:p/>
        </draw:polygon>
        <draw:polygon draw:style-name="gr269" draw:text-style-name="P267" draw:layer="layout" svg:width="0.026cm" svg:height="0.026cm" svg:x="7.288cm" svg:y="8.136cm" svg:viewBox="0 0 27 27" draw:points="0,0 27,0 27,27 0,27">
          <text:p/>
        </draw:polygon>
        <draw:polygon draw:style-name="gr269" draw:text-style-name="P267" draw:layer="layout" svg:width="0.026cm" svg:height="0.026cm" svg:x="7.341cm" svg:y="8.136cm" svg:viewBox="0 0 27 27" draw:points="0,0 27,0 27,27 0,27">
          <text:p/>
        </draw:polygon>
        <draw:polygon draw:style-name="gr269" draw:text-style-name="P267" draw:layer="layout" svg:width="0.026cm" svg:height="0.026cm" svg:x="7.394cm" svg:y="8.136cm" svg:viewBox="0 0 27 27" draw:points="0,0 27,0 27,27 0,27">
          <text:p/>
        </draw:polygon>
        <draw:polygon draw:style-name="gr269" draw:text-style-name="P267" draw:layer="layout" svg:width="0.026cm" svg:height="0.026cm" svg:x="7.447cm" svg:y="8.136cm" svg:viewBox="0 0 27 27" draw:points="0,0 27,0 27,27 0,27">
          <text:p/>
        </draw:polygon>
        <draw:polygon draw:style-name="gr269" draw:text-style-name="P267" draw:layer="layout" svg:width="0.026cm" svg:height="0.026cm" svg:x="7.5cm" svg:y="8.136cm" svg:viewBox="0 0 27 27" draw:points="0,0 27,0 27,27 0,27">
          <text:p/>
        </draw:polygon>
        <draw:polygon draw:style-name="gr269" draw:text-style-name="P267" draw:layer="layout" svg:width="0.026cm" svg:height="0.026cm" svg:x="7.553cm" svg:y="8.136cm" svg:viewBox="0 0 27 27" draw:points="0,0 27,0 27,27 0,27">
          <text:p/>
        </draw:polygon>
        <draw:polygon draw:style-name="gr269" draw:text-style-name="P267" draw:layer="layout" svg:width="0.026cm" svg:height="0.026cm" svg:x="7.606cm" svg:y="8.136cm" svg:viewBox="0 0 27 27" draw:points="0,0 27,0 27,27 0,27">
          <text:p/>
        </draw:polygon>
        <draw:polygon draw:style-name="gr269" draw:text-style-name="P267" draw:layer="layout" svg:width="0.026cm" svg:height="0.026cm" svg:x="7.659cm" svg:y="8.136cm" svg:viewBox="0 0 27 27" draw:points="0,0 27,0 27,27 0,27">
          <text:p/>
        </draw:polygon>
        <draw:polygon draw:style-name="gr269" draw:text-style-name="P267" draw:layer="layout" svg:width="0.026cm" svg:height="0.026cm" svg:x="7.712cm" svg:y="8.136cm" svg:viewBox="0 0 27 27" draw:points="0,0 27,0 27,27 0,27">
          <text:p/>
        </draw:polygon>
        <draw:polygon draw:style-name="gr269" draw:text-style-name="P267" draw:layer="layout" svg:width="0.026cm" svg:height="0.026cm" svg:x="7.765cm" svg:y="8.136cm" svg:viewBox="0 0 27 27" draw:points="0,0 27,0 27,27 0,27">
          <text:p/>
        </draw:polygon>
        <draw:polygon draw:style-name="gr269" draw:text-style-name="P267" draw:layer="layout" svg:width="0.026cm" svg:height="0.026cm" svg:x="7.818cm" svg:y="8.136cm" svg:viewBox="0 0 27 27" draw:points="0,0 27,0 27,27 0,27">
          <text:p/>
        </draw:polygon>
        <draw:polygon draw:style-name="gr269" draw:text-style-name="P267" draw:layer="layout" svg:width="0.026cm" svg:height="0.026cm" svg:x="7.871cm" svg:y="8.136cm" svg:viewBox="0 0 27 27" draw:points="0,0 27,0 27,27 0,27">
          <text:p/>
        </draw:polygon>
        <draw:polygon draw:style-name="gr269" draw:text-style-name="P267" draw:layer="layout" svg:width="0.026cm" svg:height="0.026cm" svg:x="7.924cm" svg:y="8.136cm" svg:viewBox="0 0 27 27" draw:points="0,0 27,0 27,27 0,27">
          <text:p/>
        </draw:polygon>
        <draw:polygon draw:style-name="gr269" draw:text-style-name="P267" draw:layer="layout" svg:width="0.026cm" svg:height="0.026cm" svg:x="7.977cm" svg:y="8.136cm" svg:viewBox="0 0 27 27" draw:points="0,0 27,0 27,27 0,27">
          <text:p/>
        </draw:polygon>
        <draw:polygon draw:style-name="gr269" draw:text-style-name="P267" draw:layer="layout" svg:width="0.026cm" svg:height="0.026cm" svg:x="8.03cm" svg:y="8.136cm" svg:viewBox="0 0 27 27" draw:points="0,0 27,0 27,27 0,27">
          <text:p/>
        </draw:polygon>
        <draw:polygon draw:style-name="gr269" draw:text-style-name="P267" draw:layer="layout" svg:width="0.026cm" svg:height="0.026cm" svg:x="8.083cm" svg:y="8.136cm" svg:viewBox="0 0 27 27" draw:points="0,0 27,0 27,27 0,27">
          <text:p/>
        </draw:polygon>
        <draw:polygon draw:style-name="gr269" draw:text-style-name="P267" draw:layer="layout" svg:width="0.026cm" svg:height="0.026cm" svg:x="8.136cm" svg:y="8.136cm" svg:viewBox="0 0 27 27" draw:points="0,0 27,0 27,27 0,27">
          <text:p/>
        </draw:polygon>
        <draw:polygon draw:style-name="gr269" draw:text-style-name="P267" draw:layer="layout" svg:width="0.026cm" svg:height="0.026cm" svg:x="8.189cm" svg:y="8.136cm" svg:viewBox="0 0 27 27" draw:points="0,0 27,0 27,27 0,27">
          <text:p/>
        </draw:polygon>
        <draw:polygon draw:style-name="gr269" draw:text-style-name="P267" draw:layer="layout" svg:width="0.026cm" svg:height="0.026cm" svg:x="8.242cm" svg:y="8.136cm" svg:viewBox="0 0 27 27" draw:points="0,0 27,0 27,27 0,27">
          <text:p/>
        </draw:polygon>
        <draw:polygon draw:style-name="gr269" draw:text-style-name="P267" draw:layer="layout" svg:width="0.026cm" svg:height="0.026cm" svg:x="8.295cm" svg:y="8.136cm" svg:viewBox="0 0 27 27" draw:points="0,0 27,0 27,27 0,27">
          <text:p/>
        </draw:polygon>
        <draw:polygon draw:style-name="gr269" draw:text-style-name="P267" draw:layer="layout" svg:width="0.026cm" svg:height="0.026cm" svg:x="8.348cm" svg:y="8.136cm" svg:viewBox="0 0 27 27" draw:points="0,0 27,0 27,27 0,27">
          <text:p/>
        </draw:polygon>
        <draw:polygon draw:style-name="gr269" draw:text-style-name="P267" draw:layer="layout" svg:width="0.026cm" svg:height="0.026cm" svg:x="8.401cm" svg:y="8.136cm" svg:viewBox="0 0 27 27" draw:points="0,0 27,0 27,27 0,27">
          <text:p/>
        </draw:polygon>
        <draw:polygon draw:style-name="gr269" draw:text-style-name="P267" draw:layer="layout" svg:width="0.026cm" svg:height="0.026cm" svg:x="8.454cm" svg:y="8.136cm" svg:viewBox="0 0 27 27" draw:points="0,0 27,0 27,27 0,27">
          <text:p/>
        </draw:polygon>
        <draw:polygon draw:style-name="gr269" draw:text-style-name="P267" draw:layer="layout" svg:width="0.026cm" svg:height="0.026cm" svg:x="8.507cm" svg:y="8.136cm" svg:viewBox="0 0 27 27" draw:points="0,0 27,0 27,27 0,27">
          <text:p/>
        </draw:polygon>
        <draw:polygon draw:style-name="gr269" draw:text-style-name="P267" draw:layer="layout" svg:width="0.026cm" svg:height="0.026cm" svg:x="8.56cm" svg:y="8.136cm" svg:viewBox="0 0 27 27" draw:points="0,0 27,0 27,27 0,27">
          <text:p/>
        </draw:polygon>
        <draw:polygon draw:style-name="gr269" draw:text-style-name="P267" draw:layer="layout" svg:width="0.026cm" svg:height="0.026cm" svg:x="8.613cm" svg:y="8.136cm" svg:viewBox="0 0 27 27" draw:points="0,0 27,0 27,27 0,27">
          <text:p/>
        </draw:polygon>
        <draw:polygon draw:style-name="gr269" draw:text-style-name="P267" draw:layer="layout" svg:width="0.026cm" svg:height="0.026cm" svg:x="8.666cm" svg:y="8.136cm" svg:viewBox="0 0 27 27" draw:points="0,0 27,0 27,27 0,27">
          <text:p/>
        </draw:polygon>
        <draw:polygon draw:style-name="gr269" draw:text-style-name="P267" draw:layer="layout" svg:width="0.026cm" svg:height="0.026cm" svg:x="8.719cm" svg:y="8.136cm" svg:viewBox="0 0 27 27" draw:points="0,0 27,0 27,27 0,27">
          <text:p/>
        </draw:polygon>
        <draw:polygon draw:style-name="gr269" draw:text-style-name="P267" draw:layer="layout" svg:width="0.026cm" svg:height="0.026cm" svg:x="8.772cm" svg:y="8.136cm" svg:viewBox="0 0 27 27" draw:points="0,0 27,0 27,27 0,27">
          <text:p/>
        </draw:polygon>
        <draw:polygon draw:style-name="gr269" draw:text-style-name="P267" draw:layer="layout" svg:width="0.026cm" svg:height="0.026cm" svg:x="8.825cm" svg:y="8.136cm" svg:viewBox="0 0 27 27" draw:points="0,0 27,0 27,27 0,27">
          <text:p/>
        </draw:polygon>
        <draw:polygon draw:style-name="gr269" draw:text-style-name="P267" draw:layer="layout" svg:width="0.026cm" svg:height="0.026cm" svg:x="8.878cm" svg:y="8.136cm" svg:viewBox="0 0 27 27" draw:points="0,0 27,0 27,27 0,27">
          <text:p/>
        </draw:polygon>
        <draw:polygon draw:style-name="gr269" draw:text-style-name="P267" draw:layer="layout" svg:width="0.026cm" svg:height="0.026cm" svg:x="8.931cm" svg:y="8.136cm" svg:viewBox="0 0 27 27" draw:points="0,0 27,0 27,27 0,27">
          <text:p/>
        </draw:polygon>
        <draw:polygon draw:style-name="gr269" draw:text-style-name="P267" draw:layer="layout" svg:width="0.026cm" svg:height="0.026cm" svg:x="8.984cm" svg:y="8.136cm" svg:viewBox="0 0 27 27" draw:points="0,0 27,0 27,27 0,27">
          <text:p/>
        </draw:polygon>
        <draw:polygon draw:style-name="gr269" draw:text-style-name="P267" draw:layer="layout" svg:width="0.026cm" svg:height="0.026cm" svg:x="9.037cm" svg:y="8.136cm" svg:viewBox="0 0 27 27" draw:points="0,0 27,0 27,27 0,27">
          <text:p/>
        </draw:polygon>
        <draw:polygon draw:style-name="gr269" draw:text-style-name="P267" draw:layer="layout" svg:width="0.026cm" svg:height="0.026cm" svg:x="9.09cm" svg:y="8.136cm" svg:viewBox="0 0 27 27" draw:points="0,0 27,0 27,27 0,27">
          <text:p/>
        </draw:polygon>
        <draw:polygon draw:style-name="gr269" draw:text-style-name="P267" draw:layer="layout" svg:width="0.026cm" svg:height="0.026cm" svg:x="9.143cm" svg:y="8.136cm" svg:viewBox="0 0 27 27" draw:points="0,0 27,0 27,27 0,27">
          <text:p/>
        </draw:polygon>
        <draw:polygon draw:style-name="gr269" draw:text-style-name="P267" draw:layer="layout" svg:width="0.026cm" svg:height="0.026cm" svg:x="9.196cm" svg:y="8.136cm" svg:viewBox="0 0 27 27" draw:points="0,0 27,0 27,27 0,27">
          <text:p/>
        </draw:polygon>
        <draw:polygon draw:style-name="gr269" draw:text-style-name="P267" draw:layer="layout" svg:width="0.026cm" svg:height="0.026cm" svg:x="9.249cm" svg:y="8.136cm" svg:viewBox="0 0 27 27" draw:points="0,0 27,0 27,27 0,27">
          <text:p/>
        </draw:polygon>
        <draw:polygon draw:style-name="gr269" draw:text-style-name="P267" draw:layer="layout" svg:width="0.026cm" svg:height="0.026cm" svg:x="9.302cm" svg:y="8.136cm" svg:viewBox="0 0 27 27" draw:points="0,0 27,0 27,27 0,27">
          <text:p/>
        </draw:polygon>
        <draw:polygon draw:style-name="gr269" draw:text-style-name="P267" draw:layer="layout" svg:width="0.026cm" svg:height="0.026cm" svg:x="9.355cm" svg:y="8.136cm" svg:viewBox="0 0 27 27" draw:points="0,0 27,0 27,27 0,27">
          <text:p/>
        </draw:polygon>
        <draw:polygon draw:style-name="gr269" draw:text-style-name="P267" draw:layer="layout" svg:width="0.026cm" svg:height="0.026cm" svg:x="9.408cm" svg:y="8.136cm" svg:viewBox="0 0 27 27" draw:points="0,0 27,0 27,27 0,27">
          <text:p/>
        </draw:polygon>
        <draw:polygon draw:style-name="gr269" draw:text-style-name="P267" draw:layer="layout" svg:width="0.026cm" svg:height="0.026cm" svg:x="9.461cm" svg:y="8.136cm" svg:viewBox="0 0 27 27" draw:points="0,0 27,0 27,27 0,27">
          <text:p/>
        </draw:polygon>
        <draw:polygon draw:style-name="gr269" draw:text-style-name="P267" draw:layer="layout" svg:width="0.026cm" svg:height="0.026cm" svg:x="9.514cm" svg:y="8.136cm" svg:viewBox="0 0 27 27" draw:points="0,0 27,0 27,27 0,27">
          <text:p/>
        </draw:polygon>
        <draw:polygon draw:style-name="gr269" draw:text-style-name="P267" draw:layer="layout" svg:width="0.026cm" svg:height="0.026cm" svg:x="9.567cm" svg:y="8.136cm" svg:viewBox="0 0 27 27" draw:points="0,0 27,0 27,27 0,27">
          <text:p/>
        </draw:polygon>
        <draw:polygon draw:style-name="gr269" draw:text-style-name="P267" draw:layer="layout" svg:width="0.026cm" svg:height="0.026cm" svg:x="9.62cm" svg:y="8.136cm" svg:viewBox="0 0 27 27" draw:points="0,0 27,0 27,27 0,27">
          <text:p/>
        </draw:polygon>
        <draw:polygon draw:style-name="gr269" draw:text-style-name="P267" draw:layer="layout" svg:width="0.026cm" svg:height="0.026cm" svg:x="9.673cm" svg:y="8.136cm" svg:viewBox="0 0 27 27" draw:points="0,0 27,0 27,27 0,27">
          <text:p/>
        </draw:polygon>
        <draw:polygon draw:style-name="gr269" draw:text-style-name="P267" draw:layer="layout" svg:width="0.026cm" svg:height="0.026cm" svg:x="9.726cm" svg:y="8.136cm" svg:viewBox="0 0 27 27" draw:points="0,0 27,0 27,27 0,27">
          <text:p/>
        </draw:polygon>
        <draw:polygon draw:style-name="gr269" draw:text-style-name="P267" draw:layer="layout" svg:width="0.026cm" svg:height="0.026cm" svg:x="9.779cm" svg:y="8.136cm" svg:viewBox="0 0 27 27" draw:points="0,0 27,0 27,27 0,27">
          <text:p/>
        </draw:polygon>
        <draw:polygon draw:style-name="gr269" draw:text-style-name="P267" draw:layer="layout" svg:width="0.026cm" svg:height="0.026cm" svg:x="9.832cm" svg:y="8.136cm" svg:viewBox="0 0 27 27" draw:points="0,0 27,0 27,27 0,27">
          <text:p/>
        </draw:polygon>
        <draw:polygon draw:style-name="gr269" draw:text-style-name="P267" draw:layer="layout" svg:width="0.026cm" svg:height="0.026cm" svg:x="9.885cm" svg:y="8.136cm" svg:viewBox="0 0 27 27" draw:points="0,0 27,0 27,27 0,27">
          <text:p/>
        </draw:polygon>
        <draw:polygon draw:style-name="gr269" draw:text-style-name="P267" draw:layer="layout" svg:width="0.026cm" svg:height="0.026cm" svg:x="9.938cm" svg:y="8.136cm" svg:viewBox="0 0 27 27" draw:points="0,0 27,0 27,27 0,27">
          <text:p/>
        </draw:polygon>
        <draw:polygon draw:style-name="gr269" draw:text-style-name="P267" draw:layer="layout" svg:width="0.026cm" svg:height="0.026cm" svg:x="9.991cm" svg:y="8.136cm" svg:viewBox="0 0 27 27" draw:points="0,0 27,0 27,27 0,27">
          <text:p/>
        </draw:polygon>
        <draw:polygon draw:style-name="gr269" draw:text-style-name="P267" draw:layer="layout" svg:width="0.026cm" svg:height="0.026cm" svg:x="10.044cm" svg:y="8.136cm" svg:viewBox="0 0 27 27" draw:points="0,0 27,0 27,27 0,27">
          <text:p/>
        </draw:polygon>
        <draw:polygon draw:style-name="gr269" draw:text-style-name="P267" draw:layer="layout" svg:width="0.026cm" svg:height="0.026cm" svg:x="10.097cm" svg:y="8.136cm" svg:viewBox="0 0 27 27" draw:points="0,0 27,0 27,27 0,27">
          <text:p/>
        </draw:polygon>
        <draw:polygon draw:style-name="gr269" draw:text-style-name="P267" draw:layer="layout" svg:width="0.026cm" svg:height="0.026cm" svg:x="10.15cm" svg:y="8.136cm" svg:viewBox="0 0 27 27" draw:points="0,0 27,0 27,27 0,27">
          <text:p/>
        </draw:polygon>
        <draw:polygon draw:style-name="gr269" draw:text-style-name="P267" draw:layer="layout" svg:width="0.026cm" svg:height="0.026cm" svg:x="10.203cm" svg:y="8.136cm" svg:viewBox="0 0 27 27" draw:points="0,0 27,0 27,27 0,27">
          <text:p/>
        </draw:polygon>
        <draw:polygon draw:style-name="gr269" draw:text-style-name="P267" draw:layer="layout" svg:width="0.026cm" svg:height="0.026cm" svg:x="10.256cm" svg:y="8.136cm" svg:viewBox="0 0 27 27" draw:points="0,0 27,0 27,27 0,27">
          <text:p/>
        </draw:polygon>
        <draw:polygon draw:style-name="gr269" draw:text-style-name="P267" draw:layer="layout" svg:width="0.026cm" svg:height="0.026cm" svg:x="10.309cm" svg:y="8.136cm" svg:viewBox="0 0 27 27" draw:points="0,0 27,0 27,27 0,27">
          <text:p/>
        </draw:polygon>
        <draw:polygon draw:style-name="gr269" draw:text-style-name="P267" draw:layer="layout" svg:width="0.026cm" svg:height="0.026cm" svg:x="10.362cm" svg:y="8.136cm" svg:viewBox="0 0 27 27" draw:points="0,0 27,0 27,27 0,27">
          <text:p/>
        </draw:polygon>
        <draw:polygon draw:style-name="gr269" draw:text-style-name="P267" draw:layer="layout" svg:width="0.026cm" svg:height="0.026cm" svg:x="10.415cm" svg:y="8.136cm" svg:viewBox="0 0 27 27" draw:points="0,0 27,0 27,27 0,27">
          <text:p/>
        </draw:polygon>
        <draw:polygon draw:style-name="gr269" draw:text-style-name="P267" draw:layer="layout" svg:width="0.026cm" svg:height="0.026cm" svg:x="10.468cm" svg:y="8.136cm" svg:viewBox="0 0 27 27" draw:points="0,0 27,0 27,27 0,27">
          <text:p/>
        </draw:polygon>
        <draw:polygon draw:style-name="gr269" draw:text-style-name="P267" draw:layer="layout" svg:width="0.026cm" svg:height="0.026cm" svg:x="10.521cm" svg:y="8.136cm" svg:viewBox="0 0 27 27" draw:points="0,0 27,0 27,27 0,27">
          <text:p/>
        </draw:polygon>
        <draw:polygon draw:style-name="gr269" draw:text-style-name="P267" draw:layer="layout" svg:width="0.026cm" svg:height="0.026cm" svg:x="10.574cm" svg:y="8.136cm" svg:viewBox="0 0 27 27" draw:points="0,0 27,0 27,27 0,27">
          <text:p/>
        </draw:polygon>
        <draw:polygon draw:style-name="gr269" draw:text-style-name="P267" draw:layer="layout" svg:width="0.026cm" svg:height="0.026cm" svg:x="10.627cm" svg:y="8.136cm" svg:viewBox="0 0 27 27" draw:points="0,0 27,0 27,27 0,27">
          <text:p/>
        </draw:polygon>
        <draw:polygon draw:style-name="gr269" draw:text-style-name="P267" draw:layer="layout" svg:width="0.026cm" svg:height="0.026cm" svg:x="10.68cm" svg:y="8.136cm" svg:viewBox="0 0 27 27" draw:points="0,0 27,0 27,27 0,27">
          <text:p/>
        </draw:polygon>
        <draw:polygon draw:style-name="gr269" draw:text-style-name="P267" draw:layer="layout" svg:width="0.026cm" svg:height="0.026cm" svg:x="10.733cm" svg:y="8.136cm" svg:viewBox="0 0 27 27" draw:points="0,0 27,0 27,27 0,27">
          <text:p/>
        </draw:polygon>
        <draw:polygon draw:style-name="gr269" draw:text-style-name="P267" draw:layer="layout" svg:width="0.026cm" svg:height="0.026cm" svg:x="10.786cm" svg:y="8.136cm" svg:viewBox="0 0 27 27" draw:points="0,0 27,0 27,27 0,27">
          <text:p/>
        </draw:polygon>
        <draw:polygon draw:style-name="gr269" draw:text-style-name="P267" draw:layer="layout" svg:width="0.026cm" svg:height="0.026cm" svg:x="10.839cm" svg:y="8.136cm" svg:viewBox="0 0 27 27" draw:points="0,0 27,0 27,27 0,27">
          <text:p/>
        </draw:polygon>
        <draw:polygon draw:style-name="gr269" draw:text-style-name="P267" draw:layer="layout" svg:width="0.026cm" svg:height="0.026cm" svg:x="10.892cm" svg:y="8.136cm" svg:viewBox="0 0 27 27" draw:points="0,0 27,0 27,27 0,27">
          <text:p/>
        </draw:polygon>
        <draw:polygon draw:style-name="gr269" draw:text-style-name="P267" draw:layer="layout" svg:width="0.026cm" svg:height="0.026cm" svg:x="10.945cm" svg:y="8.136cm" svg:viewBox="0 0 27 27" draw:points="0,0 27,0 27,27 0,27">
          <text:p/>
        </draw:polygon>
        <draw:polygon draw:style-name="gr269" draw:text-style-name="P267" draw:layer="layout" svg:width="0.026cm" svg:height="0.026cm" svg:x="10.998cm" svg:y="8.136cm" svg:viewBox="0 0 27 27" draw:points="0,0 27,0 27,27 0,27">
          <text:p/>
        </draw:polygon>
        <draw:polygon draw:style-name="gr269" draw:text-style-name="P267" draw:layer="layout" svg:width="0.026cm" svg:height="0.026cm" svg:x="11.051cm" svg:y="8.136cm" svg:viewBox="0 0 27 27" draw:points="0,0 27,0 27,27 0,27">
          <text:p/>
        </draw:polygon>
        <draw:polygon draw:style-name="gr269" draw:text-style-name="P267" draw:layer="layout" svg:width="0.026cm" svg:height="0.026cm" svg:x="11.104cm" svg:y="8.136cm" svg:viewBox="0 0 27 27" draw:points="0,0 27,0 27,27 0,27">
          <text:p/>
        </draw:polygon>
        <draw:polygon draw:style-name="gr269" draw:text-style-name="P267" draw:layer="layout" svg:width="0.026cm" svg:height="0.026cm" svg:x="11.157cm" svg:y="8.136cm" svg:viewBox="0 0 27 27" draw:points="0,0 27,0 27,27 0,27">
          <text:p/>
        </draw:polygon>
        <draw:polygon draw:style-name="gr269" draw:text-style-name="P267" draw:layer="layout" svg:width="0.026cm" svg:height="0.026cm" svg:x="11.21cm" svg:y="8.136cm" svg:viewBox="0 0 27 27" draw:points="0,0 27,0 27,27 0,27">
          <text:p/>
        </draw:polygon>
        <draw:polygon draw:style-name="gr269" draw:text-style-name="P267" draw:layer="layout" svg:width="0.026cm" svg:height="0.026cm" svg:x="11.263cm" svg:y="8.136cm" svg:viewBox="0 0 27 27" draw:points="0,0 27,0 27,27 0,27">
          <text:p/>
        </draw:polygon>
        <draw:polygon draw:style-name="gr269" draw:text-style-name="P267" draw:layer="layout" svg:width="0.026cm" svg:height="0.026cm" svg:x="11.316cm" svg:y="8.136cm" svg:viewBox="0 0 27 27" draw:points="0,0 27,0 27,27 0,27">
          <text:p/>
        </draw:polygon>
        <draw:polygon draw:style-name="gr269" draw:text-style-name="P267" draw:layer="layout" svg:width="0.026cm" svg:height="0.026cm" svg:x="11.369cm" svg:y="8.136cm" svg:viewBox="0 0 27 27" draw:points="0,0 27,0 27,27 0,27">
          <text:p/>
        </draw:polygon>
        <draw:polygon draw:style-name="gr269" draw:text-style-name="P267" draw:layer="layout" svg:width="0.026cm" svg:height="0.026cm" svg:x="11.422cm" svg:y="8.136cm" svg:viewBox="0 0 27 27" draw:points="0,0 27,0 27,27 0,27">
          <text:p/>
        </draw:polygon>
        <draw:polygon draw:style-name="gr269" draw:text-style-name="P267" draw:layer="layout" svg:width="0.026cm" svg:height="0.026cm" svg:x="11.475cm" svg:y="8.136cm" svg:viewBox="0 0 27 27" draw:points="0,0 27,0 27,27 0,27">
          <text:p/>
        </draw:polygon>
        <draw:polygon draw:style-name="gr269" draw:text-style-name="P267" draw:layer="layout" svg:width="0.026cm" svg:height="0.026cm" svg:x="11.528cm" svg:y="8.136cm" svg:viewBox="0 0 27 27" draw:points="0,0 27,0 27,27 0,27">
          <text:p/>
        </draw:polygon>
        <draw:polygon draw:style-name="gr269" draw:text-style-name="P267" draw:layer="layout" svg:width="0.026cm" svg:height="0.026cm" svg:x="11.581cm" svg:y="8.136cm" svg:viewBox="0 0 27 27" draw:points="0,0 27,0 27,27 0,27">
          <text:p/>
        </draw:polygon>
        <draw:polygon draw:style-name="gr269" draw:text-style-name="P267" draw:layer="layout" svg:width="0.026cm" svg:height="0.026cm" svg:x="11.634cm" svg:y="8.136cm" svg:viewBox="0 0 27 27" draw:points="0,0 27,0 27,27 0,27">
          <text:p/>
        </draw:polygon>
        <draw:polygon draw:style-name="gr269" draw:text-style-name="P267" draw:layer="layout" svg:width="0.026cm" svg:height="0.026cm" svg:x="11.687cm" svg:y="8.136cm" svg:viewBox="0 0 27 27" draw:points="0,0 27,0 27,27 0,27">
          <text:p/>
        </draw:polygon>
        <draw:polygon draw:style-name="gr269" draw:text-style-name="P267" draw:layer="layout" svg:width="0.026cm" svg:height="0.026cm" svg:x="11.74cm" svg:y="8.136cm" svg:viewBox="0 0 27 27" draw:points="0,0 27,0 27,27 0,27">
          <text:p/>
        </draw:polygon>
        <draw:polygon draw:style-name="gr269" draw:text-style-name="P267" draw:layer="layout" svg:width="0.026cm" svg:height="0.026cm" svg:x="11.793cm" svg:y="8.136cm" svg:viewBox="0 0 27 27" draw:points="0,0 27,0 27,27 0,27">
          <text:p/>
        </draw:polygon>
        <draw:polygon draw:style-name="gr269" draw:text-style-name="P267" draw:layer="layout" svg:width="0.026cm" svg:height="0.026cm" svg:x="11.846cm" svg:y="8.136cm" svg:viewBox="0 0 27 27" draw:points="0,0 27,0 27,27 0,27">
          <text:p/>
        </draw:polygon>
        <draw:polygon draw:style-name="gr269" draw:text-style-name="P267" draw:layer="layout" svg:width="0.026cm" svg:height="0.026cm" svg:x="11.899cm" svg:y="8.136cm" svg:viewBox="0 0 27 27" draw:points="0,0 27,0 27,27 0,27">
          <text:p/>
        </draw:polygon>
        <draw:polygon draw:style-name="gr269" draw:text-style-name="P267" draw:layer="layout" svg:width="0.026cm" svg:height="0.026cm" svg:x="11.952cm" svg:y="8.136cm" svg:viewBox="0 0 27 27" draw:points="0,0 27,0 27,27 0,27">
          <text:p/>
        </draw:polygon>
        <draw:polygon draw:style-name="gr269" draw:text-style-name="P267" draw:layer="layout" svg:width="0.026cm" svg:height="0.026cm" svg:x="12.005cm" svg:y="8.136cm" svg:viewBox="0 0 27 27" draw:points="0,0 27,0 27,27 0,27">
          <text:p/>
        </draw:polygon>
        <draw:polygon draw:style-name="gr269" draw:text-style-name="P267" draw:layer="layout" svg:width="0.026cm" svg:height="0.026cm" svg:x="12.058cm" svg:y="8.136cm" svg:viewBox="0 0 27 27" draw:points="0,0 27,0 27,27 0,27">
          <text:p/>
        </draw:polygon>
        <draw:polygon draw:style-name="gr269" draw:text-style-name="P267" draw:layer="layout" svg:width="0.026cm" svg:height="0.026cm" svg:x="12.111cm" svg:y="8.136cm" svg:viewBox="0 0 27 27" draw:points="0,0 27,0 27,27 0,27">
          <text:p/>
        </draw:polygon>
        <draw:polygon draw:style-name="gr269" draw:text-style-name="P267" draw:layer="layout" svg:width="0.026cm" svg:height="0.026cm" svg:x="12.164cm" svg:y="8.136cm" svg:viewBox="0 0 27 27" draw:points="0,0 27,0 27,27 0,27">
          <text:p/>
        </draw:polygon>
        <draw:polygon draw:style-name="gr269" draw:text-style-name="P267" draw:layer="layout" svg:width="0.026cm" svg:height="0.026cm" svg:x="12.217cm" svg:y="8.136cm" svg:viewBox="0 0 27 27" draw:points="0,0 27,0 27,27 0,27">
          <text:p/>
        </draw:polygon>
        <draw:polygon draw:style-name="gr269" draw:text-style-name="P267" draw:layer="layout" svg:width="0.026cm" svg:height="0.026cm" svg:x="12.27cm" svg:y="8.136cm" svg:viewBox="0 0 27 27" draw:points="0,0 27,0 27,27 0,27">
          <text:p/>
        </draw:polygon>
        <draw:polygon draw:style-name="gr269" draw:text-style-name="P267" draw:layer="layout" svg:width="0.026cm" svg:height="0.026cm" svg:x="12.323cm" svg:y="8.136cm" svg:viewBox="0 0 27 27" draw:points="0,0 27,0 27,27 0,27">
          <text:p/>
        </draw:polygon>
        <draw:polygon draw:style-name="gr269" draw:text-style-name="P267" draw:layer="layout" svg:width="0.026cm" svg:height="0.026cm" svg:x="12.376cm" svg:y="8.136cm" svg:viewBox="0 0 27 27" draw:points="0,0 27,0 27,27 0,27">
          <text:p/>
        </draw:polygon>
        <draw:polygon draw:style-name="gr269" draw:text-style-name="P267" draw:layer="layout" svg:width="0.026cm" svg:height="0.026cm" svg:x="12.429cm" svg:y="8.136cm" svg:viewBox="0 0 27 27" draw:points="0,0 27,0 27,27 0,27">
          <text:p/>
        </draw:polygon>
        <draw:polygon draw:style-name="gr269" draw:text-style-name="P267" draw:layer="layout" svg:width="0.026cm" svg:height="0.026cm" svg:x="12.482cm" svg:y="8.136cm" svg:viewBox="0 0 27 27" draw:points="0,0 27,0 27,27 0,27">
          <text:p/>
        </draw:polygon>
        <draw:polygon draw:style-name="gr269" draw:text-style-name="P267" draw:layer="layout" svg:width="0.026cm" svg:height="0.026cm" svg:x="12.535cm" svg:y="8.136cm" svg:viewBox="0 0 27 27" draw:points="0,0 27,0 27,27 0,27">
          <text:p/>
        </draw:polygon>
        <draw:polygon draw:style-name="gr269" draw:text-style-name="P267" draw:layer="layout" svg:width="0.026cm" svg:height="0.026cm" svg:x="12.588cm" svg:y="8.136cm" svg:viewBox="0 0 27 27" draw:points="0,0 27,0 27,27 0,27">
          <text:p/>
        </draw:polygon>
        <draw:polygon draw:style-name="gr269" draw:text-style-name="P267" draw:layer="layout" svg:width="0.026cm" svg:height="0.026cm" svg:x="12.641cm" svg:y="8.136cm" svg:viewBox="0 0 27 27" draw:points="0,0 27,0 27,27 0,27">
          <text:p/>
        </draw:polygon>
        <draw:polygon draw:style-name="gr269" draw:text-style-name="P267" draw:layer="layout" svg:width="0.027cm" svg:height="0.026cm" svg:x="12.694cm" svg:y="8.136cm" svg:viewBox="0 0 28 27" draw:points="0,0 28,0 28,27 0,27">
          <text:p/>
        </draw:polygon>
        <draw:polygon draw:style-name="gr269" draw:text-style-name="P267" draw:layer="layout" svg:width="0.027cm" svg:height="0.026cm" svg:x="12.747cm" svg:y="8.136cm" svg:viewBox="0 0 28 27" draw:points="0,0 28,0 28,27 0,27">
          <text:p/>
        </draw:polygon>
        <draw:polygon draw:style-name="gr269" draw:text-style-name="P267" draw:layer="layout" svg:width="0.027cm" svg:height="0.026cm" svg:x="12.8cm" svg:y="8.136cm" svg:viewBox="0 0 28 27" draw:points="0,0 28,0 28,27 0,27">
          <text:p/>
        </draw:polygon>
        <draw:polygon draw:style-name="gr269" draw:text-style-name="P267" draw:layer="layout" svg:width="0.027cm" svg:height="0.026cm" svg:x="12.853cm" svg:y="8.136cm" svg:viewBox="0 0 28 27" draw:points="0,0 28,0 28,27 0,27">
          <text:p/>
        </draw:polygon>
        <draw:polygon draw:style-name="gr269" draw:text-style-name="P267" draw:layer="layout" svg:width="0.027cm" svg:height="0.026cm" svg:x="12.906cm" svg:y="8.136cm" svg:viewBox="0 0 28 27" draw:points="0,0 28,0 28,27 0,27">
          <text:p/>
        </draw:polygon>
        <draw:polygon draw:style-name="gr269" draw:text-style-name="P267" draw:layer="layout" svg:width="0.027cm" svg:height="0.026cm" svg:x="12.959cm" svg:y="8.136cm" svg:viewBox="0 0 28 27" draw:points="0,0 28,0 28,27 0,27">
          <text:p/>
        </draw:polygon>
        <draw:polygon draw:style-name="gr269" draw:text-style-name="P267" draw:layer="layout" svg:width="0.028cm" svg:height="0.026cm" svg:x="13.012cm" svg:y="8.136cm" svg:viewBox="0 0 29 27" draw:points="0,0 29,0 29,27 0,27">
          <text:p/>
        </draw:polygon>
        <draw:polygon draw:style-name="gr269" draw:text-style-name="P267" draw:layer="layout" svg:width="0.027cm" svg:height="0.026cm" svg:x="13.065cm" svg:y="8.136cm" svg:viewBox="0 0 28 27" draw:points="0,0 28,0 28,27 0,27">
          <text:p/>
        </draw:polygon>
        <draw:polygon draw:style-name="gr269" draw:text-style-name="P267" draw:layer="layout" svg:width="0.027cm" svg:height="0.026cm" svg:x="13.118cm" svg:y="8.136cm" svg:viewBox="0 0 28 27" draw:points="0,0 28,0 28,27 0,27">
          <text:p/>
        </draw:polygon>
        <draw:polygon draw:style-name="gr269" draw:text-style-name="P267" draw:layer="layout" svg:width="0.027cm" svg:height="0.026cm" svg:x="13.171cm" svg:y="8.136cm" svg:viewBox="0 0 28 27" draw:points="0,0 28,0 28,27 0,27">
          <text:p/>
        </draw:polygon>
        <draw:polygon draw:style-name="gr269" draw:text-style-name="P267" draw:layer="layout" svg:width="0.027cm" svg:height="0.026cm" svg:x="13.224cm" svg:y="8.136cm" svg:viewBox="0 0 28 27" draw:points="0,0 28,0 28,27 0,27">
          <text:p/>
        </draw:polygon>
        <draw:polygon draw:style-name="gr269" draw:text-style-name="P267" draw:layer="layout" svg:width="0.027cm" svg:height="0.026cm" svg:x="13.277cm" svg:y="8.136cm" svg:viewBox="0 0 28 27" draw:points="0,0 28,0 28,27 0,27">
          <text:p/>
        </draw:polygon>
        <draw:polygon draw:style-name="gr269" draw:text-style-name="P267" draw:layer="layout" svg:width="0.027cm" svg:height="0.026cm" svg:x="13.33cm" svg:y="8.136cm" svg:viewBox="0 0 28 27" draw:points="0,0 28,0 28,27 0,27">
          <text:p/>
        </draw:polygon>
        <draw:polygon draw:style-name="gr269" draw:text-style-name="P267" draw:layer="layout" svg:width="0.027cm" svg:height="0.026cm" svg:x="13.383cm" svg:y="8.136cm" svg:viewBox="0 0 28 27" draw:points="0,0 28,0 28,27 0,27">
          <text:p/>
        </draw:polygon>
        <draw:polygon draw:style-name="gr269" draw:text-style-name="P267" draw:layer="layout" svg:width="0.027cm" svg:height="0.026cm" svg:x="13.436cm" svg:y="8.136cm" svg:viewBox="0 0 28 27" draw:points="0,0 28,0 28,27 0,27">
          <text:p/>
        </draw:polygon>
        <draw:polygon draw:style-name="gr269" draw:text-style-name="P267" draw:layer="layout" svg:width="0.027cm" svg:height="0.026cm" svg:x="13.489cm" svg:y="8.136cm" svg:viewBox="0 0 28 27" draw:points="0,0 28,0 28,27 0,27">
          <text:p/>
        </draw:polygon>
        <draw:polygon draw:style-name="gr269" draw:text-style-name="P267" draw:layer="layout" svg:width="0.027cm" svg:height="0.026cm" svg:x="13.542cm" svg:y="8.136cm" svg:viewBox="0 0 28 27" draw:points="0,0 28,0 28,27 0,27">
          <text:p/>
        </draw:polygon>
        <draw:polygon draw:style-name="gr269" draw:text-style-name="P267" draw:layer="layout" svg:width="0.027cm" svg:height="0.026cm" svg:x="13.595cm" svg:y="8.136cm" svg:viewBox="0 0 28 27" draw:points="0,0 28,0 28,27 0,27">
          <text:p/>
        </draw:polygon>
        <draw:polygon draw:style-name="gr269" draw:text-style-name="P267" draw:layer="layout" svg:width="0.027cm" svg:height="0.026cm" svg:x="13.648cm" svg:y="8.136cm" svg:viewBox="0 0 28 27" draw:points="0,0 28,0 28,27 0,27">
          <text:p/>
        </draw:polygon>
        <draw:polygon draw:style-name="gr269" draw:text-style-name="P267" draw:layer="layout" svg:width="0.027cm" svg:height="0.026cm" svg:x="13.701cm" svg:y="8.136cm" svg:viewBox="0 0 28 27" draw:points="0,0 28,0 28,27 0,27">
          <text:p/>
        </draw:polygon>
        <draw:polygon draw:style-name="gr269" draw:text-style-name="P267" draw:layer="layout" svg:width="0.027cm" svg:height="0.026cm" svg:x="13.754cm" svg:y="8.136cm" svg:viewBox="0 0 28 27" draw:points="0,0 28,0 28,27 0,27">
          <text:p/>
        </draw:polygon>
        <draw:polygon draw:style-name="gr269" draw:text-style-name="P267" draw:layer="layout" svg:width="0.027cm" svg:height="0.026cm" svg:x="13.807cm" svg:y="8.136cm" svg:viewBox="0 0 28 27" draw:points="0,0 28,0 28,27 0,27">
          <text:p/>
        </draw:polygon>
        <draw:polygon draw:style-name="gr269" draw:text-style-name="P267" draw:layer="layout" svg:width="0.027cm" svg:height="0.026cm" svg:x="13.86cm" svg:y="8.136cm" svg:viewBox="0 0 28 27" draw:points="0,0 28,0 28,27 0,27">
          <text:p/>
        </draw:polygon>
        <draw:polygon draw:style-name="gr269" draw:text-style-name="P267" draw:layer="layout" svg:width="0.027cm" svg:height="0.026cm" svg:x="13.913cm" svg:y="8.136cm" svg:viewBox="0 0 28 27" draw:points="0,0 28,0 28,27 0,27">
          <text:p/>
        </draw:polygon>
        <draw:polygon draw:style-name="gr269" draw:text-style-name="P267" draw:layer="layout" svg:width="0.027cm" svg:height="0.026cm" svg:x="13.966cm" svg:y="8.136cm" svg:viewBox="0 0 28 27" draw:points="0,0 28,0 28,27 0,27">
          <text:p/>
        </draw:polygon>
        <draw:polygon draw:style-name="gr269" draw:text-style-name="P267" draw:layer="layout" svg:width="0.027cm" svg:height="0.026cm" svg:x="14.019cm" svg:y="8.136cm" svg:viewBox="0 0 28 27" draw:points="0,0 28,0 28,27 0,27">
          <text:p/>
        </draw:polygon>
        <draw:polygon draw:style-name="gr269" draw:text-style-name="P267" draw:layer="layout" svg:width="0.027cm" svg:height="0.026cm" svg:x="14.072cm" svg:y="8.136cm" svg:viewBox="0 0 28 27" draw:points="0,0 28,0 28,27 0,27">
          <text:p/>
        </draw:polygon>
        <draw:polygon draw:style-name="gr269" draw:text-style-name="P267" draw:layer="layout" svg:width="0.027cm" svg:height="0.026cm" svg:x="14.125cm" svg:y="8.136cm" svg:viewBox="0 0 28 27" draw:points="0,0 28,0 28,27 0,27">
          <text:p/>
        </draw:polygon>
        <draw:polygon draw:style-name="gr269" draw:text-style-name="P267" draw:layer="layout" svg:width="0.027cm" svg:height="0.026cm" svg:x="14.178cm" svg:y="8.136cm" svg:viewBox="0 0 28 27" draw:points="0,0 28,0 28,27 0,27">
          <text:p/>
        </draw:polygon>
        <draw:polygon draw:style-name="gr269" draw:text-style-name="P267" draw:layer="layout" svg:width="0.027cm" svg:height="0.026cm" svg:x="14.231cm" svg:y="8.136cm" svg:viewBox="0 0 28 27" draw:points="0,0 28,0 28,27 0,27">
          <text:p/>
        </draw:polygon>
        <draw:polygon draw:style-name="gr269" draw:text-style-name="P267" draw:layer="layout" svg:width="0.027cm" svg:height="0.026cm" svg:x="14.284cm" svg:y="8.136cm" svg:viewBox="0 0 28 27" draw:points="0,0 28,0 28,27 0,27">
          <text:p/>
        </draw:polygon>
        <draw:polygon draw:style-name="gr269" draw:text-style-name="P267" draw:layer="layout" svg:width="0.027cm" svg:height="0.026cm" svg:x="14.337cm" svg:y="8.136cm" svg:viewBox="0 0 28 27" draw:points="0,0 28,0 28,27 0,27">
          <text:p/>
        </draw:polygon>
        <draw:polygon draw:style-name="gr269" draw:text-style-name="P267" draw:layer="layout" svg:width="0.028cm" svg:height="0.026cm" svg:x="14.39cm" svg:y="8.136cm" svg:viewBox="0 0 29 27" draw:points="0,0 29,0 29,27 0,27">
          <text:p/>
        </draw:polygon>
        <draw:polygon draw:style-name="gr269" draw:text-style-name="P267" draw:layer="layout" svg:width="0.027cm" svg:height="0.026cm" svg:x="14.443cm" svg:y="8.136cm" svg:viewBox="0 0 28 27" draw:points="0,0 28,0 28,27 0,27">
          <text:p/>
        </draw:polygon>
        <draw:polygon draw:style-name="gr269" draw:text-style-name="P267" draw:layer="layout" svg:width="0.027cm" svg:height="0.026cm" svg:x="14.496cm" svg:y="8.136cm" svg:viewBox="0 0 28 27" draw:points="0,0 28,0 28,27 0,27">
          <text:p/>
        </draw:polygon>
        <draw:polygon draw:style-name="gr269" draw:text-style-name="P267" draw:layer="layout" svg:width="0.027cm" svg:height="0.026cm" svg:x="14.549cm" svg:y="8.136cm" svg:viewBox="0 0 28 27" draw:points="0,0 28,0 28,27 0,27">
          <text:p/>
        </draw:polygon>
        <draw:polygon draw:style-name="gr269" draw:text-style-name="P267" draw:layer="layout" svg:width="0.027cm" svg:height="0.026cm" svg:x="14.602cm" svg:y="8.136cm" svg:viewBox="0 0 28 27" draw:points="0,0 28,0 28,27 0,27">
          <text:p/>
        </draw:polygon>
        <draw:polygon draw:style-name="gr269" draw:text-style-name="P267" draw:layer="layout" svg:width="0.027cm" svg:height="0.026cm" svg:x="14.655cm" svg:y="8.136cm" svg:viewBox="0 0 28 27" draw:points="0,0 28,0 28,27 0,27">
          <text:p/>
        </draw:polygon>
        <draw:polygon draw:style-name="gr269" draw:text-style-name="P267" draw:layer="layout" svg:width="0.027cm" svg:height="0.026cm" svg:x="14.708cm" svg:y="8.136cm" svg:viewBox="0 0 28 27" draw:points="0,0 28,0 28,27 0,27">
          <text:p/>
        </draw:polygon>
        <draw:polygon draw:style-name="gr269" draw:text-style-name="P267" draw:layer="layout" svg:width="0.027cm" svg:height="0.026cm" svg:x="14.761cm" svg:y="8.136cm" svg:viewBox="0 0 28 27" draw:points="0,0 28,0 28,27 0,27">
          <text:p/>
        </draw:polygon>
        <draw:polygon draw:style-name="gr269" draw:text-style-name="P267" draw:layer="layout" svg:width="0.027cm" svg:height="0.026cm" svg:x="14.814cm" svg:y="8.136cm" svg:viewBox="0 0 28 27" draw:points="0,0 28,0 28,27 0,27">
          <text:p/>
        </draw:polygon>
        <draw:polygon draw:style-name="gr269" draw:text-style-name="P267" draw:layer="layout" svg:width="0.027cm" svg:height="0.026cm" svg:x="14.867cm" svg:y="8.136cm" svg:viewBox="0 0 28 27" draw:points="0,0 28,0 28,27 0,27">
          <text:p/>
        </draw:polygon>
        <draw:polygon draw:style-name="gr269" draw:text-style-name="P267" draw:layer="layout" svg:width="0.027cm" svg:height="0.026cm" svg:x="14.92cm" svg:y="8.136cm" svg:viewBox="0 0 28 27" draw:points="0,0 28,0 28,27 0,27">
          <text:p/>
        </draw:polygon>
        <draw:polygon draw:style-name="gr269" draw:text-style-name="P267" draw:layer="layout" svg:width="0.027cm" svg:height="0.026cm" svg:x="14.973cm" svg:y="8.136cm" svg:viewBox="0 0 28 27" draw:points="0,0 28,0 28,27 0,27">
          <text:p/>
        </draw:polygon>
        <draw:polygon draw:style-name="gr269" draw:text-style-name="P267" draw:layer="layout" svg:width="0.027cm" svg:height="0.026cm" svg:x="15.026cm" svg:y="8.136cm" svg:viewBox="0 0 28 27" draw:points="0,0 28,0 28,27 0,27">
          <text:p/>
        </draw:polygon>
        <draw:polygon draw:style-name="gr269" draw:text-style-name="P267" draw:layer="layout" svg:width="0.027cm" svg:height="0.026cm" svg:x="15.079cm" svg:y="8.136cm" svg:viewBox="0 0 28 27" draw:points="0,0 28,0 28,27 0,27">
          <text:p/>
        </draw:polygon>
        <draw:polygon draw:style-name="gr269" draw:text-style-name="P267" draw:layer="layout" svg:width="0.027cm" svg:height="0.026cm" svg:x="15.132cm" svg:y="8.136cm" svg:viewBox="0 0 28 27" draw:points="0,0 28,0 28,27 0,27">
          <text:p/>
        </draw:polygon>
        <draw:polygon draw:style-name="gr269" draw:text-style-name="P267" draw:layer="layout" svg:width="0.027cm" svg:height="0.026cm" svg:x="15.185cm" svg:y="8.136cm" svg:viewBox="0 0 28 27" draw:points="0,0 28,0 28,27 0,27">
          <text:p/>
        </draw:polygon>
        <draw:polygon draw:style-name="gr269" draw:text-style-name="P267" draw:layer="layout" svg:width="0.027cm" svg:height="0.026cm" svg:x="15.238cm" svg:y="8.136cm" svg:viewBox="0 0 28 27" draw:points="0,0 28,0 28,27 0,27">
          <text:p/>
        </draw:polygon>
        <draw:polygon draw:style-name="gr269" draw:text-style-name="P267" draw:layer="layout" svg:width="0.027cm" svg:height="0.026cm" svg:x="15.291cm" svg:y="8.136cm" svg:viewBox="0 0 28 27" draw:points="0,0 28,0 28,27 0,27">
          <text:p/>
        </draw:polygon>
        <draw:polygon draw:style-name="gr269" draw:text-style-name="P267" draw:layer="layout" svg:width="0.027cm" svg:height="0.026cm" svg:x="15.344cm" svg:y="8.136cm" svg:viewBox="0 0 28 27" draw:points="0,0 28,0 28,27 0,27">
          <text:p/>
        </draw:polygon>
        <draw:polygon draw:style-name="gr269" draw:text-style-name="P267" draw:layer="layout" svg:width="0.027cm" svg:height="0.026cm" svg:x="15.397cm" svg:y="8.136cm" svg:viewBox="0 0 28 27" draw:points="0,0 28,0 28,27 0,27">
          <text:p/>
        </draw:polygon>
        <draw:polygon draw:style-name="gr269" draw:text-style-name="P267" draw:layer="layout" svg:width="0.027cm" svg:height="0.026cm" svg:x="15.45cm" svg:y="8.136cm" svg:viewBox="0 0 28 27" draw:points="0,0 28,0 28,27 0,27">
          <text:p/>
        </draw:polygon>
        <draw:polygon draw:style-name="gr269" draw:text-style-name="P267" draw:layer="layout" svg:width="0.027cm" svg:height="0.026cm" svg:x="15.503cm" svg:y="8.136cm" svg:viewBox="0 0 28 27" draw:points="0,0 28,0 28,27 0,27">
          <text:p/>
        </draw:polygon>
        <draw:polygon draw:style-name="gr269" draw:text-style-name="P267" draw:layer="layout" svg:width="0.027cm" svg:height="0.026cm" svg:x="15.556cm" svg:y="8.136cm" svg:viewBox="0 0 28 27" draw:points="0,0 28,0 28,27 0,27">
          <text:p/>
        </draw:polygon>
        <draw:polygon draw:style-name="gr269" draw:text-style-name="P267" draw:layer="layout" svg:width="0.027cm" svg:height="0.026cm" svg:x="15.609cm" svg:y="8.136cm" svg:viewBox="0 0 28 27" draw:points="0,0 28,0 28,27 0,27">
          <text:p/>
        </draw:polygon>
        <draw:polygon draw:style-name="gr269" draw:text-style-name="P267" draw:layer="layout" svg:width="0.027cm" svg:height="0.026cm" svg:x="15.662cm" svg:y="8.136cm" svg:viewBox="0 0 28 27" draw:points="0,0 28,0 28,27 0,27">
          <text:p/>
        </draw:polygon>
        <draw:polygon draw:style-name="gr269" draw:text-style-name="P267" draw:layer="layout" svg:width="0.027cm" svg:height="0.026cm" svg:x="15.715cm" svg:y="8.136cm" svg:viewBox="0 0 28 27" draw:points="0,0 28,0 28,27 0,27">
          <text:p/>
        </draw:polygon>
        <draw:polygon draw:style-name="gr269" draw:text-style-name="P267" draw:layer="layout" svg:width="0.028cm" svg:height="0.026cm" svg:x="15.768cm" svg:y="8.136cm" svg:viewBox="0 0 29 27" draw:points="0,0 29,0 29,27 0,27">
          <text:p/>
        </draw:polygon>
        <draw:polygon draw:style-name="gr269" draw:text-style-name="P267" draw:layer="layout" svg:width="0.027cm" svg:height="0.026cm" svg:x="15.821cm" svg:y="8.136cm" svg:viewBox="0 0 28 27" draw:points="0,0 28,0 28,27 0,27">
          <text:p/>
        </draw:polygon>
        <draw:polygon draw:style-name="gr269" draw:text-style-name="P267" draw:layer="layout" svg:width="0.027cm" svg:height="0.026cm" svg:x="15.874cm" svg:y="8.136cm" svg:viewBox="0 0 28 27" draw:points="0,0 28,0 28,27 0,27">
          <text:p/>
        </draw:polygon>
        <draw:polygon draw:style-name="gr269" draw:text-style-name="P267" draw:layer="layout" svg:width="0.027cm" svg:height="0.026cm" svg:x="15.927cm" svg:y="8.136cm" svg:viewBox="0 0 28 27" draw:points="0,0 28,0 28,27 0,27">
          <text:p/>
        </draw:polygon>
        <draw:polygon draw:style-name="gr269" draw:text-style-name="P267" draw:layer="layout" svg:width="0.027cm" svg:height="0.026cm" svg:x="15.98cm" svg:y="8.136cm" svg:viewBox="0 0 28 27" draw:points="0,0 28,0 28,27 0,27">
          <text:p/>
        </draw:polygon>
        <draw:polygon draw:style-name="gr269" draw:text-style-name="P267" draw:layer="layout" svg:width="0.027cm" svg:height="0.026cm" svg:x="16.033cm" svg:y="8.136cm" svg:viewBox="0 0 28 27" draw:points="0,0 28,0 28,27 0,27">
          <text:p/>
        </draw:polygon>
        <draw:polygon draw:style-name="gr269" draw:text-style-name="P267" draw:layer="layout" svg:width="0.027cm" svg:height="0.026cm" svg:x="16.086cm" svg:y="8.136cm" svg:viewBox="0 0 28 27" draw:points="0,0 28,0 28,27 0,27">
          <text:p/>
        </draw:polygon>
        <draw:polygon draw:style-name="gr269" draw:text-style-name="P267" draw:layer="layout" svg:width="0.027cm" svg:height="0.026cm" svg:x="16.139cm" svg:y="8.136cm" svg:viewBox="0 0 28 27" draw:points="0,0 28,0 28,27 0,27">
          <text:p/>
        </draw:polygon>
        <draw:polygon draw:style-name="gr269" draw:text-style-name="P267" draw:layer="layout" svg:width="0.027cm" svg:height="0.026cm" svg:x="16.192cm" svg:y="8.136cm" svg:viewBox="0 0 28 27" draw:points="0,0 28,0 28,27 0,27">
          <text:p/>
        </draw:polygon>
        <draw:polygon draw:style-name="gr269" draw:text-style-name="P267" draw:layer="layout" svg:width="0.027cm" svg:height="0.026cm" svg:x="16.245cm" svg:y="8.136cm" svg:viewBox="0 0 28 27" draw:points="0,0 28,0 28,27 0,27">
          <text:p/>
        </draw:polygon>
        <draw:polygon draw:style-name="gr269" draw:text-style-name="P267" draw:layer="layout" svg:width="0.027cm" svg:height="0.026cm" svg:x="16.298cm" svg:y="8.136cm" svg:viewBox="0 0 28 27" draw:points="0,0 28,0 28,27 0,27">
          <text:p/>
        </draw:polygon>
        <draw:polygon draw:style-name="gr269" draw:text-style-name="P267" draw:layer="layout" svg:width="0.027cm" svg:height="0.026cm" svg:x="16.351cm" svg:y="8.136cm" svg:viewBox="0 0 28 27" draw:points="0,0 28,0 28,27 0,27">
          <text:p/>
        </draw:polygon>
        <draw:polygon draw:style-name="gr269" draw:text-style-name="P267" draw:layer="layout" svg:width="0.027cm" svg:height="0.026cm" svg:x="16.404cm" svg:y="8.136cm" svg:viewBox="0 0 28 27" draw:points="0,0 28,0 28,27 0,27">
          <text:p/>
        </draw:polygon>
        <draw:polygon draw:style-name="gr269" draw:text-style-name="P267" draw:layer="layout" svg:width="0.027cm" svg:height="0.026cm" svg:x="16.457cm" svg:y="8.136cm" svg:viewBox="0 0 28 27" draw:points="0,0 28,0 28,27 0,27">
          <text:p/>
        </draw:polygon>
        <draw:polygon draw:style-name="gr269" draw:text-style-name="P267" draw:layer="layout" svg:width="0.027cm" svg:height="0.026cm" svg:x="16.51cm" svg:y="8.136cm" svg:viewBox="0 0 28 27" draw:points="0,0 28,0 28,27 0,27">
          <text:p/>
        </draw:polygon>
        <draw:polygon draw:style-name="gr269" draw:text-style-name="P267" draw:layer="layout" svg:width="0.027cm" svg:height="0.026cm" svg:x="16.563cm" svg:y="8.136cm" svg:viewBox="0 0 28 27" draw:points="0,0 28,0 28,27 0,27">
          <text:p/>
        </draw:polygon>
        <draw:polygon draw:style-name="gr269" draw:text-style-name="P267" draw:layer="layout" svg:width="0.027cm" svg:height="0.026cm" svg:x="16.616cm" svg:y="8.136cm" svg:viewBox="0 0 28 27" draw:points="0,0 28,0 28,27 0,27">
          <text:p/>
        </draw:polygon>
        <draw:polygon draw:style-name="gr269" draw:text-style-name="P267" draw:layer="layout" svg:width="0.027cm" svg:height="0.026cm" svg:x="16.669cm" svg:y="8.136cm" svg:viewBox="0 0 28 27" draw:points="0,0 28,0 28,27 0,27">
          <text:p/>
        </draw:polygon>
        <draw:polygon draw:style-name="gr269" draw:text-style-name="P267" draw:layer="layout" svg:width="0.027cm" svg:height="0.026cm" svg:x="16.722cm" svg:y="8.136cm" svg:viewBox="0 0 28 27" draw:points="0,0 28,0 28,27 0,27">
          <text:p/>
        </draw:polygon>
        <draw:polygon draw:style-name="gr269" draw:text-style-name="P267" draw:layer="layout" svg:width="0.027cm" svg:height="0.026cm" svg:x="16.775cm" svg:y="8.136cm" svg:viewBox="0 0 28 27" draw:points="0,0 28,0 28,27 0,27">
          <text:p/>
        </draw:polygon>
        <draw:polygon draw:style-name="gr269" draw:text-style-name="P267" draw:layer="layout" svg:width="0.027cm" svg:height="0.026cm" svg:x="16.828cm" svg:y="8.136cm" svg:viewBox="0 0 28 27" draw:points="0,0 28,0 28,27 0,27">
          <text:p/>
        </draw:polygon>
        <draw:polygon draw:style-name="gr269" draw:text-style-name="P267" draw:layer="layout" svg:width="0.027cm" svg:height="0.026cm" svg:x="16.881cm" svg:y="8.136cm" svg:viewBox="0 0 28 27" draw:points="0,0 28,0 28,27 0,27">
          <text:p/>
        </draw:polygon>
        <draw:polygon draw:style-name="gr269" draw:text-style-name="P267" draw:layer="layout" svg:width="0.027cm" svg:height="0.026cm" svg:x="16.934cm" svg:y="8.136cm" svg:viewBox="0 0 28 27" draw:points="0,0 28,0 28,27 0,27">
          <text:p/>
        </draw:polygon>
        <draw:polygon draw:style-name="gr269" draw:text-style-name="P267" draw:layer="layout" svg:width="0.027cm" svg:height="0.026cm" svg:x="16.987cm" svg:y="8.136cm" svg:viewBox="0 0 28 27" draw:points="0,0 28,0 28,27 0,27">
          <text:p/>
        </draw:polygon>
        <draw:polygon draw:style-name="gr269" draw:text-style-name="P267" draw:layer="layout" svg:width="0.027cm" svg:height="0.026cm" svg:x="17.04cm" svg:y="8.136cm" svg:viewBox="0 0 28 27" draw:points="0,0 28,0 28,27 0,27">
          <text:p/>
        </draw:polygon>
        <draw:polygon draw:style-name="gr269" draw:text-style-name="P267" draw:layer="layout" svg:width="0.027cm" svg:height="0.026cm" svg:x="17.093cm" svg:y="8.136cm" svg:viewBox="0 0 28 27" draw:points="0,0 28,0 28,27 0,27">
          <text:p/>
        </draw:polygon>
        <draw:polygon draw:style-name="gr269" draw:text-style-name="P267" draw:layer="layout" svg:width="0.028cm" svg:height="0.026cm" svg:x="17.146cm" svg:y="8.136cm" svg:viewBox="0 0 29 27" draw:points="0,0 29,0 29,27 0,27">
          <text:p/>
        </draw:polygon>
        <draw:polygon draw:style-name="gr269" draw:text-style-name="P267" draw:layer="layout" svg:width="0.027cm" svg:height="0.026cm" svg:x="17.199cm" svg:y="8.136cm" svg:viewBox="0 0 28 27" draw:points="0,0 28,0 28,27 0,27">
          <text:p/>
        </draw:polygon>
        <draw:polygon draw:style-name="gr269" draw:text-style-name="P267" draw:layer="layout" svg:width="0.027cm" svg:height="0.026cm" svg:x="17.252cm" svg:y="8.136cm" svg:viewBox="0 0 28 27" draw:points="0,0 28,0 28,27 0,27">
          <text:p/>
        </draw:polygon>
        <draw:polygon draw:style-name="gr269" draw:text-style-name="P267" draw:layer="layout" svg:width="0.027cm" svg:height="0.026cm" svg:x="17.305cm" svg:y="8.136cm" svg:viewBox="0 0 28 27" draw:points="0,0 28,0 28,27 0,27">
          <text:p/>
        </draw:polygon>
        <draw:polygon draw:style-name="gr269" draw:text-style-name="P267" draw:layer="layout" svg:width="0.027cm" svg:height="0.026cm" svg:x="17.358cm" svg:y="8.136cm" svg:viewBox="0 0 28 27" draw:points="0,0 28,0 28,27 0,27">
          <text:p/>
        </draw:polygon>
        <draw:polygon draw:style-name="gr269" draw:text-style-name="P267" draw:layer="layout" svg:width="0.027cm" svg:height="0.026cm" svg:x="17.411cm" svg:y="8.136cm" svg:viewBox="0 0 28 27" draw:points="0,0 28,0 28,27 0,27">
          <text:p/>
        </draw:polygon>
        <draw:polygon draw:style-name="gr269" draw:text-style-name="P267" draw:layer="layout" svg:width="0.027cm" svg:height="0.026cm" svg:x="17.464cm" svg:y="8.136cm" svg:viewBox="0 0 28 27" draw:points="0,0 28,0 28,27 0,27">
          <text:p/>
        </draw:polygon>
        <draw:polygon draw:style-name="gr269" draw:text-style-name="P267" draw:layer="layout" svg:width="0.027cm" svg:height="0.026cm" svg:x="17.517cm" svg:y="8.136cm" svg:viewBox="0 0 28 27" draw:points="0,0 28,0 28,27 0,27">
          <text:p/>
        </draw:polygon>
        <draw:polygon draw:style-name="gr269" draw:text-style-name="P267" draw:layer="layout" svg:width="0.027cm" svg:height="0.026cm" svg:x="17.57cm" svg:y="8.136cm" svg:viewBox="0 0 28 27" draw:points="0,0 28,0 28,27 0,27">
          <text:p/>
        </draw:polygon>
        <draw:polygon draw:style-name="gr269" draw:text-style-name="P267" draw:layer="layout" svg:width="0.027cm" svg:height="0.026cm" svg:x="17.623cm" svg:y="8.136cm" svg:viewBox="0 0 28 27" draw:points="0,0 28,0 28,27 0,27">
          <text:p/>
        </draw:polygon>
        <draw:polygon draw:style-name="gr269" draw:text-style-name="P267" draw:layer="layout" svg:width="0.027cm" svg:height="0.026cm" svg:x="17.676cm" svg:y="8.136cm" svg:viewBox="0 0 28 27" draw:points="0,0 28,0 28,27 0,27">
          <text:p/>
        </draw:polygon>
        <draw:polygon draw:style-name="gr269" draw:text-style-name="P267" draw:layer="layout" svg:width="0.027cm" svg:height="0.026cm" svg:x="17.729cm" svg:y="8.136cm" svg:viewBox="0 0 28 27" draw:points="0,0 28,0 28,27 0,27">
          <text:p/>
        </draw:polygon>
        <draw:polygon draw:style-name="gr269" draw:text-style-name="P267" draw:layer="layout" svg:width="0.027cm" svg:height="0.026cm" svg:x="17.782cm" svg:y="8.136cm" svg:viewBox="0 0 28 27" draw:points="0,0 28,0 28,27 0,27">
          <text:p/>
        </draw:polygon>
        <draw:polygon draw:style-name="gr269" draw:text-style-name="P267" draw:layer="layout" svg:width="0.027cm" svg:height="0.026cm" svg:x="17.835cm" svg:y="8.136cm" svg:viewBox="0 0 28 27" draw:points="0,0 28,0 28,27 0,27">
          <text:p/>
        </draw:polygon>
        <draw:polygon draw:style-name="gr269" draw:text-style-name="P267" draw:layer="layout" svg:width="0.027cm" svg:height="0.026cm" svg:x="17.888cm" svg:y="8.136cm" svg:viewBox="0 0 28 27" draw:points="0,0 28,0 28,27 0,27">
          <text:p/>
        </draw:polygon>
        <draw:polygon draw:style-name="gr269" draw:text-style-name="P267" draw:layer="layout" svg:width="0.027cm" svg:height="0.026cm" svg:x="17.941cm" svg:y="8.136cm" svg:viewBox="0 0 28 27" draw:points="0,0 28,0 28,27 0,27">
          <text:p/>
        </draw:polygon>
        <draw:polygon draw:style-name="gr269" draw:text-style-name="P267" draw:layer="layout" svg:width="0.027cm" svg:height="0.026cm" svg:x="17.994cm" svg:y="8.136cm" svg:viewBox="0 0 28 27" draw:points="0,0 28,0 28,27 0,27">
          <text:p/>
        </draw:polygon>
        <draw:polygon draw:style-name="gr269" draw:text-style-name="P267" draw:layer="layout" svg:width="0.027cm" svg:height="0.026cm" svg:x="18.047cm" svg:y="8.136cm" svg:viewBox="0 0 28 27" draw:points="0,0 28,0 28,27 0,27">
          <text:p/>
        </draw:polygon>
        <draw:polygon draw:style-name="gr269" draw:text-style-name="P267" draw:layer="layout" svg:width="0.027cm" svg:height="0.026cm" svg:x="18.1cm" svg:y="8.136cm" svg:viewBox="0 0 28 27" draw:points="0,0 28,0 28,27 0,27">
          <text:p/>
        </draw:polygon>
        <draw:polygon draw:style-name="gr269" draw:text-style-name="P267" draw:layer="layout" svg:width="0.027cm" svg:height="0.026cm" svg:x="18.153cm" svg:y="8.136cm" svg:viewBox="0 0 28 27" draw:points="0,0 28,0 28,27 0,27">
          <text:p/>
        </draw:polygon>
        <draw:polygon draw:style-name="gr269" draw:text-style-name="P267" draw:layer="layout" svg:width="0.027cm" svg:height="0.026cm" svg:x="18.206cm" svg:y="8.136cm" svg:viewBox="0 0 28 27" draw:points="0,0 28,0 28,27 0,27">
          <text:p/>
        </draw:polygon>
        <draw:polygon draw:style-name="gr269" draw:text-style-name="P267" draw:layer="layout" svg:width="0.027cm" svg:height="0.026cm" svg:x="18.259cm" svg:y="8.136cm" svg:viewBox="0 0 28 27" draw:points="0,0 28,0 28,27 0,27">
          <text:p/>
        </draw:polygon>
        <draw:polygon draw:style-name="gr269" draw:text-style-name="P267" draw:layer="layout" svg:width="0.027cm" svg:height="0.026cm" svg:x="18.312cm" svg:y="8.136cm" svg:viewBox="0 0 28 27" draw:points="0,0 28,0 28,27 0,27">
          <text:p/>
        </draw:polygon>
        <draw:polygon draw:style-name="gr269" draw:text-style-name="P267" draw:layer="layout" svg:width="0.027cm" svg:height="0.026cm" svg:x="18.365cm" svg:y="8.136cm" svg:viewBox="0 0 28 27" draw:points="0,0 28,0 28,27 0,27">
          <text:p/>
        </draw:polygon>
        <draw:polygon draw:style-name="gr269" draw:text-style-name="P267" draw:layer="layout" svg:width="0.027cm" svg:height="0.026cm" svg:x="18.418cm" svg:y="8.136cm" svg:viewBox="0 0 28 27" draw:points="0,0 28,0 28,27 0,27">
          <text:p/>
        </draw:polygon>
        <draw:polygon draw:style-name="gr269" draw:text-style-name="P267" draw:layer="layout" svg:width="0.027cm" svg:height="0.026cm" svg:x="18.471cm" svg:y="8.136cm" svg:viewBox="0 0 28 27" draw:points="0,0 28,0 28,27 0,27">
          <text:p/>
        </draw:polygon>
        <draw:polygon draw:style-name="gr269" draw:text-style-name="P267" draw:layer="layout" svg:width="0.028cm" svg:height="0.026cm" svg:x="18.524cm" svg:y="8.136cm" svg:viewBox="0 0 29 27" draw:points="0,0 29,0 29,27 0,27">
          <text:p/>
        </draw:polygon>
        <draw:polygon draw:style-name="gr269" draw:text-style-name="P267" draw:layer="layout" svg:width="0.027cm" svg:height="0.026cm" svg:x="18.577cm" svg:y="8.136cm" svg:viewBox="0 0 28 27" draw:points="0,0 28,0 28,27 0,27">
          <text:p/>
        </draw:polygon>
        <draw:polygon draw:style-name="gr269" draw:text-style-name="P267" draw:layer="layout" svg:width="0.027cm" svg:height="0.026cm" svg:x="18.63cm" svg:y="8.136cm" svg:viewBox="0 0 28 27" draw:points="0,0 28,0 28,27 0,27">
          <text:p/>
        </draw:polygon>
        <draw:polygon draw:style-name="gr269" draw:text-style-name="P267" draw:layer="layout" svg:width="0.027cm" svg:height="0.026cm" svg:x="18.683cm" svg:y="8.136cm" svg:viewBox="0 0 28 27" draw:points="0,0 28,0 28,27 0,27">
          <text:p/>
        </draw:polygon>
        <draw:polygon draw:style-name="gr269" draw:text-style-name="P267" draw:layer="layout" svg:width="0.027cm" svg:height="0.026cm" svg:x="18.736cm" svg:y="8.136cm" svg:viewBox="0 0 28 27" draw:points="0,0 28,0 28,27 0,27">
          <text:p/>
        </draw:polygon>
        <draw:polygon draw:style-name="gr269" draw:text-style-name="P267" draw:layer="layout" svg:width="0.027cm" svg:height="0.026cm" svg:x="18.789cm" svg:y="8.136cm" svg:viewBox="0 0 28 27" draw:points="0,0 28,0 28,27 0,27">
          <text:p/>
        </draw:polygon>
        <draw:polygon draw:style-name="gr269" draw:text-style-name="P267" draw:layer="layout" svg:width="0.027cm" svg:height="0.026cm" svg:x="18.842cm" svg:y="8.136cm" svg:viewBox="0 0 28 27" draw:points="0,0 28,0 28,27 0,27">
          <text:p/>
        </draw:polygon>
        <draw:polygon draw:style-name="gr269" draw:text-style-name="P267" draw:layer="layout" svg:width="0.027cm" svg:height="0.026cm" svg:x="18.895cm" svg:y="8.136cm" svg:viewBox="0 0 28 27" draw:points="0,0 28,0 28,27 0,27">
          <text:p/>
        </draw:polygon>
        <draw:polygon draw:style-name="gr269" draw:text-style-name="P267" draw:layer="layout" svg:width="0.027cm" svg:height="0.026cm" svg:x="18.948cm" svg:y="8.136cm" svg:viewBox="0 0 28 27" draw:points="0,0 28,0 28,27 0,27">
          <text:p/>
        </draw:polygon>
        <draw:polygon draw:style-name="gr269" draw:text-style-name="P267" draw:layer="layout" svg:width="0.027cm" svg:height="0.026cm" svg:x="19.001cm" svg:y="8.136cm" svg:viewBox="0 0 28 27" draw:points="0,0 28,0 28,27 0,27">
          <text:p/>
        </draw:polygon>
        <draw:polygon draw:style-name="gr269" draw:text-style-name="P267" draw:layer="layout" svg:width="0.053cm" svg:height="0.027cm" svg:x="2.014cm" svg:y="9.116cm" svg:viewBox="0 0 54 28" draw:points="0,0 54,0 54,28 0,28">
          <text:p/>
        </draw:polygon>
        <draw:polygon draw:style-name="gr269" draw:text-style-name="P267" draw:layer="layout" svg:width="0.027cm" svg:height="0.027cm" svg:x="2.093cm" svg:y="9.116cm" svg:viewBox="0 0 28 28" draw:points="0,0 28,0 28,28 0,28">
          <text:p/>
        </draw:polygon>
        <draw:polygon draw:style-name="gr269" draw:text-style-name="P267" draw:layer="layout" svg:width="0.027cm" svg:height="0.027cm" svg:x="2.146cm" svg:y="9.116cm" svg:viewBox="0 0 28 28" draw:points="0,0 28,0 28,28 0,28">
          <text:p/>
        </draw:polygon>
        <draw:polygon draw:style-name="gr269" draw:text-style-name="P267" draw:layer="layout" svg:width="0.027cm" svg:height="0.027cm" svg:x="2.199cm" svg:y="9.116cm" svg:viewBox="0 0 28 28" draw:points="0,0 28,0 28,28 0,28">
          <text:p/>
        </draw:polygon>
        <draw:polygon draw:style-name="gr269" draw:text-style-name="P267" draw:layer="layout" svg:width="0.027cm" svg:height="0.027cm" svg:x="2.252cm" svg:y="9.116cm" svg:viewBox="0 0 28 28" draw:points="0,0 28,0 28,28 0,28">
          <text:p/>
        </draw:polygon>
        <draw:polygon draw:style-name="gr269" draw:text-style-name="P267" draw:layer="layout" svg:width="0.027cm" svg:height="0.027cm" svg:x="2.305cm" svg:y="9.116cm" svg:viewBox="0 0 28 28" draw:points="0,0 28,0 28,28 0,28">
          <text:p/>
        </draw:polygon>
        <draw:polygon draw:style-name="gr269" draw:text-style-name="P267" draw:layer="layout" svg:width="0.027cm" svg:height="0.027cm" svg:x="2.358cm" svg:y="9.116cm" svg:viewBox="0 0 28 28" draw:points="0,0 28,0 28,28 0,28">
          <text:p/>
        </draw:polygon>
        <draw:polygon draw:style-name="gr269" draw:text-style-name="P267" draw:layer="layout" svg:width="0.027cm" svg:height="0.027cm" svg:x="2.411cm" svg:y="9.116cm" svg:viewBox="0 0 28 28" draw:points="0,0 28,0 28,28 0,28">
          <text:p/>
        </draw:polygon>
        <draw:polygon draw:style-name="gr269" draw:text-style-name="P267" draw:layer="layout" svg:width="0.027cm" svg:height="0.027cm" svg:x="2.464cm" svg:y="9.116cm" svg:viewBox="0 0 28 28" draw:points="0,0 28,0 28,28 0,28">
          <text:p/>
        </draw:polygon>
        <draw:polygon draw:style-name="gr269" draw:text-style-name="P267" draw:layer="layout" svg:width="0.027cm" svg:height="0.027cm" svg:x="2.517cm" svg:y="9.116cm" svg:viewBox="0 0 28 28" draw:points="0,0 28,0 28,28 0,28">
          <text:p/>
        </draw:polygon>
        <draw:polygon draw:style-name="gr269" draw:text-style-name="P267" draw:layer="layout" svg:width="0.027cm" svg:height="0.027cm" svg:x="2.57cm" svg:y="9.116cm" svg:viewBox="0 0 28 28" draw:points="0,0 28,0 28,28 0,28">
          <text:p/>
        </draw:polygon>
        <draw:polygon draw:style-name="gr269" draw:text-style-name="P267" draw:layer="layout" svg:width="0.027cm" svg:height="0.027cm" svg:x="2.623cm" svg:y="9.116cm" svg:viewBox="0 0 28 28" draw:points="0,0 28,0 28,28 0,28">
          <text:p/>
        </draw:polygon>
        <draw:polygon draw:style-name="gr269" draw:text-style-name="P267" draw:layer="layout" svg:width="0.027cm" svg:height="0.027cm" svg:x="2.676cm" svg:y="9.116cm" svg:viewBox="0 0 28 28" draw:points="0,0 28,0 28,28 0,28">
          <text:p/>
        </draw:polygon>
        <draw:polygon draw:style-name="gr269" draw:text-style-name="P267" draw:layer="layout" svg:width="0.027cm" svg:height="0.027cm" svg:x="2.729cm" svg:y="9.116cm" svg:viewBox="0 0 28 28" draw:points="0,0 28,0 28,28 0,28">
          <text:p/>
        </draw:polygon>
        <draw:polygon draw:style-name="gr269" draw:text-style-name="P267" draw:layer="layout" svg:width="0.027cm" svg:height="0.027cm" svg:x="2.782cm" svg:y="9.116cm" svg:viewBox="0 0 28 28" draw:points="0,0 28,0 28,28 0,28">
          <text:p/>
        </draw:polygon>
        <draw:polygon draw:style-name="gr269" draw:text-style-name="P267" draw:layer="layout" svg:width="0.027cm" svg:height="0.027cm" svg:x="2.835cm" svg:y="9.116cm" svg:viewBox="0 0 28 28" draw:points="0,0 28,0 28,28 0,28">
          <text:p/>
        </draw:polygon>
        <draw:polygon draw:style-name="gr269" draw:text-style-name="P267" draw:layer="layout" svg:width="0.027cm" svg:height="0.027cm" svg:x="2.888cm" svg:y="9.116cm" svg:viewBox="0 0 28 28" draw:points="0,0 28,0 28,28 0,28">
          <text:p/>
        </draw:polygon>
        <draw:polygon draw:style-name="gr269" draw:text-style-name="P267" draw:layer="layout" svg:width="0.027cm" svg:height="0.027cm" svg:x="2.941cm" svg:y="9.116cm" svg:viewBox="0 0 28 28" draw:points="0,0 28,0 28,28 0,28">
          <text:p/>
        </draw:polygon>
        <draw:polygon draw:style-name="gr269" draw:text-style-name="P267" draw:layer="layout" svg:width="0.027cm" svg:height="0.027cm" svg:x="2.994cm" svg:y="9.116cm" svg:viewBox="0 0 28 28" draw:points="0,0 28,0 28,28 0,28">
          <text:p/>
        </draw:polygon>
        <draw:polygon draw:style-name="gr269" draw:text-style-name="P267" draw:layer="layout" svg:width="0.027cm" svg:height="0.027cm" svg:x="3.047cm" svg:y="9.116cm" svg:viewBox="0 0 28 28" draw:points="0,0 28,0 28,28 0,28">
          <text:p/>
        </draw:polygon>
        <draw:polygon draw:style-name="gr269" draw:text-style-name="P267" draw:layer="layout" svg:width="0.027cm" svg:height="0.027cm" svg:x="3.1cm" svg:y="9.116cm" svg:viewBox="0 0 28 28" draw:points="0,0 28,0 28,28 0,28">
          <text:p/>
        </draw:polygon>
        <draw:polygon draw:style-name="gr269" draw:text-style-name="P267" draw:layer="layout" svg:width="0.027cm" svg:height="0.027cm" svg:x="3.153cm" svg:y="9.116cm" svg:viewBox="0 0 28 28" draw:points="0,0 28,0 28,28 0,28">
          <text:p/>
        </draw:polygon>
        <draw:polygon draw:style-name="gr269" draw:text-style-name="P267" draw:layer="layout" svg:width="0.027cm" svg:height="0.027cm" svg:x="3.206cm" svg:y="9.116cm" svg:viewBox="0 0 28 28" draw:points="0,0 28,0 28,28 0,28">
          <text:p/>
        </draw:polygon>
        <draw:polygon draw:style-name="gr269" draw:text-style-name="P267" draw:layer="layout" svg:width="0.027cm" svg:height="0.027cm" svg:x="3.259cm" svg:y="9.116cm" svg:viewBox="0 0 28 28" draw:points="0,0 28,0 28,28 0,28">
          <text:p/>
        </draw:polygon>
        <draw:polygon draw:style-name="gr269" draw:text-style-name="P267" draw:layer="layout" svg:width="0.027cm" svg:height="0.027cm" svg:x="3.312cm" svg:y="9.116cm" svg:viewBox="0 0 28 28" draw:points="0,0 28,0 28,28 0,28">
          <text:p/>
        </draw:polygon>
        <draw:polygon draw:style-name="gr269" draw:text-style-name="P267" draw:layer="layout" svg:width="0.027cm" svg:height="0.027cm" svg:x="3.365cm" svg:y="9.116cm" svg:viewBox="0 0 28 28" draw:points="0,0 28,0 28,28 0,28">
          <text:p/>
        </draw:polygon>
        <draw:polygon draw:style-name="gr269" draw:text-style-name="P267" draw:layer="layout" svg:width="0.028cm" svg:height="0.027cm" svg:x="3.418cm" svg:y="9.116cm" svg:viewBox="0 0 29 28" draw:points="0,0 29,0 29,28 0,28">
          <text:p/>
        </draw:polygon>
        <draw:polygon draw:style-name="gr269" draw:text-style-name="P267" draw:layer="layout" svg:width="0.027cm" svg:height="0.027cm" svg:x="3.471cm" svg:y="9.116cm" svg:viewBox="0 0 28 28" draw:points="0,0 28,0 28,28 0,28">
          <text:p/>
        </draw:polygon>
        <draw:polygon draw:style-name="gr269" draw:text-style-name="P267" draw:layer="layout" svg:width="0.027cm" svg:height="0.027cm" svg:x="3.524cm" svg:y="9.116cm" svg:viewBox="0 0 28 28" draw:points="0,0 28,0 28,28 0,28">
          <text:p/>
        </draw:polygon>
        <draw:polygon draw:style-name="gr269" draw:text-style-name="P267" draw:layer="layout" svg:width="0.027cm" svg:height="0.027cm" svg:x="3.577cm" svg:y="9.116cm" svg:viewBox="0 0 28 28" draw:points="0,0 28,0 28,28 0,28">
          <text:p/>
        </draw:polygon>
        <draw:polygon draw:style-name="gr269" draw:text-style-name="P267" draw:layer="layout" svg:width="0.027cm" svg:height="0.027cm" svg:x="3.63cm" svg:y="9.116cm" svg:viewBox="0 0 28 28" draw:points="0,0 28,0 28,28 0,28">
          <text:p/>
        </draw:polygon>
        <draw:polygon draw:style-name="gr269" draw:text-style-name="P267" draw:layer="layout" svg:width="0.027cm" svg:height="0.027cm" svg:x="3.683cm" svg:y="9.116cm" svg:viewBox="0 0 28 28" draw:points="0,0 28,0 28,28 0,28">
          <text:p/>
        </draw:polygon>
        <draw:polygon draw:style-name="gr269" draw:text-style-name="P267" draw:layer="layout" svg:width="0.027cm" svg:height="0.027cm" svg:x="3.736cm" svg:y="9.116cm" svg:viewBox="0 0 28 28" draw:points="0,0 28,0 28,28 0,28">
          <text:p/>
        </draw:polygon>
        <draw:polygon draw:style-name="gr269" draw:text-style-name="P267" draw:layer="layout" svg:width="0.027cm" svg:height="0.027cm" svg:x="3.789cm" svg:y="9.116cm" svg:viewBox="0 0 28 28" draw:points="0,0 28,0 28,28 0,28">
          <text:p/>
        </draw:polygon>
        <draw:polygon draw:style-name="gr269" draw:text-style-name="P267" draw:layer="layout" svg:width="0.027cm" svg:height="0.027cm" svg:x="3.842cm" svg:y="9.116cm" svg:viewBox="0 0 28 28" draw:points="0,0 28,0 28,28 0,28">
          <text:p/>
        </draw:polygon>
        <draw:polygon draw:style-name="gr269" draw:text-style-name="P267" draw:layer="layout" svg:width="0.027cm" svg:height="0.027cm" svg:x="3.895cm" svg:y="9.116cm" svg:viewBox="0 0 28 28" draw:points="0,0 28,0 28,28 0,28">
          <text:p/>
        </draw:polygon>
        <draw:polygon draw:style-name="gr269" draw:text-style-name="P267" draw:layer="layout" svg:width="0.027cm" svg:height="0.027cm" svg:x="3.948cm" svg:y="9.116cm" svg:viewBox="0 0 28 28" draw:points="0,0 28,0 28,28 0,28">
          <text:p/>
        </draw:polygon>
        <draw:polygon draw:style-name="gr269" draw:text-style-name="P267" draw:layer="layout" svg:width="0.027cm" svg:height="0.027cm" svg:x="4.001cm" svg:y="9.116cm" svg:viewBox="0 0 28 28" draw:points="0,0 28,0 28,28 0,28">
          <text:p/>
        </draw:polygon>
        <draw:polygon draw:style-name="gr269" draw:text-style-name="P267" draw:layer="layout" svg:width="0.027cm" svg:height="0.027cm" svg:x="4.054cm" svg:y="9.116cm" svg:viewBox="0 0 28 28" draw:points="0,0 28,0 28,28 0,28">
          <text:p/>
        </draw:polygon>
        <draw:polygon draw:style-name="gr269" draw:text-style-name="P267" draw:layer="layout" svg:width="0.027cm" svg:height="0.027cm" svg:x="4.107cm" svg:y="9.116cm" svg:viewBox="0 0 28 28" draw:points="0,0 28,0 28,28 0,28">
          <text:p/>
        </draw:polygon>
        <draw:polygon draw:style-name="gr269" draw:text-style-name="P267" draw:layer="layout" svg:width="0.027cm" svg:height="0.027cm" svg:x="4.16cm" svg:y="9.116cm" svg:viewBox="0 0 28 28" draw:points="0,0 28,0 28,28 0,28">
          <text:p/>
        </draw:polygon>
        <draw:polygon draw:style-name="gr269" draw:text-style-name="P267" draw:layer="layout" svg:width="0.027cm" svg:height="0.027cm" svg:x="4.213cm" svg:y="9.116cm" svg:viewBox="0 0 28 28" draw:points="0,0 28,0 28,28 0,28">
          <text:p/>
        </draw:polygon>
        <draw:polygon draw:style-name="gr269" draw:text-style-name="P267" draw:layer="layout" svg:width="0.027cm" svg:height="0.027cm" svg:x="4.266cm" svg:y="9.116cm" svg:viewBox="0 0 28 28" draw:points="0,0 28,0 28,28 0,28">
          <text:p/>
        </draw:polygon>
        <draw:polygon draw:style-name="gr269" draw:text-style-name="P267" draw:layer="layout" svg:width="0.027cm" svg:height="0.027cm" svg:x="4.319cm" svg:y="9.116cm" svg:viewBox="0 0 28 28" draw:points="0,0 28,0 28,28 0,28">
          <text:p/>
        </draw:polygon>
        <draw:polygon draw:style-name="gr269" draw:text-style-name="P267" draw:layer="layout" svg:width="0.027cm" svg:height="0.027cm" svg:x="4.372cm" svg:y="9.116cm" svg:viewBox="0 0 28 28" draw:points="0,0 28,0 28,28 0,28">
          <text:p/>
        </draw:polygon>
        <draw:polygon draw:style-name="gr269" draw:text-style-name="P267" draw:layer="layout" svg:width="0.027cm" svg:height="0.027cm" svg:x="4.425cm" svg:y="9.116cm" svg:viewBox="0 0 28 28" draw:points="0,0 28,0 28,28 0,28">
          <text:p/>
        </draw:polygon>
        <draw:polygon draw:style-name="gr269" draw:text-style-name="P267" draw:layer="layout" svg:width="0.027cm" svg:height="0.027cm" svg:x="4.478cm" svg:y="9.116cm" svg:viewBox="0 0 28 28" draw:points="0,0 28,0 28,28 0,28">
          <text:p/>
        </draw:polygon>
        <draw:polygon draw:style-name="gr269" draw:text-style-name="P267" draw:layer="layout" svg:width="0.027cm" svg:height="0.027cm" svg:x="4.531cm" svg:y="9.116cm" svg:viewBox="0 0 28 28" draw:points="0,0 28,0 28,28 0,28">
          <text:p/>
        </draw:polygon>
        <draw:polygon draw:style-name="gr269" draw:text-style-name="P267" draw:layer="layout" svg:width="0.027cm" svg:height="0.027cm" svg:x="4.584cm" svg:y="9.116cm" svg:viewBox="0 0 28 28" draw:points="0,0 28,0 28,28 0,28">
          <text:p/>
        </draw:polygon>
        <draw:polygon draw:style-name="gr269" draw:text-style-name="P267" draw:layer="layout" svg:width="0.027cm" svg:height="0.027cm" svg:x="4.637cm" svg:y="9.116cm" svg:viewBox="0 0 28 28" draw:points="0,0 28,0 28,28 0,28">
          <text:p/>
        </draw:polygon>
        <draw:polygon draw:style-name="gr269" draw:text-style-name="P267" draw:layer="layout" svg:width="0.027cm" svg:height="0.027cm" svg:x="4.69cm" svg:y="9.116cm" svg:viewBox="0 0 28 28" draw:points="0,0 28,0 28,28 0,28">
          <text:p/>
        </draw:polygon>
        <draw:polygon draw:style-name="gr269" draw:text-style-name="P267" draw:layer="layout" svg:width="0.027cm" svg:height="0.027cm" svg:x="4.743cm" svg:y="9.116cm" svg:viewBox="0 0 28 28" draw:points="0,0 28,0 28,28 0,28">
          <text:p/>
        </draw:polygon>
        <draw:polygon draw:style-name="gr269" draw:text-style-name="P267" draw:layer="layout" svg:width="0.028cm" svg:height="0.027cm" svg:x="4.796cm" svg:y="9.116cm" svg:viewBox="0 0 29 28" draw:points="0,0 29,0 29,28 0,28">
          <text:p/>
        </draw:polygon>
        <draw:polygon draw:style-name="gr269" draw:text-style-name="P267" draw:layer="layout" svg:width="0.027cm" svg:height="0.027cm" svg:x="4.849cm" svg:y="9.116cm" svg:viewBox="0 0 28 28" draw:points="0,0 28,0 28,28 0,28">
          <text:p/>
        </draw:polygon>
        <draw:polygon draw:style-name="gr269" draw:text-style-name="P267" draw:layer="layout" svg:width="0.027cm" svg:height="0.027cm" svg:x="4.902cm" svg:y="9.116cm" svg:viewBox="0 0 28 28" draw:points="0,0 28,0 28,28 0,28">
          <text:p/>
        </draw:polygon>
        <draw:polygon draw:style-name="gr269" draw:text-style-name="P267" draw:layer="layout" svg:width="0.027cm" svg:height="0.027cm" svg:x="4.955cm" svg:y="9.116cm" svg:viewBox="0 0 28 28" draw:points="0,0 28,0 28,28 0,28">
          <text:p/>
        </draw:polygon>
        <draw:polygon draw:style-name="gr269" draw:text-style-name="P267" draw:layer="layout" svg:width="0.027cm" svg:height="0.027cm" svg:x="5.008cm" svg:y="9.116cm" svg:viewBox="0 0 28 28" draw:points="0,0 28,0 28,28 0,28">
          <text:p/>
        </draw:polygon>
        <draw:polygon draw:style-name="gr269" draw:text-style-name="P267" draw:layer="layout" svg:width="0.027cm" svg:height="0.027cm" svg:x="5.061cm" svg:y="9.116cm" svg:viewBox="0 0 28 28" draw:points="0,0 28,0 28,28 0,28">
          <text:p/>
        </draw:polygon>
        <draw:polygon draw:style-name="gr269" draw:text-style-name="P267" draw:layer="layout" svg:width="0.027cm" svg:height="0.027cm" svg:x="5.114cm" svg:y="9.116cm" svg:viewBox="0 0 28 28" draw:points="0,0 28,0 28,28 0,28">
          <text:p/>
        </draw:polygon>
        <draw:polygon draw:style-name="gr269" draw:text-style-name="P267" draw:layer="layout" svg:width="0.027cm" svg:height="0.027cm" svg:x="5.167cm" svg:y="9.116cm" svg:viewBox="0 0 28 28" draw:points="0,0 28,0 28,28 0,28">
          <text:p/>
        </draw:polygon>
        <draw:polygon draw:style-name="gr269" draw:text-style-name="P267" draw:layer="layout" svg:width="0.027cm" svg:height="0.027cm" svg:x="5.22cm" svg:y="9.116cm" svg:viewBox="0 0 28 28" draw:points="0,0 28,0 28,28 0,28">
          <text:p/>
        </draw:polygon>
        <draw:polygon draw:style-name="gr269" draw:text-style-name="P267" draw:layer="layout" svg:width="0.027cm" svg:height="0.027cm" svg:x="5.273cm" svg:y="9.116cm" svg:viewBox="0 0 28 28" draw:points="0,0 28,0 28,28 0,28">
          <text:p/>
        </draw:polygon>
        <draw:polygon draw:style-name="gr269" draw:text-style-name="P267" draw:layer="layout" svg:width="0.027cm" svg:height="0.027cm" svg:x="5.326cm" svg:y="9.116cm" svg:viewBox="0 0 28 28" draw:points="0,0 28,0 28,28 0,28">
          <text:p/>
        </draw:polygon>
        <draw:polygon draw:style-name="gr269" draw:text-style-name="P267" draw:layer="layout" svg:width="0.027cm" svg:height="0.027cm" svg:x="5.379cm" svg:y="9.116cm" svg:viewBox="0 0 28 28" draw:points="0,0 28,0 28,28 0,28">
          <text:p/>
        </draw:polygon>
        <draw:polygon draw:style-name="gr269" draw:text-style-name="P267" draw:layer="layout" svg:width="0.027cm" svg:height="0.027cm" svg:x="5.432cm" svg:y="9.116cm" svg:viewBox="0 0 28 28" draw:points="0,0 28,0 28,28 0,28">
          <text:p/>
        </draw:polygon>
        <draw:polygon draw:style-name="gr269" draw:text-style-name="P267" draw:layer="layout" svg:width="0.027cm" svg:height="0.027cm" svg:x="5.485cm" svg:y="9.116cm" svg:viewBox="0 0 28 28" draw:points="0,0 28,0 28,28 0,28">
          <text:p/>
        </draw:polygon>
        <draw:polygon draw:style-name="gr269" draw:text-style-name="P267" draw:layer="layout" svg:width="0.027cm" svg:height="0.027cm" svg:x="5.538cm" svg:y="9.116cm" svg:viewBox="0 0 28 28" draw:points="0,0 28,0 28,28 0,28">
          <text:p/>
        </draw:polygon>
        <draw:polygon draw:style-name="gr269" draw:text-style-name="P267" draw:layer="layout" svg:width="0.027cm" svg:height="0.027cm" svg:x="5.591cm" svg:y="9.116cm" svg:viewBox="0 0 28 28" draw:points="0,0 28,0 28,28 0,28">
          <text:p/>
        </draw:polygon>
        <draw:polygon draw:style-name="gr269" draw:text-style-name="P267" draw:layer="layout" svg:width="0.027cm" svg:height="0.027cm" svg:x="5.644cm" svg:y="9.116cm" svg:viewBox="0 0 28 28" draw:points="0,0 28,0 28,28 0,28">
          <text:p/>
        </draw:polygon>
        <draw:polygon draw:style-name="gr269" draw:text-style-name="P267" draw:layer="layout" svg:width="0.027cm" svg:height="0.027cm" svg:x="5.697cm" svg:y="9.116cm" svg:viewBox="0 0 28 28" draw:points="0,0 28,0 28,28 0,28">
          <text:p/>
        </draw:polygon>
        <draw:polygon draw:style-name="gr269" draw:text-style-name="P267" draw:layer="layout" svg:width="0.027cm" svg:height="0.027cm" svg:x="5.75cm" svg:y="9.116cm" svg:viewBox="0 0 28 28" draw:points="0,0 28,0 28,28 0,28">
          <text:p/>
        </draw:polygon>
        <draw:polygon draw:style-name="gr269" draw:text-style-name="P267" draw:layer="layout" svg:width="0.027cm" svg:height="0.027cm" svg:x="5.803cm" svg:y="9.116cm" svg:viewBox="0 0 28 28" draw:points="0,0 28,0 28,28 0,28">
          <text:p/>
        </draw:polygon>
        <draw:polygon draw:style-name="gr269" draw:text-style-name="P267" draw:layer="layout" svg:width="0.027cm" svg:height="0.027cm" svg:x="5.856cm" svg:y="9.116cm" svg:viewBox="0 0 28 28" draw:points="0,0 28,0 28,28 0,28">
          <text:p/>
        </draw:polygon>
        <draw:polygon draw:style-name="gr269" draw:text-style-name="P267" draw:layer="layout" svg:width="0.027cm" svg:height="0.027cm" svg:x="5.909cm" svg:y="9.116cm" svg:viewBox="0 0 28 28" draw:points="0,0 28,0 28,28 0,28">
          <text:p/>
        </draw:polygon>
        <draw:polygon draw:style-name="gr269" draw:text-style-name="P267" draw:layer="layout" svg:width="0.027cm" svg:height="0.027cm" svg:x="5.962cm" svg:y="9.116cm" svg:viewBox="0 0 28 28" draw:points="0,0 28,0 28,28 0,28">
          <text:p/>
        </draw:polygon>
        <draw:polygon draw:style-name="gr269" draw:text-style-name="P267" draw:layer="layout" svg:width="0.027cm" svg:height="0.027cm" svg:x="6.015cm" svg:y="9.116cm" svg:viewBox="0 0 28 28" draw:points="0,0 28,0 28,28 0,28">
          <text:p/>
        </draw:polygon>
        <draw:polygon draw:style-name="gr269" draw:text-style-name="P267" draw:layer="layout" svg:width="0.027cm" svg:height="0.027cm" svg:x="6.068cm" svg:y="9.116cm" svg:viewBox="0 0 28 28" draw:points="0,0 28,0 28,28 0,28">
          <text:p/>
        </draw:polygon>
        <draw:polygon draw:style-name="gr269" draw:text-style-name="P267" draw:layer="layout" svg:width="0.027cm" svg:height="0.027cm" svg:x="6.121cm" svg:y="9.116cm" svg:viewBox="0 0 28 28" draw:points="0,0 28,0 28,28 0,28">
          <text:p/>
        </draw:polygon>
        <draw:polygon draw:style-name="gr269" draw:text-style-name="P267" draw:layer="layout" svg:width="0.028cm" svg:height="0.027cm" svg:x="6.174cm" svg:y="9.116cm" svg:viewBox="0 0 29 28" draw:points="0,0 29,0 29,28 0,28">
          <text:p/>
        </draw:polygon>
        <draw:polygon draw:style-name="gr269" draw:text-style-name="P267" draw:layer="layout" svg:width="0.027cm" svg:height="0.027cm" svg:x="6.227cm" svg:y="9.116cm" svg:viewBox="0 0 28 28" draw:points="0,0 28,0 28,28 0,28">
          <text:p/>
        </draw:polygon>
        <draw:polygon draw:style-name="gr269" draw:text-style-name="P267" draw:layer="layout" svg:width="0.027cm" svg:height="0.027cm" svg:x="6.28cm" svg:y="9.116cm" svg:viewBox="0 0 28 28" draw:points="0,0 28,0 28,28 0,28">
          <text:p/>
        </draw:polygon>
        <draw:polygon draw:style-name="gr269" draw:text-style-name="P267" draw:layer="layout" svg:width="0.027cm" svg:height="0.027cm" svg:x="6.333cm" svg:y="9.116cm" svg:viewBox="0 0 28 28" draw:points="0,0 28,0 28,28 0,28">
          <text:p/>
        </draw:polygon>
        <draw:polygon draw:style-name="gr269" draw:text-style-name="P267" draw:layer="layout" svg:width="0.026cm" svg:height="0.027cm" svg:x="6.387cm" svg:y="9.116cm" svg:viewBox="0 0 27 28" draw:points="0,0 27,0 27,28 0,28">
          <text:p/>
        </draw:polygon>
        <draw:polygon draw:style-name="gr269" draw:text-style-name="P267" draw:layer="layout" svg:width="0.026cm" svg:height="0.027cm" svg:x="6.44cm" svg:y="9.116cm" svg:viewBox="0 0 27 28" draw:points="0,0 27,0 27,28 0,28">
          <text:p/>
        </draw:polygon>
        <draw:polygon draw:style-name="gr269" draw:text-style-name="P267" draw:layer="layout" svg:width="0.026cm" svg:height="0.027cm" svg:x="6.493cm" svg:y="9.116cm" svg:viewBox="0 0 27 28" draw:points="0,0 27,0 27,28 0,28">
          <text:p/>
        </draw:polygon>
        <draw:polygon draw:style-name="gr269" draw:text-style-name="P267" draw:layer="layout" svg:width="0.026cm" svg:height="0.027cm" svg:x="6.546cm" svg:y="9.116cm" svg:viewBox="0 0 27 28" draw:points="0,0 27,0 27,28 0,28">
          <text:p/>
        </draw:polygon>
        <draw:polygon draw:style-name="gr269" draw:text-style-name="P267" draw:layer="layout" svg:width="0.026cm" svg:height="0.027cm" svg:x="6.599cm" svg:y="9.116cm" svg:viewBox="0 0 27 28" draw:points="0,0 27,0 27,28 0,28">
          <text:p/>
        </draw:polygon>
        <draw:polygon draw:style-name="gr269" draw:text-style-name="P267" draw:layer="layout" svg:width="0.026cm" svg:height="0.027cm" svg:x="6.652cm" svg:y="9.116cm" svg:viewBox="0 0 27 28" draw:points="0,0 27,0 27,28 0,28">
          <text:p/>
        </draw:polygon>
        <draw:polygon draw:style-name="gr269" draw:text-style-name="P267" draw:layer="layout" svg:width="0.026cm" svg:height="0.027cm" svg:x="6.705cm" svg:y="9.116cm" svg:viewBox="0 0 27 28" draw:points="0,0 27,0 27,28 0,28">
          <text:p/>
        </draw:polygon>
        <draw:polygon draw:style-name="gr269" draw:text-style-name="P267" draw:layer="layout" svg:width="0.026cm" svg:height="0.027cm" svg:x="6.758cm" svg:y="9.116cm" svg:viewBox="0 0 27 28" draw:points="0,0 27,0 27,28 0,28">
          <text:p/>
        </draw:polygon>
        <draw:polygon draw:style-name="gr269" draw:text-style-name="P267" draw:layer="layout" svg:width="0.026cm" svg:height="0.027cm" svg:x="6.811cm" svg:y="9.116cm" svg:viewBox="0 0 27 28" draw:points="0,0 27,0 27,28 0,28">
          <text:p/>
        </draw:polygon>
        <draw:polygon draw:style-name="gr269" draw:text-style-name="P267" draw:layer="layout" svg:width="0.026cm" svg:height="0.027cm" svg:x="6.864cm" svg:y="9.116cm" svg:viewBox="0 0 27 28" draw:points="0,0 27,0 27,28 0,28">
          <text:p/>
        </draw:polygon>
        <draw:polygon draw:style-name="gr269" draw:text-style-name="P267" draw:layer="layout" svg:width="0.026cm" svg:height="0.027cm" svg:x="6.917cm" svg:y="9.116cm" svg:viewBox="0 0 27 28" draw:points="0,0 27,0 27,28 0,28">
          <text:p/>
        </draw:polygon>
        <draw:polygon draw:style-name="gr269" draw:text-style-name="P267" draw:layer="layout" svg:width="0.026cm" svg:height="0.027cm" svg:x="6.97cm" svg:y="9.116cm" svg:viewBox="0 0 27 28" draw:points="0,0 27,0 27,28 0,28">
          <text:p/>
        </draw:polygon>
        <draw:polygon draw:style-name="gr269" draw:text-style-name="P267" draw:layer="layout" svg:width="0.026cm" svg:height="0.027cm" svg:x="7.023cm" svg:y="9.116cm" svg:viewBox="0 0 27 28" draw:points="0,0 27,0 27,28 0,28">
          <text:p/>
        </draw:polygon>
        <draw:polygon draw:style-name="gr269" draw:text-style-name="P267" draw:layer="layout" svg:width="0.026cm" svg:height="0.027cm" svg:x="7.076cm" svg:y="9.116cm" svg:viewBox="0 0 27 28" draw:points="0,0 27,0 27,28 0,28">
          <text:p/>
        </draw:polygon>
        <draw:polygon draw:style-name="gr269" draw:text-style-name="P267" draw:layer="layout" svg:width="0.026cm" svg:height="0.027cm" svg:x="7.129cm" svg:y="9.116cm" svg:viewBox="0 0 27 28" draw:points="0,0 27,0 27,28 0,28">
          <text:p/>
        </draw:polygon>
        <draw:polygon draw:style-name="gr269" draw:text-style-name="P267" draw:layer="layout" svg:width="0.026cm" svg:height="0.027cm" svg:x="7.182cm" svg:y="9.116cm" svg:viewBox="0 0 27 28" draw:points="0,0 27,0 27,28 0,28">
          <text:p/>
        </draw:polygon>
        <draw:polygon draw:style-name="gr269" draw:text-style-name="P267" draw:layer="layout" svg:width="0.026cm" svg:height="0.027cm" svg:x="7.235cm" svg:y="9.116cm" svg:viewBox="0 0 27 28" draw:points="0,0 27,0 27,28 0,28">
          <text:p/>
        </draw:polygon>
        <draw:polygon draw:style-name="gr269" draw:text-style-name="P267" draw:layer="layout" svg:width="0.026cm" svg:height="0.027cm" svg:x="7.288cm" svg:y="9.116cm" svg:viewBox="0 0 27 28" draw:points="0,0 27,0 27,28 0,28">
          <text:p/>
        </draw:polygon>
        <draw:polygon draw:style-name="gr269" draw:text-style-name="P267" draw:layer="layout" svg:width="0.026cm" svg:height="0.027cm" svg:x="7.341cm" svg:y="9.116cm" svg:viewBox="0 0 27 28" draw:points="0,0 27,0 27,28 0,28">
          <text:p/>
        </draw:polygon>
        <draw:polygon draw:style-name="gr269" draw:text-style-name="P267" draw:layer="layout" svg:width="0.026cm" svg:height="0.027cm" svg:x="7.394cm" svg:y="9.116cm" svg:viewBox="0 0 27 28" draw:points="0,0 27,0 27,28 0,28">
          <text:p/>
        </draw:polygon>
        <draw:polygon draw:style-name="gr269" draw:text-style-name="P267" draw:layer="layout" svg:width="0.026cm" svg:height="0.027cm" svg:x="7.447cm" svg:y="9.116cm" svg:viewBox="0 0 27 28" draw:points="0,0 27,0 27,28 0,28">
          <text:p/>
        </draw:polygon>
        <draw:polygon draw:style-name="gr269" draw:text-style-name="P267" draw:layer="layout" svg:width="0.026cm" svg:height="0.027cm" svg:x="7.5cm" svg:y="9.116cm" svg:viewBox="0 0 27 28" draw:points="0,0 27,0 27,28 0,28">
          <text:p/>
        </draw:polygon>
        <draw:polygon draw:style-name="gr269" draw:text-style-name="P267" draw:layer="layout" svg:width="0.026cm" svg:height="0.027cm" svg:x="7.553cm" svg:y="9.116cm" svg:viewBox="0 0 27 28" draw:points="0,0 27,0 27,28 0,28">
          <text:p/>
        </draw:polygon>
        <draw:polygon draw:style-name="gr269" draw:text-style-name="P267" draw:layer="layout" svg:width="0.026cm" svg:height="0.027cm" svg:x="7.606cm" svg:y="9.116cm" svg:viewBox="0 0 27 28" draw:points="0,0 27,0 27,28 0,28">
          <text:p/>
        </draw:polygon>
        <draw:polygon draw:style-name="gr269" draw:text-style-name="P267" draw:layer="layout" svg:width="0.026cm" svg:height="0.027cm" svg:x="7.659cm" svg:y="9.116cm" svg:viewBox="0 0 27 28" draw:points="0,0 27,0 27,28 0,28">
          <text:p/>
        </draw:polygon>
        <draw:polygon draw:style-name="gr269" draw:text-style-name="P267" draw:layer="layout" svg:width="0.026cm" svg:height="0.027cm" svg:x="7.712cm" svg:y="9.116cm" svg:viewBox="0 0 27 28" draw:points="0,0 27,0 27,28 0,28">
          <text:p/>
        </draw:polygon>
        <draw:polygon draw:style-name="gr269" draw:text-style-name="P267" draw:layer="layout" svg:width="0.026cm" svg:height="0.027cm" svg:x="7.765cm" svg:y="9.116cm" svg:viewBox="0 0 27 28" draw:points="0,0 27,0 27,28 0,28">
          <text:p/>
        </draw:polygon>
        <draw:polygon draw:style-name="gr269" draw:text-style-name="P267" draw:layer="layout" svg:width="0.026cm" svg:height="0.027cm" svg:x="7.818cm" svg:y="9.116cm" svg:viewBox="0 0 27 28" draw:points="0,0 27,0 27,28 0,28">
          <text:p/>
        </draw:polygon>
        <draw:polygon draw:style-name="gr269" draw:text-style-name="P267" draw:layer="layout" svg:width="0.026cm" svg:height="0.027cm" svg:x="7.871cm" svg:y="9.116cm" svg:viewBox="0 0 27 28" draw:points="0,0 27,0 27,28 0,28">
          <text:p/>
        </draw:polygon>
        <draw:polygon draw:style-name="gr269" draw:text-style-name="P267" draw:layer="layout" svg:width="0.026cm" svg:height="0.027cm" svg:x="7.924cm" svg:y="9.116cm" svg:viewBox="0 0 27 28" draw:points="0,0 27,0 27,28 0,28">
          <text:p/>
        </draw:polygon>
        <draw:polygon draw:style-name="gr269" draw:text-style-name="P267" draw:layer="layout" svg:width="0.026cm" svg:height="0.027cm" svg:x="7.977cm" svg:y="9.116cm" svg:viewBox="0 0 27 28" draw:points="0,0 27,0 27,28 0,28">
          <text:p/>
        </draw:polygon>
        <draw:polygon draw:style-name="gr269" draw:text-style-name="P267" draw:layer="layout" svg:width="0.026cm" svg:height="0.027cm" svg:x="8.03cm" svg:y="9.116cm" svg:viewBox="0 0 27 28" draw:points="0,0 27,0 27,28 0,28">
          <text:p/>
        </draw:polygon>
        <draw:polygon draw:style-name="gr269" draw:text-style-name="P267" draw:layer="layout" svg:width="0.026cm" svg:height="0.027cm" svg:x="8.083cm" svg:y="9.116cm" svg:viewBox="0 0 27 28" draw:points="0,0 27,0 27,28 0,28">
          <text:p/>
        </draw:polygon>
        <draw:polygon draw:style-name="gr269" draw:text-style-name="P267" draw:layer="layout" svg:width="0.026cm" svg:height="0.027cm" svg:x="8.136cm" svg:y="9.116cm" svg:viewBox="0 0 27 28" draw:points="0,0 27,0 27,28 0,28">
          <text:p/>
        </draw:polygon>
        <draw:polygon draw:style-name="gr269" draw:text-style-name="P267" draw:layer="layout" svg:width="0.026cm" svg:height="0.027cm" svg:x="8.189cm" svg:y="9.116cm" svg:viewBox="0 0 27 28" draw:points="0,0 27,0 27,28 0,28">
          <text:p/>
        </draw:polygon>
        <draw:polygon draw:style-name="gr269" draw:text-style-name="P267" draw:layer="layout" svg:width="0.026cm" svg:height="0.027cm" svg:x="8.242cm" svg:y="9.116cm" svg:viewBox="0 0 27 28" draw:points="0,0 27,0 27,28 0,28">
          <text:p/>
        </draw:polygon>
        <draw:polygon draw:style-name="gr269" draw:text-style-name="P267" draw:layer="layout" svg:width="0.026cm" svg:height="0.027cm" svg:x="8.295cm" svg:y="9.116cm" svg:viewBox="0 0 27 28" draw:points="0,0 27,0 27,28 0,28">
          <text:p/>
        </draw:polygon>
        <draw:polygon draw:style-name="gr269" draw:text-style-name="P267" draw:layer="layout" svg:width="0.026cm" svg:height="0.027cm" svg:x="8.348cm" svg:y="9.116cm" svg:viewBox="0 0 27 28" draw:points="0,0 27,0 27,28 0,28">
          <text:p/>
        </draw:polygon>
        <draw:polygon draw:style-name="gr269" draw:text-style-name="P267" draw:layer="layout" svg:width="0.026cm" svg:height="0.027cm" svg:x="8.401cm" svg:y="9.116cm" svg:viewBox="0 0 27 28" draw:points="0,0 27,0 27,28 0,28">
          <text:p/>
        </draw:polygon>
        <draw:polygon draw:style-name="gr269" draw:text-style-name="P267" draw:layer="layout" svg:width="0.026cm" svg:height="0.027cm" svg:x="8.454cm" svg:y="9.116cm" svg:viewBox="0 0 27 28" draw:points="0,0 27,0 27,28 0,28">
          <text:p/>
        </draw:polygon>
        <draw:polygon draw:style-name="gr269" draw:text-style-name="P267" draw:layer="layout" svg:width="0.026cm" svg:height="0.027cm" svg:x="8.507cm" svg:y="9.116cm" svg:viewBox="0 0 27 28" draw:points="0,0 27,0 27,28 0,28">
          <text:p/>
        </draw:polygon>
        <draw:polygon draw:style-name="gr269" draw:text-style-name="P267" draw:layer="layout" svg:width="0.026cm" svg:height="0.027cm" svg:x="8.56cm" svg:y="9.116cm" svg:viewBox="0 0 27 28" draw:points="0,0 27,0 27,28 0,28">
          <text:p/>
        </draw:polygon>
        <draw:polygon draw:style-name="gr269" draw:text-style-name="P267" draw:layer="layout" svg:width="0.026cm" svg:height="0.027cm" svg:x="8.613cm" svg:y="9.116cm" svg:viewBox="0 0 27 28" draw:points="0,0 27,0 27,28 0,28">
          <text:p/>
        </draw:polygon>
        <draw:polygon draw:style-name="gr269" draw:text-style-name="P267" draw:layer="layout" svg:width="0.026cm" svg:height="0.027cm" svg:x="8.666cm" svg:y="9.116cm" svg:viewBox="0 0 27 28" draw:points="0,0 27,0 27,28 0,28">
          <text:p/>
        </draw:polygon>
        <draw:polygon draw:style-name="gr269" draw:text-style-name="P267" draw:layer="layout" svg:width="0.026cm" svg:height="0.027cm" svg:x="8.719cm" svg:y="9.116cm" svg:viewBox="0 0 27 28" draw:points="0,0 27,0 27,28 0,28">
          <text:p/>
        </draw:polygon>
        <draw:polygon draw:style-name="gr269" draw:text-style-name="P267" draw:layer="layout" svg:width="0.026cm" svg:height="0.027cm" svg:x="8.772cm" svg:y="9.116cm" svg:viewBox="0 0 27 28" draw:points="0,0 27,0 27,28 0,28">
          <text:p/>
        </draw:polygon>
        <draw:polygon draw:style-name="gr269" draw:text-style-name="P267" draw:layer="layout" svg:width="0.026cm" svg:height="0.027cm" svg:x="8.825cm" svg:y="9.116cm" svg:viewBox="0 0 27 28" draw:points="0,0 27,0 27,28 0,28">
          <text:p/>
        </draw:polygon>
        <draw:polygon draw:style-name="gr269" draw:text-style-name="P267" draw:layer="layout" svg:width="0.026cm" svg:height="0.027cm" svg:x="8.878cm" svg:y="9.116cm" svg:viewBox="0 0 27 28" draw:points="0,0 27,0 27,28 0,28">
          <text:p/>
        </draw:polygon>
        <draw:polygon draw:style-name="gr269" draw:text-style-name="P267" draw:layer="layout" svg:width="0.026cm" svg:height="0.027cm" svg:x="8.931cm" svg:y="9.116cm" svg:viewBox="0 0 27 28" draw:points="0,0 27,0 27,28 0,28">
          <text:p/>
        </draw:polygon>
        <draw:polygon draw:style-name="gr269" draw:text-style-name="P267" draw:layer="layout" svg:width="0.026cm" svg:height="0.027cm" svg:x="8.984cm" svg:y="9.116cm" svg:viewBox="0 0 27 28" draw:points="0,0 27,0 27,28 0,28">
          <text:p/>
        </draw:polygon>
        <draw:polygon draw:style-name="gr269" draw:text-style-name="P267" draw:layer="layout" svg:width="0.026cm" svg:height="0.027cm" svg:x="9.037cm" svg:y="9.116cm" svg:viewBox="0 0 27 28" draw:points="0,0 27,0 27,28 0,28">
          <text:p/>
        </draw:polygon>
        <draw:polygon draw:style-name="gr269" draw:text-style-name="P267" draw:layer="layout" svg:width="0.026cm" svg:height="0.027cm" svg:x="9.09cm" svg:y="9.116cm" svg:viewBox="0 0 27 28" draw:points="0,0 27,0 27,28 0,28">
          <text:p/>
        </draw:polygon>
        <draw:polygon draw:style-name="gr269" draw:text-style-name="P267" draw:layer="layout" svg:width="0.026cm" svg:height="0.027cm" svg:x="9.143cm" svg:y="9.116cm" svg:viewBox="0 0 27 28" draw:points="0,0 27,0 27,28 0,28">
          <text:p/>
        </draw:polygon>
        <draw:polygon draw:style-name="gr269" draw:text-style-name="P267" draw:layer="layout" svg:width="0.026cm" svg:height="0.027cm" svg:x="9.196cm" svg:y="9.116cm" svg:viewBox="0 0 27 28" draw:points="0,0 27,0 27,28 0,28">
          <text:p/>
        </draw:polygon>
        <draw:polygon draw:style-name="gr269" draw:text-style-name="P267" draw:layer="layout" svg:width="0.026cm" svg:height="0.027cm" svg:x="9.249cm" svg:y="9.116cm" svg:viewBox="0 0 27 28" draw:points="0,0 27,0 27,28 0,28">
          <text:p/>
        </draw:polygon>
        <draw:polygon draw:style-name="gr269" draw:text-style-name="P267" draw:layer="layout" svg:width="0.026cm" svg:height="0.027cm" svg:x="9.302cm" svg:y="9.116cm" svg:viewBox="0 0 27 28" draw:points="0,0 27,0 27,28 0,28">
          <text:p/>
        </draw:polygon>
        <draw:polygon draw:style-name="gr269" draw:text-style-name="P267" draw:layer="layout" svg:width="0.026cm" svg:height="0.027cm" svg:x="9.355cm" svg:y="9.116cm" svg:viewBox="0 0 27 28" draw:points="0,0 27,0 27,28 0,28">
          <text:p/>
        </draw:polygon>
        <draw:polygon draw:style-name="gr269" draw:text-style-name="P267" draw:layer="layout" svg:width="0.026cm" svg:height="0.027cm" svg:x="9.408cm" svg:y="9.116cm" svg:viewBox="0 0 27 28" draw:points="0,0 27,0 27,28 0,28">
          <text:p/>
        </draw:polygon>
        <draw:polygon draw:style-name="gr269" draw:text-style-name="P267" draw:layer="layout" svg:width="0.026cm" svg:height="0.027cm" svg:x="9.461cm" svg:y="9.116cm" svg:viewBox="0 0 27 28" draw:points="0,0 27,0 27,28 0,28">
          <text:p/>
        </draw:polygon>
        <draw:polygon draw:style-name="gr269" draw:text-style-name="P267" draw:layer="layout" svg:width="0.026cm" svg:height="0.027cm" svg:x="9.514cm" svg:y="9.116cm" svg:viewBox="0 0 27 28" draw:points="0,0 27,0 27,28 0,28">
          <text:p/>
        </draw:polygon>
        <draw:polygon draw:style-name="gr269" draw:text-style-name="P267" draw:layer="layout" svg:width="0.026cm" svg:height="0.027cm" svg:x="9.567cm" svg:y="9.116cm" svg:viewBox="0 0 27 28" draw:points="0,0 27,0 27,28 0,28">
          <text:p/>
        </draw:polygon>
        <draw:polygon draw:style-name="gr269" draw:text-style-name="P267" draw:layer="layout" svg:width="0.026cm" svg:height="0.027cm" svg:x="9.62cm" svg:y="9.116cm" svg:viewBox="0 0 27 28" draw:points="0,0 27,0 27,28 0,28">
          <text:p/>
        </draw:polygon>
        <draw:polygon draw:style-name="gr269" draw:text-style-name="P267" draw:layer="layout" svg:width="0.026cm" svg:height="0.027cm" svg:x="9.673cm" svg:y="9.116cm" svg:viewBox="0 0 27 28" draw:points="0,0 27,0 27,28 0,28">
          <text:p/>
        </draw:polygon>
        <draw:polygon draw:style-name="gr269" draw:text-style-name="P267" draw:layer="layout" svg:width="0.026cm" svg:height="0.027cm" svg:x="9.726cm" svg:y="9.116cm" svg:viewBox="0 0 27 28" draw:points="0,0 27,0 27,28 0,28">
          <text:p/>
        </draw:polygon>
        <draw:polygon draw:style-name="gr269" draw:text-style-name="P267" draw:layer="layout" svg:width="0.026cm" svg:height="0.027cm" svg:x="9.779cm" svg:y="9.116cm" svg:viewBox="0 0 27 28" draw:points="0,0 27,0 27,28 0,28">
          <text:p/>
        </draw:polygon>
        <draw:polygon draw:style-name="gr269" draw:text-style-name="P267" draw:layer="layout" svg:width="0.026cm" svg:height="0.027cm" svg:x="9.832cm" svg:y="9.116cm" svg:viewBox="0 0 27 28" draw:points="0,0 27,0 27,28 0,28">
          <text:p/>
        </draw:polygon>
        <draw:polygon draw:style-name="gr269" draw:text-style-name="P267" draw:layer="layout" svg:width="0.026cm" svg:height="0.027cm" svg:x="9.885cm" svg:y="9.116cm" svg:viewBox="0 0 27 28" draw:points="0,0 27,0 27,28 0,28">
          <text:p/>
        </draw:polygon>
        <draw:polygon draw:style-name="gr269" draw:text-style-name="P267" draw:layer="layout" svg:width="0.026cm" svg:height="0.027cm" svg:x="9.938cm" svg:y="9.116cm" svg:viewBox="0 0 27 28" draw:points="0,0 27,0 27,28 0,28">
          <text:p/>
        </draw:polygon>
        <draw:polygon draw:style-name="gr269" draw:text-style-name="P267" draw:layer="layout" svg:width="0.026cm" svg:height="0.027cm" svg:x="9.991cm" svg:y="9.116cm" svg:viewBox="0 0 27 28" draw:points="0,0 27,0 27,28 0,28">
          <text:p/>
        </draw:polygon>
        <draw:polygon draw:style-name="gr269" draw:text-style-name="P267" draw:layer="layout" svg:width="0.026cm" svg:height="0.027cm" svg:x="10.044cm" svg:y="9.116cm" svg:viewBox="0 0 27 28" draw:points="0,0 27,0 27,28 0,28">
          <text:p/>
        </draw:polygon>
        <draw:polygon draw:style-name="gr269" draw:text-style-name="P267" draw:layer="layout" svg:width="0.026cm" svg:height="0.027cm" svg:x="10.097cm" svg:y="9.116cm" svg:viewBox="0 0 27 28" draw:points="0,0 27,0 27,28 0,28">
          <text:p/>
        </draw:polygon>
        <draw:polygon draw:style-name="gr269" draw:text-style-name="P267" draw:layer="layout" svg:width="0.026cm" svg:height="0.027cm" svg:x="10.15cm" svg:y="9.116cm" svg:viewBox="0 0 27 28" draw:points="0,0 27,0 27,28 0,28">
          <text:p/>
        </draw:polygon>
        <draw:polygon draw:style-name="gr269" draw:text-style-name="P267" draw:layer="layout" svg:width="0.026cm" svg:height="0.027cm" svg:x="10.203cm" svg:y="9.116cm" svg:viewBox="0 0 27 28" draw:points="0,0 27,0 27,28 0,28">
          <text:p/>
        </draw:polygon>
        <draw:polygon draw:style-name="gr269" draw:text-style-name="P267" draw:layer="layout" svg:width="0.026cm" svg:height="0.027cm" svg:x="10.256cm" svg:y="9.116cm" svg:viewBox="0 0 27 28" draw:points="0,0 27,0 27,28 0,28">
          <text:p/>
        </draw:polygon>
        <draw:polygon draw:style-name="gr269" draw:text-style-name="P267" draw:layer="layout" svg:width="0.026cm" svg:height="0.027cm" svg:x="10.309cm" svg:y="9.116cm" svg:viewBox="0 0 27 28" draw:points="0,0 27,0 27,28 0,28">
          <text:p/>
        </draw:polygon>
        <draw:polygon draw:style-name="gr269" draw:text-style-name="P267" draw:layer="layout" svg:width="0.026cm" svg:height="0.027cm" svg:x="10.362cm" svg:y="9.116cm" svg:viewBox="0 0 27 28" draw:points="0,0 27,0 27,28 0,28">
          <text:p/>
        </draw:polygon>
        <draw:polygon draw:style-name="gr269" draw:text-style-name="P267" draw:layer="layout" svg:width="0.026cm" svg:height="0.027cm" svg:x="10.415cm" svg:y="9.116cm" svg:viewBox="0 0 27 28" draw:points="0,0 27,0 27,28 0,28">
          <text:p/>
        </draw:polygon>
        <draw:polygon draw:style-name="gr269" draw:text-style-name="P267" draw:layer="layout" svg:width="0.026cm" svg:height="0.027cm" svg:x="10.468cm" svg:y="9.116cm" svg:viewBox="0 0 27 28" draw:points="0,0 27,0 27,28 0,28">
          <text:p/>
        </draw:polygon>
        <draw:polygon draw:style-name="gr269" draw:text-style-name="P267" draw:layer="layout" svg:width="0.026cm" svg:height="0.027cm" svg:x="10.521cm" svg:y="9.116cm" svg:viewBox="0 0 27 28" draw:points="0,0 27,0 27,28 0,28">
          <text:p/>
        </draw:polygon>
        <draw:polygon draw:style-name="gr269" draw:text-style-name="P267" draw:layer="layout" svg:width="0.026cm" svg:height="0.027cm" svg:x="10.574cm" svg:y="9.116cm" svg:viewBox="0 0 27 28" draw:points="0,0 27,0 27,28 0,28">
          <text:p/>
        </draw:polygon>
        <draw:polygon draw:style-name="gr269" draw:text-style-name="P267" draw:layer="layout" svg:width="0.026cm" svg:height="0.027cm" svg:x="10.627cm" svg:y="9.116cm" svg:viewBox="0 0 27 28" draw:points="0,0 27,0 27,28 0,28">
          <text:p/>
        </draw:polygon>
        <draw:polygon draw:style-name="gr269" draw:text-style-name="P267" draw:layer="layout" svg:width="0.026cm" svg:height="0.027cm" svg:x="10.68cm" svg:y="9.116cm" svg:viewBox="0 0 27 28" draw:points="0,0 27,0 27,28 0,28">
          <text:p/>
        </draw:polygon>
        <draw:polygon draw:style-name="gr269" draw:text-style-name="P267" draw:layer="layout" svg:width="0.026cm" svg:height="0.027cm" svg:x="10.733cm" svg:y="9.116cm" svg:viewBox="0 0 27 28" draw:points="0,0 27,0 27,28 0,28">
          <text:p/>
        </draw:polygon>
        <draw:polygon draw:style-name="gr269" draw:text-style-name="P267" draw:layer="layout" svg:width="0.026cm" svg:height="0.027cm" svg:x="10.786cm" svg:y="9.116cm" svg:viewBox="0 0 27 28" draw:points="0,0 27,0 27,28 0,28">
          <text:p/>
        </draw:polygon>
        <draw:polygon draw:style-name="gr269" draw:text-style-name="P267" draw:layer="layout" svg:width="0.026cm" svg:height="0.027cm" svg:x="10.839cm" svg:y="9.116cm" svg:viewBox="0 0 27 28" draw:points="0,0 27,0 27,28 0,28">
          <text:p/>
        </draw:polygon>
        <draw:polygon draw:style-name="gr269" draw:text-style-name="P267" draw:layer="layout" svg:width="0.026cm" svg:height="0.027cm" svg:x="10.892cm" svg:y="9.116cm" svg:viewBox="0 0 27 28" draw:points="0,0 27,0 27,28 0,28">
          <text:p/>
        </draw:polygon>
        <draw:polygon draw:style-name="gr269" draw:text-style-name="P267" draw:layer="layout" svg:width="0.026cm" svg:height="0.027cm" svg:x="10.945cm" svg:y="9.116cm" svg:viewBox="0 0 27 28" draw:points="0,0 27,0 27,28 0,28">
          <text:p/>
        </draw:polygon>
        <draw:polygon draw:style-name="gr269" draw:text-style-name="P267" draw:layer="layout" svg:width="0.026cm" svg:height="0.027cm" svg:x="10.998cm" svg:y="9.116cm" svg:viewBox="0 0 27 28" draw:points="0,0 27,0 27,28 0,28">
          <text:p/>
        </draw:polygon>
        <draw:polygon draw:style-name="gr269" draw:text-style-name="P267" draw:layer="layout" svg:width="0.026cm" svg:height="0.027cm" svg:x="11.051cm" svg:y="9.116cm" svg:viewBox="0 0 27 28" draw:points="0,0 27,0 27,28 0,28">
          <text:p/>
        </draw:polygon>
        <draw:polygon draw:style-name="gr269" draw:text-style-name="P267" draw:layer="layout" svg:width="0.026cm" svg:height="0.027cm" svg:x="11.104cm" svg:y="9.116cm" svg:viewBox="0 0 27 28" draw:points="0,0 27,0 27,28 0,28">
          <text:p/>
        </draw:polygon>
        <draw:polygon draw:style-name="gr269" draw:text-style-name="P267" draw:layer="layout" svg:width="0.026cm" svg:height="0.027cm" svg:x="11.157cm" svg:y="9.116cm" svg:viewBox="0 0 27 28" draw:points="0,0 27,0 27,28 0,28">
          <text:p/>
        </draw:polygon>
        <draw:polygon draw:style-name="gr269" draw:text-style-name="P267" draw:layer="layout" svg:width="0.026cm" svg:height="0.027cm" svg:x="11.21cm" svg:y="9.116cm" svg:viewBox="0 0 27 28" draw:points="0,0 27,0 27,28 0,28">
          <text:p/>
        </draw:polygon>
        <draw:polygon draw:style-name="gr269" draw:text-style-name="P267" draw:layer="layout" svg:width="0.026cm" svg:height="0.027cm" svg:x="11.263cm" svg:y="9.116cm" svg:viewBox="0 0 27 28" draw:points="0,0 27,0 27,28 0,28">
          <text:p/>
        </draw:polygon>
        <draw:polygon draw:style-name="gr269" draw:text-style-name="P267" draw:layer="layout" svg:width="0.026cm" svg:height="0.027cm" svg:x="11.316cm" svg:y="9.116cm" svg:viewBox="0 0 27 28" draw:points="0,0 27,0 27,28 0,28">
          <text:p/>
        </draw:polygon>
        <draw:polygon draw:style-name="gr269" draw:text-style-name="P267" draw:layer="layout" svg:width="0.026cm" svg:height="0.027cm" svg:x="11.369cm" svg:y="9.116cm" svg:viewBox="0 0 27 28" draw:points="0,0 27,0 27,28 0,28">
          <text:p/>
        </draw:polygon>
        <draw:polygon draw:style-name="gr269" draw:text-style-name="P267" draw:layer="layout" svg:width="0.026cm" svg:height="0.027cm" svg:x="11.422cm" svg:y="9.116cm" svg:viewBox="0 0 27 28" draw:points="0,0 27,0 27,28 0,28">
          <text:p/>
        </draw:polygon>
        <draw:polygon draw:style-name="gr269" draw:text-style-name="P267" draw:layer="layout" svg:width="0.026cm" svg:height="0.027cm" svg:x="11.475cm" svg:y="9.116cm" svg:viewBox="0 0 27 28" draw:points="0,0 27,0 27,28 0,28">
          <text:p/>
        </draw:polygon>
        <draw:polygon draw:style-name="gr269" draw:text-style-name="P267" draw:layer="layout" svg:width="0.026cm" svg:height="0.027cm" svg:x="11.528cm" svg:y="9.116cm" svg:viewBox="0 0 27 28" draw:points="0,0 27,0 27,28 0,28">
          <text:p/>
        </draw:polygon>
        <draw:polygon draw:style-name="gr269" draw:text-style-name="P267" draw:layer="layout" svg:width="0.026cm" svg:height="0.027cm" svg:x="11.581cm" svg:y="9.116cm" svg:viewBox="0 0 27 28" draw:points="0,0 27,0 27,28 0,28">
          <text:p/>
        </draw:polygon>
        <draw:polygon draw:style-name="gr269" draw:text-style-name="P267" draw:layer="layout" svg:width="0.026cm" svg:height="0.027cm" svg:x="11.634cm" svg:y="9.116cm" svg:viewBox="0 0 27 28" draw:points="0,0 27,0 27,28 0,28">
          <text:p/>
        </draw:polygon>
        <draw:polygon draw:style-name="gr269" draw:text-style-name="P267" draw:layer="layout" svg:width="0.026cm" svg:height="0.027cm" svg:x="11.687cm" svg:y="9.116cm" svg:viewBox="0 0 27 28" draw:points="0,0 27,0 27,28 0,28">
          <text:p/>
        </draw:polygon>
        <draw:polygon draw:style-name="gr269" draw:text-style-name="P267" draw:layer="layout" svg:width="0.026cm" svg:height="0.027cm" svg:x="11.74cm" svg:y="9.116cm" svg:viewBox="0 0 27 28" draw:points="0,0 27,0 27,28 0,28">
          <text:p/>
        </draw:polygon>
        <draw:polygon draw:style-name="gr269" draw:text-style-name="P267" draw:layer="layout" svg:width="0.026cm" svg:height="0.027cm" svg:x="11.793cm" svg:y="9.116cm" svg:viewBox="0 0 27 28" draw:points="0,0 27,0 27,28 0,28">
          <text:p/>
        </draw:polygon>
        <draw:polygon draw:style-name="gr269" draw:text-style-name="P267" draw:layer="layout" svg:width="0.026cm" svg:height="0.027cm" svg:x="11.846cm" svg:y="9.116cm" svg:viewBox="0 0 27 28" draw:points="0,0 27,0 27,28 0,28">
          <text:p/>
        </draw:polygon>
        <draw:polygon draw:style-name="gr269" draw:text-style-name="P267" draw:layer="layout" svg:width="0.026cm" svg:height="0.027cm" svg:x="11.899cm" svg:y="9.116cm" svg:viewBox="0 0 27 28" draw:points="0,0 27,0 27,28 0,28">
          <text:p/>
        </draw:polygon>
        <draw:polygon draw:style-name="gr269" draw:text-style-name="P267" draw:layer="layout" svg:width="0.026cm" svg:height="0.027cm" svg:x="11.952cm" svg:y="9.116cm" svg:viewBox="0 0 27 28" draw:points="0,0 27,0 27,28 0,28">
          <text:p/>
        </draw:polygon>
        <draw:polygon draw:style-name="gr269" draw:text-style-name="P267" draw:layer="layout" svg:width="0.026cm" svg:height="0.027cm" svg:x="12.005cm" svg:y="9.116cm" svg:viewBox="0 0 27 28" draw:points="0,0 27,0 27,28 0,28">
          <text:p/>
        </draw:polygon>
        <draw:polygon draw:style-name="gr269" draw:text-style-name="P267" draw:layer="layout" svg:width="0.026cm" svg:height="0.027cm" svg:x="12.058cm" svg:y="9.116cm" svg:viewBox="0 0 27 28" draw:points="0,0 27,0 27,28 0,28">
          <text:p/>
        </draw:polygon>
        <draw:polygon draw:style-name="gr269" draw:text-style-name="P267" draw:layer="layout" svg:width="0.026cm" svg:height="0.027cm" svg:x="12.111cm" svg:y="9.116cm" svg:viewBox="0 0 27 28" draw:points="0,0 27,0 27,28 0,28">
          <text:p/>
        </draw:polygon>
        <draw:polygon draw:style-name="gr269" draw:text-style-name="P267" draw:layer="layout" svg:width="0.026cm" svg:height="0.027cm" svg:x="12.164cm" svg:y="9.116cm" svg:viewBox="0 0 27 28" draw:points="0,0 27,0 27,28 0,28">
          <text:p/>
        </draw:polygon>
        <draw:polygon draw:style-name="gr269" draw:text-style-name="P267" draw:layer="layout" svg:width="0.026cm" svg:height="0.027cm" svg:x="12.217cm" svg:y="9.116cm" svg:viewBox="0 0 27 28" draw:points="0,0 27,0 27,28 0,28">
          <text:p/>
        </draw:polygon>
        <draw:polygon draw:style-name="gr269" draw:text-style-name="P267" draw:layer="layout" svg:width="0.026cm" svg:height="0.027cm" svg:x="12.27cm" svg:y="9.116cm" svg:viewBox="0 0 27 28" draw:points="0,0 27,0 27,28 0,28">
          <text:p/>
        </draw:polygon>
        <draw:polygon draw:style-name="gr269" draw:text-style-name="P267" draw:layer="layout" svg:width="0.026cm" svg:height="0.027cm" svg:x="12.323cm" svg:y="9.116cm" svg:viewBox="0 0 27 28" draw:points="0,0 27,0 27,28 0,28">
          <text:p/>
        </draw:polygon>
        <draw:polygon draw:style-name="gr269" draw:text-style-name="P267" draw:layer="layout" svg:width="0.026cm" svg:height="0.027cm" svg:x="12.376cm" svg:y="9.116cm" svg:viewBox="0 0 27 28" draw:points="0,0 27,0 27,28 0,28">
          <text:p/>
        </draw:polygon>
        <draw:polygon draw:style-name="gr269" draw:text-style-name="P267" draw:layer="layout" svg:width="0.026cm" svg:height="0.027cm" svg:x="12.429cm" svg:y="9.116cm" svg:viewBox="0 0 27 28" draw:points="0,0 27,0 27,28 0,28">
          <text:p/>
        </draw:polygon>
        <draw:polygon draw:style-name="gr269" draw:text-style-name="P267" draw:layer="layout" svg:width="0.026cm" svg:height="0.027cm" svg:x="12.482cm" svg:y="9.116cm" svg:viewBox="0 0 27 28" draw:points="0,0 27,0 27,28 0,28">
          <text:p/>
        </draw:polygon>
        <draw:polygon draw:style-name="gr269" draw:text-style-name="P267" draw:layer="layout" svg:width="0.026cm" svg:height="0.027cm" svg:x="12.535cm" svg:y="9.116cm" svg:viewBox="0 0 27 28" draw:points="0,0 27,0 27,28 0,28">
          <text:p/>
        </draw:polygon>
        <draw:polygon draw:style-name="gr269" draw:text-style-name="P267" draw:layer="layout" svg:width="0.026cm" svg:height="0.027cm" svg:x="12.588cm" svg:y="9.116cm" svg:viewBox="0 0 27 28" draw:points="0,0 27,0 27,28 0,28">
          <text:p/>
        </draw:polygon>
        <draw:polygon draw:style-name="gr269" draw:text-style-name="P267" draw:layer="layout" svg:width="0.026cm" svg:height="0.027cm" svg:x="12.641cm" svg:y="9.116cm" svg:viewBox="0 0 27 28" draw:points="0,0 27,0 27,28 0,28">
          <text:p/>
        </draw:polygon>
        <draw:polygon draw:style-name="gr269" draw:text-style-name="P267" draw:layer="layout" svg:width="0.027cm" svg:height="0.027cm" svg:x="12.694cm" svg:y="9.116cm" svg:viewBox="0 0 28 28" draw:points="0,0 28,0 28,28 0,28">
          <text:p/>
        </draw:polygon>
        <draw:polygon draw:style-name="gr269" draw:text-style-name="P267" draw:layer="layout" svg:width="0.027cm" svg:height="0.027cm" svg:x="12.747cm" svg:y="9.116cm" svg:viewBox="0 0 28 28" draw:points="0,0 28,0 28,28 0,28">
          <text:p/>
        </draw:polygon>
        <draw:polygon draw:style-name="gr269" draw:text-style-name="P267" draw:layer="layout" svg:width="0.027cm" svg:height="0.027cm" svg:x="12.8cm" svg:y="9.116cm" svg:viewBox="0 0 28 28" draw:points="0,0 28,0 28,28 0,28">
          <text:p/>
        </draw:polygon>
        <draw:polygon draw:style-name="gr269" draw:text-style-name="P267" draw:layer="layout" svg:width="0.027cm" svg:height="0.027cm" svg:x="12.853cm" svg:y="9.116cm" svg:viewBox="0 0 28 28" draw:points="0,0 28,0 28,28 0,28">
          <text:p/>
        </draw:polygon>
        <draw:polygon draw:style-name="gr269" draw:text-style-name="P267" draw:layer="layout" svg:width="0.027cm" svg:height="0.027cm" svg:x="12.906cm" svg:y="9.116cm" svg:viewBox="0 0 28 28" draw:points="0,0 28,0 28,28 0,28">
          <text:p/>
        </draw:polygon>
        <draw:polygon draw:style-name="gr269" draw:text-style-name="P267" draw:layer="layout" svg:width="0.027cm" svg:height="0.027cm" svg:x="12.959cm" svg:y="9.116cm" svg:viewBox="0 0 28 28" draw:points="0,0 28,0 28,28 0,28">
          <text:p/>
        </draw:polygon>
        <draw:polygon draw:style-name="gr269" draw:text-style-name="P267" draw:layer="layout" svg:width="0.028cm" svg:height="0.027cm" svg:x="13.012cm" svg:y="9.116cm" svg:viewBox="0 0 29 28" draw:points="0,0 29,0 29,28 0,28">
          <text:p/>
        </draw:polygon>
        <draw:polygon draw:style-name="gr269" draw:text-style-name="P267" draw:layer="layout" svg:width="0.027cm" svg:height="0.027cm" svg:x="13.065cm" svg:y="9.116cm" svg:viewBox="0 0 28 28" draw:points="0,0 28,0 28,28 0,28">
          <text:p/>
        </draw:polygon>
        <draw:polygon draw:style-name="gr269" draw:text-style-name="P267" draw:layer="layout" svg:width="0.027cm" svg:height="0.027cm" svg:x="13.118cm" svg:y="9.116cm" svg:viewBox="0 0 28 28" draw:points="0,0 28,0 28,28 0,28">
          <text:p/>
        </draw:polygon>
        <draw:polygon draw:style-name="gr269" draw:text-style-name="P267" draw:layer="layout" svg:width="0.027cm" svg:height="0.027cm" svg:x="13.171cm" svg:y="9.116cm" svg:viewBox="0 0 28 28" draw:points="0,0 28,0 28,28 0,28">
          <text:p/>
        </draw:polygon>
        <draw:polygon draw:style-name="gr269" draw:text-style-name="P267" draw:layer="layout" svg:width="0.027cm" svg:height="0.027cm" svg:x="13.224cm" svg:y="9.116cm" svg:viewBox="0 0 28 28" draw:points="0,0 28,0 28,28 0,28">
          <text:p/>
        </draw:polygon>
        <draw:polygon draw:style-name="gr269" draw:text-style-name="P267" draw:layer="layout" svg:width="0.027cm" svg:height="0.027cm" svg:x="13.277cm" svg:y="9.116cm" svg:viewBox="0 0 28 28" draw:points="0,0 28,0 28,28 0,28">
          <text:p/>
        </draw:polygon>
        <draw:polygon draw:style-name="gr269" draw:text-style-name="P267" draw:layer="layout" svg:width="0.027cm" svg:height="0.027cm" svg:x="13.33cm" svg:y="9.116cm" svg:viewBox="0 0 28 28" draw:points="0,0 28,0 28,28 0,28">
          <text:p/>
        </draw:polygon>
        <draw:polygon draw:style-name="gr269" draw:text-style-name="P267" draw:layer="layout" svg:width="0.027cm" svg:height="0.027cm" svg:x="13.383cm" svg:y="9.116cm" svg:viewBox="0 0 28 28" draw:points="0,0 28,0 28,28 0,28">
          <text:p/>
        </draw:polygon>
        <draw:polygon draw:style-name="gr269" draw:text-style-name="P267" draw:layer="layout" svg:width="0.027cm" svg:height="0.027cm" svg:x="13.436cm" svg:y="9.116cm" svg:viewBox="0 0 28 28" draw:points="0,0 28,0 28,28 0,28">
          <text:p/>
        </draw:polygon>
        <draw:polygon draw:style-name="gr269" draw:text-style-name="P267" draw:layer="layout" svg:width="0.027cm" svg:height="0.027cm" svg:x="13.489cm" svg:y="9.116cm" svg:viewBox="0 0 28 28" draw:points="0,0 28,0 28,28 0,28">
          <text:p/>
        </draw:polygon>
        <draw:polygon draw:style-name="gr269" draw:text-style-name="P267" draw:layer="layout" svg:width="0.027cm" svg:height="0.027cm" svg:x="13.542cm" svg:y="9.116cm" svg:viewBox="0 0 28 28" draw:points="0,0 28,0 28,28 0,28">
          <text:p/>
        </draw:polygon>
        <draw:polygon draw:style-name="gr269" draw:text-style-name="P267" draw:layer="layout" svg:width="0.027cm" svg:height="0.027cm" svg:x="13.595cm" svg:y="9.116cm" svg:viewBox="0 0 28 28" draw:points="0,0 28,0 28,28 0,28">
          <text:p/>
        </draw:polygon>
        <draw:polygon draw:style-name="gr269" draw:text-style-name="P267" draw:layer="layout" svg:width="0.027cm" svg:height="0.027cm" svg:x="13.648cm" svg:y="9.116cm" svg:viewBox="0 0 28 28" draw:points="0,0 28,0 28,28 0,28">
          <text:p/>
        </draw:polygon>
        <draw:polygon draw:style-name="gr269" draw:text-style-name="P267" draw:layer="layout" svg:width="0.027cm" svg:height="0.027cm" svg:x="13.701cm" svg:y="9.116cm" svg:viewBox="0 0 28 28" draw:points="0,0 28,0 28,28 0,28">
          <text:p/>
        </draw:polygon>
        <draw:polygon draw:style-name="gr269" draw:text-style-name="P267" draw:layer="layout" svg:width="0.027cm" svg:height="0.027cm" svg:x="13.754cm" svg:y="9.116cm" svg:viewBox="0 0 28 28" draw:points="0,0 28,0 28,28 0,28">
          <text:p/>
        </draw:polygon>
        <draw:polygon draw:style-name="gr269" draw:text-style-name="P267" draw:layer="layout" svg:width="0.027cm" svg:height="0.027cm" svg:x="13.807cm" svg:y="9.116cm" svg:viewBox="0 0 28 28" draw:points="0,0 28,0 28,28 0,28">
          <text:p/>
        </draw:polygon>
        <draw:polygon draw:style-name="gr269" draw:text-style-name="P267" draw:layer="layout" svg:width="0.027cm" svg:height="0.027cm" svg:x="13.86cm" svg:y="9.116cm" svg:viewBox="0 0 28 28" draw:points="0,0 28,0 28,28 0,28">
          <text:p/>
        </draw:polygon>
        <draw:polygon draw:style-name="gr269" draw:text-style-name="P267" draw:layer="layout" svg:width="0.027cm" svg:height="0.027cm" svg:x="13.913cm" svg:y="9.116cm" svg:viewBox="0 0 28 28" draw:points="0,0 28,0 28,28 0,28">
          <text:p/>
        </draw:polygon>
        <draw:polygon draw:style-name="gr269" draw:text-style-name="P267" draw:layer="layout" svg:width="0.027cm" svg:height="0.027cm" svg:x="13.966cm" svg:y="9.116cm" svg:viewBox="0 0 28 28" draw:points="0,0 28,0 28,28 0,28">
          <text:p/>
        </draw:polygon>
        <draw:polygon draw:style-name="gr269" draw:text-style-name="P267" draw:layer="layout" svg:width="0.027cm" svg:height="0.027cm" svg:x="14.019cm" svg:y="9.116cm" svg:viewBox="0 0 28 28" draw:points="0,0 28,0 28,28 0,28">
          <text:p/>
        </draw:polygon>
        <draw:polygon draw:style-name="gr269" draw:text-style-name="P267" draw:layer="layout" svg:width="0.027cm" svg:height="0.027cm" svg:x="14.072cm" svg:y="9.116cm" svg:viewBox="0 0 28 28" draw:points="0,0 28,0 28,28 0,28">
          <text:p/>
        </draw:polygon>
        <draw:polygon draw:style-name="gr269" draw:text-style-name="P267" draw:layer="layout" svg:width="0.027cm" svg:height="0.027cm" svg:x="14.125cm" svg:y="9.116cm" svg:viewBox="0 0 28 28" draw:points="0,0 28,0 28,28 0,28">
          <text:p/>
        </draw:polygon>
        <draw:polygon draw:style-name="gr269" draw:text-style-name="P267" draw:layer="layout" svg:width="0.027cm" svg:height="0.027cm" svg:x="14.178cm" svg:y="9.116cm" svg:viewBox="0 0 28 28" draw:points="0,0 28,0 28,28 0,28">
          <text:p/>
        </draw:polygon>
        <draw:polygon draw:style-name="gr269" draw:text-style-name="P267" draw:layer="layout" svg:width="0.027cm" svg:height="0.027cm" svg:x="14.231cm" svg:y="9.116cm" svg:viewBox="0 0 28 28" draw:points="0,0 28,0 28,28 0,28">
          <text:p/>
        </draw:polygon>
        <draw:polygon draw:style-name="gr269" draw:text-style-name="P267" draw:layer="layout" svg:width="0.027cm" svg:height="0.027cm" svg:x="14.284cm" svg:y="9.116cm" svg:viewBox="0 0 28 28" draw:points="0,0 28,0 28,28 0,28">
          <text:p/>
        </draw:polygon>
        <draw:polygon draw:style-name="gr269" draw:text-style-name="P267" draw:layer="layout" svg:width="0.027cm" svg:height="0.027cm" svg:x="14.337cm" svg:y="9.116cm" svg:viewBox="0 0 28 28" draw:points="0,0 28,0 28,28 0,28">
          <text:p/>
        </draw:polygon>
        <draw:polygon draw:style-name="gr269" draw:text-style-name="P267" draw:layer="layout" svg:width="0.028cm" svg:height="0.027cm" svg:x="14.39cm" svg:y="9.116cm" svg:viewBox="0 0 29 28" draw:points="0,0 29,0 29,28 0,28">
          <text:p/>
        </draw:polygon>
        <draw:polygon draw:style-name="gr269" draw:text-style-name="P267" draw:layer="layout" svg:width="0.027cm" svg:height="0.027cm" svg:x="14.443cm" svg:y="9.116cm" svg:viewBox="0 0 28 28" draw:points="0,0 28,0 28,28 0,28">
          <text:p/>
        </draw:polygon>
        <draw:polygon draw:style-name="gr269" draw:text-style-name="P267" draw:layer="layout" svg:width="0.027cm" svg:height="0.027cm" svg:x="14.496cm" svg:y="9.116cm" svg:viewBox="0 0 28 28" draw:points="0,0 28,0 28,28 0,28">
          <text:p/>
        </draw:polygon>
        <draw:polygon draw:style-name="gr269" draw:text-style-name="P267" draw:layer="layout" svg:width="0.027cm" svg:height="0.027cm" svg:x="14.549cm" svg:y="9.116cm" svg:viewBox="0 0 28 28" draw:points="0,0 28,0 28,28 0,28">
          <text:p/>
        </draw:polygon>
        <draw:polygon draw:style-name="gr269" draw:text-style-name="P267" draw:layer="layout" svg:width="0.027cm" svg:height="0.027cm" svg:x="14.602cm" svg:y="9.116cm" svg:viewBox="0 0 28 28" draw:points="0,0 28,0 28,28 0,28">
          <text:p/>
        </draw:polygon>
        <draw:polygon draw:style-name="gr269" draw:text-style-name="P267" draw:layer="layout" svg:width="0.027cm" svg:height="0.027cm" svg:x="14.655cm" svg:y="9.116cm" svg:viewBox="0 0 28 28" draw:points="0,0 28,0 28,28 0,28">
          <text:p/>
        </draw:polygon>
        <draw:polygon draw:style-name="gr269" draw:text-style-name="P267" draw:layer="layout" svg:width="0.027cm" svg:height="0.027cm" svg:x="14.708cm" svg:y="9.116cm" svg:viewBox="0 0 28 28" draw:points="0,0 28,0 28,28 0,28">
          <text:p/>
        </draw:polygon>
        <draw:polygon draw:style-name="gr269" draw:text-style-name="P267" draw:layer="layout" svg:width="0.027cm" svg:height="0.027cm" svg:x="14.761cm" svg:y="9.116cm" svg:viewBox="0 0 28 28" draw:points="0,0 28,0 28,28 0,28">
          <text:p/>
        </draw:polygon>
        <draw:polygon draw:style-name="gr269" draw:text-style-name="P267" draw:layer="layout" svg:width="0.027cm" svg:height="0.027cm" svg:x="14.814cm" svg:y="9.116cm" svg:viewBox="0 0 28 28" draw:points="0,0 28,0 28,28 0,28">
          <text:p/>
        </draw:polygon>
        <draw:polygon draw:style-name="gr269" draw:text-style-name="P267" draw:layer="layout" svg:width="0.027cm" svg:height="0.027cm" svg:x="14.867cm" svg:y="9.116cm" svg:viewBox="0 0 28 28" draw:points="0,0 28,0 28,28 0,28">
          <text:p/>
        </draw:polygon>
        <draw:polygon draw:style-name="gr269" draw:text-style-name="P267" draw:layer="layout" svg:width="0.027cm" svg:height="0.027cm" svg:x="14.92cm" svg:y="9.116cm" svg:viewBox="0 0 28 28" draw:points="0,0 28,0 28,28 0,28">
          <text:p/>
        </draw:polygon>
        <draw:polygon draw:style-name="gr269" draw:text-style-name="P267" draw:layer="layout" svg:width="0.027cm" svg:height="0.027cm" svg:x="14.973cm" svg:y="9.116cm" svg:viewBox="0 0 28 28" draw:points="0,0 28,0 28,28 0,28">
          <text:p/>
        </draw:polygon>
        <draw:polygon draw:style-name="gr269" draw:text-style-name="P267" draw:layer="layout" svg:width="0.027cm" svg:height="0.027cm" svg:x="15.026cm" svg:y="9.116cm" svg:viewBox="0 0 28 28" draw:points="0,0 28,0 28,28 0,28">
          <text:p/>
        </draw:polygon>
        <draw:polygon draw:style-name="gr269" draw:text-style-name="P267" draw:layer="layout" svg:width="0.027cm" svg:height="0.027cm" svg:x="15.079cm" svg:y="9.116cm" svg:viewBox="0 0 28 28" draw:points="0,0 28,0 28,28 0,28">
          <text:p/>
        </draw:polygon>
        <draw:polygon draw:style-name="gr269" draw:text-style-name="P267" draw:layer="layout" svg:width="0.027cm" svg:height="0.027cm" svg:x="15.132cm" svg:y="9.116cm" svg:viewBox="0 0 28 28" draw:points="0,0 28,0 28,28 0,28">
          <text:p/>
        </draw:polygon>
        <draw:polygon draw:style-name="gr269" draw:text-style-name="P267" draw:layer="layout" svg:width="0.027cm" svg:height="0.027cm" svg:x="15.185cm" svg:y="9.116cm" svg:viewBox="0 0 28 28" draw:points="0,0 28,0 28,28 0,28">
          <text:p/>
        </draw:polygon>
        <draw:polygon draw:style-name="gr269" draw:text-style-name="P267" draw:layer="layout" svg:width="0.027cm" svg:height="0.027cm" svg:x="15.238cm" svg:y="9.116cm" svg:viewBox="0 0 28 28" draw:points="0,0 28,0 28,28 0,28">
          <text:p/>
        </draw:polygon>
        <draw:polygon draw:style-name="gr269" draw:text-style-name="P267" draw:layer="layout" svg:width="0.027cm" svg:height="0.027cm" svg:x="15.291cm" svg:y="9.116cm" svg:viewBox="0 0 28 28" draw:points="0,0 28,0 28,28 0,28">
          <text:p/>
        </draw:polygon>
        <draw:polygon draw:style-name="gr269" draw:text-style-name="P267" draw:layer="layout" svg:width="0.027cm" svg:height="0.027cm" svg:x="15.344cm" svg:y="9.116cm" svg:viewBox="0 0 28 28" draw:points="0,0 28,0 28,28 0,28">
          <text:p/>
        </draw:polygon>
        <draw:polygon draw:style-name="gr269" draw:text-style-name="P267" draw:layer="layout" svg:width="0.027cm" svg:height="0.027cm" svg:x="15.397cm" svg:y="9.116cm" svg:viewBox="0 0 28 28" draw:points="0,0 28,0 28,28 0,28">
          <text:p/>
        </draw:polygon>
        <draw:polygon draw:style-name="gr269" draw:text-style-name="P267" draw:layer="layout" svg:width="0.027cm" svg:height="0.027cm" svg:x="15.45cm" svg:y="9.116cm" svg:viewBox="0 0 28 28" draw:points="0,0 28,0 28,28 0,28">
          <text:p/>
        </draw:polygon>
        <draw:polygon draw:style-name="gr269" draw:text-style-name="P267" draw:layer="layout" svg:width="0.027cm" svg:height="0.027cm" svg:x="15.503cm" svg:y="9.116cm" svg:viewBox="0 0 28 28" draw:points="0,0 28,0 28,28 0,28">
          <text:p/>
        </draw:polygon>
        <draw:polygon draw:style-name="gr269" draw:text-style-name="P267" draw:layer="layout" svg:width="0.027cm" svg:height="0.027cm" svg:x="15.556cm" svg:y="9.116cm" svg:viewBox="0 0 28 28" draw:points="0,0 28,0 28,28 0,28">
          <text:p/>
        </draw:polygon>
        <draw:polygon draw:style-name="gr269" draw:text-style-name="P267" draw:layer="layout" svg:width="0.027cm" svg:height="0.027cm" svg:x="15.609cm" svg:y="9.116cm" svg:viewBox="0 0 28 28" draw:points="0,0 28,0 28,28 0,28">
          <text:p/>
        </draw:polygon>
        <draw:polygon draw:style-name="gr269" draw:text-style-name="P267" draw:layer="layout" svg:width="0.027cm" svg:height="0.027cm" svg:x="15.662cm" svg:y="9.116cm" svg:viewBox="0 0 28 28" draw:points="0,0 28,0 28,28 0,28">
          <text:p/>
        </draw:polygon>
        <draw:polygon draw:style-name="gr269" draw:text-style-name="P267" draw:layer="layout" svg:width="0.027cm" svg:height="0.027cm" svg:x="15.715cm" svg:y="9.116cm" svg:viewBox="0 0 28 28" draw:points="0,0 28,0 28,28 0,28">
          <text:p/>
        </draw:polygon>
        <draw:polygon draw:style-name="gr269" draw:text-style-name="P267" draw:layer="layout" svg:width="0.028cm" svg:height="0.027cm" svg:x="15.768cm" svg:y="9.116cm" svg:viewBox="0 0 29 28" draw:points="0,0 29,0 29,28 0,28">
          <text:p/>
        </draw:polygon>
        <draw:polygon draw:style-name="gr269" draw:text-style-name="P267" draw:layer="layout" svg:width="0.027cm" svg:height="0.027cm" svg:x="15.821cm" svg:y="9.116cm" svg:viewBox="0 0 28 28" draw:points="0,0 28,0 28,28 0,28">
          <text:p/>
        </draw:polygon>
        <draw:polygon draw:style-name="gr269" draw:text-style-name="P267" draw:layer="layout" svg:width="0.027cm" svg:height="0.027cm" svg:x="15.874cm" svg:y="9.116cm" svg:viewBox="0 0 28 28" draw:points="0,0 28,0 28,28 0,28">
          <text:p/>
        </draw:polygon>
        <draw:polygon draw:style-name="gr269" draw:text-style-name="P267" draw:layer="layout" svg:width="0.027cm" svg:height="0.027cm" svg:x="15.927cm" svg:y="9.116cm" svg:viewBox="0 0 28 28" draw:points="0,0 28,0 28,28 0,28">
          <text:p/>
        </draw:polygon>
        <draw:polygon draw:style-name="gr269" draw:text-style-name="P267" draw:layer="layout" svg:width="0.027cm" svg:height="0.027cm" svg:x="15.98cm" svg:y="9.116cm" svg:viewBox="0 0 28 28" draw:points="0,0 28,0 28,28 0,28">
          <text:p/>
        </draw:polygon>
        <draw:polygon draw:style-name="gr269" draw:text-style-name="P267" draw:layer="layout" svg:width="0.027cm" svg:height="0.027cm" svg:x="16.033cm" svg:y="9.116cm" svg:viewBox="0 0 28 28" draw:points="0,0 28,0 28,28 0,28">
          <text:p/>
        </draw:polygon>
        <draw:polygon draw:style-name="gr269" draw:text-style-name="P267" draw:layer="layout" svg:width="0.027cm" svg:height="0.027cm" svg:x="16.086cm" svg:y="9.116cm" svg:viewBox="0 0 28 28" draw:points="0,0 28,0 28,28 0,28">
          <text:p/>
        </draw:polygon>
        <draw:polygon draw:style-name="gr269" draw:text-style-name="P267" draw:layer="layout" svg:width="0.027cm" svg:height="0.027cm" svg:x="16.139cm" svg:y="9.116cm" svg:viewBox="0 0 28 28" draw:points="0,0 28,0 28,28 0,28">
          <text:p/>
        </draw:polygon>
        <draw:polygon draw:style-name="gr269" draw:text-style-name="P267" draw:layer="layout" svg:width="0.027cm" svg:height="0.027cm" svg:x="16.192cm" svg:y="9.116cm" svg:viewBox="0 0 28 28" draw:points="0,0 28,0 28,28 0,28">
          <text:p/>
        </draw:polygon>
        <draw:polygon draw:style-name="gr269" draw:text-style-name="P267" draw:layer="layout" svg:width="0.027cm" svg:height="0.027cm" svg:x="16.245cm" svg:y="9.116cm" svg:viewBox="0 0 28 28" draw:points="0,0 28,0 28,28 0,28">
          <text:p/>
        </draw:polygon>
        <draw:polygon draw:style-name="gr269" draw:text-style-name="P267" draw:layer="layout" svg:width="0.027cm" svg:height="0.027cm" svg:x="16.298cm" svg:y="9.116cm" svg:viewBox="0 0 28 28" draw:points="0,0 28,0 28,28 0,28">
          <text:p/>
        </draw:polygon>
        <draw:polygon draw:style-name="gr269" draw:text-style-name="P267" draw:layer="layout" svg:width="0.027cm" svg:height="0.027cm" svg:x="16.351cm" svg:y="9.116cm" svg:viewBox="0 0 28 28" draw:points="0,0 28,0 28,28 0,28">
          <text:p/>
        </draw:polygon>
        <draw:polygon draw:style-name="gr269" draw:text-style-name="P267" draw:layer="layout" svg:width="0.027cm" svg:height="0.027cm" svg:x="16.404cm" svg:y="9.116cm" svg:viewBox="0 0 28 28" draw:points="0,0 28,0 28,28 0,28">
          <text:p/>
        </draw:polygon>
        <draw:polygon draw:style-name="gr269" draw:text-style-name="P267" draw:layer="layout" svg:width="0.027cm" svg:height="0.027cm" svg:x="16.457cm" svg:y="9.116cm" svg:viewBox="0 0 28 28" draw:points="0,0 28,0 28,28 0,28">
          <text:p/>
        </draw:polygon>
        <draw:polygon draw:style-name="gr269" draw:text-style-name="P267" draw:layer="layout" svg:width="0.027cm" svg:height="0.027cm" svg:x="16.51cm" svg:y="9.116cm" svg:viewBox="0 0 28 28" draw:points="0,0 28,0 28,28 0,28">
          <text:p/>
        </draw:polygon>
        <draw:polygon draw:style-name="gr269" draw:text-style-name="P267" draw:layer="layout" svg:width="0.027cm" svg:height="0.027cm" svg:x="16.563cm" svg:y="9.116cm" svg:viewBox="0 0 28 28" draw:points="0,0 28,0 28,28 0,28">
          <text:p/>
        </draw:polygon>
        <draw:polygon draw:style-name="gr269" draw:text-style-name="P267" draw:layer="layout" svg:width="0.027cm" svg:height="0.027cm" svg:x="16.616cm" svg:y="9.116cm" svg:viewBox="0 0 28 28" draw:points="0,0 28,0 28,28 0,28">
          <text:p/>
        </draw:polygon>
        <draw:polygon draw:style-name="gr269" draw:text-style-name="P267" draw:layer="layout" svg:width="0.027cm" svg:height="0.027cm" svg:x="16.669cm" svg:y="9.116cm" svg:viewBox="0 0 28 28" draw:points="0,0 28,0 28,28 0,28">
          <text:p/>
        </draw:polygon>
        <draw:polygon draw:style-name="gr269" draw:text-style-name="P267" draw:layer="layout" svg:width="0.027cm" svg:height="0.027cm" svg:x="16.722cm" svg:y="9.116cm" svg:viewBox="0 0 28 28" draw:points="0,0 28,0 28,28 0,28">
          <text:p/>
        </draw:polygon>
        <draw:polygon draw:style-name="gr269" draw:text-style-name="P267" draw:layer="layout" svg:width="0.027cm" svg:height="0.027cm" svg:x="16.775cm" svg:y="9.116cm" svg:viewBox="0 0 28 28" draw:points="0,0 28,0 28,28 0,28">
          <text:p/>
        </draw:polygon>
        <draw:polygon draw:style-name="gr269" draw:text-style-name="P267" draw:layer="layout" svg:width="0.027cm" svg:height="0.027cm" svg:x="16.828cm" svg:y="9.116cm" svg:viewBox="0 0 28 28" draw:points="0,0 28,0 28,28 0,28">
          <text:p/>
        </draw:polygon>
        <draw:polygon draw:style-name="gr269" draw:text-style-name="P267" draw:layer="layout" svg:width="0.027cm" svg:height="0.027cm" svg:x="16.881cm" svg:y="9.116cm" svg:viewBox="0 0 28 28" draw:points="0,0 28,0 28,28 0,28">
          <text:p/>
        </draw:polygon>
        <draw:polygon draw:style-name="gr269" draw:text-style-name="P267" draw:layer="layout" svg:width="0.027cm" svg:height="0.027cm" svg:x="16.934cm" svg:y="9.116cm" svg:viewBox="0 0 28 28" draw:points="0,0 28,0 28,28 0,28">
          <text:p/>
        </draw:polygon>
        <draw:polygon draw:style-name="gr269" draw:text-style-name="P267" draw:layer="layout" svg:width="0.027cm" svg:height="0.027cm" svg:x="16.987cm" svg:y="9.116cm" svg:viewBox="0 0 28 28" draw:points="0,0 28,0 28,28 0,28">
          <text:p/>
        </draw:polygon>
        <draw:polygon draw:style-name="gr269" draw:text-style-name="P267" draw:layer="layout" svg:width="0.027cm" svg:height="0.027cm" svg:x="17.04cm" svg:y="9.116cm" svg:viewBox="0 0 28 28" draw:points="0,0 28,0 28,28 0,28">
          <text:p/>
        </draw:polygon>
        <draw:polygon draw:style-name="gr269" draw:text-style-name="P267" draw:layer="layout" svg:width="0.027cm" svg:height="0.027cm" svg:x="17.093cm" svg:y="9.116cm" svg:viewBox="0 0 28 28" draw:points="0,0 28,0 28,28 0,28">
          <text:p/>
        </draw:polygon>
        <draw:polygon draw:style-name="gr269" draw:text-style-name="P267" draw:layer="layout" svg:width="0.028cm" svg:height="0.027cm" svg:x="17.146cm" svg:y="9.116cm" svg:viewBox="0 0 29 28" draw:points="0,0 29,0 29,28 0,28">
          <text:p/>
        </draw:polygon>
        <draw:polygon draw:style-name="gr269" draw:text-style-name="P267" draw:layer="layout" svg:width="0.027cm" svg:height="0.027cm" svg:x="17.199cm" svg:y="9.116cm" svg:viewBox="0 0 28 28" draw:points="0,0 28,0 28,28 0,28">
          <text:p/>
        </draw:polygon>
        <draw:polygon draw:style-name="gr269" draw:text-style-name="P267" draw:layer="layout" svg:width="0.027cm" svg:height="0.027cm" svg:x="17.252cm" svg:y="9.116cm" svg:viewBox="0 0 28 28" draw:points="0,0 28,0 28,28 0,28">
          <text:p/>
        </draw:polygon>
        <draw:polygon draw:style-name="gr269" draw:text-style-name="P267" draw:layer="layout" svg:width="0.027cm" svg:height="0.027cm" svg:x="17.305cm" svg:y="9.116cm" svg:viewBox="0 0 28 28" draw:points="0,0 28,0 28,28 0,28">
          <text:p/>
        </draw:polygon>
        <draw:polygon draw:style-name="gr269" draw:text-style-name="P267" draw:layer="layout" svg:width="0.027cm" svg:height="0.027cm" svg:x="17.358cm" svg:y="9.116cm" svg:viewBox="0 0 28 28" draw:points="0,0 28,0 28,28 0,28">
          <text:p/>
        </draw:polygon>
        <draw:polygon draw:style-name="gr269" draw:text-style-name="P267" draw:layer="layout" svg:width="0.027cm" svg:height="0.027cm" svg:x="17.411cm" svg:y="9.116cm" svg:viewBox="0 0 28 28" draw:points="0,0 28,0 28,28 0,28">
          <text:p/>
        </draw:polygon>
        <draw:polygon draw:style-name="gr269" draw:text-style-name="P267" draw:layer="layout" svg:width="0.027cm" svg:height="0.027cm" svg:x="17.464cm" svg:y="9.116cm" svg:viewBox="0 0 28 28" draw:points="0,0 28,0 28,28 0,28">
          <text:p/>
        </draw:polygon>
        <draw:polygon draw:style-name="gr269" draw:text-style-name="P267" draw:layer="layout" svg:width="0.027cm" svg:height="0.027cm" svg:x="17.517cm" svg:y="9.116cm" svg:viewBox="0 0 28 28" draw:points="0,0 28,0 28,28 0,28">
          <text:p/>
        </draw:polygon>
        <draw:polygon draw:style-name="gr269" draw:text-style-name="P267" draw:layer="layout" svg:width="0.027cm" svg:height="0.027cm" svg:x="17.57cm" svg:y="9.116cm" svg:viewBox="0 0 28 28" draw:points="0,0 28,0 28,28 0,28">
          <text:p/>
        </draw:polygon>
        <draw:polygon draw:style-name="gr269" draw:text-style-name="P267" draw:layer="layout" svg:width="0.027cm" svg:height="0.027cm" svg:x="17.623cm" svg:y="9.116cm" svg:viewBox="0 0 28 28" draw:points="0,0 28,0 28,28 0,28">
          <text:p/>
        </draw:polygon>
        <draw:polygon draw:style-name="gr269" draw:text-style-name="P267" draw:layer="layout" svg:width="0.027cm" svg:height="0.027cm" svg:x="17.676cm" svg:y="9.116cm" svg:viewBox="0 0 28 28" draw:points="0,0 28,0 28,28 0,28">
          <text:p/>
        </draw:polygon>
        <draw:polygon draw:style-name="gr269" draw:text-style-name="P267" draw:layer="layout" svg:width="0.027cm" svg:height="0.027cm" svg:x="17.729cm" svg:y="9.116cm" svg:viewBox="0 0 28 28" draw:points="0,0 28,0 28,28 0,28">
          <text:p/>
        </draw:polygon>
        <draw:polygon draw:style-name="gr269" draw:text-style-name="P267" draw:layer="layout" svg:width="0.027cm" svg:height="0.027cm" svg:x="17.782cm" svg:y="9.116cm" svg:viewBox="0 0 28 28" draw:points="0,0 28,0 28,28 0,28">
          <text:p/>
        </draw:polygon>
        <draw:polygon draw:style-name="gr269" draw:text-style-name="P267" draw:layer="layout" svg:width="0.027cm" svg:height="0.027cm" svg:x="17.835cm" svg:y="9.116cm" svg:viewBox="0 0 28 28" draw:points="0,0 28,0 28,28 0,28">
          <text:p/>
        </draw:polygon>
        <draw:polygon draw:style-name="gr269" draw:text-style-name="P267" draw:layer="layout" svg:width="0.027cm" svg:height="0.027cm" svg:x="17.888cm" svg:y="9.116cm" svg:viewBox="0 0 28 28" draw:points="0,0 28,0 28,28 0,28">
          <text:p/>
        </draw:polygon>
        <draw:polygon draw:style-name="gr269" draw:text-style-name="P267" draw:layer="layout" svg:width="0.027cm" svg:height="0.027cm" svg:x="17.941cm" svg:y="9.116cm" svg:viewBox="0 0 28 28" draw:points="0,0 28,0 28,28 0,28">
          <text:p/>
        </draw:polygon>
        <draw:polygon draw:style-name="gr269" draw:text-style-name="P267" draw:layer="layout" svg:width="0.027cm" svg:height="0.027cm" svg:x="17.994cm" svg:y="9.116cm" svg:viewBox="0 0 28 28" draw:points="0,0 28,0 28,28 0,28">
          <text:p/>
        </draw:polygon>
        <draw:polygon draw:style-name="gr269" draw:text-style-name="P267" draw:layer="layout" svg:width="0.027cm" svg:height="0.027cm" svg:x="18.047cm" svg:y="9.116cm" svg:viewBox="0 0 28 28" draw:points="0,0 28,0 28,28 0,28">
          <text:p/>
        </draw:polygon>
        <draw:polygon draw:style-name="gr269" draw:text-style-name="P267" draw:layer="layout" svg:width="0.027cm" svg:height="0.027cm" svg:x="18.1cm" svg:y="9.116cm" svg:viewBox="0 0 28 28" draw:points="0,0 28,0 28,28 0,28">
          <text:p/>
        </draw:polygon>
        <draw:polygon draw:style-name="gr269" draw:text-style-name="P267" draw:layer="layout" svg:width="0.027cm" svg:height="0.027cm" svg:x="18.153cm" svg:y="9.116cm" svg:viewBox="0 0 28 28" draw:points="0,0 28,0 28,28 0,28">
          <text:p/>
        </draw:polygon>
        <draw:polygon draw:style-name="gr269" draw:text-style-name="P267" draw:layer="layout" svg:width="0.027cm" svg:height="0.027cm" svg:x="18.206cm" svg:y="9.116cm" svg:viewBox="0 0 28 28" draw:points="0,0 28,0 28,28 0,28">
          <text:p/>
        </draw:polygon>
        <draw:polygon draw:style-name="gr269" draw:text-style-name="P267" draw:layer="layout" svg:width="0.027cm" svg:height="0.027cm" svg:x="18.259cm" svg:y="9.116cm" svg:viewBox="0 0 28 28" draw:points="0,0 28,0 28,28 0,28">
          <text:p/>
        </draw:polygon>
        <draw:polygon draw:style-name="gr269" draw:text-style-name="P267" draw:layer="layout" svg:width="0.027cm" svg:height="0.027cm" svg:x="18.312cm" svg:y="9.116cm" svg:viewBox="0 0 28 28" draw:points="0,0 28,0 28,28 0,28">
          <text:p/>
        </draw:polygon>
        <draw:polygon draw:style-name="gr269" draw:text-style-name="P267" draw:layer="layout" svg:width="0.027cm" svg:height="0.027cm" svg:x="18.365cm" svg:y="9.116cm" svg:viewBox="0 0 28 28" draw:points="0,0 28,0 28,28 0,28">
          <text:p/>
        </draw:polygon>
        <draw:polygon draw:style-name="gr269" draw:text-style-name="P267" draw:layer="layout" svg:width="0.027cm" svg:height="0.027cm" svg:x="18.418cm" svg:y="9.116cm" svg:viewBox="0 0 28 28" draw:points="0,0 28,0 28,28 0,28">
          <text:p/>
        </draw:polygon>
        <draw:polygon draw:style-name="gr269" draw:text-style-name="P267" draw:layer="layout" svg:width="0.027cm" svg:height="0.027cm" svg:x="18.471cm" svg:y="9.116cm" svg:viewBox="0 0 28 28" draw:points="0,0 28,0 28,28 0,28">
          <text:p/>
        </draw:polygon>
        <draw:polygon draw:style-name="gr269" draw:text-style-name="P267" draw:layer="layout" svg:width="0.028cm" svg:height="0.027cm" svg:x="18.524cm" svg:y="9.116cm" svg:viewBox="0 0 29 28" draw:points="0,0 29,0 29,28 0,28">
          <text:p/>
        </draw:polygon>
        <draw:polygon draw:style-name="gr269" draw:text-style-name="P267" draw:layer="layout" svg:width="0.027cm" svg:height="0.027cm" svg:x="18.577cm" svg:y="9.116cm" svg:viewBox="0 0 28 28" draw:points="0,0 28,0 28,28 0,28">
          <text:p/>
        </draw:polygon>
        <draw:polygon draw:style-name="gr269" draw:text-style-name="P267" draw:layer="layout" svg:width="0.027cm" svg:height="0.027cm" svg:x="18.63cm" svg:y="9.116cm" svg:viewBox="0 0 28 28" draw:points="0,0 28,0 28,28 0,28">
          <text:p/>
        </draw:polygon>
        <draw:polygon draw:style-name="gr269" draw:text-style-name="P267" draw:layer="layout" svg:width="0.027cm" svg:height="0.027cm" svg:x="18.683cm" svg:y="9.116cm" svg:viewBox="0 0 28 28" draw:points="0,0 28,0 28,28 0,28">
          <text:p/>
        </draw:polygon>
        <draw:polygon draw:style-name="gr269" draw:text-style-name="P267" draw:layer="layout" svg:width="0.027cm" svg:height="0.027cm" svg:x="18.736cm" svg:y="9.116cm" svg:viewBox="0 0 28 28" draw:points="0,0 28,0 28,28 0,28">
          <text:p/>
        </draw:polygon>
        <draw:polygon draw:style-name="gr269" draw:text-style-name="P267" draw:layer="layout" svg:width="0.027cm" svg:height="0.027cm" svg:x="18.789cm" svg:y="9.116cm" svg:viewBox="0 0 28 28" draw:points="0,0 28,0 28,28 0,28">
          <text:p/>
        </draw:polygon>
        <draw:polygon draw:style-name="gr269" draw:text-style-name="P267" draw:layer="layout" svg:width="0.027cm" svg:height="0.027cm" svg:x="18.842cm" svg:y="9.116cm" svg:viewBox="0 0 28 28" draw:points="0,0 28,0 28,28 0,28">
          <text:p/>
        </draw:polygon>
        <draw:polygon draw:style-name="gr269" draw:text-style-name="P267" draw:layer="layout" svg:width="0.027cm" svg:height="0.027cm" svg:x="18.895cm" svg:y="9.116cm" svg:viewBox="0 0 28 28" draw:points="0,0 28,0 28,28 0,28">
          <text:p/>
        </draw:polygon>
        <draw:polygon draw:style-name="gr269" draw:text-style-name="P267" draw:layer="layout" svg:width="0.027cm" svg:height="0.027cm" svg:x="18.948cm" svg:y="9.116cm" svg:viewBox="0 0 28 28" draw:points="0,0 28,0 28,28 0,28">
          <text:p/>
        </draw:polygon>
        <draw:polygon draw:style-name="gr269" draw:text-style-name="P267" draw:layer="layout" svg:width="0.027cm" svg:height="0.027cm" svg:x="19.001cm" svg:y="9.116cm" svg:viewBox="0 0 28 28" draw:points="0,0 28,0 28,28 0,28">
          <text:p/>
        </draw:polygon>
        <draw:polygon draw:style-name="gr269" draw:text-style-name="P267" draw:layer="layout" svg:width="0.053cm" svg:height="0.026cm" svg:x="2.014cm" svg:y="10.097cm" svg:viewBox="0 0 54 27" draw:points="0,0 54,0 54,27 0,27">
          <text:p/>
        </draw:polygon>
        <draw:polygon draw:style-name="gr269" draw:text-style-name="P267" draw:layer="layout" svg:width="0.027cm" svg:height="0.026cm" svg:x="2.093cm" svg:y="10.097cm" svg:viewBox="0 0 28 27" draw:points="0,0 28,0 28,27 0,27">
          <text:p/>
        </draw:polygon>
        <draw:polygon draw:style-name="gr269" draw:text-style-name="P267" draw:layer="layout" svg:width="0.027cm" svg:height="0.026cm" svg:x="2.146cm" svg:y="10.097cm" svg:viewBox="0 0 28 27" draw:points="0,0 28,0 28,27 0,27">
          <text:p/>
        </draw:polygon>
        <draw:polygon draw:style-name="gr269" draw:text-style-name="P267" draw:layer="layout" svg:width="0.027cm" svg:height="0.026cm" svg:x="2.199cm" svg:y="10.097cm" svg:viewBox="0 0 28 27" draw:points="0,0 28,0 28,27 0,27">
          <text:p/>
        </draw:polygon>
        <draw:polygon draw:style-name="gr269" draw:text-style-name="P267" draw:layer="layout" svg:width="0.027cm" svg:height="0.026cm" svg:x="2.252cm" svg:y="10.097cm" svg:viewBox="0 0 28 27" draw:points="0,0 28,0 28,27 0,27">
          <text:p/>
        </draw:polygon>
        <draw:polygon draw:style-name="gr269" draw:text-style-name="P267" draw:layer="layout" svg:width="0.027cm" svg:height="0.026cm" svg:x="2.305cm" svg:y="10.097cm" svg:viewBox="0 0 28 27" draw:points="0,0 28,0 28,27 0,27">
          <text:p/>
        </draw:polygon>
        <draw:polygon draw:style-name="gr269" draw:text-style-name="P267" draw:layer="layout" svg:width="0.027cm" svg:height="0.026cm" svg:x="2.358cm" svg:y="10.097cm" svg:viewBox="0 0 28 27" draw:points="0,0 28,0 28,27 0,27">
          <text:p/>
        </draw:polygon>
        <draw:polygon draw:style-name="gr269" draw:text-style-name="P267" draw:layer="layout" svg:width="0.027cm" svg:height="0.026cm" svg:x="2.411cm" svg:y="10.097cm" svg:viewBox="0 0 28 27" draw:points="0,0 28,0 28,27 0,27">
          <text:p/>
        </draw:polygon>
        <draw:polygon draw:style-name="gr269" draw:text-style-name="P267" draw:layer="layout" svg:width="0.027cm" svg:height="0.026cm" svg:x="2.464cm" svg:y="10.097cm" svg:viewBox="0 0 28 27" draw:points="0,0 28,0 28,27 0,27">
          <text:p/>
        </draw:polygon>
        <draw:polygon draw:style-name="gr269" draw:text-style-name="P267" draw:layer="layout" svg:width="0.027cm" svg:height="0.026cm" svg:x="2.517cm" svg:y="10.097cm" svg:viewBox="0 0 28 27" draw:points="0,0 28,0 28,27 0,27">
          <text:p/>
        </draw:polygon>
        <draw:polygon draw:style-name="gr269" draw:text-style-name="P267" draw:layer="layout" svg:width="0.027cm" svg:height="0.026cm" svg:x="2.57cm" svg:y="10.097cm" svg:viewBox="0 0 28 27" draw:points="0,0 28,0 28,27 0,27">
          <text:p/>
        </draw:polygon>
        <draw:polygon draw:style-name="gr269" draw:text-style-name="P267" draw:layer="layout" svg:width="0.027cm" svg:height="0.026cm" svg:x="2.623cm" svg:y="10.097cm" svg:viewBox="0 0 28 27" draw:points="0,0 28,0 28,27 0,27">
          <text:p/>
        </draw:polygon>
        <draw:polygon draw:style-name="gr269" draw:text-style-name="P267" draw:layer="layout" svg:width="0.027cm" svg:height="0.026cm" svg:x="2.676cm" svg:y="10.097cm" svg:viewBox="0 0 28 27" draw:points="0,0 28,0 28,27 0,27">
          <text:p/>
        </draw:polygon>
        <draw:polygon draw:style-name="gr269" draw:text-style-name="P267" draw:layer="layout" svg:width="0.027cm" svg:height="0.026cm" svg:x="2.729cm" svg:y="10.097cm" svg:viewBox="0 0 28 27" draw:points="0,0 28,0 28,27 0,27">
          <text:p/>
        </draw:polygon>
        <draw:polygon draw:style-name="gr269" draw:text-style-name="P267" draw:layer="layout" svg:width="0.027cm" svg:height="0.026cm" svg:x="2.782cm" svg:y="10.097cm" svg:viewBox="0 0 28 27" draw:points="0,0 28,0 28,27 0,27">
          <text:p/>
        </draw:polygon>
        <draw:polygon draw:style-name="gr269" draw:text-style-name="P267" draw:layer="layout" svg:width="0.027cm" svg:height="0.026cm" svg:x="2.835cm" svg:y="10.097cm" svg:viewBox="0 0 28 27" draw:points="0,0 28,0 28,27 0,27">
          <text:p/>
        </draw:polygon>
        <draw:polygon draw:style-name="gr269" draw:text-style-name="P267" draw:layer="layout" svg:width="0.027cm" svg:height="0.026cm" svg:x="2.888cm" svg:y="10.097cm" svg:viewBox="0 0 28 27" draw:points="0,0 28,0 28,27 0,27">
          <text:p/>
        </draw:polygon>
        <draw:polygon draw:style-name="gr269" draw:text-style-name="P267" draw:layer="layout" svg:width="0.027cm" svg:height="0.026cm" svg:x="2.941cm" svg:y="10.097cm" svg:viewBox="0 0 28 27" draw:points="0,0 28,0 28,27 0,27">
          <text:p/>
        </draw:polygon>
        <draw:polygon draw:style-name="gr269" draw:text-style-name="P267" draw:layer="layout" svg:width="0.027cm" svg:height="0.026cm" svg:x="2.994cm" svg:y="10.097cm" svg:viewBox="0 0 28 27" draw:points="0,0 28,0 28,27 0,27">
          <text:p/>
        </draw:polygon>
        <draw:polygon draw:style-name="gr269" draw:text-style-name="P267" draw:layer="layout" svg:width="0.027cm" svg:height="0.026cm" svg:x="3.047cm" svg:y="10.097cm" svg:viewBox="0 0 28 27" draw:points="0,0 28,0 28,27 0,27">
          <text:p/>
        </draw:polygon>
        <draw:polygon draw:style-name="gr269" draw:text-style-name="P267" draw:layer="layout" svg:width="0.027cm" svg:height="0.026cm" svg:x="3.1cm" svg:y="10.097cm" svg:viewBox="0 0 28 27" draw:points="0,0 28,0 28,27 0,27">
          <text:p/>
        </draw:polygon>
        <draw:polygon draw:style-name="gr269" draw:text-style-name="P267" draw:layer="layout" svg:width="0.027cm" svg:height="0.026cm" svg:x="3.153cm" svg:y="10.097cm" svg:viewBox="0 0 28 27" draw:points="0,0 28,0 28,27 0,27">
          <text:p/>
        </draw:polygon>
        <draw:polygon draw:style-name="gr269" draw:text-style-name="P267" draw:layer="layout" svg:width="0.027cm" svg:height="0.026cm" svg:x="3.206cm" svg:y="10.097cm" svg:viewBox="0 0 28 27" draw:points="0,0 28,0 28,27 0,27">
          <text:p/>
        </draw:polygon>
        <draw:polygon draw:style-name="gr269" draw:text-style-name="P267" draw:layer="layout" svg:width="0.027cm" svg:height="0.026cm" svg:x="3.259cm" svg:y="10.097cm" svg:viewBox="0 0 28 27" draw:points="0,0 28,0 28,27 0,27">
          <text:p/>
        </draw:polygon>
        <draw:polygon draw:style-name="gr269" draw:text-style-name="P267" draw:layer="layout" svg:width="0.027cm" svg:height="0.026cm" svg:x="3.312cm" svg:y="10.097cm" svg:viewBox="0 0 28 27" draw:points="0,0 28,0 28,27 0,27">
          <text:p/>
        </draw:polygon>
        <draw:polygon draw:style-name="gr269" draw:text-style-name="P267" draw:layer="layout" svg:width="0.027cm" svg:height="0.026cm" svg:x="3.365cm" svg:y="10.097cm" svg:viewBox="0 0 28 27" draw:points="0,0 28,0 28,27 0,27">
          <text:p/>
        </draw:polygon>
        <draw:polygon draw:style-name="gr269" draw:text-style-name="P267" draw:layer="layout" svg:width="0.028cm" svg:height="0.026cm" svg:x="3.418cm" svg:y="10.097cm" svg:viewBox="0 0 29 27" draw:points="0,0 29,0 29,27 0,27">
          <text:p/>
        </draw:polygon>
        <draw:polygon draw:style-name="gr269" draw:text-style-name="P267" draw:layer="layout" svg:width="0.027cm" svg:height="0.026cm" svg:x="3.471cm" svg:y="10.097cm" svg:viewBox="0 0 28 27" draw:points="0,0 28,0 28,27 0,27">
          <text:p/>
        </draw:polygon>
        <draw:polygon draw:style-name="gr269" draw:text-style-name="P267" draw:layer="layout" svg:width="0.027cm" svg:height="0.026cm" svg:x="3.524cm" svg:y="10.097cm" svg:viewBox="0 0 28 27" draw:points="0,0 28,0 28,27 0,27">
          <text:p/>
        </draw:polygon>
        <draw:polygon draw:style-name="gr269" draw:text-style-name="P267" draw:layer="layout" svg:width="0.027cm" svg:height="0.026cm" svg:x="3.577cm" svg:y="10.097cm" svg:viewBox="0 0 28 27" draw:points="0,0 28,0 28,27 0,27">
          <text:p/>
        </draw:polygon>
        <draw:polygon draw:style-name="gr269" draw:text-style-name="P267" draw:layer="layout" svg:width="0.027cm" svg:height="0.026cm" svg:x="3.63cm" svg:y="10.097cm" svg:viewBox="0 0 28 27" draw:points="0,0 28,0 28,27 0,27">
          <text:p/>
        </draw:polygon>
        <draw:polygon draw:style-name="gr269" draw:text-style-name="P267" draw:layer="layout" svg:width="0.027cm" svg:height="0.026cm" svg:x="3.683cm" svg:y="10.097cm" svg:viewBox="0 0 28 27" draw:points="0,0 28,0 28,27 0,27">
          <text:p/>
        </draw:polygon>
        <draw:polygon draw:style-name="gr269" draw:text-style-name="P267" draw:layer="layout" svg:width="0.027cm" svg:height="0.026cm" svg:x="3.736cm" svg:y="10.097cm" svg:viewBox="0 0 28 27" draw:points="0,0 28,0 28,27 0,27">
          <text:p/>
        </draw:polygon>
        <draw:polygon draw:style-name="gr269" draw:text-style-name="P267" draw:layer="layout" svg:width="0.027cm" svg:height="0.026cm" svg:x="3.789cm" svg:y="10.097cm" svg:viewBox="0 0 28 27" draw:points="0,0 28,0 28,27 0,27">
          <text:p/>
        </draw:polygon>
        <draw:polygon draw:style-name="gr269" draw:text-style-name="P267" draw:layer="layout" svg:width="0.027cm" svg:height="0.026cm" svg:x="3.842cm" svg:y="10.097cm" svg:viewBox="0 0 28 27" draw:points="0,0 28,0 28,27 0,27">
          <text:p/>
        </draw:polygon>
        <draw:polygon draw:style-name="gr269" draw:text-style-name="P267" draw:layer="layout" svg:width="0.027cm" svg:height="0.026cm" svg:x="3.895cm" svg:y="10.097cm" svg:viewBox="0 0 28 27" draw:points="0,0 28,0 28,27 0,27">
          <text:p/>
        </draw:polygon>
        <draw:polygon draw:style-name="gr269" draw:text-style-name="P267" draw:layer="layout" svg:width="0.027cm" svg:height="0.026cm" svg:x="3.948cm" svg:y="10.097cm" svg:viewBox="0 0 28 27" draw:points="0,0 28,0 28,27 0,27">
          <text:p/>
        </draw:polygon>
        <draw:polygon draw:style-name="gr269" draw:text-style-name="P267" draw:layer="layout" svg:width="0.027cm" svg:height="0.026cm" svg:x="4.001cm" svg:y="10.097cm" svg:viewBox="0 0 28 27" draw:points="0,0 28,0 28,27 0,27">
          <text:p/>
        </draw:polygon>
        <draw:polygon draw:style-name="gr269" draw:text-style-name="P267" draw:layer="layout" svg:width="0.027cm" svg:height="0.026cm" svg:x="4.054cm" svg:y="10.097cm" svg:viewBox="0 0 28 27" draw:points="0,0 28,0 28,27 0,27">
          <text:p/>
        </draw:polygon>
        <draw:polygon draw:style-name="gr269" draw:text-style-name="P267" draw:layer="layout" svg:width="0.027cm" svg:height="0.026cm" svg:x="4.107cm" svg:y="10.097cm" svg:viewBox="0 0 28 27" draw:points="0,0 28,0 28,27 0,27">
          <text:p/>
        </draw:polygon>
        <draw:polygon draw:style-name="gr269" draw:text-style-name="P267" draw:layer="layout" svg:width="0.027cm" svg:height="0.026cm" svg:x="4.16cm" svg:y="10.097cm" svg:viewBox="0 0 28 27" draw:points="0,0 28,0 28,27 0,27">
          <text:p/>
        </draw:polygon>
        <draw:polygon draw:style-name="gr269" draw:text-style-name="P267" draw:layer="layout" svg:width="0.027cm" svg:height="0.026cm" svg:x="4.213cm" svg:y="10.097cm" svg:viewBox="0 0 28 27" draw:points="0,0 28,0 28,27 0,27">
          <text:p/>
        </draw:polygon>
        <draw:polygon draw:style-name="gr269" draw:text-style-name="P267" draw:layer="layout" svg:width="0.027cm" svg:height="0.026cm" svg:x="4.266cm" svg:y="10.097cm" svg:viewBox="0 0 28 27" draw:points="0,0 28,0 28,27 0,27">
          <text:p/>
        </draw:polygon>
        <draw:polygon draw:style-name="gr269" draw:text-style-name="P267" draw:layer="layout" svg:width="0.027cm" svg:height="0.026cm" svg:x="4.319cm" svg:y="10.097cm" svg:viewBox="0 0 28 27" draw:points="0,0 28,0 28,27 0,27">
          <text:p/>
        </draw:polygon>
        <draw:polygon draw:style-name="gr269" draw:text-style-name="P267" draw:layer="layout" svg:width="0.027cm" svg:height="0.026cm" svg:x="4.372cm" svg:y="10.097cm" svg:viewBox="0 0 28 27" draw:points="0,0 28,0 28,27 0,27">
          <text:p/>
        </draw:polygon>
        <draw:polygon draw:style-name="gr269" draw:text-style-name="P267" draw:layer="layout" svg:width="0.027cm" svg:height="0.026cm" svg:x="4.425cm" svg:y="10.097cm" svg:viewBox="0 0 28 27" draw:points="0,0 28,0 28,27 0,27">
          <text:p/>
        </draw:polygon>
        <draw:polygon draw:style-name="gr269" draw:text-style-name="P267" draw:layer="layout" svg:width="0.027cm" svg:height="0.026cm" svg:x="4.478cm" svg:y="10.097cm" svg:viewBox="0 0 28 27" draw:points="0,0 28,0 28,27 0,27">
          <text:p/>
        </draw:polygon>
        <draw:polygon draw:style-name="gr269" draw:text-style-name="P267" draw:layer="layout" svg:width="0.027cm" svg:height="0.026cm" svg:x="4.531cm" svg:y="10.097cm" svg:viewBox="0 0 28 27" draw:points="0,0 28,0 28,27 0,27">
          <text:p/>
        </draw:polygon>
        <draw:polygon draw:style-name="gr269" draw:text-style-name="P267" draw:layer="layout" svg:width="0.027cm" svg:height="0.026cm" svg:x="4.584cm" svg:y="10.097cm" svg:viewBox="0 0 28 27" draw:points="0,0 28,0 28,27 0,27">
          <text:p/>
        </draw:polygon>
        <draw:polygon draw:style-name="gr269" draw:text-style-name="P267" draw:layer="layout" svg:width="0.027cm" svg:height="0.026cm" svg:x="4.637cm" svg:y="10.097cm" svg:viewBox="0 0 28 27" draw:points="0,0 28,0 28,27 0,27">
          <text:p/>
        </draw:polygon>
        <draw:polygon draw:style-name="gr269" draw:text-style-name="P267" draw:layer="layout" svg:width="0.027cm" svg:height="0.026cm" svg:x="4.69cm" svg:y="10.097cm" svg:viewBox="0 0 28 27" draw:points="0,0 28,0 28,27 0,27">
          <text:p/>
        </draw:polygon>
        <draw:polygon draw:style-name="gr269" draw:text-style-name="P267" draw:layer="layout" svg:width="0.027cm" svg:height="0.026cm" svg:x="4.743cm" svg:y="10.097cm" svg:viewBox="0 0 28 27" draw:points="0,0 28,0 28,27 0,27">
          <text:p/>
        </draw:polygon>
        <draw:polygon draw:style-name="gr269" draw:text-style-name="P267" draw:layer="layout" svg:width="0.028cm" svg:height="0.026cm" svg:x="4.796cm" svg:y="10.097cm" svg:viewBox="0 0 29 27" draw:points="0,0 29,0 29,27 0,27">
          <text:p/>
        </draw:polygon>
        <draw:polygon draw:style-name="gr269" draw:text-style-name="P267" draw:layer="layout" svg:width="0.027cm" svg:height="0.026cm" svg:x="4.849cm" svg:y="10.097cm" svg:viewBox="0 0 28 27" draw:points="0,0 28,0 28,27 0,27">
          <text:p/>
        </draw:polygon>
        <draw:polygon draw:style-name="gr269" draw:text-style-name="P267" draw:layer="layout" svg:width="0.027cm" svg:height="0.026cm" svg:x="4.902cm" svg:y="10.097cm" svg:viewBox="0 0 28 27" draw:points="0,0 28,0 28,27 0,27">
          <text:p/>
        </draw:polygon>
        <draw:polygon draw:style-name="gr269" draw:text-style-name="P267" draw:layer="layout" svg:width="0.027cm" svg:height="0.026cm" svg:x="4.955cm" svg:y="10.097cm" svg:viewBox="0 0 28 27" draw:points="0,0 28,0 28,27 0,27">
          <text:p/>
        </draw:polygon>
        <draw:polygon draw:style-name="gr269" draw:text-style-name="P267" draw:layer="layout" svg:width="0.027cm" svg:height="0.026cm" svg:x="5.008cm" svg:y="10.097cm" svg:viewBox="0 0 28 27" draw:points="0,0 28,0 28,27 0,27">
          <text:p/>
        </draw:polygon>
        <draw:polygon draw:style-name="gr269" draw:text-style-name="P267" draw:layer="layout" svg:width="0.027cm" svg:height="0.026cm" svg:x="5.061cm" svg:y="10.097cm" svg:viewBox="0 0 28 27" draw:points="0,0 28,0 28,27 0,27">
          <text:p/>
        </draw:polygon>
        <draw:polygon draw:style-name="gr269" draw:text-style-name="P267" draw:layer="layout" svg:width="0.027cm" svg:height="0.026cm" svg:x="5.114cm" svg:y="10.097cm" svg:viewBox="0 0 28 27" draw:points="0,0 28,0 28,27 0,27">
          <text:p/>
        </draw:polygon>
        <draw:polygon draw:style-name="gr269" draw:text-style-name="P267" draw:layer="layout" svg:width="0.027cm" svg:height="0.026cm" svg:x="5.167cm" svg:y="10.097cm" svg:viewBox="0 0 28 27" draw:points="0,0 28,0 28,27 0,27">
          <text:p/>
        </draw:polygon>
        <draw:polygon draw:style-name="gr269" draw:text-style-name="P267" draw:layer="layout" svg:width="0.027cm" svg:height="0.026cm" svg:x="5.22cm" svg:y="10.097cm" svg:viewBox="0 0 28 27" draw:points="0,0 28,0 28,27 0,27">
          <text:p/>
        </draw:polygon>
        <draw:polygon draw:style-name="gr269" draw:text-style-name="P267" draw:layer="layout" svg:width="0.027cm" svg:height="0.026cm" svg:x="5.273cm" svg:y="10.097cm" svg:viewBox="0 0 28 27" draw:points="0,0 28,0 28,27 0,27">
          <text:p/>
        </draw:polygon>
        <draw:polygon draw:style-name="gr269" draw:text-style-name="P267" draw:layer="layout" svg:width="0.027cm" svg:height="0.026cm" svg:x="5.326cm" svg:y="10.097cm" svg:viewBox="0 0 28 27" draw:points="0,0 28,0 28,27 0,27">
          <text:p/>
        </draw:polygon>
        <draw:polygon draw:style-name="gr269" draw:text-style-name="P267" draw:layer="layout" svg:width="0.027cm" svg:height="0.026cm" svg:x="5.379cm" svg:y="10.097cm" svg:viewBox="0 0 28 27" draw:points="0,0 28,0 28,27 0,27">
          <text:p/>
        </draw:polygon>
        <draw:polygon draw:style-name="gr269" draw:text-style-name="P267" draw:layer="layout" svg:width="0.027cm" svg:height="0.026cm" svg:x="5.432cm" svg:y="10.097cm" svg:viewBox="0 0 28 27" draw:points="0,0 28,0 28,27 0,27">
          <text:p/>
        </draw:polygon>
        <draw:polygon draw:style-name="gr269" draw:text-style-name="P267" draw:layer="layout" svg:width="0.027cm" svg:height="0.026cm" svg:x="5.485cm" svg:y="10.097cm" svg:viewBox="0 0 28 27" draw:points="0,0 28,0 28,27 0,27">
          <text:p/>
        </draw:polygon>
        <draw:polygon draw:style-name="gr269" draw:text-style-name="P267" draw:layer="layout" svg:width="0.027cm" svg:height="0.026cm" svg:x="5.538cm" svg:y="10.097cm" svg:viewBox="0 0 28 27" draw:points="0,0 28,0 28,27 0,27">
          <text:p/>
        </draw:polygon>
        <draw:polygon draw:style-name="gr269" draw:text-style-name="P267" draw:layer="layout" svg:width="0.027cm" svg:height="0.026cm" svg:x="5.591cm" svg:y="10.097cm" svg:viewBox="0 0 28 27" draw:points="0,0 28,0 28,27 0,27">
          <text:p/>
        </draw:polygon>
        <draw:polygon draw:style-name="gr269" draw:text-style-name="P267" draw:layer="layout" svg:width="0.027cm" svg:height="0.026cm" svg:x="5.644cm" svg:y="10.097cm" svg:viewBox="0 0 28 27" draw:points="0,0 28,0 28,27 0,27">
          <text:p/>
        </draw:polygon>
        <draw:polygon draw:style-name="gr269" draw:text-style-name="P267" draw:layer="layout" svg:width="0.027cm" svg:height="0.026cm" svg:x="5.697cm" svg:y="10.097cm" svg:viewBox="0 0 28 27" draw:points="0,0 28,0 28,27 0,27">
          <text:p/>
        </draw:polygon>
        <draw:polygon draw:style-name="gr269" draw:text-style-name="P267" draw:layer="layout" svg:width="0.027cm" svg:height="0.026cm" svg:x="5.75cm" svg:y="10.097cm" svg:viewBox="0 0 28 27" draw:points="0,0 28,0 28,27 0,27">
          <text:p/>
        </draw:polygon>
        <draw:polygon draw:style-name="gr269" draw:text-style-name="P267" draw:layer="layout" svg:width="0.027cm" svg:height="0.026cm" svg:x="5.803cm" svg:y="10.097cm" svg:viewBox="0 0 28 27" draw:points="0,0 28,0 28,27 0,27">
          <text:p/>
        </draw:polygon>
        <draw:polygon draw:style-name="gr269" draw:text-style-name="P267" draw:layer="layout" svg:width="0.027cm" svg:height="0.026cm" svg:x="5.856cm" svg:y="10.097cm" svg:viewBox="0 0 28 27" draw:points="0,0 28,0 28,27 0,27">
          <text:p/>
        </draw:polygon>
        <draw:polygon draw:style-name="gr269" draw:text-style-name="P267" draw:layer="layout" svg:width="0.027cm" svg:height="0.026cm" svg:x="5.909cm" svg:y="10.097cm" svg:viewBox="0 0 28 27" draw:points="0,0 28,0 28,27 0,27">
          <text:p/>
        </draw:polygon>
        <draw:polygon draw:style-name="gr269" draw:text-style-name="P267" draw:layer="layout" svg:width="0.027cm" svg:height="0.026cm" svg:x="5.962cm" svg:y="10.097cm" svg:viewBox="0 0 28 27" draw:points="0,0 28,0 28,27 0,27">
          <text:p/>
        </draw:polygon>
        <draw:polygon draw:style-name="gr269" draw:text-style-name="P267" draw:layer="layout" svg:width="0.027cm" svg:height="0.026cm" svg:x="6.015cm" svg:y="10.097cm" svg:viewBox="0 0 28 27" draw:points="0,0 28,0 28,27 0,27">
          <text:p/>
        </draw:polygon>
        <draw:polygon draw:style-name="gr269" draw:text-style-name="P267" draw:layer="layout" svg:width="0.027cm" svg:height="0.026cm" svg:x="6.068cm" svg:y="10.097cm" svg:viewBox="0 0 28 27" draw:points="0,0 28,0 28,27 0,27">
          <text:p/>
        </draw:polygon>
        <draw:polygon draw:style-name="gr269" draw:text-style-name="P267" draw:layer="layout" svg:width="0.027cm" svg:height="0.026cm" svg:x="6.121cm" svg:y="10.097cm" svg:viewBox="0 0 28 27" draw:points="0,0 28,0 28,27 0,27">
          <text:p/>
        </draw:polygon>
        <draw:polygon draw:style-name="gr269" draw:text-style-name="P267" draw:layer="layout" svg:width="0.028cm" svg:height="0.026cm" svg:x="6.174cm" svg:y="10.097cm" svg:viewBox="0 0 29 27" draw:points="0,0 29,0 29,27 0,27">
          <text:p/>
        </draw:polygon>
        <draw:polygon draw:style-name="gr269" draw:text-style-name="P267" draw:layer="layout" svg:width="0.027cm" svg:height="0.026cm" svg:x="6.227cm" svg:y="10.097cm" svg:viewBox="0 0 28 27" draw:points="0,0 28,0 28,27 0,27">
          <text:p/>
        </draw:polygon>
        <draw:polygon draw:style-name="gr269" draw:text-style-name="P267" draw:layer="layout" svg:width="0.027cm" svg:height="0.026cm" svg:x="6.28cm" svg:y="10.097cm" svg:viewBox="0 0 28 27" draw:points="0,0 28,0 28,27 0,27">
          <text:p/>
        </draw:polygon>
        <draw:polygon draw:style-name="gr269" draw:text-style-name="P267" draw:layer="layout" svg:width="0.027cm" svg:height="0.026cm" svg:x="6.333cm" svg:y="10.097cm" svg:viewBox="0 0 28 27" draw:points="0,0 28,0 28,27 0,27">
          <text:p/>
        </draw:polygon>
        <draw:polygon draw:style-name="gr269" draw:text-style-name="P267" draw:layer="layout" svg:width="0.026cm" svg:height="0.026cm" svg:x="6.387cm" svg:y="10.097cm" svg:viewBox="0 0 27 27" draw:points="0,0 27,0 27,27 0,27">
          <text:p/>
        </draw:polygon>
        <draw:polygon draw:style-name="gr269" draw:text-style-name="P267" draw:layer="layout" svg:width="0.026cm" svg:height="0.026cm" svg:x="6.44cm" svg:y="10.097cm" svg:viewBox="0 0 27 27" draw:points="0,0 27,0 27,27 0,27">
          <text:p/>
        </draw:polygon>
        <draw:polygon draw:style-name="gr269" draw:text-style-name="P267" draw:layer="layout" svg:width="0.026cm" svg:height="0.026cm" svg:x="6.493cm" svg:y="10.097cm" svg:viewBox="0 0 27 27" draw:points="0,0 27,0 27,27 0,27">
          <text:p/>
        </draw:polygon>
        <draw:polygon draw:style-name="gr269" draw:text-style-name="P267" draw:layer="layout" svg:width="0.026cm" svg:height="0.026cm" svg:x="6.546cm" svg:y="10.097cm" svg:viewBox="0 0 27 27" draw:points="0,0 27,0 27,27 0,27">
          <text:p/>
        </draw:polygon>
        <draw:polygon draw:style-name="gr269" draw:text-style-name="P267" draw:layer="layout" svg:width="0.026cm" svg:height="0.026cm" svg:x="6.599cm" svg:y="10.097cm" svg:viewBox="0 0 27 27" draw:points="0,0 27,0 27,27 0,27">
          <text:p/>
        </draw:polygon>
        <draw:polygon draw:style-name="gr269" draw:text-style-name="P267" draw:layer="layout" svg:width="0.026cm" svg:height="0.026cm" svg:x="6.652cm" svg:y="10.097cm" svg:viewBox="0 0 27 27" draw:points="0,0 27,0 27,27 0,27">
          <text:p/>
        </draw:polygon>
        <draw:polygon draw:style-name="gr269" draw:text-style-name="P267" draw:layer="layout" svg:width="0.026cm" svg:height="0.026cm" svg:x="6.705cm" svg:y="10.097cm" svg:viewBox="0 0 27 27" draw:points="0,0 27,0 27,27 0,27">
          <text:p/>
        </draw:polygon>
        <draw:polygon draw:style-name="gr269" draw:text-style-name="P267" draw:layer="layout" svg:width="0.026cm" svg:height="0.026cm" svg:x="6.758cm" svg:y="10.097cm" svg:viewBox="0 0 27 27" draw:points="0,0 27,0 27,27 0,27">
          <text:p/>
        </draw:polygon>
        <draw:polygon draw:style-name="gr269" draw:text-style-name="P267" draw:layer="layout" svg:width="0.026cm" svg:height="0.026cm" svg:x="6.811cm" svg:y="10.097cm" svg:viewBox="0 0 27 27" draw:points="0,0 27,0 27,27 0,27">
          <text:p/>
        </draw:polygon>
        <draw:polygon draw:style-name="gr269" draw:text-style-name="P267" draw:layer="layout" svg:width="0.026cm" svg:height="0.026cm" svg:x="6.864cm" svg:y="10.097cm" svg:viewBox="0 0 27 27" draw:points="0,0 27,0 27,27 0,27">
          <text:p/>
        </draw:polygon>
        <draw:polygon draw:style-name="gr269" draw:text-style-name="P267" draw:layer="layout" svg:width="0.026cm" svg:height="0.026cm" svg:x="6.917cm" svg:y="10.097cm" svg:viewBox="0 0 27 27" draw:points="0,0 27,0 27,27 0,27">
          <text:p/>
        </draw:polygon>
        <draw:polygon draw:style-name="gr269" draw:text-style-name="P267" draw:layer="layout" svg:width="0.026cm" svg:height="0.026cm" svg:x="6.97cm" svg:y="10.097cm" svg:viewBox="0 0 27 27" draw:points="0,0 27,0 27,27 0,27">
          <text:p/>
        </draw:polygon>
        <draw:polygon draw:style-name="gr269" draw:text-style-name="P267" draw:layer="layout" svg:width="0.026cm" svg:height="0.026cm" svg:x="7.023cm" svg:y="10.097cm" svg:viewBox="0 0 27 27" draw:points="0,0 27,0 27,27 0,27">
          <text:p/>
        </draw:polygon>
        <draw:polygon draw:style-name="gr269" draw:text-style-name="P267" draw:layer="layout" svg:width="0.026cm" svg:height="0.026cm" svg:x="7.076cm" svg:y="10.097cm" svg:viewBox="0 0 27 27" draw:points="0,0 27,0 27,27 0,27">
          <text:p/>
        </draw:polygon>
        <draw:polygon draw:style-name="gr269" draw:text-style-name="P267" draw:layer="layout" svg:width="0.026cm" svg:height="0.026cm" svg:x="7.129cm" svg:y="10.097cm" svg:viewBox="0 0 27 27" draw:points="0,0 27,0 27,27 0,27">
          <text:p/>
        </draw:polygon>
        <draw:polygon draw:style-name="gr269" draw:text-style-name="P267" draw:layer="layout" svg:width="0.026cm" svg:height="0.026cm" svg:x="7.182cm" svg:y="10.097cm" svg:viewBox="0 0 27 27" draw:points="0,0 27,0 27,27 0,27">
          <text:p/>
        </draw:polygon>
        <draw:polygon draw:style-name="gr269" draw:text-style-name="P267" draw:layer="layout" svg:width="0.026cm" svg:height="0.026cm" svg:x="7.235cm" svg:y="10.097cm" svg:viewBox="0 0 27 27" draw:points="0,0 27,0 27,27 0,27">
          <text:p/>
        </draw:polygon>
        <draw:polygon draw:style-name="gr269" draw:text-style-name="P267" draw:layer="layout" svg:width="0.026cm" svg:height="0.026cm" svg:x="7.288cm" svg:y="10.097cm" svg:viewBox="0 0 27 27" draw:points="0,0 27,0 27,27 0,27">
          <text:p/>
        </draw:polygon>
        <draw:polygon draw:style-name="gr269" draw:text-style-name="P267" draw:layer="layout" svg:width="0.026cm" svg:height="0.026cm" svg:x="7.341cm" svg:y="10.097cm" svg:viewBox="0 0 27 27" draw:points="0,0 27,0 27,27 0,27">
          <text:p/>
        </draw:polygon>
        <draw:polygon draw:style-name="gr269" draw:text-style-name="P267" draw:layer="layout" svg:width="0.026cm" svg:height="0.026cm" svg:x="7.394cm" svg:y="10.097cm" svg:viewBox="0 0 27 27" draw:points="0,0 27,0 27,27 0,27">
          <text:p/>
        </draw:polygon>
        <draw:polygon draw:style-name="gr269" draw:text-style-name="P267" draw:layer="layout" svg:width="0.026cm" svg:height="0.026cm" svg:x="7.447cm" svg:y="10.097cm" svg:viewBox="0 0 27 27" draw:points="0,0 27,0 27,27 0,27">
          <text:p/>
        </draw:polygon>
        <draw:polygon draw:style-name="gr269" draw:text-style-name="P267" draw:layer="layout" svg:width="0.026cm" svg:height="0.026cm" svg:x="7.5cm" svg:y="10.097cm" svg:viewBox="0 0 27 27" draw:points="0,0 27,0 27,27 0,27">
          <text:p/>
        </draw:polygon>
        <draw:polygon draw:style-name="gr269" draw:text-style-name="P267" draw:layer="layout" svg:width="0.026cm" svg:height="0.026cm" svg:x="7.553cm" svg:y="10.097cm" svg:viewBox="0 0 27 27" draw:points="0,0 27,0 27,27 0,27">
          <text:p/>
        </draw:polygon>
        <draw:polygon draw:style-name="gr269" draw:text-style-name="P267" draw:layer="layout" svg:width="0.026cm" svg:height="0.026cm" svg:x="7.606cm" svg:y="10.097cm" svg:viewBox="0 0 27 27" draw:points="0,0 27,0 27,27 0,27">
          <text:p/>
        </draw:polygon>
        <draw:polygon draw:style-name="gr269" draw:text-style-name="P267" draw:layer="layout" svg:width="0.026cm" svg:height="0.026cm" svg:x="7.659cm" svg:y="10.097cm" svg:viewBox="0 0 27 27" draw:points="0,0 27,0 27,27 0,27">
          <text:p/>
        </draw:polygon>
        <draw:polygon draw:style-name="gr269" draw:text-style-name="P267" draw:layer="layout" svg:width="0.026cm" svg:height="0.026cm" svg:x="7.712cm" svg:y="10.097cm" svg:viewBox="0 0 27 27" draw:points="0,0 27,0 27,27 0,27">
          <text:p/>
        </draw:polygon>
        <draw:polygon draw:style-name="gr269" draw:text-style-name="P267" draw:layer="layout" svg:width="0.026cm" svg:height="0.026cm" svg:x="7.765cm" svg:y="10.097cm" svg:viewBox="0 0 27 27" draw:points="0,0 27,0 27,27 0,27">
          <text:p/>
        </draw:polygon>
        <draw:polygon draw:style-name="gr269" draw:text-style-name="P267" draw:layer="layout" svg:width="0.026cm" svg:height="0.026cm" svg:x="7.818cm" svg:y="10.097cm" svg:viewBox="0 0 27 27" draw:points="0,0 27,0 27,27 0,27">
          <text:p/>
        </draw:polygon>
        <draw:polygon draw:style-name="gr269" draw:text-style-name="P267" draw:layer="layout" svg:width="0.026cm" svg:height="0.026cm" svg:x="7.871cm" svg:y="10.097cm" svg:viewBox="0 0 27 27" draw:points="0,0 27,0 27,27 0,27">
          <text:p/>
        </draw:polygon>
        <draw:polygon draw:style-name="gr269" draw:text-style-name="P267" draw:layer="layout" svg:width="0.026cm" svg:height="0.026cm" svg:x="7.924cm" svg:y="10.097cm" svg:viewBox="0 0 27 27" draw:points="0,0 27,0 27,27 0,27">
          <text:p/>
        </draw:polygon>
        <draw:polygon draw:style-name="gr269" draw:text-style-name="P267" draw:layer="layout" svg:width="0.026cm" svg:height="0.026cm" svg:x="7.977cm" svg:y="10.097cm" svg:viewBox="0 0 27 27" draw:points="0,0 27,0 27,27 0,27">
          <text:p/>
        </draw:polygon>
        <draw:polygon draw:style-name="gr269" draw:text-style-name="P267" draw:layer="layout" svg:width="0.026cm" svg:height="0.026cm" svg:x="8.03cm" svg:y="10.097cm" svg:viewBox="0 0 27 27" draw:points="0,0 27,0 27,27 0,27">
          <text:p/>
        </draw:polygon>
        <draw:polygon draw:style-name="gr269" draw:text-style-name="P267" draw:layer="layout" svg:width="0.026cm" svg:height="0.026cm" svg:x="8.083cm" svg:y="10.097cm" svg:viewBox="0 0 27 27" draw:points="0,0 27,0 27,27 0,27">
          <text:p/>
        </draw:polygon>
        <draw:polygon draw:style-name="gr269" draw:text-style-name="P267" draw:layer="layout" svg:width="0.026cm" svg:height="0.026cm" svg:x="8.136cm" svg:y="10.097cm" svg:viewBox="0 0 27 27" draw:points="0,0 27,0 27,27 0,27">
          <text:p/>
        </draw:polygon>
        <draw:polygon draw:style-name="gr269" draw:text-style-name="P267" draw:layer="layout" svg:width="0.026cm" svg:height="0.026cm" svg:x="8.189cm" svg:y="10.097cm" svg:viewBox="0 0 27 27" draw:points="0,0 27,0 27,27 0,27">
          <text:p/>
        </draw:polygon>
        <draw:polygon draw:style-name="gr269" draw:text-style-name="P267" draw:layer="layout" svg:width="0.026cm" svg:height="0.026cm" svg:x="8.242cm" svg:y="10.097cm" svg:viewBox="0 0 27 27" draw:points="0,0 27,0 27,27 0,27">
          <text:p/>
        </draw:polygon>
        <draw:polygon draw:style-name="gr269" draw:text-style-name="P267" draw:layer="layout" svg:width="0.026cm" svg:height="0.026cm" svg:x="8.295cm" svg:y="10.097cm" svg:viewBox="0 0 27 27" draw:points="0,0 27,0 27,27 0,27">
          <text:p/>
        </draw:polygon>
        <draw:polygon draw:style-name="gr269" draw:text-style-name="P267" draw:layer="layout" svg:width="0.026cm" svg:height="0.026cm" svg:x="8.348cm" svg:y="10.097cm" svg:viewBox="0 0 27 27" draw:points="0,0 27,0 27,27 0,27">
          <text:p/>
        </draw:polygon>
        <draw:polygon draw:style-name="gr269" draw:text-style-name="P267" draw:layer="layout" svg:width="0.026cm" svg:height="0.026cm" svg:x="8.401cm" svg:y="10.097cm" svg:viewBox="0 0 27 27" draw:points="0,0 27,0 27,27 0,27">
          <text:p/>
        </draw:polygon>
        <draw:polygon draw:style-name="gr269" draw:text-style-name="P267" draw:layer="layout" svg:width="0.026cm" svg:height="0.026cm" svg:x="8.454cm" svg:y="10.097cm" svg:viewBox="0 0 27 27" draw:points="0,0 27,0 27,27 0,27">
          <text:p/>
        </draw:polygon>
        <draw:polygon draw:style-name="gr269" draw:text-style-name="P267" draw:layer="layout" svg:width="0.026cm" svg:height="0.026cm" svg:x="8.507cm" svg:y="10.097cm" svg:viewBox="0 0 27 27" draw:points="0,0 27,0 27,27 0,27">
          <text:p/>
        </draw:polygon>
        <draw:polygon draw:style-name="gr269" draw:text-style-name="P267" draw:layer="layout" svg:width="0.026cm" svg:height="0.026cm" svg:x="8.56cm" svg:y="10.097cm" svg:viewBox="0 0 27 27" draw:points="0,0 27,0 27,27 0,27">
          <text:p/>
        </draw:polygon>
        <draw:polygon draw:style-name="gr269" draw:text-style-name="P267" draw:layer="layout" svg:width="0.026cm" svg:height="0.026cm" svg:x="8.613cm" svg:y="10.097cm" svg:viewBox="0 0 27 27" draw:points="0,0 27,0 27,27 0,27">
          <text:p/>
        </draw:polygon>
        <draw:polygon draw:style-name="gr269" draw:text-style-name="P267" draw:layer="layout" svg:width="0.026cm" svg:height="0.026cm" svg:x="8.666cm" svg:y="10.097cm" svg:viewBox="0 0 27 27" draw:points="0,0 27,0 27,27 0,27">
          <text:p/>
        </draw:polygon>
        <draw:polygon draw:style-name="gr269" draw:text-style-name="P267" draw:layer="layout" svg:width="0.026cm" svg:height="0.026cm" svg:x="8.719cm" svg:y="10.097cm" svg:viewBox="0 0 27 27" draw:points="0,0 27,0 27,27 0,27">
          <text:p/>
        </draw:polygon>
        <draw:polygon draw:style-name="gr269" draw:text-style-name="P267" draw:layer="layout" svg:width="0.026cm" svg:height="0.026cm" svg:x="8.772cm" svg:y="10.097cm" svg:viewBox="0 0 27 27" draw:points="0,0 27,0 27,27 0,27">
          <text:p/>
        </draw:polygon>
        <draw:polygon draw:style-name="gr269" draw:text-style-name="P267" draw:layer="layout" svg:width="0.026cm" svg:height="0.026cm" svg:x="8.825cm" svg:y="10.097cm" svg:viewBox="0 0 27 27" draw:points="0,0 27,0 27,27 0,27">
          <text:p/>
        </draw:polygon>
        <draw:polygon draw:style-name="gr269" draw:text-style-name="P267" draw:layer="layout" svg:width="0.026cm" svg:height="0.026cm" svg:x="8.878cm" svg:y="10.097cm" svg:viewBox="0 0 27 27" draw:points="0,0 27,0 27,27 0,27">
          <text:p/>
        </draw:polygon>
        <draw:polygon draw:style-name="gr269" draw:text-style-name="P267" draw:layer="layout" svg:width="0.026cm" svg:height="0.026cm" svg:x="8.931cm" svg:y="10.097cm" svg:viewBox="0 0 27 27" draw:points="0,0 27,0 27,27 0,27">
          <text:p/>
        </draw:polygon>
        <draw:polygon draw:style-name="gr269" draw:text-style-name="P267" draw:layer="layout" svg:width="0.026cm" svg:height="0.026cm" svg:x="8.984cm" svg:y="10.097cm" svg:viewBox="0 0 27 27" draw:points="0,0 27,0 27,27 0,27">
          <text:p/>
        </draw:polygon>
        <draw:polygon draw:style-name="gr269" draw:text-style-name="P267" draw:layer="layout" svg:width="0.026cm" svg:height="0.026cm" svg:x="9.037cm" svg:y="10.097cm" svg:viewBox="0 0 27 27" draw:points="0,0 27,0 27,27 0,27">
          <text:p/>
        </draw:polygon>
        <draw:polygon draw:style-name="gr269" draw:text-style-name="P267" draw:layer="layout" svg:width="0.026cm" svg:height="0.026cm" svg:x="9.09cm" svg:y="10.097cm" svg:viewBox="0 0 27 27" draw:points="0,0 27,0 27,27 0,27">
          <text:p/>
        </draw:polygon>
        <draw:polygon draw:style-name="gr269" draw:text-style-name="P267" draw:layer="layout" svg:width="0.026cm" svg:height="0.026cm" svg:x="9.143cm" svg:y="10.097cm" svg:viewBox="0 0 27 27" draw:points="0,0 27,0 27,27 0,27">
          <text:p/>
        </draw:polygon>
        <draw:polygon draw:style-name="gr269" draw:text-style-name="P267" draw:layer="layout" svg:width="0.026cm" svg:height="0.026cm" svg:x="9.196cm" svg:y="10.097cm" svg:viewBox="0 0 27 27" draw:points="0,0 27,0 27,27 0,27">
          <text:p/>
        </draw:polygon>
        <draw:polygon draw:style-name="gr269" draw:text-style-name="P267" draw:layer="layout" svg:width="0.026cm" svg:height="0.026cm" svg:x="9.249cm" svg:y="10.097cm" svg:viewBox="0 0 27 27" draw:points="0,0 27,0 27,27 0,27">
          <text:p/>
        </draw:polygon>
        <draw:polygon draw:style-name="gr269" draw:text-style-name="P267" draw:layer="layout" svg:width="0.026cm" svg:height="0.026cm" svg:x="9.302cm" svg:y="10.097cm" svg:viewBox="0 0 27 27" draw:points="0,0 27,0 27,27 0,27">
          <text:p/>
        </draw:polygon>
        <draw:polygon draw:style-name="gr269" draw:text-style-name="P267" draw:layer="layout" svg:width="0.026cm" svg:height="0.026cm" svg:x="9.355cm" svg:y="10.097cm" svg:viewBox="0 0 27 27" draw:points="0,0 27,0 27,27 0,27">
          <text:p/>
        </draw:polygon>
        <draw:polygon draw:style-name="gr269" draw:text-style-name="P267" draw:layer="layout" svg:width="0.026cm" svg:height="0.026cm" svg:x="9.408cm" svg:y="10.097cm" svg:viewBox="0 0 27 27" draw:points="0,0 27,0 27,27 0,27">
          <text:p/>
        </draw:polygon>
        <draw:polygon draw:style-name="gr269" draw:text-style-name="P267" draw:layer="layout" svg:width="0.026cm" svg:height="0.026cm" svg:x="9.461cm" svg:y="10.097cm" svg:viewBox="0 0 27 27" draw:points="0,0 27,0 27,27 0,27">
          <text:p/>
        </draw:polygon>
        <draw:polygon draw:style-name="gr269" draw:text-style-name="P267" draw:layer="layout" svg:width="0.026cm" svg:height="0.026cm" svg:x="9.514cm" svg:y="10.097cm" svg:viewBox="0 0 27 27" draw:points="0,0 27,0 27,27 0,27">
          <text:p/>
        </draw:polygon>
        <draw:polygon draw:style-name="gr269" draw:text-style-name="P267" draw:layer="layout" svg:width="0.026cm" svg:height="0.026cm" svg:x="9.567cm" svg:y="10.097cm" svg:viewBox="0 0 27 27" draw:points="0,0 27,0 27,27 0,27">
          <text:p/>
        </draw:polygon>
        <draw:polygon draw:style-name="gr269" draw:text-style-name="P267" draw:layer="layout" svg:width="0.026cm" svg:height="0.026cm" svg:x="9.62cm" svg:y="10.097cm" svg:viewBox="0 0 27 27" draw:points="0,0 27,0 27,27 0,27">
          <text:p/>
        </draw:polygon>
        <draw:polygon draw:style-name="gr269" draw:text-style-name="P267" draw:layer="layout" svg:width="0.026cm" svg:height="0.026cm" svg:x="9.673cm" svg:y="10.097cm" svg:viewBox="0 0 27 27" draw:points="0,0 27,0 27,27 0,27">
          <text:p/>
        </draw:polygon>
        <draw:polygon draw:style-name="gr269" draw:text-style-name="P267" draw:layer="layout" svg:width="0.026cm" svg:height="0.026cm" svg:x="9.726cm" svg:y="10.097cm" svg:viewBox="0 0 27 27" draw:points="0,0 27,0 27,27 0,27">
          <text:p/>
        </draw:polygon>
        <draw:polygon draw:style-name="gr269" draw:text-style-name="P267" draw:layer="layout" svg:width="0.026cm" svg:height="0.026cm" svg:x="9.779cm" svg:y="10.097cm" svg:viewBox="0 0 27 27" draw:points="0,0 27,0 27,27 0,27">
          <text:p/>
        </draw:polygon>
        <draw:polygon draw:style-name="gr269" draw:text-style-name="P267" draw:layer="layout" svg:width="0.026cm" svg:height="0.026cm" svg:x="9.832cm" svg:y="10.097cm" svg:viewBox="0 0 27 27" draw:points="0,0 27,0 27,27 0,27">
          <text:p/>
        </draw:polygon>
        <draw:polygon draw:style-name="gr269" draw:text-style-name="P267" draw:layer="layout" svg:width="0.026cm" svg:height="0.026cm" svg:x="9.885cm" svg:y="10.097cm" svg:viewBox="0 0 27 27" draw:points="0,0 27,0 27,27 0,27">
          <text:p/>
        </draw:polygon>
        <draw:polygon draw:style-name="gr269" draw:text-style-name="P267" draw:layer="layout" svg:width="0.026cm" svg:height="0.026cm" svg:x="9.938cm" svg:y="10.097cm" svg:viewBox="0 0 27 27" draw:points="0,0 27,0 27,27 0,27">
          <text:p/>
        </draw:polygon>
        <draw:polygon draw:style-name="gr269" draw:text-style-name="P267" draw:layer="layout" svg:width="0.026cm" svg:height="0.026cm" svg:x="9.991cm" svg:y="10.097cm" svg:viewBox="0 0 27 27" draw:points="0,0 27,0 27,27 0,27">
          <text:p/>
        </draw:polygon>
        <draw:polygon draw:style-name="gr269" draw:text-style-name="P267" draw:layer="layout" svg:width="0.026cm" svg:height="0.026cm" svg:x="10.044cm" svg:y="10.097cm" svg:viewBox="0 0 27 27" draw:points="0,0 27,0 27,27 0,27">
          <text:p/>
        </draw:polygon>
        <draw:polygon draw:style-name="gr269" draw:text-style-name="P267" draw:layer="layout" svg:width="0.026cm" svg:height="0.026cm" svg:x="10.097cm" svg:y="10.097cm" svg:viewBox="0 0 27 27" draw:points="0,0 27,0 27,27 0,27">
          <text:p/>
        </draw:polygon>
        <draw:polygon draw:style-name="gr269" draw:text-style-name="P267" draw:layer="layout" svg:width="0.026cm" svg:height="0.026cm" svg:x="10.15cm" svg:y="10.097cm" svg:viewBox="0 0 27 27" draw:points="0,0 27,0 27,27 0,27">
          <text:p/>
        </draw:polygon>
        <draw:polygon draw:style-name="gr269" draw:text-style-name="P267" draw:layer="layout" svg:width="0.026cm" svg:height="0.026cm" svg:x="10.203cm" svg:y="10.097cm" svg:viewBox="0 0 27 27" draw:points="0,0 27,0 27,27 0,27">
          <text:p/>
        </draw:polygon>
        <draw:polygon draw:style-name="gr269" draw:text-style-name="P267" draw:layer="layout" svg:width="0.026cm" svg:height="0.026cm" svg:x="10.256cm" svg:y="10.097cm" svg:viewBox="0 0 27 27" draw:points="0,0 27,0 27,27 0,27">
          <text:p/>
        </draw:polygon>
        <draw:polygon draw:style-name="gr269" draw:text-style-name="P267" draw:layer="layout" svg:width="0.026cm" svg:height="0.026cm" svg:x="10.309cm" svg:y="10.097cm" svg:viewBox="0 0 27 27" draw:points="0,0 27,0 27,27 0,27">
          <text:p/>
        </draw:polygon>
        <draw:polygon draw:style-name="gr269" draw:text-style-name="P267" draw:layer="layout" svg:width="0.026cm" svg:height="0.026cm" svg:x="10.362cm" svg:y="10.097cm" svg:viewBox="0 0 27 27" draw:points="0,0 27,0 27,27 0,27">
          <text:p/>
        </draw:polygon>
        <draw:polygon draw:style-name="gr269" draw:text-style-name="P267" draw:layer="layout" svg:width="0.026cm" svg:height="0.026cm" svg:x="10.415cm" svg:y="10.097cm" svg:viewBox="0 0 27 27" draw:points="0,0 27,0 27,27 0,27">
          <text:p/>
        </draw:polygon>
        <draw:polygon draw:style-name="gr269" draw:text-style-name="P267" draw:layer="layout" svg:width="0.026cm" svg:height="0.026cm" svg:x="10.468cm" svg:y="10.097cm" svg:viewBox="0 0 27 27" draw:points="0,0 27,0 27,27 0,27">
          <text:p/>
        </draw:polygon>
        <draw:polygon draw:style-name="gr269" draw:text-style-name="P267" draw:layer="layout" svg:width="0.026cm" svg:height="0.026cm" svg:x="10.521cm" svg:y="10.097cm" svg:viewBox="0 0 27 27" draw:points="0,0 27,0 27,27 0,27">
          <text:p/>
        </draw:polygon>
        <draw:polygon draw:style-name="gr269" draw:text-style-name="P267" draw:layer="layout" svg:width="0.026cm" svg:height="0.026cm" svg:x="10.574cm" svg:y="10.097cm" svg:viewBox="0 0 27 27" draw:points="0,0 27,0 27,27 0,27">
          <text:p/>
        </draw:polygon>
        <draw:polygon draw:style-name="gr269" draw:text-style-name="P267" draw:layer="layout" svg:width="0.026cm" svg:height="0.026cm" svg:x="10.627cm" svg:y="10.097cm" svg:viewBox="0 0 27 27" draw:points="0,0 27,0 27,27 0,27">
          <text:p/>
        </draw:polygon>
        <draw:polygon draw:style-name="gr269" draw:text-style-name="P267" draw:layer="layout" svg:width="0.026cm" svg:height="0.026cm" svg:x="10.68cm" svg:y="10.097cm" svg:viewBox="0 0 27 27" draw:points="0,0 27,0 27,27 0,27">
          <text:p/>
        </draw:polygon>
        <draw:polygon draw:style-name="gr269" draw:text-style-name="P267" draw:layer="layout" svg:width="0.026cm" svg:height="0.026cm" svg:x="10.733cm" svg:y="10.097cm" svg:viewBox="0 0 27 27" draw:points="0,0 27,0 27,27 0,27">
          <text:p/>
        </draw:polygon>
        <draw:polygon draw:style-name="gr269" draw:text-style-name="P267" draw:layer="layout" svg:width="0.026cm" svg:height="0.026cm" svg:x="10.786cm" svg:y="10.097cm" svg:viewBox="0 0 27 27" draw:points="0,0 27,0 27,27 0,27">
          <text:p/>
        </draw:polygon>
        <draw:polygon draw:style-name="gr269" draw:text-style-name="P267" draw:layer="layout" svg:width="0.026cm" svg:height="0.026cm" svg:x="10.839cm" svg:y="10.097cm" svg:viewBox="0 0 27 27" draw:points="0,0 27,0 27,27 0,27">
          <text:p/>
        </draw:polygon>
        <draw:polygon draw:style-name="gr269" draw:text-style-name="P267" draw:layer="layout" svg:width="0.026cm" svg:height="0.026cm" svg:x="10.892cm" svg:y="10.097cm" svg:viewBox="0 0 27 27" draw:points="0,0 27,0 27,27 0,27">
          <text:p/>
        </draw:polygon>
        <draw:polygon draw:style-name="gr269" draw:text-style-name="P267" draw:layer="layout" svg:width="0.026cm" svg:height="0.026cm" svg:x="10.945cm" svg:y="10.097cm" svg:viewBox="0 0 27 27" draw:points="0,0 27,0 27,27 0,27">
          <text:p/>
        </draw:polygon>
        <draw:polygon draw:style-name="gr269" draw:text-style-name="P267" draw:layer="layout" svg:width="0.026cm" svg:height="0.026cm" svg:x="10.998cm" svg:y="10.097cm" svg:viewBox="0 0 27 27" draw:points="0,0 27,0 27,27 0,27">
          <text:p/>
        </draw:polygon>
        <draw:polygon draw:style-name="gr269" draw:text-style-name="P267" draw:layer="layout" svg:width="0.026cm" svg:height="0.026cm" svg:x="11.051cm" svg:y="10.097cm" svg:viewBox="0 0 27 27" draw:points="0,0 27,0 27,27 0,27">
          <text:p/>
        </draw:polygon>
        <draw:polygon draw:style-name="gr269" draw:text-style-name="P267" draw:layer="layout" svg:width="0.026cm" svg:height="0.026cm" svg:x="11.104cm" svg:y="10.097cm" svg:viewBox="0 0 27 27" draw:points="0,0 27,0 27,27 0,27">
          <text:p/>
        </draw:polygon>
        <draw:polygon draw:style-name="gr269" draw:text-style-name="P267" draw:layer="layout" svg:width="0.026cm" svg:height="0.026cm" svg:x="11.157cm" svg:y="10.097cm" svg:viewBox="0 0 27 27" draw:points="0,0 27,0 27,27 0,27">
          <text:p/>
        </draw:polygon>
        <draw:polygon draw:style-name="gr269" draw:text-style-name="P267" draw:layer="layout" svg:width="0.026cm" svg:height="0.026cm" svg:x="11.21cm" svg:y="10.097cm" svg:viewBox="0 0 27 27" draw:points="0,0 27,0 27,27 0,27">
          <text:p/>
        </draw:polygon>
        <draw:polygon draw:style-name="gr269" draw:text-style-name="P267" draw:layer="layout" svg:width="0.026cm" svg:height="0.026cm" svg:x="11.263cm" svg:y="10.097cm" svg:viewBox="0 0 27 27" draw:points="0,0 27,0 27,27 0,27">
          <text:p/>
        </draw:polygon>
        <draw:polygon draw:style-name="gr269" draw:text-style-name="P267" draw:layer="layout" svg:width="0.026cm" svg:height="0.026cm" svg:x="11.316cm" svg:y="10.097cm" svg:viewBox="0 0 27 27" draw:points="0,0 27,0 27,27 0,27">
          <text:p/>
        </draw:polygon>
        <draw:polygon draw:style-name="gr269" draw:text-style-name="P267" draw:layer="layout" svg:width="0.026cm" svg:height="0.026cm" svg:x="11.369cm" svg:y="10.097cm" svg:viewBox="0 0 27 27" draw:points="0,0 27,0 27,27 0,27">
          <text:p/>
        </draw:polygon>
        <draw:polygon draw:style-name="gr269" draw:text-style-name="P267" draw:layer="layout" svg:width="0.026cm" svg:height="0.026cm" svg:x="11.422cm" svg:y="10.097cm" svg:viewBox="0 0 27 27" draw:points="0,0 27,0 27,27 0,27">
          <text:p/>
        </draw:polygon>
        <draw:polygon draw:style-name="gr269" draw:text-style-name="P267" draw:layer="layout" svg:width="0.026cm" svg:height="0.026cm" svg:x="11.475cm" svg:y="10.097cm" svg:viewBox="0 0 27 27" draw:points="0,0 27,0 27,27 0,27">
          <text:p/>
        </draw:polygon>
        <draw:polygon draw:style-name="gr269" draw:text-style-name="P267" draw:layer="layout" svg:width="0.026cm" svg:height="0.026cm" svg:x="11.528cm" svg:y="10.097cm" svg:viewBox="0 0 27 27" draw:points="0,0 27,0 27,27 0,27">
          <text:p/>
        </draw:polygon>
        <draw:polygon draw:style-name="gr269" draw:text-style-name="P267" draw:layer="layout" svg:width="0.026cm" svg:height="0.026cm" svg:x="11.581cm" svg:y="10.097cm" svg:viewBox="0 0 27 27" draw:points="0,0 27,0 27,27 0,27">
          <text:p/>
        </draw:polygon>
        <draw:polygon draw:style-name="gr269" draw:text-style-name="P267" draw:layer="layout" svg:width="0.026cm" svg:height="0.026cm" svg:x="11.634cm" svg:y="10.097cm" svg:viewBox="0 0 27 27" draw:points="0,0 27,0 27,27 0,27">
          <text:p/>
        </draw:polygon>
        <draw:polygon draw:style-name="gr269" draw:text-style-name="P267" draw:layer="layout" svg:width="0.026cm" svg:height="0.026cm" svg:x="11.687cm" svg:y="10.097cm" svg:viewBox="0 0 27 27" draw:points="0,0 27,0 27,27 0,27">
          <text:p/>
        </draw:polygon>
        <draw:polygon draw:style-name="gr269" draw:text-style-name="P267" draw:layer="layout" svg:width="0.026cm" svg:height="0.026cm" svg:x="11.74cm" svg:y="10.097cm" svg:viewBox="0 0 27 27" draw:points="0,0 27,0 27,27 0,27">
          <text:p/>
        </draw:polygon>
        <draw:polygon draw:style-name="gr269" draw:text-style-name="P267" draw:layer="layout" svg:width="0.026cm" svg:height="0.026cm" svg:x="11.793cm" svg:y="10.097cm" svg:viewBox="0 0 27 27" draw:points="0,0 27,0 27,27 0,27">
          <text:p/>
        </draw:polygon>
        <draw:polygon draw:style-name="gr269" draw:text-style-name="P267" draw:layer="layout" svg:width="0.026cm" svg:height="0.026cm" svg:x="11.846cm" svg:y="10.097cm" svg:viewBox="0 0 27 27" draw:points="0,0 27,0 27,27 0,27">
          <text:p/>
        </draw:polygon>
        <draw:polygon draw:style-name="gr269" draw:text-style-name="P267" draw:layer="layout" svg:width="0.026cm" svg:height="0.026cm" svg:x="11.899cm" svg:y="10.097cm" svg:viewBox="0 0 27 27" draw:points="0,0 27,0 27,27 0,27">
          <text:p/>
        </draw:polygon>
        <draw:polygon draw:style-name="gr269" draw:text-style-name="P267" draw:layer="layout" svg:width="0.026cm" svg:height="0.026cm" svg:x="11.952cm" svg:y="10.097cm" svg:viewBox="0 0 27 27" draw:points="0,0 27,0 27,27 0,27">
          <text:p/>
        </draw:polygon>
        <draw:polygon draw:style-name="gr269" draw:text-style-name="P267" draw:layer="layout" svg:width="0.026cm" svg:height="0.026cm" svg:x="12.005cm" svg:y="10.097cm" svg:viewBox="0 0 27 27" draw:points="0,0 27,0 27,27 0,27">
          <text:p/>
        </draw:polygon>
        <draw:polygon draw:style-name="gr269" draw:text-style-name="P267" draw:layer="layout" svg:width="0.026cm" svg:height="0.026cm" svg:x="12.058cm" svg:y="10.097cm" svg:viewBox="0 0 27 27" draw:points="0,0 27,0 27,27 0,27">
          <text:p/>
        </draw:polygon>
        <draw:polygon draw:style-name="gr269" draw:text-style-name="P267" draw:layer="layout" svg:width="0.026cm" svg:height="0.026cm" svg:x="12.111cm" svg:y="10.097cm" svg:viewBox="0 0 27 27" draw:points="0,0 27,0 27,27 0,27">
          <text:p/>
        </draw:polygon>
        <draw:polygon draw:style-name="gr269" draw:text-style-name="P267" draw:layer="layout" svg:width="0.026cm" svg:height="0.026cm" svg:x="12.164cm" svg:y="10.097cm" svg:viewBox="0 0 27 27" draw:points="0,0 27,0 27,27 0,27">
          <text:p/>
        </draw:polygon>
        <draw:polygon draw:style-name="gr269" draw:text-style-name="P267" draw:layer="layout" svg:width="0.026cm" svg:height="0.026cm" svg:x="12.217cm" svg:y="10.097cm" svg:viewBox="0 0 27 27" draw:points="0,0 27,0 27,27 0,27">
          <text:p/>
        </draw:polygon>
        <draw:polygon draw:style-name="gr269" draw:text-style-name="P267" draw:layer="layout" svg:width="0.026cm" svg:height="0.026cm" svg:x="12.27cm" svg:y="10.097cm" svg:viewBox="0 0 27 27" draw:points="0,0 27,0 27,27 0,27">
          <text:p/>
        </draw:polygon>
        <draw:polygon draw:style-name="gr269" draw:text-style-name="P267" draw:layer="layout" svg:width="0.026cm" svg:height="0.026cm" svg:x="12.323cm" svg:y="10.097cm" svg:viewBox="0 0 27 27" draw:points="0,0 27,0 27,27 0,27">
          <text:p/>
        </draw:polygon>
        <draw:polygon draw:style-name="gr269" draw:text-style-name="P267" draw:layer="layout" svg:width="0.026cm" svg:height="0.026cm" svg:x="12.376cm" svg:y="10.097cm" svg:viewBox="0 0 27 27" draw:points="0,0 27,0 27,27 0,27">
          <text:p/>
        </draw:polygon>
        <draw:polygon draw:style-name="gr269" draw:text-style-name="P267" draw:layer="layout" svg:width="0.026cm" svg:height="0.026cm" svg:x="12.429cm" svg:y="10.097cm" svg:viewBox="0 0 27 27" draw:points="0,0 27,0 27,27 0,27">
          <text:p/>
        </draw:polygon>
        <draw:polygon draw:style-name="gr269" draw:text-style-name="P267" draw:layer="layout" svg:width="0.026cm" svg:height="0.026cm" svg:x="12.482cm" svg:y="10.097cm" svg:viewBox="0 0 27 27" draw:points="0,0 27,0 27,27 0,27">
          <text:p/>
        </draw:polygon>
        <draw:polygon draw:style-name="gr269" draw:text-style-name="P267" draw:layer="layout" svg:width="0.026cm" svg:height="0.026cm" svg:x="12.535cm" svg:y="10.097cm" svg:viewBox="0 0 27 27" draw:points="0,0 27,0 27,27 0,27">
          <text:p/>
        </draw:polygon>
        <draw:polygon draw:style-name="gr269" draw:text-style-name="P267" draw:layer="layout" svg:width="0.026cm" svg:height="0.026cm" svg:x="12.588cm" svg:y="10.097cm" svg:viewBox="0 0 27 27" draw:points="0,0 27,0 27,27 0,27">
          <text:p/>
        </draw:polygon>
        <draw:polygon draw:style-name="gr269" draw:text-style-name="P267" draw:layer="layout" svg:width="0.026cm" svg:height="0.026cm" svg:x="12.641cm" svg:y="10.097cm" svg:viewBox="0 0 27 27" draw:points="0,0 27,0 27,27 0,27">
          <text:p/>
        </draw:polygon>
        <draw:polygon draw:style-name="gr269" draw:text-style-name="P267" draw:layer="layout" svg:width="0.027cm" svg:height="0.026cm" svg:x="12.694cm" svg:y="10.097cm" svg:viewBox="0 0 28 27" draw:points="0,0 28,0 28,27 0,27">
          <text:p/>
        </draw:polygon>
        <draw:polygon draw:style-name="gr269" draw:text-style-name="P267" draw:layer="layout" svg:width="0.027cm" svg:height="0.026cm" svg:x="12.747cm" svg:y="10.097cm" svg:viewBox="0 0 28 27" draw:points="0,0 28,0 28,27 0,27">
          <text:p/>
        </draw:polygon>
        <draw:polygon draw:style-name="gr269" draw:text-style-name="P267" draw:layer="layout" svg:width="0.027cm" svg:height="0.026cm" svg:x="12.8cm" svg:y="10.097cm" svg:viewBox="0 0 28 27" draw:points="0,0 28,0 28,27 0,27">
          <text:p/>
        </draw:polygon>
        <draw:polygon draw:style-name="gr269" draw:text-style-name="P267" draw:layer="layout" svg:width="0.027cm" svg:height="0.026cm" svg:x="12.853cm" svg:y="10.097cm" svg:viewBox="0 0 28 27" draw:points="0,0 28,0 28,27 0,27">
          <text:p/>
        </draw:polygon>
        <draw:polygon draw:style-name="gr269" draw:text-style-name="P267" draw:layer="layout" svg:width="0.027cm" svg:height="0.026cm" svg:x="12.906cm" svg:y="10.097cm" svg:viewBox="0 0 28 27" draw:points="0,0 28,0 28,27 0,27">
          <text:p/>
        </draw:polygon>
        <draw:polygon draw:style-name="gr269" draw:text-style-name="P267" draw:layer="layout" svg:width="0.027cm" svg:height="0.026cm" svg:x="12.959cm" svg:y="10.097cm" svg:viewBox="0 0 28 27" draw:points="0,0 28,0 28,27 0,27">
          <text:p/>
        </draw:polygon>
        <draw:polygon draw:style-name="gr269" draw:text-style-name="P267" draw:layer="layout" svg:width="0.028cm" svg:height="0.026cm" svg:x="13.012cm" svg:y="10.097cm" svg:viewBox="0 0 29 27" draw:points="0,0 29,0 29,27 0,27">
          <text:p/>
        </draw:polygon>
        <draw:polygon draw:style-name="gr269" draw:text-style-name="P267" draw:layer="layout" svg:width="0.027cm" svg:height="0.026cm" svg:x="13.065cm" svg:y="10.097cm" svg:viewBox="0 0 28 27" draw:points="0,0 28,0 28,27 0,27">
          <text:p/>
        </draw:polygon>
        <draw:polygon draw:style-name="gr269" draw:text-style-name="P267" draw:layer="layout" svg:width="0.027cm" svg:height="0.026cm" svg:x="13.118cm" svg:y="10.097cm" svg:viewBox="0 0 28 27" draw:points="0,0 28,0 28,27 0,27">
          <text:p/>
        </draw:polygon>
        <draw:polygon draw:style-name="gr269" draw:text-style-name="P267" draw:layer="layout" svg:width="0.027cm" svg:height="0.026cm" svg:x="13.171cm" svg:y="10.097cm" svg:viewBox="0 0 28 27" draw:points="0,0 28,0 28,27 0,27">
          <text:p/>
        </draw:polygon>
        <draw:polygon draw:style-name="gr269" draw:text-style-name="P267" draw:layer="layout" svg:width="0.027cm" svg:height="0.026cm" svg:x="13.224cm" svg:y="10.097cm" svg:viewBox="0 0 28 27" draw:points="0,0 28,0 28,27 0,27">
          <text:p/>
        </draw:polygon>
        <draw:polygon draw:style-name="gr269" draw:text-style-name="P267" draw:layer="layout" svg:width="0.027cm" svg:height="0.026cm" svg:x="13.277cm" svg:y="10.097cm" svg:viewBox="0 0 28 27" draw:points="0,0 28,0 28,27 0,27">
          <text:p/>
        </draw:polygon>
        <draw:polygon draw:style-name="gr269" draw:text-style-name="P267" draw:layer="layout" svg:width="0.027cm" svg:height="0.026cm" svg:x="13.33cm" svg:y="10.097cm" svg:viewBox="0 0 28 27" draw:points="0,0 28,0 28,27 0,27">
          <text:p/>
        </draw:polygon>
        <draw:polygon draw:style-name="gr269" draw:text-style-name="P267" draw:layer="layout" svg:width="0.027cm" svg:height="0.026cm" svg:x="13.383cm" svg:y="10.097cm" svg:viewBox="0 0 28 27" draw:points="0,0 28,0 28,27 0,27">
          <text:p/>
        </draw:polygon>
        <draw:polygon draw:style-name="gr269" draw:text-style-name="P267" draw:layer="layout" svg:width="0.027cm" svg:height="0.026cm" svg:x="13.436cm" svg:y="10.097cm" svg:viewBox="0 0 28 27" draw:points="0,0 28,0 28,27 0,27">
          <text:p/>
        </draw:polygon>
        <draw:polygon draw:style-name="gr269" draw:text-style-name="P267" draw:layer="layout" svg:width="0.027cm" svg:height="0.026cm" svg:x="13.489cm" svg:y="10.097cm" svg:viewBox="0 0 28 27" draw:points="0,0 28,0 28,27 0,27">
          <text:p/>
        </draw:polygon>
        <draw:polygon draw:style-name="gr269" draw:text-style-name="P267" draw:layer="layout" svg:width="0.027cm" svg:height="0.026cm" svg:x="13.542cm" svg:y="10.097cm" svg:viewBox="0 0 28 27" draw:points="0,0 28,0 28,27 0,27">
          <text:p/>
        </draw:polygon>
        <draw:polygon draw:style-name="gr269" draw:text-style-name="P267" draw:layer="layout" svg:width="0.027cm" svg:height="0.026cm" svg:x="13.595cm" svg:y="10.097cm" svg:viewBox="0 0 28 27" draw:points="0,0 28,0 28,27 0,27">
          <text:p/>
        </draw:polygon>
        <draw:polygon draw:style-name="gr269" draw:text-style-name="P267" draw:layer="layout" svg:width="0.027cm" svg:height="0.026cm" svg:x="13.648cm" svg:y="10.097cm" svg:viewBox="0 0 28 27" draw:points="0,0 28,0 28,27 0,27">
          <text:p/>
        </draw:polygon>
        <draw:polygon draw:style-name="gr269" draw:text-style-name="P267" draw:layer="layout" svg:width="0.027cm" svg:height="0.026cm" svg:x="13.701cm" svg:y="10.097cm" svg:viewBox="0 0 28 27" draw:points="0,0 28,0 28,27 0,27">
          <text:p/>
        </draw:polygon>
        <draw:polygon draw:style-name="gr269" draw:text-style-name="P267" draw:layer="layout" svg:width="0.027cm" svg:height="0.026cm" svg:x="13.754cm" svg:y="10.097cm" svg:viewBox="0 0 28 27" draw:points="0,0 28,0 28,27 0,27">
          <text:p/>
        </draw:polygon>
        <draw:polygon draw:style-name="gr269" draw:text-style-name="P267" draw:layer="layout" svg:width="0.027cm" svg:height="0.026cm" svg:x="13.807cm" svg:y="10.097cm" svg:viewBox="0 0 28 27" draw:points="0,0 28,0 28,27 0,27">
          <text:p/>
        </draw:polygon>
        <draw:polygon draw:style-name="gr269" draw:text-style-name="P267" draw:layer="layout" svg:width="0.027cm" svg:height="0.026cm" svg:x="13.86cm" svg:y="10.097cm" svg:viewBox="0 0 28 27" draw:points="0,0 28,0 28,27 0,27">
          <text:p/>
        </draw:polygon>
        <draw:polygon draw:style-name="gr269" draw:text-style-name="P267" draw:layer="layout" svg:width="0.027cm" svg:height="0.026cm" svg:x="13.913cm" svg:y="10.097cm" svg:viewBox="0 0 28 27" draw:points="0,0 28,0 28,27 0,27">
          <text:p/>
        </draw:polygon>
        <draw:polygon draw:style-name="gr269" draw:text-style-name="P267" draw:layer="layout" svg:width="0.027cm" svg:height="0.026cm" svg:x="13.966cm" svg:y="10.097cm" svg:viewBox="0 0 28 27" draw:points="0,0 28,0 28,27 0,27">
          <text:p/>
        </draw:polygon>
        <draw:polygon draw:style-name="gr269" draw:text-style-name="P267" draw:layer="layout" svg:width="0.027cm" svg:height="0.026cm" svg:x="14.019cm" svg:y="10.097cm" svg:viewBox="0 0 28 27" draw:points="0,0 28,0 28,27 0,27">
          <text:p/>
        </draw:polygon>
        <draw:polygon draw:style-name="gr269" draw:text-style-name="P267" draw:layer="layout" svg:width="0.027cm" svg:height="0.026cm" svg:x="14.072cm" svg:y="10.097cm" svg:viewBox="0 0 28 27" draw:points="0,0 28,0 28,27 0,27">
          <text:p/>
        </draw:polygon>
        <draw:polygon draw:style-name="gr269" draw:text-style-name="P267" draw:layer="layout" svg:width="0.027cm" svg:height="0.026cm" svg:x="14.125cm" svg:y="10.097cm" svg:viewBox="0 0 28 27" draw:points="0,0 28,0 28,27 0,27">
          <text:p/>
        </draw:polygon>
        <draw:polygon draw:style-name="gr269" draw:text-style-name="P267" draw:layer="layout" svg:width="0.027cm" svg:height="0.026cm" svg:x="14.178cm" svg:y="10.097cm" svg:viewBox="0 0 28 27" draw:points="0,0 28,0 28,27 0,27">
          <text:p/>
        </draw:polygon>
        <draw:polygon draw:style-name="gr269" draw:text-style-name="P267" draw:layer="layout" svg:width="0.027cm" svg:height="0.026cm" svg:x="14.231cm" svg:y="10.097cm" svg:viewBox="0 0 28 27" draw:points="0,0 28,0 28,27 0,27">
          <text:p/>
        </draw:polygon>
        <draw:polygon draw:style-name="gr269" draw:text-style-name="P267" draw:layer="layout" svg:width="0.027cm" svg:height="0.026cm" svg:x="14.284cm" svg:y="10.097cm" svg:viewBox="0 0 28 27" draw:points="0,0 28,0 28,27 0,27">
          <text:p/>
        </draw:polygon>
        <draw:polygon draw:style-name="gr269" draw:text-style-name="P267" draw:layer="layout" svg:width="0.027cm" svg:height="0.026cm" svg:x="14.337cm" svg:y="10.097cm" svg:viewBox="0 0 28 27" draw:points="0,0 28,0 28,27 0,27">
          <text:p/>
        </draw:polygon>
        <draw:polygon draw:style-name="gr269" draw:text-style-name="P267" draw:layer="layout" svg:width="0.028cm" svg:height="0.026cm" svg:x="14.39cm" svg:y="10.097cm" svg:viewBox="0 0 29 27" draw:points="0,0 29,0 29,27 0,27">
          <text:p/>
        </draw:polygon>
        <draw:polygon draw:style-name="gr269" draw:text-style-name="P267" draw:layer="layout" svg:width="0.027cm" svg:height="0.026cm" svg:x="14.443cm" svg:y="10.097cm" svg:viewBox="0 0 28 27" draw:points="0,0 28,0 28,27 0,27">
          <text:p/>
        </draw:polygon>
        <draw:polygon draw:style-name="gr269" draw:text-style-name="P267" draw:layer="layout" svg:width="0.027cm" svg:height="0.026cm" svg:x="14.496cm" svg:y="10.097cm" svg:viewBox="0 0 28 27" draw:points="0,0 28,0 28,27 0,27">
          <text:p/>
        </draw:polygon>
        <draw:polygon draw:style-name="gr269" draw:text-style-name="P267" draw:layer="layout" svg:width="0.027cm" svg:height="0.026cm" svg:x="14.549cm" svg:y="10.097cm" svg:viewBox="0 0 28 27" draw:points="0,0 28,0 28,27 0,27">
          <text:p/>
        </draw:polygon>
        <draw:polygon draw:style-name="gr269" draw:text-style-name="P267" draw:layer="layout" svg:width="0.027cm" svg:height="0.026cm" svg:x="14.602cm" svg:y="10.097cm" svg:viewBox="0 0 28 27" draw:points="0,0 28,0 28,27 0,27">
          <text:p/>
        </draw:polygon>
        <draw:polygon draw:style-name="gr269" draw:text-style-name="P267" draw:layer="layout" svg:width="0.027cm" svg:height="0.026cm" svg:x="14.655cm" svg:y="10.097cm" svg:viewBox="0 0 28 27" draw:points="0,0 28,0 28,27 0,27">
          <text:p/>
        </draw:polygon>
        <draw:polygon draw:style-name="gr269" draw:text-style-name="P267" draw:layer="layout" svg:width="0.027cm" svg:height="0.026cm" svg:x="14.708cm" svg:y="10.097cm" svg:viewBox="0 0 28 27" draw:points="0,0 28,0 28,27 0,27">
          <text:p/>
        </draw:polygon>
        <draw:polygon draw:style-name="gr269" draw:text-style-name="P267" draw:layer="layout" svg:width="0.027cm" svg:height="0.026cm" svg:x="14.761cm" svg:y="10.097cm" svg:viewBox="0 0 28 27" draw:points="0,0 28,0 28,27 0,27">
          <text:p/>
        </draw:polygon>
        <draw:polygon draw:style-name="gr269" draw:text-style-name="P267" draw:layer="layout" svg:width="0.027cm" svg:height="0.026cm" svg:x="14.814cm" svg:y="10.097cm" svg:viewBox="0 0 28 27" draw:points="0,0 28,0 28,27 0,27">
          <text:p/>
        </draw:polygon>
        <draw:polygon draw:style-name="gr269" draw:text-style-name="P267" draw:layer="layout" svg:width="0.027cm" svg:height="0.026cm" svg:x="14.867cm" svg:y="10.097cm" svg:viewBox="0 0 28 27" draw:points="0,0 28,0 28,27 0,27">
          <text:p/>
        </draw:polygon>
        <draw:polygon draw:style-name="gr269" draw:text-style-name="P267" draw:layer="layout" svg:width="0.027cm" svg:height="0.026cm" svg:x="14.92cm" svg:y="10.097cm" svg:viewBox="0 0 28 27" draw:points="0,0 28,0 28,27 0,27">
          <text:p/>
        </draw:polygon>
        <draw:polygon draw:style-name="gr269" draw:text-style-name="P267" draw:layer="layout" svg:width="0.027cm" svg:height="0.026cm" svg:x="14.973cm" svg:y="10.097cm" svg:viewBox="0 0 28 27" draw:points="0,0 28,0 28,27 0,27">
          <text:p/>
        </draw:polygon>
        <draw:polygon draw:style-name="gr269" draw:text-style-name="P267" draw:layer="layout" svg:width="0.027cm" svg:height="0.026cm" svg:x="15.026cm" svg:y="10.097cm" svg:viewBox="0 0 28 27" draw:points="0,0 28,0 28,27 0,27">
          <text:p/>
        </draw:polygon>
        <draw:polygon draw:style-name="gr269" draw:text-style-name="P267" draw:layer="layout" svg:width="0.027cm" svg:height="0.026cm" svg:x="15.079cm" svg:y="10.097cm" svg:viewBox="0 0 28 27" draw:points="0,0 28,0 28,27 0,27">
          <text:p/>
        </draw:polygon>
        <draw:polygon draw:style-name="gr269" draw:text-style-name="P267" draw:layer="layout" svg:width="0.027cm" svg:height="0.026cm" svg:x="15.132cm" svg:y="10.097cm" svg:viewBox="0 0 28 27" draw:points="0,0 28,0 28,27 0,27">
          <text:p/>
        </draw:polygon>
        <draw:polygon draw:style-name="gr269" draw:text-style-name="P267" draw:layer="layout" svg:width="0.027cm" svg:height="0.026cm" svg:x="15.185cm" svg:y="10.097cm" svg:viewBox="0 0 28 27" draw:points="0,0 28,0 28,27 0,27">
          <text:p/>
        </draw:polygon>
        <draw:polygon draw:style-name="gr269" draw:text-style-name="P267" draw:layer="layout" svg:width="0.027cm" svg:height="0.026cm" svg:x="15.238cm" svg:y="10.097cm" svg:viewBox="0 0 28 27" draw:points="0,0 28,0 28,27 0,27">
          <text:p/>
        </draw:polygon>
        <draw:polygon draw:style-name="gr269" draw:text-style-name="P267" draw:layer="layout" svg:width="0.027cm" svg:height="0.026cm" svg:x="15.291cm" svg:y="10.097cm" svg:viewBox="0 0 28 27" draw:points="0,0 28,0 28,27 0,27">
          <text:p/>
        </draw:polygon>
        <draw:polygon draw:style-name="gr269" draw:text-style-name="P267" draw:layer="layout" svg:width="0.027cm" svg:height="0.026cm" svg:x="15.344cm" svg:y="10.097cm" svg:viewBox="0 0 28 27" draw:points="0,0 28,0 28,27 0,27">
          <text:p/>
        </draw:polygon>
        <draw:polygon draw:style-name="gr269" draw:text-style-name="P267" draw:layer="layout" svg:width="0.027cm" svg:height="0.026cm" svg:x="15.397cm" svg:y="10.097cm" svg:viewBox="0 0 28 27" draw:points="0,0 28,0 28,27 0,27">
          <text:p/>
        </draw:polygon>
        <draw:polygon draw:style-name="gr269" draw:text-style-name="P267" draw:layer="layout" svg:width="0.027cm" svg:height="0.026cm" svg:x="15.45cm" svg:y="10.097cm" svg:viewBox="0 0 28 27" draw:points="0,0 28,0 28,27 0,27">
          <text:p/>
        </draw:polygon>
        <draw:polygon draw:style-name="gr269" draw:text-style-name="P267" draw:layer="layout" svg:width="0.027cm" svg:height="0.026cm" svg:x="15.503cm" svg:y="10.097cm" svg:viewBox="0 0 28 27" draw:points="0,0 28,0 28,27 0,27">
          <text:p/>
        </draw:polygon>
        <draw:polygon draw:style-name="gr269" draw:text-style-name="P267" draw:layer="layout" svg:width="0.027cm" svg:height="0.026cm" svg:x="15.556cm" svg:y="10.097cm" svg:viewBox="0 0 28 27" draw:points="0,0 28,0 28,27 0,27">
          <text:p/>
        </draw:polygon>
        <draw:polygon draw:style-name="gr269" draw:text-style-name="P267" draw:layer="layout" svg:width="0.027cm" svg:height="0.026cm" svg:x="15.609cm" svg:y="10.097cm" svg:viewBox="0 0 28 27" draw:points="0,0 28,0 28,27 0,27">
          <text:p/>
        </draw:polygon>
        <draw:polygon draw:style-name="gr269" draw:text-style-name="P267" draw:layer="layout" svg:width="0.027cm" svg:height="0.026cm" svg:x="15.662cm" svg:y="10.097cm" svg:viewBox="0 0 28 27" draw:points="0,0 28,0 28,27 0,27">
          <text:p/>
        </draw:polygon>
        <draw:polygon draw:style-name="gr269" draw:text-style-name="P267" draw:layer="layout" svg:width="0.027cm" svg:height="0.026cm" svg:x="15.715cm" svg:y="10.097cm" svg:viewBox="0 0 28 27" draw:points="0,0 28,0 28,27 0,27">
          <text:p/>
        </draw:polygon>
        <draw:polygon draw:style-name="gr269" draw:text-style-name="P267" draw:layer="layout" svg:width="0.028cm" svg:height="0.026cm" svg:x="15.768cm" svg:y="10.097cm" svg:viewBox="0 0 29 27" draw:points="0,0 29,0 29,27 0,27">
          <text:p/>
        </draw:polygon>
        <draw:polygon draw:style-name="gr269" draw:text-style-name="P267" draw:layer="layout" svg:width="0.027cm" svg:height="0.026cm" svg:x="15.821cm" svg:y="10.097cm" svg:viewBox="0 0 28 27" draw:points="0,0 28,0 28,27 0,27">
          <text:p/>
        </draw:polygon>
        <draw:polygon draw:style-name="gr269" draw:text-style-name="P267" draw:layer="layout" svg:width="0.027cm" svg:height="0.026cm" svg:x="15.874cm" svg:y="10.097cm" svg:viewBox="0 0 28 27" draw:points="0,0 28,0 28,27 0,27">
          <text:p/>
        </draw:polygon>
        <draw:polygon draw:style-name="gr269" draw:text-style-name="P267" draw:layer="layout" svg:width="0.027cm" svg:height="0.026cm" svg:x="15.927cm" svg:y="10.097cm" svg:viewBox="0 0 28 27" draw:points="0,0 28,0 28,27 0,27">
          <text:p/>
        </draw:polygon>
        <draw:polygon draw:style-name="gr269" draw:text-style-name="P267" draw:layer="layout" svg:width="0.027cm" svg:height="0.026cm" svg:x="15.98cm" svg:y="10.097cm" svg:viewBox="0 0 28 27" draw:points="0,0 28,0 28,27 0,27">
          <text:p/>
        </draw:polygon>
        <draw:polygon draw:style-name="gr269" draw:text-style-name="P267" draw:layer="layout" svg:width="0.027cm" svg:height="0.026cm" svg:x="16.033cm" svg:y="10.097cm" svg:viewBox="0 0 28 27" draw:points="0,0 28,0 28,27 0,27">
          <text:p/>
        </draw:polygon>
        <draw:polygon draw:style-name="gr269" draw:text-style-name="P267" draw:layer="layout" svg:width="0.027cm" svg:height="0.026cm" svg:x="16.086cm" svg:y="10.097cm" svg:viewBox="0 0 28 27" draw:points="0,0 28,0 28,27 0,27">
          <text:p/>
        </draw:polygon>
        <draw:polygon draw:style-name="gr269" draw:text-style-name="P267" draw:layer="layout" svg:width="0.027cm" svg:height="0.026cm" svg:x="16.139cm" svg:y="10.097cm" svg:viewBox="0 0 28 27" draw:points="0,0 28,0 28,27 0,27">
          <text:p/>
        </draw:polygon>
        <draw:polygon draw:style-name="gr269" draw:text-style-name="P267" draw:layer="layout" svg:width="0.027cm" svg:height="0.026cm" svg:x="16.192cm" svg:y="10.097cm" svg:viewBox="0 0 28 27" draw:points="0,0 28,0 28,27 0,27">
          <text:p/>
        </draw:polygon>
        <draw:polygon draw:style-name="gr269" draw:text-style-name="P267" draw:layer="layout" svg:width="0.027cm" svg:height="0.026cm" svg:x="16.245cm" svg:y="10.097cm" svg:viewBox="0 0 28 27" draw:points="0,0 28,0 28,27 0,27">
          <text:p/>
        </draw:polygon>
        <draw:polygon draw:style-name="gr269" draw:text-style-name="P267" draw:layer="layout" svg:width="0.027cm" svg:height="0.026cm" svg:x="16.298cm" svg:y="10.097cm" svg:viewBox="0 0 28 27" draw:points="0,0 28,0 28,27 0,27">
          <text:p/>
        </draw:polygon>
        <draw:polygon draw:style-name="gr269" draw:text-style-name="P267" draw:layer="layout" svg:width="0.027cm" svg:height="0.026cm" svg:x="16.351cm" svg:y="10.097cm" svg:viewBox="0 0 28 27" draw:points="0,0 28,0 28,27 0,27">
          <text:p/>
        </draw:polygon>
        <draw:polygon draw:style-name="gr269" draw:text-style-name="P267" draw:layer="layout" svg:width="0.027cm" svg:height="0.026cm" svg:x="16.404cm" svg:y="10.097cm" svg:viewBox="0 0 28 27" draw:points="0,0 28,0 28,27 0,27">
          <text:p/>
        </draw:polygon>
        <draw:polygon draw:style-name="gr269" draw:text-style-name="P267" draw:layer="layout" svg:width="0.027cm" svg:height="0.026cm" svg:x="16.457cm" svg:y="10.097cm" svg:viewBox="0 0 28 27" draw:points="0,0 28,0 28,27 0,27">
          <text:p/>
        </draw:polygon>
        <draw:polygon draw:style-name="gr269" draw:text-style-name="P267" draw:layer="layout" svg:width="0.027cm" svg:height="0.026cm" svg:x="16.51cm" svg:y="10.097cm" svg:viewBox="0 0 28 27" draw:points="0,0 28,0 28,27 0,27">
          <text:p/>
        </draw:polygon>
        <draw:polygon draw:style-name="gr269" draw:text-style-name="P267" draw:layer="layout" svg:width="0.027cm" svg:height="0.026cm" svg:x="16.563cm" svg:y="10.097cm" svg:viewBox="0 0 28 27" draw:points="0,0 28,0 28,27 0,27">
          <text:p/>
        </draw:polygon>
        <draw:polygon draw:style-name="gr269" draw:text-style-name="P267" draw:layer="layout" svg:width="0.027cm" svg:height="0.026cm" svg:x="16.616cm" svg:y="10.097cm" svg:viewBox="0 0 28 27" draw:points="0,0 28,0 28,27 0,27">
          <text:p/>
        </draw:polygon>
        <draw:polygon draw:style-name="gr269" draw:text-style-name="P267" draw:layer="layout" svg:width="0.027cm" svg:height="0.026cm" svg:x="16.669cm" svg:y="10.097cm" svg:viewBox="0 0 28 27" draw:points="0,0 28,0 28,27 0,27">
          <text:p/>
        </draw:polygon>
        <draw:polygon draw:style-name="gr269" draw:text-style-name="P267" draw:layer="layout" svg:width="0.027cm" svg:height="0.026cm" svg:x="16.722cm" svg:y="10.097cm" svg:viewBox="0 0 28 27" draw:points="0,0 28,0 28,27 0,27">
          <text:p/>
        </draw:polygon>
        <draw:polygon draw:style-name="gr269" draw:text-style-name="P267" draw:layer="layout" svg:width="0.027cm" svg:height="0.026cm" svg:x="16.775cm" svg:y="10.097cm" svg:viewBox="0 0 28 27" draw:points="0,0 28,0 28,27 0,27">
          <text:p/>
        </draw:polygon>
        <draw:polygon draw:style-name="gr269" draw:text-style-name="P267" draw:layer="layout" svg:width="0.027cm" svg:height="0.026cm" svg:x="16.828cm" svg:y="10.097cm" svg:viewBox="0 0 28 27" draw:points="0,0 28,0 28,27 0,27">
          <text:p/>
        </draw:polygon>
        <draw:polygon draw:style-name="gr269" draw:text-style-name="P267" draw:layer="layout" svg:width="0.027cm" svg:height="0.026cm" svg:x="16.881cm" svg:y="10.097cm" svg:viewBox="0 0 28 27" draw:points="0,0 28,0 28,27 0,27">
          <text:p/>
        </draw:polygon>
        <draw:polygon draw:style-name="gr269" draw:text-style-name="P267" draw:layer="layout" svg:width="0.027cm" svg:height="0.026cm" svg:x="16.934cm" svg:y="10.097cm" svg:viewBox="0 0 28 27" draw:points="0,0 28,0 28,27 0,27">
          <text:p/>
        </draw:polygon>
        <draw:polygon draw:style-name="gr269" draw:text-style-name="P267" draw:layer="layout" svg:width="0.027cm" svg:height="0.026cm" svg:x="16.987cm" svg:y="10.097cm" svg:viewBox="0 0 28 27" draw:points="0,0 28,0 28,27 0,27">
          <text:p/>
        </draw:polygon>
        <draw:polygon draw:style-name="gr269" draw:text-style-name="P267" draw:layer="layout" svg:width="0.027cm" svg:height="0.026cm" svg:x="17.04cm" svg:y="10.097cm" svg:viewBox="0 0 28 27" draw:points="0,0 28,0 28,27 0,27">
          <text:p/>
        </draw:polygon>
        <draw:polygon draw:style-name="gr269" draw:text-style-name="P267" draw:layer="layout" svg:width="0.027cm" svg:height="0.026cm" svg:x="17.093cm" svg:y="10.097cm" svg:viewBox="0 0 28 27" draw:points="0,0 28,0 28,27 0,27">
          <text:p/>
        </draw:polygon>
        <draw:polygon draw:style-name="gr269" draw:text-style-name="P267" draw:layer="layout" svg:width="0.028cm" svg:height="0.026cm" svg:x="17.146cm" svg:y="10.097cm" svg:viewBox="0 0 29 27" draw:points="0,0 29,0 29,27 0,27">
          <text:p/>
        </draw:polygon>
        <draw:polygon draw:style-name="gr269" draw:text-style-name="P267" draw:layer="layout" svg:width="0.027cm" svg:height="0.026cm" svg:x="17.199cm" svg:y="10.097cm" svg:viewBox="0 0 28 27" draw:points="0,0 28,0 28,27 0,27">
          <text:p/>
        </draw:polygon>
        <draw:polygon draw:style-name="gr269" draw:text-style-name="P267" draw:layer="layout" svg:width="0.027cm" svg:height="0.026cm" svg:x="17.252cm" svg:y="10.097cm" svg:viewBox="0 0 28 27" draw:points="0,0 28,0 28,27 0,27">
          <text:p/>
        </draw:polygon>
        <draw:polygon draw:style-name="gr269" draw:text-style-name="P267" draw:layer="layout" svg:width="0.027cm" svg:height="0.026cm" svg:x="17.305cm" svg:y="10.097cm" svg:viewBox="0 0 28 27" draw:points="0,0 28,0 28,27 0,27">
          <text:p/>
        </draw:polygon>
        <draw:polygon draw:style-name="gr269" draw:text-style-name="P267" draw:layer="layout" svg:width="0.027cm" svg:height="0.026cm" svg:x="17.358cm" svg:y="10.097cm" svg:viewBox="0 0 28 27" draw:points="0,0 28,0 28,27 0,27">
          <text:p/>
        </draw:polygon>
        <draw:polygon draw:style-name="gr269" draw:text-style-name="P267" draw:layer="layout" svg:width="0.027cm" svg:height="0.026cm" svg:x="17.411cm" svg:y="10.097cm" svg:viewBox="0 0 28 27" draw:points="0,0 28,0 28,27 0,27">
          <text:p/>
        </draw:polygon>
        <draw:polygon draw:style-name="gr269" draw:text-style-name="P267" draw:layer="layout" svg:width="0.027cm" svg:height="0.026cm" svg:x="17.464cm" svg:y="10.097cm" svg:viewBox="0 0 28 27" draw:points="0,0 28,0 28,27 0,27">
          <text:p/>
        </draw:polygon>
        <draw:polygon draw:style-name="gr269" draw:text-style-name="P267" draw:layer="layout" svg:width="0.027cm" svg:height="0.026cm" svg:x="17.517cm" svg:y="10.097cm" svg:viewBox="0 0 28 27" draw:points="0,0 28,0 28,27 0,27">
          <text:p/>
        </draw:polygon>
        <draw:polygon draw:style-name="gr269" draw:text-style-name="P267" draw:layer="layout" svg:width="0.027cm" svg:height="0.026cm" svg:x="17.57cm" svg:y="10.097cm" svg:viewBox="0 0 28 27" draw:points="0,0 28,0 28,27 0,27">
          <text:p/>
        </draw:polygon>
        <draw:polygon draw:style-name="gr269" draw:text-style-name="P267" draw:layer="layout" svg:width="0.027cm" svg:height="0.026cm" svg:x="17.623cm" svg:y="10.097cm" svg:viewBox="0 0 28 27" draw:points="0,0 28,0 28,27 0,27">
          <text:p/>
        </draw:polygon>
        <draw:polygon draw:style-name="gr269" draw:text-style-name="P267" draw:layer="layout" svg:width="0.027cm" svg:height="0.026cm" svg:x="17.676cm" svg:y="10.097cm" svg:viewBox="0 0 28 27" draw:points="0,0 28,0 28,27 0,27">
          <text:p/>
        </draw:polygon>
        <draw:polygon draw:style-name="gr269" draw:text-style-name="P267" draw:layer="layout" svg:width="0.027cm" svg:height="0.026cm" svg:x="17.729cm" svg:y="10.097cm" svg:viewBox="0 0 28 27" draw:points="0,0 28,0 28,27 0,27">
          <text:p/>
        </draw:polygon>
        <draw:polygon draw:style-name="gr269" draw:text-style-name="P267" draw:layer="layout" svg:width="0.027cm" svg:height="0.026cm" svg:x="17.782cm" svg:y="10.097cm" svg:viewBox="0 0 28 27" draw:points="0,0 28,0 28,27 0,27">
          <text:p/>
        </draw:polygon>
        <draw:polygon draw:style-name="gr269" draw:text-style-name="P267" draw:layer="layout" svg:width="0.027cm" svg:height="0.026cm" svg:x="17.835cm" svg:y="10.097cm" svg:viewBox="0 0 28 27" draw:points="0,0 28,0 28,27 0,27">
          <text:p/>
        </draw:polygon>
        <draw:polygon draw:style-name="gr269" draw:text-style-name="P267" draw:layer="layout" svg:width="0.027cm" svg:height="0.026cm" svg:x="17.888cm" svg:y="10.097cm" svg:viewBox="0 0 28 27" draw:points="0,0 28,0 28,27 0,27">
          <text:p/>
        </draw:polygon>
        <draw:polygon draw:style-name="gr269" draw:text-style-name="P267" draw:layer="layout" svg:width="0.027cm" svg:height="0.026cm" svg:x="17.941cm" svg:y="10.097cm" svg:viewBox="0 0 28 27" draw:points="0,0 28,0 28,27 0,27">
          <text:p/>
        </draw:polygon>
        <draw:polygon draw:style-name="gr269" draw:text-style-name="P267" draw:layer="layout" svg:width="0.027cm" svg:height="0.026cm" svg:x="17.994cm" svg:y="10.097cm" svg:viewBox="0 0 28 27" draw:points="0,0 28,0 28,27 0,27">
          <text:p/>
        </draw:polygon>
        <draw:polygon draw:style-name="gr269" draw:text-style-name="P267" draw:layer="layout" svg:width="0.027cm" svg:height="0.026cm" svg:x="18.047cm" svg:y="10.097cm" svg:viewBox="0 0 28 27" draw:points="0,0 28,0 28,27 0,27">
          <text:p/>
        </draw:polygon>
        <draw:polygon draw:style-name="gr269" draw:text-style-name="P267" draw:layer="layout" svg:width="0.027cm" svg:height="0.026cm" svg:x="18.1cm" svg:y="10.097cm" svg:viewBox="0 0 28 27" draw:points="0,0 28,0 28,27 0,27">
          <text:p/>
        </draw:polygon>
        <draw:polygon draw:style-name="gr269" draw:text-style-name="P267" draw:layer="layout" svg:width="0.027cm" svg:height="0.026cm" svg:x="18.153cm" svg:y="10.097cm" svg:viewBox="0 0 28 27" draw:points="0,0 28,0 28,27 0,27">
          <text:p/>
        </draw:polygon>
        <draw:polygon draw:style-name="gr269" draw:text-style-name="P267" draw:layer="layout" svg:width="0.027cm" svg:height="0.026cm" svg:x="18.206cm" svg:y="10.097cm" svg:viewBox="0 0 28 27" draw:points="0,0 28,0 28,27 0,27">
          <text:p/>
        </draw:polygon>
        <draw:polygon draw:style-name="gr269" draw:text-style-name="P267" draw:layer="layout" svg:width="0.027cm" svg:height="0.026cm" svg:x="18.259cm" svg:y="10.097cm" svg:viewBox="0 0 28 27" draw:points="0,0 28,0 28,27 0,27">
          <text:p/>
        </draw:polygon>
        <draw:polygon draw:style-name="gr269" draw:text-style-name="P267" draw:layer="layout" svg:width="0.027cm" svg:height="0.026cm" svg:x="18.312cm" svg:y="10.097cm" svg:viewBox="0 0 28 27" draw:points="0,0 28,0 28,27 0,27">
          <text:p/>
        </draw:polygon>
        <draw:polygon draw:style-name="gr269" draw:text-style-name="P267" draw:layer="layout" svg:width="0.027cm" svg:height="0.026cm" svg:x="18.365cm" svg:y="10.097cm" svg:viewBox="0 0 28 27" draw:points="0,0 28,0 28,27 0,27">
          <text:p/>
        </draw:polygon>
        <draw:polygon draw:style-name="gr269" draw:text-style-name="P267" draw:layer="layout" svg:width="0.027cm" svg:height="0.026cm" svg:x="18.418cm" svg:y="10.097cm" svg:viewBox="0 0 28 27" draw:points="0,0 28,0 28,27 0,27">
          <text:p/>
        </draw:polygon>
        <draw:polygon draw:style-name="gr269" draw:text-style-name="P267" draw:layer="layout" svg:width="0.027cm" svg:height="0.026cm" svg:x="18.471cm" svg:y="10.097cm" svg:viewBox="0 0 28 27" draw:points="0,0 28,0 28,27 0,27">
          <text:p/>
        </draw:polygon>
        <draw:polygon draw:style-name="gr269" draw:text-style-name="P267" draw:layer="layout" svg:width="0.028cm" svg:height="0.026cm" svg:x="18.524cm" svg:y="10.097cm" svg:viewBox="0 0 29 27" draw:points="0,0 29,0 29,27 0,27">
          <text:p/>
        </draw:polygon>
        <draw:polygon draw:style-name="gr269" draw:text-style-name="P267" draw:layer="layout" svg:width="0.027cm" svg:height="0.026cm" svg:x="18.577cm" svg:y="10.097cm" svg:viewBox="0 0 28 27" draw:points="0,0 28,0 28,27 0,27">
          <text:p/>
        </draw:polygon>
        <draw:polygon draw:style-name="gr269" draw:text-style-name="P267" draw:layer="layout" svg:width="0.027cm" svg:height="0.026cm" svg:x="18.63cm" svg:y="10.097cm" svg:viewBox="0 0 28 27" draw:points="0,0 28,0 28,27 0,27">
          <text:p/>
        </draw:polygon>
        <draw:polygon draw:style-name="gr269" draw:text-style-name="P267" draw:layer="layout" svg:width="0.027cm" svg:height="0.026cm" svg:x="18.683cm" svg:y="10.097cm" svg:viewBox="0 0 28 27" draw:points="0,0 28,0 28,27 0,27">
          <text:p/>
        </draw:polygon>
        <draw:polygon draw:style-name="gr269" draw:text-style-name="P267" draw:layer="layout" svg:width="0.027cm" svg:height="0.026cm" svg:x="18.736cm" svg:y="10.097cm" svg:viewBox="0 0 28 27" draw:points="0,0 28,0 28,27 0,27">
          <text:p/>
        </draw:polygon>
        <draw:polygon draw:style-name="gr269" draw:text-style-name="P267" draw:layer="layout" svg:width="0.027cm" svg:height="0.026cm" svg:x="18.789cm" svg:y="10.097cm" svg:viewBox="0 0 28 27" draw:points="0,0 28,0 28,27 0,27">
          <text:p/>
        </draw:polygon>
        <draw:polygon draw:style-name="gr269" draw:text-style-name="P267" draw:layer="layout" svg:width="0.027cm" svg:height="0.026cm" svg:x="18.842cm" svg:y="10.097cm" svg:viewBox="0 0 28 27" draw:points="0,0 28,0 28,27 0,27">
          <text:p/>
        </draw:polygon>
        <draw:polygon draw:style-name="gr269" draw:text-style-name="P267" draw:layer="layout" svg:width="0.027cm" svg:height="0.026cm" svg:x="18.895cm" svg:y="10.097cm" svg:viewBox="0 0 28 27" draw:points="0,0 28,0 28,27 0,27">
          <text:p/>
        </draw:polygon>
        <draw:polygon draw:style-name="gr269" draw:text-style-name="P267" draw:layer="layout" svg:width="0.027cm" svg:height="0.026cm" svg:x="18.948cm" svg:y="10.097cm" svg:viewBox="0 0 28 27" draw:points="0,0 28,0 28,27 0,27">
          <text:p/>
        </draw:polygon>
        <draw:polygon draw:style-name="gr269" draw:text-style-name="P267" draw:layer="layout" svg:width="0.027cm" svg:height="0.026cm" svg:x="19.001cm" svg:y="10.097cm" svg:viewBox="0 0 28 27" draw:points="0,0 28,0 28,27 0,27">
          <text:p/>
        </draw:polygon>
        <draw:polygon draw:style-name="gr269" draw:text-style-name="P267" draw:layer="layout" svg:width="0.053cm" svg:height="0.026cm" svg:x="2.014cm" svg:y="11.104cm" svg:viewBox="0 0 54 27" draw:points="0,0 54,0 54,27 0,27">
          <text:p/>
        </draw:polygon>
        <draw:polygon draw:style-name="gr269" draw:text-style-name="P267" draw:layer="layout" svg:width="0.027cm" svg:height="0.026cm" svg:x="2.093cm" svg:y="11.104cm" svg:viewBox="0 0 28 27" draw:points="0,0 28,0 28,27 0,27">
          <text:p/>
        </draw:polygon>
        <draw:polygon draw:style-name="gr269" draw:text-style-name="P267" draw:layer="layout" svg:width="0.027cm" svg:height="0.026cm" svg:x="2.146cm" svg:y="11.104cm" svg:viewBox="0 0 28 27" draw:points="0,0 28,0 28,27 0,27">
          <text:p/>
        </draw:polygon>
        <draw:polygon draw:style-name="gr269" draw:text-style-name="P267" draw:layer="layout" svg:width="0.027cm" svg:height="0.026cm" svg:x="2.199cm" svg:y="11.104cm" svg:viewBox="0 0 28 27" draw:points="0,0 28,0 28,27 0,27">
          <text:p/>
        </draw:polygon>
        <draw:polygon draw:style-name="gr269" draw:text-style-name="P267" draw:layer="layout" svg:width="0.027cm" svg:height="0.026cm" svg:x="2.252cm" svg:y="11.104cm" svg:viewBox="0 0 28 27" draw:points="0,0 28,0 28,27 0,27">
          <text:p/>
        </draw:polygon>
        <draw:polygon draw:style-name="gr269" draw:text-style-name="P267" draw:layer="layout" svg:width="0.027cm" svg:height="0.026cm" svg:x="2.305cm" svg:y="11.104cm" svg:viewBox="0 0 28 27" draw:points="0,0 28,0 28,27 0,27">
          <text:p/>
        </draw:polygon>
        <draw:polygon draw:style-name="gr269" draw:text-style-name="P267" draw:layer="layout" svg:width="0.027cm" svg:height="0.026cm" svg:x="2.358cm" svg:y="11.104cm" svg:viewBox="0 0 28 27" draw:points="0,0 28,0 28,27 0,27">
          <text:p/>
        </draw:polygon>
        <draw:polygon draw:style-name="gr269" draw:text-style-name="P267" draw:layer="layout" svg:width="0.027cm" svg:height="0.026cm" svg:x="2.411cm" svg:y="11.104cm" svg:viewBox="0 0 28 27" draw:points="0,0 28,0 28,27 0,27">
          <text:p/>
        </draw:polygon>
        <draw:polygon draw:style-name="gr269" draw:text-style-name="P267" draw:layer="layout" svg:width="0.027cm" svg:height="0.026cm" svg:x="2.464cm" svg:y="11.104cm" svg:viewBox="0 0 28 27" draw:points="0,0 28,0 28,27 0,27">
          <text:p/>
        </draw:polygon>
        <draw:polygon draw:style-name="gr269" draw:text-style-name="P267" draw:layer="layout" svg:width="0.027cm" svg:height="0.026cm" svg:x="2.517cm" svg:y="11.104cm" svg:viewBox="0 0 28 27" draw:points="0,0 28,0 28,27 0,27">
          <text:p/>
        </draw:polygon>
        <draw:polygon draw:style-name="gr269" draw:text-style-name="P267" draw:layer="layout" svg:width="0.027cm" svg:height="0.026cm" svg:x="2.57cm" svg:y="11.104cm" svg:viewBox="0 0 28 27" draw:points="0,0 28,0 28,27 0,27">
          <text:p/>
        </draw:polygon>
        <draw:polygon draw:style-name="gr269" draw:text-style-name="P267" draw:layer="layout" svg:width="0.027cm" svg:height="0.026cm" svg:x="2.623cm" svg:y="11.104cm" svg:viewBox="0 0 28 27" draw:points="0,0 28,0 28,27 0,27">
          <text:p/>
        </draw:polygon>
        <draw:polygon draw:style-name="gr269" draw:text-style-name="P267" draw:layer="layout" svg:width="0.027cm" svg:height="0.026cm" svg:x="2.676cm" svg:y="11.104cm" svg:viewBox="0 0 28 27" draw:points="0,0 28,0 28,27 0,27">
          <text:p/>
        </draw:polygon>
        <draw:polygon draw:style-name="gr269" draw:text-style-name="P267" draw:layer="layout" svg:width="0.027cm" svg:height="0.026cm" svg:x="2.729cm" svg:y="11.104cm" svg:viewBox="0 0 28 27" draw:points="0,0 28,0 28,27 0,27">
          <text:p/>
        </draw:polygon>
        <draw:polygon draw:style-name="gr269" draw:text-style-name="P267" draw:layer="layout" svg:width="0.027cm" svg:height="0.026cm" svg:x="2.782cm" svg:y="11.104cm" svg:viewBox="0 0 28 27" draw:points="0,0 28,0 28,27 0,27">
          <text:p/>
        </draw:polygon>
        <draw:polygon draw:style-name="gr269" draw:text-style-name="P267" draw:layer="layout" svg:width="0.027cm" svg:height="0.026cm" svg:x="2.835cm" svg:y="11.104cm" svg:viewBox="0 0 28 27" draw:points="0,0 28,0 28,27 0,27">
          <text:p/>
        </draw:polygon>
        <draw:polygon draw:style-name="gr269" draw:text-style-name="P267" draw:layer="layout" svg:width="0.027cm" svg:height="0.026cm" svg:x="2.888cm" svg:y="11.104cm" svg:viewBox="0 0 28 27" draw:points="0,0 28,0 28,27 0,27">
          <text:p/>
        </draw:polygon>
        <draw:polygon draw:style-name="gr269" draw:text-style-name="P267" draw:layer="layout" svg:width="0.027cm" svg:height="0.026cm" svg:x="2.941cm" svg:y="11.104cm" svg:viewBox="0 0 28 27" draw:points="0,0 28,0 28,27 0,27">
          <text:p/>
        </draw:polygon>
        <draw:polygon draw:style-name="gr269" draw:text-style-name="P267" draw:layer="layout" svg:width="0.027cm" svg:height="0.026cm" svg:x="2.994cm" svg:y="11.104cm" svg:viewBox="0 0 28 27" draw:points="0,0 28,0 28,27 0,27">
          <text:p/>
        </draw:polygon>
        <draw:polygon draw:style-name="gr269" draw:text-style-name="P267" draw:layer="layout" svg:width="0.027cm" svg:height="0.026cm" svg:x="3.047cm" svg:y="11.104cm" svg:viewBox="0 0 28 27" draw:points="0,0 28,0 28,27 0,27">
          <text:p/>
        </draw:polygon>
        <draw:polygon draw:style-name="gr269" draw:text-style-name="P267" draw:layer="layout" svg:width="0.027cm" svg:height="0.026cm" svg:x="3.1cm" svg:y="11.104cm" svg:viewBox="0 0 28 27" draw:points="0,0 28,0 28,27 0,27">
          <text:p/>
        </draw:polygon>
        <draw:polygon draw:style-name="gr269" draw:text-style-name="P267" draw:layer="layout" svg:width="0.027cm" svg:height="0.026cm" svg:x="3.153cm" svg:y="11.104cm" svg:viewBox="0 0 28 27" draw:points="0,0 28,0 28,27 0,27">
          <text:p/>
        </draw:polygon>
        <draw:polygon draw:style-name="gr269" draw:text-style-name="P267" draw:layer="layout" svg:width="0.027cm" svg:height="0.026cm" svg:x="3.206cm" svg:y="11.104cm" svg:viewBox="0 0 28 27" draw:points="0,0 28,0 28,27 0,27">
          <text:p/>
        </draw:polygon>
        <draw:polygon draw:style-name="gr269" draw:text-style-name="P267" draw:layer="layout" svg:width="0.027cm" svg:height="0.026cm" svg:x="3.259cm" svg:y="11.104cm" svg:viewBox="0 0 28 27" draw:points="0,0 28,0 28,27 0,27">
          <text:p/>
        </draw:polygon>
        <draw:polygon draw:style-name="gr269" draw:text-style-name="P267" draw:layer="layout" svg:width="0.027cm" svg:height="0.026cm" svg:x="3.312cm" svg:y="11.104cm" svg:viewBox="0 0 28 27" draw:points="0,0 28,0 28,27 0,27">
          <text:p/>
        </draw:polygon>
        <draw:polygon draw:style-name="gr269" draw:text-style-name="P267" draw:layer="layout" svg:width="0.027cm" svg:height="0.026cm" svg:x="3.365cm" svg:y="11.104cm" svg:viewBox="0 0 28 27" draw:points="0,0 28,0 28,27 0,27">
          <text:p/>
        </draw:polygon>
        <draw:polygon draw:style-name="gr269" draw:text-style-name="P267" draw:layer="layout" svg:width="0.028cm" svg:height="0.026cm" svg:x="3.418cm" svg:y="11.104cm" svg:viewBox="0 0 29 27" draw:points="0,0 29,0 29,27 0,27">
          <text:p/>
        </draw:polygon>
        <draw:polygon draw:style-name="gr269" draw:text-style-name="P267" draw:layer="layout" svg:width="0.027cm" svg:height="0.026cm" svg:x="3.471cm" svg:y="11.104cm" svg:viewBox="0 0 28 27" draw:points="0,0 28,0 28,27 0,27">
          <text:p/>
        </draw:polygon>
        <draw:polygon draw:style-name="gr269" draw:text-style-name="P267" draw:layer="layout" svg:width="0.027cm" svg:height="0.026cm" svg:x="3.524cm" svg:y="11.104cm" svg:viewBox="0 0 28 27" draw:points="0,0 28,0 28,27 0,27">
          <text:p/>
        </draw:polygon>
        <draw:polygon draw:style-name="gr269" draw:text-style-name="P267" draw:layer="layout" svg:width="0.027cm" svg:height="0.026cm" svg:x="3.577cm" svg:y="11.104cm" svg:viewBox="0 0 28 27" draw:points="0,0 28,0 28,27 0,27">
          <text:p/>
        </draw:polygon>
        <draw:polygon draw:style-name="gr269" draw:text-style-name="P267" draw:layer="layout" svg:width="0.027cm" svg:height="0.026cm" svg:x="3.63cm" svg:y="11.104cm" svg:viewBox="0 0 28 27" draw:points="0,0 28,0 28,27 0,27">
          <text:p/>
        </draw:polygon>
        <draw:polygon draw:style-name="gr269" draw:text-style-name="P267" draw:layer="layout" svg:width="0.027cm" svg:height="0.026cm" svg:x="3.683cm" svg:y="11.104cm" svg:viewBox="0 0 28 27" draw:points="0,0 28,0 28,27 0,27">
          <text:p/>
        </draw:polygon>
        <draw:polygon draw:style-name="gr269" draw:text-style-name="P267" draw:layer="layout" svg:width="0.027cm" svg:height="0.026cm" svg:x="3.736cm" svg:y="11.104cm" svg:viewBox="0 0 28 27" draw:points="0,0 28,0 28,27 0,27">
          <text:p/>
        </draw:polygon>
        <draw:polygon draw:style-name="gr269" draw:text-style-name="P267" draw:layer="layout" svg:width="0.027cm" svg:height="0.026cm" svg:x="3.789cm" svg:y="11.104cm" svg:viewBox="0 0 28 27" draw:points="0,0 28,0 28,27 0,27">
          <text:p/>
        </draw:polygon>
        <draw:polygon draw:style-name="gr269" draw:text-style-name="P267" draw:layer="layout" svg:width="0.027cm" svg:height="0.026cm" svg:x="3.842cm" svg:y="11.104cm" svg:viewBox="0 0 28 27" draw:points="0,0 28,0 28,27 0,27">
          <text:p/>
        </draw:polygon>
        <draw:polygon draw:style-name="gr269" draw:text-style-name="P267" draw:layer="layout" svg:width="0.027cm" svg:height="0.026cm" svg:x="3.895cm" svg:y="11.104cm" svg:viewBox="0 0 28 27" draw:points="0,0 28,0 28,27 0,27">
          <text:p/>
        </draw:polygon>
        <draw:polygon draw:style-name="gr269" draw:text-style-name="P267" draw:layer="layout" svg:width="0.027cm" svg:height="0.026cm" svg:x="3.948cm" svg:y="11.104cm" svg:viewBox="0 0 28 27" draw:points="0,0 28,0 28,27 0,27">
          <text:p/>
        </draw:polygon>
        <draw:polygon draw:style-name="gr269" draw:text-style-name="P267" draw:layer="layout" svg:width="0.027cm" svg:height="0.026cm" svg:x="4.001cm" svg:y="11.104cm" svg:viewBox="0 0 28 27" draw:points="0,0 28,0 28,27 0,27">
          <text:p/>
        </draw:polygon>
        <draw:polygon draw:style-name="gr269" draw:text-style-name="P267" draw:layer="layout" svg:width="0.027cm" svg:height="0.026cm" svg:x="4.054cm" svg:y="11.104cm" svg:viewBox="0 0 28 27" draw:points="0,0 28,0 28,27 0,27">
          <text:p/>
        </draw:polygon>
        <draw:polygon draw:style-name="gr269" draw:text-style-name="P267" draw:layer="layout" svg:width="0.027cm" svg:height="0.026cm" svg:x="4.107cm" svg:y="11.104cm" svg:viewBox="0 0 28 27" draw:points="0,0 28,0 28,27 0,27">
          <text:p/>
        </draw:polygon>
        <draw:polygon draw:style-name="gr269" draw:text-style-name="P267" draw:layer="layout" svg:width="0.027cm" svg:height="0.026cm" svg:x="4.16cm" svg:y="11.104cm" svg:viewBox="0 0 28 27" draw:points="0,0 28,0 28,27 0,27">
          <text:p/>
        </draw:polygon>
        <draw:polygon draw:style-name="gr269" draw:text-style-name="P267" draw:layer="layout" svg:width="0.027cm" svg:height="0.026cm" svg:x="4.213cm" svg:y="11.104cm" svg:viewBox="0 0 28 27" draw:points="0,0 28,0 28,27 0,27">
          <text:p/>
        </draw:polygon>
        <draw:polygon draw:style-name="gr269" draw:text-style-name="P267" draw:layer="layout" svg:width="0.027cm" svg:height="0.026cm" svg:x="4.266cm" svg:y="11.104cm" svg:viewBox="0 0 28 27" draw:points="0,0 28,0 28,27 0,27">
          <text:p/>
        </draw:polygon>
        <draw:polygon draw:style-name="gr269" draw:text-style-name="P267" draw:layer="layout" svg:width="0.027cm" svg:height="0.026cm" svg:x="4.319cm" svg:y="11.104cm" svg:viewBox="0 0 28 27" draw:points="0,0 28,0 28,27 0,27">
          <text:p/>
        </draw:polygon>
        <draw:polygon draw:style-name="gr269" draw:text-style-name="P267" draw:layer="layout" svg:width="0.027cm" svg:height="0.026cm" svg:x="4.372cm" svg:y="11.104cm" svg:viewBox="0 0 28 27" draw:points="0,0 28,0 28,27 0,27">
          <text:p/>
        </draw:polygon>
        <draw:polygon draw:style-name="gr269" draw:text-style-name="P267" draw:layer="layout" svg:width="0.027cm" svg:height="0.026cm" svg:x="4.425cm" svg:y="11.104cm" svg:viewBox="0 0 28 27" draw:points="0,0 28,0 28,27 0,27">
          <text:p/>
        </draw:polygon>
        <draw:polygon draw:style-name="gr269" draw:text-style-name="P267" draw:layer="layout" svg:width="0.027cm" svg:height="0.026cm" svg:x="4.478cm" svg:y="11.104cm" svg:viewBox="0 0 28 27" draw:points="0,0 28,0 28,27 0,27">
          <text:p/>
        </draw:polygon>
        <draw:polygon draw:style-name="gr269" draw:text-style-name="P267" draw:layer="layout" svg:width="0.027cm" svg:height="0.026cm" svg:x="4.531cm" svg:y="11.104cm" svg:viewBox="0 0 28 27" draw:points="0,0 28,0 28,27 0,27">
          <text:p/>
        </draw:polygon>
        <draw:polygon draw:style-name="gr269" draw:text-style-name="P267" draw:layer="layout" svg:width="0.027cm" svg:height="0.026cm" svg:x="4.584cm" svg:y="11.104cm" svg:viewBox="0 0 28 27" draw:points="0,0 28,0 28,27 0,27">
          <text:p/>
        </draw:polygon>
        <draw:polygon draw:style-name="gr269" draw:text-style-name="P267" draw:layer="layout" svg:width="0.027cm" svg:height="0.026cm" svg:x="4.637cm" svg:y="11.104cm" svg:viewBox="0 0 28 27" draw:points="0,0 28,0 28,27 0,27">
          <text:p/>
        </draw:polygon>
        <draw:polygon draw:style-name="gr269" draw:text-style-name="P267" draw:layer="layout" svg:width="0.027cm" svg:height="0.026cm" svg:x="4.69cm" svg:y="11.104cm" svg:viewBox="0 0 28 27" draw:points="0,0 28,0 28,27 0,27">
          <text:p/>
        </draw:polygon>
        <draw:polygon draw:style-name="gr269" draw:text-style-name="P267" draw:layer="layout" svg:width="0.027cm" svg:height="0.026cm" svg:x="4.743cm" svg:y="11.104cm" svg:viewBox="0 0 28 27" draw:points="0,0 28,0 28,27 0,27">
          <text:p/>
        </draw:polygon>
        <draw:polygon draw:style-name="gr269" draw:text-style-name="P267" draw:layer="layout" svg:width="0.028cm" svg:height="0.026cm" svg:x="4.796cm" svg:y="11.104cm" svg:viewBox="0 0 29 27" draw:points="0,0 29,0 29,27 0,27">
          <text:p/>
        </draw:polygon>
        <draw:polygon draw:style-name="gr269" draw:text-style-name="P267" draw:layer="layout" svg:width="0.027cm" svg:height="0.026cm" svg:x="4.849cm" svg:y="11.104cm" svg:viewBox="0 0 28 27" draw:points="0,0 28,0 28,27 0,27">
          <text:p/>
        </draw:polygon>
        <draw:polygon draw:style-name="gr269" draw:text-style-name="P267" draw:layer="layout" svg:width="0.027cm" svg:height="0.026cm" svg:x="4.902cm" svg:y="11.104cm" svg:viewBox="0 0 28 27" draw:points="0,0 28,0 28,27 0,27">
          <text:p/>
        </draw:polygon>
        <draw:polygon draw:style-name="gr269" draw:text-style-name="P267" draw:layer="layout" svg:width="0.027cm" svg:height="0.026cm" svg:x="4.955cm" svg:y="11.104cm" svg:viewBox="0 0 28 27" draw:points="0,0 28,0 28,27 0,27">
          <text:p/>
        </draw:polygon>
        <draw:polygon draw:style-name="gr269" draw:text-style-name="P267" draw:layer="layout" svg:width="0.027cm" svg:height="0.026cm" svg:x="5.008cm" svg:y="11.104cm" svg:viewBox="0 0 28 27" draw:points="0,0 28,0 28,27 0,27">
          <text:p/>
        </draw:polygon>
        <draw:polygon draw:style-name="gr269" draw:text-style-name="P267" draw:layer="layout" svg:width="0.027cm" svg:height="0.026cm" svg:x="5.061cm" svg:y="11.104cm" svg:viewBox="0 0 28 27" draw:points="0,0 28,0 28,27 0,27">
          <text:p/>
        </draw:polygon>
        <draw:polygon draw:style-name="gr269" draw:text-style-name="P267" draw:layer="layout" svg:width="0.027cm" svg:height="0.026cm" svg:x="5.114cm" svg:y="11.104cm" svg:viewBox="0 0 28 27" draw:points="0,0 28,0 28,27 0,27">
          <text:p/>
        </draw:polygon>
        <draw:polygon draw:style-name="gr269" draw:text-style-name="P267" draw:layer="layout" svg:width="0.027cm" svg:height="0.026cm" svg:x="5.167cm" svg:y="11.104cm" svg:viewBox="0 0 28 27" draw:points="0,0 28,0 28,27 0,27">
          <text:p/>
        </draw:polygon>
        <draw:polygon draw:style-name="gr269" draw:text-style-name="P267" draw:layer="layout" svg:width="0.027cm" svg:height="0.026cm" svg:x="5.22cm" svg:y="11.104cm" svg:viewBox="0 0 28 27" draw:points="0,0 28,0 28,27 0,27">
          <text:p/>
        </draw:polygon>
        <draw:polygon draw:style-name="gr269" draw:text-style-name="P267" draw:layer="layout" svg:width="0.027cm" svg:height="0.026cm" svg:x="5.273cm" svg:y="11.104cm" svg:viewBox="0 0 28 27" draw:points="0,0 28,0 28,27 0,27">
          <text:p/>
        </draw:polygon>
        <draw:polygon draw:style-name="gr269" draw:text-style-name="P267" draw:layer="layout" svg:width="0.027cm" svg:height="0.026cm" svg:x="5.326cm" svg:y="11.104cm" svg:viewBox="0 0 28 27" draw:points="0,0 28,0 28,27 0,27">
          <text:p/>
        </draw:polygon>
        <draw:polygon draw:style-name="gr269" draw:text-style-name="P267" draw:layer="layout" svg:width="0.027cm" svg:height="0.026cm" svg:x="5.379cm" svg:y="11.104cm" svg:viewBox="0 0 28 27" draw:points="0,0 28,0 28,27 0,27">
          <text:p/>
        </draw:polygon>
        <draw:polygon draw:style-name="gr269" draw:text-style-name="P267" draw:layer="layout" svg:width="0.027cm" svg:height="0.026cm" svg:x="5.432cm" svg:y="11.104cm" svg:viewBox="0 0 28 27" draw:points="0,0 28,0 28,27 0,27">
          <text:p/>
        </draw:polygon>
        <draw:polygon draw:style-name="gr269" draw:text-style-name="P267" draw:layer="layout" svg:width="0.027cm" svg:height="0.026cm" svg:x="5.485cm" svg:y="11.104cm" svg:viewBox="0 0 28 27" draw:points="0,0 28,0 28,27 0,27">
          <text:p/>
        </draw:polygon>
        <draw:polygon draw:style-name="gr269" draw:text-style-name="P267" draw:layer="layout" svg:width="0.027cm" svg:height="0.026cm" svg:x="5.538cm" svg:y="11.104cm" svg:viewBox="0 0 28 27" draw:points="0,0 28,0 28,27 0,27">
          <text:p/>
        </draw:polygon>
        <draw:polygon draw:style-name="gr269" draw:text-style-name="P267" draw:layer="layout" svg:width="0.027cm" svg:height="0.026cm" svg:x="5.591cm" svg:y="11.104cm" svg:viewBox="0 0 28 27" draw:points="0,0 28,0 28,27 0,27">
          <text:p/>
        </draw:polygon>
        <draw:polygon draw:style-name="gr269" draw:text-style-name="P267" draw:layer="layout" svg:width="0.027cm" svg:height="0.026cm" svg:x="5.644cm" svg:y="11.104cm" svg:viewBox="0 0 28 27" draw:points="0,0 28,0 28,27 0,27">
          <text:p/>
        </draw:polygon>
        <draw:polygon draw:style-name="gr269" draw:text-style-name="P267" draw:layer="layout" svg:width="0.027cm" svg:height="0.026cm" svg:x="5.697cm" svg:y="11.104cm" svg:viewBox="0 0 28 27" draw:points="0,0 28,0 28,27 0,27">
          <text:p/>
        </draw:polygon>
        <draw:polygon draw:style-name="gr269" draw:text-style-name="P267" draw:layer="layout" svg:width="0.027cm" svg:height="0.026cm" svg:x="5.75cm" svg:y="11.104cm" svg:viewBox="0 0 28 27" draw:points="0,0 28,0 28,27 0,27">
          <text:p/>
        </draw:polygon>
        <draw:polygon draw:style-name="gr269" draw:text-style-name="P267" draw:layer="layout" svg:width="0.027cm" svg:height="0.026cm" svg:x="5.803cm" svg:y="11.104cm" svg:viewBox="0 0 28 27" draw:points="0,0 28,0 28,27 0,27">
          <text:p/>
        </draw:polygon>
        <draw:polygon draw:style-name="gr269" draw:text-style-name="P267" draw:layer="layout" svg:width="0.027cm" svg:height="0.026cm" svg:x="5.856cm" svg:y="11.104cm" svg:viewBox="0 0 28 27" draw:points="0,0 28,0 28,27 0,27">
          <text:p/>
        </draw:polygon>
        <draw:polygon draw:style-name="gr269" draw:text-style-name="P267" draw:layer="layout" svg:width="0.027cm" svg:height="0.026cm" svg:x="5.909cm" svg:y="11.104cm" svg:viewBox="0 0 28 27" draw:points="0,0 28,0 28,27 0,27">
          <text:p/>
        </draw:polygon>
        <draw:polygon draw:style-name="gr269" draw:text-style-name="P267" draw:layer="layout" svg:width="0.027cm" svg:height="0.026cm" svg:x="5.962cm" svg:y="11.104cm" svg:viewBox="0 0 28 27" draw:points="0,0 28,0 28,27 0,27">
          <text:p/>
        </draw:polygon>
        <draw:polygon draw:style-name="gr269" draw:text-style-name="P267" draw:layer="layout" svg:width="0.027cm" svg:height="0.026cm" svg:x="6.015cm" svg:y="11.104cm" svg:viewBox="0 0 28 27" draw:points="0,0 28,0 28,27 0,27">
          <text:p/>
        </draw:polygon>
        <draw:polygon draw:style-name="gr269" draw:text-style-name="P267" draw:layer="layout" svg:width="0.027cm" svg:height="0.026cm" svg:x="6.068cm" svg:y="11.104cm" svg:viewBox="0 0 28 27" draw:points="0,0 28,0 28,27 0,27">
          <text:p/>
        </draw:polygon>
        <draw:polygon draw:style-name="gr269" draw:text-style-name="P267" draw:layer="layout" svg:width="0.027cm" svg:height="0.026cm" svg:x="6.121cm" svg:y="11.104cm" svg:viewBox="0 0 28 27" draw:points="0,0 28,0 28,27 0,27">
          <text:p/>
        </draw:polygon>
        <draw:polygon draw:style-name="gr269" draw:text-style-name="P267" draw:layer="layout" svg:width="0.028cm" svg:height="0.026cm" svg:x="6.174cm" svg:y="11.104cm" svg:viewBox="0 0 29 27" draw:points="0,0 29,0 29,27 0,27">
          <text:p/>
        </draw:polygon>
        <draw:polygon draw:style-name="gr269" draw:text-style-name="P267" draw:layer="layout" svg:width="0.027cm" svg:height="0.026cm" svg:x="6.227cm" svg:y="11.104cm" svg:viewBox="0 0 28 27" draw:points="0,0 28,0 28,27 0,27">
          <text:p/>
        </draw:polygon>
        <draw:polygon draw:style-name="gr269" draw:text-style-name="P267" draw:layer="layout" svg:width="0.027cm" svg:height="0.026cm" svg:x="6.28cm" svg:y="11.104cm" svg:viewBox="0 0 28 27" draw:points="0,0 28,0 28,27 0,27">
          <text:p/>
        </draw:polygon>
        <draw:polygon draw:style-name="gr269" draw:text-style-name="P267" draw:layer="layout" svg:width="0.027cm" svg:height="0.026cm" svg:x="6.333cm" svg:y="11.104cm" svg:viewBox="0 0 28 27" draw:points="0,0 28,0 28,27 0,27">
          <text:p/>
        </draw:polygon>
        <draw:polygon draw:style-name="gr269" draw:text-style-name="P267" draw:layer="layout" svg:width="0.026cm" svg:height="0.026cm" svg:x="6.387cm" svg:y="11.104cm" svg:viewBox="0 0 27 27" draw:points="0,0 27,0 27,27 0,27">
          <text:p/>
        </draw:polygon>
        <draw:polygon draw:style-name="gr269" draw:text-style-name="P267" draw:layer="layout" svg:width="0.026cm" svg:height="0.026cm" svg:x="6.44cm" svg:y="11.104cm" svg:viewBox="0 0 27 27" draw:points="0,0 27,0 27,27 0,27">
          <text:p/>
        </draw:polygon>
        <draw:polygon draw:style-name="gr269" draw:text-style-name="P267" draw:layer="layout" svg:width="0.026cm" svg:height="0.026cm" svg:x="6.493cm" svg:y="11.104cm" svg:viewBox="0 0 27 27" draw:points="0,0 27,0 27,27 0,27">
          <text:p/>
        </draw:polygon>
        <draw:polygon draw:style-name="gr269" draw:text-style-name="P267" draw:layer="layout" svg:width="0.026cm" svg:height="0.026cm" svg:x="6.546cm" svg:y="11.104cm" svg:viewBox="0 0 27 27" draw:points="0,0 27,0 27,27 0,27">
          <text:p/>
        </draw:polygon>
        <draw:polygon draw:style-name="gr269" draw:text-style-name="P267" draw:layer="layout" svg:width="0.026cm" svg:height="0.026cm" svg:x="6.599cm" svg:y="11.104cm" svg:viewBox="0 0 27 27" draw:points="0,0 27,0 27,27 0,27">
          <text:p/>
        </draw:polygon>
        <draw:polygon draw:style-name="gr269" draw:text-style-name="P267" draw:layer="layout" svg:width="0.026cm" svg:height="0.026cm" svg:x="6.652cm" svg:y="11.104cm" svg:viewBox="0 0 27 27" draw:points="0,0 27,0 27,27 0,27">
          <text:p/>
        </draw:polygon>
        <draw:polygon draw:style-name="gr269" draw:text-style-name="P267" draw:layer="layout" svg:width="0.026cm" svg:height="0.026cm" svg:x="6.705cm" svg:y="11.104cm" svg:viewBox="0 0 27 27" draw:points="0,0 27,0 27,27 0,27">
          <text:p/>
        </draw:polygon>
        <draw:polygon draw:style-name="gr269" draw:text-style-name="P267" draw:layer="layout" svg:width="0.026cm" svg:height="0.026cm" svg:x="6.758cm" svg:y="11.104cm" svg:viewBox="0 0 27 27" draw:points="0,0 27,0 27,27 0,27">
          <text:p/>
        </draw:polygon>
        <draw:polygon draw:style-name="gr269" draw:text-style-name="P267" draw:layer="layout" svg:width="0.026cm" svg:height="0.026cm" svg:x="6.811cm" svg:y="11.104cm" svg:viewBox="0 0 27 27" draw:points="0,0 27,0 27,27 0,27">
          <text:p/>
        </draw:polygon>
        <draw:polygon draw:style-name="gr269" draw:text-style-name="P267" draw:layer="layout" svg:width="0.026cm" svg:height="0.026cm" svg:x="6.864cm" svg:y="11.104cm" svg:viewBox="0 0 27 27" draw:points="0,0 27,0 27,27 0,27">
          <text:p/>
        </draw:polygon>
        <draw:polygon draw:style-name="gr269" draw:text-style-name="P267" draw:layer="layout" svg:width="0.026cm" svg:height="0.026cm" svg:x="6.917cm" svg:y="11.104cm" svg:viewBox="0 0 27 27" draw:points="0,0 27,0 27,27 0,27">
          <text:p/>
        </draw:polygon>
        <draw:polygon draw:style-name="gr269" draw:text-style-name="P267" draw:layer="layout" svg:width="0.026cm" svg:height="0.026cm" svg:x="6.97cm" svg:y="11.104cm" svg:viewBox="0 0 27 27" draw:points="0,0 27,0 27,27 0,27">
          <text:p/>
        </draw:polygon>
        <draw:polygon draw:style-name="gr269" draw:text-style-name="P267" draw:layer="layout" svg:width="0.026cm" svg:height="0.026cm" svg:x="7.023cm" svg:y="11.104cm" svg:viewBox="0 0 27 27" draw:points="0,0 27,0 27,27 0,27">
          <text:p/>
        </draw:polygon>
        <draw:polygon draw:style-name="gr269" draw:text-style-name="P267" draw:layer="layout" svg:width="0.026cm" svg:height="0.026cm" svg:x="7.076cm" svg:y="11.104cm" svg:viewBox="0 0 27 27" draw:points="0,0 27,0 27,27 0,27">
          <text:p/>
        </draw:polygon>
        <draw:polygon draw:style-name="gr269" draw:text-style-name="P267" draw:layer="layout" svg:width="0.026cm" svg:height="0.026cm" svg:x="7.129cm" svg:y="11.104cm" svg:viewBox="0 0 27 27" draw:points="0,0 27,0 27,27 0,27">
          <text:p/>
        </draw:polygon>
        <draw:polygon draw:style-name="gr269" draw:text-style-name="P267" draw:layer="layout" svg:width="0.026cm" svg:height="0.026cm" svg:x="7.182cm" svg:y="11.104cm" svg:viewBox="0 0 27 27" draw:points="0,0 27,0 27,27 0,27">
          <text:p/>
        </draw:polygon>
        <draw:polygon draw:style-name="gr269" draw:text-style-name="P267" draw:layer="layout" svg:width="0.026cm" svg:height="0.026cm" svg:x="7.235cm" svg:y="11.104cm" svg:viewBox="0 0 27 27" draw:points="0,0 27,0 27,27 0,27">
          <text:p/>
        </draw:polygon>
        <draw:polygon draw:style-name="gr269" draw:text-style-name="P267" draw:layer="layout" svg:width="0.026cm" svg:height="0.026cm" svg:x="7.288cm" svg:y="11.104cm" svg:viewBox="0 0 27 27" draw:points="0,0 27,0 27,27 0,27">
          <text:p/>
        </draw:polygon>
        <draw:polygon draw:style-name="gr269" draw:text-style-name="P267" draw:layer="layout" svg:width="0.026cm" svg:height="0.026cm" svg:x="7.341cm" svg:y="11.104cm" svg:viewBox="0 0 27 27" draw:points="0,0 27,0 27,27 0,27">
          <text:p/>
        </draw:polygon>
        <draw:polygon draw:style-name="gr269" draw:text-style-name="P267" draw:layer="layout" svg:width="0.026cm" svg:height="0.026cm" svg:x="7.394cm" svg:y="11.104cm" svg:viewBox="0 0 27 27" draw:points="0,0 27,0 27,27 0,27">
          <text:p/>
        </draw:polygon>
        <draw:polygon draw:style-name="gr269" draw:text-style-name="P267" draw:layer="layout" svg:width="0.026cm" svg:height="0.026cm" svg:x="7.447cm" svg:y="11.104cm" svg:viewBox="0 0 27 27" draw:points="0,0 27,0 27,27 0,27">
          <text:p/>
        </draw:polygon>
        <draw:polygon draw:style-name="gr269" draw:text-style-name="P267" draw:layer="layout" svg:width="0.026cm" svg:height="0.026cm" svg:x="7.5cm" svg:y="11.104cm" svg:viewBox="0 0 27 27" draw:points="0,0 27,0 27,27 0,27">
          <text:p/>
        </draw:polygon>
        <draw:polygon draw:style-name="gr269" draw:text-style-name="P267" draw:layer="layout" svg:width="0.026cm" svg:height="0.026cm" svg:x="7.553cm" svg:y="11.104cm" svg:viewBox="0 0 27 27" draw:points="0,0 27,0 27,27 0,27">
          <text:p/>
        </draw:polygon>
        <draw:polygon draw:style-name="gr269" draw:text-style-name="P267" draw:layer="layout" svg:width="0.026cm" svg:height="0.026cm" svg:x="7.606cm" svg:y="11.104cm" svg:viewBox="0 0 27 27" draw:points="0,0 27,0 27,27 0,27">
          <text:p/>
        </draw:polygon>
        <draw:polygon draw:style-name="gr269" draw:text-style-name="P267" draw:layer="layout" svg:width="0.026cm" svg:height="0.026cm" svg:x="7.659cm" svg:y="11.104cm" svg:viewBox="0 0 27 27" draw:points="0,0 27,0 27,27 0,27">
          <text:p/>
        </draw:polygon>
        <draw:polygon draw:style-name="gr269" draw:text-style-name="P267" draw:layer="layout" svg:width="0.026cm" svg:height="0.026cm" svg:x="7.712cm" svg:y="11.104cm" svg:viewBox="0 0 27 27" draw:points="0,0 27,0 27,27 0,27">
          <text:p/>
        </draw:polygon>
        <draw:polygon draw:style-name="gr269" draw:text-style-name="P267" draw:layer="layout" svg:width="0.026cm" svg:height="0.026cm" svg:x="7.765cm" svg:y="11.104cm" svg:viewBox="0 0 27 27" draw:points="0,0 27,0 27,27 0,27">
          <text:p/>
        </draw:polygon>
        <draw:polygon draw:style-name="gr269" draw:text-style-name="P267" draw:layer="layout" svg:width="0.026cm" svg:height="0.026cm" svg:x="7.818cm" svg:y="11.104cm" svg:viewBox="0 0 27 27" draw:points="0,0 27,0 27,27 0,27">
          <text:p/>
        </draw:polygon>
        <draw:polygon draw:style-name="gr269" draw:text-style-name="P267" draw:layer="layout" svg:width="0.026cm" svg:height="0.026cm" svg:x="7.871cm" svg:y="11.104cm" svg:viewBox="0 0 27 27" draw:points="0,0 27,0 27,27 0,27">
          <text:p/>
        </draw:polygon>
        <draw:polygon draw:style-name="gr269" draw:text-style-name="P267" draw:layer="layout" svg:width="0.026cm" svg:height="0.026cm" svg:x="7.924cm" svg:y="11.104cm" svg:viewBox="0 0 27 27" draw:points="0,0 27,0 27,27 0,27">
          <text:p/>
        </draw:polygon>
        <draw:polygon draw:style-name="gr269" draw:text-style-name="P267" draw:layer="layout" svg:width="0.026cm" svg:height="0.026cm" svg:x="7.977cm" svg:y="11.104cm" svg:viewBox="0 0 27 27" draw:points="0,0 27,0 27,27 0,27">
          <text:p/>
        </draw:polygon>
        <draw:polygon draw:style-name="gr269" draw:text-style-name="P267" draw:layer="layout" svg:width="0.026cm" svg:height="0.026cm" svg:x="8.03cm" svg:y="11.104cm" svg:viewBox="0 0 27 27" draw:points="0,0 27,0 27,27 0,27">
          <text:p/>
        </draw:polygon>
        <draw:polygon draw:style-name="gr269" draw:text-style-name="P267" draw:layer="layout" svg:width="0.026cm" svg:height="0.026cm" svg:x="8.083cm" svg:y="11.104cm" svg:viewBox="0 0 27 27" draw:points="0,0 27,0 27,27 0,27">
          <text:p/>
        </draw:polygon>
        <draw:polygon draw:style-name="gr269" draw:text-style-name="P267" draw:layer="layout" svg:width="0.026cm" svg:height="0.026cm" svg:x="8.136cm" svg:y="11.104cm" svg:viewBox="0 0 27 27" draw:points="0,0 27,0 27,27 0,27">
          <text:p/>
        </draw:polygon>
        <draw:polygon draw:style-name="gr269" draw:text-style-name="P267" draw:layer="layout" svg:width="0.026cm" svg:height="0.026cm" svg:x="8.189cm" svg:y="11.104cm" svg:viewBox="0 0 27 27" draw:points="0,0 27,0 27,27 0,27">
          <text:p/>
        </draw:polygon>
        <draw:polygon draw:style-name="gr269" draw:text-style-name="P267" draw:layer="layout" svg:width="0.026cm" svg:height="0.026cm" svg:x="8.242cm" svg:y="11.104cm" svg:viewBox="0 0 27 27" draw:points="0,0 27,0 27,27 0,27">
          <text:p/>
        </draw:polygon>
        <draw:polygon draw:style-name="gr269" draw:text-style-name="P267" draw:layer="layout" svg:width="0.026cm" svg:height="0.026cm" svg:x="8.295cm" svg:y="11.104cm" svg:viewBox="0 0 27 27" draw:points="0,0 27,0 27,27 0,27">
          <text:p/>
        </draw:polygon>
        <draw:polygon draw:style-name="gr269" draw:text-style-name="P267" draw:layer="layout" svg:width="0.026cm" svg:height="0.026cm" svg:x="8.348cm" svg:y="11.104cm" svg:viewBox="0 0 27 27" draw:points="0,0 27,0 27,27 0,27">
          <text:p/>
        </draw:polygon>
        <draw:polygon draw:style-name="gr269" draw:text-style-name="P267" draw:layer="layout" svg:width="0.026cm" svg:height="0.026cm" svg:x="8.401cm" svg:y="11.104cm" svg:viewBox="0 0 27 27" draw:points="0,0 27,0 27,27 0,27">
          <text:p/>
        </draw:polygon>
        <draw:polygon draw:style-name="gr269" draw:text-style-name="P267" draw:layer="layout" svg:width="0.026cm" svg:height="0.026cm" svg:x="8.454cm" svg:y="11.104cm" svg:viewBox="0 0 27 27" draw:points="0,0 27,0 27,27 0,27">
          <text:p/>
        </draw:polygon>
        <draw:polygon draw:style-name="gr269" draw:text-style-name="P267" draw:layer="layout" svg:width="0.026cm" svg:height="0.026cm" svg:x="8.507cm" svg:y="11.104cm" svg:viewBox="0 0 27 27" draw:points="0,0 27,0 27,27 0,27">
          <text:p/>
        </draw:polygon>
        <draw:polygon draw:style-name="gr269" draw:text-style-name="P267" draw:layer="layout" svg:width="0.026cm" svg:height="0.026cm" svg:x="8.56cm" svg:y="11.104cm" svg:viewBox="0 0 27 27" draw:points="0,0 27,0 27,27 0,27">
          <text:p/>
        </draw:polygon>
        <draw:polygon draw:style-name="gr269" draw:text-style-name="P267" draw:layer="layout" svg:width="0.026cm" svg:height="0.026cm" svg:x="8.613cm" svg:y="11.104cm" svg:viewBox="0 0 27 27" draw:points="0,0 27,0 27,27 0,27">
          <text:p/>
        </draw:polygon>
        <draw:polygon draw:style-name="gr269" draw:text-style-name="P267" draw:layer="layout" svg:width="0.026cm" svg:height="0.026cm" svg:x="8.666cm" svg:y="11.104cm" svg:viewBox="0 0 27 27" draw:points="0,0 27,0 27,27 0,27">
          <text:p/>
        </draw:polygon>
        <draw:polygon draw:style-name="gr269" draw:text-style-name="P267" draw:layer="layout" svg:width="0.026cm" svg:height="0.026cm" svg:x="8.719cm" svg:y="11.104cm" svg:viewBox="0 0 27 27" draw:points="0,0 27,0 27,27 0,27">
          <text:p/>
        </draw:polygon>
        <draw:polygon draw:style-name="gr269" draw:text-style-name="P267" draw:layer="layout" svg:width="0.026cm" svg:height="0.026cm" svg:x="8.772cm" svg:y="11.104cm" svg:viewBox="0 0 27 27" draw:points="0,0 27,0 27,27 0,27">
          <text:p/>
        </draw:polygon>
        <draw:polygon draw:style-name="gr269" draw:text-style-name="P267" draw:layer="layout" svg:width="0.026cm" svg:height="0.026cm" svg:x="8.825cm" svg:y="11.104cm" svg:viewBox="0 0 27 27" draw:points="0,0 27,0 27,27 0,27">
          <text:p/>
        </draw:polygon>
        <draw:polygon draw:style-name="gr269" draw:text-style-name="P267" draw:layer="layout" svg:width="0.026cm" svg:height="0.026cm" svg:x="8.878cm" svg:y="11.104cm" svg:viewBox="0 0 27 27" draw:points="0,0 27,0 27,27 0,27">
          <text:p/>
        </draw:polygon>
        <draw:polygon draw:style-name="gr269" draw:text-style-name="P267" draw:layer="layout" svg:width="0.026cm" svg:height="0.026cm" svg:x="8.931cm" svg:y="11.104cm" svg:viewBox="0 0 27 27" draw:points="0,0 27,0 27,27 0,27">
          <text:p/>
        </draw:polygon>
        <draw:polygon draw:style-name="gr269" draw:text-style-name="P267" draw:layer="layout" svg:width="0.026cm" svg:height="0.026cm" svg:x="8.984cm" svg:y="11.104cm" svg:viewBox="0 0 27 27" draw:points="0,0 27,0 27,27 0,27">
          <text:p/>
        </draw:polygon>
        <draw:polygon draw:style-name="gr269" draw:text-style-name="P267" draw:layer="layout" svg:width="0.026cm" svg:height="0.026cm" svg:x="9.037cm" svg:y="11.104cm" svg:viewBox="0 0 27 27" draw:points="0,0 27,0 27,27 0,27">
          <text:p/>
        </draw:polygon>
        <draw:polygon draw:style-name="gr269" draw:text-style-name="P267" draw:layer="layout" svg:width="0.026cm" svg:height="0.026cm" svg:x="9.09cm" svg:y="11.104cm" svg:viewBox="0 0 27 27" draw:points="0,0 27,0 27,27 0,27">
          <text:p/>
        </draw:polygon>
        <draw:polygon draw:style-name="gr269" draw:text-style-name="P267" draw:layer="layout" svg:width="0.026cm" svg:height="0.026cm" svg:x="9.143cm" svg:y="11.104cm" svg:viewBox="0 0 27 27" draw:points="0,0 27,0 27,27 0,27">
          <text:p/>
        </draw:polygon>
        <draw:polygon draw:style-name="gr269" draw:text-style-name="P267" draw:layer="layout" svg:width="0.026cm" svg:height="0.026cm" svg:x="9.196cm" svg:y="11.104cm" svg:viewBox="0 0 27 27" draw:points="0,0 27,0 27,27 0,27">
          <text:p/>
        </draw:polygon>
        <draw:polygon draw:style-name="gr269" draw:text-style-name="P267" draw:layer="layout" svg:width="0.026cm" svg:height="0.026cm" svg:x="9.249cm" svg:y="11.104cm" svg:viewBox="0 0 27 27" draw:points="0,0 27,0 27,27 0,27">
          <text:p/>
        </draw:polygon>
        <draw:polygon draw:style-name="gr269" draw:text-style-name="P267" draw:layer="layout" svg:width="0.026cm" svg:height="0.026cm" svg:x="9.302cm" svg:y="11.104cm" svg:viewBox="0 0 27 27" draw:points="0,0 27,0 27,27 0,27">
          <text:p/>
        </draw:polygon>
        <draw:polygon draw:style-name="gr269" draw:text-style-name="P267" draw:layer="layout" svg:width="0.026cm" svg:height="0.026cm" svg:x="9.355cm" svg:y="11.104cm" svg:viewBox="0 0 27 27" draw:points="0,0 27,0 27,27 0,27">
          <text:p/>
        </draw:polygon>
        <draw:polygon draw:style-name="gr269" draw:text-style-name="P267" draw:layer="layout" svg:width="0.026cm" svg:height="0.026cm" svg:x="9.408cm" svg:y="11.104cm" svg:viewBox="0 0 27 27" draw:points="0,0 27,0 27,27 0,27">
          <text:p/>
        </draw:polygon>
        <draw:polygon draw:style-name="gr269" draw:text-style-name="P267" draw:layer="layout" svg:width="0.026cm" svg:height="0.026cm" svg:x="9.461cm" svg:y="11.104cm" svg:viewBox="0 0 27 27" draw:points="0,0 27,0 27,27 0,27">
          <text:p/>
        </draw:polygon>
        <draw:polygon draw:style-name="gr269" draw:text-style-name="P267" draw:layer="layout" svg:width="0.026cm" svg:height="0.026cm" svg:x="9.514cm" svg:y="11.104cm" svg:viewBox="0 0 27 27" draw:points="0,0 27,0 27,27 0,27">
          <text:p/>
        </draw:polygon>
        <draw:polygon draw:style-name="gr269" draw:text-style-name="P267" draw:layer="layout" svg:width="0.026cm" svg:height="0.026cm" svg:x="9.567cm" svg:y="11.104cm" svg:viewBox="0 0 27 27" draw:points="0,0 27,0 27,27 0,27">
          <text:p/>
        </draw:polygon>
        <draw:polygon draw:style-name="gr269" draw:text-style-name="P267" draw:layer="layout" svg:width="0.026cm" svg:height="0.026cm" svg:x="9.62cm" svg:y="11.104cm" svg:viewBox="0 0 27 27" draw:points="0,0 27,0 27,27 0,27">
          <text:p/>
        </draw:polygon>
        <draw:polygon draw:style-name="gr269" draw:text-style-name="P267" draw:layer="layout" svg:width="0.026cm" svg:height="0.026cm" svg:x="9.673cm" svg:y="11.104cm" svg:viewBox="0 0 27 27" draw:points="0,0 27,0 27,27 0,27">
          <text:p/>
        </draw:polygon>
        <draw:polygon draw:style-name="gr269" draw:text-style-name="P267" draw:layer="layout" svg:width="0.026cm" svg:height="0.026cm" svg:x="9.726cm" svg:y="11.104cm" svg:viewBox="0 0 27 27" draw:points="0,0 27,0 27,27 0,27">
          <text:p/>
        </draw:polygon>
        <draw:polygon draw:style-name="gr269" draw:text-style-name="P267" draw:layer="layout" svg:width="0.026cm" svg:height="0.026cm" svg:x="9.779cm" svg:y="11.104cm" svg:viewBox="0 0 27 27" draw:points="0,0 27,0 27,27 0,27">
          <text:p/>
        </draw:polygon>
        <draw:polygon draw:style-name="gr269" draw:text-style-name="P267" draw:layer="layout" svg:width="0.026cm" svg:height="0.026cm" svg:x="9.832cm" svg:y="11.104cm" svg:viewBox="0 0 27 27" draw:points="0,0 27,0 27,27 0,27">
          <text:p/>
        </draw:polygon>
        <draw:polygon draw:style-name="gr269" draw:text-style-name="P267" draw:layer="layout" svg:width="0.026cm" svg:height="0.026cm" svg:x="9.885cm" svg:y="11.104cm" svg:viewBox="0 0 27 27" draw:points="0,0 27,0 27,27 0,27">
          <text:p/>
        </draw:polygon>
        <draw:polygon draw:style-name="gr269" draw:text-style-name="P267" draw:layer="layout" svg:width="0.026cm" svg:height="0.026cm" svg:x="9.938cm" svg:y="11.104cm" svg:viewBox="0 0 27 27" draw:points="0,0 27,0 27,27 0,27">
          <text:p/>
        </draw:polygon>
        <draw:polygon draw:style-name="gr269" draw:text-style-name="P267" draw:layer="layout" svg:width="0.026cm" svg:height="0.026cm" svg:x="9.991cm" svg:y="11.104cm" svg:viewBox="0 0 27 27" draw:points="0,0 27,0 27,27 0,27">
          <text:p/>
        </draw:polygon>
        <draw:polygon draw:style-name="gr269" draw:text-style-name="P267" draw:layer="layout" svg:width="0.026cm" svg:height="0.026cm" svg:x="10.044cm" svg:y="11.104cm" svg:viewBox="0 0 27 27" draw:points="0,0 27,0 27,27 0,27">
          <text:p/>
        </draw:polygon>
        <draw:polygon draw:style-name="gr269" draw:text-style-name="P267" draw:layer="layout" svg:width="0.026cm" svg:height="0.026cm" svg:x="10.097cm" svg:y="11.104cm" svg:viewBox="0 0 27 27" draw:points="0,0 27,0 27,27 0,27">
          <text:p/>
        </draw:polygon>
        <draw:polygon draw:style-name="gr269" draw:text-style-name="P267" draw:layer="layout" svg:width="0.026cm" svg:height="0.026cm" svg:x="10.15cm" svg:y="11.104cm" svg:viewBox="0 0 27 27" draw:points="0,0 27,0 27,27 0,27">
          <text:p/>
        </draw:polygon>
        <draw:polygon draw:style-name="gr269" draw:text-style-name="P267" draw:layer="layout" svg:width="0.026cm" svg:height="0.026cm" svg:x="10.203cm" svg:y="11.104cm" svg:viewBox="0 0 27 27" draw:points="0,0 27,0 27,27 0,27">
          <text:p/>
        </draw:polygon>
        <draw:polygon draw:style-name="gr269" draw:text-style-name="P267" draw:layer="layout" svg:width="0.026cm" svg:height="0.026cm" svg:x="10.256cm" svg:y="11.104cm" svg:viewBox="0 0 27 27" draw:points="0,0 27,0 27,27 0,27">
          <text:p/>
        </draw:polygon>
        <draw:polygon draw:style-name="gr269" draw:text-style-name="P267" draw:layer="layout" svg:width="0.026cm" svg:height="0.026cm" svg:x="10.309cm" svg:y="11.104cm" svg:viewBox="0 0 27 27" draw:points="0,0 27,0 27,27 0,27">
          <text:p/>
        </draw:polygon>
        <draw:polygon draw:style-name="gr269" draw:text-style-name="P267" draw:layer="layout" svg:width="0.026cm" svg:height="0.026cm" svg:x="10.362cm" svg:y="11.104cm" svg:viewBox="0 0 27 27" draw:points="0,0 27,0 27,27 0,27">
          <text:p/>
        </draw:polygon>
        <draw:polygon draw:style-name="gr269" draw:text-style-name="P267" draw:layer="layout" svg:width="0.026cm" svg:height="0.026cm" svg:x="10.415cm" svg:y="11.104cm" svg:viewBox="0 0 27 27" draw:points="0,0 27,0 27,27 0,27">
          <text:p/>
        </draw:polygon>
        <draw:polygon draw:style-name="gr269" draw:text-style-name="P267" draw:layer="layout" svg:width="0.026cm" svg:height="0.026cm" svg:x="10.468cm" svg:y="11.104cm" svg:viewBox="0 0 27 27" draw:points="0,0 27,0 27,27 0,27">
          <text:p/>
        </draw:polygon>
        <draw:polygon draw:style-name="gr269" draw:text-style-name="P267" draw:layer="layout" svg:width="0.026cm" svg:height="0.026cm" svg:x="10.521cm" svg:y="11.104cm" svg:viewBox="0 0 27 27" draw:points="0,0 27,0 27,27 0,27">
          <text:p/>
        </draw:polygon>
        <draw:polygon draw:style-name="gr269" draw:text-style-name="P267" draw:layer="layout" svg:width="0.026cm" svg:height="0.026cm" svg:x="10.574cm" svg:y="11.104cm" svg:viewBox="0 0 27 27" draw:points="0,0 27,0 27,27 0,27">
          <text:p/>
        </draw:polygon>
        <draw:polygon draw:style-name="gr269" draw:text-style-name="P267" draw:layer="layout" svg:width="0.026cm" svg:height="0.026cm" svg:x="10.627cm" svg:y="11.104cm" svg:viewBox="0 0 27 27" draw:points="0,0 27,0 27,27 0,27">
          <text:p/>
        </draw:polygon>
        <draw:polygon draw:style-name="gr269" draw:text-style-name="P267" draw:layer="layout" svg:width="0.026cm" svg:height="0.026cm" svg:x="10.68cm" svg:y="11.104cm" svg:viewBox="0 0 27 27" draw:points="0,0 27,0 27,27 0,27">
          <text:p/>
        </draw:polygon>
        <draw:polygon draw:style-name="gr269" draw:text-style-name="P267" draw:layer="layout" svg:width="0.026cm" svg:height="0.026cm" svg:x="10.733cm" svg:y="11.104cm" svg:viewBox="0 0 27 27" draw:points="0,0 27,0 27,27 0,27">
          <text:p/>
        </draw:polygon>
        <draw:polygon draw:style-name="gr269" draw:text-style-name="P267" draw:layer="layout" svg:width="0.026cm" svg:height="0.026cm" svg:x="10.786cm" svg:y="11.104cm" svg:viewBox="0 0 27 27" draw:points="0,0 27,0 27,27 0,27">
          <text:p/>
        </draw:polygon>
        <draw:polygon draw:style-name="gr269" draw:text-style-name="P267" draw:layer="layout" svg:width="0.026cm" svg:height="0.026cm" svg:x="10.839cm" svg:y="11.104cm" svg:viewBox="0 0 27 27" draw:points="0,0 27,0 27,27 0,27">
          <text:p/>
        </draw:polygon>
        <draw:polygon draw:style-name="gr269" draw:text-style-name="P267" draw:layer="layout" svg:width="0.026cm" svg:height="0.026cm" svg:x="10.892cm" svg:y="11.104cm" svg:viewBox="0 0 27 27" draw:points="0,0 27,0 27,27 0,27">
          <text:p/>
        </draw:polygon>
        <draw:polygon draw:style-name="gr269" draw:text-style-name="P267" draw:layer="layout" svg:width="0.026cm" svg:height="0.026cm" svg:x="10.945cm" svg:y="11.104cm" svg:viewBox="0 0 27 27" draw:points="0,0 27,0 27,27 0,27">
          <text:p/>
        </draw:polygon>
        <draw:polygon draw:style-name="gr269" draw:text-style-name="P267" draw:layer="layout" svg:width="0.026cm" svg:height="0.026cm" svg:x="10.998cm" svg:y="11.104cm" svg:viewBox="0 0 27 27" draw:points="0,0 27,0 27,27 0,27">
          <text:p/>
        </draw:polygon>
        <draw:polygon draw:style-name="gr269" draw:text-style-name="P267" draw:layer="layout" svg:width="0.026cm" svg:height="0.026cm" svg:x="11.051cm" svg:y="11.104cm" svg:viewBox="0 0 27 27" draw:points="0,0 27,0 27,27 0,27">
          <text:p/>
        </draw:polygon>
        <draw:polygon draw:style-name="gr269" draw:text-style-name="P267" draw:layer="layout" svg:width="0.026cm" svg:height="0.026cm" svg:x="11.104cm" svg:y="11.104cm" svg:viewBox="0 0 27 27" draw:points="0,0 27,0 27,27 0,27">
          <text:p/>
        </draw:polygon>
        <draw:polygon draw:style-name="gr269" draw:text-style-name="P267" draw:layer="layout" svg:width="0.026cm" svg:height="0.026cm" svg:x="11.157cm" svg:y="11.104cm" svg:viewBox="0 0 27 27" draw:points="0,0 27,0 27,27 0,27">
          <text:p/>
        </draw:polygon>
        <draw:polygon draw:style-name="gr269" draw:text-style-name="P267" draw:layer="layout" svg:width="0.026cm" svg:height="0.026cm" svg:x="11.21cm" svg:y="11.104cm" svg:viewBox="0 0 27 27" draw:points="0,0 27,0 27,27 0,27">
          <text:p/>
        </draw:polygon>
        <draw:polygon draw:style-name="gr269" draw:text-style-name="P267" draw:layer="layout" svg:width="0.026cm" svg:height="0.026cm" svg:x="11.263cm" svg:y="11.104cm" svg:viewBox="0 0 27 27" draw:points="0,0 27,0 27,27 0,27">
          <text:p/>
        </draw:polygon>
        <draw:polygon draw:style-name="gr269" draw:text-style-name="P267" draw:layer="layout" svg:width="0.026cm" svg:height="0.026cm" svg:x="11.316cm" svg:y="11.104cm" svg:viewBox="0 0 27 27" draw:points="0,0 27,0 27,27 0,27">
          <text:p/>
        </draw:polygon>
        <draw:polygon draw:style-name="gr269" draw:text-style-name="P267" draw:layer="layout" svg:width="0.026cm" svg:height="0.026cm" svg:x="11.369cm" svg:y="11.104cm" svg:viewBox="0 0 27 27" draw:points="0,0 27,0 27,27 0,27">
          <text:p/>
        </draw:polygon>
        <draw:polygon draw:style-name="gr269" draw:text-style-name="P267" draw:layer="layout" svg:width="0.026cm" svg:height="0.026cm" svg:x="11.422cm" svg:y="11.104cm" svg:viewBox="0 0 27 27" draw:points="0,0 27,0 27,27 0,27">
          <text:p/>
        </draw:polygon>
        <draw:polygon draw:style-name="gr269" draw:text-style-name="P267" draw:layer="layout" svg:width="0.026cm" svg:height="0.026cm" svg:x="11.475cm" svg:y="11.104cm" svg:viewBox="0 0 27 27" draw:points="0,0 27,0 27,27 0,27">
          <text:p/>
        </draw:polygon>
        <draw:polygon draw:style-name="gr269" draw:text-style-name="P267" draw:layer="layout" svg:width="0.026cm" svg:height="0.026cm" svg:x="11.528cm" svg:y="11.104cm" svg:viewBox="0 0 27 27" draw:points="0,0 27,0 27,27 0,27">
          <text:p/>
        </draw:polygon>
        <draw:polygon draw:style-name="gr269" draw:text-style-name="P267" draw:layer="layout" svg:width="0.026cm" svg:height="0.026cm" svg:x="11.581cm" svg:y="11.104cm" svg:viewBox="0 0 27 27" draw:points="0,0 27,0 27,27 0,27">
          <text:p/>
        </draw:polygon>
        <draw:polygon draw:style-name="gr269" draw:text-style-name="P267" draw:layer="layout" svg:width="0.026cm" svg:height="0.026cm" svg:x="11.634cm" svg:y="11.104cm" svg:viewBox="0 0 27 27" draw:points="0,0 27,0 27,27 0,27">
          <text:p/>
        </draw:polygon>
        <draw:polygon draw:style-name="gr269" draw:text-style-name="P267" draw:layer="layout" svg:width="0.026cm" svg:height="0.026cm" svg:x="11.687cm" svg:y="11.104cm" svg:viewBox="0 0 27 27" draw:points="0,0 27,0 27,27 0,27">
          <text:p/>
        </draw:polygon>
        <draw:polygon draw:style-name="gr269" draw:text-style-name="P267" draw:layer="layout" svg:width="0.026cm" svg:height="0.026cm" svg:x="11.74cm" svg:y="11.104cm" svg:viewBox="0 0 27 27" draw:points="0,0 27,0 27,27 0,27">
          <text:p/>
        </draw:polygon>
        <draw:polygon draw:style-name="gr269" draw:text-style-name="P267" draw:layer="layout" svg:width="0.026cm" svg:height="0.026cm" svg:x="11.793cm" svg:y="11.104cm" svg:viewBox="0 0 27 27" draw:points="0,0 27,0 27,27 0,27">
          <text:p/>
        </draw:polygon>
        <draw:polygon draw:style-name="gr269" draw:text-style-name="P267" draw:layer="layout" svg:width="0.026cm" svg:height="0.026cm" svg:x="11.846cm" svg:y="11.104cm" svg:viewBox="0 0 27 27" draw:points="0,0 27,0 27,27 0,27">
          <text:p/>
        </draw:polygon>
        <draw:polygon draw:style-name="gr269" draw:text-style-name="P267" draw:layer="layout" svg:width="0.026cm" svg:height="0.026cm" svg:x="11.899cm" svg:y="11.104cm" svg:viewBox="0 0 27 27" draw:points="0,0 27,0 27,27 0,27">
          <text:p/>
        </draw:polygon>
        <draw:polygon draw:style-name="gr269" draw:text-style-name="P267" draw:layer="layout" svg:width="0.026cm" svg:height="0.026cm" svg:x="11.952cm" svg:y="11.104cm" svg:viewBox="0 0 27 27" draw:points="0,0 27,0 27,27 0,27">
          <text:p/>
        </draw:polygon>
        <draw:polygon draw:style-name="gr269" draw:text-style-name="P267" draw:layer="layout" svg:width="0.026cm" svg:height="0.026cm" svg:x="12.005cm" svg:y="11.104cm" svg:viewBox="0 0 27 27" draw:points="0,0 27,0 27,27 0,27">
          <text:p/>
        </draw:polygon>
        <draw:polygon draw:style-name="gr269" draw:text-style-name="P267" draw:layer="layout" svg:width="0.026cm" svg:height="0.026cm" svg:x="12.058cm" svg:y="11.104cm" svg:viewBox="0 0 27 27" draw:points="0,0 27,0 27,27 0,27">
          <text:p/>
        </draw:polygon>
        <draw:polygon draw:style-name="gr269" draw:text-style-name="P267" draw:layer="layout" svg:width="0.026cm" svg:height="0.026cm" svg:x="12.111cm" svg:y="11.104cm" svg:viewBox="0 0 27 27" draw:points="0,0 27,0 27,27 0,27">
          <text:p/>
        </draw:polygon>
        <draw:polygon draw:style-name="gr269" draw:text-style-name="P267" draw:layer="layout" svg:width="0.026cm" svg:height="0.026cm" svg:x="12.164cm" svg:y="11.104cm" svg:viewBox="0 0 27 27" draw:points="0,0 27,0 27,27 0,27">
          <text:p/>
        </draw:polygon>
        <draw:polygon draw:style-name="gr269" draw:text-style-name="P267" draw:layer="layout" svg:width="0.026cm" svg:height="0.026cm" svg:x="12.217cm" svg:y="11.104cm" svg:viewBox="0 0 27 27" draw:points="0,0 27,0 27,27 0,27">
          <text:p/>
        </draw:polygon>
        <draw:polygon draw:style-name="gr269" draw:text-style-name="P267" draw:layer="layout" svg:width="0.026cm" svg:height="0.026cm" svg:x="12.27cm" svg:y="11.104cm" svg:viewBox="0 0 27 27" draw:points="0,0 27,0 27,27 0,27">
          <text:p/>
        </draw:polygon>
        <draw:polygon draw:style-name="gr269" draw:text-style-name="P267" draw:layer="layout" svg:width="0.026cm" svg:height="0.026cm" svg:x="12.323cm" svg:y="11.104cm" svg:viewBox="0 0 27 27" draw:points="0,0 27,0 27,27 0,27">
          <text:p/>
        </draw:polygon>
        <draw:polygon draw:style-name="gr269" draw:text-style-name="P267" draw:layer="layout" svg:width="0.026cm" svg:height="0.026cm" svg:x="12.376cm" svg:y="11.104cm" svg:viewBox="0 0 27 27" draw:points="0,0 27,0 27,27 0,27">
          <text:p/>
        </draw:polygon>
        <draw:polygon draw:style-name="gr269" draw:text-style-name="P267" draw:layer="layout" svg:width="0.026cm" svg:height="0.026cm" svg:x="12.429cm" svg:y="11.104cm" svg:viewBox="0 0 27 27" draw:points="0,0 27,0 27,27 0,27">
          <text:p/>
        </draw:polygon>
        <draw:polygon draw:style-name="gr269" draw:text-style-name="P267" draw:layer="layout" svg:width="0.026cm" svg:height="0.026cm" svg:x="12.482cm" svg:y="11.104cm" svg:viewBox="0 0 27 27" draw:points="0,0 27,0 27,27 0,27">
          <text:p/>
        </draw:polygon>
        <draw:polygon draw:style-name="gr269" draw:text-style-name="P267" draw:layer="layout" svg:width="0.026cm" svg:height="0.026cm" svg:x="12.535cm" svg:y="11.104cm" svg:viewBox="0 0 27 27" draw:points="0,0 27,0 27,27 0,27">
          <text:p/>
        </draw:polygon>
        <draw:polygon draw:style-name="gr269" draw:text-style-name="P267" draw:layer="layout" svg:width="0.026cm" svg:height="0.026cm" svg:x="12.588cm" svg:y="11.104cm" svg:viewBox="0 0 27 27" draw:points="0,0 27,0 27,27 0,27">
          <text:p/>
        </draw:polygon>
        <draw:polygon draw:style-name="gr269" draw:text-style-name="P267" draw:layer="layout" svg:width="0.026cm" svg:height="0.026cm" svg:x="12.641cm" svg:y="11.104cm" svg:viewBox="0 0 27 27" draw:points="0,0 27,0 27,27 0,27">
          <text:p/>
        </draw:polygon>
        <draw:polygon draw:style-name="gr269" draw:text-style-name="P267" draw:layer="layout" svg:width="0.027cm" svg:height="0.026cm" svg:x="12.694cm" svg:y="11.104cm" svg:viewBox="0 0 28 27" draw:points="0,0 28,0 28,27 0,27">
          <text:p/>
        </draw:polygon>
        <draw:polygon draw:style-name="gr269" draw:text-style-name="P267" draw:layer="layout" svg:width="0.027cm" svg:height="0.026cm" svg:x="12.747cm" svg:y="11.104cm" svg:viewBox="0 0 28 27" draw:points="0,0 28,0 28,27 0,27">
          <text:p/>
        </draw:polygon>
        <draw:polygon draw:style-name="gr269" draw:text-style-name="P267" draw:layer="layout" svg:width="0.027cm" svg:height="0.026cm" svg:x="12.8cm" svg:y="11.104cm" svg:viewBox="0 0 28 27" draw:points="0,0 28,0 28,27 0,27">
          <text:p/>
        </draw:polygon>
        <draw:polygon draw:style-name="gr269" draw:text-style-name="P267" draw:layer="layout" svg:width="0.027cm" svg:height="0.026cm" svg:x="12.853cm" svg:y="11.104cm" svg:viewBox="0 0 28 27" draw:points="0,0 28,0 28,27 0,27">
          <text:p/>
        </draw:polygon>
        <draw:polygon draw:style-name="gr269" draw:text-style-name="P267" draw:layer="layout" svg:width="0.027cm" svg:height="0.026cm" svg:x="12.906cm" svg:y="11.104cm" svg:viewBox="0 0 28 27" draw:points="0,0 28,0 28,27 0,27">
          <text:p/>
        </draw:polygon>
        <draw:polygon draw:style-name="gr269" draw:text-style-name="P267" draw:layer="layout" svg:width="0.027cm" svg:height="0.026cm" svg:x="12.959cm" svg:y="11.104cm" svg:viewBox="0 0 28 27" draw:points="0,0 28,0 28,27 0,27">
          <text:p/>
        </draw:polygon>
        <draw:polygon draw:style-name="gr269" draw:text-style-name="P267" draw:layer="layout" svg:width="0.028cm" svg:height="0.026cm" svg:x="13.012cm" svg:y="11.104cm" svg:viewBox="0 0 29 27" draw:points="0,0 29,0 29,27 0,27">
          <text:p/>
        </draw:polygon>
        <draw:polygon draw:style-name="gr269" draw:text-style-name="P267" draw:layer="layout" svg:width="0.027cm" svg:height="0.026cm" svg:x="13.065cm" svg:y="11.104cm" svg:viewBox="0 0 28 27" draw:points="0,0 28,0 28,27 0,27">
          <text:p/>
        </draw:polygon>
        <draw:polygon draw:style-name="gr269" draw:text-style-name="P267" draw:layer="layout" svg:width="0.027cm" svg:height="0.026cm" svg:x="13.118cm" svg:y="11.104cm" svg:viewBox="0 0 28 27" draw:points="0,0 28,0 28,27 0,27">
          <text:p/>
        </draw:polygon>
        <draw:polygon draw:style-name="gr269" draw:text-style-name="P267" draw:layer="layout" svg:width="0.027cm" svg:height="0.026cm" svg:x="13.171cm" svg:y="11.104cm" svg:viewBox="0 0 28 27" draw:points="0,0 28,0 28,27 0,27">
          <text:p/>
        </draw:polygon>
        <draw:polygon draw:style-name="gr269" draw:text-style-name="P267" draw:layer="layout" svg:width="0.027cm" svg:height="0.026cm" svg:x="13.224cm" svg:y="11.104cm" svg:viewBox="0 0 28 27" draw:points="0,0 28,0 28,27 0,27">
          <text:p/>
        </draw:polygon>
        <draw:polygon draw:style-name="gr269" draw:text-style-name="P267" draw:layer="layout" svg:width="0.027cm" svg:height="0.026cm" svg:x="13.277cm" svg:y="11.104cm" svg:viewBox="0 0 28 27" draw:points="0,0 28,0 28,27 0,27">
          <text:p/>
        </draw:polygon>
        <draw:polygon draw:style-name="gr269" draw:text-style-name="P267" draw:layer="layout" svg:width="0.027cm" svg:height="0.026cm" svg:x="13.33cm" svg:y="11.104cm" svg:viewBox="0 0 28 27" draw:points="0,0 28,0 28,27 0,27">
          <text:p/>
        </draw:polygon>
        <draw:polygon draw:style-name="gr269" draw:text-style-name="P267" draw:layer="layout" svg:width="0.027cm" svg:height="0.026cm" svg:x="13.383cm" svg:y="11.104cm" svg:viewBox="0 0 28 27" draw:points="0,0 28,0 28,27 0,27">
          <text:p/>
        </draw:polygon>
        <draw:polygon draw:style-name="gr269" draw:text-style-name="P267" draw:layer="layout" svg:width="0.027cm" svg:height="0.026cm" svg:x="13.436cm" svg:y="11.104cm" svg:viewBox="0 0 28 27" draw:points="0,0 28,0 28,27 0,27">
          <text:p/>
        </draw:polygon>
        <draw:polygon draw:style-name="gr269" draw:text-style-name="P267" draw:layer="layout" svg:width="0.027cm" svg:height="0.026cm" svg:x="13.489cm" svg:y="11.104cm" svg:viewBox="0 0 28 27" draw:points="0,0 28,0 28,27 0,27">
          <text:p/>
        </draw:polygon>
        <draw:polygon draw:style-name="gr269" draw:text-style-name="P267" draw:layer="layout" svg:width="0.027cm" svg:height="0.026cm" svg:x="13.542cm" svg:y="11.104cm" svg:viewBox="0 0 28 27" draw:points="0,0 28,0 28,27 0,27">
          <text:p/>
        </draw:polygon>
        <draw:polygon draw:style-name="gr269" draw:text-style-name="P267" draw:layer="layout" svg:width="0.027cm" svg:height="0.026cm" svg:x="13.595cm" svg:y="11.104cm" svg:viewBox="0 0 28 27" draw:points="0,0 28,0 28,27 0,27">
          <text:p/>
        </draw:polygon>
        <draw:polygon draw:style-name="gr269" draw:text-style-name="P267" draw:layer="layout" svg:width="0.027cm" svg:height="0.026cm" svg:x="13.648cm" svg:y="11.104cm" svg:viewBox="0 0 28 27" draw:points="0,0 28,0 28,27 0,27">
          <text:p/>
        </draw:polygon>
        <draw:polygon draw:style-name="gr269" draw:text-style-name="P267" draw:layer="layout" svg:width="0.027cm" svg:height="0.026cm" svg:x="13.701cm" svg:y="11.104cm" svg:viewBox="0 0 28 27" draw:points="0,0 28,0 28,27 0,27">
          <text:p/>
        </draw:polygon>
        <draw:polygon draw:style-name="gr269" draw:text-style-name="P267" draw:layer="layout" svg:width="0.027cm" svg:height="0.026cm" svg:x="13.754cm" svg:y="11.104cm" svg:viewBox="0 0 28 27" draw:points="0,0 28,0 28,27 0,27">
          <text:p/>
        </draw:polygon>
        <draw:polygon draw:style-name="gr269" draw:text-style-name="P267" draw:layer="layout" svg:width="0.027cm" svg:height="0.026cm" svg:x="13.807cm" svg:y="11.104cm" svg:viewBox="0 0 28 27" draw:points="0,0 28,0 28,27 0,27">
          <text:p/>
        </draw:polygon>
        <draw:polygon draw:style-name="gr269" draw:text-style-name="P267" draw:layer="layout" svg:width="0.027cm" svg:height="0.026cm" svg:x="13.86cm" svg:y="11.104cm" svg:viewBox="0 0 28 27" draw:points="0,0 28,0 28,27 0,27">
          <text:p/>
        </draw:polygon>
        <draw:polygon draw:style-name="gr269" draw:text-style-name="P267" draw:layer="layout" svg:width="0.027cm" svg:height="0.026cm" svg:x="13.913cm" svg:y="11.104cm" svg:viewBox="0 0 28 27" draw:points="0,0 28,0 28,27 0,27">
          <text:p/>
        </draw:polygon>
        <draw:polygon draw:style-name="gr269" draw:text-style-name="P267" draw:layer="layout" svg:width="0.027cm" svg:height="0.026cm" svg:x="13.966cm" svg:y="11.104cm" svg:viewBox="0 0 28 27" draw:points="0,0 28,0 28,27 0,27">
          <text:p/>
        </draw:polygon>
        <draw:polygon draw:style-name="gr269" draw:text-style-name="P267" draw:layer="layout" svg:width="0.027cm" svg:height="0.026cm" svg:x="14.019cm" svg:y="11.104cm" svg:viewBox="0 0 28 27" draw:points="0,0 28,0 28,27 0,27">
          <text:p/>
        </draw:polygon>
        <draw:polygon draw:style-name="gr269" draw:text-style-name="P267" draw:layer="layout" svg:width="0.027cm" svg:height="0.026cm" svg:x="14.072cm" svg:y="11.104cm" svg:viewBox="0 0 28 27" draw:points="0,0 28,0 28,27 0,27">
          <text:p/>
        </draw:polygon>
        <draw:polygon draw:style-name="gr269" draw:text-style-name="P267" draw:layer="layout" svg:width="0.027cm" svg:height="0.026cm" svg:x="14.125cm" svg:y="11.104cm" svg:viewBox="0 0 28 27" draw:points="0,0 28,0 28,27 0,27">
          <text:p/>
        </draw:polygon>
        <draw:polygon draw:style-name="gr269" draw:text-style-name="P267" draw:layer="layout" svg:width="0.027cm" svg:height="0.026cm" svg:x="14.178cm" svg:y="11.104cm" svg:viewBox="0 0 28 27" draw:points="0,0 28,0 28,27 0,27">
          <text:p/>
        </draw:polygon>
        <draw:polygon draw:style-name="gr269" draw:text-style-name="P267" draw:layer="layout" svg:width="0.027cm" svg:height="0.026cm" svg:x="14.231cm" svg:y="11.104cm" svg:viewBox="0 0 28 27" draw:points="0,0 28,0 28,27 0,27">
          <text:p/>
        </draw:polygon>
        <draw:polygon draw:style-name="gr269" draw:text-style-name="P267" draw:layer="layout" svg:width="0.027cm" svg:height="0.026cm" svg:x="14.284cm" svg:y="11.104cm" svg:viewBox="0 0 28 27" draw:points="0,0 28,0 28,27 0,27">
          <text:p/>
        </draw:polygon>
        <draw:polygon draw:style-name="gr269" draw:text-style-name="P267" draw:layer="layout" svg:width="0.027cm" svg:height="0.026cm" svg:x="14.337cm" svg:y="11.104cm" svg:viewBox="0 0 28 27" draw:points="0,0 28,0 28,27 0,27">
          <text:p/>
        </draw:polygon>
        <draw:polygon draw:style-name="gr269" draw:text-style-name="P267" draw:layer="layout" svg:width="0.028cm" svg:height="0.026cm" svg:x="14.39cm" svg:y="11.104cm" svg:viewBox="0 0 29 27" draw:points="0,0 29,0 29,27 0,27">
          <text:p/>
        </draw:polygon>
        <draw:polygon draw:style-name="gr269" draw:text-style-name="P267" draw:layer="layout" svg:width="0.027cm" svg:height="0.026cm" svg:x="14.443cm" svg:y="11.104cm" svg:viewBox="0 0 28 27" draw:points="0,0 28,0 28,27 0,27">
          <text:p/>
        </draw:polygon>
        <draw:polygon draw:style-name="gr269" draw:text-style-name="P267" draw:layer="layout" svg:width="0.027cm" svg:height="0.026cm" svg:x="14.496cm" svg:y="11.104cm" svg:viewBox="0 0 28 27" draw:points="0,0 28,0 28,27 0,27">
          <text:p/>
        </draw:polygon>
        <draw:polygon draw:style-name="gr269" draw:text-style-name="P267" draw:layer="layout" svg:width="0.027cm" svg:height="0.026cm" svg:x="14.549cm" svg:y="11.104cm" svg:viewBox="0 0 28 27" draw:points="0,0 28,0 28,27 0,27">
          <text:p/>
        </draw:polygon>
        <draw:polygon draw:style-name="gr269" draw:text-style-name="P267" draw:layer="layout" svg:width="0.027cm" svg:height="0.026cm" svg:x="14.602cm" svg:y="11.104cm" svg:viewBox="0 0 28 27" draw:points="0,0 28,0 28,27 0,27">
          <text:p/>
        </draw:polygon>
        <draw:polygon draw:style-name="gr269" draw:text-style-name="P267" draw:layer="layout" svg:width="0.027cm" svg:height="0.026cm" svg:x="14.655cm" svg:y="11.104cm" svg:viewBox="0 0 28 27" draw:points="0,0 28,0 28,27 0,27">
          <text:p/>
        </draw:polygon>
        <draw:polygon draw:style-name="gr269" draw:text-style-name="P267" draw:layer="layout" svg:width="0.027cm" svg:height="0.026cm" svg:x="14.708cm" svg:y="11.104cm" svg:viewBox="0 0 28 27" draw:points="0,0 28,0 28,27 0,27">
          <text:p/>
        </draw:polygon>
        <draw:polygon draw:style-name="gr269" draw:text-style-name="P267" draw:layer="layout" svg:width="0.027cm" svg:height="0.026cm" svg:x="14.761cm" svg:y="11.104cm" svg:viewBox="0 0 28 27" draw:points="0,0 28,0 28,27 0,27">
          <text:p/>
        </draw:polygon>
        <draw:polygon draw:style-name="gr269" draw:text-style-name="P267" draw:layer="layout" svg:width="0.027cm" svg:height="0.026cm" svg:x="14.814cm" svg:y="11.104cm" svg:viewBox="0 0 28 27" draw:points="0,0 28,0 28,27 0,27">
          <text:p/>
        </draw:polygon>
        <draw:polygon draw:style-name="gr269" draw:text-style-name="P267" draw:layer="layout" svg:width="0.027cm" svg:height="0.026cm" svg:x="14.867cm" svg:y="11.104cm" svg:viewBox="0 0 28 27" draw:points="0,0 28,0 28,27 0,27">
          <text:p/>
        </draw:polygon>
        <draw:polygon draw:style-name="gr269" draw:text-style-name="P267" draw:layer="layout" svg:width="0.027cm" svg:height="0.026cm" svg:x="14.92cm" svg:y="11.104cm" svg:viewBox="0 0 28 27" draw:points="0,0 28,0 28,27 0,27">
          <text:p/>
        </draw:polygon>
        <draw:polygon draw:style-name="gr269" draw:text-style-name="P267" draw:layer="layout" svg:width="0.027cm" svg:height="0.026cm" svg:x="14.973cm" svg:y="11.104cm" svg:viewBox="0 0 28 27" draw:points="0,0 28,0 28,27 0,27">
          <text:p/>
        </draw:polygon>
        <draw:polygon draw:style-name="gr269" draw:text-style-name="P267" draw:layer="layout" svg:width="0.027cm" svg:height="0.026cm" svg:x="15.026cm" svg:y="11.104cm" svg:viewBox="0 0 28 27" draw:points="0,0 28,0 28,27 0,27">
          <text:p/>
        </draw:polygon>
        <draw:polygon draw:style-name="gr269" draw:text-style-name="P267" draw:layer="layout" svg:width="0.027cm" svg:height="0.026cm" svg:x="15.079cm" svg:y="11.104cm" svg:viewBox="0 0 28 27" draw:points="0,0 28,0 28,27 0,27">
          <text:p/>
        </draw:polygon>
        <draw:polygon draw:style-name="gr269" draw:text-style-name="P267" draw:layer="layout" svg:width="0.027cm" svg:height="0.026cm" svg:x="15.132cm" svg:y="11.104cm" svg:viewBox="0 0 28 27" draw:points="0,0 28,0 28,27 0,27">
          <text:p/>
        </draw:polygon>
        <draw:polygon draw:style-name="gr269" draw:text-style-name="P267" draw:layer="layout" svg:width="0.027cm" svg:height="0.026cm" svg:x="15.185cm" svg:y="11.104cm" svg:viewBox="0 0 28 27" draw:points="0,0 28,0 28,27 0,27">
          <text:p/>
        </draw:polygon>
        <draw:polygon draw:style-name="gr269" draw:text-style-name="P267" draw:layer="layout" svg:width="0.027cm" svg:height="0.026cm" svg:x="15.238cm" svg:y="11.104cm" svg:viewBox="0 0 28 27" draw:points="0,0 28,0 28,27 0,27">
          <text:p/>
        </draw:polygon>
        <draw:polygon draw:style-name="gr269" draw:text-style-name="P267" draw:layer="layout" svg:width="0.027cm" svg:height="0.026cm" svg:x="15.291cm" svg:y="11.104cm" svg:viewBox="0 0 28 27" draw:points="0,0 28,0 28,27 0,27">
          <text:p/>
        </draw:polygon>
        <draw:polygon draw:style-name="gr269" draw:text-style-name="P267" draw:layer="layout" svg:width="0.027cm" svg:height="0.026cm" svg:x="15.344cm" svg:y="11.104cm" svg:viewBox="0 0 28 27" draw:points="0,0 28,0 28,27 0,27">
          <text:p/>
        </draw:polygon>
        <draw:polygon draw:style-name="gr269" draw:text-style-name="P267" draw:layer="layout" svg:width="0.027cm" svg:height="0.026cm" svg:x="15.397cm" svg:y="11.104cm" svg:viewBox="0 0 28 27" draw:points="0,0 28,0 28,27 0,27">
          <text:p/>
        </draw:polygon>
        <draw:polygon draw:style-name="gr269" draw:text-style-name="P267" draw:layer="layout" svg:width="0.027cm" svg:height="0.026cm" svg:x="15.45cm" svg:y="11.104cm" svg:viewBox="0 0 28 27" draw:points="0,0 28,0 28,27 0,27">
          <text:p/>
        </draw:polygon>
        <draw:polygon draw:style-name="gr269" draw:text-style-name="P267" draw:layer="layout" svg:width="0.027cm" svg:height="0.026cm" svg:x="15.503cm" svg:y="11.104cm" svg:viewBox="0 0 28 27" draw:points="0,0 28,0 28,27 0,27">
          <text:p/>
        </draw:polygon>
        <draw:polygon draw:style-name="gr269" draw:text-style-name="P267" draw:layer="layout" svg:width="0.027cm" svg:height="0.026cm" svg:x="15.556cm" svg:y="11.104cm" svg:viewBox="0 0 28 27" draw:points="0,0 28,0 28,27 0,27">
          <text:p/>
        </draw:polygon>
        <draw:polygon draw:style-name="gr269" draw:text-style-name="P267" draw:layer="layout" svg:width="0.027cm" svg:height="0.026cm" svg:x="15.609cm" svg:y="11.104cm" svg:viewBox="0 0 28 27" draw:points="0,0 28,0 28,27 0,27">
          <text:p/>
        </draw:polygon>
        <draw:polygon draw:style-name="gr269" draw:text-style-name="P267" draw:layer="layout" svg:width="0.027cm" svg:height="0.026cm" svg:x="15.662cm" svg:y="11.104cm" svg:viewBox="0 0 28 27" draw:points="0,0 28,0 28,27 0,27">
          <text:p/>
        </draw:polygon>
        <draw:polygon draw:style-name="gr269" draw:text-style-name="P267" draw:layer="layout" svg:width="0.027cm" svg:height="0.026cm" svg:x="15.715cm" svg:y="11.104cm" svg:viewBox="0 0 28 27" draw:points="0,0 28,0 28,27 0,27">
          <text:p/>
        </draw:polygon>
        <draw:polygon draw:style-name="gr269" draw:text-style-name="P267" draw:layer="layout" svg:width="0.028cm" svg:height="0.026cm" svg:x="15.768cm" svg:y="11.104cm" svg:viewBox="0 0 29 27" draw:points="0,0 29,0 29,27 0,27">
          <text:p/>
        </draw:polygon>
        <draw:polygon draw:style-name="gr269" draw:text-style-name="P267" draw:layer="layout" svg:width="0.027cm" svg:height="0.026cm" svg:x="15.821cm" svg:y="11.104cm" svg:viewBox="0 0 28 27" draw:points="0,0 28,0 28,27 0,27">
          <text:p/>
        </draw:polygon>
        <draw:polygon draw:style-name="gr269" draw:text-style-name="P267" draw:layer="layout" svg:width="0.027cm" svg:height="0.026cm" svg:x="15.874cm" svg:y="11.104cm" svg:viewBox="0 0 28 27" draw:points="0,0 28,0 28,27 0,27">
          <text:p/>
        </draw:polygon>
        <draw:polygon draw:style-name="gr269" draw:text-style-name="P267" draw:layer="layout" svg:width="0.027cm" svg:height="0.026cm" svg:x="15.927cm" svg:y="11.104cm" svg:viewBox="0 0 28 27" draw:points="0,0 28,0 28,27 0,27">
          <text:p/>
        </draw:polygon>
        <draw:polygon draw:style-name="gr269" draw:text-style-name="P267" draw:layer="layout" svg:width="0.027cm" svg:height="0.026cm" svg:x="15.98cm" svg:y="11.104cm" svg:viewBox="0 0 28 27" draw:points="0,0 28,0 28,27 0,27">
          <text:p/>
        </draw:polygon>
        <draw:polygon draw:style-name="gr269" draw:text-style-name="P267" draw:layer="layout" svg:width="0.027cm" svg:height="0.026cm" svg:x="16.033cm" svg:y="11.104cm" svg:viewBox="0 0 28 27" draw:points="0,0 28,0 28,27 0,27">
          <text:p/>
        </draw:polygon>
        <draw:polygon draw:style-name="gr269" draw:text-style-name="P267" draw:layer="layout" svg:width="0.027cm" svg:height="0.026cm" svg:x="16.086cm" svg:y="11.104cm" svg:viewBox="0 0 28 27" draw:points="0,0 28,0 28,27 0,27">
          <text:p/>
        </draw:polygon>
        <draw:polygon draw:style-name="gr269" draw:text-style-name="P267" draw:layer="layout" svg:width="0.027cm" svg:height="0.026cm" svg:x="16.139cm" svg:y="11.104cm" svg:viewBox="0 0 28 27" draw:points="0,0 28,0 28,27 0,27">
          <text:p/>
        </draw:polygon>
        <draw:polygon draw:style-name="gr269" draw:text-style-name="P267" draw:layer="layout" svg:width="0.027cm" svg:height="0.026cm" svg:x="16.192cm" svg:y="11.104cm" svg:viewBox="0 0 28 27" draw:points="0,0 28,0 28,27 0,27">
          <text:p/>
        </draw:polygon>
        <draw:polygon draw:style-name="gr269" draw:text-style-name="P267" draw:layer="layout" svg:width="0.027cm" svg:height="0.026cm" svg:x="16.245cm" svg:y="11.104cm" svg:viewBox="0 0 28 27" draw:points="0,0 28,0 28,27 0,27">
          <text:p/>
        </draw:polygon>
        <draw:polygon draw:style-name="gr269" draw:text-style-name="P267" draw:layer="layout" svg:width="0.027cm" svg:height="0.026cm" svg:x="16.298cm" svg:y="11.104cm" svg:viewBox="0 0 28 27" draw:points="0,0 28,0 28,27 0,27">
          <text:p/>
        </draw:polygon>
        <draw:polygon draw:style-name="gr269" draw:text-style-name="P267" draw:layer="layout" svg:width="0.027cm" svg:height="0.026cm" svg:x="16.351cm" svg:y="11.104cm" svg:viewBox="0 0 28 27" draw:points="0,0 28,0 28,27 0,27">
          <text:p/>
        </draw:polygon>
        <draw:polygon draw:style-name="gr269" draw:text-style-name="P267" draw:layer="layout" svg:width="0.027cm" svg:height="0.026cm" svg:x="16.404cm" svg:y="11.104cm" svg:viewBox="0 0 28 27" draw:points="0,0 28,0 28,27 0,27">
          <text:p/>
        </draw:polygon>
        <draw:polygon draw:style-name="gr269" draw:text-style-name="P267" draw:layer="layout" svg:width="0.027cm" svg:height="0.026cm" svg:x="16.457cm" svg:y="11.104cm" svg:viewBox="0 0 28 27" draw:points="0,0 28,0 28,27 0,27">
          <text:p/>
        </draw:polygon>
        <draw:polygon draw:style-name="gr269" draw:text-style-name="P267" draw:layer="layout" svg:width="0.027cm" svg:height="0.026cm" svg:x="16.51cm" svg:y="11.104cm" svg:viewBox="0 0 28 27" draw:points="0,0 28,0 28,27 0,27">
          <text:p/>
        </draw:polygon>
        <draw:polygon draw:style-name="gr269" draw:text-style-name="P267" draw:layer="layout" svg:width="0.027cm" svg:height="0.026cm" svg:x="16.563cm" svg:y="11.104cm" svg:viewBox="0 0 28 27" draw:points="0,0 28,0 28,27 0,27">
          <text:p/>
        </draw:polygon>
        <draw:polygon draw:style-name="gr269" draw:text-style-name="P267" draw:layer="layout" svg:width="0.027cm" svg:height="0.026cm" svg:x="16.616cm" svg:y="11.104cm" svg:viewBox="0 0 28 27" draw:points="0,0 28,0 28,27 0,27">
          <text:p/>
        </draw:polygon>
        <draw:polygon draw:style-name="gr269" draw:text-style-name="P267" draw:layer="layout" svg:width="0.027cm" svg:height="0.026cm" svg:x="16.669cm" svg:y="11.104cm" svg:viewBox="0 0 28 27" draw:points="0,0 28,0 28,27 0,27">
          <text:p/>
        </draw:polygon>
        <draw:polygon draw:style-name="gr269" draw:text-style-name="P267" draw:layer="layout" svg:width="0.027cm" svg:height="0.026cm" svg:x="16.722cm" svg:y="11.104cm" svg:viewBox="0 0 28 27" draw:points="0,0 28,0 28,27 0,27">
          <text:p/>
        </draw:polygon>
        <draw:polygon draw:style-name="gr269" draw:text-style-name="P267" draw:layer="layout" svg:width="0.027cm" svg:height="0.026cm" svg:x="16.775cm" svg:y="11.104cm" svg:viewBox="0 0 28 27" draw:points="0,0 28,0 28,27 0,27">
          <text:p/>
        </draw:polygon>
        <draw:polygon draw:style-name="gr269" draw:text-style-name="P267" draw:layer="layout" svg:width="0.027cm" svg:height="0.026cm" svg:x="16.828cm" svg:y="11.104cm" svg:viewBox="0 0 28 27" draw:points="0,0 28,0 28,27 0,27">
          <text:p/>
        </draw:polygon>
        <draw:polygon draw:style-name="gr269" draw:text-style-name="P267" draw:layer="layout" svg:width="0.027cm" svg:height="0.026cm" svg:x="16.881cm" svg:y="11.104cm" svg:viewBox="0 0 28 27" draw:points="0,0 28,0 28,27 0,27">
          <text:p/>
        </draw:polygon>
        <draw:polygon draw:style-name="gr269" draw:text-style-name="P267" draw:layer="layout" svg:width="0.027cm" svg:height="0.026cm" svg:x="16.934cm" svg:y="11.104cm" svg:viewBox="0 0 28 27" draw:points="0,0 28,0 28,27 0,27">
          <text:p/>
        </draw:polygon>
        <draw:polygon draw:style-name="gr269" draw:text-style-name="P267" draw:layer="layout" svg:width="0.027cm" svg:height="0.026cm" svg:x="16.987cm" svg:y="11.104cm" svg:viewBox="0 0 28 27" draw:points="0,0 28,0 28,27 0,27">
          <text:p/>
        </draw:polygon>
        <draw:polygon draw:style-name="gr269" draw:text-style-name="P267" draw:layer="layout" svg:width="0.027cm" svg:height="0.026cm" svg:x="17.04cm" svg:y="11.104cm" svg:viewBox="0 0 28 27" draw:points="0,0 28,0 28,27 0,27">
          <text:p/>
        </draw:polygon>
        <draw:polygon draw:style-name="gr269" draw:text-style-name="P267" draw:layer="layout" svg:width="0.027cm" svg:height="0.026cm" svg:x="17.093cm" svg:y="11.104cm" svg:viewBox="0 0 28 27" draw:points="0,0 28,0 28,27 0,27">
          <text:p/>
        </draw:polygon>
        <draw:polygon draw:style-name="gr269" draw:text-style-name="P267" draw:layer="layout" svg:width="0.028cm" svg:height="0.026cm" svg:x="17.146cm" svg:y="11.104cm" svg:viewBox="0 0 29 27" draw:points="0,0 29,0 29,27 0,27">
          <text:p/>
        </draw:polygon>
        <draw:polygon draw:style-name="gr269" draw:text-style-name="P267" draw:layer="layout" svg:width="0.027cm" svg:height="0.026cm" svg:x="17.199cm" svg:y="11.104cm" svg:viewBox="0 0 28 27" draw:points="0,0 28,0 28,27 0,27">
          <text:p/>
        </draw:polygon>
        <draw:polygon draw:style-name="gr269" draw:text-style-name="P267" draw:layer="layout" svg:width="0.027cm" svg:height="0.026cm" svg:x="17.252cm" svg:y="11.104cm" svg:viewBox="0 0 28 27" draw:points="0,0 28,0 28,27 0,27">
          <text:p/>
        </draw:polygon>
        <draw:polygon draw:style-name="gr269" draw:text-style-name="P267" draw:layer="layout" svg:width="0.027cm" svg:height="0.026cm" svg:x="17.305cm" svg:y="11.104cm" svg:viewBox="0 0 28 27" draw:points="0,0 28,0 28,27 0,27">
          <text:p/>
        </draw:polygon>
        <draw:polygon draw:style-name="gr269" draw:text-style-name="P267" draw:layer="layout" svg:width="0.027cm" svg:height="0.026cm" svg:x="17.358cm" svg:y="11.104cm" svg:viewBox="0 0 28 27" draw:points="0,0 28,0 28,27 0,27">
          <text:p/>
        </draw:polygon>
        <draw:polygon draw:style-name="gr269" draw:text-style-name="P267" draw:layer="layout" svg:width="0.027cm" svg:height="0.026cm" svg:x="17.411cm" svg:y="11.104cm" svg:viewBox="0 0 28 27" draw:points="0,0 28,0 28,27 0,27">
          <text:p/>
        </draw:polygon>
        <draw:polygon draw:style-name="gr269" draw:text-style-name="P267" draw:layer="layout" svg:width="0.027cm" svg:height="0.026cm" svg:x="17.464cm" svg:y="11.104cm" svg:viewBox="0 0 28 27" draw:points="0,0 28,0 28,27 0,27">
          <text:p/>
        </draw:polygon>
        <draw:polygon draw:style-name="gr269" draw:text-style-name="P267" draw:layer="layout" svg:width="0.027cm" svg:height="0.026cm" svg:x="17.517cm" svg:y="11.104cm" svg:viewBox="0 0 28 27" draw:points="0,0 28,0 28,27 0,27">
          <text:p/>
        </draw:polygon>
        <draw:polygon draw:style-name="gr269" draw:text-style-name="P267" draw:layer="layout" svg:width="0.027cm" svg:height="0.026cm" svg:x="17.57cm" svg:y="11.104cm" svg:viewBox="0 0 28 27" draw:points="0,0 28,0 28,27 0,27">
          <text:p/>
        </draw:polygon>
        <draw:polygon draw:style-name="gr269" draw:text-style-name="P267" draw:layer="layout" svg:width="0.027cm" svg:height="0.026cm" svg:x="17.623cm" svg:y="11.104cm" svg:viewBox="0 0 28 27" draw:points="0,0 28,0 28,27 0,27">
          <text:p/>
        </draw:polygon>
        <draw:polygon draw:style-name="gr269" draw:text-style-name="P267" draw:layer="layout" svg:width="0.027cm" svg:height="0.026cm" svg:x="17.676cm" svg:y="11.104cm" svg:viewBox="0 0 28 27" draw:points="0,0 28,0 28,27 0,27">
          <text:p/>
        </draw:polygon>
        <draw:polygon draw:style-name="gr269" draw:text-style-name="P267" draw:layer="layout" svg:width="0.027cm" svg:height="0.026cm" svg:x="17.729cm" svg:y="11.104cm" svg:viewBox="0 0 28 27" draw:points="0,0 28,0 28,27 0,27">
          <text:p/>
        </draw:polygon>
        <draw:polygon draw:style-name="gr269" draw:text-style-name="P267" draw:layer="layout" svg:width="0.027cm" svg:height="0.026cm" svg:x="17.782cm" svg:y="11.104cm" svg:viewBox="0 0 28 27" draw:points="0,0 28,0 28,27 0,27">
          <text:p/>
        </draw:polygon>
        <draw:polygon draw:style-name="gr269" draw:text-style-name="P267" draw:layer="layout" svg:width="0.027cm" svg:height="0.026cm" svg:x="17.835cm" svg:y="11.104cm" svg:viewBox="0 0 28 27" draw:points="0,0 28,0 28,27 0,27">
          <text:p/>
        </draw:polygon>
        <draw:polygon draw:style-name="gr269" draw:text-style-name="P267" draw:layer="layout" svg:width="0.027cm" svg:height="0.026cm" svg:x="17.888cm" svg:y="11.104cm" svg:viewBox="0 0 28 27" draw:points="0,0 28,0 28,27 0,27">
          <text:p/>
        </draw:polygon>
        <draw:polygon draw:style-name="gr269" draw:text-style-name="P267" draw:layer="layout" svg:width="0.027cm" svg:height="0.026cm" svg:x="17.941cm" svg:y="11.104cm" svg:viewBox="0 0 28 27" draw:points="0,0 28,0 28,27 0,27">
          <text:p/>
        </draw:polygon>
        <draw:polygon draw:style-name="gr269" draw:text-style-name="P267" draw:layer="layout" svg:width="0.027cm" svg:height="0.026cm" svg:x="17.994cm" svg:y="11.104cm" svg:viewBox="0 0 28 27" draw:points="0,0 28,0 28,27 0,27">
          <text:p/>
        </draw:polygon>
        <draw:polygon draw:style-name="gr269" draw:text-style-name="P267" draw:layer="layout" svg:width="0.027cm" svg:height="0.026cm" svg:x="18.047cm" svg:y="11.104cm" svg:viewBox="0 0 28 27" draw:points="0,0 28,0 28,27 0,27">
          <text:p/>
        </draw:polygon>
        <draw:polygon draw:style-name="gr269" draw:text-style-name="P267" draw:layer="layout" svg:width="0.027cm" svg:height="0.026cm" svg:x="18.1cm" svg:y="11.104cm" svg:viewBox="0 0 28 27" draw:points="0,0 28,0 28,27 0,27">
          <text:p/>
        </draw:polygon>
        <draw:polygon draw:style-name="gr269" draw:text-style-name="P267" draw:layer="layout" svg:width="0.027cm" svg:height="0.026cm" svg:x="18.153cm" svg:y="11.104cm" svg:viewBox="0 0 28 27" draw:points="0,0 28,0 28,27 0,27">
          <text:p/>
        </draw:polygon>
        <draw:polygon draw:style-name="gr269" draw:text-style-name="P267" draw:layer="layout" svg:width="0.027cm" svg:height="0.026cm" svg:x="18.206cm" svg:y="11.104cm" svg:viewBox="0 0 28 27" draw:points="0,0 28,0 28,27 0,27">
          <text:p/>
        </draw:polygon>
        <draw:polygon draw:style-name="gr269" draw:text-style-name="P267" draw:layer="layout" svg:width="0.027cm" svg:height="0.026cm" svg:x="18.259cm" svg:y="11.104cm" svg:viewBox="0 0 28 27" draw:points="0,0 28,0 28,27 0,27">
          <text:p/>
        </draw:polygon>
        <draw:polygon draw:style-name="gr269" draw:text-style-name="P267" draw:layer="layout" svg:width="0.027cm" svg:height="0.026cm" svg:x="18.312cm" svg:y="11.104cm" svg:viewBox="0 0 28 27" draw:points="0,0 28,0 28,27 0,27">
          <text:p/>
        </draw:polygon>
        <draw:polygon draw:style-name="gr269" draw:text-style-name="P267" draw:layer="layout" svg:width="0.027cm" svg:height="0.026cm" svg:x="18.365cm" svg:y="11.104cm" svg:viewBox="0 0 28 27" draw:points="0,0 28,0 28,27 0,27">
          <text:p/>
        </draw:polygon>
        <draw:polygon draw:style-name="gr269" draw:text-style-name="P267" draw:layer="layout" svg:width="0.027cm" svg:height="0.026cm" svg:x="18.418cm" svg:y="11.104cm" svg:viewBox="0 0 28 27" draw:points="0,0 28,0 28,27 0,27">
          <text:p/>
        </draw:polygon>
        <draw:polygon draw:style-name="gr269" draw:text-style-name="P267" draw:layer="layout" svg:width="0.027cm" svg:height="0.026cm" svg:x="18.471cm" svg:y="11.104cm" svg:viewBox="0 0 28 27" draw:points="0,0 28,0 28,27 0,27">
          <text:p/>
        </draw:polygon>
        <draw:polygon draw:style-name="gr269" draw:text-style-name="P267" draw:layer="layout" svg:width="0.028cm" svg:height="0.026cm" svg:x="18.524cm" svg:y="11.104cm" svg:viewBox="0 0 29 27" draw:points="0,0 29,0 29,27 0,27">
          <text:p/>
        </draw:polygon>
        <draw:polygon draw:style-name="gr269" draw:text-style-name="P267" draw:layer="layout" svg:width="0.027cm" svg:height="0.026cm" svg:x="18.577cm" svg:y="11.104cm" svg:viewBox="0 0 28 27" draw:points="0,0 28,0 28,27 0,27">
          <text:p/>
        </draw:polygon>
        <draw:polygon draw:style-name="gr269" draw:text-style-name="P267" draw:layer="layout" svg:width="0.027cm" svg:height="0.026cm" svg:x="18.63cm" svg:y="11.104cm" svg:viewBox="0 0 28 27" draw:points="0,0 28,0 28,27 0,27">
          <text:p/>
        </draw:polygon>
        <draw:polygon draw:style-name="gr269" draw:text-style-name="P267" draw:layer="layout" svg:width="0.027cm" svg:height="0.026cm" svg:x="18.683cm" svg:y="11.104cm" svg:viewBox="0 0 28 27" draw:points="0,0 28,0 28,27 0,27">
          <text:p/>
        </draw:polygon>
        <draw:polygon draw:style-name="gr269" draw:text-style-name="P267" draw:layer="layout" svg:width="0.027cm" svg:height="0.026cm" svg:x="18.736cm" svg:y="11.104cm" svg:viewBox="0 0 28 27" draw:points="0,0 28,0 28,27 0,27">
          <text:p/>
        </draw:polygon>
        <draw:polygon draw:style-name="gr269" draw:text-style-name="P267" draw:layer="layout" svg:width="0.027cm" svg:height="0.026cm" svg:x="18.789cm" svg:y="11.104cm" svg:viewBox="0 0 28 27" draw:points="0,0 28,0 28,27 0,27">
          <text:p/>
        </draw:polygon>
        <draw:polygon draw:style-name="gr269" draw:text-style-name="P267" draw:layer="layout" svg:width="0.027cm" svg:height="0.026cm" svg:x="18.842cm" svg:y="11.104cm" svg:viewBox="0 0 28 27" draw:points="0,0 28,0 28,27 0,27">
          <text:p/>
        </draw:polygon>
        <draw:polygon draw:style-name="gr269" draw:text-style-name="P267" draw:layer="layout" svg:width="0.027cm" svg:height="0.026cm" svg:x="18.895cm" svg:y="11.104cm" svg:viewBox="0 0 28 27" draw:points="0,0 28,0 28,27 0,27">
          <text:p/>
        </draw:polygon>
        <draw:polygon draw:style-name="gr269" draw:text-style-name="P267" draw:layer="layout" svg:width="0.027cm" svg:height="0.026cm" svg:x="18.948cm" svg:y="11.104cm" svg:viewBox="0 0 28 27" draw:points="0,0 28,0 28,27 0,27">
          <text:p/>
        </draw:polygon>
        <draw:polygon draw:style-name="gr269" draw:text-style-name="P267" draw:layer="layout" svg:width="0.027cm" svg:height="0.026cm" svg:x="19.001cm" svg:y="11.104cm" svg:viewBox="0 0 28 27" draw:points="0,0 28,0 28,27 0,27">
          <text:p/>
        </draw:polygon>
        <draw:polygon draw:style-name="gr269" draw:text-style-name="P267" draw:layer="layout" svg:width="0.053cm" svg:height="0.027cm" svg:x="2.014cm" svg:y="12.084cm" svg:viewBox="0 0 54 28" draw:points="0,0 54,0 54,28 0,28">
          <text:p/>
        </draw:polygon>
        <draw:polygon draw:style-name="gr269" draw:text-style-name="P267" draw:layer="layout" svg:width="0.027cm" svg:height="0.027cm" svg:x="2.093cm" svg:y="12.084cm" svg:viewBox="0 0 28 28" draw:points="0,0 28,0 28,28 0,28">
          <text:p/>
        </draw:polygon>
        <draw:polygon draw:style-name="gr269" draw:text-style-name="P267" draw:layer="layout" svg:width="0.027cm" svg:height="0.027cm" svg:x="2.146cm" svg:y="12.084cm" svg:viewBox="0 0 28 28" draw:points="0,0 28,0 28,28 0,28">
          <text:p/>
        </draw:polygon>
        <draw:polygon draw:style-name="gr269" draw:text-style-name="P267" draw:layer="layout" svg:width="0.027cm" svg:height="0.027cm" svg:x="2.199cm" svg:y="12.084cm" svg:viewBox="0 0 28 28" draw:points="0,0 28,0 28,28 0,28">
          <text:p/>
        </draw:polygon>
        <draw:polygon draw:style-name="gr269" draw:text-style-name="P267" draw:layer="layout" svg:width="0.027cm" svg:height="0.027cm" svg:x="2.252cm" svg:y="12.084cm" svg:viewBox="0 0 28 28" draw:points="0,0 28,0 28,28 0,28">
          <text:p/>
        </draw:polygon>
        <draw:polygon draw:style-name="gr269" draw:text-style-name="P267" draw:layer="layout" svg:width="0.027cm" svg:height="0.027cm" svg:x="2.305cm" svg:y="12.084cm" svg:viewBox="0 0 28 28" draw:points="0,0 28,0 28,28 0,28">
          <text:p/>
        </draw:polygon>
        <draw:polygon draw:style-name="gr269" draw:text-style-name="P267" draw:layer="layout" svg:width="0.027cm" svg:height="0.027cm" svg:x="2.358cm" svg:y="12.084cm" svg:viewBox="0 0 28 28" draw:points="0,0 28,0 28,28 0,28">
          <text:p/>
        </draw:polygon>
        <draw:polygon draw:style-name="gr269" draw:text-style-name="P267" draw:layer="layout" svg:width="0.027cm" svg:height="0.027cm" svg:x="2.411cm" svg:y="12.084cm" svg:viewBox="0 0 28 28" draw:points="0,0 28,0 28,28 0,28">
          <text:p/>
        </draw:polygon>
        <draw:polygon draw:style-name="gr269" draw:text-style-name="P267" draw:layer="layout" svg:width="0.027cm" svg:height="0.027cm" svg:x="2.464cm" svg:y="12.084cm" svg:viewBox="0 0 28 28" draw:points="0,0 28,0 28,28 0,28">
          <text:p/>
        </draw:polygon>
        <draw:polygon draw:style-name="gr269" draw:text-style-name="P267" draw:layer="layout" svg:width="0.027cm" svg:height="0.027cm" svg:x="2.517cm" svg:y="12.084cm" svg:viewBox="0 0 28 28" draw:points="0,0 28,0 28,28 0,28">
          <text:p/>
        </draw:polygon>
        <draw:polygon draw:style-name="gr269" draw:text-style-name="P267" draw:layer="layout" svg:width="0.027cm" svg:height="0.027cm" svg:x="2.57cm" svg:y="12.084cm" svg:viewBox="0 0 28 28" draw:points="0,0 28,0 28,28 0,28">
          <text:p/>
        </draw:polygon>
        <draw:polygon draw:style-name="gr269" draw:text-style-name="P267" draw:layer="layout" svg:width="0.027cm" svg:height="0.027cm" svg:x="2.623cm" svg:y="12.084cm" svg:viewBox="0 0 28 28" draw:points="0,0 28,0 28,28 0,28">
          <text:p/>
        </draw:polygon>
        <draw:polygon draw:style-name="gr269" draw:text-style-name="P267" draw:layer="layout" svg:width="0.027cm" svg:height="0.027cm" svg:x="2.676cm" svg:y="12.084cm" svg:viewBox="0 0 28 28" draw:points="0,0 28,0 28,28 0,28">
          <text:p/>
        </draw:polygon>
        <draw:polygon draw:style-name="gr269" draw:text-style-name="P267" draw:layer="layout" svg:width="0.027cm" svg:height="0.027cm" svg:x="2.729cm" svg:y="12.084cm" svg:viewBox="0 0 28 28" draw:points="0,0 28,0 28,28 0,28">
          <text:p/>
        </draw:polygon>
        <draw:polygon draw:style-name="gr269" draw:text-style-name="P267" draw:layer="layout" svg:width="0.027cm" svg:height="0.027cm" svg:x="2.782cm" svg:y="12.084cm" svg:viewBox="0 0 28 28" draw:points="0,0 28,0 28,28 0,28">
          <text:p/>
        </draw:polygon>
        <draw:polygon draw:style-name="gr269" draw:text-style-name="P267" draw:layer="layout" svg:width="0.027cm" svg:height="0.027cm" svg:x="2.835cm" svg:y="12.084cm" svg:viewBox="0 0 28 28" draw:points="0,0 28,0 28,28 0,28">
          <text:p/>
        </draw:polygon>
        <draw:polygon draw:style-name="gr269" draw:text-style-name="P267" draw:layer="layout" svg:width="0.027cm" svg:height="0.027cm" svg:x="2.888cm" svg:y="12.084cm" svg:viewBox="0 0 28 28" draw:points="0,0 28,0 28,28 0,28">
          <text:p/>
        </draw:polygon>
        <draw:polygon draw:style-name="gr269" draw:text-style-name="P267" draw:layer="layout" svg:width="0.027cm" svg:height="0.027cm" svg:x="2.941cm" svg:y="12.084cm" svg:viewBox="0 0 28 28" draw:points="0,0 28,0 28,28 0,28">
          <text:p/>
        </draw:polygon>
        <draw:polygon draw:style-name="gr269" draw:text-style-name="P267" draw:layer="layout" svg:width="0.027cm" svg:height="0.027cm" svg:x="2.994cm" svg:y="12.084cm" svg:viewBox="0 0 28 28" draw:points="0,0 28,0 28,28 0,28">
          <text:p/>
        </draw:polygon>
        <draw:polygon draw:style-name="gr269" draw:text-style-name="P267" draw:layer="layout" svg:width="0.027cm" svg:height="0.027cm" svg:x="3.047cm" svg:y="12.084cm" svg:viewBox="0 0 28 28" draw:points="0,0 28,0 28,28 0,28">
          <text:p/>
        </draw:polygon>
        <draw:polygon draw:style-name="gr269" draw:text-style-name="P267" draw:layer="layout" svg:width="0.027cm" svg:height="0.027cm" svg:x="3.1cm" svg:y="12.084cm" svg:viewBox="0 0 28 28" draw:points="0,0 28,0 28,28 0,28">
          <text:p/>
        </draw:polygon>
        <draw:polygon draw:style-name="gr269" draw:text-style-name="P267" draw:layer="layout" svg:width="0.027cm" svg:height="0.027cm" svg:x="3.153cm" svg:y="12.084cm" svg:viewBox="0 0 28 28" draw:points="0,0 28,0 28,28 0,28">
          <text:p/>
        </draw:polygon>
        <draw:polygon draw:style-name="gr269" draw:text-style-name="P267" draw:layer="layout" svg:width="0.027cm" svg:height="0.027cm" svg:x="3.206cm" svg:y="12.084cm" svg:viewBox="0 0 28 28" draw:points="0,0 28,0 28,28 0,28">
          <text:p/>
        </draw:polygon>
        <draw:polygon draw:style-name="gr269" draw:text-style-name="P267" draw:layer="layout" svg:width="0.027cm" svg:height="0.027cm" svg:x="3.259cm" svg:y="12.084cm" svg:viewBox="0 0 28 28" draw:points="0,0 28,0 28,28 0,28">
          <text:p/>
        </draw:polygon>
        <draw:polygon draw:style-name="gr269" draw:text-style-name="P267" draw:layer="layout" svg:width="0.027cm" svg:height="0.027cm" svg:x="3.312cm" svg:y="12.084cm" svg:viewBox="0 0 28 28" draw:points="0,0 28,0 28,28 0,28">
          <text:p/>
        </draw:polygon>
        <draw:polygon draw:style-name="gr269" draw:text-style-name="P267" draw:layer="layout" svg:width="0.027cm" svg:height="0.027cm" svg:x="3.365cm" svg:y="12.084cm" svg:viewBox="0 0 28 28" draw:points="0,0 28,0 28,28 0,28">
          <text:p/>
        </draw:polygon>
        <draw:polygon draw:style-name="gr269" draw:text-style-name="P267" draw:layer="layout" svg:width="0.028cm" svg:height="0.027cm" svg:x="3.418cm" svg:y="12.084cm" svg:viewBox="0 0 29 28" draw:points="0,0 29,0 29,28 0,28">
          <text:p/>
        </draw:polygon>
        <draw:polygon draw:style-name="gr269" draw:text-style-name="P267" draw:layer="layout" svg:width="0.027cm" svg:height="0.027cm" svg:x="3.471cm" svg:y="12.084cm" svg:viewBox="0 0 28 28" draw:points="0,0 28,0 28,28 0,28">
          <text:p/>
        </draw:polygon>
        <draw:polygon draw:style-name="gr269" draw:text-style-name="P267" draw:layer="layout" svg:width="0.027cm" svg:height="0.027cm" svg:x="3.524cm" svg:y="12.084cm" svg:viewBox="0 0 28 28" draw:points="0,0 28,0 28,28 0,28">
          <text:p/>
        </draw:polygon>
        <draw:polygon draw:style-name="gr269" draw:text-style-name="P267" draw:layer="layout" svg:width="0.027cm" svg:height="0.027cm" svg:x="3.577cm" svg:y="12.084cm" svg:viewBox="0 0 28 28" draw:points="0,0 28,0 28,28 0,28">
          <text:p/>
        </draw:polygon>
        <draw:polygon draw:style-name="gr269" draw:text-style-name="P267" draw:layer="layout" svg:width="0.027cm" svg:height="0.027cm" svg:x="3.63cm" svg:y="12.084cm" svg:viewBox="0 0 28 28" draw:points="0,0 28,0 28,28 0,28">
          <text:p/>
        </draw:polygon>
        <draw:polygon draw:style-name="gr269" draw:text-style-name="P267" draw:layer="layout" svg:width="0.027cm" svg:height="0.027cm" svg:x="3.683cm" svg:y="12.084cm" svg:viewBox="0 0 28 28" draw:points="0,0 28,0 28,28 0,28">
          <text:p/>
        </draw:polygon>
        <draw:polygon draw:style-name="gr269" draw:text-style-name="P267" draw:layer="layout" svg:width="0.027cm" svg:height="0.027cm" svg:x="3.736cm" svg:y="12.084cm" svg:viewBox="0 0 28 28" draw:points="0,0 28,0 28,28 0,28">
          <text:p/>
        </draw:polygon>
        <draw:polygon draw:style-name="gr269" draw:text-style-name="P267" draw:layer="layout" svg:width="0.027cm" svg:height="0.027cm" svg:x="3.789cm" svg:y="12.084cm" svg:viewBox="0 0 28 28" draw:points="0,0 28,0 28,28 0,28">
          <text:p/>
        </draw:polygon>
        <draw:polygon draw:style-name="gr269" draw:text-style-name="P267" draw:layer="layout" svg:width="0.027cm" svg:height="0.027cm" svg:x="3.842cm" svg:y="12.084cm" svg:viewBox="0 0 28 28" draw:points="0,0 28,0 28,28 0,28">
          <text:p/>
        </draw:polygon>
        <draw:polygon draw:style-name="gr269" draw:text-style-name="P267" draw:layer="layout" svg:width="0.027cm" svg:height="0.027cm" svg:x="3.895cm" svg:y="12.084cm" svg:viewBox="0 0 28 28" draw:points="0,0 28,0 28,28 0,28">
          <text:p/>
        </draw:polygon>
        <draw:polygon draw:style-name="gr269" draw:text-style-name="P267" draw:layer="layout" svg:width="0.027cm" svg:height="0.027cm" svg:x="3.948cm" svg:y="12.084cm" svg:viewBox="0 0 28 28" draw:points="0,0 28,0 28,28 0,28">
          <text:p/>
        </draw:polygon>
        <draw:polygon draw:style-name="gr269" draw:text-style-name="P267" draw:layer="layout" svg:width="0.027cm" svg:height="0.027cm" svg:x="4.001cm" svg:y="12.084cm" svg:viewBox="0 0 28 28" draw:points="0,0 28,0 28,28 0,28">
          <text:p/>
        </draw:polygon>
        <draw:polygon draw:style-name="gr269" draw:text-style-name="P267" draw:layer="layout" svg:width="0.027cm" svg:height="0.027cm" svg:x="4.054cm" svg:y="12.084cm" svg:viewBox="0 0 28 28" draw:points="0,0 28,0 28,28 0,28">
          <text:p/>
        </draw:polygon>
        <draw:polygon draw:style-name="gr269" draw:text-style-name="P267" draw:layer="layout" svg:width="0.027cm" svg:height="0.027cm" svg:x="4.107cm" svg:y="12.084cm" svg:viewBox="0 0 28 28" draw:points="0,0 28,0 28,28 0,28">
          <text:p/>
        </draw:polygon>
        <draw:polygon draw:style-name="gr269" draw:text-style-name="P267" draw:layer="layout" svg:width="0.027cm" svg:height="0.027cm" svg:x="4.16cm" svg:y="12.084cm" svg:viewBox="0 0 28 28" draw:points="0,0 28,0 28,28 0,28">
          <text:p/>
        </draw:polygon>
        <draw:polygon draw:style-name="gr269" draw:text-style-name="P267" draw:layer="layout" svg:width="0.027cm" svg:height="0.027cm" svg:x="4.213cm" svg:y="12.084cm" svg:viewBox="0 0 28 28" draw:points="0,0 28,0 28,28 0,28">
          <text:p/>
        </draw:polygon>
        <draw:polygon draw:style-name="gr269" draw:text-style-name="P267" draw:layer="layout" svg:width="0.027cm" svg:height="0.027cm" svg:x="4.266cm" svg:y="12.084cm" svg:viewBox="0 0 28 28" draw:points="0,0 28,0 28,28 0,28">
          <text:p/>
        </draw:polygon>
        <draw:polygon draw:style-name="gr269" draw:text-style-name="P267" draw:layer="layout" svg:width="0.027cm" svg:height="0.027cm" svg:x="4.319cm" svg:y="12.084cm" svg:viewBox="0 0 28 28" draw:points="0,0 28,0 28,28 0,28">
          <text:p/>
        </draw:polygon>
        <draw:polygon draw:style-name="gr269" draw:text-style-name="P267" draw:layer="layout" svg:width="0.027cm" svg:height="0.027cm" svg:x="4.372cm" svg:y="12.084cm" svg:viewBox="0 0 28 28" draw:points="0,0 28,0 28,28 0,28">
          <text:p/>
        </draw:polygon>
        <draw:polygon draw:style-name="gr269" draw:text-style-name="P267" draw:layer="layout" svg:width="0.027cm" svg:height="0.027cm" svg:x="4.425cm" svg:y="12.084cm" svg:viewBox="0 0 28 28" draw:points="0,0 28,0 28,28 0,28">
          <text:p/>
        </draw:polygon>
        <draw:polygon draw:style-name="gr269" draw:text-style-name="P267" draw:layer="layout" svg:width="0.027cm" svg:height="0.027cm" svg:x="4.478cm" svg:y="12.084cm" svg:viewBox="0 0 28 28" draw:points="0,0 28,0 28,28 0,28">
          <text:p/>
        </draw:polygon>
        <draw:polygon draw:style-name="gr269" draw:text-style-name="P267" draw:layer="layout" svg:width="0.027cm" svg:height="0.027cm" svg:x="4.531cm" svg:y="12.084cm" svg:viewBox="0 0 28 28" draw:points="0,0 28,0 28,28 0,28">
          <text:p/>
        </draw:polygon>
        <draw:polygon draw:style-name="gr269" draw:text-style-name="P267" draw:layer="layout" svg:width="0.027cm" svg:height="0.027cm" svg:x="4.584cm" svg:y="12.084cm" svg:viewBox="0 0 28 28" draw:points="0,0 28,0 28,28 0,28">
          <text:p/>
        </draw:polygon>
        <draw:polygon draw:style-name="gr269" draw:text-style-name="P267" draw:layer="layout" svg:width="0.027cm" svg:height="0.027cm" svg:x="4.637cm" svg:y="12.084cm" svg:viewBox="0 0 28 28" draw:points="0,0 28,0 28,28 0,28">
          <text:p/>
        </draw:polygon>
        <draw:polygon draw:style-name="gr269" draw:text-style-name="P267" draw:layer="layout" svg:width="0.027cm" svg:height="0.027cm" svg:x="4.69cm" svg:y="12.084cm" svg:viewBox="0 0 28 28" draw:points="0,0 28,0 28,28 0,28">
          <text:p/>
        </draw:polygon>
        <draw:polygon draw:style-name="gr269" draw:text-style-name="P267" draw:layer="layout" svg:width="0.027cm" svg:height="0.027cm" svg:x="4.743cm" svg:y="12.084cm" svg:viewBox="0 0 28 28" draw:points="0,0 28,0 28,28 0,28">
          <text:p/>
        </draw:polygon>
        <draw:polygon draw:style-name="gr269" draw:text-style-name="P267" draw:layer="layout" svg:width="0.028cm" svg:height="0.027cm" svg:x="4.796cm" svg:y="12.084cm" svg:viewBox="0 0 29 28" draw:points="0,0 29,0 29,28 0,28">
          <text:p/>
        </draw:polygon>
        <draw:polygon draw:style-name="gr269" draw:text-style-name="P267" draw:layer="layout" svg:width="0.027cm" svg:height="0.027cm" svg:x="4.849cm" svg:y="12.084cm" svg:viewBox="0 0 28 28" draw:points="0,0 28,0 28,28 0,28">
          <text:p/>
        </draw:polygon>
        <draw:polygon draw:style-name="gr269" draw:text-style-name="P267" draw:layer="layout" svg:width="0.027cm" svg:height="0.027cm" svg:x="4.902cm" svg:y="12.084cm" svg:viewBox="0 0 28 28" draw:points="0,0 28,0 28,28 0,28">
          <text:p/>
        </draw:polygon>
        <draw:polygon draw:style-name="gr269" draw:text-style-name="P267" draw:layer="layout" svg:width="0.027cm" svg:height="0.027cm" svg:x="4.955cm" svg:y="12.084cm" svg:viewBox="0 0 28 28" draw:points="0,0 28,0 28,28 0,28">
          <text:p/>
        </draw:polygon>
        <draw:polygon draw:style-name="gr269" draw:text-style-name="P267" draw:layer="layout" svg:width="0.027cm" svg:height="0.027cm" svg:x="5.008cm" svg:y="12.084cm" svg:viewBox="0 0 28 28" draw:points="0,0 28,0 28,28 0,28">
          <text:p/>
        </draw:polygon>
        <draw:polygon draw:style-name="gr269" draw:text-style-name="P267" draw:layer="layout" svg:width="0.027cm" svg:height="0.027cm" svg:x="5.061cm" svg:y="12.084cm" svg:viewBox="0 0 28 28" draw:points="0,0 28,0 28,28 0,28">
          <text:p/>
        </draw:polygon>
        <draw:polygon draw:style-name="gr269" draw:text-style-name="P267" draw:layer="layout" svg:width="0.027cm" svg:height="0.027cm" svg:x="5.114cm" svg:y="12.084cm" svg:viewBox="0 0 28 28" draw:points="0,0 28,0 28,28 0,28">
          <text:p/>
        </draw:polygon>
        <draw:polygon draw:style-name="gr269" draw:text-style-name="P267" draw:layer="layout" svg:width="0.027cm" svg:height="0.027cm" svg:x="5.167cm" svg:y="12.084cm" svg:viewBox="0 0 28 28" draw:points="0,0 28,0 28,28 0,28">
          <text:p/>
        </draw:polygon>
        <draw:polygon draw:style-name="gr269" draw:text-style-name="P267" draw:layer="layout" svg:width="0.027cm" svg:height="0.027cm" svg:x="5.22cm" svg:y="12.084cm" svg:viewBox="0 0 28 28" draw:points="0,0 28,0 28,28 0,28">
          <text:p/>
        </draw:polygon>
        <draw:polygon draw:style-name="gr269" draw:text-style-name="P267" draw:layer="layout" svg:width="0.027cm" svg:height="0.027cm" svg:x="5.273cm" svg:y="12.084cm" svg:viewBox="0 0 28 28" draw:points="0,0 28,0 28,28 0,28">
          <text:p/>
        </draw:polygon>
        <draw:polygon draw:style-name="gr269" draw:text-style-name="P267" draw:layer="layout" svg:width="0.027cm" svg:height="0.027cm" svg:x="5.326cm" svg:y="12.084cm" svg:viewBox="0 0 28 28" draw:points="0,0 28,0 28,28 0,28">
          <text:p/>
        </draw:polygon>
        <draw:polygon draw:style-name="gr269" draw:text-style-name="P267" draw:layer="layout" svg:width="0.027cm" svg:height="0.027cm" svg:x="5.379cm" svg:y="12.084cm" svg:viewBox="0 0 28 28" draw:points="0,0 28,0 28,28 0,28">
          <text:p/>
        </draw:polygon>
        <draw:polygon draw:style-name="gr269" draw:text-style-name="P267" draw:layer="layout" svg:width="0.027cm" svg:height="0.027cm" svg:x="5.432cm" svg:y="12.084cm" svg:viewBox="0 0 28 28" draw:points="0,0 28,0 28,28 0,28">
          <text:p/>
        </draw:polygon>
        <draw:polygon draw:style-name="gr269" draw:text-style-name="P267" draw:layer="layout" svg:width="0.027cm" svg:height="0.027cm" svg:x="5.485cm" svg:y="12.084cm" svg:viewBox="0 0 28 28" draw:points="0,0 28,0 28,28 0,28">
          <text:p/>
        </draw:polygon>
        <draw:polygon draw:style-name="gr269" draw:text-style-name="P267" draw:layer="layout" svg:width="0.027cm" svg:height="0.027cm" svg:x="5.538cm" svg:y="12.084cm" svg:viewBox="0 0 28 28" draw:points="0,0 28,0 28,28 0,28">
          <text:p/>
        </draw:polygon>
        <draw:polygon draw:style-name="gr269" draw:text-style-name="P267" draw:layer="layout" svg:width="0.027cm" svg:height="0.027cm" svg:x="5.591cm" svg:y="12.084cm" svg:viewBox="0 0 28 28" draw:points="0,0 28,0 28,28 0,28">
          <text:p/>
        </draw:polygon>
        <draw:polygon draw:style-name="gr269" draw:text-style-name="P267" draw:layer="layout" svg:width="0.027cm" svg:height="0.027cm" svg:x="5.644cm" svg:y="12.084cm" svg:viewBox="0 0 28 28" draw:points="0,0 28,0 28,28 0,28">
          <text:p/>
        </draw:polygon>
        <draw:polygon draw:style-name="gr269" draw:text-style-name="P267" draw:layer="layout" svg:width="0.027cm" svg:height="0.027cm" svg:x="5.697cm" svg:y="12.084cm" svg:viewBox="0 0 28 28" draw:points="0,0 28,0 28,28 0,28">
          <text:p/>
        </draw:polygon>
        <draw:polygon draw:style-name="gr269" draw:text-style-name="P267" draw:layer="layout" svg:width="0.027cm" svg:height="0.027cm" svg:x="5.75cm" svg:y="12.084cm" svg:viewBox="0 0 28 28" draw:points="0,0 28,0 28,28 0,28">
          <text:p/>
        </draw:polygon>
        <draw:polygon draw:style-name="gr269" draw:text-style-name="P267" draw:layer="layout" svg:width="0.027cm" svg:height="0.027cm" svg:x="5.803cm" svg:y="12.084cm" svg:viewBox="0 0 28 28" draw:points="0,0 28,0 28,28 0,28">
          <text:p/>
        </draw:polygon>
        <draw:polygon draw:style-name="gr269" draw:text-style-name="P267" draw:layer="layout" svg:width="0.027cm" svg:height="0.027cm" svg:x="5.856cm" svg:y="12.084cm" svg:viewBox="0 0 28 28" draw:points="0,0 28,0 28,28 0,28">
          <text:p/>
        </draw:polygon>
        <draw:polygon draw:style-name="gr269" draw:text-style-name="P267" draw:layer="layout" svg:width="0.027cm" svg:height="0.027cm" svg:x="5.909cm" svg:y="12.084cm" svg:viewBox="0 0 28 28" draw:points="0,0 28,0 28,28 0,28">
          <text:p/>
        </draw:polygon>
        <draw:polygon draw:style-name="gr269" draw:text-style-name="P267" draw:layer="layout" svg:width="0.027cm" svg:height="0.027cm" svg:x="5.962cm" svg:y="12.084cm" svg:viewBox="0 0 28 28" draw:points="0,0 28,0 28,28 0,28">
          <text:p/>
        </draw:polygon>
        <draw:polygon draw:style-name="gr269" draw:text-style-name="P267" draw:layer="layout" svg:width="0.027cm" svg:height="0.027cm" svg:x="6.015cm" svg:y="12.084cm" svg:viewBox="0 0 28 28" draw:points="0,0 28,0 28,28 0,28">
          <text:p/>
        </draw:polygon>
        <draw:polygon draw:style-name="gr269" draw:text-style-name="P267" draw:layer="layout" svg:width="0.027cm" svg:height="0.027cm" svg:x="6.068cm" svg:y="12.084cm" svg:viewBox="0 0 28 28" draw:points="0,0 28,0 28,28 0,28">
          <text:p/>
        </draw:polygon>
        <draw:polygon draw:style-name="gr269" draw:text-style-name="P267" draw:layer="layout" svg:width="0.027cm" svg:height="0.027cm" svg:x="6.121cm" svg:y="12.084cm" svg:viewBox="0 0 28 28" draw:points="0,0 28,0 28,28 0,28">
          <text:p/>
        </draw:polygon>
        <draw:polygon draw:style-name="gr269" draw:text-style-name="P267" draw:layer="layout" svg:width="0.028cm" svg:height="0.027cm" svg:x="6.174cm" svg:y="12.084cm" svg:viewBox="0 0 29 28" draw:points="0,0 29,0 29,28 0,28">
          <text:p/>
        </draw:polygon>
        <draw:polygon draw:style-name="gr269" draw:text-style-name="P267" draw:layer="layout" svg:width="0.027cm" svg:height="0.027cm" svg:x="6.227cm" svg:y="12.084cm" svg:viewBox="0 0 28 28" draw:points="0,0 28,0 28,28 0,28">
          <text:p/>
        </draw:polygon>
        <draw:polygon draw:style-name="gr269" draw:text-style-name="P267" draw:layer="layout" svg:width="0.027cm" svg:height="0.027cm" svg:x="6.28cm" svg:y="12.084cm" svg:viewBox="0 0 28 28" draw:points="0,0 28,0 28,28 0,28">
          <text:p/>
        </draw:polygon>
        <draw:polygon draw:style-name="gr269" draw:text-style-name="P267" draw:layer="layout" svg:width="0.027cm" svg:height="0.027cm" svg:x="6.333cm" svg:y="12.084cm" svg:viewBox="0 0 28 28" draw:points="0,0 28,0 28,28 0,28">
          <text:p/>
        </draw:polygon>
        <draw:polygon draw:style-name="gr269" draw:text-style-name="P267" draw:layer="layout" svg:width="0.026cm" svg:height="0.027cm" svg:x="6.387cm" svg:y="12.084cm" svg:viewBox="0 0 27 28" draw:points="0,0 27,0 27,28 0,28">
          <text:p/>
        </draw:polygon>
        <draw:polygon draw:style-name="gr269" draw:text-style-name="P267" draw:layer="layout" svg:width="0.026cm" svg:height="0.027cm" svg:x="6.44cm" svg:y="12.084cm" svg:viewBox="0 0 27 28" draw:points="0,0 27,0 27,28 0,28">
          <text:p/>
        </draw:polygon>
        <draw:polygon draw:style-name="gr269" draw:text-style-name="P267" draw:layer="layout" svg:width="0.026cm" svg:height="0.027cm" svg:x="6.493cm" svg:y="12.084cm" svg:viewBox="0 0 27 28" draw:points="0,0 27,0 27,28 0,28">
          <text:p/>
        </draw:polygon>
        <draw:polygon draw:style-name="gr269" draw:text-style-name="P267" draw:layer="layout" svg:width="0.026cm" svg:height="0.027cm" svg:x="6.546cm" svg:y="12.084cm" svg:viewBox="0 0 27 28" draw:points="0,0 27,0 27,28 0,28">
          <text:p/>
        </draw:polygon>
        <draw:polygon draw:style-name="gr269" draw:text-style-name="P267" draw:layer="layout" svg:width="0.026cm" svg:height="0.027cm" svg:x="6.599cm" svg:y="12.084cm" svg:viewBox="0 0 27 28" draw:points="0,0 27,0 27,28 0,28">
          <text:p/>
        </draw:polygon>
        <draw:polygon draw:style-name="gr269" draw:text-style-name="P267" draw:layer="layout" svg:width="0.026cm" svg:height="0.027cm" svg:x="6.652cm" svg:y="12.084cm" svg:viewBox="0 0 27 28" draw:points="0,0 27,0 27,28 0,28">
          <text:p/>
        </draw:polygon>
        <draw:polygon draw:style-name="gr269" draw:text-style-name="P267" draw:layer="layout" svg:width="0.026cm" svg:height="0.027cm" svg:x="6.705cm" svg:y="12.084cm" svg:viewBox="0 0 27 28" draw:points="0,0 27,0 27,28 0,28">
          <text:p/>
        </draw:polygon>
        <draw:polygon draw:style-name="gr269" draw:text-style-name="P267" draw:layer="layout" svg:width="0.026cm" svg:height="0.027cm" svg:x="6.758cm" svg:y="12.084cm" svg:viewBox="0 0 27 28" draw:points="0,0 27,0 27,28 0,28">
          <text:p/>
        </draw:polygon>
        <draw:polygon draw:style-name="gr269" draw:text-style-name="P267" draw:layer="layout" svg:width="0.026cm" svg:height="0.027cm" svg:x="6.811cm" svg:y="12.084cm" svg:viewBox="0 0 27 28" draw:points="0,0 27,0 27,28 0,28">
          <text:p/>
        </draw:polygon>
        <draw:polygon draw:style-name="gr269" draw:text-style-name="P267" draw:layer="layout" svg:width="0.026cm" svg:height="0.027cm" svg:x="6.864cm" svg:y="12.084cm" svg:viewBox="0 0 27 28" draw:points="0,0 27,0 27,28 0,28">
          <text:p/>
        </draw:polygon>
        <draw:polygon draw:style-name="gr269" draw:text-style-name="P267" draw:layer="layout" svg:width="0.026cm" svg:height="0.027cm" svg:x="6.917cm" svg:y="12.084cm" svg:viewBox="0 0 27 28" draw:points="0,0 27,0 27,28 0,28">
          <text:p/>
        </draw:polygon>
        <draw:polygon draw:style-name="gr269" draw:text-style-name="P267" draw:layer="layout" svg:width="0.026cm" svg:height="0.027cm" svg:x="6.97cm" svg:y="12.084cm" svg:viewBox="0 0 27 28" draw:points="0,0 27,0 27,28 0,28">
          <text:p/>
        </draw:polygon>
        <draw:polygon draw:style-name="gr269" draw:text-style-name="P267" draw:layer="layout" svg:width="0.026cm" svg:height="0.027cm" svg:x="7.023cm" svg:y="12.084cm" svg:viewBox="0 0 27 28" draw:points="0,0 27,0 27,28 0,28">
          <text:p/>
        </draw:polygon>
        <draw:polygon draw:style-name="gr269" draw:text-style-name="P267" draw:layer="layout" svg:width="0.026cm" svg:height="0.027cm" svg:x="7.076cm" svg:y="12.084cm" svg:viewBox="0 0 27 28" draw:points="0,0 27,0 27,28 0,28">
          <text:p/>
        </draw:polygon>
        <draw:polygon draw:style-name="gr269" draw:text-style-name="P267" draw:layer="layout" svg:width="0.026cm" svg:height="0.027cm" svg:x="7.129cm" svg:y="12.084cm" svg:viewBox="0 0 27 28" draw:points="0,0 27,0 27,28 0,28">
          <text:p/>
        </draw:polygon>
        <draw:polygon draw:style-name="gr269" draw:text-style-name="P267" draw:layer="layout" svg:width="0.026cm" svg:height="0.027cm" svg:x="7.182cm" svg:y="12.084cm" svg:viewBox="0 0 27 28" draw:points="0,0 27,0 27,28 0,28">
          <text:p/>
        </draw:polygon>
        <draw:polygon draw:style-name="gr269" draw:text-style-name="P267" draw:layer="layout" svg:width="0.026cm" svg:height="0.027cm" svg:x="7.235cm" svg:y="12.084cm" svg:viewBox="0 0 27 28" draw:points="0,0 27,0 27,28 0,28">
          <text:p/>
        </draw:polygon>
        <draw:polygon draw:style-name="gr269" draw:text-style-name="P267" draw:layer="layout" svg:width="0.026cm" svg:height="0.027cm" svg:x="7.288cm" svg:y="12.084cm" svg:viewBox="0 0 27 28" draw:points="0,0 27,0 27,28 0,28">
          <text:p/>
        </draw:polygon>
        <draw:polygon draw:style-name="gr269" draw:text-style-name="P267" draw:layer="layout" svg:width="0.026cm" svg:height="0.027cm" svg:x="7.341cm" svg:y="12.084cm" svg:viewBox="0 0 27 28" draw:points="0,0 27,0 27,28 0,28">
          <text:p/>
        </draw:polygon>
        <draw:polygon draw:style-name="gr269" draw:text-style-name="P267" draw:layer="layout" svg:width="0.026cm" svg:height="0.027cm" svg:x="7.394cm" svg:y="12.084cm" svg:viewBox="0 0 27 28" draw:points="0,0 27,0 27,28 0,28">
          <text:p/>
        </draw:polygon>
        <draw:polygon draw:style-name="gr269" draw:text-style-name="P267" draw:layer="layout" svg:width="0.026cm" svg:height="0.027cm" svg:x="7.447cm" svg:y="12.084cm" svg:viewBox="0 0 27 28" draw:points="0,0 27,0 27,28 0,28">
          <text:p/>
        </draw:polygon>
        <draw:polygon draw:style-name="gr269" draw:text-style-name="P267" draw:layer="layout" svg:width="0.026cm" svg:height="0.027cm" svg:x="7.5cm" svg:y="12.084cm" svg:viewBox="0 0 27 28" draw:points="0,0 27,0 27,28 0,28">
          <text:p/>
        </draw:polygon>
        <draw:polygon draw:style-name="gr269" draw:text-style-name="P267" draw:layer="layout" svg:width="0.026cm" svg:height="0.027cm" svg:x="7.553cm" svg:y="12.084cm" svg:viewBox="0 0 27 28" draw:points="0,0 27,0 27,28 0,28">
          <text:p/>
        </draw:polygon>
        <draw:polygon draw:style-name="gr269" draw:text-style-name="P267" draw:layer="layout" svg:width="0.026cm" svg:height="0.027cm" svg:x="7.606cm" svg:y="12.084cm" svg:viewBox="0 0 27 28" draw:points="0,0 27,0 27,28 0,28">
          <text:p/>
        </draw:polygon>
        <draw:polygon draw:style-name="gr269" draw:text-style-name="P267" draw:layer="layout" svg:width="0.026cm" svg:height="0.027cm" svg:x="7.659cm" svg:y="12.084cm" svg:viewBox="0 0 27 28" draw:points="0,0 27,0 27,28 0,28">
          <text:p/>
        </draw:polygon>
        <draw:polygon draw:style-name="gr269" draw:text-style-name="P267" draw:layer="layout" svg:width="0.026cm" svg:height="0.027cm" svg:x="7.712cm" svg:y="12.084cm" svg:viewBox="0 0 27 28" draw:points="0,0 27,0 27,28 0,28">
          <text:p/>
        </draw:polygon>
        <draw:polygon draw:style-name="gr269" draw:text-style-name="P267" draw:layer="layout" svg:width="0.026cm" svg:height="0.027cm" svg:x="7.765cm" svg:y="12.084cm" svg:viewBox="0 0 27 28" draw:points="0,0 27,0 27,28 0,28">
          <text:p/>
        </draw:polygon>
        <draw:polygon draw:style-name="gr269" draw:text-style-name="P267" draw:layer="layout" svg:width="0.026cm" svg:height="0.027cm" svg:x="7.818cm" svg:y="12.084cm" svg:viewBox="0 0 27 28" draw:points="0,0 27,0 27,28 0,28">
          <text:p/>
        </draw:polygon>
        <draw:polygon draw:style-name="gr269" draw:text-style-name="P267" draw:layer="layout" svg:width="0.026cm" svg:height="0.027cm" svg:x="7.871cm" svg:y="12.084cm" svg:viewBox="0 0 27 28" draw:points="0,0 27,0 27,28 0,28">
          <text:p/>
        </draw:polygon>
        <draw:polygon draw:style-name="gr269" draw:text-style-name="P267" draw:layer="layout" svg:width="0.026cm" svg:height="0.027cm" svg:x="7.924cm" svg:y="12.084cm" svg:viewBox="0 0 27 28" draw:points="0,0 27,0 27,28 0,28">
          <text:p/>
        </draw:polygon>
        <draw:polygon draw:style-name="gr269" draw:text-style-name="P267" draw:layer="layout" svg:width="0.026cm" svg:height="0.027cm" svg:x="7.977cm" svg:y="12.084cm" svg:viewBox="0 0 27 28" draw:points="0,0 27,0 27,28 0,28">
          <text:p/>
        </draw:polygon>
        <draw:polygon draw:style-name="gr269" draw:text-style-name="P267" draw:layer="layout" svg:width="0.026cm" svg:height="0.027cm" svg:x="8.03cm" svg:y="12.084cm" svg:viewBox="0 0 27 28" draw:points="0,0 27,0 27,28 0,28">
          <text:p/>
        </draw:polygon>
        <draw:polygon draw:style-name="gr269" draw:text-style-name="P267" draw:layer="layout" svg:width="0.026cm" svg:height="0.027cm" svg:x="8.083cm" svg:y="12.084cm" svg:viewBox="0 0 27 28" draw:points="0,0 27,0 27,28 0,28">
          <text:p/>
        </draw:polygon>
        <draw:polygon draw:style-name="gr269" draw:text-style-name="P267" draw:layer="layout" svg:width="0.026cm" svg:height="0.027cm" svg:x="8.136cm" svg:y="12.084cm" svg:viewBox="0 0 27 28" draw:points="0,0 27,0 27,28 0,28">
          <text:p/>
        </draw:polygon>
        <draw:polygon draw:style-name="gr269" draw:text-style-name="P267" draw:layer="layout" svg:width="0.026cm" svg:height="0.027cm" svg:x="8.189cm" svg:y="12.084cm" svg:viewBox="0 0 27 28" draw:points="0,0 27,0 27,28 0,28">
          <text:p/>
        </draw:polygon>
        <draw:polygon draw:style-name="gr269" draw:text-style-name="P267" draw:layer="layout" svg:width="0.026cm" svg:height="0.027cm" svg:x="8.242cm" svg:y="12.084cm" svg:viewBox="0 0 27 28" draw:points="0,0 27,0 27,28 0,28">
          <text:p/>
        </draw:polygon>
        <draw:polygon draw:style-name="gr269" draw:text-style-name="P267" draw:layer="layout" svg:width="0.026cm" svg:height="0.027cm" svg:x="8.295cm" svg:y="12.084cm" svg:viewBox="0 0 27 28" draw:points="0,0 27,0 27,28 0,28">
          <text:p/>
        </draw:polygon>
        <draw:polygon draw:style-name="gr269" draw:text-style-name="P267" draw:layer="layout" svg:width="0.026cm" svg:height="0.027cm" svg:x="8.348cm" svg:y="12.084cm" svg:viewBox="0 0 27 28" draw:points="0,0 27,0 27,28 0,28">
          <text:p/>
        </draw:polygon>
        <draw:polygon draw:style-name="gr269" draw:text-style-name="P267" draw:layer="layout" svg:width="0.026cm" svg:height="0.027cm" svg:x="8.401cm" svg:y="12.084cm" svg:viewBox="0 0 27 28" draw:points="0,0 27,0 27,28 0,28">
          <text:p/>
        </draw:polygon>
        <draw:polygon draw:style-name="gr269" draw:text-style-name="P267" draw:layer="layout" svg:width="0.026cm" svg:height="0.027cm" svg:x="8.454cm" svg:y="12.084cm" svg:viewBox="0 0 27 28" draw:points="0,0 27,0 27,28 0,28">
          <text:p/>
        </draw:polygon>
        <draw:polygon draw:style-name="gr269" draw:text-style-name="P267" draw:layer="layout" svg:width="0.026cm" svg:height="0.027cm" svg:x="8.507cm" svg:y="12.084cm" svg:viewBox="0 0 27 28" draw:points="0,0 27,0 27,28 0,28">
          <text:p/>
        </draw:polygon>
        <draw:polygon draw:style-name="gr269" draw:text-style-name="P267" draw:layer="layout" svg:width="0.026cm" svg:height="0.027cm" svg:x="8.56cm" svg:y="12.084cm" svg:viewBox="0 0 27 28" draw:points="0,0 27,0 27,28 0,28">
          <text:p/>
        </draw:polygon>
        <draw:polygon draw:style-name="gr269" draw:text-style-name="P267" draw:layer="layout" svg:width="0.026cm" svg:height="0.027cm" svg:x="8.613cm" svg:y="12.084cm" svg:viewBox="0 0 27 28" draw:points="0,0 27,0 27,28 0,28">
          <text:p/>
        </draw:polygon>
        <draw:polygon draw:style-name="gr269" draw:text-style-name="P267" draw:layer="layout" svg:width="0.026cm" svg:height="0.027cm" svg:x="8.666cm" svg:y="12.084cm" svg:viewBox="0 0 27 28" draw:points="0,0 27,0 27,28 0,28">
          <text:p/>
        </draw:polygon>
        <draw:polygon draw:style-name="gr269" draw:text-style-name="P267" draw:layer="layout" svg:width="0.026cm" svg:height="0.027cm" svg:x="8.719cm" svg:y="12.084cm" svg:viewBox="0 0 27 28" draw:points="0,0 27,0 27,28 0,28">
          <text:p/>
        </draw:polygon>
        <draw:polygon draw:style-name="gr269" draw:text-style-name="P267" draw:layer="layout" svg:width="0.026cm" svg:height="0.027cm" svg:x="8.772cm" svg:y="12.084cm" svg:viewBox="0 0 27 28" draw:points="0,0 27,0 27,28 0,28">
          <text:p/>
        </draw:polygon>
        <draw:polygon draw:style-name="gr269" draw:text-style-name="P267" draw:layer="layout" svg:width="0.026cm" svg:height="0.027cm" svg:x="8.825cm" svg:y="12.084cm" svg:viewBox="0 0 27 28" draw:points="0,0 27,0 27,28 0,28">
          <text:p/>
        </draw:polygon>
        <draw:polygon draw:style-name="gr269" draw:text-style-name="P267" draw:layer="layout" svg:width="0.026cm" svg:height="0.027cm" svg:x="8.878cm" svg:y="12.084cm" svg:viewBox="0 0 27 28" draw:points="0,0 27,0 27,28 0,28">
          <text:p/>
        </draw:polygon>
        <draw:polygon draw:style-name="gr269" draw:text-style-name="P267" draw:layer="layout" svg:width="0.026cm" svg:height="0.027cm" svg:x="8.931cm" svg:y="12.084cm" svg:viewBox="0 0 27 28" draw:points="0,0 27,0 27,28 0,28">
          <text:p/>
        </draw:polygon>
        <draw:polygon draw:style-name="gr269" draw:text-style-name="P267" draw:layer="layout" svg:width="0.026cm" svg:height="0.027cm" svg:x="8.984cm" svg:y="12.084cm" svg:viewBox="0 0 27 28" draw:points="0,0 27,0 27,28 0,28">
          <text:p/>
        </draw:polygon>
        <draw:polygon draw:style-name="gr269" draw:text-style-name="P267" draw:layer="layout" svg:width="0.026cm" svg:height="0.027cm" svg:x="9.037cm" svg:y="12.084cm" svg:viewBox="0 0 27 28" draw:points="0,0 27,0 27,28 0,28">
          <text:p/>
        </draw:polygon>
        <draw:polygon draw:style-name="gr269" draw:text-style-name="P267" draw:layer="layout" svg:width="0.026cm" svg:height="0.027cm" svg:x="9.09cm" svg:y="12.084cm" svg:viewBox="0 0 27 28" draw:points="0,0 27,0 27,28 0,28">
          <text:p/>
        </draw:polygon>
        <draw:polygon draw:style-name="gr269" draw:text-style-name="P267" draw:layer="layout" svg:width="0.026cm" svg:height="0.027cm" svg:x="9.143cm" svg:y="12.084cm" svg:viewBox="0 0 27 28" draw:points="0,0 27,0 27,28 0,28">
          <text:p/>
        </draw:polygon>
        <draw:polygon draw:style-name="gr269" draw:text-style-name="P267" draw:layer="layout" svg:width="0.026cm" svg:height="0.027cm" svg:x="9.196cm" svg:y="12.084cm" svg:viewBox="0 0 27 28" draw:points="0,0 27,0 27,28 0,28">
          <text:p/>
        </draw:polygon>
        <draw:polygon draw:style-name="gr269" draw:text-style-name="P267" draw:layer="layout" svg:width="0.026cm" svg:height="0.027cm" svg:x="9.249cm" svg:y="12.084cm" svg:viewBox="0 0 27 28" draw:points="0,0 27,0 27,28 0,28">
          <text:p/>
        </draw:polygon>
        <draw:polygon draw:style-name="gr269" draw:text-style-name="P267" draw:layer="layout" svg:width="0.026cm" svg:height="0.027cm" svg:x="9.302cm" svg:y="12.084cm" svg:viewBox="0 0 27 28" draw:points="0,0 27,0 27,28 0,28">
          <text:p/>
        </draw:polygon>
        <draw:polygon draw:style-name="gr269" draw:text-style-name="P267" draw:layer="layout" svg:width="0.026cm" svg:height="0.027cm" svg:x="9.355cm" svg:y="12.084cm" svg:viewBox="0 0 27 28" draw:points="0,0 27,0 27,28 0,28">
          <text:p/>
        </draw:polygon>
        <draw:polygon draw:style-name="gr269" draw:text-style-name="P267" draw:layer="layout" svg:width="0.026cm" svg:height="0.027cm" svg:x="9.408cm" svg:y="12.084cm" svg:viewBox="0 0 27 28" draw:points="0,0 27,0 27,28 0,28">
          <text:p/>
        </draw:polygon>
        <draw:polygon draw:style-name="gr269" draw:text-style-name="P267" draw:layer="layout" svg:width="0.026cm" svg:height="0.027cm" svg:x="9.461cm" svg:y="12.084cm" svg:viewBox="0 0 27 28" draw:points="0,0 27,0 27,28 0,28">
          <text:p/>
        </draw:polygon>
        <draw:polygon draw:style-name="gr269" draw:text-style-name="P267" draw:layer="layout" svg:width="0.026cm" svg:height="0.027cm" svg:x="9.514cm" svg:y="12.084cm" svg:viewBox="0 0 27 28" draw:points="0,0 27,0 27,28 0,28">
          <text:p/>
        </draw:polygon>
        <draw:polygon draw:style-name="gr269" draw:text-style-name="P267" draw:layer="layout" svg:width="0.026cm" svg:height="0.027cm" svg:x="9.567cm" svg:y="12.084cm" svg:viewBox="0 0 27 28" draw:points="0,0 27,0 27,28 0,28">
          <text:p/>
        </draw:polygon>
        <draw:polygon draw:style-name="gr269" draw:text-style-name="P267" draw:layer="layout" svg:width="0.026cm" svg:height="0.027cm" svg:x="9.62cm" svg:y="12.084cm" svg:viewBox="0 0 27 28" draw:points="0,0 27,0 27,28 0,28">
          <text:p/>
        </draw:polygon>
        <draw:polygon draw:style-name="gr269" draw:text-style-name="P267" draw:layer="layout" svg:width="0.026cm" svg:height="0.027cm" svg:x="9.673cm" svg:y="12.084cm" svg:viewBox="0 0 27 28" draw:points="0,0 27,0 27,28 0,28">
          <text:p/>
        </draw:polygon>
        <draw:polygon draw:style-name="gr269" draw:text-style-name="P267" draw:layer="layout" svg:width="0.026cm" svg:height="0.027cm" svg:x="9.726cm" svg:y="12.084cm" svg:viewBox="0 0 27 28" draw:points="0,0 27,0 27,28 0,28">
          <text:p/>
        </draw:polygon>
        <draw:polygon draw:style-name="gr269" draw:text-style-name="P267" draw:layer="layout" svg:width="0.026cm" svg:height="0.027cm" svg:x="9.779cm" svg:y="12.084cm" svg:viewBox="0 0 27 28" draw:points="0,0 27,0 27,28 0,28">
          <text:p/>
        </draw:polygon>
        <draw:polygon draw:style-name="gr269" draw:text-style-name="P267" draw:layer="layout" svg:width="0.026cm" svg:height="0.027cm" svg:x="9.832cm" svg:y="12.084cm" svg:viewBox="0 0 27 28" draw:points="0,0 27,0 27,28 0,28">
          <text:p/>
        </draw:polygon>
        <draw:polygon draw:style-name="gr269" draw:text-style-name="P267" draw:layer="layout" svg:width="0.026cm" svg:height="0.027cm" svg:x="9.885cm" svg:y="12.084cm" svg:viewBox="0 0 27 28" draw:points="0,0 27,0 27,28 0,28">
          <text:p/>
        </draw:polygon>
        <draw:polygon draw:style-name="gr269" draw:text-style-name="P267" draw:layer="layout" svg:width="0.026cm" svg:height="0.027cm" svg:x="9.938cm" svg:y="12.084cm" svg:viewBox="0 0 27 28" draw:points="0,0 27,0 27,28 0,28">
          <text:p/>
        </draw:polygon>
        <draw:polygon draw:style-name="gr269" draw:text-style-name="P267" draw:layer="layout" svg:width="0.026cm" svg:height="0.027cm" svg:x="9.991cm" svg:y="12.084cm" svg:viewBox="0 0 27 28" draw:points="0,0 27,0 27,28 0,28">
          <text:p/>
        </draw:polygon>
        <draw:polygon draw:style-name="gr269" draw:text-style-name="P267" draw:layer="layout" svg:width="0.026cm" svg:height="0.027cm" svg:x="10.044cm" svg:y="12.084cm" svg:viewBox="0 0 27 28" draw:points="0,0 27,0 27,28 0,28">
          <text:p/>
        </draw:polygon>
        <draw:polygon draw:style-name="gr269" draw:text-style-name="P267" draw:layer="layout" svg:width="0.026cm" svg:height="0.027cm" svg:x="10.097cm" svg:y="12.084cm" svg:viewBox="0 0 27 28" draw:points="0,0 27,0 27,28 0,28">
          <text:p/>
        </draw:polygon>
        <draw:polygon draw:style-name="gr269" draw:text-style-name="P267" draw:layer="layout" svg:width="0.026cm" svg:height="0.027cm" svg:x="10.15cm" svg:y="12.084cm" svg:viewBox="0 0 27 28" draw:points="0,0 27,0 27,28 0,28">
          <text:p/>
        </draw:polygon>
        <draw:polygon draw:style-name="gr269" draw:text-style-name="P267" draw:layer="layout" svg:width="0.026cm" svg:height="0.027cm" svg:x="10.203cm" svg:y="12.084cm" svg:viewBox="0 0 27 28" draw:points="0,0 27,0 27,28 0,28">
          <text:p/>
        </draw:polygon>
        <draw:polygon draw:style-name="gr269" draw:text-style-name="P267" draw:layer="layout" svg:width="0.026cm" svg:height="0.027cm" svg:x="10.256cm" svg:y="12.084cm" svg:viewBox="0 0 27 28" draw:points="0,0 27,0 27,28 0,28">
          <text:p/>
        </draw:polygon>
        <draw:polygon draw:style-name="gr269" draw:text-style-name="P267" draw:layer="layout" svg:width="0.026cm" svg:height="0.027cm" svg:x="10.309cm" svg:y="12.084cm" svg:viewBox="0 0 27 28" draw:points="0,0 27,0 27,28 0,28">
          <text:p/>
        </draw:polygon>
        <draw:polygon draw:style-name="gr269" draw:text-style-name="P267" draw:layer="layout" svg:width="0.026cm" svg:height="0.027cm" svg:x="10.362cm" svg:y="12.084cm" svg:viewBox="0 0 27 28" draw:points="0,0 27,0 27,28 0,28">
          <text:p/>
        </draw:polygon>
        <draw:polygon draw:style-name="gr269" draw:text-style-name="P267" draw:layer="layout" svg:width="0.026cm" svg:height="0.027cm" svg:x="10.415cm" svg:y="12.084cm" svg:viewBox="0 0 27 28" draw:points="0,0 27,0 27,28 0,28">
          <text:p/>
        </draw:polygon>
        <draw:polygon draw:style-name="gr269" draw:text-style-name="P267" draw:layer="layout" svg:width="0.026cm" svg:height="0.027cm" svg:x="10.468cm" svg:y="12.084cm" svg:viewBox="0 0 27 28" draw:points="0,0 27,0 27,28 0,28">
          <text:p/>
        </draw:polygon>
        <draw:polygon draw:style-name="gr269" draw:text-style-name="P267" draw:layer="layout" svg:width="0.026cm" svg:height="0.027cm" svg:x="10.521cm" svg:y="12.084cm" svg:viewBox="0 0 27 28" draw:points="0,0 27,0 27,28 0,28">
          <text:p/>
        </draw:polygon>
        <draw:polygon draw:style-name="gr269" draw:text-style-name="P267" draw:layer="layout" svg:width="0.026cm" svg:height="0.027cm" svg:x="10.574cm" svg:y="12.084cm" svg:viewBox="0 0 27 28" draw:points="0,0 27,0 27,28 0,28">
          <text:p/>
        </draw:polygon>
        <draw:polygon draw:style-name="gr269" draw:text-style-name="P267" draw:layer="layout" svg:width="0.026cm" svg:height="0.027cm" svg:x="10.627cm" svg:y="12.084cm" svg:viewBox="0 0 27 28" draw:points="0,0 27,0 27,28 0,28">
          <text:p/>
        </draw:polygon>
        <draw:polygon draw:style-name="gr269" draw:text-style-name="P267" draw:layer="layout" svg:width="0.026cm" svg:height="0.027cm" svg:x="10.68cm" svg:y="12.084cm" svg:viewBox="0 0 27 28" draw:points="0,0 27,0 27,28 0,28">
          <text:p/>
        </draw:polygon>
        <draw:polygon draw:style-name="gr269" draw:text-style-name="P267" draw:layer="layout" svg:width="0.026cm" svg:height="0.027cm" svg:x="10.733cm" svg:y="12.084cm" svg:viewBox="0 0 27 28" draw:points="0,0 27,0 27,28 0,28">
          <text:p/>
        </draw:polygon>
        <draw:polygon draw:style-name="gr269" draw:text-style-name="P267" draw:layer="layout" svg:width="0.026cm" svg:height="0.027cm" svg:x="10.786cm" svg:y="12.084cm" svg:viewBox="0 0 27 28" draw:points="0,0 27,0 27,28 0,28">
          <text:p/>
        </draw:polygon>
        <draw:polygon draw:style-name="gr269" draw:text-style-name="P267" draw:layer="layout" svg:width="0.026cm" svg:height="0.027cm" svg:x="10.839cm" svg:y="12.084cm" svg:viewBox="0 0 27 28" draw:points="0,0 27,0 27,28 0,28">
          <text:p/>
        </draw:polygon>
        <draw:polygon draw:style-name="gr269" draw:text-style-name="P267" draw:layer="layout" svg:width="0.026cm" svg:height="0.027cm" svg:x="10.892cm" svg:y="12.084cm" svg:viewBox="0 0 27 28" draw:points="0,0 27,0 27,28 0,28">
          <text:p/>
        </draw:polygon>
        <draw:polygon draw:style-name="gr269" draw:text-style-name="P267" draw:layer="layout" svg:width="0.026cm" svg:height="0.027cm" svg:x="10.945cm" svg:y="12.084cm" svg:viewBox="0 0 27 28" draw:points="0,0 27,0 27,28 0,28">
          <text:p/>
        </draw:polygon>
        <draw:polygon draw:style-name="gr269" draw:text-style-name="P267" draw:layer="layout" svg:width="0.026cm" svg:height="0.027cm" svg:x="10.998cm" svg:y="12.084cm" svg:viewBox="0 0 27 28" draw:points="0,0 27,0 27,28 0,28">
          <text:p/>
        </draw:polygon>
        <draw:polygon draw:style-name="gr269" draw:text-style-name="P267" draw:layer="layout" svg:width="0.026cm" svg:height="0.027cm" svg:x="11.051cm" svg:y="12.084cm" svg:viewBox="0 0 27 28" draw:points="0,0 27,0 27,28 0,28">
          <text:p/>
        </draw:polygon>
        <draw:polygon draw:style-name="gr269" draw:text-style-name="P267" draw:layer="layout" svg:width="0.026cm" svg:height="0.027cm" svg:x="11.104cm" svg:y="12.084cm" svg:viewBox="0 0 27 28" draw:points="0,0 27,0 27,28 0,28">
          <text:p/>
        </draw:polygon>
        <draw:polygon draw:style-name="gr269" draw:text-style-name="P267" draw:layer="layout" svg:width="0.026cm" svg:height="0.027cm" svg:x="11.157cm" svg:y="12.084cm" svg:viewBox="0 0 27 28" draw:points="0,0 27,0 27,28 0,28">
          <text:p/>
        </draw:polygon>
        <draw:polygon draw:style-name="gr269" draw:text-style-name="P267" draw:layer="layout" svg:width="0.026cm" svg:height="0.027cm" svg:x="11.21cm" svg:y="12.084cm" svg:viewBox="0 0 27 28" draw:points="0,0 27,0 27,28 0,28">
          <text:p/>
        </draw:polygon>
        <draw:polygon draw:style-name="gr269" draw:text-style-name="P267" draw:layer="layout" svg:width="0.026cm" svg:height="0.027cm" svg:x="11.263cm" svg:y="12.084cm" svg:viewBox="0 0 27 28" draw:points="0,0 27,0 27,28 0,28">
          <text:p/>
        </draw:polygon>
        <draw:polygon draw:style-name="gr269" draw:text-style-name="P267" draw:layer="layout" svg:width="0.026cm" svg:height="0.027cm" svg:x="11.316cm" svg:y="12.084cm" svg:viewBox="0 0 27 28" draw:points="0,0 27,0 27,28 0,28">
          <text:p/>
        </draw:polygon>
        <draw:polygon draw:style-name="gr269" draw:text-style-name="P267" draw:layer="layout" svg:width="0.026cm" svg:height="0.027cm" svg:x="11.369cm" svg:y="12.084cm" svg:viewBox="0 0 27 28" draw:points="0,0 27,0 27,28 0,28">
          <text:p/>
        </draw:polygon>
        <draw:polygon draw:style-name="gr269" draw:text-style-name="P267" draw:layer="layout" svg:width="0.026cm" svg:height="0.027cm" svg:x="11.422cm" svg:y="12.084cm" svg:viewBox="0 0 27 28" draw:points="0,0 27,0 27,28 0,28">
          <text:p/>
        </draw:polygon>
        <draw:polygon draw:style-name="gr269" draw:text-style-name="P267" draw:layer="layout" svg:width="0.026cm" svg:height="0.027cm" svg:x="11.475cm" svg:y="12.084cm" svg:viewBox="0 0 27 28" draw:points="0,0 27,0 27,28 0,28">
          <text:p/>
        </draw:polygon>
        <draw:polygon draw:style-name="gr269" draw:text-style-name="P267" draw:layer="layout" svg:width="0.026cm" svg:height="0.027cm" svg:x="11.528cm" svg:y="12.084cm" svg:viewBox="0 0 27 28" draw:points="0,0 27,0 27,28 0,28">
          <text:p/>
        </draw:polygon>
        <draw:polygon draw:style-name="gr269" draw:text-style-name="P267" draw:layer="layout" svg:width="0.026cm" svg:height="0.027cm" svg:x="11.581cm" svg:y="12.084cm" svg:viewBox="0 0 27 28" draw:points="0,0 27,0 27,28 0,28">
          <text:p/>
        </draw:polygon>
        <draw:polygon draw:style-name="gr269" draw:text-style-name="P267" draw:layer="layout" svg:width="0.026cm" svg:height="0.027cm" svg:x="11.634cm" svg:y="12.084cm" svg:viewBox="0 0 27 28" draw:points="0,0 27,0 27,28 0,28">
          <text:p/>
        </draw:polygon>
        <draw:polygon draw:style-name="gr269" draw:text-style-name="P267" draw:layer="layout" svg:width="0.026cm" svg:height="0.027cm" svg:x="11.687cm" svg:y="12.084cm" svg:viewBox="0 0 27 28" draw:points="0,0 27,0 27,28 0,28">
          <text:p/>
        </draw:polygon>
        <draw:polygon draw:style-name="gr269" draw:text-style-name="P267" draw:layer="layout" svg:width="0.026cm" svg:height="0.027cm" svg:x="11.74cm" svg:y="12.084cm" svg:viewBox="0 0 27 28" draw:points="0,0 27,0 27,28 0,28">
          <text:p/>
        </draw:polygon>
        <draw:polygon draw:style-name="gr269" draw:text-style-name="P267" draw:layer="layout" svg:width="0.026cm" svg:height="0.027cm" svg:x="11.793cm" svg:y="12.084cm" svg:viewBox="0 0 27 28" draw:points="0,0 27,0 27,28 0,28">
          <text:p/>
        </draw:polygon>
        <draw:polygon draw:style-name="gr269" draw:text-style-name="P267" draw:layer="layout" svg:width="0.026cm" svg:height="0.027cm" svg:x="11.846cm" svg:y="12.084cm" svg:viewBox="0 0 27 28" draw:points="0,0 27,0 27,28 0,28">
          <text:p/>
        </draw:polygon>
        <draw:polygon draw:style-name="gr269" draw:text-style-name="P267" draw:layer="layout" svg:width="0.026cm" svg:height="0.027cm" svg:x="11.899cm" svg:y="12.084cm" svg:viewBox="0 0 27 28" draw:points="0,0 27,0 27,28 0,28">
          <text:p/>
        </draw:polygon>
        <draw:polygon draw:style-name="gr269" draw:text-style-name="P267" draw:layer="layout" svg:width="0.026cm" svg:height="0.027cm" svg:x="11.952cm" svg:y="12.084cm" svg:viewBox="0 0 27 28" draw:points="0,0 27,0 27,28 0,28">
          <text:p/>
        </draw:polygon>
        <draw:polygon draw:style-name="gr269" draw:text-style-name="P267" draw:layer="layout" svg:width="0.026cm" svg:height="0.027cm" svg:x="12.005cm" svg:y="12.084cm" svg:viewBox="0 0 27 28" draw:points="0,0 27,0 27,28 0,28">
          <text:p/>
        </draw:polygon>
        <draw:polygon draw:style-name="gr269" draw:text-style-name="P267" draw:layer="layout" svg:width="0.026cm" svg:height="0.027cm" svg:x="12.058cm" svg:y="12.084cm" svg:viewBox="0 0 27 28" draw:points="0,0 27,0 27,28 0,28">
          <text:p/>
        </draw:polygon>
        <draw:polygon draw:style-name="gr269" draw:text-style-name="P267" draw:layer="layout" svg:width="0.026cm" svg:height="0.027cm" svg:x="12.111cm" svg:y="12.084cm" svg:viewBox="0 0 27 28" draw:points="0,0 27,0 27,28 0,28">
          <text:p/>
        </draw:polygon>
        <draw:polygon draw:style-name="gr269" draw:text-style-name="P267" draw:layer="layout" svg:width="0.026cm" svg:height="0.027cm" svg:x="12.164cm" svg:y="12.084cm" svg:viewBox="0 0 27 28" draw:points="0,0 27,0 27,28 0,28">
          <text:p/>
        </draw:polygon>
        <draw:polygon draw:style-name="gr269" draw:text-style-name="P267" draw:layer="layout" svg:width="0.026cm" svg:height="0.027cm" svg:x="12.217cm" svg:y="12.084cm" svg:viewBox="0 0 27 28" draw:points="0,0 27,0 27,28 0,28">
          <text:p/>
        </draw:polygon>
        <draw:polygon draw:style-name="gr269" draw:text-style-name="P267" draw:layer="layout" svg:width="0.026cm" svg:height="0.027cm" svg:x="12.27cm" svg:y="12.084cm" svg:viewBox="0 0 27 28" draw:points="0,0 27,0 27,28 0,28">
          <text:p/>
        </draw:polygon>
        <draw:polygon draw:style-name="gr269" draw:text-style-name="P267" draw:layer="layout" svg:width="0.026cm" svg:height="0.027cm" svg:x="12.323cm" svg:y="12.084cm" svg:viewBox="0 0 27 28" draw:points="0,0 27,0 27,28 0,28">
          <text:p/>
        </draw:polygon>
        <draw:polygon draw:style-name="gr269" draw:text-style-name="P267" draw:layer="layout" svg:width="0.026cm" svg:height="0.027cm" svg:x="12.376cm" svg:y="12.084cm" svg:viewBox="0 0 27 28" draw:points="0,0 27,0 27,28 0,28">
          <text:p/>
        </draw:polygon>
        <draw:polygon draw:style-name="gr269" draw:text-style-name="P267" draw:layer="layout" svg:width="0.026cm" svg:height="0.027cm" svg:x="12.429cm" svg:y="12.084cm" svg:viewBox="0 0 27 28" draw:points="0,0 27,0 27,28 0,28">
          <text:p/>
        </draw:polygon>
        <draw:polygon draw:style-name="gr269" draw:text-style-name="P267" draw:layer="layout" svg:width="0.026cm" svg:height="0.027cm" svg:x="12.482cm" svg:y="12.084cm" svg:viewBox="0 0 27 28" draw:points="0,0 27,0 27,28 0,28">
          <text:p/>
        </draw:polygon>
        <draw:polygon draw:style-name="gr269" draw:text-style-name="P267" draw:layer="layout" svg:width="0.026cm" svg:height="0.027cm" svg:x="12.535cm" svg:y="12.084cm" svg:viewBox="0 0 27 28" draw:points="0,0 27,0 27,28 0,28">
          <text:p/>
        </draw:polygon>
        <draw:polygon draw:style-name="gr269" draw:text-style-name="P267" draw:layer="layout" svg:width="0.026cm" svg:height="0.027cm" svg:x="12.588cm" svg:y="12.084cm" svg:viewBox="0 0 27 28" draw:points="0,0 27,0 27,28 0,28">
          <text:p/>
        </draw:polygon>
        <draw:polygon draw:style-name="gr269" draw:text-style-name="P267" draw:layer="layout" svg:width="0.026cm" svg:height="0.027cm" svg:x="12.641cm" svg:y="12.084cm" svg:viewBox="0 0 27 28" draw:points="0,0 27,0 27,28 0,28">
          <text:p/>
        </draw:polygon>
        <draw:polygon draw:style-name="gr269" draw:text-style-name="P267" draw:layer="layout" svg:width="0.027cm" svg:height="0.027cm" svg:x="12.694cm" svg:y="12.084cm" svg:viewBox="0 0 28 28" draw:points="0,0 28,0 28,28 0,28">
          <text:p/>
        </draw:polygon>
        <draw:polygon draw:style-name="gr269" draw:text-style-name="P267" draw:layer="layout" svg:width="0.027cm" svg:height="0.027cm" svg:x="12.747cm" svg:y="12.084cm" svg:viewBox="0 0 28 28" draw:points="0,0 28,0 28,28 0,28">
          <text:p/>
        </draw:polygon>
        <draw:polygon draw:style-name="gr269" draw:text-style-name="P267" draw:layer="layout" svg:width="0.027cm" svg:height="0.027cm" svg:x="12.8cm" svg:y="12.084cm" svg:viewBox="0 0 28 28" draw:points="0,0 28,0 28,28 0,28">
          <text:p/>
        </draw:polygon>
        <draw:polygon draw:style-name="gr269" draw:text-style-name="P267" draw:layer="layout" svg:width="0.027cm" svg:height="0.027cm" svg:x="12.853cm" svg:y="12.084cm" svg:viewBox="0 0 28 28" draw:points="0,0 28,0 28,28 0,28">
          <text:p/>
        </draw:polygon>
        <draw:polygon draw:style-name="gr269" draw:text-style-name="P267" draw:layer="layout" svg:width="0.027cm" svg:height="0.027cm" svg:x="12.906cm" svg:y="12.084cm" svg:viewBox="0 0 28 28" draw:points="0,0 28,0 28,28 0,28">
          <text:p/>
        </draw:polygon>
        <draw:polygon draw:style-name="gr269" draw:text-style-name="P267" draw:layer="layout" svg:width="0.027cm" svg:height="0.027cm" svg:x="12.959cm" svg:y="12.084cm" svg:viewBox="0 0 28 28" draw:points="0,0 28,0 28,28 0,28">
          <text:p/>
        </draw:polygon>
        <draw:polygon draw:style-name="gr269" draw:text-style-name="P267" draw:layer="layout" svg:width="0.028cm" svg:height="0.027cm" svg:x="13.012cm" svg:y="12.084cm" svg:viewBox="0 0 29 28" draw:points="0,0 29,0 29,28 0,28">
          <text:p/>
        </draw:polygon>
        <draw:polygon draw:style-name="gr269" draw:text-style-name="P267" draw:layer="layout" svg:width="0.027cm" svg:height="0.027cm" svg:x="13.065cm" svg:y="12.084cm" svg:viewBox="0 0 28 28" draw:points="0,0 28,0 28,28 0,28">
          <text:p/>
        </draw:polygon>
        <draw:polygon draw:style-name="gr269" draw:text-style-name="P267" draw:layer="layout" svg:width="0.027cm" svg:height="0.027cm" svg:x="13.118cm" svg:y="12.084cm" svg:viewBox="0 0 28 28" draw:points="0,0 28,0 28,28 0,28">
          <text:p/>
        </draw:polygon>
        <draw:polygon draw:style-name="gr269" draw:text-style-name="P267" draw:layer="layout" svg:width="0.027cm" svg:height="0.027cm" svg:x="13.171cm" svg:y="12.084cm" svg:viewBox="0 0 28 28" draw:points="0,0 28,0 28,28 0,28">
          <text:p/>
        </draw:polygon>
        <draw:polygon draw:style-name="gr269" draw:text-style-name="P267" draw:layer="layout" svg:width="0.027cm" svg:height="0.027cm" svg:x="13.224cm" svg:y="12.084cm" svg:viewBox="0 0 28 28" draw:points="0,0 28,0 28,28 0,28">
          <text:p/>
        </draw:polygon>
        <draw:polygon draw:style-name="gr269" draw:text-style-name="P267" draw:layer="layout" svg:width="0.027cm" svg:height="0.027cm" svg:x="13.277cm" svg:y="12.084cm" svg:viewBox="0 0 28 28" draw:points="0,0 28,0 28,28 0,28">
          <text:p/>
        </draw:polygon>
        <draw:polygon draw:style-name="gr269" draw:text-style-name="P267" draw:layer="layout" svg:width="0.027cm" svg:height="0.027cm" svg:x="13.33cm" svg:y="12.084cm" svg:viewBox="0 0 28 28" draw:points="0,0 28,0 28,28 0,28">
          <text:p/>
        </draw:polygon>
        <draw:polygon draw:style-name="gr269" draw:text-style-name="P267" draw:layer="layout" svg:width="0.027cm" svg:height="0.027cm" svg:x="13.383cm" svg:y="12.084cm" svg:viewBox="0 0 28 28" draw:points="0,0 28,0 28,28 0,28">
          <text:p/>
        </draw:polygon>
        <draw:polygon draw:style-name="gr269" draw:text-style-name="P267" draw:layer="layout" svg:width="0.027cm" svg:height="0.027cm" svg:x="13.436cm" svg:y="12.084cm" svg:viewBox="0 0 28 28" draw:points="0,0 28,0 28,28 0,28">
          <text:p/>
        </draw:polygon>
        <draw:polygon draw:style-name="gr269" draw:text-style-name="P267" draw:layer="layout" svg:width="0.027cm" svg:height="0.027cm" svg:x="13.489cm" svg:y="12.084cm" svg:viewBox="0 0 28 28" draw:points="0,0 28,0 28,28 0,28">
          <text:p/>
        </draw:polygon>
        <draw:polygon draw:style-name="gr269" draw:text-style-name="P267" draw:layer="layout" svg:width="0.027cm" svg:height="0.027cm" svg:x="13.542cm" svg:y="12.084cm" svg:viewBox="0 0 28 28" draw:points="0,0 28,0 28,28 0,28">
          <text:p/>
        </draw:polygon>
        <draw:polygon draw:style-name="gr269" draw:text-style-name="P267" draw:layer="layout" svg:width="0.027cm" svg:height="0.027cm" svg:x="13.595cm" svg:y="12.084cm" svg:viewBox="0 0 28 28" draw:points="0,0 28,0 28,28 0,28">
          <text:p/>
        </draw:polygon>
        <draw:polygon draw:style-name="gr269" draw:text-style-name="P267" draw:layer="layout" svg:width="0.027cm" svg:height="0.027cm" svg:x="13.648cm" svg:y="12.084cm" svg:viewBox="0 0 28 28" draw:points="0,0 28,0 28,28 0,28">
          <text:p/>
        </draw:polygon>
        <draw:polygon draw:style-name="gr269" draw:text-style-name="P267" draw:layer="layout" svg:width="0.027cm" svg:height="0.027cm" svg:x="13.701cm" svg:y="12.084cm" svg:viewBox="0 0 28 28" draw:points="0,0 28,0 28,28 0,28">
          <text:p/>
        </draw:polygon>
        <draw:polygon draw:style-name="gr269" draw:text-style-name="P267" draw:layer="layout" svg:width="0.027cm" svg:height="0.027cm" svg:x="13.754cm" svg:y="12.084cm" svg:viewBox="0 0 28 28" draw:points="0,0 28,0 28,28 0,28">
          <text:p/>
        </draw:polygon>
        <draw:polygon draw:style-name="gr269" draw:text-style-name="P267" draw:layer="layout" svg:width="0.027cm" svg:height="0.027cm" svg:x="13.807cm" svg:y="12.084cm" svg:viewBox="0 0 28 28" draw:points="0,0 28,0 28,28 0,28">
          <text:p/>
        </draw:polygon>
        <draw:polygon draw:style-name="gr269" draw:text-style-name="P267" draw:layer="layout" svg:width="0.027cm" svg:height="0.027cm" svg:x="13.86cm" svg:y="12.084cm" svg:viewBox="0 0 28 28" draw:points="0,0 28,0 28,28 0,28">
          <text:p/>
        </draw:polygon>
        <draw:polygon draw:style-name="gr269" draw:text-style-name="P267" draw:layer="layout" svg:width="0.027cm" svg:height="0.027cm" svg:x="13.913cm" svg:y="12.084cm" svg:viewBox="0 0 28 28" draw:points="0,0 28,0 28,28 0,28">
          <text:p/>
        </draw:polygon>
        <draw:polygon draw:style-name="gr269" draw:text-style-name="P267" draw:layer="layout" svg:width="0.027cm" svg:height="0.027cm" svg:x="13.966cm" svg:y="12.084cm" svg:viewBox="0 0 28 28" draw:points="0,0 28,0 28,28 0,28">
          <text:p/>
        </draw:polygon>
        <draw:polygon draw:style-name="gr269" draw:text-style-name="P267" draw:layer="layout" svg:width="0.027cm" svg:height="0.027cm" svg:x="14.019cm" svg:y="12.084cm" svg:viewBox="0 0 28 28" draw:points="0,0 28,0 28,28 0,28">
          <text:p/>
        </draw:polygon>
        <draw:polygon draw:style-name="gr269" draw:text-style-name="P267" draw:layer="layout" svg:width="0.027cm" svg:height="0.027cm" svg:x="14.072cm" svg:y="12.084cm" svg:viewBox="0 0 28 28" draw:points="0,0 28,0 28,28 0,28">
          <text:p/>
        </draw:polygon>
        <draw:polygon draw:style-name="gr269" draw:text-style-name="P267" draw:layer="layout" svg:width="0.027cm" svg:height="0.027cm" svg:x="14.125cm" svg:y="12.084cm" svg:viewBox="0 0 28 28" draw:points="0,0 28,0 28,28 0,28">
          <text:p/>
        </draw:polygon>
        <draw:polygon draw:style-name="gr269" draw:text-style-name="P267" draw:layer="layout" svg:width="0.027cm" svg:height="0.027cm" svg:x="14.178cm" svg:y="12.084cm" svg:viewBox="0 0 28 28" draw:points="0,0 28,0 28,28 0,28">
          <text:p/>
        </draw:polygon>
        <draw:polygon draw:style-name="gr269" draw:text-style-name="P267" draw:layer="layout" svg:width="0.027cm" svg:height="0.027cm" svg:x="14.231cm" svg:y="12.084cm" svg:viewBox="0 0 28 28" draw:points="0,0 28,0 28,28 0,28">
          <text:p/>
        </draw:polygon>
        <draw:polygon draw:style-name="gr269" draw:text-style-name="P267" draw:layer="layout" svg:width="0.027cm" svg:height="0.027cm" svg:x="14.284cm" svg:y="12.084cm" svg:viewBox="0 0 28 28" draw:points="0,0 28,0 28,28 0,28">
          <text:p/>
        </draw:polygon>
        <draw:polygon draw:style-name="gr269" draw:text-style-name="P267" draw:layer="layout" svg:width="0.027cm" svg:height="0.027cm" svg:x="14.337cm" svg:y="12.084cm" svg:viewBox="0 0 28 28" draw:points="0,0 28,0 28,28 0,28">
          <text:p/>
        </draw:polygon>
        <draw:polygon draw:style-name="gr269" draw:text-style-name="P267" draw:layer="layout" svg:width="0.028cm" svg:height="0.027cm" svg:x="14.39cm" svg:y="12.084cm" svg:viewBox="0 0 29 28" draw:points="0,0 29,0 29,28 0,28">
          <text:p/>
        </draw:polygon>
        <draw:polygon draw:style-name="gr269" draw:text-style-name="P267" draw:layer="layout" svg:width="0.027cm" svg:height="0.027cm" svg:x="14.443cm" svg:y="12.084cm" svg:viewBox="0 0 28 28" draw:points="0,0 28,0 28,28 0,28">
          <text:p/>
        </draw:polygon>
        <draw:polygon draw:style-name="gr269" draw:text-style-name="P267" draw:layer="layout" svg:width="0.027cm" svg:height="0.027cm" svg:x="14.496cm" svg:y="12.084cm" svg:viewBox="0 0 28 28" draw:points="0,0 28,0 28,28 0,28">
          <text:p/>
        </draw:polygon>
        <draw:polygon draw:style-name="gr269" draw:text-style-name="P267" draw:layer="layout" svg:width="0.027cm" svg:height="0.027cm" svg:x="14.549cm" svg:y="12.084cm" svg:viewBox="0 0 28 28" draw:points="0,0 28,0 28,28 0,28">
          <text:p/>
        </draw:polygon>
        <draw:polygon draw:style-name="gr269" draw:text-style-name="P267" draw:layer="layout" svg:width="0.027cm" svg:height="0.027cm" svg:x="14.602cm" svg:y="12.084cm" svg:viewBox="0 0 28 28" draw:points="0,0 28,0 28,28 0,28">
          <text:p/>
        </draw:polygon>
        <draw:polygon draw:style-name="gr269" draw:text-style-name="P267" draw:layer="layout" svg:width="0.027cm" svg:height="0.027cm" svg:x="14.655cm" svg:y="12.084cm" svg:viewBox="0 0 28 28" draw:points="0,0 28,0 28,28 0,28">
          <text:p/>
        </draw:polygon>
        <draw:polygon draw:style-name="gr269" draw:text-style-name="P267" draw:layer="layout" svg:width="0.027cm" svg:height="0.027cm" svg:x="14.708cm" svg:y="12.084cm" svg:viewBox="0 0 28 28" draw:points="0,0 28,0 28,28 0,28">
          <text:p/>
        </draw:polygon>
        <draw:polygon draw:style-name="gr269" draw:text-style-name="P267" draw:layer="layout" svg:width="0.027cm" svg:height="0.027cm" svg:x="14.761cm" svg:y="12.084cm" svg:viewBox="0 0 28 28" draw:points="0,0 28,0 28,28 0,28">
          <text:p/>
        </draw:polygon>
        <draw:polygon draw:style-name="gr269" draw:text-style-name="P267" draw:layer="layout" svg:width="0.027cm" svg:height="0.027cm" svg:x="14.814cm" svg:y="12.084cm" svg:viewBox="0 0 28 28" draw:points="0,0 28,0 28,28 0,28">
          <text:p/>
        </draw:polygon>
        <draw:polygon draw:style-name="gr269" draw:text-style-name="P267" draw:layer="layout" svg:width="0.027cm" svg:height="0.027cm" svg:x="14.867cm" svg:y="12.084cm" svg:viewBox="0 0 28 28" draw:points="0,0 28,0 28,28 0,28">
          <text:p/>
        </draw:polygon>
        <draw:polygon draw:style-name="gr269" draw:text-style-name="P267" draw:layer="layout" svg:width="0.027cm" svg:height="0.027cm" svg:x="14.92cm" svg:y="12.084cm" svg:viewBox="0 0 28 28" draw:points="0,0 28,0 28,28 0,28">
          <text:p/>
        </draw:polygon>
        <draw:polygon draw:style-name="gr269" draw:text-style-name="P267" draw:layer="layout" svg:width="0.027cm" svg:height="0.027cm" svg:x="14.973cm" svg:y="12.084cm" svg:viewBox="0 0 28 28" draw:points="0,0 28,0 28,28 0,28">
          <text:p/>
        </draw:polygon>
        <draw:polygon draw:style-name="gr269" draw:text-style-name="P267" draw:layer="layout" svg:width="0.027cm" svg:height="0.027cm" svg:x="15.026cm" svg:y="12.084cm" svg:viewBox="0 0 28 28" draw:points="0,0 28,0 28,28 0,28">
          <text:p/>
        </draw:polygon>
        <draw:polygon draw:style-name="gr269" draw:text-style-name="P267" draw:layer="layout" svg:width="0.027cm" svg:height="0.027cm" svg:x="15.079cm" svg:y="12.084cm" svg:viewBox="0 0 28 28" draw:points="0,0 28,0 28,28 0,28">
          <text:p/>
        </draw:polygon>
        <draw:polygon draw:style-name="gr269" draw:text-style-name="P267" draw:layer="layout" svg:width="0.027cm" svg:height="0.027cm" svg:x="15.132cm" svg:y="12.084cm" svg:viewBox="0 0 28 28" draw:points="0,0 28,0 28,28 0,28">
          <text:p/>
        </draw:polygon>
        <draw:polygon draw:style-name="gr269" draw:text-style-name="P267" draw:layer="layout" svg:width="0.027cm" svg:height="0.027cm" svg:x="15.185cm" svg:y="12.084cm" svg:viewBox="0 0 28 28" draw:points="0,0 28,0 28,28 0,28">
          <text:p/>
        </draw:polygon>
        <draw:polygon draw:style-name="gr269" draw:text-style-name="P267" draw:layer="layout" svg:width="0.027cm" svg:height="0.027cm" svg:x="15.238cm" svg:y="12.084cm" svg:viewBox="0 0 28 28" draw:points="0,0 28,0 28,28 0,28">
          <text:p/>
        </draw:polygon>
        <draw:polygon draw:style-name="gr269" draw:text-style-name="P267" draw:layer="layout" svg:width="0.027cm" svg:height="0.027cm" svg:x="15.291cm" svg:y="12.084cm" svg:viewBox="0 0 28 28" draw:points="0,0 28,0 28,28 0,28">
          <text:p/>
        </draw:polygon>
        <draw:polygon draw:style-name="gr269" draw:text-style-name="P267" draw:layer="layout" svg:width="0.027cm" svg:height="0.027cm" svg:x="15.344cm" svg:y="12.084cm" svg:viewBox="0 0 28 28" draw:points="0,0 28,0 28,28 0,28">
          <text:p/>
        </draw:polygon>
        <draw:polygon draw:style-name="gr269" draw:text-style-name="P267" draw:layer="layout" svg:width="0.027cm" svg:height="0.027cm" svg:x="15.397cm" svg:y="12.084cm" svg:viewBox="0 0 28 28" draw:points="0,0 28,0 28,28 0,28">
          <text:p/>
        </draw:polygon>
        <draw:polygon draw:style-name="gr269" draw:text-style-name="P267" draw:layer="layout" svg:width="0.027cm" svg:height="0.027cm" svg:x="15.45cm" svg:y="12.084cm" svg:viewBox="0 0 28 28" draw:points="0,0 28,0 28,28 0,28">
          <text:p/>
        </draw:polygon>
        <draw:polygon draw:style-name="gr269" draw:text-style-name="P267" draw:layer="layout" svg:width="0.027cm" svg:height="0.027cm" svg:x="15.503cm" svg:y="12.084cm" svg:viewBox="0 0 28 28" draw:points="0,0 28,0 28,28 0,28">
          <text:p/>
        </draw:polygon>
        <draw:polygon draw:style-name="gr269" draw:text-style-name="P267" draw:layer="layout" svg:width="0.027cm" svg:height="0.027cm" svg:x="15.556cm" svg:y="12.084cm" svg:viewBox="0 0 28 28" draw:points="0,0 28,0 28,28 0,28">
          <text:p/>
        </draw:polygon>
        <draw:polygon draw:style-name="gr269" draw:text-style-name="P267" draw:layer="layout" svg:width="0.027cm" svg:height="0.027cm" svg:x="15.609cm" svg:y="12.084cm" svg:viewBox="0 0 28 28" draw:points="0,0 28,0 28,28 0,28">
          <text:p/>
        </draw:polygon>
        <draw:polygon draw:style-name="gr269" draw:text-style-name="P267" draw:layer="layout" svg:width="0.027cm" svg:height="0.027cm" svg:x="15.662cm" svg:y="12.084cm" svg:viewBox="0 0 28 28" draw:points="0,0 28,0 28,28 0,28">
          <text:p/>
        </draw:polygon>
        <draw:polygon draw:style-name="gr269" draw:text-style-name="P267" draw:layer="layout" svg:width="0.027cm" svg:height="0.027cm" svg:x="15.715cm" svg:y="12.084cm" svg:viewBox="0 0 28 28" draw:points="0,0 28,0 28,28 0,28">
          <text:p/>
        </draw:polygon>
        <draw:polygon draw:style-name="gr269" draw:text-style-name="P267" draw:layer="layout" svg:width="0.028cm" svg:height="0.027cm" svg:x="15.768cm" svg:y="12.084cm" svg:viewBox="0 0 29 28" draw:points="0,0 29,0 29,28 0,28">
          <text:p/>
        </draw:polygon>
        <draw:polygon draw:style-name="gr269" draw:text-style-name="P267" draw:layer="layout" svg:width="0.027cm" svg:height="0.027cm" svg:x="15.821cm" svg:y="12.084cm" svg:viewBox="0 0 28 28" draw:points="0,0 28,0 28,28 0,28">
          <text:p/>
        </draw:polygon>
        <draw:polygon draw:style-name="gr269" draw:text-style-name="P267" draw:layer="layout" svg:width="0.027cm" svg:height="0.027cm" svg:x="15.874cm" svg:y="12.084cm" svg:viewBox="0 0 28 28" draw:points="0,0 28,0 28,28 0,28">
          <text:p/>
        </draw:polygon>
        <draw:polygon draw:style-name="gr269" draw:text-style-name="P267" draw:layer="layout" svg:width="0.027cm" svg:height="0.027cm" svg:x="15.927cm" svg:y="12.084cm" svg:viewBox="0 0 28 28" draw:points="0,0 28,0 28,28 0,28">
          <text:p/>
        </draw:polygon>
        <draw:polygon draw:style-name="gr269" draw:text-style-name="P267" draw:layer="layout" svg:width="0.027cm" svg:height="0.027cm" svg:x="15.98cm" svg:y="12.084cm" svg:viewBox="0 0 28 28" draw:points="0,0 28,0 28,28 0,28">
          <text:p/>
        </draw:polygon>
        <draw:polygon draw:style-name="gr269" draw:text-style-name="P267" draw:layer="layout" svg:width="0.027cm" svg:height="0.027cm" svg:x="16.033cm" svg:y="12.084cm" svg:viewBox="0 0 28 28" draw:points="0,0 28,0 28,28 0,28">
          <text:p/>
        </draw:polygon>
        <draw:polygon draw:style-name="gr269" draw:text-style-name="P267" draw:layer="layout" svg:width="0.027cm" svg:height="0.027cm" svg:x="16.086cm" svg:y="12.084cm" svg:viewBox="0 0 28 28" draw:points="0,0 28,0 28,28 0,28">
          <text:p/>
        </draw:polygon>
        <draw:polygon draw:style-name="gr269" draw:text-style-name="P267" draw:layer="layout" svg:width="0.027cm" svg:height="0.027cm" svg:x="16.139cm" svg:y="12.084cm" svg:viewBox="0 0 28 28" draw:points="0,0 28,0 28,28 0,28">
          <text:p/>
        </draw:polygon>
        <draw:polygon draw:style-name="gr269" draw:text-style-name="P267" draw:layer="layout" svg:width="0.027cm" svg:height="0.027cm" svg:x="16.192cm" svg:y="12.084cm" svg:viewBox="0 0 28 28" draw:points="0,0 28,0 28,28 0,28">
          <text:p/>
        </draw:polygon>
        <draw:polygon draw:style-name="gr269" draw:text-style-name="P267" draw:layer="layout" svg:width="0.027cm" svg:height="0.027cm" svg:x="16.245cm" svg:y="12.084cm" svg:viewBox="0 0 28 28" draw:points="0,0 28,0 28,28 0,28">
          <text:p/>
        </draw:polygon>
        <draw:polygon draw:style-name="gr269" draw:text-style-name="P267" draw:layer="layout" svg:width="0.027cm" svg:height="0.027cm" svg:x="16.298cm" svg:y="12.084cm" svg:viewBox="0 0 28 28" draw:points="0,0 28,0 28,28 0,28">
          <text:p/>
        </draw:polygon>
        <draw:polygon draw:style-name="gr269" draw:text-style-name="P267" draw:layer="layout" svg:width="0.027cm" svg:height="0.027cm" svg:x="16.351cm" svg:y="12.084cm" svg:viewBox="0 0 28 28" draw:points="0,0 28,0 28,28 0,28">
          <text:p/>
        </draw:polygon>
        <draw:polygon draw:style-name="gr269" draw:text-style-name="P267" draw:layer="layout" svg:width="0.027cm" svg:height="0.027cm" svg:x="16.404cm" svg:y="12.084cm" svg:viewBox="0 0 28 28" draw:points="0,0 28,0 28,28 0,28">
          <text:p/>
        </draw:polygon>
        <draw:polygon draw:style-name="gr269" draw:text-style-name="P267" draw:layer="layout" svg:width="0.027cm" svg:height="0.027cm" svg:x="16.457cm" svg:y="12.084cm" svg:viewBox="0 0 28 28" draw:points="0,0 28,0 28,28 0,28">
          <text:p/>
        </draw:polygon>
        <draw:polygon draw:style-name="gr269" draw:text-style-name="P267" draw:layer="layout" svg:width="0.027cm" svg:height="0.027cm" svg:x="16.51cm" svg:y="12.084cm" svg:viewBox="0 0 28 28" draw:points="0,0 28,0 28,28 0,28">
          <text:p/>
        </draw:polygon>
        <draw:polygon draw:style-name="gr269" draw:text-style-name="P267" draw:layer="layout" svg:width="0.027cm" svg:height="0.027cm" svg:x="16.563cm" svg:y="12.084cm" svg:viewBox="0 0 28 28" draw:points="0,0 28,0 28,28 0,28">
          <text:p/>
        </draw:polygon>
        <draw:polygon draw:style-name="gr269" draw:text-style-name="P267" draw:layer="layout" svg:width="0.027cm" svg:height="0.027cm" svg:x="16.616cm" svg:y="12.084cm" svg:viewBox="0 0 28 28" draw:points="0,0 28,0 28,28 0,28">
          <text:p/>
        </draw:polygon>
        <draw:polygon draw:style-name="gr269" draw:text-style-name="P267" draw:layer="layout" svg:width="0.027cm" svg:height="0.027cm" svg:x="16.669cm" svg:y="12.084cm" svg:viewBox="0 0 28 28" draw:points="0,0 28,0 28,28 0,28">
          <text:p/>
        </draw:polygon>
        <draw:polygon draw:style-name="gr269" draw:text-style-name="P267" draw:layer="layout" svg:width="0.027cm" svg:height="0.027cm" svg:x="16.722cm" svg:y="12.084cm" svg:viewBox="0 0 28 28" draw:points="0,0 28,0 28,28 0,28">
          <text:p/>
        </draw:polygon>
        <draw:polygon draw:style-name="gr269" draw:text-style-name="P267" draw:layer="layout" svg:width="0.027cm" svg:height="0.027cm" svg:x="16.775cm" svg:y="12.084cm" svg:viewBox="0 0 28 28" draw:points="0,0 28,0 28,28 0,28">
          <text:p/>
        </draw:polygon>
        <draw:polygon draw:style-name="gr269" draw:text-style-name="P267" draw:layer="layout" svg:width="0.027cm" svg:height="0.027cm" svg:x="16.828cm" svg:y="12.084cm" svg:viewBox="0 0 28 28" draw:points="0,0 28,0 28,28 0,28">
          <text:p/>
        </draw:polygon>
        <draw:polygon draw:style-name="gr269" draw:text-style-name="P267" draw:layer="layout" svg:width="0.027cm" svg:height="0.027cm" svg:x="16.881cm" svg:y="12.084cm" svg:viewBox="0 0 28 28" draw:points="0,0 28,0 28,28 0,28">
          <text:p/>
        </draw:polygon>
        <draw:polygon draw:style-name="gr269" draw:text-style-name="P267" draw:layer="layout" svg:width="0.027cm" svg:height="0.027cm" svg:x="16.934cm" svg:y="12.084cm" svg:viewBox="0 0 28 28" draw:points="0,0 28,0 28,28 0,28">
          <text:p/>
        </draw:polygon>
        <draw:polygon draw:style-name="gr269" draw:text-style-name="P267" draw:layer="layout" svg:width="0.027cm" svg:height="0.027cm" svg:x="16.987cm" svg:y="12.084cm" svg:viewBox="0 0 28 28" draw:points="0,0 28,0 28,28 0,28">
          <text:p/>
        </draw:polygon>
        <draw:polygon draw:style-name="gr269" draw:text-style-name="P267" draw:layer="layout" svg:width="0.027cm" svg:height="0.027cm" svg:x="17.04cm" svg:y="12.084cm" svg:viewBox="0 0 28 28" draw:points="0,0 28,0 28,28 0,28">
          <text:p/>
        </draw:polygon>
        <draw:polygon draw:style-name="gr269" draw:text-style-name="P267" draw:layer="layout" svg:width="0.027cm" svg:height="0.027cm" svg:x="17.093cm" svg:y="12.084cm" svg:viewBox="0 0 28 28" draw:points="0,0 28,0 28,28 0,28">
          <text:p/>
        </draw:polygon>
        <draw:polygon draw:style-name="gr269" draw:text-style-name="P267" draw:layer="layout" svg:width="0.028cm" svg:height="0.027cm" svg:x="17.146cm" svg:y="12.084cm" svg:viewBox="0 0 29 28" draw:points="0,0 29,0 29,28 0,28">
          <text:p/>
        </draw:polygon>
        <draw:polygon draw:style-name="gr269" draw:text-style-name="P267" draw:layer="layout" svg:width="0.027cm" svg:height="0.027cm" svg:x="17.199cm" svg:y="12.084cm" svg:viewBox="0 0 28 28" draw:points="0,0 28,0 28,28 0,28">
          <text:p/>
        </draw:polygon>
        <draw:polygon draw:style-name="gr269" draw:text-style-name="P267" draw:layer="layout" svg:width="0.027cm" svg:height="0.027cm" svg:x="17.252cm" svg:y="12.084cm" svg:viewBox="0 0 28 28" draw:points="0,0 28,0 28,28 0,28">
          <text:p/>
        </draw:polygon>
        <draw:polygon draw:style-name="gr269" draw:text-style-name="P267" draw:layer="layout" svg:width="0.027cm" svg:height="0.027cm" svg:x="17.305cm" svg:y="12.084cm" svg:viewBox="0 0 28 28" draw:points="0,0 28,0 28,28 0,28">
          <text:p/>
        </draw:polygon>
        <draw:polygon draw:style-name="gr269" draw:text-style-name="P267" draw:layer="layout" svg:width="0.027cm" svg:height="0.027cm" svg:x="17.358cm" svg:y="12.084cm" svg:viewBox="0 0 28 28" draw:points="0,0 28,0 28,28 0,28">
          <text:p/>
        </draw:polygon>
        <draw:polygon draw:style-name="gr269" draw:text-style-name="P267" draw:layer="layout" svg:width="0.027cm" svg:height="0.027cm" svg:x="17.411cm" svg:y="12.084cm" svg:viewBox="0 0 28 28" draw:points="0,0 28,0 28,28 0,28">
          <text:p/>
        </draw:polygon>
        <draw:polygon draw:style-name="gr269" draw:text-style-name="P267" draw:layer="layout" svg:width="0.027cm" svg:height="0.027cm" svg:x="17.464cm" svg:y="12.084cm" svg:viewBox="0 0 28 28" draw:points="0,0 28,0 28,28 0,28">
          <text:p/>
        </draw:polygon>
        <draw:polygon draw:style-name="gr269" draw:text-style-name="P267" draw:layer="layout" svg:width="0.027cm" svg:height="0.027cm" svg:x="17.517cm" svg:y="12.084cm" svg:viewBox="0 0 28 28" draw:points="0,0 28,0 28,28 0,28">
          <text:p/>
        </draw:polygon>
        <draw:polygon draw:style-name="gr269" draw:text-style-name="P267" draw:layer="layout" svg:width="0.027cm" svg:height="0.027cm" svg:x="17.57cm" svg:y="12.084cm" svg:viewBox="0 0 28 28" draw:points="0,0 28,0 28,28 0,28">
          <text:p/>
        </draw:polygon>
        <draw:polygon draw:style-name="gr269" draw:text-style-name="P267" draw:layer="layout" svg:width="0.027cm" svg:height="0.027cm" svg:x="17.623cm" svg:y="12.084cm" svg:viewBox="0 0 28 28" draw:points="0,0 28,0 28,28 0,28">
          <text:p/>
        </draw:polygon>
        <draw:polygon draw:style-name="gr269" draw:text-style-name="P267" draw:layer="layout" svg:width="0.027cm" svg:height="0.027cm" svg:x="17.676cm" svg:y="12.084cm" svg:viewBox="0 0 28 28" draw:points="0,0 28,0 28,28 0,28">
          <text:p/>
        </draw:polygon>
        <draw:polygon draw:style-name="gr269" draw:text-style-name="P267" draw:layer="layout" svg:width="0.027cm" svg:height="0.027cm" svg:x="17.729cm" svg:y="12.084cm" svg:viewBox="0 0 28 28" draw:points="0,0 28,0 28,28 0,28">
          <text:p/>
        </draw:polygon>
        <draw:polygon draw:style-name="gr269" draw:text-style-name="P267" draw:layer="layout" svg:width="0.027cm" svg:height="0.027cm" svg:x="17.782cm" svg:y="12.084cm" svg:viewBox="0 0 28 28" draw:points="0,0 28,0 28,28 0,28">
          <text:p/>
        </draw:polygon>
        <draw:polygon draw:style-name="gr269" draw:text-style-name="P267" draw:layer="layout" svg:width="0.027cm" svg:height="0.027cm" svg:x="17.835cm" svg:y="12.084cm" svg:viewBox="0 0 28 28" draw:points="0,0 28,0 28,28 0,28">
          <text:p/>
        </draw:polygon>
        <draw:polygon draw:style-name="gr269" draw:text-style-name="P267" draw:layer="layout" svg:width="0.027cm" svg:height="0.027cm" svg:x="17.888cm" svg:y="12.084cm" svg:viewBox="0 0 28 28" draw:points="0,0 28,0 28,28 0,28">
          <text:p/>
        </draw:polygon>
        <draw:polygon draw:style-name="gr269" draw:text-style-name="P267" draw:layer="layout" svg:width="0.027cm" svg:height="0.027cm" svg:x="17.941cm" svg:y="12.084cm" svg:viewBox="0 0 28 28" draw:points="0,0 28,0 28,28 0,28">
          <text:p/>
        </draw:polygon>
        <draw:polygon draw:style-name="gr269" draw:text-style-name="P267" draw:layer="layout" svg:width="0.027cm" svg:height="0.027cm" svg:x="17.994cm" svg:y="12.084cm" svg:viewBox="0 0 28 28" draw:points="0,0 28,0 28,28 0,28">
          <text:p/>
        </draw:polygon>
        <draw:polygon draw:style-name="gr269" draw:text-style-name="P267" draw:layer="layout" svg:width="0.027cm" svg:height="0.027cm" svg:x="18.047cm" svg:y="12.084cm" svg:viewBox="0 0 28 28" draw:points="0,0 28,0 28,28 0,28">
          <text:p/>
        </draw:polygon>
        <draw:polygon draw:style-name="gr269" draw:text-style-name="P267" draw:layer="layout" svg:width="0.027cm" svg:height="0.027cm" svg:x="18.1cm" svg:y="12.084cm" svg:viewBox="0 0 28 28" draw:points="0,0 28,0 28,28 0,28">
          <text:p/>
        </draw:polygon>
        <draw:polygon draw:style-name="gr269" draw:text-style-name="P267" draw:layer="layout" svg:width="0.027cm" svg:height="0.027cm" svg:x="18.153cm" svg:y="12.084cm" svg:viewBox="0 0 28 28" draw:points="0,0 28,0 28,28 0,28">
          <text:p/>
        </draw:polygon>
        <draw:polygon draw:style-name="gr269" draw:text-style-name="P267" draw:layer="layout" svg:width="0.027cm" svg:height="0.027cm" svg:x="18.206cm" svg:y="12.084cm" svg:viewBox="0 0 28 28" draw:points="0,0 28,0 28,28 0,28">
          <text:p/>
        </draw:polygon>
        <draw:polygon draw:style-name="gr269" draw:text-style-name="P267" draw:layer="layout" svg:width="0.027cm" svg:height="0.027cm" svg:x="18.259cm" svg:y="12.084cm" svg:viewBox="0 0 28 28" draw:points="0,0 28,0 28,28 0,28">
          <text:p/>
        </draw:polygon>
        <draw:polygon draw:style-name="gr269" draw:text-style-name="P267" draw:layer="layout" svg:width="0.027cm" svg:height="0.027cm" svg:x="18.312cm" svg:y="12.084cm" svg:viewBox="0 0 28 28" draw:points="0,0 28,0 28,28 0,28">
          <text:p/>
        </draw:polygon>
        <draw:polygon draw:style-name="gr269" draw:text-style-name="P267" draw:layer="layout" svg:width="0.027cm" svg:height="0.027cm" svg:x="18.365cm" svg:y="12.084cm" svg:viewBox="0 0 28 28" draw:points="0,0 28,0 28,28 0,28">
          <text:p/>
        </draw:polygon>
        <draw:polygon draw:style-name="gr269" draw:text-style-name="P267" draw:layer="layout" svg:width="0.027cm" svg:height="0.027cm" svg:x="18.418cm" svg:y="12.084cm" svg:viewBox="0 0 28 28" draw:points="0,0 28,0 28,28 0,28">
          <text:p/>
        </draw:polygon>
        <draw:polygon draw:style-name="gr269" draw:text-style-name="P267" draw:layer="layout" svg:width="0.027cm" svg:height="0.027cm" svg:x="18.471cm" svg:y="12.084cm" svg:viewBox="0 0 28 28" draw:points="0,0 28,0 28,28 0,28">
          <text:p/>
        </draw:polygon>
        <draw:polygon draw:style-name="gr269" draw:text-style-name="P267" draw:layer="layout" svg:width="0.028cm" svg:height="0.027cm" svg:x="18.524cm" svg:y="12.084cm" svg:viewBox="0 0 29 28" draw:points="0,0 29,0 29,28 0,28">
          <text:p/>
        </draw:polygon>
        <draw:polygon draw:style-name="gr269" draw:text-style-name="P267" draw:layer="layout" svg:width="0.027cm" svg:height="0.027cm" svg:x="18.577cm" svg:y="12.084cm" svg:viewBox="0 0 28 28" draw:points="0,0 28,0 28,28 0,28">
          <text:p/>
        </draw:polygon>
        <draw:polygon draw:style-name="gr269" draw:text-style-name="P267" draw:layer="layout" svg:width="0.027cm" svg:height="0.027cm" svg:x="18.63cm" svg:y="12.084cm" svg:viewBox="0 0 28 28" draw:points="0,0 28,0 28,28 0,28">
          <text:p/>
        </draw:polygon>
        <draw:polygon draw:style-name="gr269" draw:text-style-name="P267" draw:layer="layout" svg:width="0.027cm" svg:height="0.027cm" svg:x="18.683cm" svg:y="12.084cm" svg:viewBox="0 0 28 28" draw:points="0,0 28,0 28,28 0,28">
          <text:p/>
        </draw:polygon>
        <draw:polygon draw:style-name="gr269" draw:text-style-name="P267" draw:layer="layout" svg:width="0.027cm" svg:height="0.027cm" svg:x="18.736cm" svg:y="12.084cm" svg:viewBox="0 0 28 28" draw:points="0,0 28,0 28,28 0,28">
          <text:p/>
        </draw:polygon>
        <draw:polygon draw:style-name="gr269" draw:text-style-name="P267" draw:layer="layout" svg:width="0.027cm" svg:height="0.027cm" svg:x="18.789cm" svg:y="12.084cm" svg:viewBox="0 0 28 28" draw:points="0,0 28,0 28,28 0,28">
          <text:p/>
        </draw:polygon>
        <draw:polygon draw:style-name="gr269" draw:text-style-name="P267" draw:layer="layout" svg:width="0.027cm" svg:height="0.027cm" svg:x="18.842cm" svg:y="12.084cm" svg:viewBox="0 0 28 28" draw:points="0,0 28,0 28,28 0,28">
          <text:p/>
        </draw:polygon>
        <draw:polygon draw:style-name="gr269" draw:text-style-name="P267" draw:layer="layout" svg:width="0.027cm" svg:height="0.027cm" svg:x="18.895cm" svg:y="12.084cm" svg:viewBox="0 0 28 28" draw:points="0,0 28,0 28,28 0,28">
          <text:p/>
        </draw:polygon>
        <draw:polygon draw:style-name="gr269" draw:text-style-name="P267" draw:layer="layout" svg:width="0.027cm" svg:height="0.027cm" svg:x="18.948cm" svg:y="12.084cm" svg:viewBox="0 0 28 28" draw:points="0,0 28,0 28,28 0,28">
          <text:p/>
        </draw:polygon>
        <draw:polygon draw:style-name="gr269" draw:text-style-name="P267" draw:layer="layout" svg:width="0.027cm" svg:height="0.027cm" svg:x="19.001cm" svg:y="12.084cm" svg:viewBox="0 0 28 28" draw:points="0,0 28,0 28,28 0,28">
          <text:p/>
        </draw:polygon>
        <draw:polygon draw:style-name="gr269" draw:text-style-name="P267" draw:layer="layout" svg:width="0.053cm" svg:height="0.027cm" svg:x="2.014cm" svg:y="13.065cm" svg:viewBox="0 0 54 28" draw:points="0,0 54,0 54,28 0,28">
          <text:p/>
        </draw:polygon>
        <draw:polygon draw:style-name="gr269" draw:text-style-name="P267" draw:layer="layout" svg:width="0.027cm" svg:height="0.027cm" svg:x="2.093cm" svg:y="13.065cm" svg:viewBox="0 0 28 28" draw:points="0,0 28,0 28,28 0,28">
          <text:p/>
        </draw:polygon>
        <draw:polygon draw:style-name="gr269" draw:text-style-name="P267" draw:layer="layout" svg:width="0.027cm" svg:height="0.027cm" svg:x="2.146cm" svg:y="13.065cm" svg:viewBox="0 0 28 28" draw:points="0,0 28,0 28,28 0,28">
          <text:p/>
        </draw:polygon>
        <draw:polygon draw:style-name="gr269" draw:text-style-name="P267" draw:layer="layout" svg:width="0.027cm" svg:height="0.027cm" svg:x="2.199cm" svg:y="13.065cm" svg:viewBox="0 0 28 28" draw:points="0,0 28,0 28,28 0,28">
          <text:p/>
        </draw:polygon>
        <draw:polygon draw:style-name="gr269" draw:text-style-name="P267" draw:layer="layout" svg:width="0.027cm" svg:height="0.027cm" svg:x="2.252cm" svg:y="13.065cm" svg:viewBox="0 0 28 28" draw:points="0,0 28,0 28,28 0,28">
          <text:p/>
        </draw:polygon>
        <draw:polygon draw:style-name="gr269" draw:text-style-name="P267" draw:layer="layout" svg:width="0.027cm" svg:height="0.027cm" svg:x="2.305cm" svg:y="13.065cm" svg:viewBox="0 0 28 28" draw:points="0,0 28,0 28,28 0,28">
          <text:p/>
        </draw:polygon>
        <draw:polygon draw:style-name="gr269" draw:text-style-name="P267" draw:layer="layout" svg:width="0.027cm" svg:height="0.027cm" svg:x="2.358cm" svg:y="13.065cm" svg:viewBox="0 0 28 28" draw:points="0,0 28,0 28,28 0,28">
          <text:p/>
        </draw:polygon>
        <draw:polygon draw:style-name="gr269" draw:text-style-name="P267" draw:layer="layout" svg:width="0.027cm" svg:height="0.027cm" svg:x="2.411cm" svg:y="13.065cm" svg:viewBox="0 0 28 28" draw:points="0,0 28,0 28,28 0,28">
          <text:p/>
        </draw:polygon>
        <draw:polygon draw:style-name="gr269" draw:text-style-name="P267" draw:layer="layout" svg:width="0.027cm" svg:height="0.027cm" svg:x="2.464cm" svg:y="13.065cm" svg:viewBox="0 0 28 28" draw:points="0,0 28,0 28,28 0,28">
          <text:p/>
        </draw:polygon>
        <draw:polygon draw:style-name="gr269" draw:text-style-name="P267" draw:layer="layout" svg:width="0.027cm" svg:height="0.027cm" svg:x="2.517cm" svg:y="13.065cm" svg:viewBox="0 0 28 28" draw:points="0,0 28,0 28,28 0,28">
          <text:p/>
        </draw:polygon>
        <draw:polygon draw:style-name="gr269" draw:text-style-name="P267" draw:layer="layout" svg:width="0.027cm" svg:height="0.027cm" svg:x="2.57cm" svg:y="13.065cm" svg:viewBox="0 0 28 28" draw:points="0,0 28,0 28,28 0,28">
          <text:p/>
        </draw:polygon>
        <draw:polygon draw:style-name="gr269" draw:text-style-name="P267" draw:layer="layout" svg:width="0.027cm" svg:height="0.027cm" svg:x="2.623cm" svg:y="13.065cm" svg:viewBox="0 0 28 28" draw:points="0,0 28,0 28,28 0,28">
          <text:p/>
        </draw:polygon>
        <draw:polygon draw:style-name="gr269" draw:text-style-name="P267" draw:layer="layout" svg:width="0.027cm" svg:height="0.027cm" svg:x="2.676cm" svg:y="13.065cm" svg:viewBox="0 0 28 28" draw:points="0,0 28,0 28,28 0,28">
          <text:p/>
        </draw:polygon>
        <draw:polygon draw:style-name="gr269" draw:text-style-name="P267" draw:layer="layout" svg:width="0.027cm" svg:height="0.027cm" svg:x="2.729cm" svg:y="13.065cm" svg:viewBox="0 0 28 28" draw:points="0,0 28,0 28,28 0,28">
          <text:p/>
        </draw:polygon>
        <draw:polygon draw:style-name="gr269" draw:text-style-name="P267" draw:layer="layout" svg:width="0.027cm" svg:height="0.027cm" svg:x="2.782cm" svg:y="13.065cm" svg:viewBox="0 0 28 28" draw:points="0,0 28,0 28,28 0,28">
          <text:p/>
        </draw:polygon>
        <draw:polygon draw:style-name="gr269" draw:text-style-name="P267" draw:layer="layout" svg:width="0.027cm" svg:height="0.027cm" svg:x="2.835cm" svg:y="13.065cm" svg:viewBox="0 0 28 28" draw:points="0,0 28,0 28,28 0,28">
          <text:p/>
        </draw:polygon>
        <draw:polygon draw:style-name="gr269" draw:text-style-name="P267" draw:layer="layout" svg:width="0.027cm" svg:height="0.027cm" svg:x="2.888cm" svg:y="13.065cm" svg:viewBox="0 0 28 28" draw:points="0,0 28,0 28,28 0,28">
          <text:p/>
        </draw:polygon>
        <draw:polygon draw:style-name="gr269" draw:text-style-name="P267" draw:layer="layout" svg:width="0.027cm" svg:height="0.027cm" svg:x="2.941cm" svg:y="13.065cm" svg:viewBox="0 0 28 28" draw:points="0,0 28,0 28,28 0,28">
          <text:p/>
        </draw:polygon>
        <draw:polygon draw:style-name="gr269" draw:text-style-name="P267" draw:layer="layout" svg:width="0.027cm" svg:height="0.027cm" svg:x="2.994cm" svg:y="13.065cm" svg:viewBox="0 0 28 28" draw:points="0,0 28,0 28,28 0,28">
          <text:p/>
        </draw:polygon>
        <draw:polygon draw:style-name="gr269" draw:text-style-name="P267" draw:layer="layout" svg:width="0.027cm" svg:height="0.027cm" svg:x="3.047cm" svg:y="13.065cm" svg:viewBox="0 0 28 28" draw:points="0,0 28,0 28,28 0,28">
          <text:p/>
        </draw:polygon>
        <draw:polygon draw:style-name="gr269" draw:text-style-name="P267" draw:layer="layout" svg:width="0.027cm" svg:height="0.027cm" svg:x="3.1cm" svg:y="13.065cm" svg:viewBox="0 0 28 28" draw:points="0,0 28,0 28,28 0,28">
          <text:p/>
        </draw:polygon>
        <draw:polygon draw:style-name="gr269" draw:text-style-name="P267" draw:layer="layout" svg:width="0.027cm" svg:height="0.027cm" svg:x="3.153cm" svg:y="13.065cm" svg:viewBox="0 0 28 28" draw:points="0,0 28,0 28,28 0,28">
          <text:p/>
        </draw:polygon>
        <draw:polygon draw:style-name="gr269" draw:text-style-name="P267" draw:layer="layout" svg:width="0.027cm" svg:height="0.027cm" svg:x="3.206cm" svg:y="13.065cm" svg:viewBox="0 0 28 28" draw:points="0,0 28,0 28,28 0,28">
          <text:p/>
        </draw:polygon>
        <draw:polygon draw:style-name="gr269" draw:text-style-name="P267" draw:layer="layout" svg:width="0.027cm" svg:height="0.027cm" svg:x="3.259cm" svg:y="13.065cm" svg:viewBox="0 0 28 28" draw:points="0,0 28,0 28,28 0,28">
          <text:p/>
        </draw:polygon>
        <draw:polygon draw:style-name="gr269" draw:text-style-name="P267" draw:layer="layout" svg:width="0.027cm" svg:height="0.027cm" svg:x="3.312cm" svg:y="13.065cm" svg:viewBox="0 0 28 28" draw:points="0,0 28,0 28,28 0,28">
          <text:p/>
        </draw:polygon>
        <draw:polygon draw:style-name="gr269" draw:text-style-name="P267" draw:layer="layout" svg:width="0.027cm" svg:height="0.027cm" svg:x="3.365cm" svg:y="13.065cm" svg:viewBox="0 0 28 28" draw:points="0,0 28,0 28,28 0,28">
          <text:p/>
        </draw:polygon>
        <draw:polygon draw:style-name="gr269" draw:text-style-name="P267" draw:layer="layout" svg:width="0.028cm" svg:height="0.027cm" svg:x="3.418cm" svg:y="13.065cm" svg:viewBox="0 0 29 28" draw:points="0,0 29,0 29,28 0,28">
          <text:p/>
        </draw:polygon>
        <draw:polygon draw:style-name="gr269" draw:text-style-name="P267" draw:layer="layout" svg:width="0.027cm" svg:height="0.027cm" svg:x="3.471cm" svg:y="13.065cm" svg:viewBox="0 0 28 28" draw:points="0,0 28,0 28,28 0,28">
          <text:p/>
        </draw:polygon>
        <draw:polygon draw:style-name="gr269" draw:text-style-name="P267" draw:layer="layout" svg:width="0.027cm" svg:height="0.027cm" svg:x="3.524cm" svg:y="13.065cm" svg:viewBox="0 0 28 28" draw:points="0,0 28,0 28,28 0,28">
          <text:p/>
        </draw:polygon>
        <draw:polygon draw:style-name="gr269" draw:text-style-name="P267" draw:layer="layout" svg:width="0.027cm" svg:height="0.027cm" svg:x="3.577cm" svg:y="13.065cm" svg:viewBox="0 0 28 28" draw:points="0,0 28,0 28,28 0,28">
          <text:p/>
        </draw:polygon>
        <draw:polygon draw:style-name="gr269" draw:text-style-name="P267" draw:layer="layout" svg:width="0.027cm" svg:height="0.027cm" svg:x="3.63cm" svg:y="13.065cm" svg:viewBox="0 0 28 28" draw:points="0,0 28,0 28,28 0,28">
          <text:p/>
        </draw:polygon>
        <draw:polygon draw:style-name="gr269" draw:text-style-name="P267" draw:layer="layout" svg:width="0.027cm" svg:height="0.027cm" svg:x="3.683cm" svg:y="13.065cm" svg:viewBox="0 0 28 28" draw:points="0,0 28,0 28,28 0,28">
          <text:p/>
        </draw:polygon>
        <draw:polygon draw:style-name="gr269" draw:text-style-name="P267" draw:layer="layout" svg:width="0.027cm" svg:height="0.027cm" svg:x="3.736cm" svg:y="13.065cm" svg:viewBox="0 0 28 28" draw:points="0,0 28,0 28,28 0,28">
          <text:p/>
        </draw:polygon>
        <draw:polygon draw:style-name="gr269" draw:text-style-name="P267" draw:layer="layout" svg:width="0.027cm" svg:height="0.027cm" svg:x="3.789cm" svg:y="13.065cm" svg:viewBox="0 0 28 28" draw:points="0,0 28,0 28,28 0,28">
          <text:p/>
        </draw:polygon>
        <draw:polygon draw:style-name="gr269" draw:text-style-name="P267" draw:layer="layout" svg:width="0.027cm" svg:height="0.027cm" svg:x="3.842cm" svg:y="13.065cm" svg:viewBox="0 0 28 28" draw:points="0,0 28,0 28,28 0,28">
          <text:p/>
        </draw:polygon>
        <draw:polygon draw:style-name="gr269" draw:text-style-name="P267" draw:layer="layout" svg:width="0.027cm" svg:height="0.027cm" svg:x="3.895cm" svg:y="13.065cm" svg:viewBox="0 0 28 28" draw:points="0,0 28,0 28,28 0,28">
          <text:p/>
        </draw:polygon>
        <draw:polygon draw:style-name="gr269" draw:text-style-name="P267" draw:layer="layout" svg:width="0.027cm" svg:height="0.027cm" svg:x="3.948cm" svg:y="13.065cm" svg:viewBox="0 0 28 28" draw:points="0,0 28,0 28,28 0,28">
          <text:p/>
        </draw:polygon>
        <draw:polygon draw:style-name="gr269" draw:text-style-name="P267" draw:layer="layout" svg:width="0.027cm" svg:height="0.027cm" svg:x="4.001cm" svg:y="13.065cm" svg:viewBox="0 0 28 28" draw:points="0,0 28,0 28,28 0,28">
          <text:p/>
        </draw:polygon>
        <draw:polygon draw:style-name="gr269" draw:text-style-name="P267" draw:layer="layout" svg:width="0.027cm" svg:height="0.027cm" svg:x="4.054cm" svg:y="13.065cm" svg:viewBox="0 0 28 28" draw:points="0,0 28,0 28,28 0,28">
          <text:p/>
        </draw:polygon>
        <draw:polygon draw:style-name="gr269" draw:text-style-name="P267" draw:layer="layout" svg:width="0.027cm" svg:height="0.027cm" svg:x="4.107cm" svg:y="13.065cm" svg:viewBox="0 0 28 28" draw:points="0,0 28,0 28,28 0,28">
          <text:p/>
        </draw:polygon>
        <draw:polygon draw:style-name="gr269" draw:text-style-name="P267" draw:layer="layout" svg:width="0.027cm" svg:height="0.027cm" svg:x="4.16cm" svg:y="13.065cm" svg:viewBox="0 0 28 28" draw:points="0,0 28,0 28,28 0,28">
          <text:p/>
        </draw:polygon>
        <draw:polygon draw:style-name="gr269" draw:text-style-name="P267" draw:layer="layout" svg:width="0.027cm" svg:height="0.027cm" svg:x="4.213cm" svg:y="13.065cm" svg:viewBox="0 0 28 28" draw:points="0,0 28,0 28,28 0,28">
          <text:p/>
        </draw:polygon>
        <draw:polygon draw:style-name="gr269" draw:text-style-name="P267" draw:layer="layout" svg:width="0.027cm" svg:height="0.027cm" svg:x="4.266cm" svg:y="13.065cm" svg:viewBox="0 0 28 28" draw:points="0,0 28,0 28,28 0,28">
          <text:p/>
        </draw:polygon>
        <draw:polygon draw:style-name="gr269" draw:text-style-name="P267" draw:layer="layout" svg:width="0.027cm" svg:height="0.027cm" svg:x="4.319cm" svg:y="13.065cm" svg:viewBox="0 0 28 28" draw:points="0,0 28,0 28,28 0,28">
          <text:p/>
        </draw:polygon>
        <draw:polygon draw:style-name="gr269" draw:text-style-name="P267" draw:layer="layout" svg:width="0.027cm" svg:height="0.027cm" svg:x="4.372cm" svg:y="13.065cm" svg:viewBox="0 0 28 28" draw:points="0,0 28,0 28,28 0,28">
          <text:p/>
        </draw:polygon>
        <draw:polygon draw:style-name="gr269" draw:text-style-name="P267" draw:layer="layout" svg:width="0.027cm" svg:height="0.027cm" svg:x="4.425cm" svg:y="13.065cm" svg:viewBox="0 0 28 28" draw:points="0,0 28,0 28,28 0,28">
          <text:p/>
        </draw:polygon>
        <draw:polygon draw:style-name="gr269" draw:text-style-name="P267" draw:layer="layout" svg:width="0.027cm" svg:height="0.027cm" svg:x="4.478cm" svg:y="13.065cm" svg:viewBox="0 0 28 28" draw:points="0,0 28,0 28,28 0,28">
          <text:p/>
        </draw:polygon>
        <draw:polygon draw:style-name="gr269" draw:text-style-name="P267" draw:layer="layout" svg:width="0.027cm" svg:height="0.027cm" svg:x="4.531cm" svg:y="13.065cm" svg:viewBox="0 0 28 28" draw:points="0,0 28,0 28,28 0,28">
          <text:p/>
        </draw:polygon>
        <draw:polygon draw:style-name="gr269" draw:text-style-name="P267" draw:layer="layout" svg:width="0.027cm" svg:height="0.027cm" svg:x="4.584cm" svg:y="13.065cm" svg:viewBox="0 0 28 28" draw:points="0,0 28,0 28,28 0,28">
          <text:p/>
        </draw:polygon>
        <draw:polygon draw:style-name="gr269" draw:text-style-name="P267" draw:layer="layout" svg:width="0.027cm" svg:height="0.027cm" svg:x="4.637cm" svg:y="13.065cm" svg:viewBox="0 0 28 28" draw:points="0,0 28,0 28,28 0,28">
          <text:p/>
        </draw:polygon>
        <draw:polygon draw:style-name="gr269" draw:text-style-name="P267" draw:layer="layout" svg:width="0.027cm" svg:height="0.027cm" svg:x="4.69cm" svg:y="13.065cm" svg:viewBox="0 0 28 28" draw:points="0,0 28,0 28,28 0,28">
          <text:p/>
        </draw:polygon>
        <draw:polygon draw:style-name="gr269" draw:text-style-name="P267" draw:layer="layout" svg:width="0.027cm" svg:height="0.027cm" svg:x="4.743cm" svg:y="13.065cm" svg:viewBox="0 0 28 28" draw:points="0,0 28,0 28,28 0,28">
          <text:p/>
        </draw:polygon>
        <draw:polygon draw:style-name="gr269" draw:text-style-name="P267" draw:layer="layout" svg:width="0.028cm" svg:height="0.027cm" svg:x="4.796cm" svg:y="13.065cm" svg:viewBox="0 0 29 28" draw:points="0,0 29,0 29,28 0,28">
          <text:p/>
        </draw:polygon>
        <draw:polygon draw:style-name="gr269" draw:text-style-name="P267" draw:layer="layout" svg:width="0.027cm" svg:height="0.027cm" svg:x="4.849cm" svg:y="13.065cm" svg:viewBox="0 0 28 28" draw:points="0,0 28,0 28,28 0,28">
          <text:p/>
        </draw:polygon>
        <draw:polygon draw:style-name="gr269" draw:text-style-name="P267" draw:layer="layout" svg:width="0.027cm" svg:height="0.027cm" svg:x="4.902cm" svg:y="13.065cm" svg:viewBox="0 0 28 28" draw:points="0,0 28,0 28,28 0,28">
          <text:p/>
        </draw:polygon>
        <draw:polygon draw:style-name="gr269" draw:text-style-name="P267" draw:layer="layout" svg:width="0.027cm" svg:height="0.027cm" svg:x="4.955cm" svg:y="13.065cm" svg:viewBox="0 0 28 28" draw:points="0,0 28,0 28,28 0,28">
          <text:p/>
        </draw:polygon>
        <draw:polygon draw:style-name="gr269" draw:text-style-name="P267" draw:layer="layout" svg:width="0.027cm" svg:height="0.027cm" svg:x="5.008cm" svg:y="13.065cm" svg:viewBox="0 0 28 28" draw:points="0,0 28,0 28,28 0,28">
          <text:p/>
        </draw:polygon>
        <draw:polygon draw:style-name="gr269" draw:text-style-name="P267" draw:layer="layout" svg:width="0.027cm" svg:height="0.027cm" svg:x="5.061cm" svg:y="13.065cm" svg:viewBox="0 0 28 28" draw:points="0,0 28,0 28,28 0,28">
          <text:p/>
        </draw:polygon>
        <draw:polygon draw:style-name="gr269" draw:text-style-name="P267" draw:layer="layout" svg:width="0.027cm" svg:height="0.027cm" svg:x="5.114cm" svg:y="13.065cm" svg:viewBox="0 0 28 28" draw:points="0,0 28,0 28,28 0,28">
          <text:p/>
        </draw:polygon>
        <draw:polygon draw:style-name="gr269" draw:text-style-name="P267" draw:layer="layout" svg:width="0.027cm" svg:height="0.027cm" svg:x="5.167cm" svg:y="13.065cm" svg:viewBox="0 0 28 28" draw:points="0,0 28,0 28,28 0,28">
          <text:p/>
        </draw:polygon>
        <draw:polygon draw:style-name="gr269" draw:text-style-name="P267" draw:layer="layout" svg:width="0.027cm" svg:height="0.027cm" svg:x="5.22cm" svg:y="13.065cm" svg:viewBox="0 0 28 28" draw:points="0,0 28,0 28,28 0,28">
          <text:p/>
        </draw:polygon>
        <draw:polygon draw:style-name="gr269" draw:text-style-name="P267" draw:layer="layout" svg:width="0.027cm" svg:height="0.027cm" svg:x="5.273cm" svg:y="13.065cm" svg:viewBox="0 0 28 28" draw:points="0,0 28,0 28,28 0,28">
          <text:p/>
        </draw:polygon>
        <draw:polygon draw:style-name="gr269" draw:text-style-name="P267" draw:layer="layout" svg:width="0.027cm" svg:height="0.027cm" svg:x="5.326cm" svg:y="13.065cm" svg:viewBox="0 0 28 28" draw:points="0,0 28,0 28,28 0,28">
          <text:p/>
        </draw:polygon>
        <draw:polygon draw:style-name="gr269" draw:text-style-name="P267" draw:layer="layout" svg:width="0.027cm" svg:height="0.027cm" svg:x="5.379cm" svg:y="13.065cm" svg:viewBox="0 0 28 28" draw:points="0,0 28,0 28,28 0,28">
          <text:p/>
        </draw:polygon>
        <draw:polygon draw:style-name="gr269" draw:text-style-name="P267" draw:layer="layout" svg:width="0.027cm" svg:height="0.027cm" svg:x="5.432cm" svg:y="13.065cm" svg:viewBox="0 0 28 28" draw:points="0,0 28,0 28,28 0,28">
          <text:p/>
        </draw:polygon>
        <draw:polygon draw:style-name="gr269" draw:text-style-name="P267" draw:layer="layout" svg:width="0.027cm" svg:height="0.027cm" svg:x="5.485cm" svg:y="13.065cm" svg:viewBox="0 0 28 28" draw:points="0,0 28,0 28,28 0,28">
          <text:p/>
        </draw:polygon>
        <draw:polygon draw:style-name="gr269" draw:text-style-name="P267" draw:layer="layout" svg:width="0.027cm" svg:height="0.027cm" svg:x="5.538cm" svg:y="13.065cm" svg:viewBox="0 0 28 28" draw:points="0,0 28,0 28,28 0,28">
          <text:p/>
        </draw:polygon>
        <draw:polygon draw:style-name="gr269" draw:text-style-name="P267" draw:layer="layout" svg:width="0.027cm" svg:height="0.027cm" svg:x="5.591cm" svg:y="13.065cm" svg:viewBox="0 0 28 28" draw:points="0,0 28,0 28,28 0,28">
          <text:p/>
        </draw:polygon>
        <draw:polygon draw:style-name="gr269" draw:text-style-name="P267" draw:layer="layout" svg:width="0.027cm" svg:height="0.027cm" svg:x="5.644cm" svg:y="13.065cm" svg:viewBox="0 0 28 28" draw:points="0,0 28,0 28,28 0,28">
          <text:p/>
        </draw:polygon>
        <draw:polygon draw:style-name="gr269" draw:text-style-name="P267" draw:layer="layout" svg:width="0.027cm" svg:height="0.027cm" svg:x="5.697cm" svg:y="13.065cm" svg:viewBox="0 0 28 28" draw:points="0,0 28,0 28,28 0,28">
          <text:p/>
        </draw:polygon>
        <draw:polygon draw:style-name="gr269" draw:text-style-name="P267" draw:layer="layout" svg:width="0.027cm" svg:height="0.027cm" svg:x="5.75cm" svg:y="13.065cm" svg:viewBox="0 0 28 28" draw:points="0,0 28,0 28,28 0,28">
          <text:p/>
        </draw:polygon>
        <draw:polygon draw:style-name="gr269" draw:text-style-name="P267" draw:layer="layout" svg:width="0.027cm" svg:height="0.027cm" svg:x="5.803cm" svg:y="13.065cm" svg:viewBox="0 0 28 28" draw:points="0,0 28,0 28,28 0,28">
          <text:p/>
        </draw:polygon>
        <draw:polygon draw:style-name="gr269" draw:text-style-name="P267" draw:layer="layout" svg:width="0.027cm" svg:height="0.027cm" svg:x="5.856cm" svg:y="13.065cm" svg:viewBox="0 0 28 28" draw:points="0,0 28,0 28,28 0,28">
          <text:p/>
        </draw:polygon>
        <draw:polygon draw:style-name="gr269" draw:text-style-name="P267" draw:layer="layout" svg:width="0.027cm" svg:height="0.027cm" svg:x="5.909cm" svg:y="13.065cm" svg:viewBox="0 0 28 28" draw:points="0,0 28,0 28,28 0,28">
          <text:p/>
        </draw:polygon>
        <draw:polygon draw:style-name="gr269" draw:text-style-name="P267" draw:layer="layout" svg:width="0.027cm" svg:height="0.027cm" svg:x="5.962cm" svg:y="13.065cm" svg:viewBox="0 0 28 28" draw:points="0,0 28,0 28,28 0,28">
          <text:p/>
        </draw:polygon>
        <draw:polygon draw:style-name="gr269" draw:text-style-name="P267" draw:layer="layout" svg:width="0.027cm" svg:height="0.027cm" svg:x="6.015cm" svg:y="13.065cm" svg:viewBox="0 0 28 28" draw:points="0,0 28,0 28,28 0,28">
          <text:p/>
        </draw:polygon>
        <draw:polygon draw:style-name="gr269" draw:text-style-name="P267" draw:layer="layout" svg:width="0.027cm" svg:height="0.027cm" svg:x="6.068cm" svg:y="13.065cm" svg:viewBox="0 0 28 28" draw:points="0,0 28,0 28,28 0,28">
          <text:p/>
        </draw:polygon>
        <draw:polygon draw:style-name="gr269" draw:text-style-name="P267" draw:layer="layout" svg:width="0.027cm" svg:height="0.027cm" svg:x="6.121cm" svg:y="13.065cm" svg:viewBox="0 0 28 28" draw:points="0,0 28,0 28,28 0,28">
          <text:p/>
        </draw:polygon>
        <draw:polygon draw:style-name="gr269" draw:text-style-name="P267" draw:layer="layout" svg:width="0.028cm" svg:height="0.027cm" svg:x="6.174cm" svg:y="13.065cm" svg:viewBox="0 0 29 28" draw:points="0,0 29,0 29,28 0,28">
          <text:p/>
        </draw:polygon>
        <draw:polygon draw:style-name="gr269" draw:text-style-name="P267" draw:layer="layout" svg:width="0.027cm" svg:height="0.027cm" svg:x="6.227cm" svg:y="13.065cm" svg:viewBox="0 0 28 28" draw:points="0,0 28,0 28,28 0,28">
          <text:p/>
        </draw:polygon>
        <draw:polygon draw:style-name="gr269" draw:text-style-name="P267" draw:layer="layout" svg:width="0.027cm" svg:height="0.027cm" svg:x="6.28cm" svg:y="13.065cm" svg:viewBox="0 0 28 28" draw:points="0,0 28,0 28,28 0,28">
          <text:p/>
        </draw:polygon>
        <draw:polygon draw:style-name="gr269" draw:text-style-name="P267" draw:layer="layout" svg:width="0.027cm" svg:height="0.027cm" svg:x="6.333cm" svg:y="13.065cm" svg:viewBox="0 0 28 28" draw:points="0,0 28,0 28,28 0,28">
          <text:p/>
        </draw:polygon>
        <draw:polygon draw:style-name="gr269" draw:text-style-name="P267" draw:layer="layout" svg:width="0.026cm" svg:height="0.027cm" svg:x="6.387cm" svg:y="13.065cm" svg:viewBox="0 0 27 28" draw:points="0,0 27,0 27,28 0,28">
          <text:p/>
        </draw:polygon>
        <draw:polygon draw:style-name="gr269" draw:text-style-name="P267" draw:layer="layout" svg:width="0.026cm" svg:height="0.027cm" svg:x="6.44cm" svg:y="13.065cm" svg:viewBox="0 0 27 28" draw:points="0,0 27,0 27,28 0,28">
          <text:p/>
        </draw:polygon>
        <draw:polygon draw:style-name="gr269" draw:text-style-name="P267" draw:layer="layout" svg:width="0.026cm" svg:height="0.027cm" svg:x="6.493cm" svg:y="13.065cm" svg:viewBox="0 0 27 28" draw:points="0,0 27,0 27,28 0,28">
          <text:p/>
        </draw:polygon>
        <draw:polygon draw:style-name="gr269" draw:text-style-name="P267" draw:layer="layout" svg:width="0.026cm" svg:height="0.027cm" svg:x="6.546cm" svg:y="13.065cm" svg:viewBox="0 0 27 28" draw:points="0,0 27,0 27,28 0,28">
          <text:p/>
        </draw:polygon>
        <draw:polygon draw:style-name="gr269" draw:text-style-name="P267" draw:layer="layout" svg:width="0.026cm" svg:height="0.027cm" svg:x="6.599cm" svg:y="13.065cm" svg:viewBox="0 0 27 28" draw:points="0,0 27,0 27,28 0,28">
          <text:p/>
        </draw:polygon>
        <draw:polygon draw:style-name="gr269" draw:text-style-name="P267" draw:layer="layout" svg:width="0.026cm" svg:height="0.027cm" svg:x="6.652cm" svg:y="13.065cm" svg:viewBox="0 0 27 28" draw:points="0,0 27,0 27,28 0,28">
          <text:p/>
        </draw:polygon>
        <draw:polygon draw:style-name="gr269" draw:text-style-name="P267" draw:layer="layout" svg:width="0.026cm" svg:height="0.027cm" svg:x="6.705cm" svg:y="13.065cm" svg:viewBox="0 0 27 28" draw:points="0,0 27,0 27,28 0,28">
          <text:p/>
        </draw:polygon>
        <draw:polygon draw:style-name="gr269" draw:text-style-name="P267" draw:layer="layout" svg:width="0.026cm" svg:height="0.027cm" svg:x="6.758cm" svg:y="13.065cm" svg:viewBox="0 0 27 28" draw:points="0,0 27,0 27,28 0,28">
          <text:p/>
        </draw:polygon>
        <draw:polygon draw:style-name="gr269" draw:text-style-name="P267" draw:layer="layout" svg:width="0.026cm" svg:height="0.027cm" svg:x="6.811cm" svg:y="13.065cm" svg:viewBox="0 0 27 28" draw:points="0,0 27,0 27,28 0,28">
          <text:p/>
        </draw:polygon>
        <draw:polygon draw:style-name="gr269" draw:text-style-name="P267" draw:layer="layout" svg:width="0.026cm" svg:height="0.027cm" svg:x="6.864cm" svg:y="13.065cm" svg:viewBox="0 0 27 28" draw:points="0,0 27,0 27,28 0,28">
          <text:p/>
        </draw:polygon>
        <draw:polygon draw:style-name="gr269" draw:text-style-name="P267" draw:layer="layout" svg:width="0.026cm" svg:height="0.027cm" svg:x="6.917cm" svg:y="13.065cm" svg:viewBox="0 0 27 28" draw:points="0,0 27,0 27,28 0,28">
          <text:p/>
        </draw:polygon>
        <draw:polygon draw:style-name="gr269" draw:text-style-name="P267" draw:layer="layout" svg:width="0.026cm" svg:height="0.027cm" svg:x="6.97cm" svg:y="13.065cm" svg:viewBox="0 0 27 28" draw:points="0,0 27,0 27,28 0,28">
          <text:p/>
        </draw:polygon>
        <draw:polygon draw:style-name="gr269" draw:text-style-name="P267" draw:layer="layout" svg:width="0.026cm" svg:height="0.027cm" svg:x="7.023cm" svg:y="13.065cm" svg:viewBox="0 0 27 28" draw:points="0,0 27,0 27,28 0,28">
          <text:p/>
        </draw:polygon>
        <draw:polygon draw:style-name="gr269" draw:text-style-name="P267" draw:layer="layout" svg:width="0.026cm" svg:height="0.027cm" svg:x="7.076cm" svg:y="13.065cm" svg:viewBox="0 0 27 28" draw:points="0,0 27,0 27,28 0,28">
          <text:p/>
        </draw:polygon>
        <draw:polygon draw:style-name="gr269" draw:text-style-name="P267" draw:layer="layout" svg:width="0.026cm" svg:height="0.027cm" svg:x="7.129cm" svg:y="13.065cm" svg:viewBox="0 0 27 28" draw:points="0,0 27,0 27,28 0,28">
          <text:p/>
        </draw:polygon>
        <draw:polygon draw:style-name="gr269" draw:text-style-name="P267" draw:layer="layout" svg:width="0.026cm" svg:height="0.027cm" svg:x="7.182cm" svg:y="13.065cm" svg:viewBox="0 0 27 28" draw:points="0,0 27,0 27,28 0,28">
          <text:p/>
        </draw:polygon>
        <draw:polygon draw:style-name="gr269" draw:text-style-name="P267" draw:layer="layout" svg:width="0.026cm" svg:height="0.027cm" svg:x="7.235cm" svg:y="13.065cm" svg:viewBox="0 0 27 28" draw:points="0,0 27,0 27,28 0,28">
          <text:p/>
        </draw:polygon>
        <draw:polygon draw:style-name="gr269" draw:text-style-name="P267" draw:layer="layout" svg:width="0.026cm" svg:height="0.027cm" svg:x="7.288cm" svg:y="13.065cm" svg:viewBox="0 0 27 28" draw:points="0,0 27,0 27,28 0,28">
          <text:p/>
        </draw:polygon>
        <draw:polygon draw:style-name="gr269" draw:text-style-name="P267" draw:layer="layout" svg:width="0.026cm" svg:height="0.027cm" svg:x="7.341cm" svg:y="13.065cm" svg:viewBox="0 0 27 28" draw:points="0,0 27,0 27,28 0,28">
          <text:p/>
        </draw:polygon>
        <draw:polygon draw:style-name="gr269" draw:text-style-name="P267" draw:layer="layout" svg:width="0.026cm" svg:height="0.027cm" svg:x="7.394cm" svg:y="13.065cm" svg:viewBox="0 0 27 28" draw:points="0,0 27,0 27,28 0,28">
          <text:p/>
        </draw:polygon>
        <draw:polygon draw:style-name="gr269" draw:text-style-name="P267" draw:layer="layout" svg:width="0.026cm" svg:height="0.027cm" svg:x="7.447cm" svg:y="13.065cm" svg:viewBox="0 0 27 28" draw:points="0,0 27,0 27,28 0,28">
          <text:p/>
        </draw:polygon>
        <draw:polygon draw:style-name="gr269" draw:text-style-name="P267" draw:layer="layout" svg:width="0.026cm" svg:height="0.027cm" svg:x="7.5cm" svg:y="13.065cm" svg:viewBox="0 0 27 28" draw:points="0,0 27,0 27,28 0,28">
          <text:p/>
        </draw:polygon>
        <draw:polygon draw:style-name="gr269" draw:text-style-name="P267" draw:layer="layout" svg:width="0.026cm" svg:height="0.027cm" svg:x="7.553cm" svg:y="13.065cm" svg:viewBox="0 0 27 28" draw:points="0,0 27,0 27,28 0,28">
          <text:p/>
        </draw:polygon>
        <draw:polygon draw:style-name="gr269" draw:text-style-name="P267" draw:layer="layout" svg:width="0.026cm" svg:height="0.027cm" svg:x="7.606cm" svg:y="13.065cm" svg:viewBox="0 0 27 28" draw:points="0,0 27,0 27,28 0,28">
          <text:p/>
        </draw:polygon>
        <draw:polygon draw:style-name="gr269" draw:text-style-name="P267" draw:layer="layout" svg:width="0.026cm" svg:height="0.027cm" svg:x="7.659cm" svg:y="13.065cm" svg:viewBox="0 0 27 28" draw:points="0,0 27,0 27,28 0,28">
          <text:p/>
        </draw:polygon>
        <draw:polygon draw:style-name="gr269" draw:text-style-name="P267" draw:layer="layout" svg:width="0.026cm" svg:height="0.027cm" svg:x="7.712cm" svg:y="13.065cm" svg:viewBox="0 0 27 28" draw:points="0,0 27,0 27,28 0,28">
          <text:p/>
        </draw:polygon>
        <draw:polygon draw:style-name="gr269" draw:text-style-name="P267" draw:layer="layout" svg:width="0.026cm" svg:height="0.027cm" svg:x="7.765cm" svg:y="13.065cm" svg:viewBox="0 0 27 28" draw:points="0,0 27,0 27,28 0,28">
          <text:p/>
        </draw:polygon>
        <draw:polygon draw:style-name="gr269" draw:text-style-name="P267" draw:layer="layout" svg:width="0.026cm" svg:height="0.027cm" svg:x="7.818cm" svg:y="13.065cm" svg:viewBox="0 0 27 28" draw:points="0,0 27,0 27,28 0,28">
          <text:p/>
        </draw:polygon>
        <draw:polygon draw:style-name="gr269" draw:text-style-name="P267" draw:layer="layout" svg:width="0.026cm" svg:height="0.027cm" svg:x="7.871cm" svg:y="13.065cm" svg:viewBox="0 0 27 28" draw:points="0,0 27,0 27,28 0,28">
          <text:p/>
        </draw:polygon>
        <draw:polygon draw:style-name="gr269" draw:text-style-name="P267" draw:layer="layout" svg:width="0.026cm" svg:height="0.027cm" svg:x="7.924cm" svg:y="13.065cm" svg:viewBox="0 0 27 28" draw:points="0,0 27,0 27,28 0,28">
          <text:p/>
        </draw:polygon>
        <draw:polygon draw:style-name="gr269" draw:text-style-name="P267" draw:layer="layout" svg:width="0.026cm" svg:height="0.027cm" svg:x="7.977cm" svg:y="13.065cm" svg:viewBox="0 0 27 28" draw:points="0,0 27,0 27,28 0,28">
          <text:p/>
        </draw:polygon>
        <draw:polygon draw:style-name="gr269" draw:text-style-name="P267" draw:layer="layout" svg:width="0.026cm" svg:height="0.027cm" svg:x="8.03cm" svg:y="13.065cm" svg:viewBox="0 0 27 28" draw:points="0,0 27,0 27,28 0,28">
          <text:p/>
        </draw:polygon>
        <draw:polygon draw:style-name="gr269" draw:text-style-name="P267" draw:layer="layout" svg:width="0.026cm" svg:height="0.027cm" svg:x="8.083cm" svg:y="13.065cm" svg:viewBox="0 0 27 28" draw:points="0,0 27,0 27,28 0,28">
          <text:p/>
        </draw:polygon>
        <draw:polygon draw:style-name="gr269" draw:text-style-name="P267" draw:layer="layout" svg:width="0.026cm" svg:height="0.027cm" svg:x="8.136cm" svg:y="13.065cm" svg:viewBox="0 0 27 28" draw:points="0,0 27,0 27,28 0,28">
          <text:p/>
        </draw:polygon>
        <draw:polygon draw:style-name="gr269" draw:text-style-name="P267" draw:layer="layout" svg:width="0.026cm" svg:height="0.027cm" svg:x="8.189cm" svg:y="13.065cm" svg:viewBox="0 0 27 28" draw:points="0,0 27,0 27,28 0,28">
          <text:p/>
        </draw:polygon>
        <draw:polygon draw:style-name="gr269" draw:text-style-name="P267" draw:layer="layout" svg:width="0.026cm" svg:height="0.027cm" svg:x="8.242cm" svg:y="13.065cm" svg:viewBox="0 0 27 28" draw:points="0,0 27,0 27,28 0,28">
          <text:p/>
        </draw:polygon>
        <draw:polygon draw:style-name="gr269" draw:text-style-name="P267" draw:layer="layout" svg:width="0.026cm" svg:height="0.027cm" svg:x="8.295cm" svg:y="13.065cm" svg:viewBox="0 0 27 28" draw:points="0,0 27,0 27,28 0,28">
          <text:p/>
        </draw:polygon>
        <draw:polygon draw:style-name="gr269" draw:text-style-name="P267" draw:layer="layout" svg:width="0.026cm" svg:height="0.027cm" svg:x="8.348cm" svg:y="13.065cm" svg:viewBox="0 0 27 28" draw:points="0,0 27,0 27,28 0,28">
          <text:p/>
        </draw:polygon>
        <draw:polygon draw:style-name="gr269" draw:text-style-name="P267" draw:layer="layout" svg:width="0.026cm" svg:height="0.027cm" svg:x="8.401cm" svg:y="13.065cm" svg:viewBox="0 0 27 28" draw:points="0,0 27,0 27,28 0,28">
          <text:p/>
        </draw:polygon>
        <draw:polygon draw:style-name="gr269" draw:text-style-name="P267" draw:layer="layout" svg:width="0.026cm" svg:height="0.027cm" svg:x="8.454cm" svg:y="13.065cm" svg:viewBox="0 0 27 28" draw:points="0,0 27,0 27,28 0,28">
          <text:p/>
        </draw:polygon>
        <draw:polygon draw:style-name="gr269" draw:text-style-name="P267" draw:layer="layout" svg:width="0.026cm" svg:height="0.027cm" svg:x="8.507cm" svg:y="13.065cm" svg:viewBox="0 0 27 28" draw:points="0,0 27,0 27,28 0,28">
          <text:p/>
        </draw:polygon>
        <draw:polygon draw:style-name="gr269" draw:text-style-name="P267" draw:layer="layout" svg:width="0.026cm" svg:height="0.027cm" svg:x="8.56cm" svg:y="13.065cm" svg:viewBox="0 0 27 28" draw:points="0,0 27,0 27,28 0,28">
          <text:p/>
        </draw:polygon>
        <draw:polygon draw:style-name="gr269" draw:text-style-name="P267" draw:layer="layout" svg:width="0.026cm" svg:height="0.027cm" svg:x="8.613cm" svg:y="13.065cm" svg:viewBox="0 0 27 28" draw:points="0,0 27,0 27,28 0,28">
          <text:p/>
        </draw:polygon>
        <draw:polygon draw:style-name="gr269" draw:text-style-name="P267" draw:layer="layout" svg:width="0.026cm" svg:height="0.027cm" svg:x="8.666cm" svg:y="13.065cm" svg:viewBox="0 0 27 28" draw:points="0,0 27,0 27,28 0,28">
          <text:p/>
        </draw:polygon>
        <draw:polygon draw:style-name="gr269" draw:text-style-name="P267" draw:layer="layout" svg:width="0.026cm" svg:height="0.027cm" svg:x="8.719cm" svg:y="13.065cm" svg:viewBox="0 0 27 28" draw:points="0,0 27,0 27,28 0,28">
          <text:p/>
        </draw:polygon>
        <draw:polygon draw:style-name="gr269" draw:text-style-name="P267" draw:layer="layout" svg:width="0.026cm" svg:height="0.027cm" svg:x="8.772cm" svg:y="13.065cm" svg:viewBox="0 0 27 28" draw:points="0,0 27,0 27,28 0,28">
          <text:p/>
        </draw:polygon>
        <draw:polygon draw:style-name="gr269" draw:text-style-name="P267" draw:layer="layout" svg:width="0.026cm" svg:height="0.027cm" svg:x="8.825cm" svg:y="13.065cm" svg:viewBox="0 0 27 28" draw:points="0,0 27,0 27,28 0,28">
          <text:p/>
        </draw:polygon>
        <draw:polygon draw:style-name="gr269" draw:text-style-name="P267" draw:layer="layout" svg:width="0.026cm" svg:height="0.027cm" svg:x="8.878cm" svg:y="13.065cm" svg:viewBox="0 0 27 28" draw:points="0,0 27,0 27,28 0,28">
          <text:p/>
        </draw:polygon>
        <draw:polygon draw:style-name="gr269" draw:text-style-name="P267" draw:layer="layout" svg:width="0.026cm" svg:height="0.027cm" svg:x="8.931cm" svg:y="13.065cm" svg:viewBox="0 0 27 28" draw:points="0,0 27,0 27,28 0,28">
          <text:p/>
        </draw:polygon>
        <draw:polygon draw:style-name="gr269" draw:text-style-name="P267" draw:layer="layout" svg:width="0.026cm" svg:height="0.027cm" svg:x="8.984cm" svg:y="13.065cm" svg:viewBox="0 0 27 28" draw:points="0,0 27,0 27,28 0,28">
          <text:p/>
        </draw:polygon>
        <draw:polygon draw:style-name="gr269" draw:text-style-name="P267" draw:layer="layout" svg:width="0.026cm" svg:height="0.027cm" svg:x="9.037cm" svg:y="13.065cm" svg:viewBox="0 0 27 28" draw:points="0,0 27,0 27,28 0,28">
          <text:p/>
        </draw:polygon>
        <draw:polygon draw:style-name="gr269" draw:text-style-name="P267" draw:layer="layout" svg:width="0.026cm" svg:height="0.027cm" svg:x="9.09cm" svg:y="13.065cm" svg:viewBox="0 0 27 28" draw:points="0,0 27,0 27,28 0,28">
          <text:p/>
        </draw:polygon>
        <draw:polygon draw:style-name="gr269" draw:text-style-name="P267" draw:layer="layout" svg:width="0.026cm" svg:height="0.027cm" svg:x="9.143cm" svg:y="13.065cm" svg:viewBox="0 0 27 28" draw:points="0,0 27,0 27,28 0,28">
          <text:p/>
        </draw:polygon>
        <draw:polygon draw:style-name="gr269" draw:text-style-name="P267" draw:layer="layout" svg:width="0.026cm" svg:height="0.027cm" svg:x="9.196cm" svg:y="13.065cm" svg:viewBox="0 0 27 28" draw:points="0,0 27,0 27,28 0,28">
          <text:p/>
        </draw:polygon>
        <draw:polygon draw:style-name="gr269" draw:text-style-name="P267" draw:layer="layout" svg:width="0.026cm" svg:height="0.027cm" svg:x="9.249cm" svg:y="13.065cm" svg:viewBox="0 0 27 28" draw:points="0,0 27,0 27,28 0,28">
          <text:p/>
        </draw:polygon>
        <draw:polygon draw:style-name="gr269" draw:text-style-name="P267" draw:layer="layout" svg:width="0.026cm" svg:height="0.027cm" svg:x="9.302cm" svg:y="13.065cm" svg:viewBox="0 0 27 28" draw:points="0,0 27,0 27,28 0,28">
          <text:p/>
        </draw:polygon>
        <draw:polygon draw:style-name="gr269" draw:text-style-name="P267" draw:layer="layout" svg:width="0.026cm" svg:height="0.027cm" svg:x="9.355cm" svg:y="13.065cm" svg:viewBox="0 0 27 28" draw:points="0,0 27,0 27,28 0,28">
          <text:p/>
        </draw:polygon>
        <draw:polygon draw:style-name="gr269" draw:text-style-name="P267" draw:layer="layout" svg:width="0.026cm" svg:height="0.027cm" svg:x="9.408cm" svg:y="13.065cm" svg:viewBox="0 0 27 28" draw:points="0,0 27,0 27,28 0,28">
          <text:p/>
        </draw:polygon>
        <draw:polygon draw:style-name="gr269" draw:text-style-name="P267" draw:layer="layout" svg:width="0.026cm" svg:height="0.027cm" svg:x="9.461cm" svg:y="13.065cm" svg:viewBox="0 0 27 28" draw:points="0,0 27,0 27,28 0,28">
          <text:p/>
        </draw:polygon>
        <draw:polygon draw:style-name="gr269" draw:text-style-name="P267" draw:layer="layout" svg:width="0.026cm" svg:height="0.027cm" svg:x="9.514cm" svg:y="13.065cm" svg:viewBox="0 0 27 28" draw:points="0,0 27,0 27,28 0,28">
          <text:p/>
        </draw:polygon>
        <draw:polygon draw:style-name="gr269" draw:text-style-name="P267" draw:layer="layout" svg:width="0.026cm" svg:height="0.027cm" svg:x="9.567cm" svg:y="13.065cm" svg:viewBox="0 0 27 28" draw:points="0,0 27,0 27,28 0,28">
          <text:p/>
        </draw:polygon>
        <draw:polygon draw:style-name="gr269" draw:text-style-name="P267" draw:layer="layout" svg:width="0.026cm" svg:height="0.027cm" svg:x="9.62cm" svg:y="13.065cm" svg:viewBox="0 0 27 28" draw:points="0,0 27,0 27,28 0,28">
          <text:p/>
        </draw:polygon>
        <draw:polygon draw:style-name="gr269" draw:text-style-name="P267" draw:layer="layout" svg:width="0.026cm" svg:height="0.027cm" svg:x="9.673cm" svg:y="13.065cm" svg:viewBox="0 0 27 28" draw:points="0,0 27,0 27,28 0,28">
          <text:p/>
        </draw:polygon>
        <draw:polygon draw:style-name="gr269" draw:text-style-name="P267" draw:layer="layout" svg:width="0.026cm" svg:height="0.027cm" svg:x="9.726cm" svg:y="13.065cm" svg:viewBox="0 0 27 28" draw:points="0,0 27,0 27,28 0,28">
          <text:p/>
        </draw:polygon>
        <draw:polygon draw:style-name="gr269" draw:text-style-name="P267" draw:layer="layout" svg:width="0.026cm" svg:height="0.027cm" svg:x="9.779cm" svg:y="13.065cm" svg:viewBox="0 0 27 28" draw:points="0,0 27,0 27,28 0,28">
          <text:p/>
        </draw:polygon>
        <draw:polygon draw:style-name="gr269" draw:text-style-name="P267" draw:layer="layout" svg:width="0.026cm" svg:height="0.027cm" svg:x="9.832cm" svg:y="13.065cm" svg:viewBox="0 0 27 28" draw:points="0,0 27,0 27,28 0,28">
          <text:p/>
        </draw:polygon>
        <draw:polygon draw:style-name="gr269" draw:text-style-name="P267" draw:layer="layout" svg:width="0.026cm" svg:height="0.027cm" svg:x="9.885cm" svg:y="13.065cm" svg:viewBox="0 0 27 28" draw:points="0,0 27,0 27,28 0,28">
          <text:p/>
        </draw:polygon>
        <draw:polygon draw:style-name="gr269" draw:text-style-name="P267" draw:layer="layout" svg:width="0.026cm" svg:height="0.027cm" svg:x="9.938cm" svg:y="13.065cm" svg:viewBox="0 0 27 28" draw:points="0,0 27,0 27,28 0,28">
          <text:p/>
        </draw:polygon>
        <draw:polygon draw:style-name="gr269" draw:text-style-name="P267" draw:layer="layout" svg:width="0.026cm" svg:height="0.027cm" svg:x="9.991cm" svg:y="13.065cm" svg:viewBox="0 0 27 28" draw:points="0,0 27,0 27,28 0,28">
          <text:p/>
        </draw:polygon>
        <draw:polygon draw:style-name="gr269" draw:text-style-name="P267" draw:layer="layout" svg:width="0.026cm" svg:height="0.027cm" svg:x="10.044cm" svg:y="13.065cm" svg:viewBox="0 0 27 28" draw:points="0,0 27,0 27,28 0,28">
          <text:p/>
        </draw:polygon>
        <draw:polygon draw:style-name="gr269" draw:text-style-name="P267" draw:layer="layout" svg:width="0.026cm" svg:height="0.027cm" svg:x="10.097cm" svg:y="13.065cm" svg:viewBox="0 0 27 28" draw:points="0,0 27,0 27,28 0,28">
          <text:p/>
        </draw:polygon>
        <draw:polygon draw:style-name="gr269" draw:text-style-name="P267" draw:layer="layout" svg:width="0.026cm" svg:height="0.027cm" svg:x="10.15cm" svg:y="13.065cm" svg:viewBox="0 0 27 28" draw:points="0,0 27,0 27,28 0,28">
          <text:p/>
        </draw:polygon>
        <draw:polygon draw:style-name="gr269" draw:text-style-name="P267" draw:layer="layout" svg:width="0.026cm" svg:height="0.027cm" svg:x="10.203cm" svg:y="13.065cm" svg:viewBox="0 0 27 28" draw:points="0,0 27,0 27,28 0,28">
          <text:p/>
        </draw:polygon>
        <draw:polygon draw:style-name="gr269" draw:text-style-name="P267" draw:layer="layout" svg:width="0.026cm" svg:height="0.027cm" svg:x="10.256cm" svg:y="13.065cm" svg:viewBox="0 0 27 28" draw:points="0,0 27,0 27,28 0,28">
          <text:p/>
        </draw:polygon>
        <draw:polygon draw:style-name="gr269" draw:text-style-name="P267" draw:layer="layout" svg:width="0.026cm" svg:height="0.027cm" svg:x="10.309cm" svg:y="13.065cm" svg:viewBox="0 0 27 28" draw:points="0,0 27,0 27,28 0,28">
          <text:p/>
        </draw:polygon>
        <draw:polygon draw:style-name="gr269" draw:text-style-name="P267" draw:layer="layout" svg:width="0.026cm" svg:height="0.027cm" svg:x="10.362cm" svg:y="13.065cm" svg:viewBox="0 0 27 28" draw:points="0,0 27,0 27,28 0,28">
          <text:p/>
        </draw:polygon>
        <draw:polygon draw:style-name="gr269" draw:text-style-name="P267" draw:layer="layout" svg:width="0.026cm" svg:height="0.027cm" svg:x="10.415cm" svg:y="13.065cm" svg:viewBox="0 0 27 28" draw:points="0,0 27,0 27,28 0,28">
          <text:p/>
        </draw:polygon>
        <draw:polygon draw:style-name="gr269" draw:text-style-name="P267" draw:layer="layout" svg:width="0.026cm" svg:height="0.027cm" svg:x="10.468cm" svg:y="13.065cm" svg:viewBox="0 0 27 28" draw:points="0,0 27,0 27,28 0,28">
          <text:p/>
        </draw:polygon>
        <draw:polygon draw:style-name="gr269" draw:text-style-name="P267" draw:layer="layout" svg:width="0.026cm" svg:height="0.027cm" svg:x="10.521cm" svg:y="13.065cm" svg:viewBox="0 0 27 28" draw:points="0,0 27,0 27,28 0,28">
          <text:p/>
        </draw:polygon>
        <draw:polygon draw:style-name="gr269" draw:text-style-name="P267" draw:layer="layout" svg:width="0.026cm" svg:height="0.027cm" svg:x="10.574cm" svg:y="13.065cm" svg:viewBox="0 0 27 28" draw:points="0,0 27,0 27,28 0,28">
          <text:p/>
        </draw:polygon>
        <draw:polygon draw:style-name="gr269" draw:text-style-name="P267" draw:layer="layout" svg:width="0.026cm" svg:height="0.027cm" svg:x="10.627cm" svg:y="13.065cm" svg:viewBox="0 0 27 28" draw:points="0,0 27,0 27,28 0,28">
          <text:p/>
        </draw:polygon>
        <draw:polygon draw:style-name="gr269" draw:text-style-name="P267" draw:layer="layout" svg:width="0.026cm" svg:height="0.027cm" svg:x="10.68cm" svg:y="13.065cm" svg:viewBox="0 0 27 28" draw:points="0,0 27,0 27,28 0,28">
          <text:p/>
        </draw:polygon>
        <draw:polygon draw:style-name="gr269" draw:text-style-name="P267" draw:layer="layout" svg:width="0.026cm" svg:height="0.027cm" svg:x="10.733cm" svg:y="13.065cm" svg:viewBox="0 0 27 28" draw:points="0,0 27,0 27,28 0,28">
          <text:p/>
        </draw:polygon>
        <draw:polygon draw:style-name="gr269" draw:text-style-name="P267" draw:layer="layout" svg:width="0.026cm" svg:height="0.027cm" svg:x="10.786cm" svg:y="13.065cm" svg:viewBox="0 0 27 28" draw:points="0,0 27,0 27,28 0,28">
          <text:p/>
        </draw:polygon>
        <draw:polygon draw:style-name="gr269" draw:text-style-name="P267" draw:layer="layout" svg:width="0.026cm" svg:height="0.027cm" svg:x="10.839cm" svg:y="13.065cm" svg:viewBox="0 0 27 28" draw:points="0,0 27,0 27,28 0,28">
          <text:p/>
        </draw:polygon>
        <draw:polygon draw:style-name="gr269" draw:text-style-name="P267" draw:layer="layout" svg:width="0.026cm" svg:height="0.027cm" svg:x="10.892cm" svg:y="13.065cm" svg:viewBox="0 0 27 28" draw:points="0,0 27,0 27,28 0,28">
          <text:p/>
        </draw:polygon>
        <draw:polygon draw:style-name="gr269" draw:text-style-name="P267" draw:layer="layout" svg:width="0.026cm" svg:height="0.027cm" svg:x="10.945cm" svg:y="13.065cm" svg:viewBox="0 0 27 28" draw:points="0,0 27,0 27,28 0,28">
          <text:p/>
        </draw:polygon>
        <draw:polygon draw:style-name="gr269" draw:text-style-name="P267" draw:layer="layout" svg:width="0.026cm" svg:height="0.027cm" svg:x="10.998cm" svg:y="13.065cm" svg:viewBox="0 0 27 28" draw:points="0,0 27,0 27,28 0,28">
          <text:p/>
        </draw:polygon>
        <draw:polygon draw:style-name="gr269" draw:text-style-name="P267" draw:layer="layout" svg:width="0.026cm" svg:height="0.027cm" svg:x="11.051cm" svg:y="13.065cm" svg:viewBox="0 0 27 28" draw:points="0,0 27,0 27,28 0,28">
          <text:p/>
        </draw:polygon>
        <draw:polygon draw:style-name="gr269" draw:text-style-name="P267" draw:layer="layout" svg:width="0.026cm" svg:height="0.027cm" svg:x="11.104cm" svg:y="13.065cm" svg:viewBox="0 0 27 28" draw:points="0,0 27,0 27,28 0,28">
          <text:p/>
        </draw:polygon>
        <draw:polygon draw:style-name="gr269" draw:text-style-name="P267" draw:layer="layout" svg:width="0.026cm" svg:height="0.027cm" svg:x="11.157cm" svg:y="13.065cm" svg:viewBox="0 0 27 28" draw:points="0,0 27,0 27,28 0,28">
          <text:p/>
        </draw:polygon>
        <draw:polygon draw:style-name="gr269" draw:text-style-name="P267" draw:layer="layout" svg:width="0.026cm" svg:height="0.027cm" svg:x="11.21cm" svg:y="13.065cm" svg:viewBox="0 0 27 28" draw:points="0,0 27,0 27,28 0,28">
          <text:p/>
        </draw:polygon>
        <draw:polygon draw:style-name="gr269" draw:text-style-name="P267" draw:layer="layout" svg:width="0.026cm" svg:height="0.027cm" svg:x="11.263cm" svg:y="13.065cm" svg:viewBox="0 0 27 28" draw:points="0,0 27,0 27,28 0,28">
          <text:p/>
        </draw:polygon>
        <draw:polygon draw:style-name="gr269" draw:text-style-name="P267" draw:layer="layout" svg:width="0.026cm" svg:height="0.027cm" svg:x="11.316cm" svg:y="13.065cm" svg:viewBox="0 0 27 28" draw:points="0,0 27,0 27,28 0,28">
          <text:p/>
        </draw:polygon>
        <draw:polygon draw:style-name="gr269" draw:text-style-name="P267" draw:layer="layout" svg:width="0.026cm" svg:height="0.027cm" svg:x="11.369cm" svg:y="13.065cm" svg:viewBox="0 0 27 28" draw:points="0,0 27,0 27,28 0,28">
          <text:p/>
        </draw:polygon>
        <draw:polygon draw:style-name="gr269" draw:text-style-name="P267" draw:layer="layout" svg:width="0.026cm" svg:height="0.027cm" svg:x="11.422cm" svg:y="13.065cm" svg:viewBox="0 0 27 28" draw:points="0,0 27,0 27,28 0,28">
          <text:p/>
        </draw:polygon>
        <draw:polygon draw:style-name="gr269" draw:text-style-name="P267" draw:layer="layout" svg:width="0.026cm" svg:height="0.027cm" svg:x="11.475cm" svg:y="13.065cm" svg:viewBox="0 0 27 28" draw:points="0,0 27,0 27,28 0,28">
          <text:p/>
        </draw:polygon>
        <draw:polygon draw:style-name="gr269" draw:text-style-name="P267" draw:layer="layout" svg:width="0.026cm" svg:height="0.027cm" svg:x="11.528cm" svg:y="13.065cm" svg:viewBox="0 0 27 28" draw:points="0,0 27,0 27,28 0,28">
          <text:p/>
        </draw:polygon>
        <draw:polygon draw:style-name="gr269" draw:text-style-name="P267" draw:layer="layout" svg:width="0.026cm" svg:height="0.027cm" svg:x="11.581cm" svg:y="13.065cm" svg:viewBox="0 0 27 28" draw:points="0,0 27,0 27,28 0,28">
          <text:p/>
        </draw:polygon>
        <draw:polygon draw:style-name="gr269" draw:text-style-name="P267" draw:layer="layout" svg:width="0.026cm" svg:height="0.027cm" svg:x="11.634cm" svg:y="13.065cm" svg:viewBox="0 0 27 28" draw:points="0,0 27,0 27,28 0,28">
          <text:p/>
        </draw:polygon>
        <draw:polygon draw:style-name="gr269" draw:text-style-name="P267" draw:layer="layout" svg:width="0.026cm" svg:height="0.027cm" svg:x="11.687cm" svg:y="13.065cm" svg:viewBox="0 0 27 28" draw:points="0,0 27,0 27,28 0,28">
          <text:p/>
        </draw:polygon>
        <draw:polygon draw:style-name="gr269" draw:text-style-name="P267" draw:layer="layout" svg:width="0.026cm" svg:height="0.027cm" svg:x="11.74cm" svg:y="13.065cm" svg:viewBox="0 0 27 28" draw:points="0,0 27,0 27,28 0,28">
          <text:p/>
        </draw:polygon>
        <draw:polygon draw:style-name="gr269" draw:text-style-name="P267" draw:layer="layout" svg:width="0.026cm" svg:height="0.027cm" svg:x="11.793cm" svg:y="13.065cm" svg:viewBox="0 0 27 28" draw:points="0,0 27,0 27,28 0,28">
          <text:p/>
        </draw:polygon>
        <draw:polygon draw:style-name="gr269" draw:text-style-name="P267" draw:layer="layout" svg:width="0.026cm" svg:height="0.027cm" svg:x="11.846cm" svg:y="13.065cm" svg:viewBox="0 0 27 28" draw:points="0,0 27,0 27,28 0,28">
          <text:p/>
        </draw:polygon>
        <draw:polygon draw:style-name="gr269" draw:text-style-name="P267" draw:layer="layout" svg:width="0.026cm" svg:height="0.027cm" svg:x="11.899cm" svg:y="13.065cm" svg:viewBox="0 0 27 28" draw:points="0,0 27,0 27,28 0,28">
          <text:p/>
        </draw:polygon>
        <draw:polygon draw:style-name="gr269" draw:text-style-name="P267" draw:layer="layout" svg:width="0.026cm" svg:height="0.027cm" svg:x="11.952cm" svg:y="13.065cm" svg:viewBox="0 0 27 28" draw:points="0,0 27,0 27,28 0,28">
          <text:p/>
        </draw:polygon>
        <draw:polygon draw:style-name="gr269" draw:text-style-name="P267" draw:layer="layout" svg:width="0.026cm" svg:height="0.027cm" svg:x="12.005cm" svg:y="13.065cm" svg:viewBox="0 0 27 28" draw:points="0,0 27,0 27,28 0,28">
          <text:p/>
        </draw:polygon>
        <draw:polygon draw:style-name="gr269" draw:text-style-name="P267" draw:layer="layout" svg:width="0.026cm" svg:height="0.027cm" svg:x="12.058cm" svg:y="13.065cm" svg:viewBox="0 0 27 28" draw:points="0,0 27,0 27,28 0,28">
          <text:p/>
        </draw:polygon>
        <draw:polygon draw:style-name="gr269" draw:text-style-name="P267" draw:layer="layout" svg:width="0.026cm" svg:height="0.027cm" svg:x="12.111cm" svg:y="13.065cm" svg:viewBox="0 0 27 28" draw:points="0,0 27,0 27,28 0,28">
          <text:p/>
        </draw:polygon>
        <draw:polygon draw:style-name="gr269" draw:text-style-name="P267" draw:layer="layout" svg:width="0.026cm" svg:height="0.027cm" svg:x="12.164cm" svg:y="13.065cm" svg:viewBox="0 0 27 28" draw:points="0,0 27,0 27,28 0,28">
          <text:p/>
        </draw:polygon>
        <draw:polygon draw:style-name="gr269" draw:text-style-name="P267" draw:layer="layout" svg:width="0.026cm" svg:height="0.027cm" svg:x="12.217cm" svg:y="13.065cm" svg:viewBox="0 0 27 28" draw:points="0,0 27,0 27,28 0,28">
          <text:p/>
        </draw:polygon>
        <draw:polygon draw:style-name="gr269" draw:text-style-name="P267" draw:layer="layout" svg:width="0.026cm" svg:height="0.027cm" svg:x="12.27cm" svg:y="13.065cm" svg:viewBox="0 0 27 28" draw:points="0,0 27,0 27,28 0,28">
          <text:p/>
        </draw:polygon>
        <draw:polygon draw:style-name="gr269" draw:text-style-name="P267" draw:layer="layout" svg:width="0.026cm" svg:height="0.027cm" svg:x="12.323cm" svg:y="13.065cm" svg:viewBox="0 0 27 28" draw:points="0,0 27,0 27,28 0,28">
          <text:p/>
        </draw:polygon>
        <draw:polygon draw:style-name="gr269" draw:text-style-name="P267" draw:layer="layout" svg:width="0.026cm" svg:height="0.027cm" svg:x="12.376cm" svg:y="13.065cm" svg:viewBox="0 0 27 28" draw:points="0,0 27,0 27,28 0,28">
          <text:p/>
        </draw:polygon>
        <draw:polygon draw:style-name="gr269" draw:text-style-name="P267" draw:layer="layout" svg:width="0.026cm" svg:height="0.027cm" svg:x="12.429cm" svg:y="13.065cm" svg:viewBox="0 0 27 28" draw:points="0,0 27,0 27,28 0,28">
          <text:p/>
        </draw:polygon>
        <draw:polygon draw:style-name="gr269" draw:text-style-name="P267" draw:layer="layout" svg:width="0.026cm" svg:height="0.027cm" svg:x="12.482cm" svg:y="13.065cm" svg:viewBox="0 0 27 28" draw:points="0,0 27,0 27,28 0,28">
          <text:p/>
        </draw:polygon>
        <draw:polygon draw:style-name="gr269" draw:text-style-name="P267" draw:layer="layout" svg:width="0.026cm" svg:height="0.027cm" svg:x="12.535cm" svg:y="13.065cm" svg:viewBox="0 0 27 28" draw:points="0,0 27,0 27,28 0,28">
          <text:p/>
        </draw:polygon>
        <draw:polygon draw:style-name="gr269" draw:text-style-name="P267" draw:layer="layout" svg:width="0.026cm" svg:height="0.027cm" svg:x="12.588cm" svg:y="13.065cm" svg:viewBox="0 0 27 28" draw:points="0,0 27,0 27,28 0,28">
          <text:p/>
        </draw:polygon>
        <draw:polygon draw:style-name="gr269" draw:text-style-name="P267" draw:layer="layout" svg:width="0.026cm" svg:height="0.027cm" svg:x="12.641cm" svg:y="13.065cm" svg:viewBox="0 0 27 28" draw:points="0,0 27,0 27,28 0,28">
          <text:p/>
        </draw:polygon>
        <draw:polygon draw:style-name="gr269" draw:text-style-name="P267" draw:layer="layout" svg:width="0.027cm" svg:height="0.027cm" svg:x="12.694cm" svg:y="13.065cm" svg:viewBox="0 0 28 28" draw:points="0,0 28,0 28,28 0,28">
          <text:p/>
        </draw:polygon>
        <draw:polygon draw:style-name="gr269" draw:text-style-name="P267" draw:layer="layout" svg:width="0.027cm" svg:height="0.027cm" svg:x="12.747cm" svg:y="13.065cm" svg:viewBox="0 0 28 28" draw:points="0,0 28,0 28,28 0,28">
          <text:p/>
        </draw:polygon>
        <draw:polygon draw:style-name="gr269" draw:text-style-name="P267" draw:layer="layout" svg:width="0.027cm" svg:height="0.027cm" svg:x="12.8cm" svg:y="13.065cm" svg:viewBox="0 0 28 28" draw:points="0,0 28,0 28,28 0,28">
          <text:p/>
        </draw:polygon>
        <draw:polygon draw:style-name="gr269" draw:text-style-name="P267" draw:layer="layout" svg:width="0.027cm" svg:height="0.027cm" svg:x="12.853cm" svg:y="13.065cm" svg:viewBox="0 0 28 28" draw:points="0,0 28,0 28,28 0,28">
          <text:p/>
        </draw:polygon>
        <draw:polygon draw:style-name="gr269" draw:text-style-name="P267" draw:layer="layout" svg:width="0.027cm" svg:height="0.027cm" svg:x="12.906cm" svg:y="13.065cm" svg:viewBox="0 0 28 28" draw:points="0,0 28,0 28,28 0,28">
          <text:p/>
        </draw:polygon>
        <draw:polygon draw:style-name="gr269" draw:text-style-name="P267" draw:layer="layout" svg:width="0.027cm" svg:height="0.027cm" svg:x="12.959cm" svg:y="13.065cm" svg:viewBox="0 0 28 28" draw:points="0,0 28,0 28,28 0,28">
          <text:p/>
        </draw:polygon>
        <draw:polygon draw:style-name="gr269" draw:text-style-name="P267" draw:layer="layout" svg:width="0.028cm" svg:height="0.027cm" svg:x="13.012cm" svg:y="13.065cm" svg:viewBox="0 0 29 28" draw:points="0,0 29,0 29,28 0,28">
          <text:p/>
        </draw:polygon>
        <draw:polygon draw:style-name="gr269" draw:text-style-name="P267" draw:layer="layout" svg:width="0.027cm" svg:height="0.027cm" svg:x="13.065cm" svg:y="13.065cm" svg:viewBox="0 0 28 28" draw:points="0,0 28,0 28,28 0,28">
          <text:p/>
        </draw:polygon>
        <draw:polygon draw:style-name="gr269" draw:text-style-name="P267" draw:layer="layout" svg:width="0.027cm" svg:height="0.027cm" svg:x="13.118cm" svg:y="13.065cm" svg:viewBox="0 0 28 28" draw:points="0,0 28,0 28,28 0,28">
          <text:p/>
        </draw:polygon>
        <draw:polygon draw:style-name="gr269" draw:text-style-name="P267" draw:layer="layout" svg:width="0.027cm" svg:height="0.027cm" svg:x="13.171cm" svg:y="13.065cm" svg:viewBox="0 0 28 28" draw:points="0,0 28,0 28,28 0,28">
          <text:p/>
        </draw:polygon>
        <draw:polygon draw:style-name="gr269" draw:text-style-name="P267" draw:layer="layout" svg:width="0.027cm" svg:height="0.027cm" svg:x="13.224cm" svg:y="13.065cm" svg:viewBox="0 0 28 28" draw:points="0,0 28,0 28,28 0,28">
          <text:p/>
        </draw:polygon>
        <draw:polygon draw:style-name="gr269" draw:text-style-name="P267" draw:layer="layout" svg:width="0.027cm" svg:height="0.027cm" svg:x="13.277cm" svg:y="13.065cm" svg:viewBox="0 0 28 28" draw:points="0,0 28,0 28,28 0,28">
          <text:p/>
        </draw:polygon>
        <draw:polygon draw:style-name="gr269" draw:text-style-name="P267" draw:layer="layout" svg:width="0.027cm" svg:height="0.027cm" svg:x="13.33cm" svg:y="13.065cm" svg:viewBox="0 0 28 28" draw:points="0,0 28,0 28,28 0,28">
          <text:p/>
        </draw:polygon>
        <draw:polygon draw:style-name="gr269" draw:text-style-name="P267" draw:layer="layout" svg:width="0.027cm" svg:height="0.027cm" svg:x="13.383cm" svg:y="13.065cm" svg:viewBox="0 0 28 28" draw:points="0,0 28,0 28,28 0,28">
          <text:p/>
        </draw:polygon>
        <draw:polygon draw:style-name="gr269" draw:text-style-name="P267" draw:layer="layout" svg:width="0.027cm" svg:height="0.027cm" svg:x="13.436cm" svg:y="13.065cm" svg:viewBox="0 0 28 28" draw:points="0,0 28,0 28,28 0,28">
          <text:p/>
        </draw:polygon>
        <draw:polygon draw:style-name="gr269" draw:text-style-name="P267" draw:layer="layout" svg:width="0.027cm" svg:height="0.027cm" svg:x="13.489cm" svg:y="13.065cm" svg:viewBox="0 0 28 28" draw:points="0,0 28,0 28,28 0,28">
          <text:p/>
        </draw:polygon>
        <draw:polygon draw:style-name="gr269" draw:text-style-name="P267" draw:layer="layout" svg:width="0.027cm" svg:height="0.027cm" svg:x="13.542cm" svg:y="13.065cm" svg:viewBox="0 0 28 28" draw:points="0,0 28,0 28,28 0,28">
          <text:p/>
        </draw:polygon>
        <draw:polygon draw:style-name="gr269" draw:text-style-name="P267" draw:layer="layout" svg:width="0.027cm" svg:height="0.027cm" svg:x="13.595cm" svg:y="13.065cm" svg:viewBox="0 0 28 28" draw:points="0,0 28,0 28,28 0,28">
          <text:p/>
        </draw:polygon>
        <draw:polygon draw:style-name="gr269" draw:text-style-name="P267" draw:layer="layout" svg:width="0.027cm" svg:height="0.027cm" svg:x="13.648cm" svg:y="13.065cm" svg:viewBox="0 0 28 28" draw:points="0,0 28,0 28,28 0,28">
          <text:p/>
        </draw:polygon>
        <draw:polygon draw:style-name="gr269" draw:text-style-name="P267" draw:layer="layout" svg:width="0.027cm" svg:height="0.027cm" svg:x="13.701cm" svg:y="13.065cm" svg:viewBox="0 0 28 28" draw:points="0,0 28,0 28,28 0,28">
          <text:p/>
        </draw:polygon>
        <draw:polygon draw:style-name="gr269" draw:text-style-name="P267" draw:layer="layout" svg:width="0.027cm" svg:height="0.027cm" svg:x="13.754cm" svg:y="13.065cm" svg:viewBox="0 0 28 28" draw:points="0,0 28,0 28,28 0,28">
          <text:p/>
        </draw:polygon>
        <draw:polygon draw:style-name="gr269" draw:text-style-name="P267" draw:layer="layout" svg:width="0.027cm" svg:height="0.027cm" svg:x="13.807cm" svg:y="13.065cm" svg:viewBox="0 0 28 28" draw:points="0,0 28,0 28,28 0,28">
          <text:p/>
        </draw:polygon>
        <draw:polygon draw:style-name="gr269" draw:text-style-name="P267" draw:layer="layout" svg:width="0.027cm" svg:height="0.027cm" svg:x="13.86cm" svg:y="13.065cm" svg:viewBox="0 0 28 28" draw:points="0,0 28,0 28,28 0,28">
          <text:p/>
        </draw:polygon>
        <draw:polygon draw:style-name="gr269" draw:text-style-name="P267" draw:layer="layout" svg:width="0.027cm" svg:height="0.027cm" svg:x="13.913cm" svg:y="13.065cm" svg:viewBox="0 0 28 28" draw:points="0,0 28,0 28,28 0,28">
          <text:p/>
        </draw:polygon>
        <draw:polygon draw:style-name="gr269" draw:text-style-name="P267" draw:layer="layout" svg:width="0.027cm" svg:height="0.027cm" svg:x="13.966cm" svg:y="13.065cm" svg:viewBox="0 0 28 28" draw:points="0,0 28,0 28,28 0,28">
          <text:p/>
        </draw:polygon>
        <draw:polygon draw:style-name="gr269" draw:text-style-name="P267" draw:layer="layout" svg:width="0.027cm" svg:height="0.027cm" svg:x="14.019cm" svg:y="13.065cm" svg:viewBox="0 0 28 28" draw:points="0,0 28,0 28,28 0,28">
          <text:p/>
        </draw:polygon>
        <draw:polygon draw:style-name="gr269" draw:text-style-name="P267" draw:layer="layout" svg:width="0.027cm" svg:height="0.027cm" svg:x="14.072cm" svg:y="13.065cm" svg:viewBox="0 0 28 28" draw:points="0,0 28,0 28,28 0,28">
          <text:p/>
        </draw:polygon>
        <draw:polygon draw:style-name="gr269" draw:text-style-name="P267" draw:layer="layout" svg:width="0.027cm" svg:height="0.027cm" svg:x="14.125cm" svg:y="13.065cm" svg:viewBox="0 0 28 28" draw:points="0,0 28,0 28,28 0,28">
          <text:p/>
        </draw:polygon>
        <draw:polygon draw:style-name="gr269" draw:text-style-name="P267" draw:layer="layout" svg:width="0.027cm" svg:height="0.027cm" svg:x="14.178cm" svg:y="13.065cm" svg:viewBox="0 0 28 28" draw:points="0,0 28,0 28,28 0,28">
          <text:p/>
        </draw:polygon>
        <draw:polygon draw:style-name="gr269" draw:text-style-name="P267" draw:layer="layout" svg:width="0.027cm" svg:height="0.027cm" svg:x="14.231cm" svg:y="13.065cm" svg:viewBox="0 0 28 28" draw:points="0,0 28,0 28,28 0,28">
          <text:p/>
        </draw:polygon>
        <draw:polygon draw:style-name="gr269" draw:text-style-name="P267" draw:layer="layout" svg:width="0.027cm" svg:height="0.027cm" svg:x="14.284cm" svg:y="13.065cm" svg:viewBox="0 0 28 28" draw:points="0,0 28,0 28,28 0,28">
          <text:p/>
        </draw:polygon>
        <draw:polygon draw:style-name="gr269" draw:text-style-name="P267" draw:layer="layout" svg:width="0.027cm" svg:height="0.027cm" svg:x="14.337cm" svg:y="13.065cm" svg:viewBox="0 0 28 28" draw:points="0,0 28,0 28,28 0,28">
          <text:p/>
        </draw:polygon>
        <draw:polygon draw:style-name="gr269" draw:text-style-name="P267" draw:layer="layout" svg:width="0.028cm" svg:height="0.027cm" svg:x="14.39cm" svg:y="13.065cm" svg:viewBox="0 0 29 28" draw:points="0,0 29,0 29,28 0,28">
          <text:p/>
        </draw:polygon>
        <draw:polygon draw:style-name="gr269" draw:text-style-name="P267" draw:layer="layout" svg:width="0.027cm" svg:height="0.027cm" svg:x="14.443cm" svg:y="13.065cm" svg:viewBox="0 0 28 28" draw:points="0,0 28,0 28,28 0,28">
          <text:p/>
        </draw:polygon>
        <draw:polygon draw:style-name="gr269" draw:text-style-name="P267" draw:layer="layout" svg:width="0.027cm" svg:height="0.027cm" svg:x="14.496cm" svg:y="13.065cm" svg:viewBox="0 0 28 28" draw:points="0,0 28,0 28,28 0,28">
          <text:p/>
        </draw:polygon>
        <draw:polygon draw:style-name="gr269" draw:text-style-name="P267" draw:layer="layout" svg:width="0.027cm" svg:height="0.027cm" svg:x="14.549cm" svg:y="13.065cm" svg:viewBox="0 0 28 28" draw:points="0,0 28,0 28,28 0,28">
          <text:p/>
        </draw:polygon>
        <draw:polygon draw:style-name="gr269" draw:text-style-name="P267" draw:layer="layout" svg:width="0.027cm" svg:height="0.027cm" svg:x="14.602cm" svg:y="13.065cm" svg:viewBox="0 0 28 28" draw:points="0,0 28,0 28,28 0,28">
          <text:p/>
        </draw:polygon>
        <draw:polygon draw:style-name="gr269" draw:text-style-name="P267" draw:layer="layout" svg:width="0.027cm" svg:height="0.027cm" svg:x="14.655cm" svg:y="13.065cm" svg:viewBox="0 0 28 28" draw:points="0,0 28,0 28,28 0,28">
          <text:p/>
        </draw:polygon>
        <draw:polygon draw:style-name="gr269" draw:text-style-name="P267" draw:layer="layout" svg:width="0.027cm" svg:height="0.027cm" svg:x="14.708cm" svg:y="13.065cm" svg:viewBox="0 0 28 28" draw:points="0,0 28,0 28,28 0,28">
          <text:p/>
        </draw:polygon>
        <draw:polygon draw:style-name="gr269" draw:text-style-name="P267" draw:layer="layout" svg:width="0.027cm" svg:height="0.027cm" svg:x="14.761cm" svg:y="13.065cm" svg:viewBox="0 0 28 28" draw:points="0,0 28,0 28,28 0,28">
          <text:p/>
        </draw:polygon>
        <draw:polygon draw:style-name="gr269" draw:text-style-name="P267" draw:layer="layout" svg:width="0.027cm" svg:height="0.027cm" svg:x="14.814cm" svg:y="13.065cm" svg:viewBox="0 0 28 28" draw:points="0,0 28,0 28,28 0,28">
          <text:p/>
        </draw:polygon>
        <draw:polygon draw:style-name="gr269" draw:text-style-name="P267" draw:layer="layout" svg:width="0.027cm" svg:height="0.027cm" svg:x="14.867cm" svg:y="13.065cm" svg:viewBox="0 0 28 28" draw:points="0,0 28,0 28,28 0,28">
          <text:p/>
        </draw:polygon>
        <draw:polygon draw:style-name="gr269" draw:text-style-name="P267" draw:layer="layout" svg:width="0.027cm" svg:height="0.027cm" svg:x="14.92cm" svg:y="13.065cm" svg:viewBox="0 0 28 28" draw:points="0,0 28,0 28,28 0,28">
          <text:p/>
        </draw:polygon>
        <draw:polygon draw:style-name="gr269" draw:text-style-name="P267" draw:layer="layout" svg:width="0.027cm" svg:height="0.027cm" svg:x="14.973cm" svg:y="13.065cm" svg:viewBox="0 0 28 28" draw:points="0,0 28,0 28,28 0,28">
          <text:p/>
        </draw:polygon>
        <draw:polygon draw:style-name="gr269" draw:text-style-name="P267" draw:layer="layout" svg:width="0.027cm" svg:height="0.027cm" svg:x="15.026cm" svg:y="13.065cm" svg:viewBox="0 0 28 28" draw:points="0,0 28,0 28,28 0,28">
          <text:p/>
        </draw:polygon>
        <draw:polygon draw:style-name="gr269" draw:text-style-name="P267" draw:layer="layout" svg:width="0.027cm" svg:height="0.027cm" svg:x="15.079cm" svg:y="13.065cm" svg:viewBox="0 0 28 28" draw:points="0,0 28,0 28,28 0,28">
          <text:p/>
        </draw:polygon>
        <draw:polygon draw:style-name="gr269" draw:text-style-name="P267" draw:layer="layout" svg:width="0.027cm" svg:height="0.027cm" svg:x="15.132cm" svg:y="13.065cm" svg:viewBox="0 0 28 28" draw:points="0,0 28,0 28,28 0,28">
          <text:p/>
        </draw:polygon>
        <draw:polygon draw:style-name="gr269" draw:text-style-name="P267" draw:layer="layout" svg:width="0.027cm" svg:height="0.027cm" svg:x="15.185cm" svg:y="13.065cm" svg:viewBox="0 0 28 28" draw:points="0,0 28,0 28,28 0,28">
          <text:p/>
        </draw:polygon>
        <draw:polygon draw:style-name="gr269" draw:text-style-name="P267" draw:layer="layout" svg:width="0.027cm" svg:height="0.027cm" svg:x="15.238cm" svg:y="13.065cm" svg:viewBox="0 0 28 28" draw:points="0,0 28,0 28,28 0,28">
          <text:p/>
        </draw:polygon>
        <draw:polygon draw:style-name="gr269" draw:text-style-name="P267" draw:layer="layout" svg:width="0.027cm" svg:height="0.027cm" svg:x="15.291cm" svg:y="13.065cm" svg:viewBox="0 0 28 28" draw:points="0,0 28,0 28,28 0,28">
          <text:p/>
        </draw:polygon>
        <draw:polygon draw:style-name="gr269" draw:text-style-name="P267" draw:layer="layout" svg:width="0.027cm" svg:height="0.027cm" svg:x="15.344cm" svg:y="13.065cm" svg:viewBox="0 0 28 28" draw:points="0,0 28,0 28,28 0,28">
          <text:p/>
        </draw:polygon>
        <draw:polygon draw:style-name="gr269" draw:text-style-name="P267" draw:layer="layout" svg:width="0.027cm" svg:height="0.027cm" svg:x="15.397cm" svg:y="13.065cm" svg:viewBox="0 0 28 28" draw:points="0,0 28,0 28,28 0,28">
          <text:p/>
        </draw:polygon>
        <draw:polygon draw:style-name="gr269" draw:text-style-name="P267" draw:layer="layout" svg:width="0.027cm" svg:height="0.027cm" svg:x="15.45cm" svg:y="13.065cm" svg:viewBox="0 0 28 28" draw:points="0,0 28,0 28,28 0,28">
          <text:p/>
        </draw:polygon>
        <draw:polygon draw:style-name="gr269" draw:text-style-name="P267" draw:layer="layout" svg:width="0.027cm" svg:height="0.027cm" svg:x="15.503cm" svg:y="13.065cm" svg:viewBox="0 0 28 28" draw:points="0,0 28,0 28,28 0,28">
          <text:p/>
        </draw:polygon>
        <draw:polygon draw:style-name="gr269" draw:text-style-name="P267" draw:layer="layout" svg:width="0.027cm" svg:height="0.027cm" svg:x="15.556cm" svg:y="13.065cm" svg:viewBox="0 0 28 28" draw:points="0,0 28,0 28,28 0,28">
          <text:p/>
        </draw:polygon>
        <draw:polygon draw:style-name="gr269" draw:text-style-name="P267" draw:layer="layout" svg:width="0.027cm" svg:height="0.027cm" svg:x="15.609cm" svg:y="13.065cm" svg:viewBox="0 0 28 28" draw:points="0,0 28,0 28,28 0,28">
          <text:p/>
        </draw:polygon>
        <draw:polygon draw:style-name="gr269" draw:text-style-name="P267" draw:layer="layout" svg:width="0.027cm" svg:height="0.027cm" svg:x="15.662cm" svg:y="13.065cm" svg:viewBox="0 0 28 28" draw:points="0,0 28,0 28,28 0,28">
          <text:p/>
        </draw:polygon>
        <draw:polygon draw:style-name="gr269" draw:text-style-name="P267" draw:layer="layout" svg:width="0.027cm" svg:height="0.027cm" svg:x="15.715cm" svg:y="13.065cm" svg:viewBox="0 0 28 28" draw:points="0,0 28,0 28,28 0,28">
          <text:p/>
        </draw:polygon>
        <draw:polygon draw:style-name="gr269" draw:text-style-name="P267" draw:layer="layout" svg:width="0.028cm" svg:height="0.027cm" svg:x="15.768cm" svg:y="13.065cm" svg:viewBox="0 0 29 28" draw:points="0,0 29,0 29,28 0,28">
          <text:p/>
        </draw:polygon>
        <draw:polygon draw:style-name="gr269" draw:text-style-name="P267" draw:layer="layout" svg:width="0.027cm" svg:height="0.027cm" svg:x="15.821cm" svg:y="13.065cm" svg:viewBox="0 0 28 28" draw:points="0,0 28,0 28,28 0,28">
          <text:p/>
        </draw:polygon>
        <draw:polygon draw:style-name="gr269" draw:text-style-name="P267" draw:layer="layout" svg:width="0.027cm" svg:height="0.027cm" svg:x="15.874cm" svg:y="13.065cm" svg:viewBox="0 0 28 28" draw:points="0,0 28,0 28,28 0,28">
          <text:p/>
        </draw:polygon>
        <draw:polygon draw:style-name="gr269" draw:text-style-name="P267" draw:layer="layout" svg:width="0.027cm" svg:height="0.027cm" svg:x="15.927cm" svg:y="13.065cm" svg:viewBox="0 0 28 28" draw:points="0,0 28,0 28,28 0,28">
          <text:p/>
        </draw:polygon>
        <draw:polygon draw:style-name="gr269" draw:text-style-name="P267" draw:layer="layout" svg:width="0.027cm" svg:height="0.027cm" svg:x="15.98cm" svg:y="13.065cm" svg:viewBox="0 0 28 28" draw:points="0,0 28,0 28,28 0,28">
          <text:p/>
        </draw:polygon>
        <draw:polygon draw:style-name="gr269" draw:text-style-name="P267" draw:layer="layout" svg:width="0.027cm" svg:height="0.027cm" svg:x="16.033cm" svg:y="13.065cm" svg:viewBox="0 0 28 28" draw:points="0,0 28,0 28,28 0,28">
          <text:p/>
        </draw:polygon>
        <draw:polygon draw:style-name="gr269" draw:text-style-name="P267" draw:layer="layout" svg:width="0.027cm" svg:height="0.027cm" svg:x="16.086cm" svg:y="13.065cm" svg:viewBox="0 0 28 28" draw:points="0,0 28,0 28,28 0,28">
          <text:p/>
        </draw:polygon>
        <draw:polygon draw:style-name="gr269" draw:text-style-name="P267" draw:layer="layout" svg:width="0.027cm" svg:height="0.027cm" svg:x="16.139cm" svg:y="13.065cm" svg:viewBox="0 0 28 28" draw:points="0,0 28,0 28,28 0,28">
          <text:p/>
        </draw:polygon>
        <draw:polygon draw:style-name="gr269" draw:text-style-name="P267" draw:layer="layout" svg:width="0.027cm" svg:height="0.027cm" svg:x="16.192cm" svg:y="13.065cm" svg:viewBox="0 0 28 28" draw:points="0,0 28,0 28,28 0,28">
          <text:p/>
        </draw:polygon>
        <draw:polygon draw:style-name="gr269" draw:text-style-name="P267" draw:layer="layout" svg:width="0.027cm" svg:height="0.027cm" svg:x="16.245cm" svg:y="13.065cm" svg:viewBox="0 0 28 28" draw:points="0,0 28,0 28,28 0,28">
          <text:p/>
        </draw:polygon>
        <draw:polygon draw:style-name="gr269" draw:text-style-name="P267" draw:layer="layout" svg:width="0.027cm" svg:height="0.027cm" svg:x="16.298cm" svg:y="13.065cm" svg:viewBox="0 0 28 28" draw:points="0,0 28,0 28,28 0,28">
          <text:p/>
        </draw:polygon>
        <draw:polygon draw:style-name="gr269" draw:text-style-name="P267" draw:layer="layout" svg:width="0.027cm" svg:height="0.027cm" svg:x="16.351cm" svg:y="13.065cm" svg:viewBox="0 0 28 28" draw:points="0,0 28,0 28,28 0,28">
          <text:p/>
        </draw:polygon>
        <draw:polygon draw:style-name="gr269" draw:text-style-name="P267" draw:layer="layout" svg:width="0.027cm" svg:height="0.027cm" svg:x="16.404cm" svg:y="13.065cm" svg:viewBox="0 0 28 28" draw:points="0,0 28,0 28,28 0,28">
          <text:p/>
        </draw:polygon>
        <draw:polygon draw:style-name="gr269" draw:text-style-name="P267" draw:layer="layout" svg:width="0.027cm" svg:height="0.027cm" svg:x="16.457cm" svg:y="13.065cm" svg:viewBox="0 0 28 28" draw:points="0,0 28,0 28,28 0,28">
          <text:p/>
        </draw:polygon>
        <draw:polygon draw:style-name="gr269" draw:text-style-name="P267" draw:layer="layout" svg:width="0.027cm" svg:height="0.027cm" svg:x="16.51cm" svg:y="13.065cm" svg:viewBox="0 0 28 28" draw:points="0,0 28,0 28,28 0,28">
          <text:p/>
        </draw:polygon>
        <draw:polygon draw:style-name="gr269" draw:text-style-name="P267" draw:layer="layout" svg:width="0.027cm" svg:height="0.027cm" svg:x="16.563cm" svg:y="13.065cm" svg:viewBox="0 0 28 28" draw:points="0,0 28,0 28,28 0,28">
          <text:p/>
        </draw:polygon>
        <draw:polygon draw:style-name="gr269" draw:text-style-name="P267" draw:layer="layout" svg:width="0.027cm" svg:height="0.027cm" svg:x="16.616cm" svg:y="13.065cm" svg:viewBox="0 0 28 28" draw:points="0,0 28,0 28,28 0,28">
          <text:p/>
        </draw:polygon>
        <draw:polygon draw:style-name="gr269" draw:text-style-name="P267" draw:layer="layout" svg:width="0.027cm" svg:height="0.027cm" svg:x="16.669cm" svg:y="13.065cm" svg:viewBox="0 0 28 28" draw:points="0,0 28,0 28,28 0,28">
          <text:p/>
        </draw:polygon>
        <draw:polygon draw:style-name="gr269" draw:text-style-name="P267" draw:layer="layout" svg:width="0.027cm" svg:height="0.027cm" svg:x="16.722cm" svg:y="13.065cm" svg:viewBox="0 0 28 28" draw:points="0,0 28,0 28,28 0,28">
          <text:p/>
        </draw:polygon>
        <draw:polygon draw:style-name="gr269" draw:text-style-name="P267" draw:layer="layout" svg:width="0.027cm" svg:height="0.027cm" svg:x="16.775cm" svg:y="13.065cm" svg:viewBox="0 0 28 28" draw:points="0,0 28,0 28,28 0,28">
          <text:p/>
        </draw:polygon>
        <draw:polygon draw:style-name="gr269" draw:text-style-name="P267" draw:layer="layout" svg:width="0.027cm" svg:height="0.027cm" svg:x="16.828cm" svg:y="13.065cm" svg:viewBox="0 0 28 28" draw:points="0,0 28,0 28,28 0,28">
          <text:p/>
        </draw:polygon>
        <draw:polygon draw:style-name="gr269" draw:text-style-name="P267" draw:layer="layout" svg:width="0.027cm" svg:height="0.027cm" svg:x="16.881cm" svg:y="13.065cm" svg:viewBox="0 0 28 28" draw:points="0,0 28,0 28,28 0,28">
          <text:p/>
        </draw:polygon>
        <draw:polygon draw:style-name="gr269" draw:text-style-name="P267" draw:layer="layout" svg:width="0.027cm" svg:height="0.027cm" svg:x="16.934cm" svg:y="13.065cm" svg:viewBox="0 0 28 28" draw:points="0,0 28,0 28,28 0,28">
          <text:p/>
        </draw:polygon>
        <draw:polygon draw:style-name="gr269" draw:text-style-name="P267" draw:layer="layout" svg:width="0.027cm" svg:height="0.027cm" svg:x="16.987cm" svg:y="13.065cm" svg:viewBox="0 0 28 28" draw:points="0,0 28,0 28,28 0,28">
          <text:p/>
        </draw:polygon>
        <draw:polygon draw:style-name="gr269" draw:text-style-name="P267" draw:layer="layout" svg:width="0.027cm" svg:height="0.027cm" svg:x="17.04cm" svg:y="13.065cm" svg:viewBox="0 0 28 28" draw:points="0,0 28,0 28,28 0,28">
          <text:p/>
        </draw:polygon>
        <draw:polygon draw:style-name="gr269" draw:text-style-name="P267" draw:layer="layout" svg:width="0.027cm" svg:height="0.027cm" svg:x="17.093cm" svg:y="13.065cm" svg:viewBox="0 0 28 28" draw:points="0,0 28,0 28,28 0,28">
          <text:p/>
        </draw:polygon>
        <draw:polygon draw:style-name="gr269" draw:text-style-name="P267" draw:layer="layout" svg:width="0.028cm" svg:height="0.027cm" svg:x="17.146cm" svg:y="13.065cm" svg:viewBox="0 0 29 28" draw:points="0,0 29,0 29,28 0,28">
          <text:p/>
        </draw:polygon>
        <draw:polygon draw:style-name="gr269" draw:text-style-name="P267" draw:layer="layout" svg:width="0.027cm" svg:height="0.027cm" svg:x="17.199cm" svg:y="13.065cm" svg:viewBox="0 0 28 28" draw:points="0,0 28,0 28,28 0,28">
          <text:p/>
        </draw:polygon>
        <draw:polygon draw:style-name="gr269" draw:text-style-name="P267" draw:layer="layout" svg:width="0.027cm" svg:height="0.027cm" svg:x="17.252cm" svg:y="13.065cm" svg:viewBox="0 0 28 28" draw:points="0,0 28,0 28,28 0,28">
          <text:p/>
        </draw:polygon>
        <draw:polygon draw:style-name="gr269" draw:text-style-name="P267" draw:layer="layout" svg:width="0.027cm" svg:height="0.027cm" svg:x="17.305cm" svg:y="13.065cm" svg:viewBox="0 0 28 28" draw:points="0,0 28,0 28,28 0,28">
          <text:p/>
        </draw:polygon>
        <draw:polygon draw:style-name="gr269" draw:text-style-name="P267" draw:layer="layout" svg:width="0.027cm" svg:height="0.027cm" svg:x="17.358cm" svg:y="13.065cm" svg:viewBox="0 0 28 28" draw:points="0,0 28,0 28,28 0,28">
          <text:p/>
        </draw:polygon>
        <draw:polygon draw:style-name="gr269" draw:text-style-name="P267" draw:layer="layout" svg:width="0.027cm" svg:height="0.027cm" svg:x="17.411cm" svg:y="13.065cm" svg:viewBox="0 0 28 28" draw:points="0,0 28,0 28,28 0,28">
          <text:p/>
        </draw:polygon>
        <draw:polygon draw:style-name="gr269" draw:text-style-name="P267" draw:layer="layout" svg:width="0.027cm" svg:height="0.027cm" svg:x="17.464cm" svg:y="13.065cm" svg:viewBox="0 0 28 28" draw:points="0,0 28,0 28,28 0,28">
          <text:p/>
        </draw:polygon>
        <draw:polygon draw:style-name="gr269" draw:text-style-name="P267" draw:layer="layout" svg:width="0.027cm" svg:height="0.027cm" svg:x="17.517cm" svg:y="13.065cm" svg:viewBox="0 0 28 28" draw:points="0,0 28,0 28,28 0,28">
          <text:p/>
        </draw:polygon>
        <draw:polygon draw:style-name="gr269" draw:text-style-name="P267" draw:layer="layout" svg:width="0.027cm" svg:height="0.027cm" svg:x="17.57cm" svg:y="13.065cm" svg:viewBox="0 0 28 28" draw:points="0,0 28,0 28,28 0,28">
          <text:p/>
        </draw:polygon>
        <draw:polygon draw:style-name="gr269" draw:text-style-name="P267" draw:layer="layout" svg:width="0.027cm" svg:height="0.027cm" svg:x="17.623cm" svg:y="13.065cm" svg:viewBox="0 0 28 28" draw:points="0,0 28,0 28,28 0,28">
          <text:p/>
        </draw:polygon>
        <draw:polygon draw:style-name="gr269" draw:text-style-name="P267" draw:layer="layout" svg:width="0.027cm" svg:height="0.027cm" svg:x="17.676cm" svg:y="13.065cm" svg:viewBox="0 0 28 28" draw:points="0,0 28,0 28,28 0,28">
          <text:p/>
        </draw:polygon>
        <draw:polygon draw:style-name="gr269" draw:text-style-name="P267" draw:layer="layout" svg:width="0.027cm" svg:height="0.027cm" svg:x="17.729cm" svg:y="13.065cm" svg:viewBox="0 0 28 28" draw:points="0,0 28,0 28,28 0,28">
          <text:p/>
        </draw:polygon>
        <draw:polygon draw:style-name="gr269" draw:text-style-name="P267" draw:layer="layout" svg:width="0.027cm" svg:height="0.027cm" svg:x="17.782cm" svg:y="13.065cm" svg:viewBox="0 0 28 28" draw:points="0,0 28,0 28,28 0,28">
          <text:p/>
        </draw:polygon>
        <draw:polygon draw:style-name="gr269" draw:text-style-name="P267" draw:layer="layout" svg:width="0.027cm" svg:height="0.027cm" svg:x="17.835cm" svg:y="13.065cm" svg:viewBox="0 0 28 28" draw:points="0,0 28,0 28,28 0,28">
          <text:p/>
        </draw:polygon>
        <draw:polygon draw:style-name="gr269" draw:text-style-name="P267" draw:layer="layout" svg:width="0.027cm" svg:height="0.027cm" svg:x="17.888cm" svg:y="13.065cm" svg:viewBox="0 0 28 28" draw:points="0,0 28,0 28,28 0,28">
          <text:p/>
        </draw:polygon>
        <draw:polygon draw:style-name="gr269" draw:text-style-name="P267" draw:layer="layout" svg:width="0.027cm" svg:height="0.027cm" svg:x="17.941cm" svg:y="13.065cm" svg:viewBox="0 0 28 28" draw:points="0,0 28,0 28,28 0,28">
          <text:p/>
        </draw:polygon>
        <draw:polygon draw:style-name="gr269" draw:text-style-name="P267" draw:layer="layout" svg:width="0.027cm" svg:height="0.027cm" svg:x="17.994cm" svg:y="13.065cm" svg:viewBox="0 0 28 28" draw:points="0,0 28,0 28,28 0,28">
          <text:p/>
        </draw:polygon>
        <draw:polygon draw:style-name="gr269" draw:text-style-name="P267" draw:layer="layout" svg:width="0.027cm" svg:height="0.027cm" svg:x="18.047cm" svg:y="13.065cm" svg:viewBox="0 0 28 28" draw:points="0,0 28,0 28,28 0,28">
          <text:p/>
        </draw:polygon>
        <draw:polygon draw:style-name="gr269" draw:text-style-name="P267" draw:layer="layout" svg:width="0.027cm" svg:height="0.027cm" svg:x="18.1cm" svg:y="13.065cm" svg:viewBox="0 0 28 28" draw:points="0,0 28,0 28,28 0,28">
          <text:p/>
        </draw:polygon>
        <draw:polygon draw:style-name="gr269" draw:text-style-name="P267" draw:layer="layout" svg:width="0.027cm" svg:height="0.027cm" svg:x="18.153cm" svg:y="13.065cm" svg:viewBox="0 0 28 28" draw:points="0,0 28,0 28,28 0,28">
          <text:p/>
        </draw:polygon>
        <draw:polygon draw:style-name="gr269" draw:text-style-name="P267" draw:layer="layout" svg:width="0.027cm" svg:height="0.027cm" svg:x="18.206cm" svg:y="13.065cm" svg:viewBox="0 0 28 28" draw:points="0,0 28,0 28,28 0,28">
          <text:p/>
        </draw:polygon>
        <draw:polygon draw:style-name="gr269" draw:text-style-name="P267" draw:layer="layout" svg:width="0.027cm" svg:height="0.027cm" svg:x="18.259cm" svg:y="13.065cm" svg:viewBox="0 0 28 28" draw:points="0,0 28,0 28,28 0,28">
          <text:p/>
        </draw:polygon>
        <draw:polygon draw:style-name="gr269" draw:text-style-name="P267" draw:layer="layout" svg:width="0.027cm" svg:height="0.027cm" svg:x="18.312cm" svg:y="13.065cm" svg:viewBox="0 0 28 28" draw:points="0,0 28,0 28,28 0,28">
          <text:p/>
        </draw:polygon>
        <draw:polygon draw:style-name="gr269" draw:text-style-name="P267" draw:layer="layout" svg:width="0.027cm" svg:height="0.027cm" svg:x="18.365cm" svg:y="13.065cm" svg:viewBox="0 0 28 28" draw:points="0,0 28,0 28,28 0,28">
          <text:p/>
        </draw:polygon>
        <draw:polygon draw:style-name="gr269" draw:text-style-name="P267" draw:layer="layout" svg:width="0.027cm" svg:height="0.027cm" svg:x="18.418cm" svg:y="13.065cm" svg:viewBox="0 0 28 28" draw:points="0,0 28,0 28,28 0,28">
          <text:p/>
        </draw:polygon>
        <draw:polygon draw:style-name="gr269" draw:text-style-name="P267" draw:layer="layout" svg:width="0.027cm" svg:height="0.027cm" svg:x="18.471cm" svg:y="13.065cm" svg:viewBox="0 0 28 28" draw:points="0,0 28,0 28,28 0,28">
          <text:p/>
        </draw:polygon>
        <draw:polygon draw:style-name="gr269" draw:text-style-name="P267" draw:layer="layout" svg:width="0.028cm" svg:height="0.027cm" svg:x="18.524cm" svg:y="13.065cm" svg:viewBox="0 0 29 28" draw:points="0,0 29,0 29,28 0,28">
          <text:p/>
        </draw:polygon>
        <draw:polygon draw:style-name="gr269" draw:text-style-name="P267" draw:layer="layout" svg:width="0.027cm" svg:height="0.027cm" svg:x="18.577cm" svg:y="13.065cm" svg:viewBox="0 0 28 28" draw:points="0,0 28,0 28,28 0,28">
          <text:p/>
        </draw:polygon>
        <draw:polygon draw:style-name="gr269" draw:text-style-name="P267" draw:layer="layout" svg:width="0.027cm" svg:height="0.027cm" svg:x="18.63cm" svg:y="13.065cm" svg:viewBox="0 0 28 28" draw:points="0,0 28,0 28,28 0,28">
          <text:p/>
        </draw:polygon>
        <draw:polygon draw:style-name="gr269" draw:text-style-name="P267" draw:layer="layout" svg:width="0.027cm" svg:height="0.027cm" svg:x="18.683cm" svg:y="13.065cm" svg:viewBox="0 0 28 28" draw:points="0,0 28,0 28,28 0,28">
          <text:p/>
        </draw:polygon>
        <draw:polygon draw:style-name="gr269" draw:text-style-name="P267" draw:layer="layout" svg:width="0.027cm" svg:height="0.027cm" svg:x="18.736cm" svg:y="13.065cm" svg:viewBox="0 0 28 28" draw:points="0,0 28,0 28,28 0,28">
          <text:p/>
        </draw:polygon>
        <draw:polygon draw:style-name="gr269" draw:text-style-name="P267" draw:layer="layout" svg:width="0.027cm" svg:height="0.027cm" svg:x="18.789cm" svg:y="13.065cm" svg:viewBox="0 0 28 28" draw:points="0,0 28,0 28,28 0,28">
          <text:p/>
        </draw:polygon>
        <draw:polygon draw:style-name="gr269" draw:text-style-name="P267" draw:layer="layout" svg:width="0.027cm" svg:height="0.027cm" svg:x="18.842cm" svg:y="13.065cm" svg:viewBox="0 0 28 28" draw:points="0,0 28,0 28,28 0,28">
          <text:p/>
        </draw:polygon>
        <draw:polygon draw:style-name="gr269" draw:text-style-name="P267" draw:layer="layout" svg:width="0.027cm" svg:height="0.027cm" svg:x="18.895cm" svg:y="13.065cm" svg:viewBox="0 0 28 28" draw:points="0,0 28,0 28,28 0,28">
          <text:p/>
        </draw:polygon>
        <draw:polygon draw:style-name="gr269" draw:text-style-name="P267" draw:layer="layout" svg:width="0.027cm" svg:height="0.027cm" svg:x="18.948cm" svg:y="13.065cm" svg:viewBox="0 0 28 28" draw:points="0,0 28,0 28,28 0,28">
          <text:p/>
        </draw:polygon>
        <draw:polygon draw:style-name="gr269" draw:text-style-name="P267" draw:layer="layout" svg:width="0.027cm" svg:height="0.027cm" svg:x="19.001cm" svg:y="13.065cm" svg:viewBox="0 0 28 28" draw:points="0,0 28,0 28,28 0,28">
          <text:p/>
        </draw:polygon>
        <draw:polygon draw:style-name="gr269" draw:text-style-name="P267" draw:layer="layout" svg:width="0.053cm" svg:height="0.026cm" svg:x="2.014cm" svg:y="14.046cm" svg:viewBox="0 0 54 27" draw:points="0,0 54,0 54,27 0,27">
          <text:p/>
        </draw:polygon>
        <draw:polygon draw:style-name="gr269" draw:text-style-name="P267" draw:layer="layout" svg:width="0.027cm" svg:height="0.026cm" svg:x="2.093cm" svg:y="14.046cm" svg:viewBox="0 0 28 27" draw:points="0,0 28,0 28,27 0,27">
          <text:p/>
        </draw:polygon>
        <draw:polygon draw:style-name="gr269" draw:text-style-name="P267" draw:layer="layout" svg:width="0.027cm" svg:height="0.026cm" svg:x="2.146cm" svg:y="14.046cm" svg:viewBox="0 0 28 27" draw:points="0,0 28,0 28,27 0,27">
          <text:p/>
        </draw:polygon>
        <draw:polygon draw:style-name="gr269" draw:text-style-name="P267" draw:layer="layout" svg:width="0.027cm" svg:height="0.026cm" svg:x="2.199cm" svg:y="14.046cm" svg:viewBox="0 0 28 27" draw:points="0,0 28,0 28,27 0,27">
          <text:p/>
        </draw:polygon>
        <draw:polygon draw:style-name="gr269" draw:text-style-name="P267" draw:layer="layout" svg:width="0.027cm" svg:height="0.026cm" svg:x="2.252cm" svg:y="14.046cm" svg:viewBox="0 0 28 27" draw:points="0,0 28,0 28,27 0,27">
          <text:p/>
        </draw:polygon>
        <draw:polygon draw:style-name="gr269" draw:text-style-name="P267" draw:layer="layout" svg:width="0.027cm" svg:height="0.026cm" svg:x="2.305cm" svg:y="14.046cm" svg:viewBox="0 0 28 27" draw:points="0,0 28,0 28,27 0,27">
          <text:p/>
        </draw:polygon>
        <draw:polygon draw:style-name="gr269" draw:text-style-name="P267" draw:layer="layout" svg:width="0.027cm" svg:height="0.026cm" svg:x="2.358cm" svg:y="14.046cm" svg:viewBox="0 0 28 27" draw:points="0,0 28,0 28,27 0,27">
          <text:p/>
        </draw:polygon>
        <draw:polygon draw:style-name="gr269" draw:text-style-name="P267" draw:layer="layout" svg:width="0.027cm" svg:height="0.026cm" svg:x="2.411cm" svg:y="14.046cm" svg:viewBox="0 0 28 27" draw:points="0,0 28,0 28,27 0,27">
          <text:p/>
        </draw:polygon>
        <draw:polygon draw:style-name="gr269" draw:text-style-name="P267" draw:layer="layout" svg:width="0.027cm" svg:height="0.026cm" svg:x="2.464cm" svg:y="14.046cm" svg:viewBox="0 0 28 27" draw:points="0,0 28,0 28,27 0,27">
          <text:p/>
        </draw:polygon>
        <draw:polygon draw:style-name="gr269" draw:text-style-name="P267" draw:layer="layout" svg:width="0.027cm" svg:height="0.026cm" svg:x="2.517cm" svg:y="14.046cm" svg:viewBox="0 0 28 27" draw:points="0,0 28,0 28,27 0,27">
          <text:p/>
        </draw:polygon>
        <draw:polygon draw:style-name="gr269" draw:text-style-name="P267" draw:layer="layout" svg:width="0.027cm" svg:height="0.026cm" svg:x="2.57cm" svg:y="14.046cm" svg:viewBox="0 0 28 27" draw:points="0,0 28,0 28,27 0,27">
          <text:p/>
        </draw:polygon>
        <draw:polygon draw:style-name="gr269" draw:text-style-name="P267" draw:layer="layout" svg:width="0.027cm" svg:height="0.026cm" svg:x="2.623cm" svg:y="14.046cm" svg:viewBox="0 0 28 27" draw:points="0,0 28,0 28,27 0,27">
          <text:p/>
        </draw:polygon>
        <draw:polygon draw:style-name="gr269" draw:text-style-name="P267" draw:layer="layout" svg:width="0.027cm" svg:height="0.026cm" svg:x="2.676cm" svg:y="14.046cm" svg:viewBox="0 0 28 27" draw:points="0,0 28,0 28,27 0,27">
          <text:p/>
        </draw:polygon>
        <draw:polygon draw:style-name="gr269" draw:text-style-name="P267" draw:layer="layout" svg:width="0.027cm" svg:height="0.026cm" svg:x="2.729cm" svg:y="14.046cm" svg:viewBox="0 0 28 27" draw:points="0,0 28,0 28,27 0,27">
          <text:p/>
        </draw:polygon>
        <draw:polygon draw:style-name="gr269" draw:text-style-name="P267" draw:layer="layout" svg:width="0.027cm" svg:height="0.026cm" svg:x="2.782cm" svg:y="14.046cm" svg:viewBox="0 0 28 27" draw:points="0,0 28,0 28,27 0,27">
          <text:p/>
        </draw:polygon>
        <draw:polygon draw:style-name="gr269" draw:text-style-name="P267" draw:layer="layout" svg:width="0.027cm" svg:height="0.026cm" svg:x="2.835cm" svg:y="14.046cm" svg:viewBox="0 0 28 27" draw:points="0,0 28,0 28,27 0,27">
          <text:p/>
        </draw:polygon>
        <draw:polygon draw:style-name="gr269" draw:text-style-name="P267" draw:layer="layout" svg:width="0.027cm" svg:height="0.026cm" svg:x="2.888cm" svg:y="14.046cm" svg:viewBox="0 0 28 27" draw:points="0,0 28,0 28,27 0,27">
          <text:p/>
        </draw:polygon>
        <draw:polygon draw:style-name="gr269" draw:text-style-name="P267" draw:layer="layout" svg:width="0.027cm" svg:height="0.026cm" svg:x="2.941cm" svg:y="14.046cm" svg:viewBox="0 0 28 27" draw:points="0,0 28,0 28,27 0,27">
          <text:p/>
        </draw:polygon>
        <draw:polygon draw:style-name="gr269" draw:text-style-name="P267" draw:layer="layout" svg:width="0.027cm" svg:height="0.026cm" svg:x="2.994cm" svg:y="14.046cm" svg:viewBox="0 0 28 27" draw:points="0,0 28,0 28,27 0,27">
          <text:p/>
        </draw:polygon>
        <draw:polygon draw:style-name="gr269" draw:text-style-name="P267" draw:layer="layout" svg:width="0.027cm" svg:height="0.026cm" svg:x="3.047cm" svg:y="14.046cm" svg:viewBox="0 0 28 27" draw:points="0,0 28,0 28,27 0,27">
          <text:p/>
        </draw:polygon>
        <draw:polygon draw:style-name="gr269" draw:text-style-name="P267" draw:layer="layout" svg:width="0.027cm" svg:height="0.026cm" svg:x="3.1cm" svg:y="14.046cm" svg:viewBox="0 0 28 27" draw:points="0,0 28,0 28,27 0,27">
          <text:p/>
        </draw:polygon>
        <draw:polygon draw:style-name="gr269" draw:text-style-name="P267" draw:layer="layout" svg:width="0.027cm" svg:height="0.026cm" svg:x="3.153cm" svg:y="14.046cm" svg:viewBox="0 0 28 27" draw:points="0,0 28,0 28,27 0,27">
          <text:p/>
        </draw:polygon>
        <draw:polygon draw:style-name="gr269" draw:text-style-name="P267" draw:layer="layout" svg:width="0.027cm" svg:height="0.026cm" svg:x="3.206cm" svg:y="14.046cm" svg:viewBox="0 0 28 27" draw:points="0,0 28,0 28,27 0,27">
          <text:p/>
        </draw:polygon>
        <draw:polygon draw:style-name="gr269" draw:text-style-name="P267" draw:layer="layout" svg:width="0.027cm" svg:height="0.026cm" svg:x="3.259cm" svg:y="14.046cm" svg:viewBox="0 0 28 27" draw:points="0,0 28,0 28,27 0,27">
          <text:p/>
        </draw:polygon>
        <draw:polygon draw:style-name="gr269" draw:text-style-name="P267" draw:layer="layout" svg:width="0.027cm" svg:height="0.026cm" svg:x="3.312cm" svg:y="14.046cm" svg:viewBox="0 0 28 27" draw:points="0,0 28,0 28,27 0,27">
          <text:p/>
        </draw:polygon>
        <draw:polygon draw:style-name="gr269" draw:text-style-name="P267" draw:layer="layout" svg:width="0.027cm" svg:height="0.026cm" svg:x="3.365cm" svg:y="14.046cm" svg:viewBox="0 0 28 27" draw:points="0,0 28,0 28,27 0,27">
          <text:p/>
        </draw:polygon>
        <draw:polygon draw:style-name="gr269" draw:text-style-name="P267" draw:layer="layout" svg:width="0.028cm" svg:height="0.026cm" svg:x="3.418cm" svg:y="14.046cm" svg:viewBox="0 0 29 27" draw:points="0,0 29,0 29,27 0,27">
          <text:p/>
        </draw:polygon>
        <draw:polygon draw:style-name="gr269" draw:text-style-name="P267" draw:layer="layout" svg:width="0.027cm" svg:height="0.026cm" svg:x="3.471cm" svg:y="14.046cm" svg:viewBox="0 0 28 27" draw:points="0,0 28,0 28,27 0,27">
          <text:p/>
        </draw:polygon>
        <draw:polygon draw:style-name="gr269" draw:text-style-name="P267" draw:layer="layout" svg:width="0.027cm" svg:height="0.026cm" svg:x="3.524cm" svg:y="14.046cm" svg:viewBox="0 0 28 27" draw:points="0,0 28,0 28,27 0,27">
          <text:p/>
        </draw:polygon>
        <draw:polygon draw:style-name="gr269" draw:text-style-name="P267" draw:layer="layout" svg:width="0.027cm" svg:height="0.026cm" svg:x="3.577cm" svg:y="14.046cm" svg:viewBox="0 0 28 27" draw:points="0,0 28,0 28,27 0,27">
          <text:p/>
        </draw:polygon>
        <draw:polygon draw:style-name="gr269" draw:text-style-name="P267" draw:layer="layout" svg:width="0.027cm" svg:height="0.026cm" svg:x="3.63cm" svg:y="14.046cm" svg:viewBox="0 0 28 27" draw:points="0,0 28,0 28,27 0,27">
          <text:p/>
        </draw:polygon>
        <draw:polygon draw:style-name="gr269" draw:text-style-name="P267" draw:layer="layout" svg:width="0.027cm" svg:height="0.026cm" svg:x="3.683cm" svg:y="14.046cm" svg:viewBox="0 0 28 27" draw:points="0,0 28,0 28,27 0,27">
          <text:p/>
        </draw:polygon>
        <draw:polygon draw:style-name="gr269" draw:text-style-name="P267" draw:layer="layout" svg:width="0.027cm" svg:height="0.026cm" svg:x="3.736cm" svg:y="14.046cm" svg:viewBox="0 0 28 27" draw:points="0,0 28,0 28,27 0,27">
          <text:p/>
        </draw:polygon>
        <draw:polygon draw:style-name="gr269" draw:text-style-name="P267" draw:layer="layout" svg:width="0.027cm" svg:height="0.026cm" svg:x="3.789cm" svg:y="14.046cm" svg:viewBox="0 0 28 27" draw:points="0,0 28,0 28,27 0,27">
          <text:p/>
        </draw:polygon>
        <draw:polygon draw:style-name="gr269" draw:text-style-name="P267" draw:layer="layout" svg:width="0.027cm" svg:height="0.026cm" svg:x="3.842cm" svg:y="14.046cm" svg:viewBox="0 0 28 27" draw:points="0,0 28,0 28,27 0,27">
          <text:p/>
        </draw:polygon>
        <draw:polygon draw:style-name="gr269" draw:text-style-name="P267" draw:layer="layout" svg:width="0.027cm" svg:height="0.026cm" svg:x="3.895cm" svg:y="14.046cm" svg:viewBox="0 0 28 27" draw:points="0,0 28,0 28,27 0,27">
          <text:p/>
        </draw:polygon>
        <draw:polygon draw:style-name="gr269" draw:text-style-name="P267" draw:layer="layout" svg:width="0.027cm" svg:height="0.026cm" svg:x="3.948cm" svg:y="14.046cm" svg:viewBox="0 0 28 27" draw:points="0,0 28,0 28,27 0,27">
          <text:p/>
        </draw:polygon>
        <draw:polygon draw:style-name="gr269" draw:text-style-name="P267" draw:layer="layout" svg:width="0.027cm" svg:height="0.026cm" svg:x="4.001cm" svg:y="14.046cm" svg:viewBox="0 0 28 27" draw:points="0,0 28,0 28,27 0,27">
          <text:p/>
        </draw:polygon>
        <draw:polygon draw:style-name="gr269" draw:text-style-name="P267" draw:layer="layout" svg:width="0.027cm" svg:height="0.026cm" svg:x="4.054cm" svg:y="14.046cm" svg:viewBox="0 0 28 27" draw:points="0,0 28,0 28,27 0,27">
          <text:p/>
        </draw:polygon>
        <draw:polygon draw:style-name="gr269" draw:text-style-name="P267" draw:layer="layout" svg:width="0.027cm" svg:height="0.026cm" svg:x="4.107cm" svg:y="14.046cm" svg:viewBox="0 0 28 27" draw:points="0,0 28,0 28,27 0,27">
          <text:p/>
        </draw:polygon>
        <draw:polygon draw:style-name="gr269" draw:text-style-name="P267" draw:layer="layout" svg:width="0.027cm" svg:height="0.026cm" svg:x="4.16cm" svg:y="14.046cm" svg:viewBox="0 0 28 27" draw:points="0,0 28,0 28,27 0,27">
          <text:p/>
        </draw:polygon>
        <draw:polygon draw:style-name="gr269" draw:text-style-name="P267" draw:layer="layout" svg:width="0.027cm" svg:height="0.026cm" svg:x="4.213cm" svg:y="14.046cm" svg:viewBox="0 0 28 27" draw:points="0,0 28,0 28,27 0,27">
          <text:p/>
        </draw:polygon>
        <draw:polygon draw:style-name="gr269" draw:text-style-name="P267" draw:layer="layout" svg:width="0.027cm" svg:height="0.026cm" svg:x="4.266cm" svg:y="14.046cm" svg:viewBox="0 0 28 27" draw:points="0,0 28,0 28,27 0,27">
          <text:p/>
        </draw:polygon>
        <draw:polygon draw:style-name="gr269" draw:text-style-name="P267" draw:layer="layout" svg:width="0.027cm" svg:height="0.026cm" svg:x="4.319cm" svg:y="14.046cm" svg:viewBox="0 0 28 27" draw:points="0,0 28,0 28,27 0,27">
          <text:p/>
        </draw:polygon>
        <draw:polygon draw:style-name="gr269" draw:text-style-name="P267" draw:layer="layout" svg:width="0.027cm" svg:height="0.026cm" svg:x="4.372cm" svg:y="14.046cm" svg:viewBox="0 0 28 27" draw:points="0,0 28,0 28,27 0,27">
          <text:p/>
        </draw:polygon>
        <draw:polygon draw:style-name="gr269" draw:text-style-name="P267" draw:layer="layout" svg:width="0.027cm" svg:height="0.026cm" svg:x="4.425cm" svg:y="14.046cm" svg:viewBox="0 0 28 27" draw:points="0,0 28,0 28,27 0,27">
          <text:p/>
        </draw:polygon>
        <draw:polygon draw:style-name="gr269" draw:text-style-name="P267" draw:layer="layout" svg:width="0.027cm" svg:height="0.026cm" svg:x="4.478cm" svg:y="14.046cm" svg:viewBox="0 0 28 27" draw:points="0,0 28,0 28,27 0,27">
          <text:p/>
        </draw:polygon>
        <draw:polygon draw:style-name="gr269" draw:text-style-name="P267" draw:layer="layout" svg:width="0.027cm" svg:height="0.026cm" svg:x="4.531cm" svg:y="14.046cm" svg:viewBox="0 0 28 27" draw:points="0,0 28,0 28,27 0,27">
          <text:p/>
        </draw:polygon>
        <draw:polygon draw:style-name="gr269" draw:text-style-name="P267" draw:layer="layout" svg:width="0.027cm" svg:height="0.026cm" svg:x="4.584cm" svg:y="14.046cm" svg:viewBox="0 0 28 27" draw:points="0,0 28,0 28,27 0,27">
          <text:p/>
        </draw:polygon>
        <draw:polygon draw:style-name="gr269" draw:text-style-name="P267" draw:layer="layout" svg:width="0.027cm" svg:height="0.026cm" svg:x="4.637cm" svg:y="14.046cm" svg:viewBox="0 0 28 27" draw:points="0,0 28,0 28,27 0,27">
          <text:p/>
        </draw:polygon>
        <draw:polygon draw:style-name="gr269" draw:text-style-name="P267" draw:layer="layout" svg:width="0.027cm" svg:height="0.026cm" svg:x="4.69cm" svg:y="14.046cm" svg:viewBox="0 0 28 27" draw:points="0,0 28,0 28,27 0,27">
          <text:p/>
        </draw:polygon>
        <draw:polygon draw:style-name="gr269" draw:text-style-name="P267" draw:layer="layout" svg:width="0.027cm" svg:height="0.026cm" svg:x="4.743cm" svg:y="14.046cm" svg:viewBox="0 0 28 27" draw:points="0,0 28,0 28,27 0,27">
          <text:p/>
        </draw:polygon>
        <draw:polygon draw:style-name="gr269" draw:text-style-name="P267" draw:layer="layout" svg:width="0.028cm" svg:height="0.026cm" svg:x="4.796cm" svg:y="14.046cm" svg:viewBox="0 0 29 27" draw:points="0,0 29,0 29,27 0,27">
          <text:p/>
        </draw:polygon>
        <draw:polygon draw:style-name="gr269" draw:text-style-name="P267" draw:layer="layout" svg:width="0.027cm" svg:height="0.026cm" svg:x="4.849cm" svg:y="14.046cm" svg:viewBox="0 0 28 27" draw:points="0,0 28,0 28,27 0,27">
          <text:p/>
        </draw:polygon>
        <draw:polygon draw:style-name="gr269" draw:text-style-name="P267" draw:layer="layout" svg:width="0.027cm" svg:height="0.026cm" svg:x="4.902cm" svg:y="14.046cm" svg:viewBox="0 0 28 27" draw:points="0,0 28,0 28,27 0,27">
          <text:p/>
        </draw:polygon>
        <draw:polygon draw:style-name="gr269" draw:text-style-name="P267" draw:layer="layout" svg:width="0.027cm" svg:height="0.026cm" svg:x="4.955cm" svg:y="14.046cm" svg:viewBox="0 0 28 27" draw:points="0,0 28,0 28,27 0,27">
          <text:p/>
        </draw:polygon>
        <draw:polygon draw:style-name="gr269" draw:text-style-name="P267" draw:layer="layout" svg:width="0.027cm" svg:height="0.026cm" svg:x="5.008cm" svg:y="14.046cm" svg:viewBox="0 0 28 27" draw:points="0,0 28,0 28,27 0,27">
          <text:p/>
        </draw:polygon>
        <draw:polygon draw:style-name="gr269" draw:text-style-name="P267" draw:layer="layout" svg:width="0.027cm" svg:height="0.026cm" svg:x="5.061cm" svg:y="14.046cm" svg:viewBox="0 0 28 27" draw:points="0,0 28,0 28,27 0,27">
          <text:p/>
        </draw:polygon>
        <draw:polygon draw:style-name="gr269" draw:text-style-name="P267" draw:layer="layout" svg:width="0.027cm" svg:height="0.026cm" svg:x="5.114cm" svg:y="14.046cm" svg:viewBox="0 0 28 27" draw:points="0,0 28,0 28,27 0,27">
          <text:p/>
        </draw:polygon>
        <draw:polygon draw:style-name="gr269" draw:text-style-name="P267" draw:layer="layout" svg:width="0.027cm" svg:height="0.026cm" svg:x="5.167cm" svg:y="14.046cm" svg:viewBox="0 0 28 27" draw:points="0,0 28,0 28,27 0,27">
          <text:p/>
        </draw:polygon>
        <draw:polygon draw:style-name="gr269" draw:text-style-name="P267" draw:layer="layout" svg:width="0.027cm" svg:height="0.026cm" svg:x="5.22cm" svg:y="14.046cm" svg:viewBox="0 0 28 27" draw:points="0,0 28,0 28,27 0,27">
          <text:p/>
        </draw:polygon>
        <draw:polygon draw:style-name="gr269" draw:text-style-name="P267" draw:layer="layout" svg:width="0.027cm" svg:height="0.026cm" svg:x="5.273cm" svg:y="14.046cm" svg:viewBox="0 0 28 27" draw:points="0,0 28,0 28,27 0,27">
          <text:p/>
        </draw:polygon>
        <draw:polygon draw:style-name="gr269" draw:text-style-name="P267" draw:layer="layout" svg:width="0.027cm" svg:height="0.026cm" svg:x="5.326cm" svg:y="14.046cm" svg:viewBox="0 0 28 27" draw:points="0,0 28,0 28,27 0,27">
          <text:p/>
        </draw:polygon>
        <draw:polygon draw:style-name="gr269" draw:text-style-name="P267" draw:layer="layout" svg:width="0.027cm" svg:height="0.026cm" svg:x="5.379cm" svg:y="14.046cm" svg:viewBox="0 0 28 27" draw:points="0,0 28,0 28,27 0,27">
          <text:p/>
        </draw:polygon>
        <draw:polygon draw:style-name="gr269" draw:text-style-name="P267" draw:layer="layout" svg:width="0.027cm" svg:height="0.026cm" svg:x="5.432cm" svg:y="14.046cm" svg:viewBox="0 0 28 27" draw:points="0,0 28,0 28,27 0,27">
          <text:p/>
        </draw:polygon>
        <draw:polygon draw:style-name="gr269" draw:text-style-name="P267" draw:layer="layout" svg:width="0.027cm" svg:height="0.026cm" svg:x="5.485cm" svg:y="14.046cm" svg:viewBox="0 0 28 27" draw:points="0,0 28,0 28,27 0,27">
          <text:p/>
        </draw:polygon>
        <draw:polygon draw:style-name="gr269" draw:text-style-name="P267" draw:layer="layout" svg:width="0.027cm" svg:height="0.026cm" svg:x="5.538cm" svg:y="14.046cm" svg:viewBox="0 0 28 27" draw:points="0,0 28,0 28,27 0,27">
          <text:p/>
        </draw:polygon>
        <draw:polygon draw:style-name="gr269" draw:text-style-name="P267" draw:layer="layout" svg:width="0.027cm" svg:height="0.026cm" svg:x="5.591cm" svg:y="14.046cm" svg:viewBox="0 0 28 27" draw:points="0,0 28,0 28,27 0,27">
          <text:p/>
        </draw:polygon>
        <draw:polygon draw:style-name="gr269" draw:text-style-name="P267" draw:layer="layout" svg:width="0.027cm" svg:height="0.026cm" svg:x="5.644cm" svg:y="14.046cm" svg:viewBox="0 0 28 27" draw:points="0,0 28,0 28,27 0,27">
          <text:p/>
        </draw:polygon>
        <draw:polygon draw:style-name="gr269" draw:text-style-name="P267" draw:layer="layout" svg:width="0.027cm" svg:height="0.026cm" svg:x="5.697cm" svg:y="14.046cm" svg:viewBox="0 0 28 27" draw:points="0,0 28,0 28,27 0,27">
          <text:p/>
        </draw:polygon>
        <draw:polygon draw:style-name="gr269" draw:text-style-name="P267" draw:layer="layout" svg:width="0.027cm" svg:height="0.026cm" svg:x="5.75cm" svg:y="14.046cm" svg:viewBox="0 0 28 27" draw:points="0,0 28,0 28,27 0,27">
          <text:p/>
        </draw:polygon>
        <draw:polygon draw:style-name="gr269" draw:text-style-name="P267" draw:layer="layout" svg:width="0.027cm" svg:height="0.026cm" svg:x="5.803cm" svg:y="14.046cm" svg:viewBox="0 0 28 27" draw:points="0,0 28,0 28,27 0,27">
          <text:p/>
        </draw:polygon>
        <draw:polygon draw:style-name="gr269" draw:text-style-name="P267" draw:layer="layout" svg:width="0.027cm" svg:height="0.026cm" svg:x="5.856cm" svg:y="14.046cm" svg:viewBox="0 0 28 27" draw:points="0,0 28,0 28,27 0,27">
          <text:p/>
        </draw:polygon>
        <draw:polygon draw:style-name="gr269" draw:text-style-name="P267" draw:layer="layout" svg:width="0.027cm" svg:height="0.026cm" svg:x="5.909cm" svg:y="14.046cm" svg:viewBox="0 0 28 27" draw:points="0,0 28,0 28,27 0,27">
          <text:p/>
        </draw:polygon>
        <draw:polygon draw:style-name="gr269" draw:text-style-name="P267" draw:layer="layout" svg:width="0.027cm" svg:height="0.026cm" svg:x="5.962cm" svg:y="14.046cm" svg:viewBox="0 0 28 27" draw:points="0,0 28,0 28,27 0,27">
          <text:p/>
        </draw:polygon>
        <draw:polygon draw:style-name="gr269" draw:text-style-name="P267" draw:layer="layout" svg:width="0.027cm" svg:height="0.026cm" svg:x="6.015cm" svg:y="14.046cm" svg:viewBox="0 0 28 27" draw:points="0,0 28,0 28,27 0,27">
          <text:p/>
        </draw:polygon>
        <draw:polygon draw:style-name="gr269" draw:text-style-name="P267" draw:layer="layout" svg:width="0.027cm" svg:height="0.026cm" svg:x="6.068cm" svg:y="14.046cm" svg:viewBox="0 0 28 27" draw:points="0,0 28,0 28,27 0,27">
          <text:p/>
        </draw:polygon>
        <draw:polygon draw:style-name="gr269" draw:text-style-name="P267" draw:layer="layout" svg:width="0.027cm" svg:height="0.026cm" svg:x="6.121cm" svg:y="14.046cm" svg:viewBox="0 0 28 27" draw:points="0,0 28,0 28,27 0,27">
          <text:p/>
        </draw:polygon>
        <draw:polygon draw:style-name="gr269" draw:text-style-name="P267" draw:layer="layout" svg:width="0.028cm" svg:height="0.026cm" svg:x="6.174cm" svg:y="14.046cm" svg:viewBox="0 0 29 27" draw:points="0,0 29,0 29,27 0,27">
          <text:p/>
        </draw:polygon>
        <draw:polygon draw:style-name="gr269" draw:text-style-name="P267" draw:layer="layout" svg:width="0.027cm" svg:height="0.026cm" svg:x="6.227cm" svg:y="14.046cm" svg:viewBox="0 0 28 27" draw:points="0,0 28,0 28,27 0,27">
          <text:p/>
        </draw:polygon>
        <draw:polygon draw:style-name="gr269" draw:text-style-name="P267" draw:layer="layout" svg:width="0.027cm" svg:height="0.026cm" svg:x="6.28cm" svg:y="14.046cm" svg:viewBox="0 0 28 27" draw:points="0,0 28,0 28,27 0,27">
          <text:p/>
        </draw:polygon>
        <draw:polygon draw:style-name="gr269" draw:text-style-name="P267" draw:layer="layout" svg:width="0.027cm" svg:height="0.026cm" svg:x="6.333cm" svg:y="14.046cm" svg:viewBox="0 0 28 27" draw:points="0,0 28,0 28,27 0,27">
          <text:p/>
        </draw:polygon>
        <draw:polygon draw:style-name="gr269" draw:text-style-name="P267" draw:layer="layout" svg:width="0.026cm" svg:height="0.026cm" svg:x="6.387cm" svg:y="14.046cm" svg:viewBox="0 0 27 27" draw:points="0,0 27,0 27,27 0,27">
          <text:p/>
        </draw:polygon>
        <draw:polygon draw:style-name="gr269" draw:text-style-name="P267" draw:layer="layout" svg:width="0.026cm" svg:height="0.026cm" svg:x="6.44cm" svg:y="14.046cm" svg:viewBox="0 0 27 27" draw:points="0,0 27,0 27,27 0,27">
          <text:p/>
        </draw:polygon>
        <draw:polygon draw:style-name="gr269" draw:text-style-name="P267" draw:layer="layout" svg:width="0.026cm" svg:height="0.026cm" svg:x="6.493cm" svg:y="14.046cm" svg:viewBox="0 0 27 27" draw:points="0,0 27,0 27,27 0,27">
          <text:p/>
        </draw:polygon>
        <draw:polygon draw:style-name="gr269" draw:text-style-name="P267" draw:layer="layout" svg:width="0.026cm" svg:height="0.026cm" svg:x="6.546cm" svg:y="14.046cm" svg:viewBox="0 0 27 27" draw:points="0,0 27,0 27,27 0,27">
          <text:p/>
        </draw:polygon>
        <draw:polygon draw:style-name="gr269" draw:text-style-name="P267" draw:layer="layout" svg:width="0.026cm" svg:height="0.026cm" svg:x="6.599cm" svg:y="14.046cm" svg:viewBox="0 0 27 27" draw:points="0,0 27,0 27,27 0,27">
          <text:p/>
        </draw:polygon>
        <draw:polygon draw:style-name="gr269" draw:text-style-name="P267" draw:layer="layout" svg:width="0.026cm" svg:height="0.026cm" svg:x="6.652cm" svg:y="14.046cm" svg:viewBox="0 0 27 27" draw:points="0,0 27,0 27,27 0,27">
          <text:p/>
        </draw:polygon>
        <draw:polygon draw:style-name="gr269" draw:text-style-name="P267" draw:layer="layout" svg:width="0.026cm" svg:height="0.026cm" svg:x="6.705cm" svg:y="14.046cm" svg:viewBox="0 0 27 27" draw:points="0,0 27,0 27,27 0,27">
          <text:p/>
        </draw:polygon>
        <draw:polygon draw:style-name="gr269" draw:text-style-name="P267" draw:layer="layout" svg:width="0.026cm" svg:height="0.026cm" svg:x="6.758cm" svg:y="14.046cm" svg:viewBox="0 0 27 27" draw:points="0,0 27,0 27,27 0,27">
          <text:p/>
        </draw:polygon>
        <draw:polygon draw:style-name="gr269" draw:text-style-name="P267" draw:layer="layout" svg:width="0.026cm" svg:height="0.026cm" svg:x="6.811cm" svg:y="14.046cm" svg:viewBox="0 0 27 27" draw:points="0,0 27,0 27,27 0,27">
          <text:p/>
        </draw:polygon>
        <draw:polygon draw:style-name="gr269" draw:text-style-name="P267" draw:layer="layout" svg:width="0.026cm" svg:height="0.026cm" svg:x="6.864cm" svg:y="14.046cm" svg:viewBox="0 0 27 27" draw:points="0,0 27,0 27,27 0,27">
          <text:p/>
        </draw:polygon>
        <draw:polygon draw:style-name="gr269" draw:text-style-name="P267" draw:layer="layout" svg:width="0.026cm" svg:height="0.026cm" svg:x="6.917cm" svg:y="14.046cm" svg:viewBox="0 0 27 27" draw:points="0,0 27,0 27,27 0,27">
          <text:p/>
        </draw:polygon>
        <draw:polygon draw:style-name="gr269" draw:text-style-name="P267" draw:layer="layout" svg:width="0.026cm" svg:height="0.026cm" svg:x="6.97cm" svg:y="14.046cm" svg:viewBox="0 0 27 27" draw:points="0,0 27,0 27,27 0,27">
          <text:p/>
        </draw:polygon>
        <draw:polygon draw:style-name="gr269" draw:text-style-name="P267" draw:layer="layout" svg:width="0.026cm" svg:height="0.026cm" svg:x="7.023cm" svg:y="14.046cm" svg:viewBox="0 0 27 27" draw:points="0,0 27,0 27,27 0,27">
          <text:p/>
        </draw:polygon>
        <draw:polygon draw:style-name="gr269" draw:text-style-name="P267" draw:layer="layout" svg:width="0.026cm" svg:height="0.026cm" svg:x="7.076cm" svg:y="14.046cm" svg:viewBox="0 0 27 27" draw:points="0,0 27,0 27,27 0,27">
          <text:p/>
        </draw:polygon>
        <draw:polygon draw:style-name="gr269" draw:text-style-name="P267" draw:layer="layout" svg:width="0.026cm" svg:height="0.026cm" svg:x="7.129cm" svg:y="14.046cm" svg:viewBox="0 0 27 27" draw:points="0,0 27,0 27,27 0,27">
          <text:p/>
        </draw:polygon>
        <draw:polygon draw:style-name="gr269" draw:text-style-name="P267" draw:layer="layout" svg:width="0.026cm" svg:height="0.026cm" svg:x="7.182cm" svg:y="14.046cm" svg:viewBox="0 0 27 27" draw:points="0,0 27,0 27,27 0,27">
          <text:p/>
        </draw:polygon>
        <draw:polygon draw:style-name="gr269" draw:text-style-name="P267" draw:layer="layout" svg:width="0.026cm" svg:height="0.026cm" svg:x="7.235cm" svg:y="14.046cm" svg:viewBox="0 0 27 27" draw:points="0,0 27,0 27,27 0,27">
          <text:p/>
        </draw:polygon>
        <draw:polygon draw:style-name="gr269" draw:text-style-name="P267" draw:layer="layout" svg:width="0.026cm" svg:height="0.026cm" svg:x="7.288cm" svg:y="14.046cm" svg:viewBox="0 0 27 27" draw:points="0,0 27,0 27,27 0,27">
          <text:p/>
        </draw:polygon>
        <draw:polygon draw:style-name="gr269" draw:text-style-name="P267" draw:layer="layout" svg:width="0.026cm" svg:height="0.026cm" svg:x="7.341cm" svg:y="14.046cm" svg:viewBox="0 0 27 27" draw:points="0,0 27,0 27,27 0,27">
          <text:p/>
        </draw:polygon>
        <draw:polygon draw:style-name="gr269" draw:text-style-name="P267" draw:layer="layout" svg:width="0.026cm" svg:height="0.026cm" svg:x="7.394cm" svg:y="14.046cm" svg:viewBox="0 0 27 27" draw:points="0,0 27,0 27,27 0,27">
          <text:p/>
        </draw:polygon>
        <draw:polygon draw:style-name="gr269" draw:text-style-name="P267" draw:layer="layout" svg:width="0.026cm" svg:height="0.026cm" svg:x="7.447cm" svg:y="14.046cm" svg:viewBox="0 0 27 27" draw:points="0,0 27,0 27,27 0,27">
          <text:p/>
        </draw:polygon>
        <draw:polygon draw:style-name="gr269" draw:text-style-name="P267" draw:layer="layout" svg:width="0.026cm" svg:height="0.026cm" svg:x="7.5cm" svg:y="14.046cm" svg:viewBox="0 0 27 27" draw:points="0,0 27,0 27,27 0,27">
          <text:p/>
        </draw:polygon>
        <draw:polygon draw:style-name="gr269" draw:text-style-name="P267" draw:layer="layout" svg:width="0.026cm" svg:height="0.026cm" svg:x="7.553cm" svg:y="14.046cm" svg:viewBox="0 0 27 27" draw:points="0,0 27,0 27,27 0,27">
          <text:p/>
        </draw:polygon>
        <draw:polygon draw:style-name="gr269" draw:text-style-name="P267" draw:layer="layout" svg:width="0.026cm" svg:height="0.026cm" svg:x="7.606cm" svg:y="14.046cm" svg:viewBox="0 0 27 27" draw:points="0,0 27,0 27,27 0,27">
          <text:p/>
        </draw:polygon>
        <draw:polygon draw:style-name="gr269" draw:text-style-name="P267" draw:layer="layout" svg:width="0.026cm" svg:height="0.026cm" svg:x="7.659cm" svg:y="14.046cm" svg:viewBox="0 0 27 27" draw:points="0,0 27,0 27,27 0,27">
          <text:p/>
        </draw:polygon>
        <draw:polygon draw:style-name="gr269" draw:text-style-name="P267" draw:layer="layout" svg:width="0.026cm" svg:height="0.026cm" svg:x="7.712cm" svg:y="14.046cm" svg:viewBox="0 0 27 27" draw:points="0,0 27,0 27,27 0,27">
          <text:p/>
        </draw:polygon>
        <draw:polygon draw:style-name="gr269" draw:text-style-name="P267" draw:layer="layout" svg:width="0.026cm" svg:height="0.026cm" svg:x="7.765cm" svg:y="14.046cm" svg:viewBox="0 0 27 27" draw:points="0,0 27,0 27,27 0,27">
          <text:p/>
        </draw:polygon>
        <draw:polygon draw:style-name="gr269" draw:text-style-name="P267" draw:layer="layout" svg:width="0.026cm" svg:height="0.026cm" svg:x="7.818cm" svg:y="14.046cm" svg:viewBox="0 0 27 27" draw:points="0,0 27,0 27,27 0,27">
          <text:p/>
        </draw:polygon>
        <draw:polygon draw:style-name="gr269" draw:text-style-name="P267" draw:layer="layout" svg:width="0.026cm" svg:height="0.026cm" svg:x="7.871cm" svg:y="14.046cm" svg:viewBox="0 0 27 27" draw:points="0,0 27,0 27,27 0,27">
          <text:p/>
        </draw:polygon>
        <draw:polygon draw:style-name="gr269" draw:text-style-name="P267" draw:layer="layout" svg:width="0.026cm" svg:height="0.026cm" svg:x="7.924cm" svg:y="14.046cm" svg:viewBox="0 0 27 27" draw:points="0,0 27,0 27,27 0,27">
          <text:p/>
        </draw:polygon>
        <draw:polygon draw:style-name="gr269" draw:text-style-name="P267" draw:layer="layout" svg:width="0.026cm" svg:height="0.026cm" svg:x="7.977cm" svg:y="14.046cm" svg:viewBox="0 0 27 27" draw:points="0,0 27,0 27,27 0,27">
          <text:p/>
        </draw:polygon>
        <draw:polygon draw:style-name="gr269" draw:text-style-name="P267" draw:layer="layout" svg:width="0.026cm" svg:height="0.026cm" svg:x="8.03cm" svg:y="14.046cm" svg:viewBox="0 0 27 27" draw:points="0,0 27,0 27,27 0,27">
          <text:p/>
        </draw:polygon>
        <draw:polygon draw:style-name="gr269" draw:text-style-name="P267" draw:layer="layout" svg:width="0.026cm" svg:height="0.026cm" svg:x="8.083cm" svg:y="14.046cm" svg:viewBox="0 0 27 27" draw:points="0,0 27,0 27,27 0,27">
          <text:p/>
        </draw:polygon>
        <draw:polygon draw:style-name="gr269" draw:text-style-name="P267" draw:layer="layout" svg:width="0.026cm" svg:height="0.026cm" svg:x="8.136cm" svg:y="14.046cm" svg:viewBox="0 0 27 27" draw:points="0,0 27,0 27,27 0,27">
          <text:p/>
        </draw:polygon>
        <draw:polygon draw:style-name="gr269" draw:text-style-name="P267" draw:layer="layout" svg:width="0.026cm" svg:height="0.026cm" svg:x="8.189cm" svg:y="14.046cm" svg:viewBox="0 0 27 27" draw:points="0,0 27,0 27,27 0,27">
          <text:p/>
        </draw:polygon>
        <draw:polygon draw:style-name="gr269" draw:text-style-name="P267" draw:layer="layout" svg:width="0.026cm" svg:height="0.026cm" svg:x="8.242cm" svg:y="14.046cm" svg:viewBox="0 0 27 27" draw:points="0,0 27,0 27,27 0,27">
          <text:p/>
        </draw:polygon>
        <draw:polygon draw:style-name="gr269" draw:text-style-name="P267" draw:layer="layout" svg:width="0.026cm" svg:height="0.026cm" svg:x="8.295cm" svg:y="14.046cm" svg:viewBox="0 0 27 27" draw:points="0,0 27,0 27,27 0,27">
          <text:p/>
        </draw:polygon>
        <draw:polygon draw:style-name="gr269" draw:text-style-name="P267" draw:layer="layout" svg:width="0.026cm" svg:height="0.026cm" svg:x="8.348cm" svg:y="14.046cm" svg:viewBox="0 0 27 27" draw:points="0,0 27,0 27,27 0,27">
          <text:p/>
        </draw:polygon>
        <draw:polygon draw:style-name="gr269" draw:text-style-name="P267" draw:layer="layout" svg:width="0.026cm" svg:height="0.026cm" svg:x="8.401cm" svg:y="14.046cm" svg:viewBox="0 0 27 27" draw:points="0,0 27,0 27,27 0,27">
          <text:p/>
        </draw:polygon>
        <draw:polygon draw:style-name="gr269" draw:text-style-name="P267" draw:layer="layout" svg:width="0.026cm" svg:height="0.026cm" svg:x="8.454cm" svg:y="14.046cm" svg:viewBox="0 0 27 27" draw:points="0,0 27,0 27,27 0,27">
          <text:p/>
        </draw:polygon>
        <draw:polygon draw:style-name="gr269" draw:text-style-name="P267" draw:layer="layout" svg:width="0.026cm" svg:height="0.026cm" svg:x="8.507cm" svg:y="14.046cm" svg:viewBox="0 0 27 27" draw:points="0,0 27,0 27,27 0,27">
          <text:p/>
        </draw:polygon>
        <draw:polygon draw:style-name="gr269" draw:text-style-name="P267" draw:layer="layout" svg:width="0.026cm" svg:height="0.026cm" svg:x="8.56cm" svg:y="14.046cm" svg:viewBox="0 0 27 27" draw:points="0,0 27,0 27,27 0,27">
          <text:p/>
        </draw:polygon>
        <draw:polygon draw:style-name="gr269" draw:text-style-name="P267" draw:layer="layout" svg:width="0.026cm" svg:height="0.026cm" svg:x="8.613cm" svg:y="14.046cm" svg:viewBox="0 0 27 27" draw:points="0,0 27,0 27,27 0,27">
          <text:p/>
        </draw:polygon>
        <draw:polygon draw:style-name="gr269" draw:text-style-name="P267" draw:layer="layout" svg:width="0.026cm" svg:height="0.026cm" svg:x="8.666cm" svg:y="14.046cm" svg:viewBox="0 0 27 27" draw:points="0,0 27,0 27,27 0,27">
          <text:p/>
        </draw:polygon>
        <draw:polygon draw:style-name="gr269" draw:text-style-name="P267" draw:layer="layout" svg:width="0.026cm" svg:height="0.026cm" svg:x="8.719cm" svg:y="14.046cm" svg:viewBox="0 0 27 27" draw:points="0,0 27,0 27,27 0,27">
          <text:p/>
        </draw:polygon>
        <draw:polygon draw:style-name="gr269" draw:text-style-name="P267" draw:layer="layout" svg:width="0.026cm" svg:height="0.026cm" svg:x="8.772cm" svg:y="14.046cm" svg:viewBox="0 0 27 27" draw:points="0,0 27,0 27,27 0,27">
          <text:p/>
        </draw:polygon>
        <draw:polygon draw:style-name="gr269" draw:text-style-name="P267" draw:layer="layout" svg:width="0.026cm" svg:height="0.026cm" svg:x="8.825cm" svg:y="14.046cm" svg:viewBox="0 0 27 27" draw:points="0,0 27,0 27,27 0,27">
          <text:p/>
        </draw:polygon>
        <draw:polygon draw:style-name="gr269" draw:text-style-name="P267" draw:layer="layout" svg:width="0.026cm" svg:height="0.026cm" svg:x="8.878cm" svg:y="14.046cm" svg:viewBox="0 0 27 27" draw:points="0,0 27,0 27,27 0,27">
          <text:p/>
        </draw:polygon>
        <draw:polygon draw:style-name="gr269" draw:text-style-name="P267" draw:layer="layout" svg:width="0.026cm" svg:height="0.026cm" svg:x="8.931cm" svg:y="14.046cm" svg:viewBox="0 0 27 27" draw:points="0,0 27,0 27,27 0,27">
          <text:p/>
        </draw:polygon>
        <draw:polygon draw:style-name="gr269" draw:text-style-name="P267" draw:layer="layout" svg:width="0.026cm" svg:height="0.026cm" svg:x="8.984cm" svg:y="14.046cm" svg:viewBox="0 0 27 27" draw:points="0,0 27,0 27,27 0,27">
          <text:p/>
        </draw:polygon>
        <draw:polygon draw:style-name="gr269" draw:text-style-name="P267" draw:layer="layout" svg:width="0.026cm" svg:height="0.026cm" svg:x="9.037cm" svg:y="14.046cm" svg:viewBox="0 0 27 27" draw:points="0,0 27,0 27,27 0,27">
          <text:p/>
        </draw:polygon>
        <draw:polygon draw:style-name="gr269" draw:text-style-name="P267" draw:layer="layout" svg:width="0.026cm" svg:height="0.026cm" svg:x="9.09cm" svg:y="14.046cm" svg:viewBox="0 0 27 27" draw:points="0,0 27,0 27,27 0,27">
          <text:p/>
        </draw:polygon>
        <draw:polygon draw:style-name="gr269" draw:text-style-name="P267" draw:layer="layout" svg:width="0.026cm" svg:height="0.026cm" svg:x="9.143cm" svg:y="14.046cm" svg:viewBox="0 0 27 27" draw:points="0,0 27,0 27,27 0,27">
          <text:p/>
        </draw:polygon>
        <draw:polygon draw:style-name="gr269" draw:text-style-name="P267" draw:layer="layout" svg:width="0.026cm" svg:height="0.026cm" svg:x="9.196cm" svg:y="14.046cm" svg:viewBox="0 0 27 27" draw:points="0,0 27,0 27,27 0,27">
          <text:p/>
        </draw:polygon>
        <draw:polygon draw:style-name="gr269" draw:text-style-name="P267" draw:layer="layout" svg:width="0.026cm" svg:height="0.026cm" svg:x="9.249cm" svg:y="14.046cm" svg:viewBox="0 0 27 27" draw:points="0,0 27,0 27,27 0,27">
          <text:p/>
        </draw:polygon>
        <draw:polygon draw:style-name="gr269" draw:text-style-name="P267" draw:layer="layout" svg:width="0.026cm" svg:height="0.026cm" svg:x="9.302cm" svg:y="14.046cm" svg:viewBox="0 0 27 27" draw:points="0,0 27,0 27,27 0,27">
          <text:p/>
        </draw:polygon>
        <draw:polygon draw:style-name="gr269" draw:text-style-name="P267" draw:layer="layout" svg:width="0.026cm" svg:height="0.026cm" svg:x="9.355cm" svg:y="14.046cm" svg:viewBox="0 0 27 27" draw:points="0,0 27,0 27,27 0,27">
          <text:p/>
        </draw:polygon>
        <draw:polygon draw:style-name="gr269" draw:text-style-name="P267" draw:layer="layout" svg:width="0.026cm" svg:height="0.026cm" svg:x="9.408cm" svg:y="14.046cm" svg:viewBox="0 0 27 27" draw:points="0,0 27,0 27,27 0,27">
          <text:p/>
        </draw:polygon>
        <draw:polygon draw:style-name="gr269" draw:text-style-name="P267" draw:layer="layout" svg:width="0.026cm" svg:height="0.026cm" svg:x="9.461cm" svg:y="14.046cm" svg:viewBox="0 0 27 27" draw:points="0,0 27,0 27,27 0,27">
          <text:p/>
        </draw:polygon>
        <draw:polygon draw:style-name="gr269" draw:text-style-name="P267" draw:layer="layout" svg:width="0.026cm" svg:height="0.026cm" svg:x="9.514cm" svg:y="14.046cm" svg:viewBox="0 0 27 27" draw:points="0,0 27,0 27,27 0,27">
          <text:p/>
        </draw:polygon>
        <draw:polygon draw:style-name="gr269" draw:text-style-name="P267" draw:layer="layout" svg:width="0.026cm" svg:height="0.026cm" svg:x="9.567cm" svg:y="14.046cm" svg:viewBox="0 0 27 27" draw:points="0,0 27,0 27,27 0,27">
          <text:p/>
        </draw:polygon>
        <draw:polygon draw:style-name="gr269" draw:text-style-name="P267" draw:layer="layout" svg:width="0.026cm" svg:height="0.026cm" svg:x="9.62cm" svg:y="14.046cm" svg:viewBox="0 0 27 27" draw:points="0,0 27,0 27,27 0,27">
          <text:p/>
        </draw:polygon>
        <draw:polygon draw:style-name="gr269" draw:text-style-name="P267" draw:layer="layout" svg:width="0.026cm" svg:height="0.026cm" svg:x="9.673cm" svg:y="14.046cm" svg:viewBox="0 0 27 27" draw:points="0,0 27,0 27,27 0,27">
          <text:p/>
        </draw:polygon>
        <draw:polygon draw:style-name="gr269" draw:text-style-name="P267" draw:layer="layout" svg:width="0.026cm" svg:height="0.026cm" svg:x="9.726cm" svg:y="14.046cm" svg:viewBox="0 0 27 27" draw:points="0,0 27,0 27,27 0,27">
          <text:p/>
        </draw:polygon>
        <draw:polygon draw:style-name="gr269" draw:text-style-name="P267" draw:layer="layout" svg:width="0.026cm" svg:height="0.026cm" svg:x="9.779cm" svg:y="14.046cm" svg:viewBox="0 0 27 27" draw:points="0,0 27,0 27,27 0,27">
          <text:p/>
        </draw:polygon>
        <draw:polygon draw:style-name="gr269" draw:text-style-name="P267" draw:layer="layout" svg:width="0.026cm" svg:height="0.026cm" svg:x="9.832cm" svg:y="14.046cm" svg:viewBox="0 0 27 27" draw:points="0,0 27,0 27,27 0,27">
          <text:p/>
        </draw:polygon>
        <draw:polygon draw:style-name="gr269" draw:text-style-name="P267" draw:layer="layout" svg:width="0.026cm" svg:height="0.026cm" svg:x="9.885cm" svg:y="14.046cm" svg:viewBox="0 0 27 27" draw:points="0,0 27,0 27,27 0,27">
          <text:p/>
        </draw:polygon>
        <draw:polygon draw:style-name="gr269" draw:text-style-name="P267" draw:layer="layout" svg:width="0.026cm" svg:height="0.026cm" svg:x="9.938cm" svg:y="14.046cm" svg:viewBox="0 0 27 27" draw:points="0,0 27,0 27,27 0,27">
          <text:p/>
        </draw:polygon>
        <draw:polygon draw:style-name="gr269" draw:text-style-name="P267" draw:layer="layout" svg:width="0.026cm" svg:height="0.026cm" svg:x="9.991cm" svg:y="14.046cm" svg:viewBox="0 0 27 27" draw:points="0,0 27,0 27,27 0,27">
          <text:p/>
        </draw:polygon>
        <draw:polygon draw:style-name="gr269" draw:text-style-name="P267" draw:layer="layout" svg:width="0.026cm" svg:height="0.026cm" svg:x="10.044cm" svg:y="14.046cm" svg:viewBox="0 0 27 27" draw:points="0,0 27,0 27,27 0,27">
          <text:p/>
        </draw:polygon>
        <draw:polygon draw:style-name="gr269" draw:text-style-name="P267" draw:layer="layout" svg:width="0.026cm" svg:height="0.026cm" svg:x="10.097cm" svg:y="14.046cm" svg:viewBox="0 0 27 27" draw:points="0,0 27,0 27,27 0,27">
          <text:p/>
        </draw:polygon>
        <draw:polygon draw:style-name="gr269" draw:text-style-name="P267" draw:layer="layout" svg:width="0.026cm" svg:height="0.026cm" svg:x="10.15cm" svg:y="14.046cm" svg:viewBox="0 0 27 27" draw:points="0,0 27,0 27,27 0,27">
          <text:p/>
        </draw:polygon>
        <draw:polygon draw:style-name="gr269" draw:text-style-name="P267" draw:layer="layout" svg:width="0.026cm" svg:height="0.026cm" svg:x="10.203cm" svg:y="14.046cm" svg:viewBox="0 0 27 27" draw:points="0,0 27,0 27,27 0,27">
          <text:p/>
        </draw:polygon>
        <draw:polygon draw:style-name="gr269" draw:text-style-name="P267" draw:layer="layout" svg:width="0.026cm" svg:height="0.026cm" svg:x="10.256cm" svg:y="14.046cm" svg:viewBox="0 0 27 27" draw:points="0,0 27,0 27,27 0,27">
          <text:p/>
        </draw:polygon>
        <draw:polygon draw:style-name="gr269" draw:text-style-name="P267" draw:layer="layout" svg:width="0.026cm" svg:height="0.026cm" svg:x="10.309cm" svg:y="14.046cm" svg:viewBox="0 0 27 27" draw:points="0,0 27,0 27,27 0,27">
          <text:p/>
        </draw:polygon>
        <draw:polygon draw:style-name="gr269" draw:text-style-name="P267" draw:layer="layout" svg:width="0.026cm" svg:height="0.026cm" svg:x="10.362cm" svg:y="14.046cm" svg:viewBox="0 0 27 27" draw:points="0,0 27,0 27,27 0,27">
          <text:p/>
        </draw:polygon>
        <draw:polygon draw:style-name="gr269" draw:text-style-name="P267" draw:layer="layout" svg:width="0.026cm" svg:height="0.026cm" svg:x="10.415cm" svg:y="14.046cm" svg:viewBox="0 0 27 27" draw:points="0,0 27,0 27,27 0,27">
          <text:p/>
        </draw:polygon>
        <draw:polygon draw:style-name="gr269" draw:text-style-name="P267" draw:layer="layout" svg:width="0.026cm" svg:height="0.026cm" svg:x="10.468cm" svg:y="14.046cm" svg:viewBox="0 0 27 27" draw:points="0,0 27,0 27,27 0,27">
          <text:p/>
        </draw:polygon>
        <draw:polygon draw:style-name="gr269" draw:text-style-name="P267" draw:layer="layout" svg:width="0.026cm" svg:height="0.026cm" svg:x="10.521cm" svg:y="14.046cm" svg:viewBox="0 0 27 27" draw:points="0,0 27,0 27,27 0,27">
          <text:p/>
        </draw:polygon>
        <draw:polygon draw:style-name="gr269" draw:text-style-name="P267" draw:layer="layout" svg:width="0.026cm" svg:height="0.026cm" svg:x="10.574cm" svg:y="14.046cm" svg:viewBox="0 0 27 27" draw:points="0,0 27,0 27,27 0,27">
          <text:p/>
        </draw:polygon>
        <draw:polygon draw:style-name="gr269" draw:text-style-name="P267" draw:layer="layout" svg:width="0.026cm" svg:height="0.026cm" svg:x="10.627cm" svg:y="14.046cm" svg:viewBox="0 0 27 27" draw:points="0,0 27,0 27,27 0,27">
          <text:p/>
        </draw:polygon>
        <draw:polygon draw:style-name="gr269" draw:text-style-name="P267" draw:layer="layout" svg:width="0.026cm" svg:height="0.026cm" svg:x="10.68cm" svg:y="14.046cm" svg:viewBox="0 0 27 27" draw:points="0,0 27,0 27,27 0,27">
          <text:p/>
        </draw:polygon>
        <draw:polygon draw:style-name="gr269" draw:text-style-name="P267" draw:layer="layout" svg:width="0.026cm" svg:height="0.026cm" svg:x="10.733cm" svg:y="14.046cm" svg:viewBox="0 0 27 27" draw:points="0,0 27,0 27,27 0,27">
          <text:p/>
        </draw:polygon>
        <draw:polygon draw:style-name="gr269" draw:text-style-name="P267" draw:layer="layout" svg:width="0.026cm" svg:height="0.026cm" svg:x="10.786cm" svg:y="14.046cm" svg:viewBox="0 0 27 27" draw:points="0,0 27,0 27,27 0,27">
          <text:p/>
        </draw:polygon>
        <draw:polygon draw:style-name="gr269" draw:text-style-name="P267" draw:layer="layout" svg:width="0.026cm" svg:height="0.026cm" svg:x="10.839cm" svg:y="14.046cm" svg:viewBox="0 0 27 27" draw:points="0,0 27,0 27,27 0,27">
          <text:p/>
        </draw:polygon>
        <draw:polygon draw:style-name="gr269" draw:text-style-name="P267" draw:layer="layout" svg:width="0.026cm" svg:height="0.026cm" svg:x="10.892cm" svg:y="14.046cm" svg:viewBox="0 0 27 27" draw:points="0,0 27,0 27,27 0,27">
          <text:p/>
        </draw:polygon>
        <draw:polygon draw:style-name="gr269" draw:text-style-name="P267" draw:layer="layout" svg:width="0.026cm" svg:height="0.026cm" svg:x="10.945cm" svg:y="14.046cm" svg:viewBox="0 0 27 27" draw:points="0,0 27,0 27,27 0,27">
          <text:p/>
        </draw:polygon>
        <draw:polygon draw:style-name="gr269" draw:text-style-name="P267" draw:layer="layout" svg:width="0.026cm" svg:height="0.026cm" svg:x="10.998cm" svg:y="14.046cm" svg:viewBox="0 0 27 27" draw:points="0,0 27,0 27,27 0,27">
          <text:p/>
        </draw:polygon>
        <draw:polygon draw:style-name="gr269" draw:text-style-name="P267" draw:layer="layout" svg:width="0.026cm" svg:height="0.026cm" svg:x="11.051cm" svg:y="14.046cm" svg:viewBox="0 0 27 27" draw:points="0,0 27,0 27,27 0,27">
          <text:p/>
        </draw:polygon>
        <draw:polygon draw:style-name="gr269" draw:text-style-name="P267" draw:layer="layout" svg:width="0.026cm" svg:height="0.026cm" svg:x="11.104cm" svg:y="14.046cm" svg:viewBox="0 0 27 27" draw:points="0,0 27,0 27,27 0,27">
          <text:p/>
        </draw:polygon>
        <draw:polygon draw:style-name="gr269" draw:text-style-name="P267" draw:layer="layout" svg:width="0.026cm" svg:height="0.026cm" svg:x="11.157cm" svg:y="14.046cm" svg:viewBox="0 0 27 27" draw:points="0,0 27,0 27,27 0,27">
          <text:p/>
        </draw:polygon>
        <draw:polygon draw:style-name="gr269" draw:text-style-name="P267" draw:layer="layout" svg:width="0.026cm" svg:height="0.026cm" svg:x="11.21cm" svg:y="14.046cm" svg:viewBox="0 0 27 27" draw:points="0,0 27,0 27,27 0,27">
          <text:p/>
        </draw:polygon>
        <draw:polygon draw:style-name="gr269" draw:text-style-name="P267" draw:layer="layout" svg:width="0.026cm" svg:height="0.026cm" svg:x="11.263cm" svg:y="14.046cm" svg:viewBox="0 0 27 27" draw:points="0,0 27,0 27,27 0,27">
          <text:p/>
        </draw:polygon>
        <draw:polygon draw:style-name="gr269" draw:text-style-name="P267" draw:layer="layout" svg:width="0.026cm" svg:height="0.026cm" svg:x="11.316cm" svg:y="14.046cm" svg:viewBox="0 0 27 27" draw:points="0,0 27,0 27,27 0,27">
          <text:p/>
        </draw:polygon>
        <draw:polygon draw:style-name="gr269" draw:text-style-name="P267" draw:layer="layout" svg:width="0.026cm" svg:height="0.026cm" svg:x="11.369cm" svg:y="14.046cm" svg:viewBox="0 0 27 27" draw:points="0,0 27,0 27,27 0,27">
          <text:p/>
        </draw:polygon>
        <draw:polygon draw:style-name="gr269" draw:text-style-name="P267" draw:layer="layout" svg:width="0.026cm" svg:height="0.026cm" svg:x="11.422cm" svg:y="14.046cm" svg:viewBox="0 0 27 27" draw:points="0,0 27,0 27,27 0,27">
          <text:p/>
        </draw:polygon>
        <draw:polygon draw:style-name="gr269" draw:text-style-name="P267" draw:layer="layout" svg:width="0.026cm" svg:height="0.026cm" svg:x="11.475cm" svg:y="14.046cm" svg:viewBox="0 0 27 27" draw:points="0,0 27,0 27,27 0,27">
          <text:p/>
        </draw:polygon>
        <draw:polygon draw:style-name="gr269" draw:text-style-name="P267" draw:layer="layout" svg:width="0.026cm" svg:height="0.026cm" svg:x="11.528cm" svg:y="14.046cm" svg:viewBox="0 0 27 27" draw:points="0,0 27,0 27,27 0,27">
          <text:p/>
        </draw:polygon>
        <draw:polygon draw:style-name="gr269" draw:text-style-name="P267" draw:layer="layout" svg:width="0.026cm" svg:height="0.026cm" svg:x="11.581cm" svg:y="14.046cm" svg:viewBox="0 0 27 27" draw:points="0,0 27,0 27,27 0,27">
          <text:p/>
        </draw:polygon>
        <draw:polygon draw:style-name="gr269" draw:text-style-name="P267" draw:layer="layout" svg:width="0.026cm" svg:height="0.026cm" svg:x="11.634cm" svg:y="14.046cm" svg:viewBox="0 0 27 27" draw:points="0,0 27,0 27,27 0,27">
          <text:p/>
        </draw:polygon>
        <draw:polygon draw:style-name="gr269" draw:text-style-name="P267" draw:layer="layout" svg:width="0.026cm" svg:height="0.026cm" svg:x="11.687cm" svg:y="14.046cm" svg:viewBox="0 0 27 27" draw:points="0,0 27,0 27,27 0,27">
          <text:p/>
        </draw:polygon>
        <draw:polygon draw:style-name="gr269" draw:text-style-name="P267" draw:layer="layout" svg:width="0.026cm" svg:height="0.026cm" svg:x="11.74cm" svg:y="14.046cm" svg:viewBox="0 0 27 27" draw:points="0,0 27,0 27,27 0,27">
          <text:p/>
        </draw:polygon>
        <draw:polygon draw:style-name="gr269" draw:text-style-name="P267" draw:layer="layout" svg:width="0.026cm" svg:height="0.026cm" svg:x="11.793cm" svg:y="14.046cm" svg:viewBox="0 0 27 27" draw:points="0,0 27,0 27,27 0,27">
          <text:p/>
        </draw:polygon>
        <draw:polygon draw:style-name="gr269" draw:text-style-name="P267" draw:layer="layout" svg:width="0.026cm" svg:height="0.026cm" svg:x="11.846cm" svg:y="14.046cm" svg:viewBox="0 0 27 27" draw:points="0,0 27,0 27,27 0,27">
          <text:p/>
        </draw:polygon>
        <draw:polygon draw:style-name="gr269" draw:text-style-name="P267" draw:layer="layout" svg:width="0.026cm" svg:height="0.026cm" svg:x="11.899cm" svg:y="14.046cm" svg:viewBox="0 0 27 27" draw:points="0,0 27,0 27,27 0,27">
          <text:p/>
        </draw:polygon>
        <draw:polygon draw:style-name="gr269" draw:text-style-name="P267" draw:layer="layout" svg:width="0.026cm" svg:height="0.026cm" svg:x="11.952cm" svg:y="14.046cm" svg:viewBox="0 0 27 27" draw:points="0,0 27,0 27,27 0,27">
          <text:p/>
        </draw:polygon>
        <draw:polygon draw:style-name="gr269" draw:text-style-name="P267" draw:layer="layout" svg:width="0.026cm" svg:height="0.026cm" svg:x="12.005cm" svg:y="14.046cm" svg:viewBox="0 0 27 27" draw:points="0,0 27,0 27,27 0,27">
          <text:p/>
        </draw:polygon>
        <draw:polygon draw:style-name="gr269" draw:text-style-name="P267" draw:layer="layout" svg:width="0.026cm" svg:height="0.026cm" svg:x="12.058cm" svg:y="14.046cm" svg:viewBox="0 0 27 27" draw:points="0,0 27,0 27,27 0,27">
          <text:p/>
        </draw:polygon>
        <draw:polygon draw:style-name="gr269" draw:text-style-name="P267" draw:layer="layout" svg:width="0.026cm" svg:height="0.026cm" svg:x="12.111cm" svg:y="14.046cm" svg:viewBox="0 0 27 27" draw:points="0,0 27,0 27,27 0,27">
          <text:p/>
        </draw:polygon>
        <draw:polygon draw:style-name="gr269" draw:text-style-name="P267" draw:layer="layout" svg:width="0.026cm" svg:height="0.026cm" svg:x="12.164cm" svg:y="14.046cm" svg:viewBox="0 0 27 27" draw:points="0,0 27,0 27,27 0,27">
          <text:p/>
        </draw:polygon>
        <draw:polygon draw:style-name="gr269" draw:text-style-name="P267" draw:layer="layout" svg:width="0.026cm" svg:height="0.026cm" svg:x="12.217cm" svg:y="14.046cm" svg:viewBox="0 0 27 27" draw:points="0,0 27,0 27,27 0,27">
          <text:p/>
        </draw:polygon>
        <draw:polygon draw:style-name="gr269" draw:text-style-name="P267" draw:layer="layout" svg:width="0.026cm" svg:height="0.026cm" svg:x="12.27cm" svg:y="14.046cm" svg:viewBox="0 0 27 27" draw:points="0,0 27,0 27,27 0,27">
          <text:p/>
        </draw:polygon>
        <draw:polygon draw:style-name="gr269" draw:text-style-name="P267" draw:layer="layout" svg:width="0.026cm" svg:height="0.026cm" svg:x="12.323cm" svg:y="14.046cm" svg:viewBox="0 0 27 27" draw:points="0,0 27,0 27,27 0,27">
          <text:p/>
        </draw:polygon>
        <draw:polygon draw:style-name="gr269" draw:text-style-name="P267" draw:layer="layout" svg:width="0.026cm" svg:height="0.026cm" svg:x="12.376cm" svg:y="14.046cm" svg:viewBox="0 0 27 27" draw:points="0,0 27,0 27,27 0,27">
          <text:p/>
        </draw:polygon>
        <draw:polygon draw:style-name="gr269" draw:text-style-name="P267" draw:layer="layout" svg:width="0.026cm" svg:height="0.026cm" svg:x="12.429cm" svg:y="14.046cm" svg:viewBox="0 0 27 27" draw:points="0,0 27,0 27,27 0,27">
          <text:p/>
        </draw:polygon>
        <draw:polygon draw:style-name="gr269" draw:text-style-name="P267" draw:layer="layout" svg:width="0.026cm" svg:height="0.026cm" svg:x="12.482cm" svg:y="14.046cm" svg:viewBox="0 0 27 27" draw:points="0,0 27,0 27,27 0,27">
          <text:p/>
        </draw:polygon>
        <draw:polygon draw:style-name="gr269" draw:text-style-name="P267" draw:layer="layout" svg:width="0.026cm" svg:height="0.026cm" svg:x="12.535cm" svg:y="14.046cm" svg:viewBox="0 0 27 27" draw:points="0,0 27,0 27,27 0,27">
          <text:p/>
        </draw:polygon>
        <draw:polygon draw:style-name="gr269" draw:text-style-name="P267" draw:layer="layout" svg:width="0.026cm" svg:height="0.026cm" svg:x="12.588cm" svg:y="14.046cm" svg:viewBox="0 0 27 27" draw:points="0,0 27,0 27,27 0,27">
          <text:p/>
        </draw:polygon>
        <draw:polygon draw:style-name="gr269" draw:text-style-name="P267" draw:layer="layout" svg:width="0.026cm" svg:height="0.026cm" svg:x="12.641cm" svg:y="14.046cm" svg:viewBox="0 0 27 27" draw:points="0,0 27,0 27,27 0,27">
          <text:p/>
        </draw:polygon>
        <draw:polygon draw:style-name="gr269" draw:text-style-name="P267" draw:layer="layout" svg:width="0.027cm" svg:height="0.026cm" svg:x="12.694cm" svg:y="14.046cm" svg:viewBox="0 0 28 27" draw:points="0,0 28,0 28,27 0,27">
          <text:p/>
        </draw:polygon>
        <draw:polygon draw:style-name="gr269" draw:text-style-name="P267" draw:layer="layout" svg:width="0.027cm" svg:height="0.026cm" svg:x="12.747cm" svg:y="14.046cm" svg:viewBox="0 0 28 27" draw:points="0,0 28,0 28,27 0,27">
          <text:p/>
        </draw:polygon>
        <draw:polygon draw:style-name="gr269" draw:text-style-name="P267" draw:layer="layout" svg:width="0.027cm" svg:height="0.026cm" svg:x="12.8cm" svg:y="14.046cm" svg:viewBox="0 0 28 27" draw:points="0,0 28,0 28,27 0,27">
          <text:p/>
        </draw:polygon>
        <draw:polygon draw:style-name="gr269" draw:text-style-name="P267" draw:layer="layout" svg:width="0.027cm" svg:height="0.026cm" svg:x="12.853cm" svg:y="14.046cm" svg:viewBox="0 0 28 27" draw:points="0,0 28,0 28,27 0,27">
          <text:p/>
        </draw:polygon>
        <draw:polygon draw:style-name="gr269" draw:text-style-name="P267" draw:layer="layout" svg:width="0.027cm" svg:height="0.026cm" svg:x="12.906cm" svg:y="14.046cm" svg:viewBox="0 0 28 27" draw:points="0,0 28,0 28,27 0,27">
          <text:p/>
        </draw:polygon>
        <draw:polygon draw:style-name="gr269" draw:text-style-name="P267" draw:layer="layout" svg:width="0.027cm" svg:height="0.026cm" svg:x="12.959cm" svg:y="14.046cm" svg:viewBox="0 0 28 27" draw:points="0,0 28,0 28,27 0,27">
          <text:p/>
        </draw:polygon>
        <draw:polygon draw:style-name="gr269" draw:text-style-name="P267" draw:layer="layout" svg:width="0.028cm" svg:height="0.026cm" svg:x="13.012cm" svg:y="14.046cm" svg:viewBox="0 0 29 27" draw:points="0,0 29,0 29,27 0,27">
          <text:p/>
        </draw:polygon>
        <draw:polygon draw:style-name="gr269" draw:text-style-name="P267" draw:layer="layout" svg:width="0.027cm" svg:height="0.026cm" svg:x="13.065cm" svg:y="14.046cm" svg:viewBox="0 0 28 27" draw:points="0,0 28,0 28,27 0,27">
          <text:p/>
        </draw:polygon>
        <draw:polygon draw:style-name="gr269" draw:text-style-name="P267" draw:layer="layout" svg:width="0.027cm" svg:height="0.026cm" svg:x="13.118cm" svg:y="14.046cm" svg:viewBox="0 0 28 27" draw:points="0,0 28,0 28,27 0,27">
          <text:p/>
        </draw:polygon>
        <draw:polygon draw:style-name="gr269" draw:text-style-name="P267" draw:layer="layout" svg:width="0.027cm" svg:height="0.026cm" svg:x="13.171cm" svg:y="14.046cm" svg:viewBox="0 0 28 27" draw:points="0,0 28,0 28,27 0,27">
          <text:p/>
        </draw:polygon>
        <draw:polygon draw:style-name="gr269" draw:text-style-name="P267" draw:layer="layout" svg:width="0.027cm" svg:height="0.026cm" svg:x="13.224cm" svg:y="14.046cm" svg:viewBox="0 0 28 27" draw:points="0,0 28,0 28,27 0,27">
          <text:p/>
        </draw:polygon>
        <draw:polygon draw:style-name="gr269" draw:text-style-name="P267" draw:layer="layout" svg:width="0.027cm" svg:height="0.026cm" svg:x="13.277cm" svg:y="14.046cm" svg:viewBox="0 0 28 27" draw:points="0,0 28,0 28,27 0,27">
          <text:p/>
        </draw:polygon>
        <draw:polygon draw:style-name="gr269" draw:text-style-name="P267" draw:layer="layout" svg:width="0.027cm" svg:height="0.026cm" svg:x="13.33cm" svg:y="14.046cm" svg:viewBox="0 0 28 27" draw:points="0,0 28,0 28,27 0,27">
          <text:p/>
        </draw:polygon>
        <draw:polygon draw:style-name="gr269" draw:text-style-name="P267" draw:layer="layout" svg:width="0.027cm" svg:height="0.026cm" svg:x="13.383cm" svg:y="14.046cm" svg:viewBox="0 0 28 27" draw:points="0,0 28,0 28,27 0,27">
          <text:p/>
        </draw:polygon>
        <draw:polygon draw:style-name="gr269" draw:text-style-name="P267" draw:layer="layout" svg:width="0.027cm" svg:height="0.026cm" svg:x="13.436cm" svg:y="14.046cm" svg:viewBox="0 0 28 27" draw:points="0,0 28,0 28,27 0,27">
          <text:p/>
        </draw:polygon>
        <draw:polygon draw:style-name="gr269" draw:text-style-name="P267" draw:layer="layout" svg:width="0.027cm" svg:height="0.026cm" svg:x="13.489cm" svg:y="14.046cm" svg:viewBox="0 0 28 27" draw:points="0,0 28,0 28,27 0,27">
          <text:p/>
        </draw:polygon>
        <draw:polygon draw:style-name="gr269" draw:text-style-name="P267" draw:layer="layout" svg:width="0.027cm" svg:height="0.026cm" svg:x="13.542cm" svg:y="14.046cm" svg:viewBox="0 0 28 27" draw:points="0,0 28,0 28,27 0,27">
          <text:p/>
        </draw:polygon>
        <draw:polygon draw:style-name="gr269" draw:text-style-name="P267" draw:layer="layout" svg:width="0.027cm" svg:height="0.026cm" svg:x="13.595cm" svg:y="14.046cm" svg:viewBox="0 0 28 27" draw:points="0,0 28,0 28,27 0,27">
          <text:p/>
        </draw:polygon>
        <draw:polygon draw:style-name="gr269" draw:text-style-name="P267" draw:layer="layout" svg:width="0.027cm" svg:height="0.026cm" svg:x="13.648cm" svg:y="14.046cm" svg:viewBox="0 0 28 27" draw:points="0,0 28,0 28,27 0,27">
          <text:p/>
        </draw:polygon>
        <draw:polygon draw:style-name="gr269" draw:text-style-name="P267" draw:layer="layout" svg:width="0.027cm" svg:height="0.026cm" svg:x="13.701cm" svg:y="14.046cm" svg:viewBox="0 0 28 27" draw:points="0,0 28,0 28,27 0,27">
          <text:p/>
        </draw:polygon>
        <draw:polygon draw:style-name="gr269" draw:text-style-name="P267" draw:layer="layout" svg:width="0.027cm" svg:height="0.026cm" svg:x="13.754cm" svg:y="14.046cm" svg:viewBox="0 0 28 27" draw:points="0,0 28,0 28,27 0,27">
          <text:p/>
        </draw:polygon>
        <draw:polygon draw:style-name="gr269" draw:text-style-name="P267" draw:layer="layout" svg:width="0.027cm" svg:height="0.026cm" svg:x="13.807cm" svg:y="14.046cm" svg:viewBox="0 0 28 27" draw:points="0,0 28,0 28,27 0,27">
          <text:p/>
        </draw:polygon>
        <draw:polygon draw:style-name="gr269" draw:text-style-name="P267" draw:layer="layout" svg:width="0.027cm" svg:height="0.026cm" svg:x="13.86cm" svg:y="14.046cm" svg:viewBox="0 0 28 27" draw:points="0,0 28,0 28,27 0,27">
          <text:p/>
        </draw:polygon>
        <draw:polygon draw:style-name="gr269" draw:text-style-name="P267" draw:layer="layout" svg:width="0.027cm" svg:height="0.026cm" svg:x="13.913cm" svg:y="14.046cm" svg:viewBox="0 0 28 27" draw:points="0,0 28,0 28,27 0,27">
          <text:p/>
        </draw:polygon>
        <draw:polygon draw:style-name="gr269" draw:text-style-name="P267" draw:layer="layout" svg:width="0.027cm" svg:height="0.026cm" svg:x="13.966cm" svg:y="14.046cm" svg:viewBox="0 0 28 27" draw:points="0,0 28,0 28,27 0,27">
          <text:p/>
        </draw:polygon>
        <draw:polygon draw:style-name="gr269" draw:text-style-name="P267" draw:layer="layout" svg:width="0.027cm" svg:height="0.026cm" svg:x="14.019cm" svg:y="14.046cm" svg:viewBox="0 0 28 27" draw:points="0,0 28,0 28,27 0,27">
          <text:p/>
        </draw:polygon>
        <draw:polygon draw:style-name="gr269" draw:text-style-name="P267" draw:layer="layout" svg:width="0.027cm" svg:height="0.026cm" svg:x="14.072cm" svg:y="14.046cm" svg:viewBox="0 0 28 27" draw:points="0,0 28,0 28,27 0,27">
          <text:p/>
        </draw:polygon>
        <draw:polygon draw:style-name="gr269" draw:text-style-name="P267" draw:layer="layout" svg:width="0.027cm" svg:height="0.026cm" svg:x="14.125cm" svg:y="14.046cm" svg:viewBox="0 0 28 27" draw:points="0,0 28,0 28,27 0,27">
          <text:p/>
        </draw:polygon>
        <draw:polygon draw:style-name="gr269" draw:text-style-name="P267" draw:layer="layout" svg:width="0.027cm" svg:height="0.026cm" svg:x="14.178cm" svg:y="14.046cm" svg:viewBox="0 0 28 27" draw:points="0,0 28,0 28,27 0,27">
          <text:p/>
        </draw:polygon>
        <draw:polygon draw:style-name="gr269" draw:text-style-name="P267" draw:layer="layout" svg:width="0.027cm" svg:height="0.026cm" svg:x="14.231cm" svg:y="14.046cm" svg:viewBox="0 0 28 27" draw:points="0,0 28,0 28,27 0,27">
          <text:p/>
        </draw:polygon>
        <draw:polygon draw:style-name="gr269" draw:text-style-name="P267" draw:layer="layout" svg:width="0.027cm" svg:height="0.026cm" svg:x="14.284cm" svg:y="14.046cm" svg:viewBox="0 0 28 27" draw:points="0,0 28,0 28,27 0,27">
          <text:p/>
        </draw:polygon>
        <draw:polygon draw:style-name="gr269" draw:text-style-name="P267" draw:layer="layout" svg:width="0.027cm" svg:height="0.026cm" svg:x="14.337cm" svg:y="14.046cm" svg:viewBox="0 0 28 27" draw:points="0,0 28,0 28,27 0,27">
          <text:p/>
        </draw:polygon>
        <draw:polygon draw:style-name="gr269" draw:text-style-name="P267" draw:layer="layout" svg:width="0.028cm" svg:height="0.026cm" svg:x="14.39cm" svg:y="14.046cm" svg:viewBox="0 0 29 27" draw:points="0,0 29,0 29,27 0,27">
          <text:p/>
        </draw:polygon>
        <draw:polygon draw:style-name="gr269" draw:text-style-name="P267" draw:layer="layout" svg:width="0.027cm" svg:height="0.026cm" svg:x="14.443cm" svg:y="14.046cm" svg:viewBox="0 0 28 27" draw:points="0,0 28,0 28,27 0,27">
          <text:p/>
        </draw:polygon>
        <draw:polygon draw:style-name="gr269" draw:text-style-name="P267" draw:layer="layout" svg:width="0.027cm" svg:height="0.026cm" svg:x="14.496cm" svg:y="14.046cm" svg:viewBox="0 0 28 27" draw:points="0,0 28,0 28,27 0,27">
          <text:p/>
        </draw:polygon>
        <draw:polygon draw:style-name="gr269" draw:text-style-name="P267" draw:layer="layout" svg:width="0.027cm" svg:height="0.026cm" svg:x="14.549cm" svg:y="14.046cm" svg:viewBox="0 0 28 27" draw:points="0,0 28,0 28,27 0,27">
          <text:p/>
        </draw:polygon>
        <draw:polygon draw:style-name="gr269" draw:text-style-name="P267" draw:layer="layout" svg:width="0.027cm" svg:height="0.026cm" svg:x="14.602cm" svg:y="14.046cm" svg:viewBox="0 0 28 27" draw:points="0,0 28,0 28,27 0,27">
          <text:p/>
        </draw:polygon>
        <draw:polygon draw:style-name="gr269" draw:text-style-name="P267" draw:layer="layout" svg:width="0.027cm" svg:height="0.026cm" svg:x="14.655cm" svg:y="14.046cm" svg:viewBox="0 0 28 27" draw:points="0,0 28,0 28,27 0,27">
          <text:p/>
        </draw:polygon>
        <draw:polygon draw:style-name="gr269" draw:text-style-name="P267" draw:layer="layout" svg:width="0.027cm" svg:height="0.026cm" svg:x="14.708cm" svg:y="14.046cm" svg:viewBox="0 0 28 27" draw:points="0,0 28,0 28,27 0,27">
          <text:p/>
        </draw:polygon>
        <draw:polygon draw:style-name="gr269" draw:text-style-name="P267" draw:layer="layout" svg:width="0.027cm" svg:height="0.026cm" svg:x="14.761cm" svg:y="14.046cm" svg:viewBox="0 0 28 27" draw:points="0,0 28,0 28,27 0,27">
          <text:p/>
        </draw:polygon>
        <draw:polygon draw:style-name="gr269" draw:text-style-name="P267" draw:layer="layout" svg:width="0.027cm" svg:height="0.026cm" svg:x="14.814cm" svg:y="14.046cm" svg:viewBox="0 0 28 27" draw:points="0,0 28,0 28,27 0,27">
          <text:p/>
        </draw:polygon>
        <draw:polygon draw:style-name="gr269" draw:text-style-name="P267" draw:layer="layout" svg:width="0.027cm" svg:height="0.026cm" svg:x="14.867cm" svg:y="14.046cm" svg:viewBox="0 0 28 27" draw:points="0,0 28,0 28,27 0,27">
          <text:p/>
        </draw:polygon>
        <draw:polygon draw:style-name="gr269" draw:text-style-name="P267" draw:layer="layout" svg:width="0.027cm" svg:height="0.026cm" svg:x="14.92cm" svg:y="14.046cm" svg:viewBox="0 0 28 27" draw:points="0,0 28,0 28,27 0,27">
          <text:p/>
        </draw:polygon>
        <draw:polygon draw:style-name="gr269" draw:text-style-name="P267" draw:layer="layout" svg:width="0.027cm" svg:height="0.026cm" svg:x="14.973cm" svg:y="14.046cm" svg:viewBox="0 0 28 27" draw:points="0,0 28,0 28,27 0,27">
          <text:p/>
        </draw:polygon>
        <draw:polygon draw:style-name="gr269" draw:text-style-name="P267" draw:layer="layout" svg:width="0.027cm" svg:height="0.026cm" svg:x="15.026cm" svg:y="14.046cm" svg:viewBox="0 0 28 27" draw:points="0,0 28,0 28,27 0,27">
          <text:p/>
        </draw:polygon>
        <draw:polygon draw:style-name="gr269" draw:text-style-name="P267" draw:layer="layout" svg:width="0.027cm" svg:height="0.026cm" svg:x="15.079cm" svg:y="14.046cm" svg:viewBox="0 0 28 27" draw:points="0,0 28,0 28,27 0,27">
          <text:p/>
        </draw:polygon>
        <draw:polygon draw:style-name="gr269" draw:text-style-name="P267" draw:layer="layout" svg:width="0.027cm" svg:height="0.026cm" svg:x="15.132cm" svg:y="14.046cm" svg:viewBox="0 0 28 27" draw:points="0,0 28,0 28,27 0,27">
          <text:p/>
        </draw:polygon>
        <draw:polygon draw:style-name="gr269" draw:text-style-name="P267" draw:layer="layout" svg:width="0.027cm" svg:height="0.026cm" svg:x="15.185cm" svg:y="14.046cm" svg:viewBox="0 0 28 27" draw:points="0,0 28,0 28,27 0,27">
          <text:p/>
        </draw:polygon>
        <draw:polygon draw:style-name="gr269" draw:text-style-name="P267" draw:layer="layout" svg:width="0.027cm" svg:height="0.026cm" svg:x="15.238cm" svg:y="14.046cm" svg:viewBox="0 0 28 27" draw:points="0,0 28,0 28,27 0,27">
          <text:p/>
        </draw:polygon>
        <draw:polygon draw:style-name="gr269" draw:text-style-name="P267" draw:layer="layout" svg:width="0.027cm" svg:height="0.026cm" svg:x="15.291cm" svg:y="14.046cm" svg:viewBox="0 0 28 27" draw:points="0,0 28,0 28,27 0,27">
          <text:p/>
        </draw:polygon>
        <draw:polygon draw:style-name="gr269" draw:text-style-name="P267" draw:layer="layout" svg:width="0.027cm" svg:height="0.026cm" svg:x="15.344cm" svg:y="14.046cm" svg:viewBox="0 0 28 27" draw:points="0,0 28,0 28,27 0,27">
          <text:p/>
        </draw:polygon>
        <draw:polygon draw:style-name="gr269" draw:text-style-name="P267" draw:layer="layout" svg:width="0.027cm" svg:height="0.026cm" svg:x="15.397cm" svg:y="14.046cm" svg:viewBox="0 0 28 27" draw:points="0,0 28,0 28,27 0,27">
          <text:p/>
        </draw:polygon>
        <draw:polygon draw:style-name="gr269" draw:text-style-name="P267" draw:layer="layout" svg:width="0.027cm" svg:height="0.026cm" svg:x="15.45cm" svg:y="14.046cm" svg:viewBox="0 0 28 27" draw:points="0,0 28,0 28,27 0,27">
          <text:p/>
        </draw:polygon>
        <draw:polygon draw:style-name="gr269" draw:text-style-name="P267" draw:layer="layout" svg:width="0.027cm" svg:height="0.026cm" svg:x="15.503cm" svg:y="14.046cm" svg:viewBox="0 0 28 27" draw:points="0,0 28,0 28,27 0,27">
          <text:p/>
        </draw:polygon>
        <draw:polygon draw:style-name="gr269" draw:text-style-name="P267" draw:layer="layout" svg:width="0.027cm" svg:height="0.026cm" svg:x="15.556cm" svg:y="14.046cm" svg:viewBox="0 0 28 27" draw:points="0,0 28,0 28,27 0,27">
          <text:p/>
        </draw:polygon>
        <draw:polygon draw:style-name="gr269" draw:text-style-name="P267" draw:layer="layout" svg:width="0.027cm" svg:height="0.026cm" svg:x="15.609cm" svg:y="14.046cm" svg:viewBox="0 0 28 27" draw:points="0,0 28,0 28,27 0,27">
          <text:p/>
        </draw:polygon>
        <draw:polygon draw:style-name="gr269" draw:text-style-name="P267" draw:layer="layout" svg:width="0.027cm" svg:height="0.026cm" svg:x="15.662cm" svg:y="14.046cm" svg:viewBox="0 0 28 27" draw:points="0,0 28,0 28,27 0,27">
          <text:p/>
        </draw:polygon>
        <draw:polygon draw:style-name="gr269" draw:text-style-name="P267" draw:layer="layout" svg:width="0.027cm" svg:height="0.026cm" svg:x="15.715cm" svg:y="14.046cm" svg:viewBox="0 0 28 27" draw:points="0,0 28,0 28,27 0,27">
          <text:p/>
        </draw:polygon>
        <draw:polygon draw:style-name="gr269" draw:text-style-name="P267" draw:layer="layout" svg:width="0.028cm" svg:height="0.026cm" svg:x="15.768cm" svg:y="14.046cm" svg:viewBox="0 0 29 27" draw:points="0,0 29,0 29,27 0,27">
          <text:p/>
        </draw:polygon>
        <draw:polygon draw:style-name="gr269" draw:text-style-name="P267" draw:layer="layout" svg:width="0.027cm" svg:height="0.026cm" svg:x="15.821cm" svg:y="14.046cm" svg:viewBox="0 0 28 27" draw:points="0,0 28,0 28,27 0,27">
          <text:p/>
        </draw:polygon>
        <draw:polygon draw:style-name="gr269" draw:text-style-name="P267" draw:layer="layout" svg:width="0.027cm" svg:height="0.026cm" svg:x="15.874cm" svg:y="14.046cm" svg:viewBox="0 0 28 27" draw:points="0,0 28,0 28,27 0,27">
          <text:p/>
        </draw:polygon>
        <draw:polygon draw:style-name="gr269" draw:text-style-name="P267" draw:layer="layout" svg:width="0.027cm" svg:height="0.026cm" svg:x="15.927cm" svg:y="14.046cm" svg:viewBox="0 0 28 27" draw:points="0,0 28,0 28,27 0,27">
          <text:p/>
        </draw:polygon>
        <draw:polygon draw:style-name="gr269" draw:text-style-name="P267" draw:layer="layout" svg:width="0.027cm" svg:height="0.026cm" svg:x="15.98cm" svg:y="14.046cm" svg:viewBox="0 0 28 27" draw:points="0,0 28,0 28,27 0,27">
          <text:p/>
        </draw:polygon>
        <draw:polygon draw:style-name="gr269" draw:text-style-name="P267" draw:layer="layout" svg:width="0.027cm" svg:height="0.026cm" svg:x="16.033cm" svg:y="14.046cm" svg:viewBox="0 0 28 27" draw:points="0,0 28,0 28,27 0,27">
          <text:p/>
        </draw:polygon>
        <draw:polygon draw:style-name="gr269" draw:text-style-name="P267" draw:layer="layout" svg:width="0.027cm" svg:height="0.026cm" svg:x="16.086cm" svg:y="14.046cm" svg:viewBox="0 0 28 27" draw:points="0,0 28,0 28,27 0,27">
          <text:p/>
        </draw:polygon>
        <draw:polygon draw:style-name="gr269" draw:text-style-name="P267" draw:layer="layout" svg:width="0.027cm" svg:height="0.026cm" svg:x="16.139cm" svg:y="14.046cm" svg:viewBox="0 0 28 27" draw:points="0,0 28,0 28,27 0,27">
          <text:p/>
        </draw:polygon>
        <draw:polygon draw:style-name="gr269" draw:text-style-name="P267" draw:layer="layout" svg:width="0.027cm" svg:height="0.026cm" svg:x="16.192cm" svg:y="14.046cm" svg:viewBox="0 0 28 27" draw:points="0,0 28,0 28,27 0,27">
          <text:p/>
        </draw:polygon>
        <draw:polygon draw:style-name="gr269" draw:text-style-name="P267" draw:layer="layout" svg:width="0.027cm" svg:height="0.026cm" svg:x="16.245cm" svg:y="14.046cm" svg:viewBox="0 0 28 27" draw:points="0,0 28,0 28,27 0,27">
          <text:p/>
        </draw:polygon>
        <draw:polygon draw:style-name="gr269" draw:text-style-name="P267" draw:layer="layout" svg:width="0.027cm" svg:height="0.026cm" svg:x="16.298cm" svg:y="14.046cm" svg:viewBox="0 0 28 27" draw:points="0,0 28,0 28,27 0,27">
          <text:p/>
        </draw:polygon>
        <draw:polygon draw:style-name="gr269" draw:text-style-name="P267" draw:layer="layout" svg:width="0.027cm" svg:height="0.026cm" svg:x="16.351cm" svg:y="14.046cm" svg:viewBox="0 0 28 27" draw:points="0,0 28,0 28,27 0,27">
          <text:p/>
        </draw:polygon>
        <draw:polygon draw:style-name="gr269" draw:text-style-name="P267" draw:layer="layout" svg:width="0.027cm" svg:height="0.026cm" svg:x="16.404cm" svg:y="14.046cm" svg:viewBox="0 0 28 27" draw:points="0,0 28,0 28,27 0,27">
          <text:p/>
        </draw:polygon>
        <draw:polygon draw:style-name="gr269" draw:text-style-name="P267" draw:layer="layout" svg:width="0.027cm" svg:height="0.026cm" svg:x="16.457cm" svg:y="14.046cm" svg:viewBox="0 0 28 27" draw:points="0,0 28,0 28,27 0,27">
          <text:p/>
        </draw:polygon>
        <draw:polygon draw:style-name="gr269" draw:text-style-name="P267" draw:layer="layout" svg:width="0.027cm" svg:height="0.026cm" svg:x="16.51cm" svg:y="14.046cm" svg:viewBox="0 0 28 27" draw:points="0,0 28,0 28,27 0,27">
          <text:p/>
        </draw:polygon>
        <draw:polygon draw:style-name="gr269" draw:text-style-name="P267" draw:layer="layout" svg:width="0.027cm" svg:height="0.026cm" svg:x="16.563cm" svg:y="14.046cm" svg:viewBox="0 0 28 27" draw:points="0,0 28,0 28,27 0,27">
          <text:p/>
        </draw:polygon>
        <draw:polygon draw:style-name="gr269" draw:text-style-name="P267" draw:layer="layout" svg:width="0.027cm" svg:height="0.026cm" svg:x="16.616cm" svg:y="14.046cm" svg:viewBox="0 0 28 27" draw:points="0,0 28,0 28,27 0,27">
          <text:p/>
        </draw:polygon>
        <draw:polygon draw:style-name="gr269" draw:text-style-name="P267" draw:layer="layout" svg:width="0.027cm" svg:height="0.026cm" svg:x="16.669cm" svg:y="14.046cm" svg:viewBox="0 0 28 27" draw:points="0,0 28,0 28,27 0,27">
          <text:p/>
        </draw:polygon>
        <draw:polygon draw:style-name="gr269" draw:text-style-name="P267" draw:layer="layout" svg:width="0.027cm" svg:height="0.026cm" svg:x="16.722cm" svg:y="14.046cm" svg:viewBox="0 0 28 27" draw:points="0,0 28,0 28,27 0,27">
          <text:p/>
        </draw:polygon>
        <draw:polygon draw:style-name="gr269" draw:text-style-name="P267" draw:layer="layout" svg:width="0.027cm" svg:height="0.026cm" svg:x="16.775cm" svg:y="14.046cm" svg:viewBox="0 0 28 27" draw:points="0,0 28,0 28,27 0,27">
          <text:p/>
        </draw:polygon>
        <draw:polygon draw:style-name="gr269" draw:text-style-name="P267" draw:layer="layout" svg:width="0.027cm" svg:height="0.026cm" svg:x="16.828cm" svg:y="14.046cm" svg:viewBox="0 0 28 27" draw:points="0,0 28,0 28,27 0,27">
          <text:p/>
        </draw:polygon>
        <draw:polygon draw:style-name="gr269" draw:text-style-name="P267" draw:layer="layout" svg:width="0.027cm" svg:height="0.026cm" svg:x="16.881cm" svg:y="14.046cm" svg:viewBox="0 0 28 27" draw:points="0,0 28,0 28,27 0,27">
          <text:p/>
        </draw:polygon>
        <draw:polygon draw:style-name="gr269" draw:text-style-name="P267" draw:layer="layout" svg:width="0.027cm" svg:height="0.026cm" svg:x="16.934cm" svg:y="14.046cm" svg:viewBox="0 0 28 27" draw:points="0,0 28,0 28,27 0,27">
          <text:p/>
        </draw:polygon>
        <draw:polygon draw:style-name="gr269" draw:text-style-name="P267" draw:layer="layout" svg:width="0.027cm" svg:height="0.026cm" svg:x="16.987cm" svg:y="14.046cm" svg:viewBox="0 0 28 27" draw:points="0,0 28,0 28,27 0,27">
          <text:p/>
        </draw:polygon>
        <draw:polygon draw:style-name="gr269" draw:text-style-name="P267" draw:layer="layout" svg:width="0.027cm" svg:height="0.026cm" svg:x="17.04cm" svg:y="14.046cm" svg:viewBox="0 0 28 27" draw:points="0,0 28,0 28,27 0,27">
          <text:p/>
        </draw:polygon>
        <draw:polygon draw:style-name="gr269" draw:text-style-name="P267" draw:layer="layout" svg:width="0.027cm" svg:height="0.026cm" svg:x="17.093cm" svg:y="14.046cm" svg:viewBox="0 0 28 27" draw:points="0,0 28,0 28,27 0,27">
          <text:p/>
        </draw:polygon>
        <draw:polygon draw:style-name="gr269" draw:text-style-name="P267" draw:layer="layout" svg:width="0.028cm" svg:height="0.026cm" svg:x="17.146cm" svg:y="14.046cm" svg:viewBox="0 0 29 27" draw:points="0,0 29,0 29,27 0,27">
          <text:p/>
        </draw:polygon>
        <draw:polygon draw:style-name="gr269" draw:text-style-name="P267" draw:layer="layout" svg:width="0.027cm" svg:height="0.026cm" svg:x="17.199cm" svg:y="14.046cm" svg:viewBox="0 0 28 27" draw:points="0,0 28,0 28,27 0,27">
          <text:p/>
        </draw:polygon>
        <draw:polygon draw:style-name="gr269" draw:text-style-name="P267" draw:layer="layout" svg:width="0.027cm" svg:height="0.026cm" svg:x="17.252cm" svg:y="14.046cm" svg:viewBox="0 0 28 27" draw:points="0,0 28,0 28,27 0,27">
          <text:p/>
        </draw:polygon>
        <draw:polygon draw:style-name="gr269" draw:text-style-name="P267" draw:layer="layout" svg:width="0.027cm" svg:height="0.026cm" svg:x="17.305cm" svg:y="14.046cm" svg:viewBox="0 0 28 27" draw:points="0,0 28,0 28,27 0,27">
          <text:p/>
        </draw:polygon>
        <draw:polygon draw:style-name="gr269" draw:text-style-name="P267" draw:layer="layout" svg:width="0.027cm" svg:height="0.026cm" svg:x="17.358cm" svg:y="14.046cm" svg:viewBox="0 0 28 27" draw:points="0,0 28,0 28,27 0,27">
          <text:p/>
        </draw:polygon>
        <draw:polygon draw:style-name="gr269" draw:text-style-name="P267" draw:layer="layout" svg:width="0.027cm" svg:height="0.026cm" svg:x="17.411cm" svg:y="14.046cm" svg:viewBox="0 0 28 27" draw:points="0,0 28,0 28,27 0,27">
          <text:p/>
        </draw:polygon>
        <draw:polygon draw:style-name="gr269" draw:text-style-name="P267" draw:layer="layout" svg:width="0.027cm" svg:height="0.026cm" svg:x="17.464cm" svg:y="14.046cm" svg:viewBox="0 0 28 27" draw:points="0,0 28,0 28,27 0,27">
          <text:p/>
        </draw:polygon>
        <draw:polygon draw:style-name="gr269" draw:text-style-name="P267" draw:layer="layout" svg:width="0.027cm" svg:height="0.026cm" svg:x="17.517cm" svg:y="14.046cm" svg:viewBox="0 0 28 27" draw:points="0,0 28,0 28,27 0,27">
          <text:p/>
        </draw:polygon>
        <draw:polygon draw:style-name="gr269" draw:text-style-name="P267" draw:layer="layout" svg:width="0.027cm" svg:height="0.026cm" svg:x="17.57cm" svg:y="14.046cm" svg:viewBox="0 0 28 27" draw:points="0,0 28,0 28,27 0,27">
          <text:p/>
        </draw:polygon>
        <draw:polygon draw:style-name="gr269" draw:text-style-name="P267" draw:layer="layout" svg:width="0.027cm" svg:height="0.026cm" svg:x="17.623cm" svg:y="14.046cm" svg:viewBox="0 0 28 27" draw:points="0,0 28,0 28,27 0,27">
          <text:p/>
        </draw:polygon>
        <draw:polygon draw:style-name="gr269" draw:text-style-name="P267" draw:layer="layout" svg:width="0.027cm" svg:height="0.026cm" svg:x="17.676cm" svg:y="14.046cm" svg:viewBox="0 0 28 27" draw:points="0,0 28,0 28,27 0,27">
          <text:p/>
        </draw:polygon>
        <draw:polygon draw:style-name="gr269" draw:text-style-name="P267" draw:layer="layout" svg:width="0.027cm" svg:height="0.026cm" svg:x="17.729cm" svg:y="14.046cm" svg:viewBox="0 0 28 27" draw:points="0,0 28,0 28,27 0,27">
          <text:p/>
        </draw:polygon>
        <draw:polygon draw:style-name="gr269" draw:text-style-name="P267" draw:layer="layout" svg:width="0.027cm" svg:height="0.026cm" svg:x="17.782cm" svg:y="14.046cm" svg:viewBox="0 0 28 27" draw:points="0,0 28,0 28,27 0,27">
          <text:p/>
        </draw:polygon>
        <draw:polygon draw:style-name="gr269" draw:text-style-name="P267" draw:layer="layout" svg:width="0.027cm" svg:height="0.026cm" svg:x="17.835cm" svg:y="14.046cm" svg:viewBox="0 0 28 27" draw:points="0,0 28,0 28,27 0,27">
          <text:p/>
        </draw:polygon>
        <draw:polygon draw:style-name="gr269" draw:text-style-name="P267" draw:layer="layout" svg:width="0.027cm" svg:height="0.026cm" svg:x="17.888cm" svg:y="14.046cm" svg:viewBox="0 0 28 27" draw:points="0,0 28,0 28,27 0,27">
          <text:p/>
        </draw:polygon>
        <draw:polygon draw:style-name="gr269" draw:text-style-name="P267" draw:layer="layout" svg:width="0.027cm" svg:height="0.026cm" svg:x="17.941cm" svg:y="14.046cm" svg:viewBox="0 0 28 27" draw:points="0,0 28,0 28,27 0,27">
          <text:p/>
        </draw:polygon>
        <draw:polygon draw:style-name="gr269" draw:text-style-name="P267" draw:layer="layout" svg:width="0.027cm" svg:height="0.026cm" svg:x="17.994cm" svg:y="14.046cm" svg:viewBox="0 0 28 27" draw:points="0,0 28,0 28,27 0,27">
          <text:p/>
        </draw:polygon>
        <draw:polygon draw:style-name="gr269" draw:text-style-name="P267" draw:layer="layout" svg:width="0.027cm" svg:height="0.026cm" svg:x="18.047cm" svg:y="14.046cm" svg:viewBox="0 0 28 27" draw:points="0,0 28,0 28,27 0,27">
          <text:p/>
        </draw:polygon>
        <draw:polygon draw:style-name="gr269" draw:text-style-name="P267" draw:layer="layout" svg:width="0.027cm" svg:height="0.026cm" svg:x="18.1cm" svg:y="14.046cm" svg:viewBox="0 0 28 27" draw:points="0,0 28,0 28,27 0,27">
          <text:p/>
        </draw:polygon>
        <draw:polygon draw:style-name="gr269" draw:text-style-name="P267" draw:layer="layout" svg:width="0.027cm" svg:height="0.026cm" svg:x="18.153cm" svg:y="14.046cm" svg:viewBox="0 0 28 27" draw:points="0,0 28,0 28,27 0,27">
          <text:p/>
        </draw:polygon>
        <draw:polygon draw:style-name="gr269" draw:text-style-name="P267" draw:layer="layout" svg:width="0.027cm" svg:height="0.026cm" svg:x="18.206cm" svg:y="14.046cm" svg:viewBox="0 0 28 27" draw:points="0,0 28,0 28,27 0,27">
          <text:p/>
        </draw:polygon>
        <draw:polygon draw:style-name="gr269" draw:text-style-name="P267" draw:layer="layout" svg:width="0.027cm" svg:height="0.026cm" svg:x="18.259cm" svg:y="14.046cm" svg:viewBox="0 0 28 27" draw:points="0,0 28,0 28,27 0,27">
          <text:p/>
        </draw:polygon>
        <draw:polygon draw:style-name="gr269" draw:text-style-name="P267" draw:layer="layout" svg:width="0.027cm" svg:height="0.026cm" svg:x="18.312cm" svg:y="14.046cm" svg:viewBox="0 0 28 27" draw:points="0,0 28,0 28,27 0,27">
          <text:p/>
        </draw:polygon>
        <draw:polygon draw:style-name="gr269" draw:text-style-name="P267" draw:layer="layout" svg:width="0.027cm" svg:height="0.026cm" svg:x="18.365cm" svg:y="14.046cm" svg:viewBox="0 0 28 27" draw:points="0,0 28,0 28,27 0,27">
          <text:p/>
        </draw:polygon>
        <draw:polygon draw:style-name="gr269" draw:text-style-name="P267" draw:layer="layout" svg:width="0.027cm" svg:height="0.026cm" svg:x="18.418cm" svg:y="14.046cm" svg:viewBox="0 0 28 27" draw:points="0,0 28,0 28,27 0,27">
          <text:p/>
        </draw:polygon>
        <draw:polygon draw:style-name="gr269" draw:text-style-name="P267" draw:layer="layout" svg:width="0.027cm" svg:height="0.026cm" svg:x="18.471cm" svg:y="14.046cm" svg:viewBox="0 0 28 27" draw:points="0,0 28,0 28,27 0,27">
          <text:p/>
        </draw:polygon>
        <draw:polygon draw:style-name="gr269" draw:text-style-name="P267" draw:layer="layout" svg:width="0.028cm" svg:height="0.026cm" svg:x="18.524cm" svg:y="14.046cm" svg:viewBox="0 0 29 27" draw:points="0,0 29,0 29,27 0,27">
          <text:p/>
        </draw:polygon>
        <draw:polygon draw:style-name="gr269" draw:text-style-name="P267" draw:layer="layout" svg:width="0.027cm" svg:height="0.026cm" svg:x="18.577cm" svg:y="14.046cm" svg:viewBox="0 0 28 27" draw:points="0,0 28,0 28,27 0,27">
          <text:p/>
        </draw:polygon>
        <draw:polygon draw:style-name="gr269" draw:text-style-name="P267" draw:layer="layout" svg:width="0.027cm" svg:height="0.026cm" svg:x="18.63cm" svg:y="14.046cm" svg:viewBox="0 0 28 27" draw:points="0,0 28,0 28,27 0,27">
          <text:p/>
        </draw:polygon>
        <draw:polygon draw:style-name="gr269" draw:text-style-name="P267" draw:layer="layout" svg:width="0.027cm" svg:height="0.026cm" svg:x="18.683cm" svg:y="14.046cm" svg:viewBox="0 0 28 27" draw:points="0,0 28,0 28,27 0,27">
          <text:p/>
        </draw:polygon>
        <draw:polygon draw:style-name="gr269" draw:text-style-name="P267" draw:layer="layout" svg:width="0.027cm" svg:height="0.026cm" svg:x="18.736cm" svg:y="14.046cm" svg:viewBox="0 0 28 27" draw:points="0,0 28,0 28,27 0,27">
          <text:p/>
        </draw:polygon>
        <draw:polygon draw:style-name="gr269" draw:text-style-name="P267" draw:layer="layout" svg:width="0.027cm" svg:height="0.026cm" svg:x="18.789cm" svg:y="14.046cm" svg:viewBox="0 0 28 27" draw:points="0,0 28,0 28,27 0,27">
          <text:p/>
        </draw:polygon>
        <draw:polygon draw:style-name="gr269" draw:text-style-name="P267" draw:layer="layout" svg:width="0.027cm" svg:height="0.026cm" svg:x="18.842cm" svg:y="14.046cm" svg:viewBox="0 0 28 27" draw:points="0,0 28,0 28,27 0,27">
          <text:p/>
        </draw:polygon>
        <draw:polygon draw:style-name="gr269" draw:text-style-name="P267" draw:layer="layout" svg:width="0.027cm" svg:height="0.026cm" svg:x="18.895cm" svg:y="14.046cm" svg:viewBox="0 0 28 27" draw:points="0,0 28,0 28,27 0,27">
          <text:p/>
        </draw:polygon>
        <draw:polygon draw:style-name="gr269" draw:text-style-name="P267" draw:layer="layout" svg:width="0.027cm" svg:height="0.026cm" svg:x="18.948cm" svg:y="14.046cm" svg:viewBox="0 0 28 27" draw:points="0,0 28,0 28,27 0,27">
          <text:p/>
        </draw:polygon>
        <draw:polygon draw:style-name="gr269" draw:text-style-name="P267" draw:layer="layout" svg:width="0.027cm" svg:height="0.026cm" svg:x="19.001cm" svg:y="14.046cm" svg:viewBox="0 0 28 27" draw:points="0,0 28,0 28,27 0,27">
          <text:p/>
        </draw:polygon>
        <draw:polygon draw:style-name="gr269" draw:text-style-name="P267" draw:layer="layout" svg:width="0.053cm" svg:height="0.027cm" svg:x="2.014cm" svg:y="15.026cm" svg:viewBox="0 0 54 28" draw:points="0,0 54,0 54,28 0,28">
          <text:p/>
        </draw:polygon>
        <draw:polygon draw:style-name="gr269" draw:text-style-name="P267" draw:layer="layout" svg:width="0.027cm" svg:height="0.027cm" svg:x="2.093cm" svg:y="15.026cm" svg:viewBox="0 0 28 28" draw:points="0,0 28,0 28,28 0,28">
          <text:p/>
        </draw:polygon>
        <draw:polygon draw:style-name="gr269" draw:text-style-name="P267" draw:layer="layout" svg:width="0.027cm" svg:height="0.027cm" svg:x="2.146cm" svg:y="15.026cm" svg:viewBox="0 0 28 28" draw:points="0,0 28,0 28,28 0,28">
          <text:p/>
        </draw:polygon>
        <draw:polygon draw:style-name="gr269" draw:text-style-name="P267" draw:layer="layout" svg:width="0.027cm" svg:height="0.027cm" svg:x="2.199cm" svg:y="15.026cm" svg:viewBox="0 0 28 28" draw:points="0,0 28,0 28,28 0,28">
          <text:p/>
        </draw:polygon>
        <draw:polygon draw:style-name="gr269" draw:text-style-name="P267" draw:layer="layout" svg:width="0.027cm" svg:height="0.027cm" svg:x="2.252cm" svg:y="15.026cm" svg:viewBox="0 0 28 28" draw:points="0,0 28,0 28,28 0,28">
          <text:p/>
        </draw:polygon>
        <draw:polygon draw:style-name="gr269" draw:text-style-name="P267" draw:layer="layout" svg:width="0.027cm" svg:height="0.027cm" svg:x="2.305cm" svg:y="15.026cm" svg:viewBox="0 0 28 28" draw:points="0,0 28,0 28,28 0,28">
          <text:p/>
        </draw:polygon>
        <draw:polygon draw:style-name="gr269" draw:text-style-name="P267" draw:layer="layout" svg:width="0.027cm" svg:height="0.027cm" svg:x="2.358cm" svg:y="15.026cm" svg:viewBox="0 0 28 28" draw:points="0,0 28,0 28,28 0,28">
          <text:p/>
        </draw:polygon>
        <draw:polygon draw:style-name="gr269" draw:text-style-name="P267" draw:layer="layout" svg:width="0.027cm" svg:height="0.027cm" svg:x="2.411cm" svg:y="15.026cm" svg:viewBox="0 0 28 28" draw:points="0,0 28,0 28,28 0,28">
          <text:p/>
        </draw:polygon>
        <draw:polygon draw:style-name="gr269" draw:text-style-name="P267" draw:layer="layout" svg:width="0.027cm" svg:height="0.027cm" svg:x="2.464cm" svg:y="15.026cm" svg:viewBox="0 0 28 28" draw:points="0,0 28,0 28,28 0,28">
          <text:p/>
        </draw:polygon>
        <draw:polygon draw:style-name="gr269" draw:text-style-name="P267" draw:layer="layout" svg:width="0.027cm" svg:height="0.027cm" svg:x="2.517cm" svg:y="15.026cm" svg:viewBox="0 0 28 28" draw:points="0,0 28,0 28,28 0,28">
          <text:p/>
        </draw:polygon>
        <draw:polygon draw:style-name="gr269" draw:text-style-name="P267" draw:layer="layout" svg:width="0.027cm" svg:height="0.027cm" svg:x="2.57cm" svg:y="15.026cm" svg:viewBox="0 0 28 28" draw:points="0,0 28,0 28,28 0,28">
          <text:p/>
        </draw:polygon>
        <draw:polygon draw:style-name="gr269" draw:text-style-name="P267" draw:layer="layout" svg:width="0.027cm" svg:height="0.027cm" svg:x="2.623cm" svg:y="15.026cm" svg:viewBox="0 0 28 28" draw:points="0,0 28,0 28,28 0,28">
          <text:p/>
        </draw:polygon>
        <draw:polygon draw:style-name="gr269" draw:text-style-name="P267" draw:layer="layout" svg:width="0.027cm" svg:height="0.027cm" svg:x="2.676cm" svg:y="15.026cm" svg:viewBox="0 0 28 28" draw:points="0,0 28,0 28,28 0,28">
          <text:p/>
        </draw:polygon>
        <draw:polygon draw:style-name="gr269" draw:text-style-name="P267" draw:layer="layout" svg:width="0.027cm" svg:height="0.027cm" svg:x="2.729cm" svg:y="15.026cm" svg:viewBox="0 0 28 28" draw:points="0,0 28,0 28,28 0,28">
          <text:p/>
        </draw:polygon>
        <draw:polygon draw:style-name="gr269" draw:text-style-name="P267" draw:layer="layout" svg:width="0.027cm" svg:height="0.027cm" svg:x="2.782cm" svg:y="15.026cm" svg:viewBox="0 0 28 28" draw:points="0,0 28,0 28,28 0,28">
          <text:p/>
        </draw:polygon>
        <draw:polygon draw:style-name="gr269" draw:text-style-name="P267" draw:layer="layout" svg:width="0.027cm" svg:height="0.027cm" svg:x="2.835cm" svg:y="15.026cm" svg:viewBox="0 0 28 28" draw:points="0,0 28,0 28,28 0,28">
          <text:p/>
        </draw:polygon>
        <draw:polygon draw:style-name="gr269" draw:text-style-name="P267" draw:layer="layout" svg:width="0.027cm" svg:height="0.027cm" svg:x="2.888cm" svg:y="15.026cm" svg:viewBox="0 0 28 28" draw:points="0,0 28,0 28,28 0,28">
          <text:p/>
        </draw:polygon>
        <draw:polygon draw:style-name="gr269" draw:text-style-name="P267" draw:layer="layout" svg:width="0.027cm" svg:height="0.027cm" svg:x="2.941cm" svg:y="15.026cm" svg:viewBox="0 0 28 28" draw:points="0,0 28,0 28,28 0,28">
          <text:p/>
        </draw:polygon>
        <draw:polygon draw:style-name="gr269" draw:text-style-name="P267" draw:layer="layout" svg:width="0.027cm" svg:height="0.027cm" svg:x="2.994cm" svg:y="15.026cm" svg:viewBox="0 0 28 28" draw:points="0,0 28,0 28,28 0,28">
          <text:p/>
        </draw:polygon>
        <draw:polygon draw:style-name="gr269" draw:text-style-name="P267" draw:layer="layout" svg:width="0.027cm" svg:height="0.027cm" svg:x="3.047cm" svg:y="15.026cm" svg:viewBox="0 0 28 28" draw:points="0,0 28,0 28,28 0,28">
          <text:p/>
        </draw:polygon>
        <draw:polygon draw:style-name="gr269" draw:text-style-name="P267" draw:layer="layout" svg:width="0.027cm" svg:height="0.027cm" svg:x="3.1cm" svg:y="15.026cm" svg:viewBox="0 0 28 28" draw:points="0,0 28,0 28,28 0,28">
          <text:p/>
        </draw:polygon>
        <draw:polygon draw:style-name="gr269" draw:text-style-name="P267" draw:layer="layout" svg:width="0.027cm" svg:height="0.027cm" svg:x="3.153cm" svg:y="15.026cm" svg:viewBox="0 0 28 28" draw:points="0,0 28,0 28,28 0,28">
          <text:p/>
        </draw:polygon>
        <draw:polygon draw:style-name="gr269" draw:text-style-name="P267" draw:layer="layout" svg:width="0.027cm" svg:height="0.027cm" svg:x="3.206cm" svg:y="15.026cm" svg:viewBox="0 0 28 28" draw:points="0,0 28,0 28,28 0,28">
          <text:p/>
        </draw:polygon>
        <draw:polygon draw:style-name="gr269" draw:text-style-name="P267" draw:layer="layout" svg:width="0.027cm" svg:height="0.027cm" svg:x="3.259cm" svg:y="15.026cm" svg:viewBox="0 0 28 28" draw:points="0,0 28,0 28,28 0,28">
          <text:p/>
        </draw:polygon>
        <draw:polygon draw:style-name="gr269" draw:text-style-name="P267" draw:layer="layout" svg:width="0.027cm" svg:height="0.027cm" svg:x="3.312cm" svg:y="15.026cm" svg:viewBox="0 0 28 28" draw:points="0,0 28,0 28,28 0,28">
          <text:p/>
        </draw:polygon>
        <draw:polygon draw:style-name="gr269" draw:text-style-name="P267" draw:layer="layout" svg:width="0.027cm" svg:height="0.027cm" svg:x="3.365cm" svg:y="15.026cm" svg:viewBox="0 0 28 28" draw:points="0,0 28,0 28,28 0,28">
          <text:p/>
        </draw:polygon>
        <draw:polygon draw:style-name="gr269" draw:text-style-name="P267" draw:layer="layout" svg:width="0.028cm" svg:height="0.027cm" svg:x="3.418cm" svg:y="15.026cm" svg:viewBox="0 0 29 28" draw:points="0,0 29,0 29,28 0,28">
          <text:p/>
        </draw:polygon>
        <draw:polygon draw:style-name="gr269" draw:text-style-name="P267" draw:layer="layout" svg:width="0.027cm" svg:height="0.027cm" svg:x="3.471cm" svg:y="15.026cm" svg:viewBox="0 0 28 28" draw:points="0,0 28,0 28,28 0,28">
          <text:p/>
        </draw:polygon>
        <draw:polygon draw:style-name="gr269" draw:text-style-name="P267" draw:layer="layout" svg:width="0.027cm" svg:height="0.027cm" svg:x="3.524cm" svg:y="15.026cm" svg:viewBox="0 0 28 28" draw:points="0,0 28,0 28,28 0,28">
          <text:p/>
        </draw:polygon>
        <draw:polygon draw:style-name="gr269" draw:text-style-name="P267" draw:layer="layout" svg:width="0.027cm" svg:height="0.027cm" svg:x="3.577cm" svg:y="15.026cm" svg:viewBox="0 0 28 28" draw:points="0,0 28,0 28,28 0,28">
          <text:p/>
        </draw:polygon>
        <draw:polygon draw:style-name="gr269" draw:text-style-name="P267" draw:layer="layout" svg:width="0.027cm" svg:height="0.027cm" svg:x="3.63cm" svg:y="15.026cm" svg:viewBox="0 0 28 28" draw:points="0,0 28,0 28,28 0,28">
          <text:p/>
        </draw:polygon>
        <draw:polygon draw:style-name="gr269" draw:text-style-name="P267" draw:layer="layout" svg:width="0.027cm" svg:height="0.027cm" svg:x="3.683cm" svg:y="15.026cm" svg:viewBox="0 0 28 28" draw:points="0,0 28,0 28,28 0,28">
          <text:p/>
        </draw:polygon>
        <draw:polygon draw:style-name="gr269" draw:text-style-name="P267" draw:layer="layout" svg:width="0.027cm" svg:height="0.027cm" svg:x="3.736cm" svg:y="15.026cm" svg:viewBox="0 0 28 28" draw:points="0,0 28,0 28,28 0,28">
          <text:p/>
        </draw:polygon>
        <draw:polygon draw:style-name="gr269" draw:text-style-name="P267" draw:layer="layout" svg:width="0.027cm" svg:height="0.027cm" svg:x="3.789cm" svg:y="15.026cm" svg:viewBox="0 0 28 28" draw:points="0,0 28,0 28,28 0,28">
          <text:p/>
        </draw:polygon>
        <draw:polygon draw:style-name="gr269" draw:text-style-name="P267" draw:layer="layout" svg:width="0.027cm" svg:height="0.027cm" svg:x="3.842cm" svg:y="15.026cm" svg:viewBox="0 0 28 28" draw:points="0,0 28,0 28,28 0,28">
          <text:p/>
        </draw:polygon>
        <draw:polygon draw:style-name="gr269" draw:text-style-name="P267" draw:layer="layout" svg:width="0.027cm" svg:height="0.027cm" svg:x="3.895cm" svg:y="15.026cm" svg:viewBox="0 0 28 28" draw:points="0,0 28,0 28,28 0,28">
          <text:p/>
        </draw:polygon>
        <draw:polygon draw:style-name="gr269" draw:text-style-name="P267" draw:layer="layout" svg:width="0.027cm" svg:height="0.027cm" svg:x="3.948cm" svg:y="15.026cm" svg:viewBox="0 0 28 28" draw:points="0,0 28,0 28,28 0,28">
          <text:p/>
        </draw:polygon>
        <draw:polygon draw:style-name="gr269" draw:text-style-name="P267" draw:layer="layout" svg:width="0.027cm" svg:height="0.027cm" svg:x="4.001cm" svg:y="15.026cm" svg:viewBox="0 0 28 28" draw:points="0,0 28,0 28,28 0,28">
          <text:p/>
        </draw:polygon>
        <draw:polygon draw:style-name="gr269" draw:text-style-name="P267" draw:layer="layout" svg:width="0.027cm" svg:height="0.027cm" svg:x="4.054cm" svg:y="15.026cm" svg:viewBox="0 0 28 28" draw:points="0,0 28,0 28,28 0,28">
          <text:p/>
        </draw:polygon>
        <draw:polygon draw:style-name="gr269" draw:text-style-name="P267" draw:layer="layout" svg:width="0.027cm" svg:height="0.027cm" svg:x="4.107cm" svg:y="15.026cm" svg:viewBox="0 0 28 28" draw:points="0,0 28,0 28,28 0,28">
          <text:p/>
        </draw:polygon>
        <draw:polygon draw:style-name="gr269" draw:text-style-name="P267" draw:layer="layout" svg:width="0.027cm" svg:height="0.027cm" svg:x="4.16cm" svg:y="15.026cm" svg:viewBox="0 0 28 28" draw:points="0,0 28,0 28,28 0,28">
          <text:p/>
        </draw:polygon>
        <draw:polygon draw:style-name="gr269" draw:text-style-name="P267" draw:layer="layout" svg:width="0.027cm" svg:height="0.027cm" svg:x="4.213cm" svg:y="15.026cm" svg:viewBox="0 0 28 28" draw:points="0,0 28,0 28,28 0,28">
          <text:p/>
        </draw:polygon>
        <draw:polygon draw:style-name="gr269" draw:text-style-name="P267" draw:layer="layout" svg:width="0.027cm" svg:height="0.027cm" svg:x="4.266cm" svg:y="15.026cm" svg:viewBox="0 0 28 28" draw:points="0,0 28,0 28,28 0,28">
          <text:p/>
        </draw:polygon>
        <draw:polygon draw:style-name="gr269" draw:text-style-name="P267" draw:layer="layout" svg:width="0.027cm" svg:height="0.027cm" svg:x="4.319cm" svg:y="15.026cm" svg:viewBox="0 0 28 28" draw:points="0,0 28,0 28,28 0,28">
          <text:p/>
        </draw:polygon>
        <draw:polygon draw:style-name="gr269" draw:text-style-name="P267" draw:layer="layout" svg:width="0.027cm" svg:height="0.027cm" svg:x="4.372cm" svg:y="15.026cm" svg:viewBox="0 0 28 28" draw:points="0,0 28,0 28,28 0,28">
          <text:p/>
        </draw:polygon>
        <draw:polygon draw:style-name="gr269" draw:text-style-name="P267" draw:layer="layout" svg:width="0.027cm" svg:height="0.027cm" svg:x="4.425cm" svg:y="15.026cm" svg:viewBox="0 0 28 28" draw:points="0,0 28,0 28,28 0,28">
          <text:p/>
        </draw:polygon>
        <draw:polygon draw:style-name="gr269" draw:text-style-name="P267" draw:layer="layout" svg:width="0.027cm" svg:height="0.027cm" svg:x="4.478cm" svg:y="15.026cm" svg:viewBox="0 0 28 28" draw:points="0,0 28,0 28,28 0,28">
          <text:p/>
        </draw:polygon>
        <draw:polygon draw:style-name="gr269" draw:text-style-name="P267" draw:layer="layout" svg:width="0.027cm" svg:height="0.027cm" svg:x="4.531cm" svg:y="15.026cm" svg:viewBox="0 0 28 28" draw:points="0,0 28,0 28,28 0,28">
          <text:p/>
        </draw:polygon>
        <draw:polygon draw:style-name="gr269" draw:text-style-name="P267" draw:layer="layout" svg:width="0.027cm" svg:height="0.027cm" svg:x="4.584cm" svg:y="15.026cm" svg:viewBox="0 0 28 28" draw:points="0,0 28,0 28,28 0,28">
          <text:p/>
        </draw:polygon>
        <draw:polygon draw:style-name="gr269" draw:text-style-name="P267" draw:layer="layout" svg:width="0.027cm" svg:height="0.027cm" svg:x="4.637cm" svg:y="15.026cm" svg:viewBox="0 0 28 28" draw:points="0,0 28,0 28,28 0,28">
          <text:p/>
        </draw:polygon>
        <draw:polygon draw:style-name="gr269" draw:text-style-name="P267" draw:layer="layout" svg:width="0.027cm" svg:height="0.027cm" svg:x="4.69cm" svg:y="15.026cm" svg:viewBox="0 0 28 28" draw:points="0,0 28,0 28,28 0,28">
          <text:p/>
        </draw:polygon>
        <draw:polygon draw:style-name="gr269" draw:text-style-name="P267" draw:layer="layout" svg:width="0.027cm" svg:height="0.027cm" svg:x="4.743cm" svg:y="15.026cm" svg:viewBox="0 0 28 28" draw:points="0,0 28,0 28,28 0,28">
          <text:p/>
        </draw:polygon>
        <draw:polygon draw:style-name="gr269" draw:text-style-name="P267" draw:layer="layout" svg:width="0.028cm" svg:height="0.027cm" svg:x="4.796cm" svg:y="15.026cm" svg:viewBox="0 0 29 28" draw:points="0,0 29,0 29,28 0,28">
          <text:p/>
        </draw:polygon>
        <draw:polygon draw:style-name="gr269" draw:text-style-name="P267" draw:layer="layout" svg:width="0.027cm" svg:height="0.027cm" svg:x="4.849cm" svg:y="15.026cm" svg:viewBox="0 0 28 28" draw:points="0,0 28,0 28,28 0,28">
          <text:p/>
        </draw:polygon>
        <draw:polygon draw:style-name="gr269" draw:text-style-name="P267" draw:layer="layout" svg:width="0.027cm" svg:height="0.027cm" svg:x="4.902cm" svg:y="15.026cm" svg:viewBox="0 0 28 28" draw:points="0,0 28,0 28,28 0,28">
          <text:p/>
        </draw:polygon>
        <draw:polygon draw:style-name="gr269" draw:text-style-name="P267" draw:layer="layout" svg:width="0.027cm" svg:height="0.027cm" svg:x="4.955cm" svg:y="15.026cm" svg:viewBox="0 0 28 28" draw:points="0,0 28,0 28,28 0,28">
          <text:p/>
        </draw:polygon>
        <draw:polygon draw:style-name="gr269" draw:text-style-name="P267" draw:layer="layout" svg:width="0.027cm" svg:height="0.027cm" svg:x="5.008cm" svg:y="15.026cm" svg:viewBox="0 0 28 28" draw:points="0,0 28,0 28,28 0,28">
          <text:p/>
        </draw:polygon>
        <draw:polygon draw:style-name="gr269" draw:text-style-name="P267" draw:layer="layout" svg:width="0.027cm" svg:height="0.027cm" svg:x="5.061cm" svg:y="15.026cm" svg:viewBox="0 0 28 28" draw:points="0,0 28,0 28,28 0,28">
          <text:p/>
        </draw:polygon>
        <draw:polygon draw:style-name="gr269" draw:text-style-name="P267" draw:layer="layout" svg:width="0.027cm" svg:height="0.027cm" svg:x="5.114cm" svg:y="15.026cm" svg:viewBox="0 0 28 28" draw:points="0,0 28,0 28,28 0,28">
          <text:p/>
        </draw:polygon>
        <draw:polygon draw:style-name="gr269" draw:text-style-name="P267" draw:layer="layout" svg:width="0.027cm" svg:height="0.027cm" svg:x="5.167cm" svg:y="15.026cm" svg:viewBox="0 0 28 28" draw:points="0,0 28,0 28,28 0,28">
          <text:p/>
        </draw:polygon>
        <draw:polygon draw:style-name="gr269" draw:text-style-name="P267" draw:layer="layout" svg:width="0.027cm" svg:height="0.027cm" svg:x="5.22cm" svg:y="15.026cm" svg:viewBox="0 0 28 28" draw:points="0,0 28,0 28,28 0,28">
          <text:p/>
        </draw:polygon>
        <draw:polygon draw:style-name="gr269" draw:text-style-name="P267" draw:layer="layout" svg:width="0.027cm" svg:height="0.027cm" svg:x="5.273cm" svg:y="15.026cm" svg:viewBox="0 0 28 28" draw:points="0,0 28,0 28,28 0,28">
          <text:p/>
        </draw:polygon>
        <draw:polygon draw:style-name="gr269" draw:text-style-name="P267" draw:layer="layout" svg:width="0.027cm" svg:height="0.027cm" svg:x="5.326cm" svg:y="15.026cm" svg:viewBox="0 0 28 28" draw:points="0,0 28,0 28,28 0,28">
          <text:p/>
        </draw:polygon>
        <draw:polygon draw:style-name="gr269" draw:text-style-name="P267" draw:layer="layout" svg:width="0.027cm" svg:height="0.027cm" svg:x="5.379cm" svg:y="15.026cm" svg:viewBox="0 0 28 28" draw:points="0,0 28,0 28,28 0,28">
          <text:p/>
        </draw:polygon>
        <draw:polygon draw:style-name="gr269" draw:text-style-name="P267" draw:layer="layout" svg:width="0.027cm" svg:height="0.027cm" svg:x="5.432cm" svg:y="15.026cm" svg:viewBox="0 0 28 28" draw:points="0,0 28,0 28,28 0,28">
          <text:p/>
        </draw:polygon>
        <draw:polygon draw:style-name="gr269" draw:text-style-name="P267" draw:layer="layout" svg:width="0.027cm" svg:height="0.027cm" svg:x="5.485cm" svg:y="15.026cm" svg:viewBox="0 0 28 28" draw:points="0,0 28,0 28,28 0,28">
          <text:p/>
        </draw:polygon>
        <draw:polygon draw:style-name="gr269" draw:text-style-name="P267" draw:layer="layout" svg:width="0.027cm" svg:height="0.027cm" svg:x="5.538cm" svg:y="15.026cm" svg:viewBox="0 0 28 28" draw:points="0,0 28,0 28,28 0,28">
          <text:p/>
        </draw:polygon>
        <draw:polygon draw:style-name="gr269" draw:text-style-name="P267" draw:layer="layout" svg:width="0.027cm" svg:height="0.027cm" svg:x="5.591cm" svg:y="15.026cm" svg:viewBox="0 0 28 28" draw:points="0,0 28,0 28,28 0,28">
          <text:p/>
        </draw:polygon>
        <draw:polygon draw:style-name="gr269" draw:text-style-name="P267" draw:layer="layout" svg:width="0.027cm" svg:height="0.027cm" svg:x="5.644cm" svg:y="15.026cm" svg:viewBox="0 0 28 28" draw:points="0,0 28,0 28,28 0,28">
          <text:p/>
        </draw:polygon>
        <draw:polygon draw:style-name="gr269" draw:text-style-name="P267" draw:layer="layout" svg:width="0.027cm" svg:height="0.027cm" svg:x="5.697cm" svg:y="15.026cm" svg:viewBox="0 0 28 28" draw:points="0,0 28,0 28,28 0,28">
          <text:p/>
        </draw:polygon>
        <draw:polygon draw:style-name="gr269" draw:text-style-name="P267" draw:layer="layout" svg:width="0.027cm" svg:height="0.027cm" svg:x="5.75cm" svg:y="15.026cm" svg:viewBox="0 0 28 28" draw:points="0,0 28,0 28,28 0,28">
          <text:p/>
        </draw:polygon>
        <draw:polygon draw:style-name="gr269" draw:text-style-name="P267" draw:layer="layout" svg:width="0.027cm" svg:height="0.027cm" svg:x="5.803cm" svg:y="15.026cm" svg:viewBox="0 0 28 28" draw:points="0,0 28,0 28,28 0,28">
          <text:p/>
        </draw:polygon>
        <draw:polygon draw:style-name="gr269" draw:text-style-name="P267" draw:layer="layout" svg:width="0.027cm" svg:height="0.027cm" svg:x="5.856cm" svg:y="15.026cm" svg:viewBox="0 0 28 28" draw:points="0,0 28,0 28,28 0,28">
          <text:p/>
        </draw:polygon>
        <draw:polygon draw:style-name="gr269" draw:text-style-name="P267" draw:layer="layout" svg:width="0.027cm" svg:height="0.027cm" svg:x="5.909cm" svg:y="15.026cm" svg:viewBox="0 0 28 28" draw:points="0,0 28,0 28,28 0,28">
          <text:p/>
        </draw:polygon>
        <draw:polygon draw:style-name="gr269" draw:text-style-name="P267" draw:layer="layout" svg:width="0.027cm" svg:height="0.027cm" svg:x="5.962cm" svg:y="15.026cm" svg:viewBox="0 0 28 28" draw:points="0,0 28,0 28,28 0,28">
          <text:p/>
        </draw:polygon>
        <draw:polygon draw:style-name="gr269" draw:text-style-name="P267" draw:layer="layout" svg:width="0.027cm" svg:height="0.027cm" svg:x="6.015cm" svg:y="15.026cm" svg:viewBox="0 0 28 28" draw:points="0,0 28,0 28,28 0,28">
          <text:p/>
        </draw:polygon>
        <draw:polygon draw:style-name="gr269" draw:text-style-name="P267" draw:layer="layout" svg:width="0.027cm" svg:height="0.027cm" svg:x="6.068cm" svg:y="15.026cm" svg:viewBox="0 0 28 28" draw:points="0,0 28,0 28,28 0,28">
          <text:p/>
        </draw:polygon>
        <draw:polygon draw:style-name="gr269" draw:text-style-name="P267" draw:layer="layout" svg:width="0.027cm" svg:height="0.027cm" svg:x="6.121cm" svg:y="15.026cm" svg:viewBox="0 0 28 28" draw:points="0,0 28,0 28,28 0,28">
          <text:p/>
        </draw:polygon>
        <draw:polygon draw:style-name="gr269" draw:text-style-name="P267" draw:layer="layout" svg:width="0.028cm" svg:height="0.027cm" svg:x="6.174cm" svg:y="15.026cm" svg:viewBox="0 0 29 28" draw:points="0,0 29,0 29,28 0,28">
          <text:p/>
        </draw:polygon>
        <draw:polygon draw:style-name="gr269" draw:text-style-name="P267" draw:layer="layout" svg:width="0.027cm" svg:height="0.027cm" svg:x="6.227cm" svg:y="15.026cm" svg:viewBox="0 0 28 28" draw:points="0,0 28,0 28,28 0,28">
          <text:p/>
        </draw:polygon>
        <draw:polygon draw:style-name="gr269" draw:text-style-name="P267" draw:layer="layout" svg:width="0.027cm" svg:height="0.027cm" svg:x="6.28cm" svg:y="15.026cm" svg:viewBox="0 0 28 28" draw:points="0,0 28,0 28,28 0,28">
          <text:p/>
        </draw:polygon>
        <draw:polygon draw:style-name="gr269" draw:text-style-name="P267" draw:layer="layout" svg:width="0.027cm" svg:height="0.027cm" svg:x="6.333cm" svg:y="15.026cm" svg:viewBox="0 0 28 28" draw:points="0,0 28,0 28,28 0,28">
          <text:p/>
        </draw:polygon>
        <draw:polygon draw:style-name="gr269" draw:text-style-name="P267" draw:layer="layout" svg:width="0.026cm" svg:height="0.027cm" svg:x="6.387cm" svg:y="15.026cm" svg:viewBox="0 0 27 28" draw:points="0,0 27,0 27,28 0,28">
          <text:p/>
        </draw:polygon>
        <draw:polygon draw:style-name="gr269" draw:text-style-name="P267" draw:layer="layout" svg:width="0.026cm" svg:height="0.027cm" svg:x="6.44cm" svg:y="15.026cm" svg:viewBox="0 0 27 28" draw:points="0,0 27,0 27,28 0,28">
          <text:p/>
        </draw:polygon>
        <draw:polygon draw:style-name="gr269" draw:text-style-name="P267" draw:layer="layout" svg:width="0.026cm" svg:height="0.027cm" svg:x="6.493cm" svg:y="15.026cm" svg:viewBox="0 0 27 28" draw:points="0,0 27,0 27,28 0,28">
          <text:p/>
        </draw:polygon>
        <draw:polygon draw:style-name="gr269" draw:text-style-name="P267" draw:layer="layout" svg:width="0.026cm" svg:height="0.027cm" svg:x="6.546cm" svg:y="15.026cm" svg:viewBox="0 0 27 28" draw:points="0,0 27,0 27,28 0,28">
          <text:p/>
        </draw:polygon>
        <draw:polygon draw:style-name="gr269" draw:text-style-name="P267" draw:layer="layout" svg:width="0.026cm" svg:height="0.027cm" svg:x="6.599cm" svg:y="15.026cm" svg:viewBox="0 0 27 28" draw:points="0,0 27,0 27,28 0,28">
          <text:p/>
        </draw:polygon>
        <draw:polygon draw:style-name="gr269" draw:text-style-name="P267" draw:layer="layout" svg:width="0.026cm" svg:height="0.027cm" svg:x="6.652cm" svg:y="15.026cm" svg:viewBox="0 0 27 28" draw:points="0,0 27,0 27,28 0,28">
          <text:p/>
        </draw:polygon>
        <draw:polygon draw:style-name="gr269" draw:text-style-name="P267" draw:layer="layout" svg:width="0.026cm" svg:height="0.027cm" svg:x="6.705cm" svg:y="15.026cm" svg:viewBox="0 0 27 28" draw:points="0,0 27,0 27,28 0,28">
          <text:p/>
        </draw:polygon>
        <draw:polygon draw:style-name="gr269" draw:text-style-name="P267" draw:layer="layout" svg:width="0.026cm" svg:height="0.027cm" svg:x="6.758cm" svg:y="15.026cm" svg:viewBox="0 0 27 28" draw:points="0,0 27,0 27,28 0,28">
          <text:p/>
        </draw:polygon>
        <draw:polygon draw:style-name="gr269" draw:text-style-name="P267" draw:layer="layout" svg:width="0.026cm" svg:height="0.027cm" svg:x="6.811cm" svg:y="15.026cm" svg:viewBox="0 0 27 28" draw:points="0,0 27,0 27,28 0,28">
          <text:p/>
        </draw:polygon>
        <draw:polygon draw:style-name="gr269" draw:text-style-name="P267" draw:layer="layout" svg:width="0.026cm" svg:height="0.027cm" svg:x="6.864cm" svg:y="15.026cm" svg:viewBox="0 0 27 28" draw:points="0,0 27,0 27,28 0,28">
          <text:p/>
        </draw:polygon>
        <draw:polygon draw:style-name="gr269" draw:text-style-name="P267" draw:layer="layout" svg:width="0.026cm" svg:height="0.027cm" svg:x="6.917cm" svg:y="15.026cm" svg:viewBox="0 0 27 28" draw:points="0,0 27,0 27,28 0,28">
          <text:p/>
        </draw:polygon>
        <draw:polygon draw:style-name="gr269" draw:text-style-name="P267" draw:layer="layout" svg:width="0.026cm" svg:height="0.027cm" svg:x="6.97cm" svg:y="15.026cm" svg:viewBox="0 0 27 28" draw:points="0,0 27,0 27,28 0,28">
          <text:p/>
        </draw:polygon>
        <draw:polygon draw:style-name="gr269" draw:text-style-name="P267" draw:layer="layout" svg:width="0.026cm" svg:height="0.027cm" svg:x="7.023cm" svg:y="15.026cm" svg:viewBox="0 0 27 28" draw:points="0,0 27,0 27,28 0,28">
          <text:p/>
        </draw:polygon>
        <draw:polygon draw:style-name="gr269" draw:text-style-name="P267" draw:layer="layout" svg:width="0.026cm" svg:height="0.027cm" svg:x="7.076cm" svg:y="15.026cm" svg:viewBox="0 0 27 28" draw:points="0,0 27,0 27,28 0,28">
          <text:p/>
        </draw:polygon>
        <draw:polygon draw:style-name="gr269" draw:text-style-name="P267" draw:layer="layout" svg:width="0.026cm" svg:height="0.027cm" svg:x="7.129cm" svg:y="15.026cm" svg:viewBox="0 0 27 28" draw:points="0,0 27,0 27,28 0,28">
          <text:p/>
        </draw:polygon>
        <draw:polygon draw:style-name="gr269" draw:text-style-name="P267" draw:layer="layout" svg:width="0.026cm" svg:height="0.027cm" svg:x="7.182cm" svg:y="15.026cm" svg:viewBox="0 0 27 28" draw:points="0,0 27,0 27,28 0,28">
          <text:p/>
        </draw:polygon>
        <draw:polygon draw:style-name="gr269" draw:text-style-name="P267" draw:layer="layout" svg:width="0.026cm" svg:height="0.027cm" svg:x="7.235cm" svg:y="15.026cm" svg:viewBox="0 0 27 28" draw:points="0,0 27,0 27,28 0,28">
          <text:p/>
        </draw:polygon>
        <draw:polygon draw:style-name="gr269" draw:text-style-name="P267" draw:layer="layout" svg:width="0.026cm" svg:height="0.027cm" svg:x="7.288cm" svg:y="15.026cm" svg:viewBox="0 0 27 28" draw:points="0,0 27,0 27,28 0,28">
          <text:p/>
        </draw:polygon>
        <draw:polygon draw:style-name="gr269" draw:text-style-name="P267" draw:layer="layout" svg:width="0.026cm" svg:height="0.027cm" svg:x="7.341cm" svg:y="15.026cm" svg:viewBox="0 0 27 28" draw:points="0,0 27,0 27,28 0,28">
          <text:p/>
        </draw:polygon>
        <draw:polygon draw:style-name="gr269" draw:text-style-name="P267" draw:layer="layout" svg:width="0.026cm" svg:height="0.027cm" svg:x="7.394cm" svg:y="15.026cm" svg:viewBox="0 0 27 28" draw:points="0,0 27,0 27,28 0,28">
          <text:p/>
        </draw:polygon>
        <draw:polygon draw:style-name="gr269" draw:text-style-name="P267" draw:layer="layout" svg:width="0.026cm" svg:height="0.027cm" svg:x="7.447cm" svg:y="15.026cm" svg:viewBox="0 0 27 28" draw:points="0,0 27,0 27,28 0,28">
          <text:p/>
        </draw:polygon>
        <draw:polygon draw:style-name="gr269" draw:text-style-name="P267" draw:layer="layout" svg:width="0.026cm" svg:height="0.027cm" svg:x="7.5cm" svg:y="15.026cm" svg:viewBox="0 0 27 28" draw:points="0,0 27,0 27,28 0,28">
          <text:p/>
        </draw:polygon>
        <draw:polygon draw:style-name="gr269" draw:text-style-name="P267" draw:layer="layout" svg:width="0.026cm" svg:height="0.027cm" svg:x="7.553cm" svg:y="15.026cm" svg:viewBox="0 0 27 28" draw:points="0,0 27,0 27,28 0,28">
          <text:p/>
        </draw:polygon>
        <draw:polygon draw:style-name="gr269" draw:text-style-name="P267" draw:layer="layout" svg:width="0.026cm" svg:height="0.027cm" svg:x="7.606cm" svg:y="15.026cm" svg:viewBox="0 0 27 28" draw:points="0,0 27,0 27,28 0,28">
          <text:p/>
        </draw:polygon>
        <draw:polygon draw:style-name="gr269" draw:text-style-name="P267" draw:layer="layout" svg:width="0.026cm" svg:height="0.027cm" svg:x="7.659cm" svg:y="15.026cm" svg:viewBox="0 0 27 28" draw:points="0,0 27,0 27,28 0,28">
          <text:p/>
        </draw:polygon>
        <draw:polygon draw:style-name="gr269" draw:text-style-name="P267" draw:layer="layout" svg:width="0.026cm" svg:height="0.027cm" svg:x="7.712cm" svg:y="15.026cm" svg:viewBox="0 0 27 28" draw:points="0,0 27,0 27,28 0,28">
          <text:p/>
        </draw:polygon>
        <draw:polygon draw:style-name="gr269" draw:text-style-name="P267" draw:layer="layout" svg:width="0.026cm" svg:height="0.027cm" svg:x="7.765cm" svg:y="15.026cm" svg:viewBox="0 0 27 28" draw:points="0,0 27,0 27,28 0,28">
          <text:p/>
        </draw:polygon>
        <draw:polygon draw:style-name="gr269" draw:text-style-name="P267" draw:layer="layout" svg:width="0.026cm" svg:height="0.027cm" svg:x="7.818cm" svg:y="15.026cm" svg:viewBox="0 0 27 28" draw:points="0,0 27,0 27,28 0,28">
          <text:p/>
        </draw:polygon>
        <draw:polygon draw:style-name="gr269" draw:text-style-name="P267" draw:layer="layout" svg:width="0.026cm" svg:height="0.027cm" svg:x="7.871cm" svg:y="15.026cm" svg:viewBox="0 0 27 28" draw:points="0,0 27,0 27,28 0,28">
          <text:p/>
        </draw:polygon>
        <draw:polygon draw:style-name="gr269" draw:text-style-name="P267" draw:layer="layout" svg:width="0.026cm" svg:height="0.027cm" svg:x="7.924cm" svg:y="15.026cm" svg:viewBox="0 0 27 28" draw:points="0,0 27,0 27,28 0,28">
          <text:p/>
        </draw:polygon>
        <draw:polygon draw:style-name="gr269" draw:text-style-name="P267" draw:layer="layout" svg:width="0.026cm" svg:height="0.027cm" svg:x="7.977cm" svg:y="15.026cm" svg:viewBox="0 0 27 28" draw:points="0,0 27,0 27,28 0,28">
          <text:p/>
        </draw:polygon>
        <draw:polygon draw:style-name="gr269" draw:text-style-name="P267" draw:layer="layout" svg:width="0.026cm" svg:height="0.027cm" svg:x="8.03cm" svg:y="15.026cm" svg:viewBox="0 0 27 28" draw:points="0,0 27,0 27,28 0,28">
          <text:p/>
        </draw:polygon>
        <draw:polygon draw:style-name="gr269" draw:text-style-name="P267" draw:layer="layout" svg:width="0.026cm" svg:height="0.027cm" svg:x="8.083cm" svg:y="15.026cm" svg:viewBox="0 0 27 28" draw:points="0,0 27,0 27,28 0,28">
          <text:p/>
        </draw:polygon>
        <draw:polygon draw:style-name="gr269" draw:text-style-name="P267" draw:layer="layout" svg:width="0.026cm" svg:height="0.027cm" svg:x="8.136cm" svg:y="15.026cm" svg:viewBox="0 0 27 28" draw:points="0,0 27,0 27,28 0,28">
          <text:p/>
        </draw:polygon>
        <draw:polygon draw:style-name="gr269" draw:text-style-name="P267" draw:layer="layout" svg:width="0.026cm" svg:height="0.027cm" svg:x="8.189cm" svg:y="15.026cm" svg:viewBox="0 0 27 28" draw:points="0,0 27,0 27,28 0,28">
          <text:p/>
        </draw:polygon>
        <draw:polygon draw:style-name="gr269" draw:text-style-name="P267" draw:layer="layout" svg:width="0.026cm" svg:height="0.027cm" svg:x="8.242cm" svg:y="15.026cm" svg:viewBox="0 0 27 28" draw:points="0,0 27,0 27,28 0,28">
          <text:p/>
        </draw:polygon>
        <draw:polygon draw:style-name="gr269" draw:text-style-name="P267" draw:layer="layout" svg:width="0.026cm" svg:height="0.027cm" svg:x="8.295cm" svg:y="15.026cm" svg:viewBox="0 0 27 28" draw:points="0,0 27,0 27,28 0,28">
          <text:p/>
        </draw:polygon>
        <draw:polygon draw:style-name="gr269" draw:text-style-name="P267" draw:layer="layout" svg:width="0.026cm" svg:height="0.027cm" svg:x="8.348cm" svg:y="15.026cm" svg:viewBox="0 0 27 28" draw:points="0,0 27,0 27,28 0,28">
          <text:p/>
        </draw:polygon>
        <draw:polygon draw:style-name="gr269" draw:text-style-name="P267" draw:layer="layout" svg:width="0.026cm" svg:height="0.027cm" svg:x="8.401cm" svg:y="15.026cm" svg:viewBox="0 0 27 28" draw:points="0,0 27,0 27,28 0,28">
          <text:p/>
        </draw:polygon>
        <draw:polygon draw:style-name="gr269" draw:text-style-name="P267" draw:layer="layout" svg:width="0.026cm" svg:height="0.027cm" svg:x="8.454cm" svg:y="15.026cm" svg:viewBox="0 0 27 28" draw:points="0,0 27,0 27,28 0,28">
          <text:p/>
        </draw:polygon>
        <draw:polygon draw:style-name="gr269" draw:text-style-name="P267" draw:layer="layout" svg:width="0.026cm" svg:height="0.027cm" svg:x="8.507cm" svg:y="15.026cm" svg:viewBox="0 0 27 28" draw:points="0,0 27,0 27,28 0,28">
          <text:p/>
        </draw:polygon>
        <draw:polygon draw:style-name="gr269" draw:text-style-name="P267" draw:layer="layout" svg:width="0.026cm" svg:height="0.027cm" svg:x="8.56cm" svg:y="15.026cm" svg:viewBox="0 0 27 28" draw:points="0,0 27,0 27,28 0,28">
          <text:p/>
        </draw:polygon>
        <draw:polygon draw:style-name="gr269" draw:text-style-name="P267" draw:layer="layout" svg:width="0.026cm" svg:height="0.027cm" svg:x="8.613cm" svg:y="15.026cm" svg:viewBox="0 0 27 28" draw:points="0,0 27,0 27,28 0,28">
          <text:p/>
        </draw:polygon>
        <draw:polygon draw:style-name="gr269" draw:text-style-name="P267" draw:layer="layout" svg:width="0.026cm" svg:height="0.027cm" svg:x="8.666cm" svg:y="15.026cm" svg:viewBox="0 0 27 28" draw:points="0,0 27,0 27,28 0,28">
          <text:p/>
        </draw:polygon>
        <draw:polygon draw:style-name="gr269" draw:text-style-name="P267" draw:layer="layout" svg:width="0.026cm" svg:height="0.027cm" svg:x="8.719cm" svg:y="15.026cm" svg:viewBox="0 0 27 28" draw:points="0,0 27,0 27,28 0,28">
          <text:p/>
        </draw:polygon>
        <draw:polygon draw:style-name="gr269" draw:text-style-name="P267" draw:layer="layout" svg:width="0.026cm" svg:height="0.027cm" svg:x="8.772cm" svg:y="15.026cm" svg:viewBox="0 0 27 28" draw:points="0,0 27,0 27,28 0,28">
          <text:p/>
        </draw:polygon>
        <draw:polygon draw:style-name="gr269" draw:text-style-name="P267" draw:layer="layout" svg:width="0.026cm" svg:height="0.027cm" svg:x="8.825cm" svg:y="15.026cm" svg:viewBox="0 0 27 28" draw:points="0,0 27,0 27,28 0,28">
          <text:p/>
        </draw:polygon>
        <draw:polygon draw:style-name="gr269" draw:text-style-name="P267" draw:layer="layout" svg:width="0.026cm" svg:height="0.027cm" svg:x="8.878cm" svg:y="15.026cm" svg:viewBox="0 0 27 28" draw:points="0,0 27,0 27,28 0,28">
          <text:p/>
        </draw:polygon>
        <draw:polygon draw:style-name="gr269" draw:text-style-name="P267" draw:layer="layout" svg:width="0.026cm" svg:height="0.027cm" svg:x="8.931cm" svg:y="15.026cm" svg:viewBox="0 0 27 28" draw:points="0,0 27,0 27,28 0,28">
          <text:p/>
        </draw:polygon>
        <draw:polygon draw:style-name="gr269" draw:text-style-name="P267" draw:layer="layout" svg:width="0.026cm" svg:height="0.027cm" svg:x="8.984cm" svg:y="15.026cm" svg:viewBox="0 0 27 28" draw:points="0,0 27,0 27,28 0,28">
          <text:p/>
        </draw:polygon>
        <draw:polygon draw:style-name="gr269" draw:text-style-name="P267" draw:layer="layout" svg:width="0.026cm" svg:height="0.027cm" svg:x="9.037cm" svg:y="15.026cm" svg:viewBox="0 0 27 28" draw:points="0,0 27,0 27,28 0,28">
          <text:p/>
        </draw:polygon>
        <draw:polygon draw:style-name="gr269" draw:text-style-name="P267" draw:layer="layout" svg:width="0.026cm" svg:height="0.027cm" svg:x="9.09cm" svg:y="15.026cm" svg:viewBox="0 0 27 28" draw:points="0,0 27,0 27,28 0,28">
          <text:p/>
        </draw:polygon>
        <draw:polygon draw:style-name="gr269" draw:text-style-name="P267" draw:layer="layout" svg:width="0.026cm" svg:height="0.027cm" svg:x="9.143cm" svg:y="15.026cm" svg:viewBox="0 0 27 28" draw:points="0,0 27,0 27,28 0,28">
          <text:p/>
        </draw:polygon>
        <draw:polygon draw:style-name="gr269" draw:text-style-name="P267" draw:layer="layout" svg:width="0.026cm" svg:height="0.027cm" svg:x="9.196cm" svg:y="15.026cm" svg:viewBox="0 0 27 28" draw:points="0,0 27,0 27,28 0,28">
          <text:p/>
        </draw:polygon>
        <draw:polygon draw:style-name="gr269" draw:text-style-name="P267" draw:layer="layout" svg:width="0.026cm" svg:height="0.027cm" svg:x="9.249cm" svg:y="15.026cm" svg:viewBox="0 0 27 28" draw:points="0,0 27,0 27,28 0,28">
          <text:p/>
        </draw:polygon>
        <draw:polygon draw:style-name="gr269" draw:text-style-name="P267" draw:layer="layout" svg:width="0.026cm" svg:height="0.027cm" svg:x="9.302cm" svg:y="15.026cm" svg:viewBox="0 0 27 28" draw:points="0,0 27,0 27,28 0,28">
          <text:p/>
        </draw:polygon>
        <draw:polygon draw:style-name="gr269" draw:text-style-name="P267" draw:layer="layout" svg:width="0.026cm" svg:height="0.027cm" svg:x="9.355cm" svg:y="15.026cm" svg:viewBox="0 0 27 28" draw:points="0,0 27,0 27,28 0,28">
          <text:p/>
        </draw:polygon>
        <draw:polygon draw:style-name="gr269" draw:text-style-name="P267" draw:layer="layout" svg:width="0.026cm" svg:height="0.027cm" svg:x="9.408cm" svg:y="15.026cm" svg:viewBox="0 0 27 28" draw:points="0,0 27,0 27,28 0,28">
          <text:p/>
        </draw:polygon>
        <draw:polygon draw:style-name="gr269" draw:text-style-name="P267" draw:layer="layout" svg:width="0.026cm" svg:height="0.027cm" svg:x="9.461cm" svg:y="15.026cm" svg:viewBox="0 0 27 28" draw:points="0,0 27,0 27,28 0,28">
          <text:p/>
        </draw:polygon>
        <draw:polygon draw:style-name="gr269" draw:text-style-name="P267" draw:layer="layout" svg:width="0.026cm" svg:height="0.027cm" svg:x="9.514cm" svg:y="15.026cm" svg:viewBox="0 0 27 28" draw:points="0,0 27,0 27,28 0,28">
          <text:p/>
        </draw:polygon>
        <draw:polygon draw:style-name="gr269" draw:text-style-name="P267" draw:layer="layout" svg:width="0.026cm" svg:height="0.027cm" svg:x="9.567cm" svg:y="15.026cm" svg:viewBox="0 0 27 28" draw:points="0,0 27,0 27,28 0,28">
          <text:p/>
        </draw:polygon>
        <draw:polygon draw:style-name="gr269" draw:text-style-name="P267" draw:layer="layout" svg:width="0.026cm" svg:height="0.027cm" svg:x="9.62cm" svg:y="15.026cm" svg:viewBox="0 0 27 28" draw:points="0,0 27,0 27,28 0,28">
          <text:p/>
        </draw:polygon>
        <draw:polygon draw:style-name="gr269" draw:text-style-name="P267" draw:layer="layout" svg:width="0.026cm" svg:height="0.027cm" svg:x="9.673cm" svg:y="15.026cm" svg:viewBox="0 0 27 28" draw:points="0,0 27,0 27,28 0,28">
          <text:p/>
        </draw:polygon>
        <draw:polygon draw:style-name="gr269" draw:text-style-name="P267" draw:layer="layout" svg:width="0.026cm" svg:height="0.027cm" svg:x="9.726cm" svg:y="15.026cm" svg:viewBox="0 0 27 28" draw:points="0,0 27,0 27,28 0,28">
          <text:p/>
        </draw:polygon>
        <draw:polygon draw:style-name="gr269" draw:text-style-name="P267" draw:layer="layout" svg:width="0.026cm" svg:height="0.027cm" svg:x="9.779cm" svg:y="15.026cm" svg:viewBox="0 0 27 28" draw:points="0,0 27,0 27,28 0,28">
          <text:p/>
        </draw:polygon>
        <draw:polygon draw:style-name="gr269" draw:text-style-name="P267" draw:layer="layout" svg:width="0.026cm" svg:height="0.027cm" svg:x="9.832cm" svg:y="15.026cm" svg:viewBox="0 0 27 28" draw:points="0,0 27,0 27,28 0,28">
          <text:p/>
        </draw:polygon>
        <draw:polygon draw:style-name="gr269" draw:text-style-name="P267" draw:layer="layout" svg:width="0.026cm" svg:height="0.027cm" svg:x="9.885cm" svg:y="15.026cm" svg:viewBox="0 0 27 28" draw:points="0,0 27,0 27,28 0,28">
          <text:p/>
        </draw:polygon>
        <draw:polygon draw:style-name="gr269" draw:text-style-name="P267" draw:layer="layout" svg:width="0.026cm" svg:height="0.027cm" svg:x="9.938cm" svg:y="15.026cm" svg:viewBox="0 0 27 28" draw:points="0,0 27,0 27,28 0,28">
          <text:p/>
        </draw:polygon>
        <draw:polygon draw:style-name="gr269" draw:text-style-name="P267" draw:layer="layout" svg:width="0.026cm" svg:height="0.027cm" svg:x="9.991cm" svg:y="15.026cm" svg:viewBox="0 0 27 28" draw:points="0,0 27,0 27,28 0,28">
          <text:p/>
        </draw:polygon>
        <draw:polygon draw:style-name="gr269" draw:text-style-name="P267" draw:layer="layout" svg:width="0.026cm" svg:height="0.027cm" svg:x="10.044cm" svg:y="15.026cm" svg:viewBox="0 0 27 28" draw:points="0,0 27,0 27,28 0,28">
          <text:p/>
        </draw:polygon>
        <draw:polygon draw:style-name="gr269" draw:text-style-name="P267" draw:layer="layout" svg:width="0.026cm" svg:height="0.027cm" svg:x="10.097cm" svg:y="15.026cm" svg:viewBox="0 0 27 28" draw:points="0,0 27,0 27,28 0,28">
          <text:p/>
        </draw:polygon>
        <draw:polygon draw:style-name="gr269" draw:text-style-name="P267" draw:layer="layout" svg:width="0.026cm" svg:height="0.027cm" svg:x="10.15cm" svg:y="15.026cm" svg:viewBox="0 0 27 28" draw:points="0,0 27,0 27,28 0,28">
          <text:p/>
        </draw:polygon>
        <draw:polygon draw:style-name="gr269" draw:text-style-name="P267" draw:layer="layout" svg:width="0.026cm" svg:height="0.027cm" svg:x="10.203cm" svg:y="15.026cm" svg:viewBox="0 0 27 28" draw:points="0,0 27,0 27,28 0,28">
          <text:p/>
        </draw:polygon>
        <draw:polygon draw:style-name="gr269" draw:text-style-name="P267" draw:layer="layout" svg:width="0.026cm" svg:height="0.027cm" svg:x="10.256cm" svg:y="15.026cm" svg:viewBox="0 0 27 28" draw:points="0,0 27,0 27,28 0,28">
          <text:p/>
        </draw:polygon>
        <draw:polygon draw:style-name="gr269" draw:text-style-name="P267" draw:layer="layout" svg:width="0.026cm" svg:height="0.027cm" svg:x="10.309cm" svg:y="15.026cm" svg:viewBox="0 0 27 28" draw:points="0,0 27,0 27,28 0,28">
          <text:p/>
        </draw:polygon>
        <draw:polygon draw:style-name="gr269" draw:text-style-name="P267" draw:layer="layout" svg:width="0.026cm" svg:height="0.027cm" svg:x="10.362cm" svg:y="15.026cm" svg:viewBox="0 0 27 28" draw:points="0,0 27,0 27,28 0,28">
          <text:p/>
        </draw:polygon>
        <draw:polygon draw:style-name="gr269" draw:text-style-name="P267" draw:layer="layout" svg:width="0.026cm" svg:height="0.027cm" svg:x="10.415cm" svg:y="15.026cm" svg:viewBox="0 0 27 28" draw:points="0,0 27,0 27,28 0,28">
          <text:p/>
        </draw:polygon>
        <draw:polygon draw:style-name="gr269" draw:text-style-name="P267" draw:layer="layout" svg:width="0.026cm" svg:height="0.027cm" svg:x="10.468cm" svg:y="15.026cm" svg:viewBox="0 0 27 28" draw:points="0,0 27,0 27,28 0,28">
          <text:p/>
        </draw:polygon>
        <draw:polygon draw:style-name="gr269" draw:text-style-name="P267" draw:layer="layout" svg:width="0.026cm" svg:height="0.027cm" svg:x="10.521cm" svg:y="15.026cm" svg:viewBox="0 0 27 28" draw:points="0,0 27,0 27,28 0,28">
          <text:p/>
        </draw:polygon>
        <draw:polygon draw:style-name="gr269" draw:text-style-name="P267" draw:layer="layout" svg:width="0.026cm" svg:height="0.027cm" svg:x="10.574cm" svg:y="15.026cm" svg:viewBox="0 0 27 28" draw:points="0,0 27,0 27,28 0,28">
          <text:p/>
        </draw:polygon>
        <draw:polygon draw:style-name="gr269" draw:text-style-name="P267" draw:layer="layout" svg:width="0.026cm" svg:height="0.027cm" svg:x="10.627cm" svg:y="15.026cm" svg:viewBox="0 0 27 28" draw:points="0,0 27,0 27,28 0,28">
          <text:p/>
        </draw:polygon>
        <draw:polygon draw:style-name="gr269" draw:text-style-name="P267" draw:layer="layout" svg:width="0.026cm" svg:height="0.027cm" svg:x="10.68cm" svg:y="15.026cm" svg:viewBox="0 0 27 28" draw:points="0,0 27,0 27,28 0,28">
          <text:p/>
        </draw:polygon>
        <draw:polygon draw:style-name="gr269" draw:text-style-name="P267" draw:layer="layout" svg:width="0.026cm" svg:height="0.027cm" svg:x="10.733cm" svg:y="15.026cm" svg:viewBox="0 0 27 28" draw:points="0,0 27,0 27,28 0,28">
          <text:p/>
        </draw:polygon>
        <draw:polygon draw:style-name="gr269" draw:text-style-name="P267" draw:layer="layout" svg:width="0.026cm" svg:height="0.027cm" svg:x="10.786cm" svg:y="15.026cm" svg:viewBox="0 0 27 28" draw:points="0,0 27,0 27,28 0,28">
          <text:p/>
        </draw:polygon>
        <draw:polygon draw:style-name="gr269" draw:text-style-name="P267" draw:layer="layout" svg:width="0.026cm" svg:height="0.027cm" svg:x="10.839cm" svg:y="15.026cm" svg:viewBox="0 0 27 28" draw:points="0,0 27,0 27,28 0,28">
          <text:p/>
        </draw:polygon>
        <draw:polygon draw:style-name="gr269" draw:text-style-name="P267" draw:layer="layout" svg:width="0.026cm" svg:height="0.027cm" svg:x="10.892cm" svg:y="15.026cm" svg:viewBox="0 0 27 28" draw:points="0,0 27,0 27,28 0,28">
          <text:p/>
        </draw:polygon>
        <draw:polygon draw:style-name="gr269" draw:text-style-name="P267" draw:layer="layout" svg:width="0.026cm" svg:height="0.027cm" svg:x="10.945cm" svg:y="15.026cm" svg:viewBox="0 0 27 28" draw:points="0,0 27,0 27,28 0,28">
          <text:p/>
        </draw:polygon>
        <draw:polygon draw:style-name="gr269" draw:text-style-name="P267" draw:layer="layout" svg:width="0.026cm" svg:height="0.027cm" svg:x="10.998cm" svg:y="15.026cm" svg:viewBox="0 0 27 28" draw:points="0,0 27,0 27,28 0,28">
          <text:p/>
        </draw:polygon>
        <draw:polygon draw:style-name="gr269" draw:text-style-name="P267" draw:layer="layout" svg:width="0.026cm" svg:height="0.027cm" svg:x="11.051cm" svg:y="15.026cm" svg:viewBox="0 0 27 28" draw:points="0,0 27,0 27,28 0,28">
          <text:p/>
        </draw:polygon>
        <draw:polygon draw:style-name="gr269" draw:text-style-name="P267" draw:layer="layout" svg:width="0.026cm" svg:height="0.027cm" svg:x="11.104cm" svg:y="15.026cm" svg:viewBox="0 0 27 28" draw:points="0,0 27,0 27,28 0,28">
          <text:p/>
        </draw:polygon>
        <draw:polygon draw:style-name="gr269" draw:text-style-name="P267" draw:layer="layout" svg:width="0.026cm" svg:height="0.027cm" svg:x="11.157cm" svg:y="15.026cm" svg:viewBox="0 0 27 28" draw:points="0,0 27,0 27,28 0,28">
          <text:p/>
        </draw:polygon>
        <draw:polygon draw:style-name="gr269" draw:text-style-name="P267" draw:layer="layout" svg:width="0.026cm" svg:height="0.027cm" svg:x="11.21cm" svg:y="15.026cm" svg:viewBox="0 0 27 28" draw:points="0,0 27,0 27,28 0,28">
          <text:p/>
        </draw:polygon>
        <draw:polygon draw:style-name="gr269" draw:text-style-name="P267" draw:layer="layout" svg:width="0.026cm" svg:height="0.027cm" svg:x="11.263cm" svg:y="15.026cm" svg:viewBox="0 0 27 28" draw:points="0,0 27,0 27,28 0,28">
          <text:p/>
        </draw:polygon>
        <draw:polygon draw:style-name="gr269" draw:text-style-name="P267" draw:layer="layout" svg:width="0.026cm" svg:height="0.027cm" svg:x="11.316cm" svg:y="15.026cm" svg:viewBox="0 0 27 28" draw:points="0,0 27,0 27,28 0,28">
          <text:p/>
        </draw:polygon>
        <draw:polygon draw:style-name="gr269" draw:text-style-name="P267" draw:layer="layout" svg:width="0.026cm" svg:height="0.027cm" svg:x="11.369cm" svg:y="15.026cm" svg:viewBox="0 0 27 28" draw:points="0,0 27,0 27,28 0,28">
          <text:p/>
        </draw:polygon>
        <draw:polygon draw:style-name="gr269" draw:text-style-name="P267" draw:layer="layout" svg:width="0.026cm" svg:height="0.027cm" svg:x="11.422cm" svg:y="15.026cm" svg:viewBox="0 0 27 28" draw:points="0,0 27,0 27,28 0,28">
          <text:p/>
        </draw:polygon>
        <draw:polygon draw:style-name="gr269" draw:text-style-name="P267" draw:layer="layout" svg:width="0.026cm" svg:height="0.027cm" svg:x="11.475cm" svg:y="15.026cm" svg:viewBox="0 0 27 28" draw:points="0,0 27,0 27,28 0,28">
          <text:p/>
        </draw:polygon>
        <draw:polygon draw:style-name="gr269" draw:text-style-name="P267" draw:layer="layout" svg:width="0.026cm" svg:height="0.027cm" svg:x="11.528cm" svg:y="15.026cm" svg:viewBox="0 0 27 28" draw:points="0,0 27,0 27,28 0,28">
          <text:p/>
        </draw:polygon>
        <draw:polygon draw:style-name="gr269" draw:text-style-name="P267" draw:layer="layout" svg:width="0.026cm" svg:height="0.027cm" svg:x="11.581cm" svg:y="15.026cm" svg:viewBox="0 0 27 28" draw:points="0,0 27,0 27,28 0,28">
          <text:p/>
        </draw:polygon>
        <draw:polygon draw:style-name="gr269" draw:text-style-name="P267" draw:layer="layout" svg:width="0.026cm" svg:height="0.027cm" svg:x="11.634cm" svg:y="15.026cm" svg:viewBox="0 0 27 28" draw:points="0,0 27,0 27,28 0,28">
          <text:p/>
        </draw:polygon>
        <draw:polygon draw:style-name="gr269" draw:text-style-name="P267" draw:layer="layout" svg:width="0.026cm" svg:height="0.027cm" svg:x="11.687cm" svg:y="15.026cm" svg:viewBox="0 0 27 28" draw:points="0,0 27,0 27,28 0,28">
          <text:p/>
        </draw:polygon>
        <draw:polygon draw:style-name="gr269" draw:text-style-name="P267" draw:layer="layout" svg:width="0.026cm" svg:height="0.027cm" svg:x="11.74cm" svg:y="15.026cm" svg:viewBox="0 0 27 28" draw:points="0,0 27,0 27,28 0,28">
          <text:p/>
        </draw:polygon>
        <draw:polygon draw:style-name="gr269" draw:text-style-name="P267" draw:layer="layout" svg:width="0.026cm" svg:height="0.027cm" svg:x="11.793cm" svg:y="15.026cm" svg:viewBox="0 0 27 28" draw:points="0,0 27,0 27,28 0,28">
          <text:p/>
        </draw:polygon>
        <draw:polygon draw:style-name="gr269" draw:text-style-name="P267" draw:layer="layout" svg:width="0.026cm" svg:height="0.027cm" svg:x="11.846cm" svg:y="15.026cm" svg:viewBox="0 0 27 28" draw:points="0,0 27,0 27,28 0,28">
          <text:p/>
        </draw:polygon>
        <draw:polygon draw:style-name="gr269" draw:text-style-name="P267" draw:layer="layout" svg:width="0.026cm" svg:height="0.027cm" svg:x="11.899cm" svg:y="15.026cm" svg:viewBox="0 0 27 28" draw:points="0,0 27,0 27,28 0,28">
          <text:p/>
        </draw:polygon>
        <draw:polygon draw:style-name="gr269" draw:text-style-name="P267" draw:layer="layout" svg:width="0.026cm" svg:height="0.027cm" svg:x="11.952cm" svg:y="15.026cm" svg:viewBox="0 0 27 28" draw:points="0,0 27,0 27,28 0,28">
          <text:p/>
        </draw:polygon>
        <draw:polygon draw:style-name="gr269" draw:text-style-name="P267" draw:layer="layout" svg:width="0.026cm" svg:height="0.027cm" svg:x="12.005cm" svg:y="15.026cm" svg:viewBox="0 0 27 28" draw:points="0,0 27,0 27,28 0,28">
          <text:p/>
        </draw:polygon>
        <draw:polygon draw:style-name="gr269" draw:text-style-name="P267" draw:layer="layout" svg:width="0.026cm" svg:height="0.027cm" svg:x="12.058cm" svg:y="15.026cm" svg:viewBox="0 0 27 28" draw:points="0,0 27,0 27,28 0,28">
          <text:p/>
        </draw:polygon>
        <draw:polygon draw:style-name="gr269" draw:text-style-name="P267" draw:layer="layout" svg:width="0.026cm" svg:height="0.027cm" svg:x="12.111cm" svg:y="15.026cm" svg:viewBox="0 0 27 28" draw:points="0,0 27,0 27,28 0,28">
          <text:p/>
        </draw:polygon>
        <draw:polygon draw:style-name="gr269" draw:text-style-name="P267" draw:layer="layout" svg:width="0.026cm" svg:height="0.027cm" svg:x="12.164cm" svg:y="15.026cm" svg:viewBox="0 0 27 28" draw:points="0,0 27,0 27,28 0,28">
          <text:p/>
        </draw:polygon>
        <draw:polygon draw:style-name="gr269" draw:text-style-name="P267" draw:layer="layout" svg:width="0.026cm" svg:height="0.027cm" svg:x="12.217cm" svg:y="15.026cm" svg:viewBox="0 0 27 28" draw:points="0,0 27,0 27,28 0,28">
          <text:p/>
        </draw:polygon>
        <draw:polygon draw:style-name="gr269" draw:text-style-name="P267" draw:layer="layout" svg:width="0.026cm" svg:height="0.027cm" svg:x="12.27cm" svg:y="15.026cm" svg:viewBox="0 0 27 28" draw:points="0,0 27,0 27,28 0,28">
          <text:p/>
        </draw:polygon>
        <draw:polygon draw:style-name="gr269" draw:text-style-name="P267" draw:layer="layout" svg:width="0.026cm" svg:height="0.027cm" svg:x="12.323cm" svg:y="15.026cm" svg:viewBox="0 0 27 28" draw:points="0,0 27,0 27,28 0,28">
          <text:p/>
        </draw:polygon>
        <draw:polygon draw:style-name="gr269" draw:text-style-name="P267" draw:layer="layout" svg:width="0.026cm" svg:height="0.027cm" svg:x="12.376cm" svg:y="15.026cm" svg:viewBox="0 0 27 28" draw:points="0,0 27,0 27,28 0,28">
          <text:p/>
        </draw:polygon>
        <draw:polygon draw:style-name="gr269" draw:text-style-name="P267" draw:layer="layout" svg:width="0.026cm" svg:height="0.027cm" svg:x="12.429cm" svg:y="15.026cm" svg:viewBox="0 0 27 28" draw:points="0,0 27,0 27,28 0,28">
          <text:p/>
        </draw:polygon>
        <draw:polygon draw:style-name="gr269" draw:text-style-name="P267" draw:layer="layout" svg:width="0.026cm" svg:height="0.027cm" svg:x="12.482cm" svg:y="15.026cm" svg:viewBox="0 0 27 28" draw:points="0,0 27,0 27,28 0,28">
          <text:p/>
        </draw:polygon>
        <draw:polygon draw:style-name="gr269" draw:text-style-name="P267" draw:layer="layout" svg:width="0.026cm" svg:height="0.027cm" svg:x="12.535cm" svg:y="15.026cm" svg:viewBox="0 0 27 28" draw:points="0,0 27,0 27,28 0,28">
          <text:p/>
        </draw:polygon>
        <draw:polygon draw:style-name="gr269" draw:text-style-name="P267" draw:layer="layout" svg:width="0.026cm" svg:height="0.027cm" svg:x="12.588cm" svg:y="15.026cm" svg:viewBox="0 0 27 28" draw:points="0,0 27,0 27,28 0,28">
          <text:p/>
        </draw:polygon>
        <draw:polygon draw:style-name="gr269" draw:text-style-name="P267" draw:layer="layout" svg:width="0.026cm" svg:height="0.027cm" svg:x="12.641cm" svg:y="15.026cm" svg:viewBox="0 0 27 28" draw:points="0,0 27,0 27,28 0,28">
          <text:p/>
        </draw:polygon>
        <draw:polygon draw:style-name="gr269" draw:text-style-name="P267" draw:layer="layout" svg:width="0.027cm" svg:height="0.027cm" svg:x="12.694cm" svg:y="15.026cm" svg:viewBox="0 0 28 28" draw:points="0,0 28,0 28,28 0,28">
          <text:p/>
        </draw:polygon>
        <draw:polygon draw:style-name="gr269" draw:text-style-name="P267" draw:layer="layout" svg:width="0.027cm" svg:height="0.027cm" svg:x="12.747cm" svg:y="15.026cm" svg:viewBox="0 0 28 28" draw:points="0,0 28,0 28,28 0,28">
          <text:p/>
        </draw:polygon>
        <draw:polygon draw:style-name="gr269" draw:text-style-name="P267" draw:layer="layout" svg:width="0.027cm" svg:height="0.027cm" svg:x="12.8cm" svg:y="15.026cm" svg:viewBox="0 0 28 28" draw:points="0,0 28,0 28,28 0,28">
          <text:p/>
        </draw:polygon>
        <draw:polygon draw:style-name="gr269" draw:text-style-name="P267" draw:layer="layout" svg:width="0.027cm" svg:height="0.027cm" svg:x="12.853cm" svg:y="15.026cm" svg:viewBox="0 0 28 28" draw:points="0,0 28,0 28,28 0,28">
          <text:p/>
        </draw:polygon>
        <draw:polygon draw:style-name="gr269" draw:text-style-name="P267" draw:layer="layout" svg:width="0.027cm" svg:height="0.027cm" svg:x="12.906cm" svg:y="15.026cm" svg:viewBox="0 0 28 28" draw:points="0,0 28,0 28,28 0,28">
          <text:p/>
        </draw:polygon>
        <draw:polygon draw:style-name="gr269" draw:text-style-name="P267" draw:layer="layout" svg:width="0.027cm" svg:height="0.027cm" svg:x="12.959cm" svg:y="15.026cm" svg:viewBox="0 0 28 28" draw:points="0,0 28,0 28,28 0,28">
          <text:p/>
        </draw:polygon>
        <draw:polygon draw:style-name="gr269" draw:text-style-name="P267" draw:layer="layout" svg:width="0.028cm" svg:height="0.027cm" svg:x="13.012cm" svg:y="15.026cm" svg:viewBox="0 0 29 28" draw:points="0,0 29,0 29,28 0,28">
          <text:p/>
        </draw:polygon>
        <draw:polygon draw:style-name="gr269" draw:text-style-name="P267" draw:layer="layout" svg:width="0.027cm" svg:height="0.027cm" svg:x="13.065cm" svg:y="15.026cm" svg:viewBox="0 0 28 28" draw:points="0,0 28,0 28,28 0,28">
          <text:p/>
        </draw:polygon>
        <draw:polygon draw:style-name="gr269" draw:text-style-name="P267" draw:layer="layout" svg:width="0.027cm" svg:height="0.027cm" svg:x="13.118cm" svg:y="15.026cm" svg:viewBox="0 0 28 28" draw:points="0,0 28,0 28,28 0,28">
          <text:p/>
        </draw:polygon>
        <draw:polygon draw:style-name="gr269" draw:text-style-name="P267" draw:layer="layout" svg:width="0.027cm" svg:height="0.027cm" svg:x="13.171cm" svg:y="15.026cm" svg:viewBox="0 0 28 28" draw:points="0,0 28,0 28,28 0,28">
          <text:p/>
        </draw:polygon>
        <draw:polygon draw:style-name="gr269" draw:text-style-name="P267" draw:layer="layout" svg:width="0.027cm" svg:height="0.027cm" svg:x="13.224cm" svg:y="15.026cm" svg:viewBox="0 0 28 28" draw:points="0,0 28,0 28,28 0,28">
          <text:p/>
        </draw:polygon>
        <draw:polygon draw:style-name="gr269" draw:text-style-name="P267" draw:layer="layout" svg:width="0.027cm" svg:height="0.027cm" svg:x="13.277cm" svg:y="15.026cm" svg:viewBox="0 0 28 28" draw:points="0,0 28,0 28,28 0,28">
          <text:p/>
        </draw:polygon>
        <draw:polygon draw:style-name="gr269" draw:text-style-name="P267" draw:layer="layout" svg:width="0.027cm" svg:height="0.027cm" svg:x="13.33cm" svg:y="15.026cm" svg:viewBox="0 0 28 28" draw:points="0,0 28,0 28,28 0,28">
          <text:p/>
        </draw:polygon>
        <draw:polygon draw:style-name="gr269" draw:text-style-name="P267" draw:layer="layout" svg:width="0.027cm" svg:height="0.027cm" svg:x="13.383cm" svg:y="15.026cm" svg:viewBox="0 0 28 28" draw:points="0,0 28,0 28,28 0,28">
          <text:p/>
        </draw:polygon>
        <draw:polygon draw:style-name="gr269" draw:text-style-name="P267" draw:layer="layout" svg:width="0.027cm" svg:height="0.027cm" svg:x="13.436cm" svg:y="15.026cm" svg:viewBox="0 0 28 28" draw:points="0,0 28,0 28,28 0,28">
          <text:p/>
        </draw:polygon>
        <draw:polygon draw:style-name="gr269" draw:text-style-name="P267" draw:layer="layout" svg:width="0.027cm" svg:height="0.027cm" svg:x="13.489cm" svg:y="15.026cm" svg:viewBox="0 0 28 28" draw:points="0,0 28,0 28,28 0,28">
          <text:p/>
        </draw:polygon>
        <draw:polygon draw:style-name="gr269" draw:text-style-name="P267" draw:layer="layout" svg:width="0.027cm" svg:height="0.027cm" svg:x="13.542cm" svg:y="15.026cm" svg:viewBox="0 0 28 28" draw:points="0,0 28,0 28,28 0,28">
          <text:p/>
        </draw:polygon>
        <draw:polygon draw:style-name="gr269" draw:text-style-name="P267" draw:layer="layout" svg:width="0.027cm" svg:height="0.027cm" svg:x="13.595cm" svg:y="15.026cm" svg:viewBox="0 0 28 28" draw:points="0,0 28,0 28,28 0,28">
          <text:p/>
        </draw:polygon>
        <draw:polygon draw:style-name="gr269" draw:text-style-name="P267" draw:layer="layout" svg:width="0.027cm" svg:height="0.027cm" svg:x="13.648cm" svg:y="15.026cm" svg:viewBox="0 0 28 28" draw:points="0,0 28,0 28,28 0,28">
          <text:p/>
        </draw:polygon>
        <draw:polygon draw:style-name="gr269" draw:text-style-name="P267" draw:layer="layout" svg:width="0.027cm" svg:height="0.027cm" svg:x="13.701cm" svg:y="15.026cm" svg:viewBox="0 0 28 28" draw:points="0,0 28,0 28,28 0,28">
          <text:p/>
        </draw:polygon>
        <draw:polygon draw:style-name="gr269" draw:text-style-name="P267" draw:layer="layout" svg:width="0.027cm" svg:height="0.027cm" svg:x="13.754cm" svg:y="15.026cm" svg:viewBox="0 0 28 28" draw:points="0,0 28,0 28,28 0,28">
          <text:p/>
        </draw:polygon>
        <draw:polygon draw:style-name="gr269" draw:text-style-name="P267" draw:layer="layout" svg:width="0.027cm" svg:height="0.027cm" svg:x="13.807cm" svg:y="15.026cm" svg:viewBox="0 0 28 28" draw:points="0,0 28,0 28,28 0,28">
          <text:p/>
        </draw:polygon>
        <draw:polygon draw:style-name="gr269" draw:text-style-name="P267" draw:layer="layout" svg:width="0.027cm" svg:height="0.027cm" svg:x="13.86cm" svg:y="15.026cm" svg:viewBox="0 0 28 28" draw:points="0,0 28,0 28,28 0,28">
          <text:p/>
        </draw:polygon>
        <draw:polygon draw:style-name="gr269" draw:text-style-name="P267" draw:layer="layout" svg:width="0.027cm" svg:height="0.027cm" svg:x="13.913cm" svg:y="15.026cm" svg:viewBox="0 0 28 28" draw:points="0,0 28,0 28,28 0,28">
          <text:p/>
        </draw:polygon>
        <draw:polygon draw:style-name="gr269" draw:text-style-name="P267" draw:layer="layout" svg:width="0.027cm" svg:height="0.027cm" svg:x="13.966cm" svg:y="15.026cm" svg:viewBox="0 0 28 28" draw:points="0,0 28,0 28,28 0,28">
          <text:p/>
        </draw:polygon>
        <draw:polygon draw:style-name="gr269" draw:text-style-name="P267" draw:layer="layout" svg:width="0.027cm" svg:height="0.027cm" svg:x="14.019cm" svg:y="15.026cm" svg:viewBox="0 0 28 28" draw:points="0,0 28,0 28,28 0,28">
          <text:p/>
        </draw:polygon>
        <draw:polygon draw:style-name="gr269" draw:text-style-name="P267" draw:layer="layout" svg:width="0.027cm" svg:height="0.027cm" svg:x="14.072cm" svg:y="15.026cm" svg:viewBox="0 0 28 28" draw:points="0,0 28,0 28,28 0,28">
          <text:p/>
        </draw:polygon>
        <draw:polygon draw:style-name="gr269" draw:text-style-name="P267" draw:layer="layout" svg:width="0.027cm" svg:height="0.027cm" svg:x="14.125cm" svg:y="15.026cm" svg:viewBox="0 0 28 28" draw:points="0,0 28,0 28,28 0,28">
          <text:p/>
        </draw:polygon>
        <draw:polygon draw:style-name="gr269" draw:text-style-name="P267" draw:layer="layout" svg:width="0.027cm" svg:height="0.027cm" svg:x="14.178cm" svg:y="15.026cm" svg:viewBox="0 0 28 28" draw:points="0,0 28,0 28,28 0,28">
          <text:p/>
        </draw:polygon>
        <draw:polygon draw:style-name="gr269" draw:text-style-name="P267" draw:layer="layout" svg:width="0.027cm" svg:height="0.027cm" svg:x="14.231cm" svg:y="15.026cm" svg:viewBox="0 0 28 28" draw:points="0,0 28,0 28,28 0,28">
          <text:p/>
        </draw:polygon>
        <draw:polygon draw:style-name="gr269" draw:text-style-name="P267" draw:layer="layout" svg:width="0.027cm" svg:height="0.027cm" svg:x="14.284cm" svg:y="15.026cm" svg:viewBox="0 0 28 28" draw:points="0,0 28,0 28,28 0,28">
          <text:p/>
        </draw:polygon>
        <draw:polygon draw:style-name="gr269" draw:text-style-name="P267" draw:layer="layout" svg:width="0.027cm" svg:height="0.027cm" svg:x="14.337cm" svg:y="15.026cm" svg:viewBox="0 0 28 28" draw:points="0,0 28,0 28,28 0,28">
          <text:p/>
        </draw:polygon>
        <draw:polygon draw:style-name="gr269" draw:text-style-name="P267" draw:layer="layout" svg:width="0.028cm" svg:height="0.027cm" svg:x="14.39cm" svg:y="15.026cm" svg:viewBox="0 0 29 28" draw:points="0,0 29,0 29,28 0,28">
          <text:p/>
        </draw:polygon>
        <draw:polygon draw:style-name="gr269" draw:text-style-name="P267" draw:layer="layout" svg:width="0.027cm" svg:height="0.027cm" svg:x="14.443cm" svg:y="15.026cm" svg:viewBox="0 0 28 28" draw:points="0,0 28,0 28,28 0,28">
          <text:p/>
        </draw:polygon>
        <draw:polygon draw:style-name="gr269" draw:text-style-name="P267" draw:layer="layout" svg:width="0.027cm" svg:height="0.027cm" svg:x="14.496cm" svg:y="15.026cm" svg:viewBox="0 0 28 28" draw:points="0,0 28,0 28,28 0,28">
          <text:p/>
        </draw:polygon>
        <draw:polygon draw:style-name="gr269" draw:text-style-name="P267" draw:layer="layout" svg:width="0.027cm" svg:height="0.027cm" svg:x="14.549cm" svg:y="15.026cm" svg:viewBox="0 0 28 28" draw:points="0,0 28,0 28,28 0,28">
          <text:p/>
        </draw:polygon>
        <draw:polygon draw:style-name="gr269" draw:text-style-name="P267" draw:layer="layout" svg:width="0.027cm" svg:height="0.027cm" svg:x="14.602cm" svg:y="15.026cm" svg:viewBox="0 0 28 28" draw:points="0,0 28,0 28,28 0,28">
          <text:p/>
        </draw:polygon>
        <draw:polygon draw:style-name="gr269" draw:text-style-name="P267" draw:layer="layout" svg:width="0.027cm" svg:height="0.027cm" svg:x="14.655cm" svg:y="15.026cm" svg:viewBox="0 0 28 28" draw:points="0,0 28,0 28,28 0,28">
          <text:p/>
        </draw:polygon>
        <draw:polygon draw:style-name="gr269" draw:text-style-name="P267" draw:layer="layout" svg:width="0.027cm" svg:height="0.027cm" svg:x="14.708cm" svg:y="15.026cm" svg:viewBox="0 0 28 28" draw:points="0,0 28,0 28,28 0,28">
          <text:p/>
        </draw:polygon>
        <draw:polygon draw:style-name="gr269" draw:text-style-name="P267" draw:layer="layout" svg:width="0.027cm" svg:height="0.027cm" svg:x="14.761cm" svg:y="15.026cm" svg:viewBox="0 0 28 28" draw:points="0,0 28,0 28,28 0,28">
          <text:p/>
        </draw:polygon>
        <draw:polygon draw:style-name="gr269" draw:text-style-name="P267" draw:layer="layout" svg:width="0.027cm" svg:height="0.027cm" svg:x="14.814cm" svg:y="15.026cm" svg:viewBox="0 0 28 28" draw:points="0,0 28,0 28,28 0,28">
          <text:p/>
        </draw:polygon>
        <draw:polygon draw:style-name="gr269" draw:text-style-name="P267" draw:layer="layout" svg:width="0.027cm" svg:height="0.027cm" svg:x="14.867cm" svg:y="15.026cm" svg:viewBox="0 0 28 28" draw:points="0,0 28,0 28,28 0,28">
          <text:p/>
        </draw:polygon>
        <draw:polygon draw:style-name="gr269" draw:text-style-name="P267" draw:layer="layout" svg:width="0.027cm" svg:height="0.027cm" svg:x="14.92cm" svg:y="15.026cm" svg:viewBox="0 0 28 28" draw:points="0,0 28,0 28,28 0,28">
          <text:p/>
        </draw:polygon>
        <draw:polygon draw:style-name="gr269" draw:text-style-name="P267" draw:layer="layout" svg:width="0.027cm" svg:height="0.027cm" svg:x="14.973cm" svg:y="15.026cm" svg:viewBox="0 0 28 28" draw:points="0,0 28,0 28,28 0,28">
          <text:p/>
        </draw:polygon>
        <draw:polygon draw:style-name="gr269" draw:text-style-name="P267" draw:layer="layout" svg:width="0.027cm" svg:height="0.027cm" svg:x="15.026cm" svg:y="15.026cm" svg:viewBox="0 0 28 28" draw:points="0,0 28,0 28,28 0,28">
          <text:p/>
        </draw:polygon>
        <draw:polygon draw:style-name="gr269" draw:text-style-name="P267" draw:layer="layout" svg:width="0.027cm" svg:height="0.027cm" svg:x="15.079cm" svg:y="15.026cm" svg:viewBox="0 0 28 28" draw:points="0,0 28,0 28,28 0,28">
          <text:p/>
        </draw:polygon>
        <draw:polygon draw:style-name="gr269" draw:text-style-name="P267" draw:layer="layout" svg:width="0.027cm" svg:height="0.027cm" svg:x="15.132cm" svg:y="15.026cm" svg:viewBox="0 0 28 28" draw:points="0,0 28,0 28,28 0,28">
          <text:p/>
        </draw:polygon>
        <draw:polygon draw:style-name="gr269" draw:text-style-name="P267" draw:layer="layout" svg:width="0.027cm" svg:height="0.027cm" svg:x="15.185cm" svg:y="15.026cm" svg:viewBox="0 0 28 28" draw:points="0,0 28,0 28,28 0,28">
          <text:p/>
        </draw:polygon>
        <draw:polygon draw:style-name="gr269" draw:text-style-name="P267" draw:layer="layout" svg:width="0.027cm" svg:height="0.027cm" svg:x="15.238cm" svg:y="15.026cm" svg:viewBox="0 0 28 28" draw:points="0,0 28,0 28,28 0,28">
          <text:p/>
        </draw:polygon>
        <draw:polygon draw:style-name="gr269" draw:text-style-name="P267" draw:layer="layout" svg:width="0.027cm" svg:height="0.027cm" svg:x="15.291cm" svg:y="15.026cm" svg:viewBox="0 0 28 28" draw:points="0,0 28,0 28,28 0,28">
          <text:p/>
        </draw:polygon>
        <draw:polygon draw:style-name="gr269" draw:text-style-name="P267" draw:layer="layout" svg:width="0.027cm" svg:height="0.027cm" svg:x="15.344cm" svg:y="15.026cm" svg:viewBox="0 0 28 28" draw:points="0,0 28,0 28,28 0,28">
          <text:p/>
        </draw:polygon>
        <draw:polygon draw:style-name="gr269" draw:text-style-name="P267" draw:layer="layout" svg:width="0.027cm" svg:height="0.027cm" svg:x="15.397cm" svg:y="15.026cm" svg:viewBox="0 0 28 28" draw:points="0,0 28,0 28,28 0,28">
          <text:p/>
        </draw:polygon>
        <draw:polygon draw:style-name="gr269" draw:text-style-name="P267" draw:layer="layout" svg:width="0.027cm" svg:height="0.027cm" svg:x="15.45cm" svg:y="15.026cm" svg:viewBox="0 0 28 28" draw:points="0,0 28,0 28,28 0,28">
          <text:p/>
        </draw:polygon>
        <draw:polygon draw:style-name="gr269" draw:text-style-name="P267" draw:layer="layout" svg:width="0.027cm" svg:height="0.027cm" svg:x="15.503cm" svg:y="15.026cm" svg:viewBox="0 0 28 28" draw:points="0,0 28,0 28,28 0,28">
          <text:p/>
        </draw:polygon>
        <draw:polygon draw:style-name="gr269" draw:text-style-name="P267" draw:layer="layout" svg:width="0.027cm" svg:height="0.027cm" svg:x="15.556cm" svg:y="15.026cm" svg:viewBox="0 0 28 28" draw:points="0,0 28,0 28,28 0,28">
          <text:p/>
        </draw:polygon>
        <draw:polygon draw:style-name="gr269" draw:text-style-name="P267" draw:layer="layout" svg:width="0.027cm" svg:height="0.027cm" svg:x="15.609cm" svg:y="15.026cm" svg:viewBox="0 0 28 28" draw:points="0,0 28,0 28,28 0,28">
          <text:p/>
        </draw:polygon>
        <draw:polygon draw:style-name="gr269" draw:text-style-name="P267" draw:layer="layout" svg:width="0.027cm" svg:height="0.027cm" svg:x="15.662cm" svg:y="15.026cm" svg:viewBox="0 0 28 28" draw:points="0,0 28,0 28,28 0,28">
          <text:p/>
        </draw:polygon>
        <draw:polygon draw:style-name="gr269" draw:text-style-name="P267" draw:layer="layout" svg:width="0.027cm" svg:height="0.027cm" svg:x="15.715cm" svg:y="15.026cm" svg:viewBox="0 0 28 28" draw:points="0,0 28,0 28,28 0,28">
          <text:p/>
        </draw:polygon>
        <draw:polygon draw:style-name="gr269" draw:text-style-name="P267" draw:layer="layout" svg:width="0.028cm" svg:height="0.027cm" svg:x="15.768cm" svg:y="15.026cm" svg:viewBox="0 0 29 28" draw:points="0,0 29,0 29,28 0,28">
          <text:p/>
        </draw:polygon>
        <draw:polygon draw:style-name="gr269" draw:text-style-name="P267" draw:layer="layout" svg:width="0.027cm" svg:height="0.027cm" svg:x="15.821cm" svg:y="15.026cm" svg:viewBox="0 0 28 28" draw:points="0,0 28,0 28,28 0,28">
          <text:p/>
        </draw:polygon>
        <draw:polygon draw:style-name="gr269" draw:text-style-name="P267" draw:layer="layout" svg:width="0.027cm" svg:height="0.027cm" svg:x="15.874cm" svg:y="15.026cm" svg:viewBox="0 0 28 28" draw:points="0,0 28,0 28,28 0,28">
          <text:p/>
        </draw:polygon>
        <draw:polygon draw:style-name="gr269" draw:text-style-name="P267" draw:layer="layout" svg:width="0.027cm" svg:height="0.027cm" svg:x="15.927cm" svg:y="15.026cm" svg:viewBox="0 0 28 28" draw:points="0,0 28,0 28,28 0,28">
          <text:p/>
        </draw:polygon>
        <draw:polygon draw:style-name="gr269" draw:text-style-name="P267" draw:layer="layout" svg:width="0.027cm" svg:height="0.027cm" svg:x="15.98cm" svg:y="15.026cm" svg:viewBox="0 0 28 28" draw:points="0,0 28,0 28,28 0,28">
          <text:p/>
        </draw:polygon>
        <draw:polygon draw:style-name="gr269" draw:text-style-name="P267" draw:layer="layout" svg:width="0.027cm" svg:height="0.027cm" svg:x="16.033cm" svg:y="15.026cm" svg:viewBox="0 0 28 28" draw:points="0,0 28,0 28,28 0,28">
          <text:p/>
        </draw:polygon>
        <draw:polygon draw:style-name="gr269" draw:text-style-name="P267" draw:layer="layout" svg:width="0.027cm" svg:height="0.027cm" svg:x="16.086cm" svg:y="15.026cm" svg:viewBox="0 0 28 28" draw:points="0,0 28,0 28,28 0,28">
          <text:p/>
        </draw:polygon>
        <draw:polygon draw:style-name="gr269" draw:text-style-name="P267" draw:layer="layout" svg:width="0.027cm" svg:height="0.027cm" svg:x="16.139cm" svg:y="15.026cm" svg:viewBox="0 0 28 28" draw:points="0,0 28,0 28,28 0,28">
          <text:p/>
        </draw:polygon>
        <draw:polygon draw:style-name="gr269" draw:text-style-name="P267" draw:layer="layout" svg:width="0.027cm" svg:height="0.027cm" svg:x="16.192cm" svg:y="15.026cm" svg:viewBox="0 0 28 28" draw:points="0,0 28,0 28,28 0,28">
          <text:p/>
        </draw:polygon>
        <draw:polygon draw:style-name="gr269" draw:text-style-name="P267" draw:layer="layout" svg:width="0.027cm" svg:height="0.027cm" svg:x="16.245cm" svg:y="15.026cm" svg:viewBox="0 0 28 28" draw:points="0,0 28,0 28,28 0,28">
          <text:p/>
        </draw:polygon>
        <draw:polygon draw:style-name="gr269" draw:text-style-name="P267" draw:layer="layout" svg:width="0.027cm" svg:height="0.027cm" svg:x="16.298cm" svg:y="15.026cm" svg:viewBox="0 0 28 28" draw:points="0,0 28,0 28,28 0,28">
          <text:p/>
        </draw:polygon>
        <draw:polygon draw:style-name="gr269" draw:text-style-name="P267" draw:layer="layout" svg:width="0.027cm" svg:height="0.027cm" svg:x="16.351cm" svg:y="15.026cm" svg:viewBox="0 0 28 28" draw:points="0,0 28,0 28,28 0,28">
          <text:p/>
        </draw:polygon>
        <draw:polygon draw:style-name="gr269" draw:text-style-name="P267" draw:layer="layout" svg:width="0.027cm" svg:height="0.027cm" svg:x="16.404cm" svg:y="15.026cm" svg:viewBox="0 0 28 28" draw:points="0,0 28,0 28,28 0,28">
          <text:p/>
        </draw:polygon>
        <draw:polygon draw:style-name="gr269" draw:text-style-name="P267" draw:layer="layout" svg:width="0.027cm" svg:height="0.027cm" svg:x="16.457cm" svg:y="15.026cm" svg:viewBox="0 0 28 28" draw:points="0,0 28,0 28,28 0,28">
          <text:p/>
        </draw:polygon>
        <draw:polygon draw:style-name="gr269" draw:text-style-name="P267" draw:layer="layout" svg:width="0.027cm" svg:height="0.027cm" svg:x="16.51cm" svg:y="15.026cm" svg:viewBox="0 0 28 28" draw:points="0,0 28,0 28,28 0,28">
          <text:p/>
        </draw:polygon>
        <draw:polygon draw:style-name="gr269" draw:text-style-name="P267" draw:layer="layout" svg:width="0.027cm" svg:height="0.027cm" svg:x="16.563cm" svg:y="15.026cm" svg:viewBox="0 0 28 28" draw:points="0,0 28,0 28,28 0,28">
          <text:p/>
        </draw:polygon>
        <draw:polygon draw:style-name="gr269" draw:text-style-name="P267" draw:layer="layout" svg:width="0.027cm" svg:height="0.027cm" svg:x="16.616cm" svg:y="15.026cm" svg:viewBox="0 0 28 28" draw:points="0,0 28,0 28,28 0,28">
          <text:p/>
        </draw:polygon>
        <draw:polygon draw:style-name="gr269" draw:text-style-name="P267" draw:layer="layout" svg:width="0.027cm" svg:height="0.027cm" svg:x="16.669cm" svg:y="15.026cm" svg:viewBox="0 0 28 28" draw:points="0,0 28,0 28,28 0,28">
          <text:p/>
        </draw:polygon>
        <draw:polygon draw:style-name="gr269" draw:text-style-name="P267" draw:layer="layout" svg:width="0.027cm" svg:height="0.027cm" svg:x="16.722cm" svg:y="15.026cm" svg:viewBox="0 0 28 28" draw:points="0,0 28,0 28,28 0,28">
          <text:p/>
        </draw:polygon>
        <draw:polygon draw:style-name="gr269" draw:text-style-name="P267" draw:layer="layout" svg:width="0.027cm" svg:height="0.027cm" svg:x="16.775cm" svg:y="15.026cm" svg:viewBox="0 0 28 28" draw:points="0,0 28,0 28,28 0,28">
          <text:p/>
        </draw:polygon>
        <draw:polygon draw:style-name="gr269" draw:text-style-name="P267" draw:layer="layout" svg:width="0.027cm" svg:height="0.027cm" svg:x="16.828cm" svg:y="15.026cm" svg:viewBox="0 0 28 28" draw:points="0,0 28,0 28,28 0,28">
          <text:p/>
        </draw:polygon>
        <draw:polygon draw:style-name="gr269" draw:text-style-name="P267" draw:layer="layout" svg:width="0.027cm" svg:height="0.027cm" svg:x="16.881cm" svg:y="15.026cm" svg:viewBox="0 0 28 28" draw:points="0,0 28,0 28,28 0,28">
          <text:p/>
        </draw:polygon>
        <draw:polygon draw:style-name="gr269" draw:text-style-name="P267" draw:layer="layout" svg:width="0.027cm" svg:height="0.027cm" svg:x="16.934cm" svg:y="15.026cm" svg:viewBox="0 0 28 28" draw:points="0,0 28,0 28,28 0,28">
          <text:p/>
        </draw:polygon>
        <draw:polygon draw:style-name="gr269" draw:text-style-name="P267" draw:layer="layout" svg:width="0.027cm" svg:height="0.027cm" svg:x="16.987cm" svg:y="15.026cm" svg:viewBox="0 0 28 28" draw:points="0,0 28,0 28,28 0,28">
          <text:p/>
        </draw:polygon>
        <draw:polygon draw:style-name="gr269" draw:text-style-name="P267" draw:layer="layout" svg:width="0.027cm" svg:height="0.027cm" svg:x="17.04cm" svg:y="15.026cm" svg:viewBox="0 0 28 28" draw:points="0,0 28,0 28,28 0,28">
          <text:p/>
        </draw:polygon>
        <draw:polygon draw:style-name="gr269" draw:text-style-name="P267" draw:layer="layout" svg:width="0.027cm" svg:height="0.027cm" svg:x="17.093cm" svg:y="15.026cm" svg:viewBox="0 0 28 28" draw:points="0,0 28,0 28,28 0,28">
          <text:p/>
        </draw:polygon>
        <draw:polygon draw:style-name="gr269" draw:text-style-name="P267" draw:layer="layout" svg:width="0.028cm" svg:height="0.027cm" svg:x="17.146cm" svg:y="15.026cm" svg:viewBox="0 0 29 28" draw:points="0,0 29,0 29,28 0,28">
          <text:p/>
        </draw:polygon>
        <draw:polygon draw:style-name="gr269" draw:text-style-name="P267" draw:layer="layout" svg:width="0.027cm" svg:height="0.027cm" svg:x="17.199cm" svg:y="15.026cm" svg:viewBox="0 0 28 28" draw:points="0,0 28,0 28,28 0,28">
          <text:p/>
        </draw:polygon>
        <draw:polygon draw:style-name="gr269" draw:text-style-name="P267" draw:layer="layout" svg:width="0.027cm" svg:height="0.027cm" svg:x="17.252cm" svg:y="15.026cm" svg:viewBox="0 0 28 28" draw:points="0,0 28,0 28,28 0,28">
          <text:p/>
        </draw:polygon>
        <draw:polygon draw:style-name="gr269" draw:text-style-name="P267" draw:layer="layout" svg:width="0.027cm" svg:height="0.027cm" svg:x="17.305cm" svg:y="15.026cm" svg:viewBox="0 0 28 28" draw:points="0,0 28,0 28,28 0,28">
          <text:p/>
        </draw:polygon>
        <draw:polygon draw:style-name="gr269" draw:text-style-name="P267" draw:layer="layout" svg:width="0.027cm" svg:height="0.027cm" svg:x="17.358cm" svg:y="15.026cm" svg:viewBox="0 0 28 28" draw:points="0,0 28,0 28,28 0,28">
          <text:p/>
        </draw:polygon>
        <draw:polygon draw:style-name="gr269" draw:text-style-name="P267" draw:layer="layout" svg:width="0.027cm" svg:height="0.027cm" svg:x="17.411cm" svg:y="15.026cm" svg:viewBox="0 0 28 28" draw:points="0,0 28,0 28,28 0,28">
          <text:p/>
        </draw:polygon>
        <draw:polygon draw:style-name="gr269" draw:text-style-name="P267" draw:layer="layout" svg:width="0.027cm" svg:height="0.027cm" svg:x="17.464cm" svg:y="15.026cm" svg:viewBox="0 0 28 28" draw:points="0,0 28,0 28,28 0,28">
          <text:p/>
        </draw:polygon>
        <draw:polygon draw:style-name="gr269" draw:text-style-name="P267" draw:layer="layout" svg:width="0.027cm" svg:height="0.027cm" svg:x="17.517cm" svg:y="15.026cm" svg:viewBox="0 0 28 28" draw:points="0,0 28,0 28,28 0,28">
          <text:p/>
        </draw:polygon>
        <draw:polygon draw:style-name="gr269" draw:text-style-name="P267" draw:layer="layout" svg:width="0.027cm" svg:height="0.027cm" svg:x="17.57cm" svg:y="15.026cm" svg:viewBox="0 0 28 28" draw:points="0,0 28,0 28,28 0,28">
          <text:p/>
        </draw:polygon>
        <draw:polygon draw:style-name="gr269" draw:text-style-name="P267" draw:layer="layout" svg:width="0.027cm" svg:height="0.027cm" svg:x="17.623cm" svg:y="15.026cm" svg:viewBox="0 0 28 28" draw:points="0,0 28,0 28,28 0,28">
          <text:p/>
        </draw:polygon>
        <draw:polygon draw:style-name="gr269" draw:text-style-name="P267" draw:layer="layout" svg:width="0.027cm" svg:height="0.027cm" svg:x="17.676cm" svg:y="15.026cm" svg:viewBox="0 0 28 28" draw:points="0,0 28,0 28,28 0,28">
          <text:p/>
        </draw:polygon>
        <draw:polygon draw:style-name="gr269" draw:text-style-name="P267" draw:layer="layout" svg:width="0.027cm" svg:height="0.027cm" svg:x="17.729cm" svg:y="15.026cm" svg:viewBox="0 0 28 28" draw:points="0,0 28,0 28,28 0,28">
          <text:p/>
        </draw:polygon>
        <draw:polygon draw:style-name="gr269" draw:text-style-name="P267" draw:layer="layout" svg:width="0.027cm" svg:height="0.027cm" svg:x="17.782cm" svg:y="15.026cm" svg:viewBox="0 0 28 28" draw:points="0,0 28,0 28,28 0,28">
          <text:p/>
        </draw:polygon>
        <draw:polygon draw:style-name="gr269" draw:text-style-name="P267" draw:layer="layout" svg:width="0.027cm" svg:height="0.027cm" svg:x="17.835cm" svg:y="15.026cm" svg:viewBox="0 0 28 28" draw:points="0,0 28,0 28,28 0,28">
          <text:p/>
        </draw:polygon>
        <draw:polygon draw:style-name="gr269" draw:text-style-name="P267" draw:layer="layout" svg:width="0.027cm" svg:height="0.027cm" svg:x="17.888cm" svg:y="15.026cm" svg:viewBox="0 0 28 28" draw:points="0,0 28,0 28,28 0,28">
          <text:p/>
        </draw:polygon>
        <draw:polygon draw:style-name="gr269" draw:text-style-name="P267" draw:layer="layout" svg:width="0.027cm" svg:height="0.027cm" svg:x="17.941cm" svg:y="15.026cm" svg:viewBox="0 0 28 28" draw:points="0,0 28,0 28,28 0,28">
          <text:p/>
        </draw:polygon>
        <draw:polygon draw:style-name="gr269" draw:text-style-name="P267" draw:layer="layout" svg:width="0.027cm" svg:height="0.027cm" svg:x="17.994cm" svg:y="15.026cm" svg:viewBox="0 0 28 28" draw:points="0,0 28,0 28,28 0,28">
          <text:p/>
        </draw:polygon>
        <draw:polygon draw:style-name="gr269" draw:text-style-name="P267" draw:layer="layout" svg:width="0.027cm" svg:height="0.027cm" svg:x="18.047cm" svg:y="15.026cm" svg:viewBox="0 0 28 28" draw:points="0,0 28,0 28,28 0,28">
          <text:p/>
        </draw:polygon>
        <draw:polygon draw:style-name="gr269" draw:text-style-name="P267" draw:layer="layout" svg:width="0.027cm" svg:height="0.027cm" svg:x="18.1cm" svg:y="15.026cm" svg:viewBox="0 0 28 28" draw:points="0,0 28,0 28,28 0,28">
          <text:p/>
        </draw:polygon>
        <draw:polygon draw:style-name="gr269" draw:text-style-name="P267" draw:layer="layout" svg:width="0.027cm" svg:height="0.027cm" svg:x="18.153cm" svg:y="15.026cm" svg:viewBox="0 0 28 28" draw:points="0,0 28,0 28,28 0,28">
          <text:p/>
        </draw:polygon>
        <draw:polygon draw:style-name="gr269" draw:text-style-name="P267" draw:layer="layout" svg:width="0.027cm" svg:height="0.027cm" svg:x="18.206cm" svg:y="15.026cm" svg:viewBox="0 0 28 28" draw:points="0,0 28,0 28,28 0,28">
          <text:p/>
        </draw:polygon>
        <draw:polygon draw:style-name="gr269" draw:text-style-name="P267" draw:layer="layout" svg:width="0.027cm" svg:height="0.027cm" svg:x="18.259cm" svg:y="15.026cm" svg:viewBox="0 0 28 28" draw:points="0,0 28,0 28,28 0,28">
          <text:p/>
        </draw:polygon>
        <draw:polygon draw:style-name="gr269" draw:text-style-name="P267" draw:layer="layout" svg:width="0.027cm" svg:height="0.027cm" svg:x="18.312cm" svg:y="15.026cm" svg:viewBox="0 0 28 28" draw:points="0,0 28,0 28,28 0,28">
          <text:p/>
        </draw:polygon>
        <draw:polygon draw:style-name="gr269" draw:text-style-name="P267" draw:layer="layout" svg:width="0.027cm" svg:height="0.027cm" svg:x="18.365cm" svg:y="15.026cm" svg:viewBox="0 0 28 28" draw:points="0,0 28,0 28,28 0,28">
          <text:p/>
        </draw:polygon>
        <draw:polygon draw:style-name="gr269" draw:text-style-name="P267" draw:layer="layout" svg:width="0.027cm" svg:height="0.027cm" svg:x="18.418cm" svg:y="15.026cm" svg:viewBox="0 0 28 28" draw:points="0,0 28,0 28,28 0,28">
          <text:p/>
        </draw:polygon>
        <draw:polygon draw:style-name="gr269" draw:text-style-name="P267" draw:layer="layout" svg:width="0.027cm" svg:height="0.027cm" svg:x="18.471cm" svg:y="15.026cm" svg:viewBox="0 0 28 28" draw:points="0,0 28,0 28,28 0,28">
          <text:p/>
        </draw:polygon>
        <draw:polygon draw:style-name="gr269" draw:text-style-name="P267" draw:layer="layout" svg:width="0.028cm" svg:height="0.027cm" svg:x="18.524cm" svg:y="15.026cm" svg:viewBox="0 0 29 28" draw:points="0,0 29,0 29,28 0,28">
          <text:p/>
        </draw:polygon>
        <draw:polygon draw:style-name="gr269" draw:text-style-name="P267" draw:layer="layout" svg:width="0.027cm" svg:height="0.027cm" svg:x="18.577cm" svg:y="15.026cm" svg:viewBox="0 0 28 28" draw:points="0,0 28,0 28,28 0,28">
          <text:p/>
        </draw:polygon>
        <draw:polygon draw:style-name="gr269" draw:text-style-name="P267" draw:layer="layout" svg:width="0.027cm" svg:height="0.027cm" svg:x="18.63cm" svg:y="15.026cm" svg:viewBox="0 0 28 28" draw:points="0,0 28,0 28,28 0,28">
          <text:p/>
        </draw:polygon>
        <draw:polygon draw:style-name="gr269" draw:text-style-name="P267" draw:layer="layout" svg:width="0.027cm" svg:height="0.027cm" svg:x="18.683cm" svg:y="15.026cm" svg:viewBox="0 0 28 28" draw:points="0,0 28,0 28,28 0,28">
          <text:p/>
        </draw:polygon>
        <draw:polygon draw:style-name="gr269" draw:text-style-name="P267" draw:layer="layout" svg:width="0.027cm" svg:height="0.027cm" svg:x="18.736cm" svg:y="15.026cm" svg:viewBox="0 0 28 28" draw:points="0,0 28,0 28,28 0,28">
          <text:p/>
        </draw:polygon>
        <draw:polygon draw:style-name="gr269" draw:text-style-name="P267" draw:layer="layout" svg:width="0.027cm" svg:height="0.027cm" svg:x="18.789cm" svg:y="15.026cm" svg:viewBox="0 0 28 28" draw:points="0,0 28,0 28,28 0,28">
          <text:p/>
        </draw:polygon>
        <draw:polygon draw:style-name="gr269" draw:text-style-name="P267" draw:layer="layout" svg:width="0.027cm" svg:height="0.027cm" svg:x="18.842cm" svg:y="15.026cm" svg:viewBox="0 0 28 28" draw:points="0,0 28,0 28,28 0,28">
          <text:p/>
        </draw:polygon>
        <draw:polygon draw:style-name="gr269" draw:text-style-name="P267" draw:layer="layout" svg:width="0.027cm" svg:height="0.027cm" svg:x="18.895cm" svg:y="15.026cm" svg:viewBox="0 0 28 28" draw:points="0,0 28,0 28,28 0,28">
          <text:p/>
        </draw:polygon>
        <draw:polygon draw:style-name="gr269" draw:text-style-name="P267" draw:layer="layout" svg:width="0.027cm" svg:height="0.027cm" svg:x="18.948cm" svg:y="15.026cm" svg:viewBox="0 0 28 28" draw:points="0,0 28,0 28,28 0,28">
          <text:p/>
        </draw:polygon>
        <draw:polygon draw:style-name="gr269" draw:text-style-name="P267" draw:layer="layout" svg:width="0.027cm" svg:height="0.027cm" svg:x="19.001cm" svg:y="15.026cm" svg:viewBox="0 0 28 28" draw:points="0,0 28,0 28,28 0,28">
          <text:p/>
        </draw:polygon>
        <draw:polygon draw:style-name="gr269" draw:text-style-name="P267" draw:layer="layout" svg:width="0.053cm" svg:height="0.027cm" svg:x="2.014cm" svg:y="16.033cm" svg:viewBox="0 0 54 28" draw:points="0,0 54,0 54,28 0,28">
          <text:p/>
        </draw:polygon>
        <draw:polygon draw:style-name="gr269" draw:text-style-name="P267" draw:layer="layout" svg:width="0.027cm" svg:height="0.027cm" svg:x="2.093cm" svg:y="16.033cm" svg:viewBox="0 0 28 28" draw:points="0,0 28,0 28,28 0,28">
          <text:p/>
        </draw:polygon>
        <draw:polygon draw:style-name="gr269" draw:text-style-name="P267" draw:layer="layout" svg:width="0.027cm" svg:height="0.027cm" svg:x="2.146cm" svg:y="16.033cm" svg:viewBox="0 0 28 28" draw:points="0,0 28,0 28,28 0,28">
          <text:p/>
        </draw:polygon>
        <draw:polygon draw:style-name="gr269" draw:text-style-name="P267" draw:layer="layout" svg:width="0.027cm" svg:height="0.027cm" svg:x="2.199cm" svg:y="16.033cm" svg:viewBox="0 0 28 28" draw:points="0,0 28,0 28,28 0,28">
          <text:p/>
        </draw:polygon>
        <draw:polygon draw:style-name="gr269" draw:text-style-name="P267" draw:layer="layout" svg:width="0.027cm" svg:height="0.027cm" svg:x="2.252cm" svg:y="16.033cm" svg:viewBox="0 0 28 28" draw:points="0,0 28,0 28,28 0,28">
          <text:p/>
        </draw:polygon>
        <draw:polygon draw:style-name="gr269" draw:text-style-name="P267" draw:layer="layout" svg:width="0.027cm" svg:height="0.027cm" svg:x="2.305cm" svg:y="16.033cm" svg:viewBox="0 0 28 28" draw:points="0,0 28,0 28,28 0,28">
          <text:p/>
        </draw:polygon>
        <draw:polygon draw:style-name="gr269" draw:text-style-name="P267" draw:layer="layout" svg:width="0.027cm" svg:height="0.027cm" svg:x="2.358cm" svg:y="16.033cm" svg:viewBox="0 0 28 28" draw:points="0,0 28,0 28,28 0,28">
          <text:p/>
        </draw:polygon>
        <draw:polygon draw:style-name="gr269" draw:text-style-name="P267" draw:layer="layout" svg:width="0.027cm" svg:height="0.027cm" svg:x="2.411cm" svg:y="16.033cm" svg:viewBox="0 0 28 28" draw:points="0,0 28,0 28,28 0,28">
          <text:p/>
        </draw:polygon>
        <draw:polygon draw:style-name="gr269" draw:text-style-name="P267" draw:layer="layout" svg:width="0.027cm" svg:height="0.027cm" svg:x="2.464cm" svg:y="16.033cm" svg:viewBox="0 0 28 28" draw:points="0,0 28,0 28,28 0,28">
          <text:p/>
        </draw:polygon>
        <draw:polygon draw:style-name="gr269" draw:text-style-name="P267" draw:layer="layout" svg:width="0.027cm" svg:height="0.027cm" svg:x="2.517cm" svg:y="16.033cm" svg:viewBox="0 0 28 28" draw:points="0,0 28,0 28,28 0,28">
          <text:p/>
        </draw:polygon>
        <draw:polygon draw:style-name="gr269" draw:text-style-name="P267" draw:layer="layout" svg:width="0.027cm" svg:height="0.027cm" svg:x="2.57cm" svg:y="16.033cm" svg:viewBox="0 0 28 28" draw:points="0,0 28,0 28,28 0,28">
          <text:p/>
        </draw:polygon>
        <draw:polygon draw:style-name="gr269" draw:text-style-name="P267" draw:layer="layout" svg:width="0.027cm" svg:height="0.027cm" svg:x="2.623cm" svg:y="16.033cm" svg:viewBox="0 0 28 28" draw:points="0,0 28,0 28,28 0,28">
          <text:p/>
        </draw:polygon>
        <draw:polygon draw:style-name="gr269" draw:text-style-name="P267" draw:layer="layout" svg:width="0.027cm" svg:height="0.027cm" svg:x="2.676cm" svg:y="16.033cm" svg:viewBox="0 0 28 28" draw:points="0,0 28,0 28,28 0,28">
          <text:p/>
        </draw:polygon>
        <draw:polygon draw:style-name="gr269" draw:text-style-name="P267" draw:layer="layout" svg:width="0.027cm" svg:height="0.027cm" svg:x="2.729cm" svg:y="16.033cm" svg:viewBox="0 0 28 28" draw:points="0,0 28,0 28,28 0,28">
          <text:p/>
        </draw:polygon>
        <draw:polygon draw:style-name="gr269" draw:text-style-name="P267" draw:layer="layout" svg:width="0.027cm" svg:height="0.027cm" svg:x="2.782cm" svg:y="16.033cm" svg:viewBox="0 0 28 28" draw:points="0,0 28,0 28,28 0,28">
          <text:p/>
        </draw:polygon>
        <draw:polygon draw:style-name="gr269" draw:text-style-name="P267" draw:layer="layout" svg:width="0.027cm" svg:height="0.027cm" svg:x="2.835cm" svg:y="16.033cm" svg:viewBox="0 0 28 28" draw:points="0,0 28,0 28,28 0,28">
          <text:p/>
        </draw:polygon>
        <draw:polygon draw:style-name="gr269" draw:text-style-name="P267" draw:layer="layout" svg:width="0.027cm" svg:height="0.027cm" svg:x="2.888cm" svg:y="16.033cm" svg:viewBox="0 0 28 28" draw:points="0,0 28,0 28,28 0,28">
          <text:p/>
        </draw:polygon>
        <draw:polygon draw:style-name="gr269" draw:text-style-name="P267" draw:layer="layout" svg:width="0.027cm" svg:height="0.027cm" svg:x="2.941cm" svg:y="16.033cm" svg:viewBox="0 0 28 28" draw:points="0,0 28,0 28,28 0,28">
          <text:p/>
        </draw:polygon>
        <draw:polygon draw:style-name="gr269" draw:text-style-name="P267" draw:layer="layout" svg:width="0.027cm" svg:height="0.027cm" svg:x="2.994cm" svg:y="16.033cm" svg:viewBox="0 0 28 28" draw:points="0,0 28,0 28,28 0,28">
          <text:p/>
        </draw:polygon>
        <draw:polygon draw:style-name="gr269" draw:text-style-name="P267" draw:layer="layout" svg:width="0.027cm" svg:height="0.027cm" svg:x="3.047cm" svg:y="16.033cm" svg:viewBox="0 0 28 28" draw:points="0,0 28,0 28,28 0,28">
          <text:p/>
        </draw:polygon>
        <draw:polygon draw:style-name="gr269" draw:text-style-name="P267" draw:layer="layout" svg:width="0.027cm" svg:height="0.027cm" svg:x="3.1cm" svg:y="16.033cm" svg:viewBox="0 0 28 28" draw:points="0,0 28,0 28,28 0,28">
          <text:p/>
        </draw:polygon>
        <draw:polygon draw:style-name="gr269" draw:text-style-name="P267" draw:layer="layout" svg:width="0.027cm" svg:height="0.027cm" svg:x="3.153cm" svg:y="16.033cm" svg:viewBox="0 0 28 28" draw:points="0,0 28,0 28,28 0,28">
          <text:p/>
        </draw:polygon>
        <draw:polygon draw:style-name="gr269" draw:text-style-name="P267" draw:layer="layout" svg:width="0.027cm" svg:height="0.027cm" svg:x="3.206cm" svg:y="16.033cm" svg:viewBox="0 0 28 28" draw:points="0,0 28,0 28,28 0,28">
          <text:p/>
        </draw:polygon>
        <draw:polygon draw:style-name="gr269" draw:text-style-name="P267" draw:layer="layout" svg:width="0.027cm" svg:height="0.027cm" svg:x="3.259cm" svg:y="16.033cm" svg:viewBox="0 0 28 28" draw:points="0,0 28,0 28,28 0,28">
          <text:p/>
        </draw:polygon>
        <draw:polygon draw:style-name="gr269" draw:text-style-name="P267" draw:layer="layout" svg:width="0.027cm" svg:height="0.027cm" svg:x="3.312cm" svg:y="16.033cm" svg:viewBox="0 0 28 28" draw:points="0,0 28,0 28,28 0,28">
          <text:p/>
        </draw:polygon>
        <draw:polygon draw:style-name="gr269" draw:text-style-name="P267" draw:layer="layout" svg:width="0.027cm" svg:height="0.027cm" svg:x="3.365cm" svg:y="16.033cm" svg:viewBox="0 0 28 28" draw:points="0,0 28,0 28,28 0,28">
          <text:p/>
        </draw:polygon>
        <draw:polygon draw:style-name="gr269" draw:text-style-name="P267" draw:layer="layout" svg:width="0.028cm" svg:height="0.027cm" svg:x="3.418cm" svg:y="16.033cm" svg:viewBox="0 0 29 28" draw:points="0,0 29,0 29,28 0,28">
          <text:p/>
        </draw:polygon>
        <draw:polygon draw:style-name="gr269" draw:text-style-name="P267" draw:layer="layout" svg:width="0.027cm" svg:height="0.027cm" svg:x="3.471cm" svg:y="16.033cm" svg:viewBox="0 0 28 28" draw:points="0,0 28,0 28,28 0,28">
          <text:p/>
        </draw:polygon>
        <draw:polygon draw:style-name="gr269" draw:text-style-name="P267" draw:layer="layout" svg:width="0.027cm" svg:height="0.027cm" svg:x="3.524cm" svg:y="16.033cm" svg:viewBox="0 0 28 28" draw:points="0,0 28,0 28,28 0,28">
          <text:p/>
        </draw:polygon>
        <draw:polygon draw:style-name="gr269" draw:text-style-name="P267" draw:layer="layout" svg:width="0.027cm" svg:height="0.027cm" svg:x="3.577cm" svg:y="16.033cm" svg:viewBox="0 0 28 28" draw:points="0,0 28,0 28,28 0,28">
          <text:p/>
        </draw:polygon>
        <draw:polygon draw:style-name="gr269" draw:text-style-name="P267" draw:layer="layout" svg:width="0.027cm" svg:height="0.027cm" svg:x="3.63cm" svg:y="16.033cm" svg:viewBox="0 0 28 28" draw:points="0,0 28,0 28,28 0,28">
          <text:p/>
        </draw:polygon>
        <draw:polygon draw:style-name="gr269" draw:text-style-name="P267" draw:layer="layout" svg:width="0.027cm" svg:height="0.027cm" svg:x="3.683cm" svg:y="16.033cm" svg:viewBox="0 0 28 28" draw:points="0,0 28,0 28,28 0,28">
          <text:p/>
        </draw:polygon>
        <draw:polygon draw:style-name="gr269" draw:text-style-name="P267" draw:layer="layout" svg:width="0.027cm" svg:height="0.027cm" svg:x="3.736cm" svg:y="16.033cm" svg:viewBox="0 0 28 28" draw:points="0,0 28,0 28,28 0,28">
          <text:p/>
        </draw:polygon>
        <draw:polygon draw:style-name="gr269" draw:text-style-name="P267" draw:layer="layout" svg:width="0.027cm" svg:height="0.027cm" svg:x="3.789cm" svg:y="16.033cm" svg:viewBox="0 0 28 28" draw:points="0,0 28,0 28,28 0,28">
          <text:p/>
        </draw:polygon>
        <draw:polygon draw:style-name="gr269" draw:text-style-name="P267" draw:layer="layout" svg:width="0.027cm" svg:height="0.027cm" svg:x="3.842cm" svg:y="16.033cm" svg:viewBox="0 0 28 28" draw:points="0,0 28,0 28,28 0,28">
          <text:p/>
        </draw:polygon>
        <draw:polygon draw:style-name="gr269" draw:text-style-name="P267" draw:layer="layout" svg:width="0.027cm" svg:height="0.027cm" svg:x="3.895cm" svg:y="16.033cm" svg:viewBox="0 0 28 28" draw:points="0,0 28,0 28,28 0,28">
          <text:p/>
        </draw:polygon>
        <draw:polygon draw:style-name="gr269" draw:text-style-name="P267" draw:layer="layout" svg:width="0.027cm" svg:height="0.027cm" svg:x="3.948cm" svg:y="16.033cm" svg:viewBox="0 0 28 28" draw:points="0,0 28,0 28,28 0,28">
          <text:p/>
        </draw:polygon>
        <draw:polygon draw:style-name="gr269" draw:text-style-name="P267" draw:layer="layout" svg:width="0.027cm" svg:height="0.027cm" svg:x="4.001cm" svg:y="16.033cm" svg:viewBox="0 0 28 28" draw:points="0,0 28,0 28,28 0,28">
          <text:p/>
        </draw:polygon>
        <draw:polygon draw:style-name="gr269" draw:text-style-name="P267" draw:layer="layout" svg:width="0.027cm" svg:height="0.027cm" svg:x="4.054cm" svg:y="16.033cm" svg:viewBox="0 0 28 28" draw:points="0,0 28,0 28,28 0,28">
          <text:p/>
        </draw:polygon>
        <draw:polygon draw:style-name="gr269" draw:text-style-name="P267" draw:layer="layout" svg:width="0.027cm" svg:height="0.027cm" svg:x="4.107cm" svg:y="16.033cm" svg:viewBox="0 0 28 28" draw:points="0,0 28,0 28,28 0,28">
          <text:p/>
        </draw:polygon>
        <draw:polygon draw:style-name="gr269" draw:text-style-name="P267" draw:layer="layout" svg:width="0.027cm" svg:height="0.027cm" svg:x="4.16cm" svg:y="16.033cm" svg:viewBox="0 0 28 28" draw:points="0,0 28,0 28,28 0,28">
          <text:p/>
        </draw:polygon>
        <draw:polygon draw:style-name="gr269" draw:text-style-name="P267" draw:layer="layout" svg:width="0.027cm" svg:height="0.027cm" svg:x="4.213cm" svg:y="16.033cm" svg:viewBox="0 0 28 28" draw:points="0,0 28,0 28,28 0,28">
          <text:p/>
        </draw:polygon>
        <draw:polygon draw:style-name="gr269" draw:text-style-name="P267" draw:layer="layout" svg:width="0.027cm" svg:height="0.027cm" svg:x="4.266cm" svg:y="16.033cm" svg:viewBox="0 0 28 28" draw:points="0,0 28,0 28,28 0,28">
          <text:p/>
        </draw:polygon>
        <draw:polygon draw:style-name="gr269" draw:text-style-name="P267" draw:layer="layout" svg:width="0.027cm" svg:height="0.027cm" svg:x="4.319cm" svg:y="16.033cm" svg:viewBox="0 0 28 28" draw:points="0,0 28,0 28,28 0,28">
          <text:p/>
        </draw:polygon>
        <draw:polygon draw:style-name="gr269" draw:text-style-name="P267" draw:layer="layout" svg:width="0.027cm" svg:height="0.027cm" svg:x="4.372cm" svg:y="16.033cm" svg:viewBox="0 0 28 28" draw:points="0,0 28,0 28,28 0,28">
          <text:p/>
        </draw:polygon>
        <draw:polygon draw:style-name="gr269" draw:text-style-name="P267" draw:layer="layout" svg:width="0.027cm" svg:height="0.027cm" svg:x="4.425cm" svg:y="16.033cm" svg:viewBox="0 0 28 28" draw:points="0,0 28,0 28,28 0,28">
          <text:p/>
        </draw:polygon>
        <draw:polygon draw:style-name="gr269" draw:text-style-name="P267" draw:layer="layout" svg:width="0.027cm" svg:height="0.027cm" svg:x="4.478cm" svg:y="16.033cm" svg:viewBox="0 0 28 28" draw:points="0,0 28,0 28,28 0,28">
          <text:p/>
        </draw:polygon>
        <draw:polygon draw:style-name="gr269" draw:text-style-name="P267" draw:layer="layout" svg:width="0.027cm" svg:height="0.027cm" svg:x="4.531cm" svg:y="16.033cm" svg:viewBox="0 0 28 28" draw:points="0,0 28,0 28,28 0,28">
          <text:p/>
        </draw:polygon>
        <draw:polygon draw:style-name="gr269" draw:text-style-name="P267" draw:layer="layout" svg:width="0.027cm" svg:height="0.027cm" svg:x="4.584cm" svg:y="16.033cm" svg:viewBox="0 0 28 28" draw:points="0,0 28,0 28,28 0,28">
          <text:p/>
        </draw:polygon>
        <draw:polygon draw:style-name="gr269" draw:text-style-name="P267" draw:layer="layout" svg:width="0.027cm" svg:height="0.027cm" svg:x="4.637cm" svg:y="16.033cm" svg:viewBox="0 0 28 28" draw:points="0,0 28,0 28,28 0,28">
          <text:p/>
        </draw:polygon>
        <draw:polygon draw:style-name="gr269" draw:text-style-name="P267" draw:layer="layout" svg:width="0.027cm" svg:height="0.027cm" svg:x="4.69cm" svg:y="16.033cm" svg:viewBox="0 0 28 28" draw:points="0,0 28,0 28,28 0,28">
          <text:p/>
        </draw:polygon>
        <draw:polygon draw:style-name="gr269" draw:text-style-name="P267" draw:layer="layout" svg:width="0.027cm" svg:height="0.027cm" svg:x="4.743cm" svg:y="16.033cm" svg:viewBox="0 0 28 28" draw:points="0,0 28,0 28,28 0,28">
          <text:p/>
        </draw:polygon>
        <draw:polygon draw:style-name="gr269" draw:text-style-name="P267" draw:layer="layout" svg:width="0.028cm" svg:height="0.027cm" svg:x="4.796cm" svg:y="16.033cm" svg:viewBox="0 0 29 28" draw:points="0,0 29,0 29,28 0,28">
          <text:p/>
        </draw:polygon>
        <draw:polygon draw:style-name="gr269" draw:text-style-name="P267" draw:layer="layout" svg:width="0.027cm" svg:height="0.027cm" svg:x="4.849cm" svg:y="16.033cm" svg:viewBox="0 0 28 28" draw:points="0,0 28,0 28,28 0,28">
          <text:p/>
        </draw:polygon>
        <draw:polygon draw:style-name="gr269" draw:text-style-name="P267" draw:layer="layout" svg:width="0.027cm" svg:height="0.027cm" svg:x="4.902cm" svg:y="16.033cm" svg:viewBox="0 0 28 28" draw:points="0,0 28,0 28,28 0,28">
          <text:p/>
        </draw:polygon>
        <draw:polygon draw:style-name="gr269" draw:text-style-name="P267" draw:layer="layout" svg:width="0.027cm" svg:height="0.027cm" svg:x="4.955cm" svg:y="16.033cm" svg:viewBox="0 0 28 28" draw:points="0,0 28,0 28,28 0,28">
          <text:p/>
        </draw:polygon>
        <draw:polygon draw:style-name="gr269" draw:text-style-name="P267" draw:layer="layout" svg:width="0.027cm" svg:height="0.027cm" svg:x="5.008cm" svg:y="16.033cm" svg:viewBox="0 0 28 28" draw:points="0,0 28,0 28,28 0,28">
          <text:p/>
        </draw:polygon>
        <draw:polygon draw:style-name="gr269" draw:text-style-name="P267" draw:layer="layout" svg:width="0.027cm" svg:height="0.027cm" svg:x="5.061cm" svg:y="16.033cm" svg:viewBox="0 0 28 28" draw:points="0,0 28,0 28,28 0,28">
          <text:p/>
        </draw:polygon>
        <draw:polygon draw:style-name="gr269" draw:text-style-name="P267" draw:layer="layout" svg:width="0.027cm" svg:height="0.027cm" svg:x="5.114cm" svg:y="16.033cm" svg:viewBox="0 0 28 28" draw:points="0,0 28,0 28,28 0,28">
          <text:p/>
        </draw:polygon>
        <draw:polygon draw:style-name="gr269" draw:text-style-name="P267" draw:layer="layout" svg:width="0.027cm" svg:height="0.027cm" svg:x="5.167cm" svg:y="16.033cm" svg:viewBox="0 0 28 28" draw:points="0,0 28,0 28,28 0,28">
          <text:p/>
        </draw:polygon>
        <draw:polygon draw:style-name="gr269" draw:text-style-name="P267" draw:layer="layout" svg:width="0.027cm" svg:height="0.027cm" svg:x="5.22cm" svg:y="16.033cm" svg:viewBox="0 0 28 28" draw:points="0,0 28,0 28,28 0,28">
          <text:p/>
        </draw:polygon>
        <draw:polygon draw:style-name="gr269" draw:text-style-name="P267" draw:layer="layout" svg:width="0.027cm" svg:height="0.027cm" svg:x="5.273cm" svg:y="16.033cm" svg:viewBox="0 0 28 28" draw:points="0,0 28,0 28,28 0,28">
          <text:p/>
        </draw:polygon>
        <draw:polygon draw:style-name="gr269" draw:text-style-name="P267" draw:layer="layout" svg:width="0.027cm" svg:height="0.027cm" svg:x="5.326cm" svg:y="16.033cm" svg:viewBox="0 0 28 28" draw:points="0,0 28,0 28,28 0,28">
          <text:p/>
        </draw:polygon>
        <draw:polygon draw:style-name="gr269" draw:text-style-name="P267" draw:layer="layout" svg:width="0.027cm" svg:height="0.027cm" svg:x="5.379cm" svg:y="16.033cm" svg:viewBox="0 0 28 28" draw:points="0,0 28,0 28,28 0,28">
          <text:p/>
        </draw:polygon>
        <draw:polygon draw:style-name="gr269" draw:text-style-name="P267" draw:layer="layout" svg:width="0.027cm" svg:height="0.027cm" svg:x="5.432cm" svg:y="16.033cm" svg:viewBox="0 0 28 28" draw:points="0,0 28,0 28,28 0,28">
          <text:p/>
        </draw:polygon>
        <draw:polygon draw:style-name="gr269" draw:text-style-name="P267" draw:layer="layout" svg:width="0.027cm" svg:height="0.027cm" svg:x="5.485cm" svg:y="16.033cm" svg:viewBox="0 0 28 28" draw:points="0,0 28,0 28,28 0,28">
          <text:p/>
        </draw:polygon>
        <draw:polygon draw:style-name="gr269" draw:text-style-name="P267" draw:layer="layout" svg:width="0.027cm" svg:height="0.027cm" svg:x="5.538cm" svg:y="16.033cm" svg:viewBox="0 0 28 28" draw:points="0,0 28,0 28,28 0,28">
          <text:p/>
        </draw:polygon>
        <draw:polygon draw:style-name="gr269" draw:text-style-name="P267" draw:layer="layout" svg:width="0.027cm" svg:height="0.027cm" svg:x="5.591cm" svg:y="16.033cm" svg:viewBox="0 0 28 28" draw:points="0,0 28,0 28,28 0,28">
          <text:p/>
        </draw:polygon>
        <draw:polygon draw:style-name="gr269" draw:text-style-name="P267" draw:layer="layout" svg:width="0.027cm" svg:height="0.027cm" svg:x="5.644cm" svg:y="16.033cm" svg:viewBox="0 0 28 28" draw:points="0,0 28,0 28,28 0,28">
          <text:p/>
        </draw:polygon>
        <draw:polygon draw:style-name="gr269" draw:text-style-name="P267" draw:layer="layout" svg:width="0.027cm" svg:height="0.027cm" svg:x="5.697cm" svg:y="16.033cm" svg:viewBox="0 0 28 28" draw:points="0,0 28,0 28,28 0,28">
          <text:p/>
        </draw:polygon>
        <draw:polygon draw:style-name="gr269" draw:text-style-name="P267" draw:layer="layout" svg:width="0.027cm" svg:height="0.027cm" svg:x="5.75cm" svg:y="16.033cm" svg:viewBox="0 0 28 28" draw:points="0,0 28,0 28,28 0,28">
          <text:p/>
        </draw:polygon>
        <draw:polygon draw:style-name="gr269" draw:text-style-name="P267" draw:layer="layout" svg:width="0.027cm" svg:height="0.027cm" svg:x="5.803cm" svg:y="16.033cm" svg:viewBox="0 0 28 28" draw:points="0,0 28,0 28,28 0,28">
          <text:p/>
        </draw:polygon>
        <draw:polygon draw:style-name="gr269" draw:text-style-name="P267" draw:layer="layout" svg:width="0.027cm" svg:height="0.027cm" svg:x="5.856cm" svg:y="16.033cm" svg:viewBox="0 0 28 28" draw:points="0,0 28,0 28,28 0,28">
          <text:p/>
        </draw:polygon>
        <draw:polygon draw:style-name="gr269" draw:text-style-name="P267" draw:layer="layout" svg:width="0.027cm" svg:height="0.027cm" svg:x="5.909cm" svg:y="16.033cm" svg:viewBox="0 0 28 28" draw:points="0,0 28,0 28,28 0,28">
          <text:p/>
        </draw:polygon>
        <draw:polygon draw:style-name="gr269" draw:text-style-name="P267" draw:layer="layout" svg:width="0.027cm" svg:height="0.027cm" svg:x="5.962cm" svg:y="16.033cm" svg:viewBox="0 0 28 28" draw:points="0,0 28,0 28,28 0,28">
          <text:p/>
        </draw:polygon>
        <draw:polygon draw:style-name="gr269" draw:text-style-name="P267" draw:layer="layout" svg:width="0.027cm" svg:height="0.027cm" svg:x="6.015cm" svg:y="16.033cm" svg:viewBox="0 0 28 28" draw:points="0,0 28,0 28,28 0,28">
          <text:p/>
        </draw:polygon>
        <draw:polygon draw:style-name="gr269" draw:text-style-name="P267" draw:layer="layout" svg:width="0.027cm" svg:height="0.027cm" svg:x="6.068cm" svg:y="16.033cm" svg:viewBox="0 0 28 28" draw:points="0,0 28,0 28,28 0,28">
          <text:p/>
        </draw:polygon>
        <draw:polygon draw:style-name="gr269" draw:text-style-name="P267" draw:layer="layout" svg:width="0.027cm" svg:height="0.027cm" svg:x="6.121cm" svg:y="16.033cm" svg:viewBox="0 0 28 28" draw:points="0,0 28,0 28,28 0,28">
          <text:p/>
        </draw:polygon>
        <draw:polygon draw:style-name="gr269" draw:text-style-name="P267" draw:layer="layout" svg:width="0.028cm" svg:height="0.027cm" svg:x="6.174cm" svg:y="16.033cm" svg:viewBox="0 0 29 28" draw:points="0,0 29,0 29,28 0,28">
          <text:p/>
        </draw:polygon>
        <draw:polygon draw:style-name="gr269" draw:text-style-name="P267" draw:layer="layout" svg:width="0.027cm" svg:height="0.027cm" svg:x="6.227cm" svg:y="16.033cm" svg:viewBox="0 0 28 28" draw:points="0,0 28,0 28,28 0,28">
          <text:p/>
        </draw:polygon>
        <draw:polygon draw:style-name="gr269" draw:text-style-name="P267" draw:layer="layout" svg:width="0.027cm" svg:height="0.027cm" svg:x="6.28cm" svg:y="16.033cm" svg:viewBox="0 0 28 28" draw:points="0,0 28,0 28,28 0,28">
          <text:p/>
        </draw:polygon>
        <draw:polygon draw:style-name="gr269" draw:text-style-name="P267" draw:layer="layout" svg:width="0.027cm" svg:height="0.027cm" svg:x="6.333cm" svg:y="16.033cm" svg:viewBox="0 0 28 28" draw:points="0,0 28,0 28,28 0,28">
          <text:p/>
        </draw:polygon>
        <draw:polygon draw:style-name="gr269" draw:text-style-name="P267" draw:layer="layout" svg:width="0.026cm" svg:height="0.027cm" svg:x="6.387cm" svg:y="16.033cm" svg:viewBox="0 0 27 28" draw:points="0,0 27,0 27,28 0,28">
          <text:p/>
        </draw:polygon>
        <draw:polygon draw:style-name="gr269" draw:text-style-name="P267" draw:layer="layout" svg:width="0.026cm" svg:height="0.027cm" svg:x="6.44cm" svg:y="16.033cm" svg:viewBox="0 0 27 28" draw:points="0,0 27,0 27,28 0,28">
          <text:p/>
        </draw:polygon>
        <draw:polygon draw:style-name="gr269" draw:text-style-name="P267" draw:layer="layout" svg:width="0.026cm" svg:height="0.027cm" svg:x="6.493cm" svg:y="16.033cm" svg:viewBox="0 0 27 28" draw:points="0,0 27,0 27,28 0,28">
          <text:p/>
        </draw:polygon>
        <draw:polygon draw:style-name="gr269" draw:text-style-name="P267" draw:layer="layout" svg:width="0.026cm" svg:height="0.027cm" svg:x="6.546cm" svg:y="16.033cm" svg:viewBox="0 0 27 28" draw:points="0,0 27,0 27,28 0,28">
          <text:p/>
        </draw:polygon>
        <draw:polygon draw:style-name="gr269" draw:text-style-name="P267" draw:layer="layout" svg:width="0.026cm" svg:height="0.027cm" svg:x="6.599cm" svg:y="16.033cm" svg:viewBox="0 0 27 28" draw:points="0,0 27,0 27,28 0,28">
          <text:p/>
        </draw:polygon>
        <draw:polygon draw:style-name="gr269" draw:text-style-name="P267" draw:layer="layout" svg:width="0.026cm" svg:height="0.027cm" svg:x="6.652cm" svg:y="16.033cm" svg:viewBox="0 0 27 28" draw:points="0,0 27,0 27,28 0,28">
          <text:p/>
        </draw:polygon>
        <draw:polygon draw:style-name="gr269" draw:text-style-name="P267" draw:layer="layout" svg:width="0.026cm" svg:height="0.027cm" svg:x="6.705cm" svg:y="16.033cm" svg:viewBox="0 0 27 28" draw:points="0,0 27,0 27,28 0,28">
          <text:p/>
        </draw:polygon>
        <draw:polygon draw:style-name="gr269" draw:text-style-name="P267" draw:layer="layout" svg:width="0.026cm" svg:height="0.027cm" svg:x="6.758cm" svg:y="16.033cm" svg:viewBox="0 0 27 28" draw:points="0,0 27,0 27,28 0,28">
          <text:p/>
        </draw:polygon>
        <draw:polygon draw:style-name="gr269" draw:text-style-name="P267" draw:layer="layout" svg:width="0.026cm" svg:height="0.027cm" svg:x="6.811cm" svg:y="16.033cm" svg:viewBox="0 0 27 28" draw:points="0,0 27,0 27,28 0,28">
          <text:p/>
        </draw:polygon>
        <draw:polygon draw:style-name="gr269" draw:text-style-name="P267" draw:layer="layout" svg:width="0.026cm" svg:height="0.027cm" svg:x="6.864cm" svg:y="16.033cm" svg:viewBox="0 0 27 28" draw:points="0,0 27,0 27,28 0,28">
          <text:p/>
        </draw:polygon>
        <draw:polygon draw:style-name="gr269" draw:text-style-name="P267" draw:layer="layout" svg:width="0.026cm" svg:height="0.027cm" svg:x="6.917cm" svg:y="16.033cm" svg:viewBox="0 0 27 28" draw:points="0,0 27,0 27,28 0,28">
          <text:p/>
        </draw:polygon>
        <draw:polygon draw:style-name="gr269" draw:text-style-name="P267" draw:layer="layout" svg:width="0.026cm" svg:height="0.027cm" svg:x="6.97cm" svg:y="16.033cm" svg:viewBox="0 0 27 28" draw:points="0,0 27,0 27,28 0,28">
          <text:p/>
        </draw:polygon>
        <draw:polygon draw:style-name="gr269" draw:text-style-name="P267" draw:layer="layout" svg:width="0.026cm" svg:height="0.027cm" svg:x="7.023cm" svg:y="16.033cm" svg:viewBox="0 0 27 28" draw:points="0,0 27,0 27,28 0,28">
          <text:p/>
        </draw:polygon>
        <draw:polygon draw:style-name="gr269" draw:text-style-name="P267" draw:layer="layout" svg:width="0.026cm" svg:height="0.027cm" svg:x="7.076cm" svg:y="16.033cm" svg:viewBox="0 0 27 28" draw:points="0,0 27,0 27,28 0,28">
          <text:p/>
        </draw:polygon>
        <draw:polygon draw:style-name="gr269" draw:text-style-name="P267" draw:layer="layout" svg:width="0.026cm" svg:height="0.027cm" svg:x="7.129cm" svg:y="16.033cm" svg:viewBox="0 0 27 28" draw:points="0,0 27,0 27,28 0,28">
          <text:p/>
        </draw:polygon>
        <draw:polygon draw:style-name="gr269" draw:text-style-name="P267" draw:layer="layout" svg:width="0.026cm" svg:height="0.027cm" svg:x="7.182cm" svg:y="16.033cm" svg:viewBox="0 0 27 28" draw:points="0,0 27,0 27,28 0,28">
          <text:p/>
        </draw:polygon>
        <draw:polygon draw:style-name="gr269" draw:text-style-name="P267" draw:layer="layout" svg:width="0.026cm" svg:height="0.027cm" svg:x="7.235cm" svg:y="16.033cm" svg:viewBox="0 0 27 28" draw:points="0,0 27,0 27,28 0,28">
          <text:p/>
        </draw:polygon>
        <draw:polygon draw:style-name="gr269" draw:text-style-name="P267" draw:layer="layout" svg:width="0.026cm" svg:height="0.027cm" svg:x="7.288cm" svg:y="16.033cm" svg:viewBox="0 0 27 28" draw:points="0,0 27,0 27,28 0,28">
          <text:p/>
        </draw:polygon>
        <draw:polygon draw:style-name="gr269" draw:text-style-name="P267" draw:layer="layout" svg:width="0.026cm" svg:height="0.027cm" svg:x="7.341cm" svg:y="16.033cm" svg:viewBox="0 0 27 28" draw:points="0,0 27,0 27,28 0,28">
          <text:p/>
        </draw:polygon>
        <draw:polygon draw:style-name="gr269" draw:text-style-name="P267" draw:layer="layout" svg:width="0.026cm" svg:height="0.027cm" svg:x="7.394cm" svg:y="16.033cm" svg:viewBox="0 0 27 28" draw:points="0,0 27,0 27,28 0,28">
          <text:p/>
        </draw:polygon>
        <draw:polygon draw:style-name="gr269" draw:text-style-name="P267" draw:layer="layout" svg:width="0.026cm" svg:height="0.027cm" svg:x="7.447cm" svg:y="16.033cm" svg:viewBox="0 0 27 28" draw:points="0,0 27,0 27,28 0,28">
          <text:p/>
        </draw:polygon>
        <draw:polygon draw:style-name="gr269" draw:text-style-name="P267" draw:layer="layout" svg:width="0.026cm" svg:height="0.027cm" svg:x="7.5cm" svg:y="16.033cm" svg:viewBox="0 0 27 28" draw:points="0,0 27,0 27,28 0,28">
          <text:p/>
        </draw:polygon>
        <draw:polygon draw:style-name="gr269" draw:text-style-name="P267" draw:layer="layout" svg:width="0.026cm" svg:height="0.027cm" svg:x="7.553cm" svg:y="16.033cm" svg:viewBox="0 0 27 28" draw:points="0,0 27,0 27,28 0,28">
          <text:p/>
        </draw:polygon>
        <draw:polygon draw:style-name="gr269" draw:text-style-name="P267" draw:layer="layout" svg:width="0.026cm" svg:height="0.027cm" svg:x="7.606cm" svg:y="16.033cm" svg:viewBox="0 0 27 28" draw:points="0,0 27,0 27,28 0,28">
          <text:p/>
        </draw:polygon>
        <draw:polygon draw:style-name="gr269" draw:text-style-name="P267" draw:layer="layout" svg:width="0.026cm" svg:height="0.027cm" svg:x="7.659cm" svg:y="16.033cm" svg:viewBox="0 0 27 28" draw:points="0,0 27,0 27,28 0,28">
          <text:p/>
        </draw:polygon>
        <draw:polygon draw:style-name="gr269" draw:text-style-name="P267" draw:layer="layout" svg:width="0.026cm" svg:height="0.027cm" svg:x="7.712cm" svg:y="16.033cm" svg:viewBox="0 0 27 28" draw:points="0,0 27,0 27,28 0,28">
          <text:p/>
        </draw:polygon>
        <draw:polygon draw:style-name="gr269" draw:text-style-name="P267" draw:layer="layout" svg:width="0.026cm" svg:height="0.027cm" svg:x="7.765cm" svg:y="16.033cm" svg:viewBox="0 0 27 28" draw:points="0,0 27,0 27,28 0,28">
          <text:p/>
        </draw:polygon>
        <draw:polygon draw:style-name="gr269" draw:text-style-name="P267" draw:layer="layout" svg:width="0.026cm" svg:height="0.027cm" svg:x="7.818cm" svg:y="16.033cm" svg:viewBox="0 0 27 28" draw:points="0,0 27,0 27,28 0,28">
          <text:p/>
        </draw:polygon>
        <draw:polygon draw:style-name="gr269" draw:text-style-name="P267" draw:layer="layout" svg:width="0.026cm" svg:height="0.027cm" svg:x="7.871cm" svg:y="16.033cm" svg:viewBox="0 0 27 28" draw:points="0,0 27,0 27,28 0,28">
          <text:p/>
        </draw:polygon>
        <draw:polygon draw:style-name="gr269" draw:text-style-name="P267" draw:layer="layout" svg:width="0.026cm" svg:height="0.027cm" svg:x="7.924cm" svg:y="16.033cm" svg:viewBox="0 0 27 28" draw:points="0,0 27,0 27,28 0,28">
          <text:p/>
        </draw:polygon>
        <draw:polygon draw:style-name="gr269" draw:text-style-name="P267" draw:layer="layout" svg:width="0.026cm" svg:height="0.027cm" svg:x="7.977cm" svg:y="16.033cm" svg:viewBox="0 0 27 28" draw:points="0,0 27,0 27,28 0,28">
          <text:p/>
        </draw:polygon>
        <draw:polygon draw:style-name="gr269" draw:text-style-name="P267" draw:layer="layout" svg:width="0.026cm" svg:height="0.027cm" svg:x="8.03cm" svg:y="16.033cm" svg:viewBox="0 0 27 28" draw:points="0,0 27,0 27,28 0,28">
          <text:p/>
        </draw:polygon>
        <draw:polygon draw:style-name="gr269" draw:text-style-name="P267" draw:layer="layout" svg:width="0.026cm" svg:height="0.027cm" svg:x="8.083cm" svg:y="16.033cm" svg:viewBox="0 0 27 28" draw:points="0,0 27,0 27,28 0,28">
          <text:p/>
        </draw:polygon>
        <draw:polygon draw:style-name="gr269" draw:text-style-name="P267" draw:layer="layout" svg:width="0.026cm" svg:height="0.027cm" svg:x="8.136cm" svg:y="16.033cm" svg:viewBox="0 0 27 28" draw:points="0,0 27,0 27,28 0,28">
          <text:p/>
        </draw:polygon>
        <draw:polygon draw:style-name="gr269" draw:text-style-name="P267" draw:layer="layout" svg:width="0.026cm" svg:height="0.027cm" svg:x="8.189cm" svg:y="16.033cm" svg:viewBox="0 0 27 28" draw:points="0,0 27,0 27,28 0,28">
          <text:p/>
        </draw:polygon>
        <draw:polygon draw:style-name="gr269" draw:text-style-name="P267" draw:layer="layout" svg:width="0.026cm" svg:height="0.027cm" svg:x="8.242cm" svg:y="16.033cm" svg:viewBox="0 0 27 28" draw:points="0,0 27,0 27,28 0,28">
          <text:p/>
        </draw:polygon>
        <draw:polygon draw:style-name="gr269" draw:text-style-name="P267" draw:layer="layout" svg:width="0.026cm" svg:height="0.027cm" svg:x="8.295cm" svg:y="16.033cm" svg:viewBox="0 0 27 28" draw:points="0,0 27,0 27,28 0,28">
          <text:p/>
        </draw:polygon>
        <draw:polygon draw:style-name="gr269" draw:text-style-name="P267" draw:layer="layout" svg:width="0.026cm" svg:height="0.027cm" svg:x="8.348cm" svg:y="16.033cm" svg:viewBox="0 0 27 28" draw:points="0,0 27,0 27,28 0,28">
          <text:p/>
        </draw:polygon>
        <draw:polygon draw:style-name="gr269" draw:text-style-name="P267" draw:layer="layout" svg:width="0.026cm" svg:height="0.027cm" svg:x="8.401cm" svg:y="16.033cm" svg:viewBox="0 0 27 28" draw:points="0,0 27,0 27,28 0,28">
          <text:p/>
        </draw:polygon>
        <draw:polygon draw:style-name="gr269" draw:text-style-name="P267" draw:layer="layout" svg:width="0.026cm" svg:height="0.027cm" svg:x="8.454cm" svg:y="16.033cm" svg:viewBox="0 0 27 28" draw:points="0,0 27,0 27,28 0,28">
          <text:p/>
        </draw:polygon>
        <draw:polygon draw:style-name="gr269" draw:text-style-name="P267" draw:layer="layout" svg:width="0.026cm" svg:height="0.027cm" svg:x="8.507cm" svg:y="16.033cm" svg:viewBox="0 0 27 28" draw:points="0,0 27,0 27,28 0,28">
          <text:p/>
        </draw:polygon>
        <draw:polygon draw:style-name="gr269" draw:text-style-name="P267" draw:layer="layout" svg:width="0.026cm" svg:height="0.027cm" svg:x="8.56cm" svg:y="16.033cm" svg:viewBox="0 0 27 28" draw:points="0,0 27,0 27,28 0,28">
          <text:p/>
        </draw:polygon>
        <draw:polygon draw:style-name="gr269" draw:text-style-name="P267" draw:layer="layout" svg:width="0.026cm" svg:height="0.027cm" svg:x="8.613cm" svg:y="16.033cm" svg:viewBox="0 0 27 28" draw:points="0,0 27,0 27,28 0,28">
          <text:p/>
        </draw:polygon>
        <draw:polygon draw:style-name="gr269" draw:text-style-name="P267" draw:layer="layout" svg:width="0.026cm" svg:height="0.027cm" svg:x="8.666cm" svg:y="16.033cm" svg:viewBox="0 0 27 28" draw:points="0,0 27,0 27,28 0,28">
          <text:p/>
        </draw:polygon>
        <draw:polygon draw:style-name="gr269" draw:text-style-name="P267" draw:layer="layout" svg:width="0.026cm" svg:height="0.027cm" svg:x="8.719cm" svg:y="16.033cm" svg:viewBox="0 0 27 28" draw:points="0,0 27,0 27,28 0,28">
          <text:p/>
        </draw:polygon>
        <draw:polygon draw:style-name="gr269" draw:text-style-name="P267" draw:layer="layout" svg:width="0.026cm" svg:height="0.027cm" svg:x="8.772cm" svg:y="16.033cm" svg:viewBox="0 0 27 28" draw:points="0,0 27,0 27,28 0,28">
          <text:p/>
        </draw:polygon>
        <draw:polygon draw:style-name="gr269" draw:text-style-name="P267" draw:layer="layout" svg:width="0.026cm" svg:height="0.027cm" svg:x="8.825cm" svg:y="16.033cm" svg:viewBox="0 0 27 28" draw:points="0,0 27,0 27,28 0,28">
          <text:p/>
        </draw:polygon>
        <draw:polygon draw:style-name="gr269" draw:text-style-name="P267" draw:layer="layout" svg:width="0.026cm" svg:height="0.027cm" svg:x="8.878cm" svg:y="16.033cm" svg:viewBox="0 0 27 28" draw:points="0,0 27,0 27,28 0,28">
          <text:p/>
        </draw:polygon>
        <draw:polygon draw:style-name="gr269" draw:text-style-name="P267" draw:layer="layout" svg:width="0.026cm" svg:height="0.027cm" svg:x="8.931cm" svg:y="16.033cm" svg:viewBox="0 0 27 28" draw:points="0,0 27,0 27,28 0,28">
          <text:p/>
        </draw:polygon>
        <draw:polygon draw:style-name="gr269" draw:text-style-name="P267" draw:layer="layout" svg:width="0.026cm" svg:height="0.027cm" svg:x="8.984cm" svg:y="16.033cm" svg:viewBox="0 0 27 28" draw:points="0,0 27,0 27,28 0,28">
          <text:p/>
        </draw:polygon>
        <draw:polygon draw:style-name="gr269" draw:text-style-name="P267" draw:layer="layout" svg:width="0.026cm" svg:height="0.027cm" svg:x="9.037cm" svg:y="16.033cm" svg:viewBox="0 0 27 28" draw:points="0,0 27,0 27,28 0,28">
          <text:p/>
        </draw:polygon>
        <draw:polygon draw:style-name="gr269" draw:text-style-name="P267" draw:layer="layout" svg:width="0.026cm" svg:height="0.027cm" svg:x="9.09cm" svg:y="16.033cm" svg:viewBox="0 0 27 28" draw:points="0,0 27,0 27,28 0,28">
          <text:p/>
        </draw:polygon>
        <draw:polygon draw:style-name="gr269" draw:text-style-name="P267" draw:layer="layout" svg:width="0.026cm" svg:height="0.027cm" svg:x="9.143cm" svg:y="16.033cm" svg:viewBox="0 0 27 28" draw:points="0,0 27,0 27,28 0,28">
          <text:p/>
        </draw:polygon>
        <draw:polygon draw:style-name="gr269" draw:text-style-name="P267" draw:layer="layout" svg:width="0.026cm" svg:height="0.027cm" svg:x="9.196cm" svg:y="16.033cm" svg:viewBox="0 0 27 28" draw:points="0,0 27,0 27,28 0,28">
          <text:p/>
        </draw:polygon>
        <draw:polygon draw:style-name="gr269" draw:text-style-name="P267" draw:layer="layout" svg:width="0.026cm" svg:height="0.027cm" svg:x="9.249cm" svg:y="16.033cm" svg:viewBox="0 0 27 28" draw:points="0,0 27,0 27,28 0,28">
          <text:p/>
        </draw:polygon>
        <draw:polygon draw:style-name="gr269" draw:text-style-name="P267" draw:layer="layout" svg:width="0.026cm" svg:height="0.027cm" svg:x="9.302cm" svg:y="16.033cm" svg:viewBox="0 0 27 28" draw:points="0,0 27,0 27,28 0,28">
          <text:p/>
        </draw:polygon>
        <draw:polygon draw:style-name="gr269" draw:text-style-name="P267" draw:layer="layout" svg:width="0.026cm" svg:height="0.027cm" svg:x="9.355cm" svg:y="16.033cm" svg:viewBox="0 0 27 28" draw:points="0,0 27,0 27,28 0,28">
          <text:p/>
        </draw:polygon>
        <draw:polygon draw:style-name="gr269" draw:text-style-name="P267" draw:layer="layout" svg:width="0.026cm" svg:height="0.027cm" svg:x="9.408cm" svg:y="16.033cm" svg:viewBox="0 0 27 28" draw:points="0,0 27,0 27,28 0,28">
          <text:p/>
        </draw:polygon>
        <draw:polygon draw:style-name="gr269" draw:text-style-name="P267" draw:layer="layout" svg:width="0.026cm" svg:height="0.027cm" svg:x="9.461cm" svg:y="16.033cm" svg:viewBox="0 0 27 28" draw:points="0,0 27,0 27,28 0,28">
          <text:p/>
        </draw:polygon>
        <draw:polygon draw:style-name="gr269" draw:text-style-name="P267" draw:layer="layout" svg:width="0.026cm" svg:height="0.027cm" svg:x="9.514cm" svg:y="16.033cm" svg:viewBox="0 0 27 28" draw:points="0,0 27,0 27,28 0,28">
          <text:p/>
        </draw:polygon>
        <draw:polygon draw:style-name="gr269" draw:text-style-name="P267" draw:layer="layout" svg:width="0.026cm" svg:height="0.027cm" svg:x="9.567cm" svg:y="16.033cm" svg:viewBox="0 0 27 28" draw:points="0,0 27,0 27,28 0,28">
          <text:p/>
        </draw:polygon>
        <draw:polygon draw:style-name="gr269" draw:text-style-name="P267" draw:layer="layout" svg:width="0.026cm" svg:height="0.027cm" svg:x="9.62cm" svg:y="16.033cm" svg:viewBox="0 0 27 28" draw:points="0,0 27,0 27,28 0,28">
          <text:p/>
        </draw:polygon>
        <draw:polygon draw:style-name="gr269" draw:text-style-name="P267" draw:layer="layout" svg:width="0.026cm" svg:height="0.027cm" svg:x="9.673cm" svg:y="16.033cm" svg:viewBox="0 0 27 28" draw:points="0,0 27,0 27,28 0,28">
          <text:p/>
        </draw:polygon>
        <draw:polygon draw:style-name="gr269" draw:text-style-name="P267" draw:layer="layout" svg:width="0.026cm" svg:height="0.027cm" svg:x="9.726cm" svg:y="16.033cm" svg:viewBox="0 0 27 28" draw:points="0,0 27,0 27,28 0,28">
          <text:p/>
        </draw:polygon>
        <draw:polygon draw:style-name="gr269" draw:text-style-name="P267" draw:layer="layout" svg:width="0.026cm" svg:height="0.027cm" svg:x="9.779cm" svg:y="16.033cm" svg:viewBox="0 0 27 28" draw:points="0,0 27,0 27,28 0,28">
          <text:p/>
        </draw:polygon>
        <draw:polygon draw:style-name="gr269" draw:text-style-name="P267" draw:layer="layout" svg:width="0.026cm" svg:height="0.027cm" svg:x="9.832cm" svg:y="16.033cm" svg:viewBox="0 0 27 28" draw:points="0,0 27,0 27,28 0,28">
          <text:p/>
        </draw:polygon>
        <draw:polygon draw:style-name="gr269" draw:text-style-name="P267" draw:layer="layout" svg:width="0.026cm" svg:height="0.027cm" svg:x="9.885cm" svg:y="16.033cm" svg:viewBox="0 0 27 28" draw:points="0,0 27,0 27,28 0,28">
          <text:p/>
        </draw:polygon>
        <draw:polygon draw:style-name="gr269" draw:text-style-name="P267" draw:layer="layout" svg:width="0.026cm" svg:height="0.027cm" svg:x="9.938cm" svg:y="16.033cm" svg:viewBox="0 0 27 28" draw:points="0,0 27,0 27,28 0,28">
          <text:p/>
        </draw:polygon>
        <draw:polygon draw:style-name="gr269" draw:text-style-name="P267" draw:layer="layout" svg:width="0.026cm" svg:height="0.027cm" svg:x="9.991cm" svg:y="16.033cm" svg:viewBox="0 0 27 28" draw:points="0,0 27,0 27,28 0,28">
          <text:p/>
        </draw:polygon>
        <draw:polygon draw:style-name="gr269" draw:text-style-name="P267" draw:layer="layout" svg:width="0.026cm" svg:height="0.027cm" svg:x="10.044cm" svg:y="16.033cm" svg:viewBox="0 0 27 28" draw:points="0,0 27,0 27,28 0,28">
          <text:p/>
        </draw:polygon>
        <draw:polygon draw:style-name="gr269" draw:text-style-name="P267" draw:layer="layout" svg:width="0.026cm" svg:height="0.027cm" svg:x="10.097cm" svg:y="16.033cm" svg:viewBox="0 0 27 28" draw:points="0,0 27,0 27,28 0,28">
          <text:p/>
        </draw:polygon>
        <draw:polygon draw:style-name="gr269" draw:text-style-name="P267" draw:layer="layout" svg:width="0.026cm" svg:height="0.027cm" svg:x="10.15cm" svg:y="16.033cm" svg:viewBox="0 0 27 28" draw:points="0,0 27,0 27,28 0,28">
          <text:p/>
        </draw:polygon>
        <draw:polygon draw:style-name="gr269" draw:text-style-name="P267" draw:layer="layout" svg:width="0.026cm" svg:height="0.027cm" svg:x="10.203cm" svg:y="16.033cm" svg:viewBox="0 0 27 28" draw:points="0,0 27,0 27,28 0,28">
          <text:p/>
        </draw:polygon>
        <draw:polygon draw:style-name="gr269" draw:text-style-name="P267" draw:layer="layout" svg:width="0.026cm" svg:height="0.027cm" svg:x="10.256cm" svg:y="16.033cm" svg:viewBox="0 0 27 28" draw:points="0,0 27,0 27,28 0,28">
          <text:p/>
        </draw:polygon>
        <draw:polygon draw:style-name="gr269" draw:text-style-name="P267" draw:layer="layout" svg:width="0.026cm" svg:height="0.027cm" svg:x="10.309cm" svg:y="16.033cm" svg:viewBox="0 0 27 28" draw:points="0,0 27,0 27,28 0,28">
          <text:p/>
        </draw:polygon>
        <draw:polygon draw:style-name="gr269" draw:text-style-name="P267" draw:layer="layout" svg:width="0.026cm" svg:height="0.027cm" svg:x="10.362cm" svg:y="16.033cm" svg:viewBox="0 0 27 28" draw:points="0,0 27,0 27,28 0,28">
          <text:p/>
        </draw:polygon>
        <draw:polygon draw:style-name="gr269" draw:text-style-name="P267" draw:layer="layout" svg:width="0.026cm" svg:height="0.027cm" svg:x="10.415cm" svg:y="16.033cm" svg:viewBox="0 0 27 28" draw:points="0,0 27,0 27,28 0,28">
          <text:p/>
        </draw:polygon>
        <draw:polygon draw:style-name="gr269" draw:text-style-name="P267" draw:layer="layout" svg:width="0.026cm" svg:height="0.027cm" svg:x="10.468cm" svg:y="16.033cm" svg:viewBox="0 0 27 28" draw:points="0,0 27,0 27,28 0,28">
          <text:p/>
        </draw:polygon>
        <draw:polygon draw:style-name="gr269" draw:text-style-name="P267" draw:layer="layout" svg:width="0.026cm" svg:height="0.027cm" svg:x="10.521cm" svg:y="16.033cm" svg:viewBox="0 0 27 28" draw:points="0,0 27,0 27,28 0,28">
          <text:p/>
        </draw:polygon>
        <draw:polygon draw:style-name="gr269" draw:text-style-name="P267" draw:layer="layout" svg:width="0.026cm" svg:height="0.027cm" svg:x="10.574cm" svg:y="16.033cm" svg:viewBox="0 0 27 28" draw:points="0,0 27,0 27,28 0,28">
          <text:p/>
        </draw:polygon>
        <draw:polygon draw:style-name="gr269" draw:text-style-name="P267" draw:layer="layout" svg:width="0.026cm" svg:height="0.027cm" svg:x="10.627cm" svg:y="16.033cm" svg:viewBox="0 0 27 28" draw:points="0,0 27,0 27,28 0,28">
          <text:p/>
        </draw:polygon>
        <draw:polygon draw:style-name="gr269" draw:text-style-name="P267" draw:layer="layout" svg:width="0.026cm" svg:height="0.027cm" svg:x="10.68cm" svg:y="16.033cm" svg:viewBox="0 0 27 28" draw:points="0,0 27,0 27,28 0,28">
          <text:p/>
        </draw:polygon>
        <draw:polygon draw:style-name="gr269" draw:text-style-name="P267" draw:layer="layout" svg:width="0.026cm" svg:height="0.027cm" svg:x="10.733cm" svg:y="16.033cm" svg:viewBox="0 0 27 28" draw:points="0,0 27,0 27,28 0,28">
          <text:p/>
        </draw:polygon>
        <draw:polygon draw:style-name="gr269" draw:text-style-name="P267" draw:layer="layout" svg:width="0.026cm" svg:height="0.027cm" svg:x="10.786cm" svg:y="16.033cm" svg:viewBox="0 0 27 28" draw:points="0,0 27,0 27,28 0,28">
          <text:p/>
        </draw:polygon>
        <draw:polygon draw:style-name="gr269" draw:text-style-name="P267" draw:layer="layout" svg:width="0.026cm" svg:height="0.027cm" svg:x="10.839cm" svg:y="16.033cm" svg:viewBox="0 0 27 28" draw:points="0,0 27,0 27,28 0,28">
          <text:p/>
        </draw:polygon>
        <draw:polygon draw:style-name="gr269" draw:text-style-name="P267" draw:layer="layout" svg:width="0.026cm" svg:height="0.027cm" svg:x="10.892cm" svg:y="16.033cm" svg:viewBox="0 0 27 28" draw:points="0,0 27,0 27,28 0,28">
          <text:p/>
        </draw:polygon>
        <draw:polygon draw:style-name="gr269" draw:text-style-name="P267" draw:layer="layout" svg:width="0.026cm" svg:height="0.027cm" svg:x="10.945cm" svg:y="16.033cm" svg:viewBox="0 0 27 28" draw:points="0,0 27,0 27,28 0,28">
          <text:p/>
        </draw:polygon>
        <draw:polygon draw:style-name="gr269" draw:text-style-name="P267" draw:layer="layout" svg:width="0.026cm" svg:height="0.027cm" svg:x="10.998cm" svg:y="16.033cm" svg:viewBox="0 0 27 28" draw:points="0,0 27,0 27,28 0,28">
          <text:p/>
        </draw:polygon>
        <draw:polygon draw:style-name="gr269" draw:text-style-name="P267" draw:layer="layout" svg:width="0.026cm" svg:height="0.027cm" svg:x="11.051cm" svg:y="16.033cm" svg:viewBox="0 0 27 28" draw:points="0,0 27,0 27,28 0,28">
          <text:p/>
        </draw:polygon>
        <draw:polygon draw:style-name="gr269" draw:text-style-name="P267" draw:layer="layout" svg:width="0.026cm" svg:height="0.027cm" svg:x="11.104cm" svg:y="16.033cm" svg:viewBox="0 0 27 28" draw:points="0,0 27,0 27,28 0,28">
          <text:p/>
        </draw:polygon>
        <draw:polygon draw:style-name="gr269" draw:text-style-name="P267" draw:layer="layout" svg:width="0.026cm" svg:height="0.027cm" svg:x="11.157cm" svg:y="16.033cm" svg:viewBox="0 0 27 28" draw:points="0,0 27,0 27,28 0,28">
          <text:p/>
        </draw:polygon>
        <draw:polygon draw:style-name="gr269" draw:text-style-name="P267" draw:layer="layout" svg:width="0.026cm" svg:height="0.027cm" svg:x="11.21cm" svg:y="16.033cm" svg:viewBox="0 0 27 28" draw:points="0,0 27,0 27,28 0,28">
          <text:p/>
        </draw:polygon>
        <draw:polygon draw:style-name="gr269" draw:text-style-name="P267" draw:layer="layout" svg:width="0.026cm" svg:height="0.027cm" svg:x="11.263cm" svg:y="16.033cm" svg:viewBox="0 0 27 28" draw:points="0,0 27,0 27,28 0,28">
          <text:p/>
        </draw:polygon>
        <draw:polygon draw:style-name="gr269" draw:text-style-name="P267" draw:layer="layout" svg:width="0.026cm" svg:height="0.027cm" svg:x="11.316cm" svg:y="16.033cm" svg:viewBox="0 0 27 28" draw:points="0,0 27,0 27,28 0,28">
          <text:p/>
        </draw:polygon>
        <draw:polygon draw:style-name="gr269" draw:text-style-name="P267" draw:layer="layout" svg:width="0.026cm" svg:height="0.027cm" svg:x="11.369cm" svg:y="16.033cm" svg:viewBox="0 0 27 28" draw:points="0,0 27,0 27,28 0,28">
          <text:p/>
        </draw:polygon>
        <draw:polygon draw:style-name="gr269" draw:text-style-name="P267" draw:layer="layout" svg:width="0.026cm" svg:height="0.027cm" svg:x="11.422cm" svg:y="16.033cm" svg:viewBox="0 0 27 28" draw:points="0,0 27,0 27,28 0,28">
          <text:p/>
        </draw:polygon>
        <draw:polygon draw:style-name="gr269" draw:text-style-name="P267" draw:layer="layout" svg:width="0.026cm" svg:height="0.027cm" svg:x="11.475cm" svg:y="16.033cm" svg:viewBox="0 0 27 28" draw:points="0,0 27,0 27,28 0,28">
          <text:p/>
        </draw:polygon>
        <draw:polygon draw:style-name="gr269" draw:text-style-name="P267" draw:layer="layout" svg:width="0.026cm" svg:height="0.027cm" svg:x="11.528cm" svg:y="16.033cm" svg:viewBox="0 0 27 28" draw:points="0,0 27,0 27,28 0,28">
          <text:p/>
        </draw:polygon>
        <draw:polygon draw:style-name="gr269" draw:text-style-name="P267" draw:layer="layout" svg:width="0.026cm" svg:height="0.027cm" svg:x="11.581cm" svg:y="16.033cm" svg:viewBox="0 0 27 28" draw:points="0,0 27,0 27,28 0,28">
          <text:p/>
        </draw:polygon>
        <draw:polygon draw:style-name="gr269" draw:text-style-name="P267" draw:layer="layout" svg:width="0.026cm" svg:height="0.027cm" svg:x="11.634cm" svg:y="16.033cm" svg:viewBox="0 0 27 28" draw:points="0,0 27,0 27,28 0,28">
          <text:p/>
        </draw:polygon>
        <draw:polygon draw:style-name="gr269" draw:text-style-name="P267" draw:layer="layout" svg:width="0.026cm" svg:height="0.027cm" svg:x="11.687cm" svg:y="16.033cm" svg:viewBox="0 0 27 28" draw:points="0,0 27,0 27,28 0,28">
          <text:p/>
        </draw:polygon>
        <draw:polygon draw:style-name="gr269" draw:text-style-name="P267" draw:layer="layout" svg:width="0.026cm" svg:height="0.027cm" svg:x="11.74cm" svg:y="16.033cm" svg:viewBox="0 0 27 28" draw:points="0,0 27,0 27,28 0,28">
          <text:p/>
        </draw:polygon>
        <draw:polygon draw:style-name="gr269" draw:text-style-name="P267" draw:layer="layout" svg:width="0.026cm" svg:height="0.027cm" svg:x="11.793cm" svg:y="16.033cm" svg:viewBox="0 0 27 28" draw:points="0,0 27,0 27,28 0,28">
          <text:p/>
        </draw:polygon>
        <draw:polygon draw:style-name="gr269" draw:text-style-name="P267" draw:layer="layout" svg:width="0.026cm" svg:height="0.027cm" svg:x="11.846cm" svg:y="16.033cm" svg:viewBox="0 0 27 28" draw:points="0,0 27,0 27,28 0,28">
          <text:p/>
        </draw:polygon>
        <draw:polygon draw:style-name="gr269" draw:text-style-name="P267" draw:layer="layout" svg:width="0.026cm" svg:height="0.027cm" svg:x="11.899cm" svg:y="16.033cm" svg:viewBox="0 0 27 28" draw:points="0,0 27,0 27,28 0,28">
          <text:p/>
        </draw:polygon>
        <draw:polygon draw:style-name="gr269" draw:text-style-name="P267" draw:layer="layout" svg:width="0.026cm" svg:height="0.027cm" svg:x="11.952cm" svg:y="16.033cm" svg:viewBox="0 0 27 28" draw:points="0,0 27,0 27,28 0,28">
          <text:p/>
        </draw:polygon>
        <draw:polygon draw:style-name="gr269" draw:text-style-name="P267" draw:layer="layout" svg:width="0.026cm" svg:height="0.027cm" svg:x="12.005cm" svg:y="16.033cm" svg:viewBox="0 0 27 28" draw:points="0,0 27,0 27,28 0,28">
          <text:p/>
        </draw:polygon>
        <draw:polygon draw:style-name="gr269" draw:text-style-name="P267" draw:layer="layout" svg:width="0.026cm" svg:height="0.027cm" svg:x="12.058cm" svg:y="16.033cm" svg:viewBox="0 0 27 28" draw:points="0,0 27,0 27,28 0,28">
          <text:p/>
        </draw:polygon>
        <draw:polygon draw:style-name="gr269" draw:text-style-name="P267" draw:layer="layout" svg:width="0.026cm" svg:height="0.027cm" svg:x="12.111cm" svg:y="16.033cm" svg:viewBox="0 0 27 28" draw:points="0,0 27,0 27,28 0,28">
          <text:p/>
        </draw:polygon>
        <draw:polygon draw:style-name="gr269" draw:text-style-name="P267" draw:layer="layout" svg:width="0.026cm" svg:height="0.027cm" svg:x="12.164cm" svg:y="16.033cm" svg:viewBox="0 0 27 28" draw:points="0,0 27,0 27,28 0,28">
          <text:p/>
        </draw:polygon>
        <draw:polygon draw:style-name="gr269" draw:text-style-name="P267" draw:layer="layout" svg:width="0.026cm" svg:height="0.027cm" svg:x="12.217cm" svg:y="16.033cm" svg:viewBox="0 0 27 28" draw:points="0,0 27,0 27,28 0,28">
          <text:p/>
        </draw:polygon>
        <draw:polygon draw:style-name="gr269" draw:text-style-name="P267" draw:layer="layout" svg:width="0.026cm" svg:height="0.027cm" svg:x="12.27cm" svg:y="16.033cm" svg:viewBox="0 0 27 28" draw:points="0,0 27,0 27,28 0,28">
          <text:p/>
        </draw:polygon>
        <draw:polygon draw:style-name="gr269" draw:text-style-name="P267" draw:layer="layout" svg:width="0.026cm" svg:height="0.027cm" svg:x="12.323cm" svg:y="16.033cm" svg:viewBox="0 0 27 28" draw:points="0,0 27,0 27,28 0,28">
          <text:p/>
        </draw:polygon>
        <draw:polygon draw:style-name="gr269" draw:text-style-name="P267" draw:layer="layout" svg:width="0.026cm" svg:height="0.027cm" svg:x="12.376cm" svg:y="16.033cm" svg:viewBox="0 0 27 28" draw:points="0,0 27,0 27,28 0,28">
          <text:p/>
        </draw:polygon>
        <draw:polygon draw:style-name="gr269" draw:text-style-name="P267" draw:layer="layout" svg:width="0.026cm" svg:height="0.027cm" svg:x="12.429cm" svg:y="16.033cm" svg:viewBox="0 0 27 28" draw:points="0,0 27,0 27,28 0,28">
          <text:p/>
        </draw:polygon>
        <draw:polygon draw:style-name="gr269" draw:text-style-name="P267" draw:layer="layout" svg:width="0.026cm" svg:height="0.027cm" svg:x="12.482cm" svg:y="16.033cm" svg:viewBox="0 0 27 28" draw:points="0,0 27,0 27,28 0,28">
          <text:p/>
        </draw:polygon>
        <draw:polygon draw:style-name="gr269" draw:text-style-name="P267" draw:layer="layout" svg:width="0.026cm" svg:height="0.027cm" svg:x="12.535cm" svg:y="16.033cm" svg:viewBox="0 0 27 28" draw:points="0,0 27,0 27,28 0,28">
          <text:p/>
        </draw:polygon>
        <draw:polygon draw:style-name="gr269" draw:text-style-name="P267" draw:layer="layout" svg:width="0.026cm" svg:height="0.027cm" svg:x="12.588cm" svg:y="16.033cm" svg:viewBox="0 0 27 28" draw:points="0,0 27,0 27,28 0,28">
          <text:p/>
        </draw:polygon>
        <draw:polygon draw:style-name="gr269" draw:text-style-name="P267" draw:layer="layout" svg:width="0.026cm" svg:height="0.027cm" svg:x="12.641cm" svg:y="16.033cm" svg:viewBox="0 0 27 28" draw:points="0,0 27,0 27,28 0,28">
          <text:p/>
        </draw:polygon>
        <draw:polygon draw:style-name="gr269" draw:text-style-name="P267" draw:layer="layout" svg:width="0.027cm" svg:height="0.027cm" svg:x="12.694cm" svg:y="16.033cm" svg:viewBox="0 0 28 28" draw:points="0,0 28,0 28,28 0,28">
          <text:p/>
        </draw:polygon>
        <draw:polygon draw:style-name="gr269" draw:text-style-name="P267" draw:layer="layout" svg:width="0.027cm" svg:height="0.027cm" svg:x="12.747cm" svg:y="16.033cm" svg:viewBox="0 0 28 28" draw:points="0,0 28,0 28,28 0,28">
          <text:p/>
        </draw:polygon>
        <draw:polygon draw:style-name="gr269" draw:text-style-name="P267" draw:layer="layout" svg:width="0.027cm" svg:height="0.027cm" svg:x="12.8cm" svg:y="16.033cm" svg:viewBox="0 0 28 28" draw:points="0,0 28,0 28,28 0,28">
          <text:p/>
        </draw:polygon>
        <draw:polygon draw:style-name="gr269" draw:text-style-name="P267" draw:layer="layout" svg:width="0.027cm" svg:height="0.027cm" svg:x="12.853cm" svg:y="16.033cm" svg:viewBox="0 0 28 28" draw:points="0,0 28,0 28,28 0,28">
          <text:p/>
        </draw:polygon>
        <draw:polygon draw:style-name="gr269" draw:text-style-name="P267" draw:layer="layout" svg:width="0.027cm" svg:height="0.027cm" svg:x="12.906cm" svg:y="16.033cm" svg:viewBox="0 0 28 28" draw:points="0,0 28,0 28,28 0,28">
          <text:p/>
        </draw:polygon>
        <draw:polygon draw:style-name="gr269" draw:text-style-name="P267" draw:layer="layout" svg:width="0.027cm" svg:height="0.027cm" svg:x="12.959cm" svg:y="16.033cm" svg:viewBox="0 0 28 28" draw:points="0,0 28,0 28,28 0,28">
          <text:p/>
        </draw:polygon>
        <draw:polygon draw:style-name="gr269" draw:text-style-name="P267" draw:layer="layout" svg:width="0.028cm" svg:height="0.027cm" svg:x="13.012cm" svg:y="16.033cm" svg:viewBox="0 0 29 28" draw:points="0,0 29,0 29,28 0,28">
          <text:p/>
        </draw:polygon>
        <draw:polygon draw:style-name="gr269" draw:text-style-name="P267" draw:layer="layout" svg:width="0.027cm" svg:height="0.027cm" svg:x="13.065cm" svg:y="16.033cm" svg:viewBox="0 0 28 28" draw:points="0,0 28,0 28,28 0,28">
          <text:p/>
        </draw:polygon>
        <draw:polygon draw:style-name="gr269" draw:text-style-name="P267" draw:layer="layout" svg:width="0.027cm" svg:height="0.027cm" svg:x="13.118cm" svg:y="16.033cm" svg:viewBox="0 0 28 28" draw:points="0,0 28,0 28,28 0,28">
          <text:p/>
        </draw:polygon>
        <draw:polygon draw:style-name="gr269" draw:text-style-name="P267" draw:layer="layout" svg:width="0.027cm" svg:height="0.027cm" svg:x="13.171cm" svg:y="16.033cm" svg:viewBox="0 0 28 28" draw:points="0,0 28,0 28,28 0,28">
          <text:p/>
        </draw:polygon>
        <draw:polygon draw:style-name="gr269" draw:text-style-name="P267" draw:layer="layout" svg:width="0.027cm" svg:height="0.027cm" svg:x="13.224cm" svg:y="16.033cm" svg:viewBox="0 0 28 28" draw:points="0,0 28,0 28,28 0,28">
          <text:p/>
        </draw:polygon>
        <draw:polygon draw:style-name="gr269" draw:text-style-name="P267" draw:layer="layout" svg:width="0.027cm" svg:height="0.027cm" svg:x="13.277cm" svg:y="16.033cm" svg:viewBox="0 0 28 28" draw:points="0,0 28,0 28,28 0,28">
          <text:p/>
        </draw:polygon>
        <draw:polygon draw:style-name="gr269" draw:text-style-name="P267" draw:layer="layout" svg:width="0.027cm" svg:height="0.027cm" svg:x="13.33cm" svg:y="16.033cm" svg:viewBox="0 0 28 28" draw:points="0,0 28,0 28,28 0,28">
          <text:p/>
        </draw:polygon>
        <draw:polygon draw:style-name="gr269" draw:text-style-name="P267" draw:layer="layout" svg:width="0.027cm" svg:height="0.027cm" svg:x="13.383cm" svg:y="16.033cm" svg:viewBox="0 0 28 28" draw:points="0,0 28,0 28,28 0,28">
          <text:p/>
        </draw:polygon>
        <draw:polygon draw:style-name="gr269" draw:text-style-name="P267" draw:layer="layout" svg:width="0.027cm" svg:height="0.027cm" svg:x="13.436cm" svg:y="16.033cm" svg:viewBox="0 0 28 28" draw:points="0,0 28,0 28,28 0,28">
          <text:p/>
        </draw:polygon>
        <draw:polygon draw:style-name="gr269" draw:text-style-name="P267" draw:layer="layout" svg:width="0.027cm" svg:height="0.027cm" svg:x="13.489cm" svg:y="16.033cm" svg:viewBox="0 0 28 28" draw:points="0,0 28,0 28,28 0,28">
          <text:p/>
        </draw:polygon>
        <draw:polygon draw:style-name="gr269" draw:text-style-name="P267" draw:layer="layout" svg:width="0.027cm" svg:height="0.027cm" svg:x="13.542cm" svg:y="16.033cm" svg:viewBox="0 0 28 28" draw:points="0,0 28,0 28,28 0,28">
          <text:p/>
        </draw:polygon>
        <draw:polygon draw:style-name="gr269" draw:text-style-name="P267" draw:layer="layout" svg:width="0.027cm" svg:height="0.027cm" svg:x="13.595cm" svg:y="16.033cm" svg:viewBox="0 0 28 28" draw:points="0,0 28,0 28,28 0,28">
          <text:p/>
        </draw:polygon>
        <draw:polygon draw:style-name="gr269" draw:text-style-name="P267" draw:layer="layout" svg:width="0.027cm" svg:height="0.027cm" svg:x="13.648cm" svg:y="16.033cm" svg:viewBox="0 0 28 28" draw:points="0,0 28,0 28,28 0,28">
          <text:p/>
        </draw:polygon>
        <draw:polygon draw:style-name="gr269" draw:text-style-name="P267" draw:layer="layout" svg:width="0.027cm" svg:height="0.027cm" svg:x="13.701cm" svg:y="16.033cm" svg:viewBox="0 0 28 28" draw:points="0,0 28,0 28,28 0,28">
          <text:p/>
        </draw:polygon>
        <draw:polygon draw:style-name="gr269" draw:text-style-name="P267" draw:layer="layout" svg:width="0.027cm" svg:height="0.027cm" svg:x="13.754cm" svg:y="16.033cm" svg:viewBox="0 0 28 28" draw:points="0,0 28,0 28,28 0,28">
          <text:p/>
        </draw:polygon>
        <draw:polygon draw:style-name="gr269" draw:text-style-name="P267" draw:layer="layout" svg:width="0.027cm" svg:height="0.027cm" svg:x="13.807cm" svg:y="16.033cm" svg:viewBox="0 0 28 28" draw:points="0,0 28,0 28,28 0,28">
          <text:p/>
        </draw:polygon>
        <draw:polygon draw:style-name="gr269" draw:text-style-name="P267" draw:layer="layout" svg:width="0.027cm" svg:height="0.027cm" svg:x="13.86cm" svg:y="16.033cm" svg:viewBox="0 0 28 28" draw:points="0,0 28,0 28,28 0,28">
          <text:p/>
        </draw:polygon>
        <draw:polygon draw:style-name="gr269" draw:text-style-name="P267" draw:layer="layout" svg:width="0.027cm" svg:height="0.027cm" svg:x="13.913cm" svg:y="16.033cm" svg:viewBox="0 0 28 28" draw:points="0,0 28,0 28,28 0,28">
          <text:p/>
        </draw:polygon>
        <draw:polygon draw:style-name="gr269" draw:text-style-name="P267" draw:layer="layout" svg:width="0.027cm" svg:height="0.027cm" svg:x="13.966cm" svg:y="16.033cm" svg:viewBox="0 0 28 28" draw:points="0,0 28,0 28,28 0,28">
          <text:p/>
        </draw:polygon>
        <draw:polygon draw:style-name="gr269" draw:text-style-name="P267" draw:layer="layout" svg:width="0.027cm" svg:height="0.027cm" svg:x="14.019cm" svg:y="16.033cm" svg:viewBox="0 0 28 28" draw:points="0,0 28,0 28,28 0,28">
          <text:p/>
        </draw:polygon>
        <draw:polygon draw:style-name="gr269" draw:text-style-name="P267" draw:layer="layout" svg:width="0.027cm" svg:height="0.027cm" svg:x="14.072cm" svg:y="16.033cm" svg:viewBox="0 0 28 28" draw:points="0,0 28,0 28,28 0,28">
          <text:p/>
        </draw:polygon>
        <draw:polygon draw:style-name="gr269" draw:text-style-name="P267" draw:layer="layout" svg:width="0.027cm" svg:height="0.027cm" svg:x="14.125cm" svg:y="16.033cm" svg:viewBox="0 0 28 28" draw:points="0,0 28,0 28,28 0,28">
          <text:p/>
        </draw:polygon>
        <draw:polygon draw:style-name="gr269" draw:text-style-name="P267" draw:layer="layout" svg:width="0.027cm" svg:height="0.027cm" svg:x="14.178cm" svg:y="16.033cm" svg:viewBox="0 0 28 28" draw:points="0,0 28,0 28,28 0,28">
          <text:p/>
        </draw:polygon>
        <draw:polygon draw:style-name="gr269" draw:text-style-name="P267" draw:layer="layout" svg:width="0.027cm" svg:height="0.027cm" svg:x="14.231cm" svg:y="16.033cm" svg:viewBox="0 0 28 28" draw:points="0,0 28,0 28,28 0,28">
          <text:p/>
        </draw:polygon>
        <draw:polygon draw:style-name="gr269" draw:text-style-name="P267" draw:layer="layout" svg:width="0.027cm" svg:height="0.027cm" svg:x="14.284cm" svg:y="16.033cm" svg:viewBox="0 0 28 28" draw:points="0,0 28,0 28,28 0,28">
          <text:p/>
        </draw:polygon>
        <draw:polygon draw:style-name="gr269" draw:text-style-name="P267" draw:layer="layout" svg:width="0.027cm" svg:height="0.027cm" svg:x="14.337cm" svg:y="16.033cm" svg:viewBox="0 0 28 28" draw:points="0,0 28,0 28,28 0,28">
          <text:p/>
        </draw:polygon>
        <draw:polygon draw:style-name="gr269" draw:text-style-name="P267" draw:layer="layout" svg:width="0.028cm" svg:height="0.027cm" svg:x="14.39cm" svg:y="16.033cm" svg:viewBox="0 0 29 28" draw:points="0,0 29,0 29,28 0,28">
          <text:p/>
        </draw:polygon>
        <draw:polygon draw:style-name="gr269" draw:text-style-name="P267" draw:layer="layout" svg:width="0.027cm" svg:height="0.027cm" svg:x="14.443cm" svg:y="16.033cm" svg:viewBox="0 0 28 28" draw:points="0,0 28,0 28,28 0,28">
          <text:p/>
        </draw:polygon>
        <draw:polygon draw:style-name="gr269" draw:text-style-name="P267" draw:layer="layout" svg:width="0.027cm" svg:height="0.027cm" svg:x="14.496cm" svg:y="16.033cm" svg:viewBox="0 0 28 28" draw:points="0,0 28,0 28,28 0,28">
          <text:p/>
        </draw:polygon>
        <draw:polygon draw:style-name="gr269" draw:text-style-name="P267" draw:layer="layout" svg:width="0.027cm" svg:height="0.027cm" svg:x="14.549cm" svg:y="16.033cm" svg:viewBox="0 0 28 28" draw:points="0,0 28,0 28,28 0,28">
          <text:p/>
        </draw:polygon>
        <draw:polygon draw:style-name="gr269" draw:text-style-name="P267" draw:layer="layout" svg:width="0.027cm" svg:height="0.027cm" svg:x="14.602cm" svg:y="16.033cm" svg:viewBox="0 0 28 28" draw:points="0,0 28,0 28,28 0,28">
          <text:p/>
        </draw:polygon>
        <draw:polygon draw:style-name="gr269" draw:text-style-name="P267" draw:layer="layout" svg:width="0.027cm" svg:height="0.027cm" svg:x="14.655cm" svg:y="16.033cm" svg:viewBox="0 0 28 28" draw:points="0,0 28,0 28,28 0,28">
          <text:p/>
        </draw:polygon>
        <draw:polygon draw:style-name="gr269" draw:text-style-name="P267" draw:layer="layout" svg:width="0.027cm" svg:height="0.027cm" svg:x="14.708cm" svg:y="16.033cm" svg:viewBox="0 0 28 28" draw:points="0,0 28,0 28,28 0,28">
          <text:p/>
        </draw:polygon>
        <draw:polygon draw:style-name="gr269" draw:text-style-name="P267" draw:layer="layout" svg:width="0.027cm" svg:height="0.027cm" svg:x="14.761cm" svg:y="16.033cm" svg:viewBox="0 0 28 28" draw:points="0,0 28,0 28,28 0,28">
          <text:p/>
        </draw:polygon>
        <draw:polygon draw:style-name="gr269" draw:text-style-name="P267" draw:layer="layout" svg:width="0.027cm" svg:height="0.027cm" svg:x="14.814cm" svg:y="16.033cm" svg:viewBox="0 0 28 28" draw:points="0,0 28,0 28,28 0,28">
          <text:p/>
        </draw:polygon>
        <draw:polygon draw:style-name="gr269" draw:text-style-name="P267" draw:layer="layout" svg:width="0.027cm" svg:height="0.027cm" svg:x="14.867cm" svg:y="16.033cm" svg:viewBox="0 0 28 28" draw:points="0,0 28,0 28,28 0,28">
          <text:p/>
        </draw:polygon>
        <draw:polygon draw:style-name="gr269" draw:text-style-name="P267" draw:layer="layout" svg:width="0.027cm" svg:height="0.027cm" svg:x="14.92cm" svg:y="16.033cm" svg:viewBox="0 0 28 28" draw:points="0,0 28,0 28,28 0,28">
          <text:p/>
        </draw:polygon>
        <draw:polygon draw:style-name="gr269" draw:text-style-name="P267" draw:layer="layout" svg:width="0.027cm" svg:height="0.027cm" svg:x="14.973cm" svg:y="16.033cm" svg:viewBox="0 0 28 28" draw:points="0,0 28,0 28,28 0,28">
          <text:p/>
        </draw:polygon>
        <draw:polygon draw:style-name="gr269" draw:text-style-name="P267" draw:layer="layout" svg:width="0.027cm" svg:height="0.027cm" svg:x="15.026cm" svg:y="16.033cm" svg:viewBox="0 0 28 28" draw:points="0,0 28,0 28,28 0,28">
          <text:p/>
        </draw:polygon>
        <draw:polygon draw:style-name="gr269" draw:text-style-name="P267" draw:layer="layout" svg:width="0.027cm" svg:height="0.027cm" svg:x="15.079cm" svg:y="16.033cm" svg:viewBox="0 0 28 28" draw:points="0,0 28,0 28,28 0,28">
          <text:p/>
        </draw:polygon>
        <draw:polygon draw:style-name="gr269" draw:text-style-name="P267" draw:layer="layout" svg:width="0.027cm" svg:height="0.027cm" svg:x="15.132cm" svg:y="16.033cm" svg:viewBox="0 0 28 28" draw:points="0,0 28,0 28,28 0,28">
          <text:p/>
        </draw:polygon>
        <draw:polygon draw:style-name="gr269" draw:text-style-name="P267" draw:layer="layout" svg:width="0.027cm" svg:height="0.027cm" svg:x="15.185cm" svg:y="16.033cm" svg:viewBox="0 0 28 28" draw:points="0,0 28,0 28,28 0,28">
          <text:p/>
        </draw:polygon>
        <draw:polygon draw:style-name="gr269" draw:text-style-name="P267" draw:layer="layout" svg:width="0.027cm" svg:height="0.027cm" svg:x="15.238cm" svg:y="16.033cm" svg:viewBox="0 0 28 28" draw:points="0,0 28,0 28,28 0,28">
          <text:p/>
        </draw:polygon>
        <draw:polygon draw:style-name="gr269" draw:text-style-name="P267" draw:layer="layout" svg:width="0.027cm" svg:height="0.027cm" svg:x="15.291cm" svg:y="16.033cm" svg:viewBox="0 0 28 28" draw:points="0,0 28,0 28,28 0,28">
          <text:p/>
        </draw:polygon>
        <draw:polygon draw:style-name="gr269" draw:text-style-name="P267" draw:layer="layout" svg:width="0.027cm" svg:height="0.027cm" svg:x="15.344cm" svg:y="16.033cm" svg:viewBox="0 0 28 28" draw:points="0,0 28,0 28,28 0,28">
          <text:p/>
        </draw:polygon>
        <draw:polygon draw:style-name="gr269" draw:text-style-name="P267" draw:layer="layout" svg:width="0.027cm" svg:height="0.027cm" svg:x="15.397cm" svg:y="16.033cm" svg:viewBox="0 0 28 28" draw:points="0,0 28,0 28,28 0,28">
          <text:p/>
        </draw:polygon>
        <draw:polygon draw:style-name="gr269" draw:text-style-name="P267" draw:layer="layout" svg:width="0.027cm" svg:height="0.027cm" svg:x="15.45cm" svg:y="16.033cm" svg:viewBox="0 0 28 28" draw:points="0,0 28,0 28,28 0,28">
          <text:p/>
        </draw:polygon>
        <draw:polygon draw:style-name="gr269" draw:text-style-name="P267" draw:layer="layout" svg:width="0.027cm" svg:height="0.027cm" svg:x="15.503cm" svg:y="16.033cm" svg:viewBox="0 0 28 28" draw:points="0,0 28,0 28,28 0,28">
          <text:p/>
        </draw:polygon>
        <draw:polygon draw:style-name="gr269" draw:text-style-name="P267" draw:layer="layout" svg:width="0.027cm" svg:height="0.027cm" svg:x="15.556cm" svg:y="16.033cm" svg:viewBox="0 0 28 28" draw:points="0,0 28,0 28,28 0,28">
          <text:p/>
        </draw:polygon>
        <draw:polygon draw:style-name="gr269" draw:text-style-name="P267" draw:layer="layout" svg:width="0.027cm" svg:height="0.027cm" svg:x="15.609cm" svg:y="16.033cm" svg:viewBox="0 0 28 28" draw:points="0,0 28,0 28,28 0,28">
          <text:p/>
        </draw:polygon>
        <draw:polygon draw:style-name="gr269" draw:text-style-name="P267" draw:layer="layout" svg:width="0.027cm" svg:height="0.027cm" svg:x="15.662cm" svg:y="16.033cm" svg:viewBox="0 0 28 28" draw:points="0,0 28,0 28,28 0,28">
          <text:p/>
        </draw:polygon>
        <draw:polygon draw:style-name="gr269" draw:text-style-name="P267" draw:layer="layout" svg:width="0.027cm" svg:height="0.027cm" svg:x="15.715cm" svg:y="16.033cm" svg:viewBox="0 0 28 28" draw:points="0,0 28,0 28,28 0,28">
          <text:p/>
        </draw:polygon>
        <draw:polygon draw:style-name="gr269" draw:text-style-name="P267" draw:layer="layout" svg:width="0.028cm" svg:height="0.027cm" svg:x="15.768cm" svg:y="16.033cm" svg:viewBox="0 0 29 28" draw:points="0,0 29,0 29,28 0,28">
          <text:p/>
        </draw:polygon>
        <draw:polygon draw:style-name="gr269" draw:text-style-name="P267" draw:layer="layout" svg:width="0.027cm" svg:height="0.027cm" svg:x="15.821cm" svg:y="16.033cm" svg:viewBox="0 0 28 28" draw:points="0,0 28,0 28,28 0,28">
          <text:p/>
        </draw:polygon>
        <draw:polygon draw:style-name="gr269" draw:text-style-name="P267" draw:layer="layout" svg:width="0.027cm" svg:height="0.027cm" svg:x="15.874cm" svg:y="16.033cm" svg:viewBox="0 0 28 28" draw:points="0,0 28,0 28,28 0,28">
          <text:p/>
        </draw:polygon>
        <draw:polygon draw:style-name="gr269" draw:text-style-name="P267" draw:layer="layout" svg:width="0.027cm" svg:height="0.027cm" svg:x="15.927cm" svg:y="16.033cm" svg:viewBox="0 0 28 28" draw:points="0,0 28,0 28,28 0,28">
          <text:p/>
        </draw:polygon>
        <draw:polygon draw:style-name="gr269" draw:text-style-name="P267" draw:layer="layout" svg:width="0.027cm" svg:height="0.027cm" svg:x="15.98cm" svg:y="16.033cm" svg:viewBox="0 0 28 28" draw:points="0,0 28,0 28,28 0,28">
          <text:p/>
        </draw:polygon>
        <draw:polygon draw:style-name="gr269" draw:text-style-name="P267" draw:layer="layout" svg:width="0.027cm" svg:height="0.027cm" svg:x="16.033cm" svg:y="16.033cm" svg:viewBox="0 0 28 28" draw:points="0,0 28,0 28,28 0,28">
          <text:p/>
        </draw:polygon>
        <draw:polygon draw:style-name="gr269" draw:text-style-name="P267" draw:layer="layout" svg:width="0.027cm" svg:height="0.027cm" svg:x="16.086cm" svg:y="16.033cm" svg:viewBox="0 0 28 28" draw:points="0,0 28,0 28,28 0,28">
          <text:p/>
        </draw:polygon>
        <draw:polygon draw:style-name="gr269" draw:text-style-name="P267" draw:layer="layout" svg:width="0.027cm" svg:height="0.027cm" svg:x="16.139cm" svg:y="16.033cm" svg:viewBox="0 0 28 28" draw:points="0,0 28,0 28,28 0,28">
          <text:p/>
        </draw:polygon>
        <draw:polygon draw:style-name="gr269" draw:text-style-name="P267" draw:layer="layout" svg:width="0.027cm" svg:height="0.027cm" svg:x="16.192cm" svg:y="16.033cm" svg:viewBox="0 0 28 28" draw:points="0,0 28,0 28,28 0,28">
          <text:p/>
        </draw:polygon>
        <draw:polygon draw:style-name="gr269" draw:text-style-name="P267" draw:layer="layout" svg:width="0.027cm" svg:height="0.027cm" svg:x="16.245cm" svg:y="16.033cm" svg:viewBox="0 0 28 28" draw:points="0,0 28,0 28,28 0,28">
          <text:p/>
        </draw:polygon>
        <draw:polygon draw:style-name="gr269" draw:text-style-name="P267" draw:layer="layout" svg:width="0.027cm" svg:height="0.027cm" svg:x="16.298cm" svg:y="16.033cm" svg:viewBox="0 0 28 28" draw:points="0,0 28,0 28,28 0,28">
          <text:p/>
        </draw:polygon>
        <draw:polygon draw:style-name="gr269" draw:text-style-name="P267" draw:layer="layout" svg:width="0.027cm" svg:height="0.027cm" svg:x="16.351cm" svg:y="16.033cm" svg:viewBox="0 0 28 28" draw:points="0,0 28,0 28,28 0,28">
          <text:p/>
        </draw:polygon>
        <draw:polygon draw:style-name="gr269" draw:text-style-name="P267" draw:layer="layout" svg:width="0.027cm" svg:height="0.027cm" svg:x="16.404cm" svg:y="16.033cm" svg:viewBox="0 0 28 28" draw:points="0,0 28,0 28,28 0,28">
          <text:p/>
        </draw:polygon>
        <draw:polygon draw:style-name="gr269" draw:text-style-name="P267" draw:layer="layout" svg:width="0.027cm" svg:height="0.027cm" svg:x="16.457cm" svg:y="16.033cm" svg:viewBox="0 0 28 28" draw:points="0,0 28,0 28,28 0,28">
          <text:p/>
        </draw:polygon>
        <draw:polygon draw:style-name="gr269" draw:text-style-name="P267" draw:layer="layout" svg:width="0.027cm" svg:height="0.027cm" svg:x="16.51cm" svg:y="16.033cm" svg:viewBox="0 0 28 28" draw:points="0,0 28,0 28,28 0,28">
          <text:p/>
        </draw:polygon>
        <draw:polygon draw:style-name="gr269" draw:text-style-name="P267" draw:layer="layout" svg:width="0.027cm" svg:height="0.027cm" svg:x="16.563cm" svg:y="16.033cm" svg:viewBox="0 0 28 28" draw:points="0,0 28,0 28,28 0,28">
          <text:p/>
        </draw:polygon>
        <draw:polygon draw:style-name="gr269" draw:text-style-name="P267" draw:layer="layout" svg:width="0.027cm" svg:height="0.027cm" svg:x="16.616cm" svg:y="16.033cm" svg:viewBox="0 0 28 28" draw:points="0,0 28,0 28,28 0,28">
          <text:p/>
        </draw:polygon>
        <draw:polygon draw:style-name="gr269" draw:text-style-name="P267" draw:layer="layout" svg:width="0.027cm" svg:height="0.027cm" svg:x="16.669cm" svg:y="16.033cm" svg:viewBox="0 0 28 28" draw:points="0,0 28,0 28,28 0,28">
          <text:p/>
        </draw:polygon>
        <draw:polygon draw:style-name="gr269" draw:text-style-name="P267" draw:layer="layout" svg:width="0.027cm" svg:height="0.027cm" svg:x="16.722cm" svg:y="16.033cm" svg:viewBox="0 0 28 28" draw:points="0,0 28,0 28,28 0,28">
          <text:p/>
        </draw:polygon>
        <draw:polygon draw:style-name="gr269" draw:text-style-name="P267" draw:layer="layout" svg:width="0.027cm" svg:height="0.027cm" svg:x="16.775cm" svg:y="16.033cm" svg:viewBox="0 0 28 28" draw:points="0,0 28,0 28,28 0,28">
          <text:p/>
        </draw:polygon>
        <draw:polygon draw:style-name="gr269" draw:text-style-name="P267" draw:layer="layout" svg:width="0.027cm" svg:height="0.027cm" svg:x="16.828cm" svg:y="16.033cm" svg:viewBox="0 0 28 28" draw:points="0,0 28,0 28,28 0,28">
          <text:p/>
        </draw:polygon>
        <draw:polygon draw:style-name="gr269" draw:text-style-name="P267" draw:layer="layout" svg:width="0.027cm" svg:height="0.027cm" svg:x="16.881cm" svg:y="16.033cm" svg:viewBox="0 0 28 28" draw:points="0,0 28,0 28,28 0,28">
          <text:p/>
        </draw:polygon>
        <draw:polygon draw:style-name="gr269" draw:text-style-name="P267" draw:layer="layout" svg:width="0.027cm" svg:height="0.027cm" svg:x="16.934cm" svg:y="16.033cm" svg:viewBox="0 0 28 28" draw:points="0,0 28,0 28,28 0,28">
          <text:p/>
        </draw:polygon>
        <draw:polygon draw:style-name="gr269" draw:text-style-name="P267" draw:layer="layout" svg:width="0.027cm" svg:height="0.027cm" svg:x="16.987cm" svg:y="16.033cm" svg:viewBox="0 0 28 28" draw:points="0,0 28,0 28,28 0,28">
          <text:p/>
        </draw:polygon>
        <draw:polygon draw:style-name="gr269" draw:text-style-name="P267" draw:layer="layout" svg:width="0.027cm" svg:height="0.027cm" svg:x="17.04cm" svg:y="16.033cm" svg:viewBox="0 0 28 28" draw:points="0,0 28,0 28,28 0,28">
          <text:p/>
        </draw:polygon>
        <draw:polygon draw:style-name="gr269" draw:text-style-name="P267" draw:layer="layout" svg:width="0.027cm" svg:height="0.027cm" svg:x="17.093cm" svg:y="16.033cm" svg:viewBox="0 0 28 28" draw:points="0,0 28,0 28,28 0,28">
          <text:p/>
        </draw:polygon>
        <draw:polygon draw:style-name="gr269" draw:text-style-name="P267" draw:layer="layout" svg:width="0.028cm" svg:height="0.027cm" svg:x="17.146cm" svg:y="16.033cm" svg:viewBox="0 0 29 28" draw:points="0,0 29,0 29,28 0,28">
          <text:p/>
        </draw:polygon>
        <draw:polygon draw:style-name="gr269" draw:text-style-name="P267" draw:layer="layout" svg:width="0.027cm" svg:height="0.027cm" svg:x="17.199cm" svg:y="16.033cm" svg:viewBox="0 0 28 28" draw:points="0,0 28,0 28,28 0,28">
          <text:p/>
        </draw:polygon>
        <draw:polygon draw:style-name="gr269" draw:text-style-name="P267" draw:layer="layout" svg:width="0.027cm" svg:height="0.027cm" svg:x="17.252cm" svg:y="16.033cm" svg:viewBox="0 0 28 28" draw:points="0,0 28,0 28,28 0,28">
          <text:p/>
        </draw:polygon>
        <draw:polygon draw:style-name="gr269" draw:text-style-name="P267" draw:layer="layout" svg:width="0.027cm" svg:height="0.027cm" svg:x="17.305cm" svg:y="16.033cm" svg:viewBox="0 0 28 28" draw:points="0,0 28,0 28,28 0,28">
          <text:p/>
        </draw:polygon>
        <draw:polygon draw:style-name="gr269" draw:text-style-name="P267" draw:layer="layout" svg:width="0.027cm" svg:height="0.027cm" svg:x="17.358cm" svg:y="16.033cm" svg:viewBox="0 0 28 28" draw:points="0,0 28,0 28,28 0,28">
          <text:p/>
        </draw:polygon>
        <draw:polygon draw:style-name="gr269" draw:text-style-name="P267" draw:layer="layout" svg:width="0.027cm" svg:height="0.027cm" svg:x="17.411cm" svg:y="16.033cm" svg:viewBox="0 0 28 28" draw:points="0,0 28,0 28,28 0,28">
          <text:p/>
        </draw:polygon>
        <draw:polygon draw:style-name="gr269" draw:text-style-name="P267" draw:layer="layout" svg:width="0.027cm" svg:height="0.027cm" svg:x="17.464cm" svg:y="16.033cm" svg:viewBox="0 0 28 28" draw:points="0,0 28,0 28,28 0,28">
          <text:p/>
        </draw:polygon>
        <draw:polygon draw:style-name="gr269" draw:text-style-name="P267" draw:layer="layout" svg:width="0.027cm" svg:height="0.027cm" svg:x="17.517cm" svg:y="16.033cm" svg:viewBox="0 0 28 28" draw:points="0,0 28,0 28,28 0,28">
          <text:p/>
        </draw:polygon>
        <draw:polygon draw:style-name="gr269" draw:text-style-name="P267" draw:layer="layout" svg:width="0.027cm" svg:height="0.027cm" svg:x="17.57cm" svg:y="16.033cm" svg:viewBox="0 0 28 28" draw:points="0,0 28,0 28,28 0,28">
          <text:p/>
        </draw:polygon>
        <draw:polygon draw:style-name="gr269" draw:text-style-name="P267" draw:layer="layout" svg:width="0.027cm" svg:height="0.027cm" svg:x="17.623cm" svg:y="16.033cm" svg:viewBox="0 0 28 28" draw:points="0,0 28,0 28,28 0,28">
          <text:p/>
        </draw:polygon>
        <draw:polygon draw:style-name="gr269" draw:text-style-name="P267" draw:layer="layout" svg:width="0.027cm" svg:height="0.027cm" svg:x="17.676cm" svg:y="16.033cm" svg:viewBox="0 0 28 28" draw:points="0,0 28,0 28,28 0,28">
          <text:p/>
        </draw:polygon>
        <draw:polygon draw:style-name="gr269" draw:text-style-name="P267" draw:layer="layout" svg:width="0.027cm" svg:height="0.027cm" svg:x="17.729cm" svg:y="16.033cm" svg:viewBox="0 0 28 28" draw:points="0,0 28,0 28,28 0,28">
          <text:p/>
        </draw:polygon>
        <draw:polygon draw:style-name="gr269" draw:text-style-name="P267" draw:layer="layout" svg:width="0.027cm" svg:height="0.027cm" svg:x="17.782cm" svg:y="16.033cm" svg:viewBox="0 0 28 28" draw:points="0,0 28,0 28,28 0,28">
          <text:p/>
        </draw:polygon>
        <draw:polygon draw:style-name="gr269" draw:text-style-name="P267" draw:layer="layout" svg:width="0.027cm" svg:height="0.027cm" svg:x="17.835cm" svg:y="16.033cm" svg:viewBox="0 0 28 28" draw:points="0,0 28,0 28,28 0,28">
          <text:p/>
        </draw:polygon>
        <draw:polygon draw:style-name="gr269" draw:text-style-name="P267" draw:layer="layout" svg:width="0.027cm" svg:height="0.027cm" svg:x="17.888cm" svg:y="16.033cm" svg:viewBox="0 0 28 28" draw:points="0,0 28,0 28,28 0,28">
          <text:p/>
        </draw:polygon>
        <draw:polygon draw:style-name="gr269" draw:text-style-name="P267" draw:layer="layout" svg:width="0.027cm" svg:height="0.027cm" svg:x="17.941cm" svg:y="16.033cm" svg:viewBox="0 0 28 28" draw:points="0,0 28,0 28,28 0,28">
          <text:p/>
        </draw:polygon>
        <draw:polygon draw:style-name="gr269" draw:text-style-name="P267" draw:layer="layout" svg:width="0.027cm" svg:height="0.027cm" svg:x="17.994cm" svg:y="16.033cm" svg:viewBox="0 0 28 28" draw:points="0,0 28,0 28,28 0,28">
          <text:p/>
        </draw:polygon>
        <draw:polygon draw:style-name="gr269" draw:text-style-name="P267" draw:layer="layout" svg:width="0.027cm" svg:height="0.027cm" svg:x="18.047cm" svg:y="16.033cm" svg:viewBox="0 0 28 28" draw:points="0,0 28,0 28,28 0,28">
          <text:p/>
        </draw:polygon>
        <draw:polygon draw:style-name="gr269" draw:text-style-name="P267" draw:layer="layout" svg:width="0.027cm" svg:height="0.027cm" svg:x="18.1cm" svg:y="16.033cm" svg:viewBox="0 0 28 28" draw:points="0,0 28,0 28,28 0,28">
          <text:p/>
        </draw:polygon>
        <draw:polygon draw:style-name="gr269" draw:text-style-name="P267" draw:layer="layout" svg:width="0.027cm" svg:height="0.027cm" svg:x="18.153cm" svg:y="16.033cm" svg:viewBox="0 0 28 28" draw:points="0,0 28,0 28,28 0,28">
          <text:p/>
        </draw:polygon>
        <draw:polygon draw:style-name="gr269" draw:text-style-name="P267" draw:layer="layout" svg:width="0.027cm" svg:height="0.027cm" svg:x="18.206cm" svg:y="16.033cm" svg:viewBox="0 0 28 28" draw:points="0,0 28,0 28,28 0,28">
          <text:p/>
        </draw:polygon>
        <draw:polygon draw:style-name="gr269" draw:text-style-name="P267" draw:layer="layout" svg:width="0.027cm" svg:height="0.027cm" svg:x="18.259cm" svg:y="16.033cm" svg:viewBox="0 0 28 28" draw:points="0,0 28,0 28,28 0,28">
          <text:p/>
        </draw:polygon>
        <draw:polygon draw:style-name="gr269" draw:text-style-name="P267" draw:layer="layout" svg:width="0.027cm" svg:height="0.027cm" svg:x="18.312cm" svg:y="16.033cm" svg:viewBox="0 0 28 28" draw:points="0,0 28,0 28,28 0,28">
          <text:p/>
        </draw:polygon>
        <draw:polygon draw:style-name="gr269" draw:text-style-name="P267" draw:layer="layout" svg:width="0.027cm" svg:height="0.027cm" svg:x="18.365cm" svg:y="16.033cm" svg:viewBox="0 0 28 28" draw:points="0,0 28,0 28,28 0,28">
          <text:p/>
        </draw:polygon>
        <draw:polygon draw:style-name="gr269" draw:text-style-name="P267" draw:layer="layout" svg:width="0.027cm" svg:height="0.027cm" svg:x="18.418cm" svg:y="16.033cm" svg:viewBox="0 0 28 28" draw:points="0,0 28,0 28,28 0,28">
          <text:p/>
        </draw:polygon>
        <draw:polygon draw:style-name="gr269" draw:text-style-name="P267" draw:layer="layout" svg:width="0.027cm" svg:height="0.027cm" svg:x="18.471cm" svg:y="16.033cm" svg:viewBox="0 0 28 28" draw:points="0,0 28,0 28,28 0,28">
          <text:p/>
        </draw:polygon>
        <draw:polygon draw:style-name="gr269" draw:text-style-name="P267" draw:layer="layout" svg:width="0.028cm" svg:height="0.027cm" svg:x="18.524cm" svg:y="16.033cm" svg:viewBox="0 0 29 28" draw:points="0,0 29,0 29,28 0,28">
          <text:p/>
        </draw:polygon>
        <draw:polygon draw:style-name="gr269" draw:text-style-name="P267" draw:layer="layout" svg:width="0.027cm" svg:height="0.027cm" svg:x="18.577cm" svg:y="16.033cm" svg:viewBox="0 0 28 28" draw:points="0,0 28,0 28,28 0,28">
          <text:p/>
        </draw:polygon>
        <draw:polygon draw:style-name="gr269" draw:text-style-name="P267" draw:layer="layout" svg:width="0.027cm" svg:height="0.027cm" svg:x="18.63cm" svg:y="16.033cm" svg:viewBox="0 0 28 28" draw:points="0,0 28,0 28,28 0,28">
          <text:p/>
        </draw:polygon>
        <draw:polygon draw:style-name="gr269" draw:text-style-name="P267" draw:layer="layout" svg:width="0.027cm" svg:height="0.027cm" svg:x="18.683cm" svg:y="16.033cm" svg:viewBox="0 0 28 28" draw:points="0,0 28,0 28,28 0,28">
          <text:p/>
        </draw:polygon>
        <draw:polygon draw:style-name="gr269" draw:text-style-name="P267" draw:layer="layout" svg:width="0.027cm" svg:height="0.027cm" svg:x="18.736cm" svg:y="16.033cm" svg:viewBox="0 0 28 28" draw:points="0,0 28,0 28,28 0,28">
          <text:p/>
        </draw:polygon>
        <draw:polygon draw:style-name="gr269" draw:text-style-name="P267" draw:layer="layout" svg:width="0.027cm" svg:height="0.027cm" svg:x="18.789cm" svg:y="16.033cm" svg:viewBox="0 0 28 28" draw:points="0,0 28,0 28,28 0,28">
          <text:p/>
        </draw:polygon>
        <draw:polygon draw:style-name="gr269" draw:text-style-name="P267" draw:layer="layout" svg:width="0.027cm" svg:height="0.027cm" svg:x="18.842cm" svg:y="16.033cm" svg:viewBox="0 0 28 28" draw:points="0,0 28,0 28,28 0,28">
          <text:p/>
        </draw:polygon>
        <draw:polygon draw:style-name="gr269" draw:text-style-name="P267" draw:layer="layout" svg:width="0.027cm" svg:height="0.027cm" svg:x="18.895cm" svg:y="16.033cm" svg:viewBox="0 0 28 28" draw:points="0,0 28,0 28,28 0,28">
          <text:p/>
        </draw:polygon>
        <draw:polygon draw:style-name="gr269" draw:text-style-name="P267" draw:layer="layout" svg:width="0.027cm" svg:height="0.027cm" svg:x="18.948cm" svg:y="16.033cm" svg:viewBox="0 0 28 28" draw:points="0,0 28,0 28,28 0,28">
          <text:p/>
        </draw:polygon>
        <draw:polygon draw:style-name="gr269" draw:text-style-name="P267" draw:layer="layout" svg:width="0.027cm" svg:height="0.027cm" svg:x="19.001cm" svg:y="16.033cm" svg:viewBox="0 0 28 28" draw:points="0,0 28,0 28,28 0,28">
          <text:p/>
        </draw:polygon>
        <draw:polygon draw:style-name="gr269" draw:text-style-name="P267" draw:layer="layout" svg:width="0.053cm" svg:height="0.026cm" svg:x="2.014cm" svg:y="17.014cm" svg:viewBox="0 0 54 27" draw:points="0,0 54,0 54,27 0,27">
          <text:p/>
        </draw:polygon>
        <draw:polygon draw:style-name="gr269" draw:text-style-name="P267" draw:layer="layout" svg:width="0.027cm" svg:height="0.026cm" svg:x="2.093cm" svg:y="17.014cm" svg:viewBox="0 0 28 27" draw:points="0,0 28,0 28,27 0,27">
          <text:p/>
        </draw:polygon>
        <draw:polygon draw:style-name="gr269" draw:text-style-name="P267" draw:layer="layout" svg:width="0.027cm" svg:height="0.026cm" svg:x="2.146cm" svg:y="17.014cm" svg:viewBox="0 0 28 27" draw:points="0,0 28,0 28,27 0,27">
          <text:p/>
        </draw:polygon>
        <draw:polygon draw:style-name="gr269" draw:text-style-name="P267" draw:layer="layout" svg:width="0.027cm" svg:height="0.026cm" svg:x="2.199cm" svg:y="17.014cm" svg:viewBox="0 0 28 27" draw:points="0,0 28,0 28,27 0,27">
          <text:p/>
        </draw:polygon>
        <draw:polygon draw:style-name="gr269" draw:text-style-name="P267" draw:layer="layout" svg:width="0.027cm" svg:height="0.026cm" svg:x="2.252cm" svg:y="17.014cm" svg:viewBox="0 0 28 27" draw:points="0,0 28,0 28,27 0,27">
          <text:p/>
        </draw:polygon>
        <draw:polygon draw:style-name="gr269" draw:text-style-name="P267" draw:layer="layout" svg:width="0.027cm" svg:height="0.026cm" svg:x="2.305cm" svg:y="17.014cm" svg:viewBox="0 0 28 27" draw:points="0,0 28,0 28,27 0,27">
          <text:p/>
        </draw:polygon>
        <draw:polygon draw:style-name="gr269" draw:text-style-name="P267" draw:layer="layout" svg:width="0.027cm" svg:height="0.026cm" svg:x="2.358cm" svg:y="17.014cm" svg:viewBox="0 0 28 27" draw:points="0,0 28,0 28,27 0,27">
          <text:p/>
        </draw:polygon>
        <draw:polygon draw:style-name="gr269" draw:text-style-name="P267" draw:layer="layout" svg:width="0.027cm" svg:height="0.026cm" svg:x="2.411cm" svg:y="17.014cm" svg:viewBox="0 0 28 27" draw:points="0,0 28,0 28,27 0,27">
          <text:p/>
        </draw:polygon>
        <draw:polygon draw:style-name="gr269" draw:text-style-name="P267" draw:layer="layout" svg:width="0.027cm" svg:height="0.026cm" svg:x="2.464cm" svg:y="17.014cm" svg:viewBox="0 0 28 27" draw:points="0,0 28,0 28,27 0,27">
          <text:p/>
        </draw:polygon>
        <draw:polygon draw:style-name="gr269" draw:text-style-name="P267" draw:layer="layout" svg:width="0.027cm" svg:height="0.026cm" svg:x="2.517cm" svg:y="17.014cm" svg:viewBox="0 0 28 27" draw:points="0,0 28,0 28,27 0,27">
          <text:p/>
        </draw:polygon>
        <draw:polygon draw:style-name="gr269" draw:text-style-name="P267" draw:layer="layout" svg:width="0.027cm" svg:height="0.026cm" svg:x="2.57cm" svg:y="17.014cm" svg:viewBox="0 0 28 27" draw:points="0,0 28,0 28,27 0,27">
          <text:p/>
        </draw:polygon>
        <draw:polygon draw:style-name="gr269" draw:text-style-name="P267" draw:layer="layout" svg:width="0.027cm" svg:height="0.026cm" svg:x="2.623cm" svg:y="17.014cm" svg:viewBox="0 0 28 27" draw:points="0,0 28,0 28,27 0,27">
          <text:p/>
        </draw:polygon>
        <draw:polygon draw:style-name="gr269" draw:text-style-name="P267" draw:layer="layout" svg:width="0.027cm" svg:height="0.026cm" svg:x="2.676cm" svg:y="17.014cm" svg:viewBox="0 0 28 27" draw:points="0,0 28,0 28,27 0,27">
          <text:p/>
        </draw:polygon>
        <draw:polygon draw:style-name="gr269" draw:text-style-name="P267" draw:layer="layout" svg:width="0.027cm" svg:height="0.026cm" svg:x="2.729cm" svg:y="17.014cm" svg:viewBox="0 0 28 27" draw:points="0,0 28,0 28,27 0,27">
          <text:p/>
        </draw:polygon>
        <draw:polygon draw:style-name="gr269" draw:text-style-name="P267" draw:layer="layout" svg:width="0.027cm" svg:height="0.026cm" svg:x="2.782cm" svg:y="17.014cm" svg:viewBox="0 0 28 27" draw:points="0,0 28,0 28,27 0,27">
          <text:p/>
        </draw:polygon>
        <draw:polygon draw:style-name="gr269" draw:text-style-name="P267" draw:layer="layout" svg:width="0.027cm" svg:height="0.026cm" svg:x="2.835cm" svg:y="17.014cm" svg:viewBox="0 0 28 27" draw:points="0,0 28,0 28,27 0,27">
          <text:p/>
        </draw:polygon>
        <draw:polygon draw:style-name="gr269" draw:text-style-name="P267" draw:layer="layout" svg:width="0.027cm" svg:height="0.026cm" svg:x="2.888cm" svg:y="17.014cm" svg:viewBox="0 0 28 27" draw:points="0,0 28,0 28,27 0,27">
          <text:p/>
        </draw:polygon>
        <draw:polygon draw:style-name="gr269" draw:text-style-name="P267" draw:layer="layout" svg:width="0.027cm" svg:height="0.026cm" svg:x="2.941cm" svg:y="17.014cm" svg:viewBox="0 0 28 27" draw:points="0,0 28,0 28,27 0,27">
          <text:p/>
        </draw:polygon>
        <draw:polygon draw:style-name="gr269" draw:text-style-name="P267" draw:layer="layout" svg:width="0.027cm" svg:height="0.026cm" svg:x="2.994cm" svg:y="17.014cm" svg:viewBox="0 0 28 27" draw:points="0,0 28,0 28,27 0,27">
          <text:p/>
        </draw:polygon>
        <draw:polygon draw:style-name="gr269" draw:text-style-name="P267" draw:layer="layout" svg:width="0.027cm" svg:height="0.026cm" svg:x="3.047cm" svg:y="17.014cm" svg:viewBox="0 0 28 27" draw:points="0,0 28,0 28,27 0,27">
          <text:p/>
        </draw:polygon>
        <draw:polygon draw:style-name="gr269" draw:text-style-name="P267" draw:layer="layout" svg:width="0.027cm" svg:height="0.026cm" svg:x="3.1cm" svg:y="17.014cm" svg:viewBox="0 0 28 27" draw:points="0,0 28,0 28,27 0,27">
          <text:p/>
        </draw:polygon>
        <draw:polygon draw:style-name="gr269" draw:text-style-name="P267" draw:layer="layout" svg:width="0.027cm" svg:height="0.026cm" svg:x="3.153cm" svg:y="17.014cm" svg:viewBox="0 0 28 27" draw:points="0,0 28,0 28,27 0,27">
          <text:p/>
        </draw:polygon>
        <draw:polygon draw:style-name="gr269" draw:text-style-name="P267" draw:layer="layout" svg:width="0.027cm" svg:height="0.026cm" svg:x="3.206cm" svg:y="17.014cm" svg:viewBox="0 0 28 27" draw:points="0,0 28,0 28,27 0,27">
          <text:p/>
        </draw:polygon>
        <draw:polygon draw:style-name="gr269" draw:text-style-name="P267" draw:layer="layout" svg:width="0.027cm" svg:height="0.026cm" svg:x="3.259cm" svg:y="17.014cm" svg:viewBox="0 0 28 27" draw:points="0,0 28,0 28,27 0,27">
          <text:p/>
        </draw:polygon>
        <draw:polygon draw:style-name="gr269" draw:text-style-name="P267" draw:layer="layout" svg:width="0.027cm" svg:height="0.026cm" svg:x="3.312cm" svg:y="17.014cm" svg:viewBox="0 0 28 27" draw:points="0,0 28,0 28,27 0,27">
          <text:p/>
        </draw:polygon>
        <draw:polygon draw:style-name="gr269" draw:text-style-name="P267" draw:layer="layout" svg:width="0.027cm" svg:height="0.026cm" svg:x="3.365cm" svg:y="17.014cm" svg:viewBox="0 0 28 27" draw:points="0,0 28,0 28,27 0,27">
          <text:p/>
        </draw:polygon>
        <draw:polygon draw:style-name="gr269" draw:text-style-name="P267" draw:layer="layout" svg:width="0.028cm" svg:height="0.026cm" svg:x="3.418cm" svg:y="17.014cm" svg:viewBox="0 0 29 27" draw:points="0,0 29,0 29,27 0,27">
          <text:p/>
        </draw:polygon>
        <draw:polygon draw:style-name="gr269" draw:text-style-name="P267" draw:layer="layout" svg:width="0.027cm" svg:height="0.026cm" svg:x="3.471cm" svg:y="17.014cm" svg:viewBox="0 0 28 27" draw:points="0,0 28,0 28,27 0,27">
          <text:p/>
        </draw:polygon>
        <draw:polygon draw:style-name="gr269" draw:text-style-name="P267" draw:layer="layout" svg:width="0.027cm" svg:height="0.026cm" svg:x="3.524cm" svg:y="17.014cm" svg:viewBox="0 0 28 27" draw:points="0,0 28,0 28,27 0,27">
          <text:p/>
        </draw:polygon>
        <draw:polygon draw:style-name="gr269" draw:text-style-name="P267" draw:layer="layout" svg:width="0.027cm" svg:height="0.026cm" svg:x="3.577cm" svg:y="17.014cm" svg:viewBox="0 0 28 27" draw:points="0,0 28,0 28,27 0,27">
          <text:p/>
        </draw:polygon>
        <draw:polygon draw:style-name="gr269" draw:text-style-name="P267" draw:layer="layout" svg:width="0.027cm" svg:height="0.026cm" svg:x="3.63cm" svg:y="17.014cm" svg:viewBox="0 0 28 27" draw:points="0,0 28,0 28,27 0,27">
          <text:p/>
        </draw:polygon>
        <draw:polygon draw:style-name="gr269" draw:text-style-name="P267" draw:layer="layout" svg:width="0.027cm" svg:height="0.026cm" svg:x="3.683cm" svg:y="17.014cm" svg:viewBox="0 0 28 27" draw:points="0,0 28,0 28,27 0,27">
          <text:p/>
        </draw:polygon>
        <draw:polygon draw:style-name="gr269" draw:text-style-name="P267" draw:layer="layout" svg:width="0.027cm" svg:height="0.026cm" svg:x="3.736cm" svg:y="17.014cm" svg:viewBox="0 0 28 27" draw:points="0,0 28,0 28,27 0,27">
          <text:p/>
        </draw:polygon>
        <draw:polygon draw:style-name="gr269" draw:text-style-name="P267" draw:layer="layout" svg:width="0.027cm" svg:height="0.026cm" svg:x="3.789cm" svg:y="17.014cm" svg:viewBox="0 0 28 27" draw:points="0,0 28,0 28,27 0,27">
          <text:p/>
        </draw:polygon>
        <draw:polygon draw:style-name="gr269" draw:text-style-name="P267" draw:layer="layout" svg:width="0.027cm" svg:height="0.026cm" svg:x="3.842cm" svg:y="17.014cm" svg:viewBox="0 0 28 27" draw:points="0,0 28,0 28,27 0,27">
          <text:p/>
        </draw:polygon>
        <draw:polygon draw:style-name="gr269" draw:text-style-name="P267" draw:layer="layout" svg:width="0.027cm" svg:height="0.026cm" svg:x="3.895cm" svg:y="17.014cm" svg:viewBox="0 0 28 27" draw:points="0,0 28,0 28,27 0,27">
          <text:p/>
        </draw:polygon>
        <draw:polygon draw:style-name="gr269" draw:text-style-name="P267" draw:layer="layout" svg:width="0.027cm" svg:height="0.026cm" svg:x="3.948cm" svg:y="17.014cm" svg:viewBox="0 0 28 27" draw:points="0,0 28,0 28,27 0,27">
          <text:p/>
        </draw:polygon>
        <draw:polygon draw:style-name="gr269" draw:text-style-name="P267" draw:layer="layout" svg:width="0.027cm" svg:height="0.026cm" svg:x="4.001cm" svg:y="17.014cm" svg:viewBox="0 0 28 27" draw:points="0,0 28,0 28,27 0,27">
          <text:p/>
        </draw:polygon>
        <draw:polygon draw:style-name="gr269" draw:text-style-name="P267" draw:layer="layout" svg:width="0.027cm" svg:height="0.026cm" svg:x="4.054cm" svg:y="17.014cm" svg:viewBox="0 0 28 27" draw:points="0,0 28,0 28,27 0,27">
          <text:p/>
        </draw:polygon>
        <draw:polygon draw:style-name="gr269" draw:text-style-name="P267" draw:layer="layout" svg:width="0.027cm" svg:height="0.026cm" svg:x="4.107cm" svg:y="17.014cm" svg:viewBox="0 0 28 27" draw:points="0,0 28,0 28,27 0,27">
          <text:p/>
        </draw:polygon>
        <draw:polygon draw:style-name="gr269" draw:text-style-name="P267" draw:layer="layout" svg:width="0.027cm" svg:height="0.026cm" svg:x="4.16cm" svg:y="17.014cm" svg:viewBox="0 0 28 27" draw:points="0,0 28,0 28,27 0,27">
          <text:p/>
        </draw:polygon>
        <draw:polygon draw:style-name="gr269" draw:text-style-name="P267" draw:layer="layout" svg:width="0.027cm" svg:height="0.026cm" svg:x="4.213cm" svg:y="17.014cm" svg:viewBox="0 0 28 27" draw:points="0,0 28,0 28,27 0,27">
          <text:p/>
        </draw:polygon>
        <draw:polygon draw:style-name="gr269" draw:text-style-name="P267" draw:layer="layout" svg:width="0.027cm" svg:height="0.026cm" svg:x="4.266cm" svg:y="17.014cm" svg:viewBox="0 0 28 27" draw:points="0,0 28,0 28,27 0,27">
          <text:p/>
        </draw:polygon>
        <draw:polygon draw:style-name="gr269" draw:text-style-name="P267" draw:layer="layout" svg:width="0.027cm" svg:height="0.026cm" svg:x="4.319cm" svg:y="17.014cm" svg:viewBox="0 0 28 27" draw:points="0,0 28,0 28,27 0,27">
          <text:p/>
        </draw:polygon>
        <draw:polygon draw:style-name="gr269" draw:text-style-name="P267" draw:layer="layout" svg:width="0.027cm" svg:height="0.026cm" svg:x="4.372cm" svg:y="17.014cm" svg:viewBox="0 0 28 27" draw:points="0,0 28,0 28,27 0,27">
          <text:p/>
        </draw:polygon>
        <draw:polygon draw:style-name="gr269" draw:text-style-name="P267" draw:layer="layout" svg:width="0.027cm" svg:height="0.026cm" svg:x="4.425cm" svg:y="17.014cm" svg:viewBox="0 0 28 27" draw:points="0,0 28,0 28,27 0,27">
          <text:p/>
        </draw:polygon>
        <draw:polygon draw:style-name="gr269" draw:text-style-name="P267" draw:layer="layout" svg:width="0.027cm" svg:height="0.026cm" svg:x="4.478cm" svg:y="17.014cm" svg:viewBox="0 0 28 27" draw:points="0,0 28,0 28,27 0,27">
          <text:p/>
        </draw:polygon>
        <draw:polygon draw:style-name="gr269" draw:text-style-name="P267" draw:layer="layout" svg:width="0.027cm" svg:height="0.026cm" svg:x="4.531cm" svg:y="17.014cm" svg:viewBox="0 0 28 27" draw:points="0,0 28,0 28,27 0,27">
          <text:p/>
        </draw:polygon>
        <draw:polygon draw:style-name="gr269" draw:text-style-name="P267" draw:layer="layout" svg:width="0.027cm" svg:height="0.026cm" svg:x="4.584cm" svg:y="17.014cm" svg:viewBox="0 0 28 27" draw:points="0,0 28,0 28,27 0,27">
          <text:p/>
        </draw:polygon>
        <draw:polygon draw:style-name="gr269" draw:text-style-name="P267" draw:layer="layout" svg:width="0.027cm" svg:height="0.026cm" svg:x="4.637cm" svg:y="17.014cm" svg:viewBox="0 0 28 27" draw:points="0,0 28,0 28,27 0,27">
          <text:p/>
        </draw:polygon>
        <draw:polygon draw:style-name="gr269" draw:text-style-name="P267" draw:layer="layout" svg:width="0.027cm" svg:height="0.026cm" svg:x="4.69cm" svg:y="17.014cm" svg:viewBox="0 0 28 27" draw:points="0,0 28,0 28,27 0,27">
          <text:p/>
        </draw:polygon>
        <draw:polygon draw:style-name="gr269" draw:text-style-name="P267" draw:layer="layout" svg:width="0.027cm" svg:height="0.026cm" svg:x="4.743cm" svg:y="17.014cm" svg:viewBox="0 0 28 27" draw:points="0,0 28,0 28,27 0,27">
          <text:p/>
        </draw:polygon>
        <draw:polygon draw:style-name="gr269" draw:text-style-name="P267" draw:layer="layout" svg:width="0.028cm" svg:height="0.026cm" svg:x="4.796cm" svg:y="17.014cm" svg:viewBox="0 0 29 27" draw:points="0,0 29,0 29,27 0,27">
          <text:p/>
        </draw:polygon>
        <draw:polygon draw:style-name="gr269" draw:text-style-name="P267" draw:layer="layout" svg:width="0.027cm" svg:height="0.026cm" svg:x="4.849cm" svg:y="17.014cm" svg:viewBox="0 0 28 27" draw:points="0,0 28,0 28,27 0,27">
          <text:p/>
        </draw:polygon>
        <draw:polygon draw:style-name="gr269" draw:text-style-name="P267" draw:layer="layout" svg:width="0.027cm" svg:height="0.026cm" svg:x="4.902cm" svg:y="17.014cm" svg:viewBox="0 0 28 27" draw:points="0,0 28,0 28,27 0,27">
          <text:p/>
        </draw:polygon>
        <draw:polygon draw:style-name="gr269" draw:text-style-name="P267" draw:layer="layout" svg:width="0.027cm" svg:height="0.026cm" svg:x="4.955cm" svg:y="17.014cm" svg:viewBox="0 0 28 27" draw:points="0,0 28,0 28,27 0,27">
          <text:p/>
        </draw:polygon>
        <draw:polygon draw:style-name="gr269" draw:text-style-name="P267" draw:layer="layout" svg:width="0.027cm" svg:height="0.026cm" svg:x="5.008cm" svg:y="17.014cm" svg:viewBox="0 0 28 27" draw:points="0,0 28,0 28,27 0,27">
          <text:p/>
        </draw:polygon>
        <draw:polygon draw:style-name="gr269" draw:text-style-name="P267" draw:layer="layout" svg:width="0.027cm" svg:height="0.026cm" svg:x="5.061cm" svg:y="17.014cm" svg:viewBox="0 0 28 27" draw:points="0,0 28,0 28,27 0,27">
          <text:p/>
        </draw:polygon>
        <draw:polygon draw:style-name="gr269" draw:text-style-name="P267" draw:layer="layout" svg:width="0.027cm" svg:height="0.026cm" svg:x="5.114cm" svg:y="17.014cm" svg:viewBox="0 0 28 27" draw:points="0,0 28,0 28,27 0,27">
          <text:p/>
        </draw:polygon>
        <draw:polygon draw:style-name="gr269" draw:text-style-name="P267" draw:layer="layout" svg:width="0.027cm" svg:height="0.026cm" svg:x="5.167cm" svg:y="17.014cm" svg:viewBox="0 0 28 27" draw:points="0,0 28,0 28,27 0,27">
          <text:p/>
        </draw:polygon>
        <draw:polygon draw:style-name="gr269" draw:text-style-name="P267" draw:layer="layout" svg:width="0.027cm" svg:height="0.026cm" svg:x="5.22cm" svg:y="17.014cm" svg:viewBox="0 0 28 27" draw:points="0,0 28,0 28,27 0,27">
          <text:p/>
        </draw:polygon>
        <draw:polygon draw:style-name="gr269" draw:text-style-name="P267" draw:layer="layout" svg:width="0.027cm" svg:height="0.026cm" svg:x="5.273cm" svg:y="17.014cm" svg:viewBox="0 0 28 27" draw:points="0,0 28,0 28,27 0,27">
          <text:p/>
        </draw:polygon>
        <draw:polygon draw:style-name="gr269" draw:text-style-name="P267" draw:layer="layout" svg:width="0.027cm" svg:height="0.026cm" svg:x="5.326cm" svg:y="17.014cm" svg:viewBox="0 0 28 27" draw:points="0,0 28,0 28,27 0,27">
          <text:p/>
        </draw:polygon>
        <draw:polygon draw:style-name="gr269" draw:text-style-name="P267" draw:layer="layout" svg:width="0.027cm" svg:height="0.026cm" svg:x="5.379cm" svg:y="17.014cm" svg:viewBox="0 0 28 27" draw:points="0,0 28,0 28,27 0,27">
          <text:p/>
        </draw:polygon>
        <draw:polygon draw:style-name="gr269" draw:text-style-name="P267" draw:layer="layout" svg:width="0.027cm" svg:height="0.026cm" svg:x="5.432cm" svg:y="17.014cm" svg:viewBox="0 0 28 27" draw:points="0,0 28,0 28,27 0,27">
          <text:p/>
        </draw:polygon>
        <draw:polygon draw:style-name="gr269" draw:text-style-name="P267" draw:layer="layout" svg:width="0.027cm" svg:height="0.026cm" svg:x="5.485cm" svg:y="17.014cm" svg:viewBox="0 0 28 27" draw:points="0,0 28,0 28,27 0,27">
          <text:p/>
        </draw:polygon>
        <draw:polygon draw:style-name="gr269" draw:text-style-name="P267" draw:layer="layout" svg:width="0.027cm" svg:height="0.026cm" svg:x="5.538cm" svg:y="17.014cm" svg:viewBox="0 0 28 27" draw:points="0,0 28,0 28,27 0,27">
          <text:p/>
        </draw:polygon>
        <draw:polygon draw:style-name="gr269" draw:text-style-name="P267" draw:layer="layout" svg:width="0.027cm" svg:height="0.026cm" svg:x="5.591cm" svg:y="17.014cm" svg:viewBox="0 0 28 27" draw:points="0,0 28,0 28,27 0,27">
          <text:p/>
        </draw:polygon>
        <draw:polygon draw:style-name="gr269" draw:text-style-name="P267" draw:layer="layout" svg:width="0.027cm" svg:height="0.026cm" svg:x="5.644cm" svg:y="17.014cm" svg:viewBox="0 0 28 27" draw:points="0,0 28,0 28,27 0,27">
          <text:p/>
        </draw:polygon>
        <draw:polygon draw:style-name="gr269" draw:text-style-name="P267" draw:layer="layout" svg:width="0.027cm" svg:height="0.026cm" svg:x="5.697cm" svg:y="17.014cm" svg:viewBox="0 0 28 27" draw:points="0,0 28,0 28,27 0,27">
          <text:p/>
        </draw:polygon>
        <draw:polygon draw:style-name="gr269" draw:text-style-name="P267" draw:layer="layout" svg:width="0.027cm" svg:height="0.026cm" svg:x="5.75cm" svg:y="17.014cm" svg:viewBox="0 0 28 27" draw:points="0,0 28,0 28,27 0,27">
          <text:p/>
        </draw:polygon>
        <draw:polygon draw:style-name="gr269" draw:text-style-name="P267" draw:layer="layout" svg:width="0.027cm" svg:height="0.026cm" svg:x="5.803cm" svg:y="17.014cm" svg:viewBox="0 0 28 27" draw:points="0,0 28,0 28,27 0,27">
          <text:p/>
        </draw:polygon>
        <draw:polygon draw:style-name="gr269" draw:text-style-name="P267" draw:layer="layout" svg:width="0.027cm" svg:height="0.026cm" svg:x="5.856cm" svg:y="17.014cm" svg:viewBox="0 0 28 27" draw:points="0,0 28,0 28,27 0,27">
          <text:p/>
        </draw:polygon>
        <draw:polygon draw:style-name="gr269" draw:text-style-name="P267" draw:layer="layout" svg:width="0.027cm" svg:height="0.026cm" svg:x="5.909cm" svg:y="17.014cm" svg:viewBox="0 0 28 27" draw:points="0,0 28,0 28,27 0,27">
          <text:p/>
        </draw:polygon>
        <draw:polygon draw:style-name="gr269" draw:text-style-name="P267" draw:layer="layout" svg:width="0.027cm" svg:height="0.026cm" svg:x="5.962cm" svg:y="17.014cm" svg:viewBox="0 0 28 27" draw:points="0,0 28,0 28,27 0,27">
          <text:p/>
        </draw:polygon>
        <draw:polygon draw:style-name="gr269" draw:text-style-name="P267" draw:layer="layout" svg:width="0.027cm" svg:height="0.026cm" svg:x="6.015cm" svg:y="17.014cm" svg:viewBox="0 0 28 27" draw:points="0,0 28,0 28,27 0,27">
          <text:p/>
        </draw:polygon>
        <draw:polygon draw:style-name="gr269" draw:text-style-name="P267" draw:layer="layout" svg:width="0.027cm" svg:height="0.026cm" svg:x="6.068cm" svg:y="17.014cm" svg:viewBox="0 0 28 27" draw:points="0,0 28,0 28,27 0,27">
          <text:p/>
        </draw:polygon>
        <draw:polygon draw:style-name="gr269" draw:text-style-name="P267" draw:layer="layout" svg:width="0.027cm" svg:height="0.026cm" svg:x="6.121cm" svg:y="17.014cm" svg:viewBox="0 0 28 27" draw:points="0,0 28,0 28,27 0,27">
          <text:p/>
        </draw:polygon>
        <draw:polygon draw:style-name="gr269" draw:text-style-name="P267" draw:layer="layout" svg:width="0.028cm" svg:height="0.026cm" svg:x="6.174cm" svg:y="17.014cm" svg:viewBox="0 0 29 27" draw:points="0,0 29,0 29,27 0,27">
          <text:p/>
        </draw:polygon>
        <draw:polygon draw:style-name="gr269" draw:text-style-name="P267" draw:layer="layout" svg:width="0.027cm" svg:height="0.026cm" svg:x="6.227cm" svg:y="17.014cm" svg:viewBox="0 0 28 27" draw:points="0,0 28,0 28,27 0,27">
          <text:p/>
        </draw:polygon>
        <draw:polygon draw:style-name="gr269" draw:text-style-name="P267" draw:layer="layout" svg:width="0.027cm" svg:height="0.026cm" svg:x="6.28cm" svg:y="17.014cm" svg:viewBox="0 0 28 27" draw:points="0,0 28,0 28,27 0,27">
          <text:p/>
        </draw:polygon>
        <draw:polygon draw:style-name="gr269" draw:text-style-name="P267" draw:layer="layout" svg:width="0.027cm" svg:height="0.026cm" svg:x="6.333cm" svg:y="17.014cm" svg:viewBox="0 0 28 27" draw:points="0,0 28,0 28,27 0,27">
          <text:p/>
        </draw:polygon>
        <draw:polygon draw:style-name="gr269" draw:text-style-name="P267" draw:layer="layout" svg:width="0.026cm" svg:height="0.026cm" svg:x="6.387cm" svg:y="17.014cm" svg:viewBox="0 0 27 27" draw:points="0,0 27,0 27,27 0,27">
          <text:p/>
        </draw:polygon>
        <draw:polygon draw:style-name="gr269" draw:text-style-name="P267" draw:layer="layout" svg:width="0.026cm" svg:height="0.026cm" svg:x="6.44cm" svg:y="17.014cm" svg:viewBox="0 0 27 27" draw:points="0,0 27,0 27,27 0,27">
          <text:p/>
        </draw:polygon>
        <draw:polygon draw:style-name="gr269" draw:text-style-name="P267" draw:layer="layout" svg:width="0.026cm" svg:height="0.026cm" svg:x="6.493cm" svg:y="17.014cm" svg:viewBox="0 0 27 27" draw:points="0,0 27,0 27,27 0,27">
          <text:p/>
        </draw:polygon>
        <draw:polygon draw:style-name="gr269" draw:text-style-name="P267" draw:layer="layout" svg:width="0.026cm" svg:height="0.026cm" svg:x="6.546cm" svg:y="17.014cm" svg:viewBox="0 0 27 27" draw:points="0,0 27,0 27,27 0,27">
          <text:p/>
        </draw:polygon>
        <draw:polygon draw:style-name="gr269" draw:text-style-name="P267" draw:layer="layout" svg:width="0.026cm" svg:height="0.026cm" svg:x="6.599cm" svg:y="17.014cm" svg:viewBox="0 0 27 27" draw:points="0,0 27,0 27,27 0,27">
          <text:p/>
        </draw:polygon>
        <draw:polygon draw:style-name="gr269" draw:text-style-name="P267" draw:layer="layout" svg:width="0.026cm" svg:height="0.026cm" svg:x="6.652cm" svg:y="17.014cm" svg:viewBox="0 0 27 27" draw:points="0,0 27,0 27,27 0,27">
          <text:p/>
        </draw:polygon>
        <draw:polygon draw:style-name="gr269" draw:text-style-name="P267" draw:layer="layout" svg:width="0.026cm" svg:height="0.026cm" svg:x="6.705cm" svg:y="17.014cm" svg:viewBox="0 0 27 27" draw:points="0,0 27,0 27,27 0,27">
          <text:p/>
        </draw:polygon>
        <draw:polygon draw:style-name="gr269" draw:text-style-name="P267" draw:layer="layout" svg:width="0.026cm" svg:height="0.026cm" svg:x="6.758cm" svg:y="17.014cm" svg:viewBox="0 0 27 27" draw:points="0,0 27,0 27,27 0,27">
          <text:p/>
        </draw:polygon>
        <draw:polygon draw:style-name="gr269" draw:text-style-name="P267" draw:layer="layout" svg:width="0.026cm" svg:height="0.026cm" svg:x="6.811cm" svg:y="17.014cm" svg:viewBox="0 0 27 27" draw:points="0,0 27,0 27,27 0,27">
          <text:p/>
        </draw:polygon>
        <draw:polygon draw:style-name="gr269" draw:text-style-name="P267" draw:layer="layout" svg:width="0.026cm" svg:height="0.026cm" svg:x="6.864cm" svg:y="17.014cm" svg:viewBox="0 0 27 27" draw:points="0,0 27,0 27,27 0,27">
          <text:p/>
        </draw:polygon>
        <draw:polygon draw:style-name="gr269" draw:text-style-name="P267" draw:layer="layout" svg:width="0.026cm" svg:height="0.026cm" svg:x="6.917cm" svg:y="17.014cm" svg:viewBox="0 0 27 27" draw:points="0,0 27,0 27,27 0,27">
          <text:p/>
        </draw:polygon>
        <draw:polygon draw:style-name="gr269" draw:text-style-name="P267" draw:layer="layout" svg:width="0.026cm" svg:height="0.026cm" svg:x="6.97cm" svg:y="17.014cm" svg:viewBox="0 0 27 27" draw:points="0,0 27,0 27,27 0,27">
          <text:p/>
        </draw:polygon>
        <draw:polygon draw:style-name="gr269" draw:text-style-name="P267" draw:layer="layout" svg:width="0.026cm" svg:height="0.026cm" svg:x="7.023cm" svg:y="17.014cm" svg:viewBox="0 0 27 27" draw:points="0,0 27,0 27,27 0,27">
          <text:p/>
        </draw:polygon>
        <draw:polygon draw:style-name="gr269" draw:text-style-name="P267" draw:layer="layout" svg:width="0.026cm" svg:height="0.026cm" svg:x="7.076cm" svg:y="17.014cm" svg:viewBox="0 0 27 27" draw:points="0,0 27,0 27,27 0,27">
          <text:p/>
        </draw:polygon>
        <draw:polygon draw:style-name="gr269" draw:text-style-name="P267" draw:layer="layout" svg:width="0.026cm" svg:height="0.026cm" svg:x="7.129cm" svg:y="17.014cm" svg:viewBox="0 0 27 27" draw:points="0,0 27,0 27,27 0,27">
          <text:p/>
        </draw:polygon>
        <draw:polygon draw:style-name="gr269" draw:text-style-name="P267" draw:layer="layout" svg:width="0.026cm" svg:height="0.026cm" svg:x="7.182cm" svg:y="17.014cm" svg:viewBox="0 0 27 27" draw:points="0,0 27,0 27,27 0,27">
          <text:p/>
        </draw:polygon>
        <draw:polygon draw:style-name="gr269" draw:text-style-name="P267" draw:layer="layout" svg:width="0.026cm" svg:height="0.026cm" svg:x="7.235cm" svg:y="17.014cm" svg:viewBox="0 0 27 27" draw:points="0,0 27,0 27,27 0,27">
          <text:p/>
        </draw:polygon>
        <draw:polygon draw:style-name="gr269" draw:text-style-name="P267" draw:layer="layout" svg:width="0.026cm" svg:height="0.026cm" svg:x="7.288cm" svg:y="17.014cm" svg:viewBox="0 0 27 27" draw:points="0,0 27,0 27,27 0,27">
          <text:p/>
        </draw:polygon>
        <draw:polygon draw:style-name="gr269" draw:text-style-name="P267" draw:layer="layout" svg:width="0.026cm" svg:height="0.026cm" svg:x="7.341cm" svg:y="17.014cm" svg:viewBox="0 0 27 27" draw:points="0,0 27,0 27,27 0,27">
          <text:p/>
        </draw:polygon>
        <draw:polygon draw:style-name="gr269" draw:text-style-name="P267" draw:layer="layout" svg:width="0.026cm" svg:height="0.026cm" svg:x="7.394cm" svg:y="17.014cm" svg:viewBox="0 0 27 27" draw:points="0,0 27,0 27,27 0,27">
          <text:p/>
        </draw:polygon>
        <draw:polygon draw:style-name="gr269" draw:text-style-name="P267" draw:layer="layout" svg:width="0.026cm" svg:height="0.026cm" svg:x="7.447cm" svg:y="17.014cm" svg:viewBox="0 0 27 27" draw:points="0,0 27,0 27,27 0,27">
          <text:p/>
        </draw:polygon>
        <draw:polygon draw:style-name="gr269" draw:text-style-name="P267" draw:layer="layout" svg:width="0.026cm" svg:height="0.026cm" svg:x="7.5cm" svg:y="17.014cm" svg:viewBox="0 0 27 27" draw:points="0,0 27,0 27,27 0,27">
          <text:p/>
        </draw:polygon>
        <draw:polygon draw:style-name="gr269" draw:text-style-name="P267" draw:layer="layout" svg:width="0.026cm" svg:height="0.026cm" svg:x="7.553cm" svg:y="17.014cm" svg:viewBox="0 0 27 27" draw:points="0,0 27,0 27,27 0,27">
          <text:p/>
        </draw:polygon>
        <draw:polygon draw:style-name="gr269" draw:text-style-name="P267" draw:layer="layout" svg:width="0.026cm" svg:height="0.026cm" svg:x="7.606cm" svg:y="17.014cm" svg:viewBox="0 0 27 27" draw:points="0,0 27,0 27,27 0,27">
          <text:p/>
        </draw:polygon>
        <draw:polygon draw:style-name="gr269" draw:text-style-name="P267" draw:layer="layout" svg:width="0.026cm" svg:height="0.026cm" svg:x="7.659cm" svg:y="17.014cm" svg:viewBox="0 0 27 27" draw:points="0,0 27,0 27,27 0,27">
          <text:p/>
        </draw:polygon>
        <draw:polygon draw:style-name="gr269" draw:text-style-name="P267" draw:layer="layout" svg:width="0.026cm" svg:height="0.026cm" svg:x="7.712cm" svg:y="17.014cm" svg:viewBox="0 0 27 27" draw:points="0,0 27,0 27,27 0,27">
          <text:p/>
        </draw:polygon>
        <draw:polygon draw:style-name="gr269" draw:text-style-name="P267" draw:layer="layout" svg:width="0.026cm" svg:height="0.026cm" svg:x="7.765cm" svg:y="17.014cm" svg:viewBox="0 0 27 27" draw:points="0,0 27,0 27,27 0,27">
          <text:p/>
        </draw:polygon>
        <draw:polygon draw:style-name="gr269" draw:text-style-name="P267" draw:layer="layout" svg:width="0.026cm" svg:height="0.026cm" svg:x="7.818cm" svg:y="17.014cm" svg:viewBox="0 0 27 27" draw:points="0,0 27,0 27,27 0,27">
          <text:p/>
        </draw:polygon>
        <draw:polygon draw:style-name="gr269" draw:text-style-name="P267" draw:layer="layout" svg:width="0.026cm" svg:height="0.026cm" svg:x="7.871cm" svg:y="17.014cm" svg:viewBox="0 0 27 27" draw:points="0,0 27,0 27,27 0,27">
          <text:p/>
        </draw:polygon>
        <draw:polygon draw:style-name="gr269" draw:text-style-name="P267" draw:layer="layout" svg:width="0.026cm" svg:height="0.026cm" svg:x="7.924cm" svg:y="17.014cm" svg:viewBox="0 0 27 27" draw:points="0,0 27,0 27,27 0,27">
          <text:p/>
        </draw:polygon>
        <draw:polygon draw:style-name="gr269" draw:text-style-name="P267" draw:layer="layout" svg:width="0.026cm" svg:height="0.026cm" svg:x="7.977cm" svg:y="17.014cm" svg:viewBox="0 0 27 27" draw:points="0,0 27,0 27,27 0,27">
          <text:p/>
        </draw:polygon>
        <draw:polygon draw:style-name="gr269" draw:text-style-name="P267" draw:layer="layout" svg:width="0.026cm" svg:height="0.026cm" svg:x="8.03cm" svg:y="17.014cm" svg:viewBox="0 0 27 27" draw:points="0,0 27,0 27,27 0,27">
          <text:p/>
        </draw:polygon>
        <draw:polygon draw:style-name="gr269" draw:text-style-name="P267" draw:layer="layout" svg:width="0.026cm" svg:height="0.026cm" svg:x="8.083cm" svg:y="17.014cm" svg:viewBox="0 0 27 27" draw:points="0,0 27,0 27,27 0,27">
          <text:p/>
        </draw:polygon>
        <draw:polygon draw:style-name="gr269" draw:text-style-name="P267" draw:layer="layout" svg:width="0.026cm" svg:height="0.026cm" svg:x="8.136cm" svg:y="17.014cm" svg:viewBox="0 0 27 27" draw:points="0,0 27,0 27,27 0,27">
          <text:p/>
        </draw:polygon>
        <draw:polygon draw:style-name="gr269" draw:text-style-name="P267" draw:layer="layout" svg:width="0.026cm" svg:height="0.026cm" svg:x="8.189cm" svg:y="17.014cm" svg:viewBox="0 0 27 27" draw:points="0,0 27,0 27,27 0,27">
          <text:p/>
        </draw:polygon>
        <draw:polygon draw:style-name="gr269" draw:text-style-name="P267" draw:layer="layout" svg:width="0.026cm" svg:height="0.026cm" svg:x="8.242cm" svg:y="17.014cm" svg:viewBox="0 0 27 27" draw:points="0,0 27,0 27,27 0,27">
          <text:p/>
        </draw:polygon>
        <draw:polygon draw:style-name="gr269" draw:text-style-name="P267" draw:layer="layout" svg:width="0.026cm" svg:height="0.026cm" svg:x="8.295cm" svg:y="17.014cm" svg:viewBox="0 0 27 27" draw:points="0,0 27,0 27,27 0,27">
          <text:p/>
        </draw:polygon>
        <draw:polygon draw:style-name="gr269" draw:text-style-name="P267" draw:layer="layout" svg:width="0.026cm" svg:height="0.026cm" svg:x="8.348cm" svg:y="17.014cm" svg:viewBox="0 0 27 27" draw:points="0,0 27,0 27,27 0,27">
          <text:p/>
        </draw:polygon>
        <draw:polygon draw:style-name="gr269" draw:text-style-name="P267" draw:layer="layout" svg:width="0.026cm" svg:height="0.026cm" svg:x="8.401cm" svg:y="17.014cm" svg:viewBox="0 0 27 27" draw:points="0,0 27,0 27,27 0,27">
          <text:p/>
        </draw:polygon>
        <draw:polygon draw:style-name="gr269" draw:text-style-name="P267" draw:layer="layout" svg:width="0.026cm" svg:height="0.026cm" svg:x="8.454cm" svg:y="17.014cm" svg:viewBox="0 0 27 27" draw:points="0,0 27,0 27,27 0,27">
          <text:p/>
        </draw:polygon>
        <draw:polygon draw:style-name="gr269" draw:text-style-name="P267" draw:layer="layout" svg:width="0.026cm" svg:height="0.026cm" svg:x="8.507cm" svg:y="17.014cm" svg:viewBox="0 0 27 27" draw:points="0,0 27,0 27,27 0,27">
          <text:p/>
        </draw:polygon>
        <draw:polygon draw:style-name="gr269" draw:text-style-name="P267" draw:layer="layout" svg:width="0.026cm" svg:height="0.026cm" svg:x="8.56cm" svg:y="17.014cm" svg:viewBox="0 0 27 27" draw:points="0,0 27,0 27,27 0,27">
          <text:p/>
        </draw:polygon>
        <draw:polygon draw:style-name="gr269" draw:text-style-name="P267" draw:layer="layout" svg:width="0.026cm" svg:height="0.026cm" svg:x="8.613cm" svg:y="17.014cm" svg:viewBox="0 0 27 27" draw:points="0,0 27,0 27,27 0,27">
          <text:p/>
        </draw:polygon>
        <draw:polygon draw:style-name="gr269" draw:text-style-name="P267" draw:layer="layout" svg:width="0.026cm" svg:height="0.026cm" svg:x="8.666cm" svg:y="17.014cm" svg:viewBox="0 0 27 27" draw:points="0,0 27,0 27,27 0,27">
          <text:p/>
        </draw:polygon>
        <draw:polygon draw:style-name="gr269" draw:text-style-name="P267" draw:layer="layout" svg:width="0.026cm" svg:height="0.026cm" svg:x="8.719cm" svg:y="17.014cm" svg:viewBox="0 0 27 27" draw:points="0,0 27,0 27,27 0,27">
          <text:p/>
        </draw:polygon>
        <draw:polygon draw:style-name="gr269" draw:text-style-name="P267" draw:layer="layout" svg:width="0.026cm" svg:height="0.026cm" svg:x="8.772cm" svg:y="17.014cm" svg:viewBox="0 0 27 27" draw:points="0,0 27,0 27,27 0,27">
          <text:p/>
        </draw:polygon>
        <draw:polygon draw:style-name="gr269" draw:text-style-name="P267" draw:layer="layout" svg:width="0.026cm" svg:height="0.026cm" svg:x="8.825cm" svg:y="17.014cm" svg:viewBox="0 0 27 27" draw:points="0,0 27,0 27,27 0,27">
          <text:p/>
        </draw:polygon>
        <draw:polygon draw:style-name="gr269" draw:text-style-name="P267" draw:layer="layout" svg:width="0.026cm" svg:height="0.026cm" svg:x="8.878cm" svg:y="17.014cm" svg:viewBox="0 0 27 27" draw:points="0,0 27,0 27,27 0,27">
          <text:p/>
        </draw:polygon>
        <draw:polygon draw:style-name="gr269" draw:text-style-name="P267" draw:layer="layout" svg:width="0.026cm" svg:height="0.026cm" svg:x="8.931cm" svg:y="17.014cm" svg:viewBox="0 0 27 27" draw:points="0,0 27,0 27,27 0,27">
          <text:p/>
        </draw:polygon>
        <draw:polygon draw:style-name="gr269" draw:text-style-name="P267" draw:layer="layout" svg:width="0.026cm" svg:height="0.026cm" svg:x="8.984cm" svg:y="17.014cm" svg:viewBox="0 0 27 27" draw:points="0,0 27,0 27,27 0,27">
          <text:p/>
        </draw:polygon>
        <draw:polygon draw:style-name="gr269" draw:text-style-name="P267" draw:layer="layout" svg:width="0.026cm" svg:height="0.026cm" svg:x="9.037cm" svg:y="17.014cm" svg:viewBox="0 0 27 27" draw:points="0,0 27,0 27,27 0,27">
          <text:p/>
        </draw:polygon>
        <draw:polygon draw:style-name="gr269" draw:text-style-name="P267" draw:layer="layout" svg:width="0.026cm" svg:height="0.026cm" svg:x="9.09cm" svg:y="17.014cm" svg:viewBox="0 0 27 27" draw:points="0,0 27,0 27,27 0,27">
          <text:p/>
        </draw:polygon>
        <draw:polygon draw:style-name="gr269" draw:text-style-name="P267" draw:layer="layout" svg:width="0.026cm" svg:height="0.026cm" svg:x="9.143cm" svg:y="17.014cm" svg:viewBox="0 0 27 27" draw:points="0,0 27,0 27,27 0,27">
          <text:p/>
        </draw:polygon>
        <draw:polygon draw:style-name="gr269" draw:text-style-name="P267" draw:layer="layout" svg:width="0.026cm" svg:height="0.026cm" svg:x="9.196cm" svg:y="17.014cm" svg:viewBox="0 0 27 27" draw:points="0,0 27,0 27,27 0,27">
          <text:p/>
        </draw:polygon>
        <draw:polygon draw:style-name="gr269" draw:text-style-name="P267" draw:layer="layout" svg:width="0.026cm" svg:height="0.026cm" svg:x="9.249cm" svg:y="17.014cm" svg:viewBox="0 0 27 27" draw:points="0,0 27,0 27,27 0,27">
          <text:p/>
        </draw:polygon>
        <draw:polygon draw:style-name="gr269" draw:text-style-name="P267" draw:layer="layout" svg:width="0.026cm" svg:height="0.026cm" svg:x="9.302cm" svg:y="17.014cm" svg:viewBox="0 0 27 27" draw:points="0,0 27,0 27,27 0,27">
          <text:p/>
        </draw:polygon>
        <draw:polygon draw:style-name="gr269" draw:text-style-name="P267" draw:layer="layout" svg:width="0.026cm" svg:height="0.026cm" svg:x="9.355cm" svg:y="17.014cm" svg:viewBox="0 0 27 27" draw:points="0,0 27,0 27,27 0,27">
          <text:p/>
        </draw:polygon>
        <draw:polygon draw:style-name="gr269" draw:text-style-name="P267" draw:layer="layout" svg:width="0.026cm" svg:height="0.026cm" svg:x="9.408cm" svg:y="17.014cm" svg:viewBox="0 0 27 27" draw:points="0,0 27,0 27,27 0,27">
          <text:p/>
        </draw:polygon>
        <draw:polygon draw:style-name="gr269" draw:text-style-name="P267" draw:layer="layout" svg:width="0.026cm" svg:height="0.026cm" svg:x="9.461cm" svg:y="17.014cm" svg:viewBox="0 0 27 27" draw:points="0,0 27,0 27,27 0,27">
          <text:p/>
        </draw:polygon>
        <draw:polygon draw:style-name="gr269" draw:text-style-name="P267" draw:layer="layout" svg:width="0.026cm" svg:height="0.026cm" svg:x="9.514cm" svg:y="17.014cm" svg:viewBox="0 0 27 27" draw:points="0,0 27,0 27,27 0,27">
          <text:p/>
        </draw:polygon>
        <draw:polygon draw:style-name="gr269" draw:text-style-name="P267" draw:layer="layout" svg:width="0.026cm" svg:height="0.026cm" svg:x="9.567cm" svg:y="17.014cm" svg:viewBox="0 0 27 27" draw:points="0,0 27,0 27,27 0,27">
          <text:p/>
        </draw:polygon>
        <draw:polygon draw:style-name="gr269" draw:text-style-name="P267" draw:layer="layout" svg:width="0.026cm" svg:height="0.026cm" svg:x="9.62cm" svg:y="17.014cm" svg:viewBox="0 0 27 27" draw:points="0,0 27,0 27,27 0,27">
          <text:p/>
        </draw:polygon>
        <draw:polygon draw:style-name="gr269" draw:text-style-name="P267" draw:layer="layout" svg:width="0.026cm" svg:height="0.026cm" svg:x="9.673cm" svg:y="17.014cm" svg:viewBox="0 0 27 27" draw:points="0,0 27,0 27,27 0,27">
          <text:p/>
        </draw:polygon>
        <draw:polygon draw:style-name="gr269" draw:text-style-name="P267" draw:layer="layout" svg:width="0.026cm" svg:height="0.026cm" svg:x="9.726cm" svg:y="17.014cm" svg:viewBox="0 0 27 27" draw:points="0,0 27,0 27,27 0,27">
          <text:p/>
        </draw:polygon>
        <draw:polygon draw:style-name="gr269" draw:text-style-name="P267" draw:layer="layout" svg:width="0.026cm" svg:height="0.026cm" svg:x="9.779cm" svg:y="17.014cm" svg:viewBox="0 0 27 27" draw:points="0,0 27,0 27,27 0,27">
          <text:p/>
        </draw:polygon>
        <draw:polygon draw:style-name="gr269" draw:text-style-name="P267" draw:layer="layout" svg:width="0.026cm" svg:height="0.026cm" svg:x="9.832cm" svg:y="17.014cm" svg:viewBox="0 0 27 27" draw:points="0,0 27,0 27,27 0,27">
          <text:p/>
        </draw:polygon>
        <draw:polygon draw:style-name="gr269" draw:text-style-name="P267" draw:layer="layout" svg:width="0.026cm" svg:height="0.026cm" svg:x="9.885cm" svg:y="17.014cm" svg:viewBox="0 0 27 27" draw:points="0,0 27,0 27,27 0,27">
          <text:p/>
        </draw:polygon>
        <draw:polygon draw:style-name="gr269" draw:text-style-name="P267" draw:layer="layout" svg:width="0.026cm" svg:height="0.026cm" svg:x="9.938cm" svg:y="17.014cm" svg:viewBox="0 0 27 27" draw:points="0,0 27,0 27,27 0,27">
          <text:p/>
        </draw:polygon>
        <draw:polygon draw:style-name="gr269" draw:text-style-name="P267" draw:layer="layout" svg:width="0.026cm" svg:height="0.026cm" svg:x="9.991cm" svg:y="17.014cm" svg:viewBox="0 0 27 27" draw:points="0,0 27,0 27,27 0,27">
          <text:p/>
        </draw:polygon>
        <draw:polygon draw:style-name="gr269" draw:text-style-name="P267" draw:layer="layout" svg:width="0.026cm" svg:height="0.026cm" svg:x="10.044cm" svg:y="17.014cm" svg:viewBox="0 0 27 27" draw:points="0,0 27,0 27,27 0,27">
          <text:p/>
        </draw:polygon>
        <draw:polygon draw:style-name="gr269" draw:text-style-name="P267" draw:layer="layout" svg:width="0.026cm" svg:height="0.026cm" svg:x="10.097cm" svg:y="17.014cm" svg:viewBox="0 0 27 27" draw:points="0,0 27,0 27,27 0,27">
          <text:p/>
        </draw:polygon>
        <draw:polygon draw:style-name="gr269" draw:text-style-name="P267" draw:layer="layout" svg:width="0.026cm" svg:height="0.026cm" svg:x="10.15cm" svg:y="17.014cm" svg:viewBox="0 0 27 27" draw:points="0,0 27,0 27,27 0,27">
          <text:p/>
        </draw:polygon>
        <draw:polygon draw:style-name="gr269" draw:text-style-name="P267" draw:layer="layout" svg:width="0.026cm" svg:height="0.026cm" svg:x="10.203cm" svg:y="17.014cm" svg:viewBox="0 0 27 27" draw:points="0,0 27,0 27,27 0,27">
          <text:p/>
        </draw:polygon>
        <draw:polygon draw:style-name="gr269" draw:text-style-name="P267" draw:layer="layout" svg:width="0.026cm" svg:height="0.026cm" svg:x="10.256cm" svg:y="17.014cm" svg:viewBox="0 0 27 27" draw:points="0,0 27,0 27,27 0,27">
          <text:p/>
        </draw:polygon>
        <draw:polygon draw:style-name="gr269" draw:text-style-name="P267" draw:layer="layout" svg:width="0.026cm" svg:height="0.026cm" svg:x="10.309cm" svg:y="17.014cm" svg:viewBox="0 0 27 27" draw:points="0,0 27,0 27,27 0,27">
          <text:p/>
        </draw:polygon>
        <draw:polygon draw:style-name="gr269" draw:text-style-name="P267" draw:layer="layout" svg:width="0.026cm" svg:height="0.026cm" svg:x="10.362cm" svg:y="17.014cm" svg:viewBox="0 0 27 27" draw:points="0,0 27,0 27,27 0,27">
          <text:p/>
        </draw:polygon>
        <draw:polygon draw:style-name="gr269" draw:text-style-name="P267" draw:layer="layout" svg:width="0.026cm" svg:height="0.026cm" svg:x="10.415cm" svg:y="17.014cm" svg:viewBox="0 0 27 27" draw:points="0,0 27,0 27,27 0,27">
          <text:p/>
        </draw:polygon>
        <draw:polygon draw:style-name="gr269" draw:text-style-name="P267" draw:layer="layout" svg:width="0.026cm" svg:height="0.026cm" svg:x="10.468cm" svg:y="17.014cm" svg:viewBox="0 0 27 27" draw:points="0,0 27,0 27,27 0,27">
          <text:p/>
        </draw:polygon>
        <draw:polygon draw:style-name="gr269" draw:text-style-name="P267" draw:layer="layout" svg:width="0.026cm" svg:height="0.026cm" svg:x="10.521cm" svg:y="17.014cm" svg:viewBox="0 0 27 27" draw:points="0,0 27,0 27,27 0,27">
          <text:p/>
        </draw:polygon>
        <draw:polygon draw:style-name="gr269" draw:text-style-name="P267" draw:layer="layout" svg:width="0.026cm" svg:height="0.026cm" svg:x="10.574cm" svg:y="17.014cm" svg:viewBox="0 0 27 27" draw:points="0,0 27,0 27,27 0,27">
          <text:p/>
        </draw:polygon>
        <draw:polygon draw:style-name="gr269" draw:text-style-name="P267" draw:layer="layout" svg:width="0.026cm" svg:height="0.026cm" svg:x="10.627cm" svg:y="17.014cm" svg:viewBox="0 0 27 27" draw:points="0,0 27,0 27,27 0,27">
          <text:p/>
        </draw:polygon>
        <draw:polygon draw:style-name="gr269" draw:text-style-name="P267" draw:layer="layout" svg:width="0.026cm" svg:height="0.026cm" svg:x="10.68cm" svg:y="17.014cm" svg:viewBox="0 0 27 27" draw:points="0,0 27,0 27,27 0,27">
          <text:p/>
        </draw:polygon>
        <draw:polygon draw:style-name="gr269" draw:text-style-name="P267" draw:layer="layout" svg:width="0.026cm" svg:height="0.026cm" svg:x="10.733cm" svg:y="17.014cm" svg:viewBox="0 0 27 27" draw:points="0,0 27,0 27,27 0,27">
          <text:p/>
        </draw:polygon>
        <draw:polygon draw:style-name="gr269" draw:text-style-name="P267" draw:layer="layout" svg:width="0.026cm" svg:height="0.026cm" svg:x="10.786cm" svg:y="17.014cm" svg:viewBox="0 0 27 27" draw:points="0,0 27,0 27,27 0,27">
          <text:p/>
        </draw:polygon>
        <draw:polygon draw:style-name="gr269" draw:text-style-name="P267" draw:layer="layout" svg:width="0.026cm" svg:height="0.026cm" svg:x="10.839cm" svg:y="17.014cm" svg:viewBox="0 0 27 27" draw:points="0,0 27,0 27,27 0,27">
          <text:p/>
        </draw:polygon>
        <draw:polygon draw:style-name="gr269" draw:text-style-name="P267" draw:layer="layout" svg:width="0.026cm" svg:height="0.026cm" svg:x="10.892cm" svg:y="17.014cm" svg:viewBox="0 0 27 27" draw:points="0,0 27,0 27,27 0,27">
          <text:p/>
        </draw:polygon>
        <draw:polygon draw:style-name="gr269" draw:text-style-name="P267" draw:layer="layout" svg:width="0.026cm" svg:height="0.026cm" svg:x="10.945cm" svg:y="17.014cm" svg:viewBox="0 0 27 27" draw:points="0,0 27,0 27,27 0,27">
          <text:p/>
        </draw:polygon>
        <draw:polygon draw:style-name="gr269" draw:text-style-name="P267" draw:layer="layout" svg:width="0.026cm" svg:height="0.026cm" svg:x="10.998cm" svg:y="17.014cm" svg:viewBox="0 0 27 27" draw:points="0,0 27,0 27,27 0,27">
          <text:p/>
        </draw:polygon>
        <draw:polygon draw:style-name="gr269" draw:text-style-name="P267" draw:layer="layout" svg:width="0.026cm" svg:height="0.026cm" svg:x="11.051cm" svg:y="17.014cm" svg:viewBox="0 0 27 27" draw:points="0,0 27,0 27,27 0,27">
          <text:p/>
        </draw:polygon>
        <draw:polygon draw:style-name="gr269" draw:text-style-name="P267" draw:layer="layout" svg:width="0.026cm" svg:height="0.026cm" svg:x="11.104cm" svg:y="17.014cm" svg:viewBox="0 0 27 27" draw:points="0,0 27,0 27,27 0,27">
          <text:p/>
        </draw:polygon>
        <draw:polygon draw:style-name="gr269" draw:text-style-name="P267" draw:layer="layout" svg:width="0.026cm" svg:height="0.026cm" svg:x="11.157cm" svg:y="17.014cm" svg:viewBox="0 0 27 27" draw:points="0,0 27,0 27,27 0,27">
          <text:p/>
        </draw:polygon>
        <draw:polygon draw:style-name="gr269" draw:text-style-name="P267" draw:layer="layout" svg:width="0.026cm" svg:height="0.026cm" svg:x="11.21cm" svg:y="17.014cm" svg:viewBox="0 0 27 27" draw:points="0,0 27,0 27,27 0,27">
          <text:p/>
        </draw:polygon>
        <draw:polygon draw:style-name="gr269" draw:text-style-name="P267" draw:layer="layout" svg:width="0.026cm" svg:height="0.026cm" svg:x="11.263cm" svg:y="17.014cm" svg:viewBox="0 0 27 27" draw:points="0,0 27,0 27,27 0,27">
          <text:p/>
        </draw:polygon>
        <draw:polygon draw:style-name="gr269" draw:text-style-name="P267" draw:layer="layout" svg:width="0.026cm" svg:height="0.026cm" svg:x="11.316cm" svg:y="17.014cm" svg:viewBox="0 0 27 27" draw:points="0,0 27,0 27,27 0,27">
          <text:p/>
        </draw:polygon>
        <draw:polygon draw:style-name="gr269" draw:text-style-name="P267" draw:layer="layout" svg:width="0.026cm" svg:height="0.026cm" svg:x="11.369cm" svg:y="17.014cm" svg:viewBox="0 0 27 27" draw:points="0,0 27,0 27,27 0,27">
          <text:p/>
        </draw:polygon>
        <draw:polygon draw:style-name="gr269" draw:text-style-name="P267" draw:layer="layout" svg:width="0.026cm" svg:height="0.026cm" svg:x="11.422cm" svg:y="17.014cm" svg:viewBox="0 0 27 27" draw:points="0,0 27,0 27,27 0,27">
          <text:p/>
        </draw:polygon>
        <draw:polygon draw:style-name="gr269" draw:text-style-name="P267" draw:layer="layout" svg:width="0.026cm" svg:height="0.026cm" svg:x="11.475cm" svg:y="17.014cm" svg:viewBox="0 0 27 27" draw:points="0,0 27,0 27,27 0,27">
          <text:p/>
        </draw:polygon>
        <draw:polygon draw:style-name="gr269" draw:text-style-name="P267" draw:layer="layout" svg:width="0.026cm" svg:height="0.026cm" svg:x="11.528cm" svg:y="17.014cm" svg:viewBox="0 0 27 27" draw:points="0,0 27,0 27,27 0,27">
          <text:p/>
        </draw:polygon>
        <draw:polygon draw:style-name="gr269" draw:text-style-name="P267" draw:layer="layout" svg:width="0.026cm" svg:height="0.026cm" svg:x="11.581cm" svg:y="17.014cm" svg:viewBox="0 0 27 27" draw:points="0,0 27,0 27,27 0,27">
          <text:p/>
        </draw:polygon>
        <draw:polygon draw:style-name="gr269" draw:text-style-name="P267" draw:layer="layout" svg:width="0.026cm" svg:height="0.026cm" svg:x="11.634cm" svg:y="17.014cm" svg:viewBox="0 0 27 27" draw:points="0,0 27,0 27,27 0,27">
          <text:p/>
        </draw:polygon>
        <draw:polygon draw:style-name="gr269" draw:text-style-name="P267" draw:layer="layout" svg:width="0.026cm" svg:height="0.026cm" svg:x="11.687cm" svg:y="17.014cm" svg:viewBox="0 0 27 27" draw:points="0,0 27,0 27,27 0,27">
          <text:p/>
        </draw:polygon>
        <draw:polygon draw:style-name="gr269" draw:text-style-name="P267" draw:layer="layout" svg:width="0.026cm" svg:height="0.026cm" svg:x="11.74cm" svg:y="17.014cm" svg:viewBox="0 0 27 27" draw:points="0,0 27,0 27,27 0,27">
          <text:p/>
        </draw:polygon>
        <draw:polygon draw:style-name="gr269" draw:text-style-name="P267" draw:layer="layout" svg:width="0.026cm" svg:height="0.026cm" svg:x="11.793cm" svg:y="17.014cm" svg:viewBox="0 0 27 27" draw:points="0,0 27,0 27,27 0,27">
          <text:p/>
        </draw:polygon>
        <draw:polygon draw:style-name="gr269" draw:text-style-name="P267" draw:layer="layout" svg:width="0.026cm" svg:height="0.026cm" svg:x="11.846cm" svg:y="17.014cm" svg:viewBox="0 0 27 27" draw:points="0,0 27,0 27,27 0,27">
          <text:p/>
        </draw:polygon>
        <draw:polygon draw:style-name="gr269" draw:text-style-name="P267" draw:layer="layout" svg:width="0.026cm" svg:height="0.026cm" svg:x="11.899cm" svg:y="17.014cm" svg:viewBox="0 0 27 27" draw:points="0,0 27,0 27,27 0,27">
          <text:p/>
        </draw:polygon>
        <draw:polygon draw:style-name="gr269" draw:text-style-name="P267" draw:layer="layout" svg:width="0.026cm" svg:height="0.026cm" svg:x="11.952cm" svg:y="17.014cm" svg:viewBox="0 0 27 27" draw:points="0,0 27,0 27,27 0,27">
          <text:p/>
        </draw:polygon>
        <draw:polygon draw:style-name="gr269" draw:text-style-name="P267" draw:layer="layout" svg:width="0.026cm" svg:height="0.026cm" svg:x="12.005cm" svg:y="17.014cm" svg:viewBox="0 0 27 27" draw:points="0,0 27,0 27,27 0,27">
          <text:p/>
        </draw:polygon>
        <draw:polygon draw:style-name="gr269" draw:text-style-name="P267" draw:layer="layout" svg:width="0.026cm" svg:height="0.026cm" svg:x="12.058cm" svg:y="17.014cm" svg:viewBox="0 0 27 27" draw:points="0,0 27,0 27,27 0,27">
          <text:p/>
        </draw:polygon>
        <draw:polygon draw:style-name="gr269" draw:text-style-name="P267" draw:layer="layout" svg:width="0.026cm" svg:height="0.026cm" svg:x="12.111cm" svg:y="17.014cm" svg:viewBox="0 0 27 27" draw:points="0,0 27,0 27,27 0,27">
          <text:p/>
        </draw:polygon>
        <draw:polygon draw:style-name="gr269" draw:text-style-name="P267" draw:layer="layout" svg:width="0.026cm" svg:height="0.026cm" svg:x="12.164cm" svg:y="17.014cm" svg:viewBox="0 0 27 27" draw:points="0,0 27,0 27,27 0,27">
          <text:p/>
        </draw:polygon>
        <draw:polygon draw:style-name="gr269" draw:text-style-name="P267" draw:layer="layout" svg:width="0.026cm" svg:height="0.026cm" svg:x="12.217cm" svg:y="17.014cm" svg:viewBox="0 0 27 27" draw:points="0,0 27,0 27,27 0,27">
          <text:p/>
        </draw:polygon>
        <draw:polygon draw:style-name="gr269" draw:text-style-name="P267" draw:layer="layout" svg:width="0.026cm" svg:height="0.026cm" svg:x="12.27cm" svg:y="17.014cm" svg:viewBox="0 0 27 27" draw:points="0,0 27,0 27,27 0,27">
          <text:p/>
        </draw:polygon>
        <draw:polygon draw:style-name="gr269" draw:text-style-name="P267" draw:layer="layout" svg:width="0.026cm" svg:height="0.026cm" svg:x="12.323cm" svg:y="17.014cm" svg:viewBox="0 0 27 27" draw:points="0,0 27,0 27,27 0,27">
          <text:p/>
        </draw:polygon>
        <draw:polygon draw:style-name="gr269" draw:text-style-name="P267" draw:layer="layout" svg:width="0.026cm" svg:height="0.026cm" svg:x="12.376cm" svg:y="17.014cm" svg:viewBox="0 0 27 27" draw:points="0,0 27,0 27,27 0,27">
          <text:p/>
        </draw:polygon>
        <draw:polygon draw:style-name="gr269" draw:text-style-name="P267" draw:layer="layout" svg:width="0.026cm" svg:height="0.026cm" svg:x="12.429cm" svg:y="17.014cm" svg:viewBox="0 0 27 27" draw:points="0,0 27,0 27,27 0,27">
          <text:p/>
        </draw:polygon>
        <draw:polygon draw:style-name="gr269" draw:text-style-name="P267" draw:layer="layout" svg:width="0.026cm" svg:height="0.026cm" svg:x="12.482cm" svg:y="17.014cm" svg:viewBox="0 0 27 27" draw:points="0,0 27,0 27,27 0,27">
          <text:p/>
        </draw:polygon>
        <draw:polygon draw:style-name="gr269" draw:text-style-name="P267" draw:layer="layout" svg:width="0.026cm" svg:height="0.026cm" svg:x="12.535cm" svg:y="17.014cm" svg:viewBox="0 0 27 27" draw:points="0,0 27,0 27,27 0,27">
          <text:p/>
        </draw:polygon>
        <draw:polygon draw:style-name="gr269" draw:text-style-name="P267" draw:layer="layout" svg:width="0.026cm" svg:height="0.026cm" svg:x="12.588cm" svg:y="17.014cm" svg:viewBox="0 0 27 27" draw:points="0,0 27,0 27,27 0,27">
          <text:p/>
        </draw:polygon>
        <draw:polygon draw:style-name="gr269" draw:text-style-name="P267" draw:layer="layout" svg:width="0.026cm" svg:height="0.026cm" svg:x="12.641cm" svg:y="17.014cm" svg:viewBox="0 0 27 27" draw:points="0,0 27,0 27,27 0,27">
          <text:p/>
        </draw:polygon>
        <draw:polygon draw:style-name="gr269" draw:text-style-name="P267" draw:layer="layout" svg:width="0.027cm" svg:height="0.026cm" svg:x="12.694cm" svg:y="17.014cm" svg:viewBox="0 0 28 27" draw:points="0,0 28,0 28,27 0,27">
          <text:p/>
        </draw:polygon>
        <draw:polygon draw:style-name="gr269" draw:text-style-name="P267" draw:layer="layout" svg:width="0.027cm" svg:height="0.026cm" svg:x="12.747cm" svg:y="17.014cm" svg:viewBox="0 0 28 27" draw:points="0,0 28,0 28,27 0,27">
          <text:p/>
        </draw:polygon>
        <draw:polygon draw:style-name="gr269" draw:text-style-name="P267" draw:layer="layout" svg:width="0.027cm" svg:height="0.026cm" svg:x="12.8cm" svg:y="17.014cm" svg:viewBox="0 0 28 27" draw:points="0,0 28,0 28,27 0,27">
          <text:p/>
        </draw:polygon>
        <draw:polygon draw:style-name="gr269" draw:text-style-name="P267" draw:layer="layout" svg:width="0.027cm" svg:height="0.026cm" svg:x="12.853cm" svg:y="17.014cm" svg:viewBox="0 0 28 27" draw:points="0,0 28,0 28,27 0,27">
          <text:p/>
        </draw:polygon>
        <draw:polygon draw:style-name="gr269" draw:text-style-name="P267" draw:layer="layout" svg:width="0.027cm" svg:height="0.026cm" svg:x="12.906cm" svg:y="17.014cm" svg:viewBox="0 0 28 27" draw:points="0,0 28,0 28,27 0,27">
          <text:p/>
        </draw:polygon>
        <draw:polygon draw:style-name="gr269" draw:text-style-name="P267" draw:layer="layout" svg:width="0.027cm" svg:height="0.026cm" svg:x="12.959cm" svg:y="17.014cm" svg:viewBox="0 0 28 27" draw:points="0,0 28,0 28,27 0,27">
          <text:p/>
        </draw:polygon>
        <draw:polygon draw:style-name="gr269" draw:text-style-name="P267" draw:layer="layout" svg:width="0.028cm" svg:height="0.026cm" svg:x="13.012cm" svg:y="17.014cm" svg:viewBox="0 0 29 27" draw:points="0,0 29,0 29,27 0,27">
          <text:p/>
        </draw:polygon>
        <draw:polygon draw:style-name="gr269" draw:text-style-name="P267" draw:layer="layout" svg:width="0.027cm" svg:height="0.026cm" svg:x="13.065cm" svg:y="17.014cm" svg:viewBox="0 0 28 27" draw:points="0,0 28,0 28,27 0,27">
          <text:p/>
        </draw:polygon>
        <draw:polygon draw:style-name="gr269" draw:text-style-name="P267" draw:layer="layout" svg:width="0.027cm" svg:height="0.026cm" svg:x="13.118cm" svg:y="17.014cm" svg:viewBox="0 0 28 27" draw:points="0,0 28,0 28,27 0,27">
          <text:p/>
        </draw:polygon>
        <draw:polygon draw:style-name="gr269" draw:text-style-name="P267" draw:layer="layout" svg:width="0.027cm" svg:height="0.026cm" svg:x="13.171cm" svg:y="17.014cm" svg:viewBox="0 0 28 27" draw:points="0,0 28,0 28,27 0,27">
          <text:p/>
        </draw:polygon>
        <draw:polygon draw:style-name="gr269" draw:text-style-name="P267" draw:layer="layout" svg:width="0.027cm" svg:height="0.026cm" svg:x="13.224cm" svg:y="17.014cm" svg:viewBox="0 0 28 27" draw:points="0,0 28,0 28,27 0,27">
          <text:p/>
        </draw:polygon>
        <draw:polygon draw:style-name="gr269" draw:text-style-name="P267" draw:layer="layout" svg:width="0.027cm" svg:height="0.026cm" svg:x="13.277cm" svg:y="17.014cm" svg:viewBox="0 0 28 27" draw:points="0,0 28,0 28,27 0,27">
          <text:p/>
        </draw:polygon>
        <draw:polygon draw:style-name="gr269" draw:text-style-name="P267" draw:layer="layout" svg:width="0.027cm" svg:height="0.026cm" svg:x="13.33cm" svg:y="17.014cm" svg:viewBox="0 0 28 27" draw:points="0,0 28,0 28,27 0,27">
          <text:p/>
        </draw:polygon>
        <draw:polygon draw:style-name="gr269" draw:text-style-name="P267" draw:layer="layout" svg:width="0.027cm" svg:height="0.026cm" svg:x="13.383cm" svg:y="17.014cm" svg:viewBox="0 0 28 27" draw:points="0,0 28,0 28,27 0,27">
          <text:p/>
        </draw:polygon>
        <draw:polygon draw:style-name="gr269" draw:text-style-name="P267" draw:layer="layout" svg:width="0.027cm" svg:height="0.026cm" svg:x="13.436cm" svg:y="17.014cm" svg:viewBox="0 0 28 27" draw:points="0,0 28,0 28,27 0,27">
          <text:p/>
        </draw:polygon>
        <draw:polygon draw:style-name="gr269" draw:text-style-name="P267" draw:layer="layout" svg:width="0.027cm" svg:height="0.026cm" svg:x="13.489cm" svg:y="17.014cm" svg:viewBox="0 0 28 27" draw:points="0,0 28,0 28,27 0,27">
          <text:p/>
        </draw:polygon>
        <draw:polygon draw:style-name="gr269" draw:text-style-name="P267" draw:layer="layout" svg:width="0.027cm" svg:height="0.026cm" svg:x="13.542cm" svg:y="17.014cm" svg:viewBox="0 0 28 27" draw:points="0,0 28,0 28,27 0,27">
          <text:p/>
        </draw:polygon>
        <draw:polygon draw:style-name="gr269" draw:text-style-name="P267" draw:layer="layout" svg:width="0.027cm" svg:height="0.026cm" svg:x="13.595cm" svg:y="17.014cm" svg:viewBox="0 0 28 27" draw:points="0,0 28,0 28,27 0,27">
          <text:p/>
        </draw:polygon>
        <draw:polygon draw:style-name="gr269" draw:text-style-name="P267" draw:layer="layout" svg:width="0.027cm" svg:height="0.026cm" svg:x="13.648cm" svg:y="17.014cm" svg:viewBox="0 0 28 27" draw:points="0,0 28,0 28,27 0,27">
          <text:p/>
        </draw:polygon>
        <draw:polygon draw:style-name="gr269" draw:text-style-name="P267" draw:layer="layout" svg:width="0.027cm" svg:height="0.026cm" svg:x="13.701cm" svg:y="17.014cm" svg:viewBox="0 0 28 27" draw:points="0,0 28,0 28,27 0,27">
          <text:p/>
        </draw:polygon>
        <draw:polygon draw:style-name="gr269" draw:text-style-name="P267" draw:layer="layout" svg:width="0.027cm" svg:height="0.026cm" svg:x="13.754cm" svg:y="17.014cm" svg:viewBox="0 0 28 27" draw:points="0,0 28,0 28,27 0,27">
          <text:p/>
        </draw:polygon>
        <draw:polygon draw:style-name="gr269" draw:text-style-name="P267" draw:layer="layout" svg:width="0.027cm" svg:height="0.026cm" svg:x="13.807cm" svg:y="17.014cm" svg:viewBox="0 0 28 27" draw:points="0,0 28,0 28,27 0,27">
          <text:p/>
        </draw:polygon>
        <draw:polygon draw:style-name="gr269" draw:text-style-name="P267" draw:layer="layout" svg:width="0.027cm" svg:height="0.026cm" svg:x="13.86cm" svg:y="17.014cm" svg:viewBox="0 0 28 27" draw:points="0,0 28,0 28,27 0,27">
          <text:p/>
        </draw:polygon>
        <draw:polygon draw:style-name="gr269" draw:text-style-name="P267" draw:layer="layout" svg:width="0.027cm" svg:height="0.026cm" svg:x="13.913cm" svg:y="17.014cm" svg:viewBox="0 0 28 27" draw:points="0,0 28,0 28,27 0,27">
          <text:p/>
        </draw:polygon>
        <draw:polygon draw:style-name="gr269" draw:text-style-name="P267" draw:layer="layout" svg:width="0.027cm" svg:height="0.026cm" svg:x="13.966cm" svg:y="17.014cm" svg:viewBox="0 0 28 27" draw:points="0,0 28,0 28,27 0,27">
          <text:p/>
        </draw:polygon>
        <draw:polygon draw:style-name="gr269" draw:text-style-name="P267" draw:layer="layout" svg:width="0.027cm" svg:height="0.026cm" svg:x="14.019cm" svg:y="17.014cm" svg:viewBox="0 0 28 27" draw:points="0,0 28,0 28,27 0,27">
          <text:p/>
        </draw:polygon>
        <draw:polygon draw:style-name="gr269" draw:text-style-name="P267" draw:layer="layout" svg:width="0.027cm" svg:height="0.026cm" svg:x="14.072cm" svg:y="17.014cm" svg:viewBox="0 0 28 27" draw:points="0,0 28,0 28,27 0,27">
          <text:p/>
        </draw:polygon>
        <draw:polygon draw:style-name="gr269" draw:text-style-name="P267" draw:layer="layout" svg:width="0.027cm" svg:height="0.026cm" svg:x="14.125cm" svg:y="17.014cm" svg:viewBox="0 0 28 27" draw:points="0,0 28,0 28,27 0,27">
          <text:p/>
        </draw:polygon>
        <draw:polygon draw:style-name="gr269" draw:text-style-name="P267" draw:layer="layout" svg:width="0.027cm" svg:height="0.026cm" svg:x="14.178cm" svg:y="17.014cm" svg:viewBox="0 0 28 27" draw:points="0,0 28,0 28,27 0,27">
          <text:p/>
        </draw:polygon>
        <draw:polygon draw:style-name="gr269" draw:text-style-name="P267" draw:layer="layout" svg:width="0.027cm" svg:height="0.026cm" svg:x="14.231cm" svg:y="17.014cm" svg:viewBox="0 0 28 27" draw:points="0,0 28,0 28,27 0,27">
          <text:p/>
        </draw:polygon>
        <draw:polygon draw:style-name="gr269" draw:text-style-name="P267" draw:layer="layout" svg:width="0.027cm" svg:height="0.026cm" svg:x="14.284cm" svg:y="17.014cm" svg:viewBox="0 0 28 27" draw:points="0,0 28,0 28,27 0,27">
          <text:p/>
        </draw:polygon>
        <draw:polygon draw:style-name="gr269" draw:text-style-name="P267" draw:layer="layout" svg:width="0.027cm" svg:height="0.026cm" svg:x="14.337cm" svg:y="17.014cm" svg:viewBox="0 0 28 27" draw:points="0,0 28,0 28,27 0,27">
          <text:p/>
        </draw:polygon>
        <draw:polygon draw:style-name="gr269" draw:text-style-name="P267" draw:layer="layout" svg:width="0.028cm" svg:height="0.026cm" svg:x="14.39cm" svg:y="17.014cm" svg:viewBox="0 0 29 27" draw:points="0,0 29,0 29,27 0,27">
          <text:p/>
        </draw:polygon>
        <draw:polygon draw:style-name="gr269" draw:text-style-name="P267" draw:layer="layout" svg:width="0.027cm" svg:height="0.026cm" svg:x="14.443cm" svg:y="17.014cm" svg:viewBox="0 0 28 27" draw:points="0,0 28,0 28,27 0,27">
          <text:p/>
        </draw:polygon>
        <draw:polygon draw:style-name="gr269" draw:text-style-name="P267" draw:layer="layout" svg:width="0.027cm" svg:height="0.026cm" svg:x="14.496cm" svg:y="17.014cm" svg:viewBox="0 0 28 27" draw:points="0,0 28,0 28,27 0,27">
          <text:p/>
        </draw:polygon>
        <draw:polygon draw:style-name="gr269" draw:text-style-name="P267" draw:layer="layout" svg:width="0.027cm" svg:height="0.026cm" svg:x="14.549cm" svg:y="17.014cm" svg:viewBox="0 0 28 27" draw:points="0,0 28,0 28,27 0,27">
          <text:p/>
        </draw:polygon>
        <draw:polygon draw:style-name="gr269" draw:text-style-name="P267" draw:layer="layout" svg:width="0.027cm" svg:height="0.026cm" svg:x="14.602cm" svg:y="17.014cm" svg:viewBox="0 0 28 27" draw:points="0,0 28,0 28,27 0,27">
          <text:p/>
        </draw:polygon>
        <draw:polygon draw:style-name="gr269" draw:text-style-name="P267" draw:layer="layout" svg:width="0.027cm" svg:height="0.026cm" svg:x="14.655cm" svg:y="17.014cm" svg:viewBox="0 0 28 27" draw:points="0,0 28,0 28,27 0,27">
          <text:p/>
        </draw:polygon>
        <draw:polygon draw:style-name="gr269" draw:text-style-name="P267" draw:layer="layout" svg:width="0.027cm" svg:height="0.026cm" svg:x="14.708cm" svg:y="17.014cm" svg:viewBox="0 0 28 27" draw:points="0,0 28,0 28,27 0,27">
          <text:p/>
        </draw:polygon>
        <draw:polygon draw:style-name="gr269" draw:text-style-name="P267" draw:layer="layout" svg:width="0.027cm" svg:height="0.026cm" svg:x="14.761cm" svg:y="17.014cm" svg:viewBox="0 0 28 27" draw:points="0,0 28,0 28,27 0,27">
          <text:p/>
        </draw:polygon>
        <draw:polygon draw:style-name="gr269" draw:text-style-name="P267" draw:layer="layout" svg:width="0.027cm" svg:height="0.026cm" svg:x="14.814cm" svg:y="17.014cm" svg:viewBox="0 0 28 27" draw:points="0,0 28,0 28,27 0,27">
          <text:p/>
        </draw:polygon>
        <draw:polygon draw:style-name="gr269" draw:text-style-name="P267" draw:layer="layout" svg:width="0.027cm" svg:height="0.026cm" svg:x="14.867cm" svg:y="17.014cm" svg:viewBox="0 0 28 27" draw:points="0,0 28,0 28,27 0,27">
          <text:p/>
        </draw:polygon>
        <draw:polygon draw:style-name="gr269" draw:text-style-name="P267" draw:layer="layout" svg:width="0.027cm" svg:height="0.026cm" svg:x="14.92cm" svg:y="17.014cm" svg:viewBox="0 0 28 27" draw:points="0,0 28,0 28,27 0,27">
          <text:p/>
        </draw:polygon>
        <draw:polygon draw:style-name="gr269" draw:text-style-name="P267" draw:layer="layout" svg:width="0.027cm" svg:height="0.026cm" svg:x="14.973cm" svg:y="17.014cm" svg:viewBox="0 0 28 27" draw:points="0,0 28,0 28,27 0,27">
          <text:p/>
        </draw:polygon>
        <draw:polygon draw:style-name="gr269" draw:text-style-name="P267" draw:layer="layout" svg:width="0.027cm" svg:height="0.026cm" svg:x="15.026cm" svg:y="17.014cm" svg:viewBox="0 0 28 27" draw:points="0,0 28,0 28,27 0,27">
          <text:p/>
        </draw:polygon>
        <draw:polygon draw:style-name="gr269" draw:text-style-name="P267" draw:layer="layout" svg:width="0.027cm" svg:height="0.026cm" svg:x="15.079cm" svg:y="17.014cm" svg:viewBox="0 0 28 27" draw:points="0,0 28,0 28,27 0,27">
          <text:p/>
        </draw:polygon>
        <draw:polygon draw:style-name="gr269" draw:text-style-name="P267" draw:layer="layout" svg:width="0.027cm" svg:height="0.026cm" svg:x="15.132cm" svg:y="17.014cm" svg:viewBox="0 0 28 27" draw:points="0,0 28,0 28,27 0,27">
          <text:p/>
        </draw:polygon>
        <draw:polygon draw:style-name="gr269" draw:text-style-name="P267" draw:layer="layout" svg:width="0.027cm" svg:height="0.026cm" svg:x="15.185cm" svg:y="17.014cm" svg:viewBox="0 0 28 27" draw:points="0,0 28,0 28,27 0,27">
          <text:p/>
        </draw:polygon>
        <draw:polygon draw:style-name="gr269" draw:text-style-name="P267" draw:layer="layout" svg:width="0.027cm" svg:height="0.026cm" svg:x="15.238cm" svg:y="17.014cm" svg:viewBox="0 0 28 27" draw:points="0,0 28,0 28,27 0,27">
          <text:p/>
        </draw:polygon>
        <draw:polygon draw:style-name="gr269" draw:text-style-name="P267" draw:layer="layout" svg:width="0.027cm" svg:height="0.026cm" svg:x="15.291cm" svg:y="17.014cm" svg:viewBox="0 0 28 27" draw:points="0,0 28,0 28,27 0,27">
          <text:p/>
        </draw:polygon>
        <draw:polygon draw:style-name="gr269" draw:text-style-name="P267" draw:layer="layout" svg:width="0.027cm" svg:height="0.026cm" svg:x="15.344cm" svg:y="17.014cm" svg:viewBox="0 0 28 27" draw:points="0,0 28,0 28,27 0,27">
          <text:p/>
        </draw:polygon>
        <draw:polygon draw:style-name="gr269" draw:text-style-name="P267" draw:layer="layout" svg:width="0.027cm" svg:height="0.026cm" svg:x="15.397cm" svg:y="17.014cm" svg:viewBox="0 0 28 27" draw:points="0,0 28,0 28,27 0,27">
          <text:p/>
        </draw:polygon>
        <draw:polygon draw:style-name="gr269" draw:text-style-name="P267" draw:layer="layout" svg:width="0.027cm" svg:height="0.026cm" svg:x="15.45cm" svg:y="17.014cm" svg:viewBox="0 0 28 27" draw:points="0,0 28,0 28,27 0,27">
          <text:p/>
        </draw:polygon>
        <draw:polygon draw:style-name="gr269" draw:text-style-name="P267" draw:layer="layout" svg:width="0.027cm" svg:height="0.026cm" svg:x="15.503cm" svg:y="17.014cm" svg:viewBox="0 0 28 27" draw:points="0,0 28,0 28,27 0,27">
          <text:p/>
        </draw:polygon>
        <draw:polygon draw:style-name="gr269" draw:text-style-name="P267" draw:layer="layout" svg:width="0.027cm" svg:height="0.026cm" svg:x="15.556cm" svg:y="17.014cm" svg:viewBox="0 0 28 27" draw:points="0,0 28,0 28,27 0,27">
          <text:p/>
        </draw:polygon>
        <draw:polygon draw:style-name="gr269" draw:text-style-name="P267" draw:layer="layout" svg:width="0.027cm" svg:height="0.026cm" svg:x="15.609cm" svg:y="17.014cm" svg:viewBox="0 0 28 27" draw:points="0,0 28,0 28,27 0,27">
          <text:p/>
        </draw:polygon>
        <draw:polygon draw:style-name="gr269" draw:text-style-name="P267" draw:layer="layout" svg:width="0.027cm" svg:height="0.026cm" svg:x="15.662cm" svg:y="17.014cm" svg:viewBox="0 0 28 27" draw:points="0,0 28,0 28,27 0,27">
          <text:p/>
        </draw:polygon>
        <draw:polygon draw:style-name="gr269" draw:text-style-name="P267" draw:layer="layout" svg:width="0.027cm" svg:height="0.026cm" svg:x="15.715cm" svg:y="17.014cm" svg:viewBox="0 0 28 27" draw:points="0,0 28,0 28,27 0,27">
          <text:p/>
        </draw:polygon>
        <draw:polygon draw:style-name="gr269" draw:text-style-name="P267" draw:layer="layout" svg:width="0.028cm" svg:height="0.026cm" svg:x="15.768cm" svg:y="17.014cm" svg:viewBox="0 0 29 27" draw:points="0,0 29,0 29,27 0,27">
          <text:p/>
        </draw:polygon>
        <draw:polygon draw:style-name="gr269" draw:text-style-name="P267" draw:layer="layout" svg:width="0.027cm" svg:height="0.026cm" svg:x="15.821cm" svg:y="17.014cm" svg:viewBox="0 0 28 27" draw:points="0,0 28,0 28,27 0,27">
          <text:p/>
        </draw:polygon>
        <draw:polygon draw:style-name="gr269" draw:text-style-name="P267" draw:layer="layout" svg:width="0.027cm" svg:height="0.026cm" svg:x="15.874cm" svg:y="17.014cm" svg:viewBox="0 0 28 27" draw:points="0,0 28,0 28,27 0,27">
          <text:p/>
        </draw:polygon>
        <draw:polygon draw:style-name="gr269" draw:text-style-name="P267" draw:layer="layout" svg:width="0.027cm" svg:height="0.026cm" svg:x="15.927cm" svg:y="17.014cm" svg:viewBox="0 0 28 27" draw:points="0,0 28,0 28,27 0,27">
          <text:p/>
        </draw:polygon>
        <draw:polygon draw:style-name="gr269" draw:text-style-name="P267" draw:layer="layout" svg:width="0.027cm" svg:height="0.026cm" svg:x="15.98cm" svg:y="17.014cm" svg:viewBox="0 0 28 27" draw:points="0,0 28,0 28,27 0,27">
          <text:p/>
        </draw:polygon>
        <draw:polygon draw:style-name="gr269" draw:text-style-name="P267" draw:layer="layout" svg:width="0.027cm" svg:height="0.026cm" svg:x="16.033cm" svg:y="17.014cm" svg:viewBox="0 0 28 27" draw:points="0,0 28,0 28,27 0,27">
          <text:p/>
        </draw:polygon>
        <draw:polygon draw:style-name="gr269" draw:text-style-name="P267" draw:layer="layout" svg:width="0.027cm" svg:height="0.026cm" svg:x="16.086cm" svg:y="17.014cm" svg:viewBox="0 0 28 27" draw:points="0,0 28,0 28,27 0,27">
          <text:p/>
        </draw:polygon>
        <draw:polygon draw:style-name="gr269" draw:text-style-name="P267" draw:layer="layout" svg:width="0.027cm" svg:height="0.026cm" svg:x="16.139cm" svg:y="17.014cm" svg:viewBox="0 0 28 27" draw:points="0,0 28,0 28,27 0,27">
          <text:p/>
        </draw:polygon>
        <draw:polygon draw:style-name="gr269" draw:text-style-name="P267" draw:layer="layout" svg:width="0.027cm" svg:height="0.026cm" svg:x="16.192cm" svg:y="17.014cm" svg:viewBox="0 0 28 27" draw:points="0,0 28,0 28,27 0,27">
          <text:p/>
        </draw:polygon>
        <draw:polygon draw:style-name="gr269" draw:text-style-name="P267" draw:layer="layout" svg:width="0.027cm" svg:height="0.026cm" svg:x="16.245cm" svg:y="17.014cm" svg:viewBox="0 0 28 27" draw:points="0,0 28,0 28,27 0,27">
          <text:p/>
        </draw:polygon>
        <draw:polygon draw:style-name="gr269" draw:text-style-name="P267" draw:layer="layout" svg:width="0.027cm" svg:height="0.026cm" svg:x="16.298cm" svg:y="17.014cm" svg:viewBox="0 0 28 27" draw:points="0,0 28,0 28,27 0,27">
          <text:p/>
        </draw:polygon>
        <draw:polygon draw:style-name="gr269" draw:text-style-name="P267" draw:layer="layout" svg:width="0.027cm" svg:height="0.026cm" svg:x="16.351cm" svg:y="17.014cm" svg:viewBox="0 0 28 27" draw:points="0,0 28,0 28,27 0,27">
          <text:p/>
        </draw:polygon>
        <draw:polygon draw:style-name="gr269" draw:text-style-name="P267" draw:layer="layout" svg:width="0.027cm" svg:height="0.026cm" svg:x="16.404cm" svg:y="17.014cm" svg:viewBox="0 0 28 27" draw:points="0,0 28,0 28,27 0,27">
          <text:p/>
        </draw:polygon>
        <draw:polygon draw:style-name="gr269" draw:text-style-name="P267" draw:layer="layout" svg:width="0.027cm" svg:height="0.026cm" svg:x="16.457cm" svg:y="17.014cm" svg:viewBox="0 0 28 27" draw:points="0,0 28,0 28,27 0,27">
          <text:p/>
        </draw:polygon>
        <draw:polygon draw:style-name="gr269" draw:text-style-name="P267" draw:layer="layout" svg:width="0.027cm" svg:height="0.026cm" svg:x="16.51cm" svg:y="17.014cm" svg:viewBox="0 0 28 27" draw:points="0,0 28,0 28,27 0,27">
          <text:p/>
        </draw:polygon>
        <draw:polygon draw:style-name="gr269" draw:text-style-name="P267" draw:layer="layout" svg:width="0.027cm" svg:height="0.026cm" svg:x="16.563cm" svg:y="17.014cm" svg:viewBox="0 0 28 27" draw:points="0,0 28,0 28,27 0,27">
          <text:p/>
        </draw:polygon>
        <draw:polygon draw:style-name="gr269" draw:text-style-name="P267" draw:layer="layout" svg:width="0.027cm" svg:height="0.026cm" svg:x="16.616cm" svg:y="17.014cm" svg:viewBox="0 0 28 27" draw:points="0,0 28,0 28,27 0,27">
          <text:p/>
        </draw:polygon>
        <draw:polygon draw:style-name="gr269" draw:text-style-name="P267" draw:layer="layout" svg:width="0.027cm" svg:height="0.026cm" svg:x="16.669cm" svg:y="17.014cm" svg:viewBox="0 0 28 27" draw:points="0,0 28,0 28,27 0,27">
          <text:p/>
        </draw:polygon>
        <draw:polygon draw:style-name="gr269" draw:text-style-name="P267" draw:layer="layout" svg:width="0.027cm" svg:height="0.026cm" svg:x="16.722cm" svg:y="17.014cm" svg:viewBox="0 0 28 27" draw:points="0,0 28,0 28,27 0,27">
          <text:p/>
        </draw:polygon>
        <draw:polygon draw:style-name="gr269" draw:text-style-name="P267" draw:layer="layout" svg:width="0.027cm" svg:height="0.026cm" svg:x="16.775cm" svg:y="17.014cm" svg:viewBox="0 0 28 27" draw:points="0,0 28,0 28,27 0,27">
          <text:p/>
        </draw:polygon>
        <draw:polygon draw:style-name="gr269" draw:text-style-name="P267" draw:layer="layout" svg:width="0.027cm" svg:height="0.026cm" svg:x="16.828cm" svg:y="17.014cm" svg:viewBox="0 0 28 27" draw:points="0,0 28,0 28,27 0,27">
          <text:p/>
        </draw:polygon>
        <draw:polygon draw:style-name="gr269" draw:text-style-name="P267" draw:layer="layout" svg:width="0.027cm" svg:height="0.026cm" svg:x="16.881cm" svg:y="17.014cm" svg:viewBox="0 0 28 27" draw:points="0,0 28,0 28,27 0,27">
          <text:p/>
        </draw:polygon>
        <draw:polygon draw:style-name="gr269" draw:text-style-name="P267" draw:layer="layout" svg:width="0.027cm" svg:height="0.026cm" svg:x="16.934cm" svg:y="17.014cm" svg:viewBox="0 0 28 27" draw:points="0,0 28,0 28,27 0,27">
          <text:p/>
        </draw:polygon>
        <draw:polygon draw:style-name="gr269" draw:text-style-name="P267" draw:layer="layout" svg:width="0.027cm" svg:height="0.026cm" svg:x="16.987cm" svg:y="17.014cm" svg:viewBox="0 0 28 27" draw:points="0,0 28,0 28,27 0,27">
          <text:p/>
        </draw:polygon>
        <draw:polygon draw:style-name="gr269" draw:text-style-name="P267" draw:layer="layout" svg:width="0.027cm" svg:height="0.026cm" svg:x="17.04cm" svg:y="17.014cm" svg:viewBox="0 0 28 27" draw:points="0,0 28,0 28,27 0,27">
          <text:p/>
        </draw:polygon>
        <draw:polygon draw:style-name="gr269" draw:text-style-name="P267" draw:layer="layout" svg:width="0.027cm" svg:height="0.026cm" svg:x="17.093cm" svg:y="17.014cm" svg:viewBox="0 0 28 27" draw:points="0,0 28,0 28,27 0,27">
          <text:p/>
        </draw:polygon>
        <draw:polygon draw:style-name="gr269" draw:text-style-name="P267" draw:layer="layout" svg:width="0.028cm" svg:height="0.026cm" svg:x="17.146cm" svg:y="17.014cm" svg:viewBox="0 0 29 27" draw:points="0,0 29,0 29,27 0,27">
          <text:p/>
        </draw:polygon>
        <draw:polygon draw:style-name="gr269" draw:text-style-name="P267" draw:layer="layout" svg:width="0.027cm" svg:height="0.026cm" svg:x="17.199cm" svg:y="17.014cm" svg:viewBox="0 0 28 27" draw:points="0,0 28,0 28,27 0,27">
          <text:p/>
        </draw:polygon>
        <draw:polygon draw:style-name="gr269" draw:text-style-name="P267" draw:layer="layout" svg:width="0.027cm" svg:height="0.026cm" svg:x="17.252cm" svg:y="17.014cm" svg:viewBox="0 0 28 27" draw:points="0,0 28,0 28,27 0,27">
          <text:p/>
        </draw:polygon>
        <draw:polygon draw:style-name="gr269" draw:text-style-name="P267" draw:layer="layout" svg:width="0.027cm" svg:height="0.026cm" svg:x="17.305cm" svg:y="17.014cm" svg:viewBox="0 0 28 27" draw:points="0,0 28,0 28,27 0,27">
          <text:p/>
        </draw:polygon>
        <draw:polygon draw:style-name="gr269" draw:text-style-name="P267" draw:layer="layout" svg:width="0.027cm" svg:height="0.026cm" svg:x="17.358cm" svg:y="17.014cm" svg:viewBox="0 0 28 27" draw:points="0,0 28,0 28,27 0,27">
          <text:p/>
        </draw:polygon>
        <draw:polygon draw:style-name="gr269" draw:text-style-name="P267" draw:layer="layout" svg:width="0.027cm" svg:height="0.026cm" svg:x="17.411cm" svg:y="17.014cm" svg:viewBox="0 0 28 27" draw:points="0,0 28,0 28,27 0,27">
          <text:p/>
        </draw:polygon>
        <draw:polygon draw:style-name="gr269" draw:text-style-name="P267" draw:layer="layout" svg:width="0.027cm" svg:height="0.026cm" svg:x="17.464cm" svg:y="17.014cm" svg:viewBox="0 0 28 27" draw:points="0,0 28,0 28,27 0,27">
          <text:p/>
        </draw:polygon>
        <draw:polygon draw:style-name="gr269" draw:text-style-name="P267" draw:layer="layout" svg:width="0.027cm" svg:height="0.026cm" svg:x="17.517cm" svg:y="17.014cm" svg:viewBox="0 0 28 27" draw:points="0,0 28,0 28,27 0,27">
          <text:p/>
        </draw:polygon>
        <draw:polygon draw:style-name="gr269" draw:text-style-name="P267" draw:layer="layout" svg:width="0.027cm" svg:height="0.026cm" svg:x="17.57cm" svg:y="17.014cm" svg:viewBox="0 0 28 27" draw:points="0,0 28,0 28,27 0,27">
          <text:p/>
        </draw:polygon>
        <draw:polygon draw:style-name="gr269" draw:text-style-name="P267" draw:layer="layout" svg:width="0.027cm" svg:height="0.026cm" svg:x="17.623cm" svg:y="17.014cm" svg:viewBox="0 0 28 27" draw:points="0,0 28,0 28,27 0,27">
          <text:p/>
        </draw:polygon>
        <draw:polygon draw:style-name="gr269" draw:text-style-name="P267" draw:layer="layout" svg:width="0.027cm" svg:height="0.026cm" svg:x="17.676cm" svg:y="17.014cm" svg:viewBox="0 0 28 27" draw:points="0,0 28,0 28,27 0,27">
          <text:p/>
        </draw:polygon>
        <draw:polygon draw:style-name="gr269" draw:text-style-name="P267" draw:layer="layout" svg:width="0.027cm" svg:height="0.026cm" svg:x="17.729cm" svg:y="17.014cm" svg:viewBox="0 0 28 27" draw:points="0,0 28,0 28,27 0,27">
          <text:p/>
        </draw:polygon>
        <draw:polygon draw:style-name="gr269" draw:text-style-name="P267" draw:layer="layout" svg:width="0.027cm" svg:height="0.026cm" svg:x="17.782cm" svg:y="17.014cm" svg:viewBox="0 0 28 27" draw:points="0,0 28,0 28,27 0,27">
          <text:p/>
        </draw:polygon>
        <draw:polygon draw:style-name="gr269" draw:text-style-name="P267" draw:layer="layout" svg:width="0.027cm" svg:height="0.026cm" svg:x="17.835cm" svg:y="17.014cm" svg:viewBox="0 0 28 27" draw:points="0,0 28,0 28,27 0,27">
          <text:p/>
        </draw:polygon>
        <draw:polygon draw:style-name="gr269" draw:text-style-name="P267" draw:layer="layout" svg:width="0.027cm" svg:height="0.026cm" svg:x="17.888cm" svg:y="17.014cm" svg:viewBox="0 0 28 27" draw:points="0,0 28,0 28,27 0,27">
          <text:p/>
        </draw:polygon>
        <draw:polygon draw:style-name="gr269" draw:text-style-name="P267" draw:layer="layout" svg:width="0.027cm" svg:height="0.026cm" svg:x="17.941cm" svg:y="17.014cm" svg:viewBox="0 0 28 27" draw:points="0,0 28,0 28,27 0,27">
          <text:p/>
        </draw:polygon>
        <draw:polygon draw:style-name="gr269" draw:text-style-name="P267" draw:layer="layout" svg:width="0.027cm" svg:height="0.026cm" svg:x="17.994cm" svg:y="17.014cm" svg:viewBox="0 0 28 27" draw:points="0,0 28,0 28,27 0,27">
          <text:p/>
        </draw:polygon>
        <draw:polygon draw:style-name="gr269" draw:text-style-name="P267" draw:layer="layout" svg:width="0.027cm" svg:height="0.026cm" svg:x="18.047cm" svg:y="17.014cm" svg:viewBox="0 0 28 27" draw:points="0,0 28,0 28,27 0,27">
          <text:p/>
        </draw:polygon>
        <draw:polygon draw:style-name="gr269" draw:text-style-name="P267" draw:layer="layout" svg:width="0.027cm" svg:height="0.026cm" svg:x="18.1cm" svg:y="17.014cm" svg:viewBox="0 0 28 27" draw:points="0,0 28,0 28,27 0,27">
          <text:p/>
        </draw:polygon>
        <draw:polygon draw:style-name="gr269" draw:text-style-name="P267" draw:layer="layout" svg:width="0.027cm" svg:height="0.026cm" svg:x="18.153cm" svg:y="17.014cm" svg:viewBox="0 0 28 27" draw:points="0,0 28,0 28,27 0,27">
          <text:p/>
        </draw:polygon>
        <draw:polygon draw:style-name="gr269" draw:text-style-name="P267" draw:layer="layout" svg:width="0.027cm" svg:height="0.026cm" svg:x="18.206cm" svg:y="17.014cm" svg:viewBox="0 0 28 27" draw:points="0,0 28,0 28,27 0,27">
          <text:p/>
        </draw:polygon>
        <draw:polygon draw:style-name="gr269" draw:text-style-name="P267" draw:layer="layout" svg:width="0.027cm" svg:height="0.026cm" svg:x="18.259cm" svg:y="17.014cm" svg:viewBox="0 0 28 27" draw:points="0,0 28,0 28,27 0,27">
          <text:p/>
        </draw:polygon>
        <draw:polygon draw:style-name="gr269" draw:text-style-name="P267" draw:layer="layout" svg:width="0.027cm" svg:height="0.026cm" svg:x="18.312cm" svg:y="17.014cm" svg:viewBox="0 0 28 27" draw:points="0,0 28,0 28,27 0,27">
          <text:p/>
        </draw:polygon>
        <draw:polygon draw:style-name="gr269" draw:text-style-name="P267" draw:layer="layout" svg:width="0.027cm" svg:height="0.026cm" svg:x="18.365cm" svg:y="17.014cm" svg:viewBox="0 0 28 27" draw:points="0,0 28,0 28,27 0,27">
          <text:p/>
        </draw:polygon>
        <draw:polygon draw:style-name="gr269" draw:text-style-name="P267" draw:layer="layout" svg:width="0.027cm" svg:height="0.026cm" svg:x="18.418cm" svg:y="17.014cm" svg:viewBox="0 0 28 27" draw:points="0,0 28,0 28,27 0,27">
          <text:p/>
        </draw:polygon>
        <draw:polygon draw:style-name="gr269" draw:text-style-name="P267" draw:layer="layout" svg:width="0.027cm" svg:height="0.026cm" svg:x="18.471cm" svg:y="17.014cm" svg:viewBox="0 0 28 27" draw:points="0,0 28,0 28,27 0,27">
          <text:p/>
        </draw:polygon>
        <draw:polygon draw:style-name="gr269" draw:text-style-name="P267" draw:layer="layout" svg:width="0.028cm" svg:height="0.026cm" svg:x="18.524cm" svg:y="17.014cm" svg:viewBox="0 0 29 27" draw:points="0,0 29,0 29,27 0,27">
          <text:p/>
        </draw:polygon>
        <draw:polygon draw:style-name="gr269" draw:text-style-name="P267" draw:layer="layout" svg:width="0.027cm" svg:height="0.026cm" svg:x="18.577cm" svg:y="17.014cm" svg:viewBox="0 0 28 27" draw:points="0,0 28,0 28,27 0,27">
          <text:p/>
        </draw:polygon>
        <draw:polygon draw:style-name="gr269" draw:text-style-name="P267" draw:layer="layout" svg:width="0.027cm" svg:height="0.026cm" svg:x="18.63cm" svg:y="17.014cm" svg:viewBox="0 0 28 27" draw:points="0,0 28,0 28,27 0,27">
          <text:p/>
        </draw:polygon>
        <draw:polygon draw:style-name="gr269" draw:text-style-name="P267" draw:layer="layout" svg:width="0.027cm" svg:height="0.026cm" svg:x="18.683cm" svg:y="17.014cm" svg:viewBox="0 0 28 27" draw:points="0,0 28,0 28,27 0,27">
          <text:p/>
        </draw:polygon>
        <draw:polygon draw:style-name="gr269" draw:text-style-name="P267" draw:layer="layout" svg:width="0.027cm" svg:height="0.026cm" svg:x="18.736cm" svg:y="17.014cm" svg:viewBox="0 0 28 27" draw:points="0,0 28,0 28,27 0,27">
          <text:p/>
        </draw:polygon>
        <draw:polygon draw:style-name="gr269" draw:text-style-name="P267" draw:layer="layout" svg:width="0.027cm" svg:height="0.026cm" svg:x="18.789cm" svg:y="17.014cm" svg:viewBox="0 0 28 27" draw:points="0,0 28,0 28,27 0,27">
          <text:p/>
        </draw:polygon>
        <draw:polygon draw:style-name="gr269" draw:text-style-name="P267" draw:layer="layout" svg:width="0.027cm" svg:height="0.026cm" svg:x="18.842cm" svg:y="17.014cm" svg:viewBox="0 0 28 27" draw:points="0,0 28,0 28,27 0,27">
          <text:p/>
        </draw:polygon>
        <draw:polygon draw:style-name="gr269" draw:text-style-name="P267" draw:layer="layout" svg:width="0.027cm" svg:height="0.026cm" svg:x="18.895cm" svg:y="17.014cm" svg:viewBox="0 0 28 27" draw:points="0,0 28,0 28,27 0,27">
          <text:p/>
        </draw:polygon>
        <draw:polygon draw:style-name="gr269" draw:text-style-name="P267" draw:layer="layout" svg:width="0.027cm" svg:height="0.026cm" svg:x="18.948cm" svg:y="17.014cm" svg:viewBox="0 0 28 27" draw:points="0,0 28,0 28,27 0,27">
          <text:p/>
        </draw:polygon>
        <draw:polygon draw:style-name="gr269" draw:text-style-name="P267" draw:layer="layout" svg:width="0.027cm" svg:height="0.026cm" svg:x="19.001cm" svg:y="17.014cm" svg:viewBox="0 0 28 27" draw:points="0,0 28,0 28,27 0,27">
          <text:p/>
        </draw:polygon>
        <draw:polygon draw:style-name="gr269" draw:text-style-name="P267" draw:layer="layout" svg:width="0.053cm" svg:height="0.027cm" svg:x="2.014cm" svg:y="17.994cm" svg:viewBox="0 0 54 28" draw:points="0,0 54,0 54,28 0,28">
          <text:p/>
        </draw:polygon>
        <draw:polygon draw:style-name="gr269" draw:text-style-name="P267" draw:layer="layout" svg:width="0.027cm" svg:height="0.027cm" svg:x="2.093cm" svg:y="17.994cm" svg:viewBox="0 0 28 28" draw:points="0,0 28,0 28,28 0,28">
          <text:p/>
        </draw:polygon>
        <draw:polygon draw:style-name="gr269" draw:text-style-name="P267" draw:layer="layout" svg:width="0.027cm" svg:height="0.027cm" svg:x="2.146cm" svg:y="17.994cm" svg:viewBox="0 0 28 28" draw:points="0,0 28,0 28,28 0,28">
          <text:p/>
        </draw:polygon>
        <draw:polygon draw:style-name="gr269" draw:text-style-name="P267" draw:layer="layout" svg:width="0.027cm" svg:height="0.027cm" svg:x="2.199cm" svg:y="17.994cm" svg:viewBox="0 0 28 28" draw:points="0,0 28,0 28,28 0,28">
          <text:p/>
        </draw:polygon>
        <draw:polygon draw:style-name="gr269" draw:text-style-name="P267" draw:layer="layout" svg:width="0.027cm" svg:height="0.027cm" svg:x="2.252cm" svg:y="17.994cm" svg:viewBox="0 0 28 28" draw:points="0,0 28,0 28,28 0,28">
          <text:p/>
        </draw:polygon>
        <draw:polygon draw:style-name="gr269" draw:text-style-name="P267" draw:layer="layout" svg:width="0.027cm" svg:height="0.027cm" svg:x="2.305cm" svg:y="17.994cm" svg:viewBox="0 0 28 28" draw:points="0,0 28,0 28,28 0,28">
          <text:p/>
        </draw:polygon>
        <draw:polygon draw:style-name="gr269" draw:text-style-name="P267" draw:layer="layout" svg:width="0.027cm" svg:height="0.027cm" svg:x="2.358cm" svg:y="17.994cm" svg:viewBox="0 0 28 28" draw:points="0,0 28,0 28,28 0,28">
          <text:p/>
        </draw:polygon>
        <draw:polygon draw:style-name="gr269" draw:text-style-name="P267" draw:layer="layout" svg:width="0.027cm" svg:height="0.027cm" svg:x="2.411cm" svg:y="17.994cm" svg:viewBox="0 0 28 28" draw:points="0,0 28,0 28,28 0,28">
          <text:p/>
        </draw:polygon>
        <draw:polygon draw:style-name="gr269" draw:text-style-name="P267" draw:layer="layout" svg:width="0.027cm" svg:height="0.027cm" svg:x="2.464cm" svg:y="17.994cm" svg:viewBox="0 0 28 28" draw:points="0,0 28,0 28,28 0,28">
          <text:p/>
        </draw:polygon>
        <draw:polygon draw:style-name="gr269" draw:text-style-name="P267" draw:layer="layout" svg:width="0.027cm" svg:height="0.027cm" svg:x="2.517cm" svg:y="17.994cm" svg:viewBox="0 0 28 28" draw:points="0,0 28,0 28,28 0,28">
          <text:p/>
        </draw:polygon>
        <draw:polygon draw:style-name="gr269" draw:text-style-name="P267" draw:layer="layout" svg:width="0.027cm" svg:height="0.027cm" svg:x="2.57cm" svg:y="17.994cm" svg:viewBox="0 0 28 28" draw:points="0,0 28,0 28,28 0,28">
          <text:p/>
        </draw:polygon>
        <draw:polygon draw:style-name="gr269" draw:text-style-name="P267" draw:layer="layout" svg:width="0.027cm" svg:height="0.027cm" svg:x="2.623cm" svg:y="17.994cm" svg:viewBox="0 0 28 28" draw:points="0,0 28,0 28,28 0,28">
          <text:p/>
        </draw:polygon>
        <draw:polygon draw:style-name="gr269" draw:text-style-name="P267" draw:layer="layout" svg:width="0.027cm" svg:height="0.027cm" svg:x="2.676cm" svg:y="17.994cm" svg:viewBox="0 0 28 28" draw:points="0,0 28,0 28,28 0,28">
          <text:p/>
        </draw:polygon>
        <draw:polygon draw:style-name="gr269" draw:text-style-name="P267" draw:layer="layout" svg:width="0.027cm" svg:height="0.027cm" svg:x="2.729cm" svg:y="17.994cm" svg:viewBox="0 0 28 28" draw:points="0,0 28,0 28,28 0,28">
          <text:p/>
        </draw:polygon>
        <draw:polygon draw:style-name="gr269" draw:text-style-name="P267" draw:layer="layout" svg:width="0.027cm" svg:height="0.027cm" svg:x="2.782cm" svg:y="17.994cm" svg:viewBox="0 0 28 28" draw:points="0,0 28,0 28,28 0,28">
          <text:p/>
        </draw:polygon>
        <draw:polygon draw:style-name="gr269" draw:text-style-name="P267" draw:layer="layout" svg:width="0.027cm" svg:height="0.027cm" svg:x="2.835cm" svg:y="17.994cm" svg:viewBox="0 0 28 28" draw:points="0,0 28,0 28,28 0,28">
          <text:p/>
        </draw:polygon>
        <draw:polygon draw:style-name="gr269" draw:text-style-name="P267" draw:layer="layout" svg:width="0.027cm" svg:height="0.027cm" svg:x="2.888cm" svg:y="17.994cm" svg:viewBox="0 0 28 28" draw:points="0,0 28,0 28,28 0,28">
          <text:p/>
        </draw:polygon>
        <draw:polygon draw:style-name="gr269" draw:text-style-name="P267" draw:layer="layout" svg:width="0.027cm" svg:height="0.027cm" svg:x="2.941cm" svg:y="17.994cm" svg:viewBox="0 0 28 28" draw:points="0,0 28,0 28,28 0,28">
          <text:p/>
        </draw:polygon>
        <draw:polygon draw:style-name="gr269" draw:text-style-name="P267" draw:layer="layout" svg:width="0.027cm" svg:height="0.027cm" svg:x="2.994cm" svg:y="17.994cm" svg:viewBox="0 0 28 28" draw:points="0,0 28,0 28,28 0,28">
          <text:p/>
        </draw:polygon>
        <draw:polygon draw:style-name="gr269" draw:text-style-name="P267" draw:layer="layout" svg:width="0.027cm" svg:height="0.027cm" svg:x="3.047cm" svg:y="17.994cm" svg:viewBox="0 0 28 28" draw:points="0,0 28,0 28,28 0,28">
          <text:p/>
        </draw:polygon>
        <draw:polygon draw:style-name="gr269" draw:text-style-name="P267" draw:layer="layout" svg:width="0.027cm" svg:height="0.027cm" svg:x="3.1cm" svg:y="17.994cm" svg:viewBox="0 0 28 28" draw:points="0,0 28,0 28,28 0,28">
          <text:p/>
        </draw:polygon>
        <draw:polygon draw:style-name="gr269" draw:text-style-name="P267" draw:layer="layout" svg:width="0.027cm" svg:height="0.027cm" svg:x="3.153cm" svg:y="17.994cm" svg:viewBox="0 0 28 28" draw:points="0,0 28,0 28,28 0,28">
          <text:p/>
        </draw:polygon>
        <draw:polygon draw:style-name="gr269" draw:text-style-name="P267" draw:layer="layout" svg:width="0.027cm" svg:height="0.027cm" svg:x="3.206cm" svg:y="17.994cm" svg:viewBox="0 0 28 28" draw:points="0,0 28,0 28,28 0,28">
          <text:p/>
        </draw:polygon>
        <draw:polygon draw:style-name="gr269" draw:text-style-name="P267" draw:layer="layout" svg:width="0.027cm" svg:height="0.027cm" svg:x="3.259cm" svg:y="17.994cm" svg:viewBox="0 0 28 28" draw:points="0,0 28,0 28,28 0,28">
          <text:p/>
        </draw:polygon>
        <draw:polygon draw:style-name="gr269" draw:text-style-name="P267" draw:layer="layout" svg:width="0.027cm" svg:height="0.027cm" svg:x="3.312cm" svg:y="17.994cm" svg:viewBox="0 0 28 28" draw:points="0,0 28,0 28,28 0,28">
          <text:p/>
        </draw:polygon>
        <draw:polygon draw:style-name="gr269" draw:text-style-name="P267" draw:layer="layout" svg:width="0.027cm" svg:height="0.027cm" svg:x="3.365cm" svg:y="17.994cm" svg:viewBox="0 0 28 28" draw:points="0,0 28,0 28,28 0,28">
          <text:p/>
        </draw:polygon>
        <draw:polygon draw:style-name="gr269" draw:text-style-name="P267" draw:layer="layout" svg:width="0.028cm" svg:height="0.027cm" svg:x="3.418cm" svg:y="17.994cm" svg:viewBox="0 0 29 28" draw:points="0,0 29,0 29,28 0,28">
          <text:p/>
        </draw:polygon>
        <draw:polygon draw:style-name="gr269" draw:text-style-name="P267" draw:layer="layout" svg:width="0.027cm" svg:height="0.027cm" svg:x="3.471cm" svg:y="17.994cm" svg:viewBox="0 0 28 28" draw:points="0,0 28,0 28,28 0,28">
          <text:p/>
        </draw:polygon>
        <draw:polygon draw:style-name="gr269" draw:text-style-name="P267" draw:layer="layout" svg:width="0.027cm" svg:height="0.027cm" svg:x="3.524cm" svg:y="17.994cm" svg:viewBox="0 0 28 28" draw:points="0,0 28,0 28,28 0,28">
          <text:p/>
        </draw:polygon>
        <draw:polygon draw:style-name="gr269" draw:text-style-name="P267" draw:layer="layout" svg:width="0.027cm" svg:height="0.027cm" svg:x="3.577cm" svg:y="17.994cm" svg:viewBox="0 0 28 28" draw:points="0,0 28,0 28,28 0,28">
          <text:p/>
        </draw:polygon>
        <draw:polygon draw:style-name="gr269" draw:text-style-name="P267" draw:layer="layout" svg:width="0.027cm" svg:height="0.027cm" svg:x="3.63cm" svg:y="17.994cm" svg:viewBox="0 0 28 28" draw:points="0,0 28,0 28,28 0,28">
          <text:p/>
        </draw:polygon>
        <draw:polygon draw:style-name="gr269" draw:text-style-name="P267" draw:layer="layout" svg:width="0.027cm" svg:height="0.027cm" svg:x="3.683cm" svg:y="17.994cm" svg:viewBox="0 0 28 28" draw:points="0,0 28,0 28,28 0,28">
          <text:p/>
        </draw:polygon>
        <draw:polygon draw:style-name="gr269" draw:text-style-name="P267" draw:layer="layout" svg:width="0.027cm" svg:height="0.027cm" svg:x="3.736cm" svg:y="17.994cm" svg:viewBox="0 0 28 28" draw:points="0,0 28,0 28,28 0,28">
          <text:p/>
        </draw:polygon>
        <draw:polygon draw:style-name="gr269" draw:text-style-name="P267" draw:layer="layout" svg:width="0.027cm" svg:height="0.027cm" svg:x="3.789cm" svg:y="17.994cm" svg:viewBox="0 0 28 28" draw:points="0,0 28,0 28,28 0,28">
          <text:p/>
        </draw:polygon>
        <draw:polygon draw:style-name="gr269" draw:text-style-name="P267" draw:layer="layout" svg:width="0.027cm" svg:height="0.027cm" svg:x="3.842cm" svg:y="17.994cm" svg:viewBox="0 0 28 28" draw:points="0,0 28,0 28,28 0,28">
          <text:p/>
        </draw:polygon>
        <draw:polygon draw:style-name="gr269" draw:text-style-name="P267" draw:layer="layout" svg:width="0.027cm" svg:height="0.027cm" svg:x="3.895cm" svg:y="17.994cm" svg:viewBox="0 0 28 28" draw:points="0,0 28,0 28,28 0,28">
          <text:p/>
        </draw:polygon>
        <draw:polygon draw:style-name="gr269" draw:text-style-name="P267" draw:layer="layout" svg:width="0.027cm" svg:height="0.027cm" svg:x="3.948cm" svg:y="17.994cm" svg:viewBox="0 0 28 28" draw:points="0,0 28,0 28,28 0,28">
          <text:p/>
        </draw:polygon>
        <draw:polygon draw:style-name="gr269" draw:text-style-name="P267" draw:layer="layout" svg:width="0.027cm" svg:height="0.027cm" svg:x="4.001cm" svg:y="17.994cm" svg:viewBox="0 0 28 28" draw:points="0,0 28,0 28,28 0,28">
          <text:p/>
        </draw:polygon>
        <draw:polygon draw:style-name="gr269" draw:text-style-name="P267" draw:layer="layout" svg:width="0.027cm" svg:height="0.027cm" svg:x="4.054cm" svg:y="17.994cm" svg:viewBox="0 0 28 28" draw:points="0,0 28,0 28,28 0,28">
          <text:p/>
        </draw:polygon>
        <draw:polygon draw:style-name="gr269" draw:text-style-name="P267" draw:layer="layout" svg:width="0.027cm" svg:height="0.027cm" svg:x="4.107cm" svg:y="17.994cm" svg:viewBox="0 0 28 28" draw:points="0,0 28,0 28,28 0,28">
          <text:p/>
        </draw:polygon>
        <draw:polygon draw:style-name="gr269" draw:text-style-name="P267" draw:layer="layout" svg:width="0.027cm" svg:height="0.027cm" svg:x="4.16cm" svg:y="17.994cm" svg:viewBox="0 0 28 28" draw:points="0,0 28,0 28,28 0,28">
          <text:p/>
        </draw:polygon>
        <draw:polygon draw:style-name="gr269" draw:text-style-name="P267" draw:layer="layout" svg:width="0.027cm" svg:height="0.027cm" svg:x="4.213cm" svg:y="17.994cm" svg:viewBox="0 0 28 28" draw:points="0,0 28,0 28,28 0,28">
          <text:p/>
        </draw:polygon>
        <draw:polygon draw:style-name="gr269" draw:text-style-name="P267" draw:layer="layout" svg:width="0.027cm" svg:height="0.027cm" svg:x="4.266cm" svg:y="17.994cm" svg:viewBox="0 0 28 28" draw:points="0,0 28,0 28,28 0,28">
          <text:p/>
        </draw:polygon>
        <draw:polygon draw:style-name="gr269" draw:text-style-name="P267" draw:layer="layout" svg:width="0.027cm" svg:height="0.027cm" svg:x="4.319cm" svg:y="17.994cm" svg:viewBox="0 0 28 28" draw:points="0,0 28,0 28,28 0,28">
          <text:p/>
        </draw:polygon>
        <draw:polygon draw:style-name="gr269" draw:text-style-name="P267" draw:layer="layout" svg:width="0.027cm" svg:height="0.027cm" svg:x="4.372cm" svg:y="17.994cm" svg:viewBox="0 0 28 28" draw:points="0,0 28,0 28,28 0,28">
          <text:p/>
        </draw:polygon>
        <draw:polygon draw:style-name="gr269" draw:text-style-name="P267" draw:layer="layout" svg:width="0.027cm" svg:height="0.027cm" svg:x="4.425cm" svg:y="17.994cm" svg:viewBox="0 0 28 28" draw:points="0,0 28,0 28,28 0,28">
          <text:p/>
        </draw:polygon>
        <draw:polygon draw:style-name="gr269" draw:text-style-name="P267" draw:layer="layout" svg:width="0.027cm" svg:height="0.027cm" svg:x="4.478cm" svg:y="17.994cm" svg:viewBox="0 0 28 28" draw:points="0,0 28,0 28,28 0,28">
          <text:p/>
        </draw:polygon>
        <draw:polygon draw:style-name="gr269" draw:text-style-name="P267" draw:layer="layout" svg:width="0.027cm" svg:height="0.027cm" svg:x="4.531cm" svg:y="17.994cm" svg:viewBox="0 0 28 28" draw:points="0,0 28,0 28,28 0,28">
          <text:p/>
        </draw:polygon>
        <draw:polygon draw:style-name="gr269" draw:text-style-name="P267" draw:layer="layout" svg:width="0.027cm" svg:height="0.027cm" svg:x="4.584cm" svg:y="17.994cm" svg:viewBox="0 0 28 28" draw:points="0,0 28,0 28,28 0,28">
          <text:p/>
        </draw:polygon>
        <draw:polygon draw:style-name="gr269" draw:text-style-name="P267" draw:layer="layout" svg:width="0.027cm" svg:height="0.027cm" svg:x="4.637cm" svg:y="17.994cm" svg:viewBox="0 0 28 28" draw:points="0,0 28,0 28,28 0,28">
          <text:p/>
        </draw:polygon>
        <draw:polygon draw:style-name="gr269" draw:text-style-name="P267" draw:layer="layout" svg:width="0.027cm" svg:height="0.027cm" svg:x="4.69cm" svg:y="17.994cm" svg:viewBox="0 0 28 28" draw:points="0,0 28,0 28,28 0,28">
          <text:p/>
        </draw:polygon>
        <draw:polygon draw:style-name="gr269" draw:text-style-name="P267" draw:layer="layout" svg:width="0.027cm" svg:height="0.027cm" svg:x="4.743cm" svg:y="17.994cm" svg:viewBox="0 0 28 28" draw:points="0,0 28,0 28,28 0,28">
          <text:p/>
        </draw:polygon>
        <draw:polygon draw:style-name="gr269" draw:text-style-name="P267" draw:layer="layout" svg:width="0.028cm" svg:height="0.027cm" svg:x="4.796cm" svg:y="17.994cm" svg:viewBox="0 0 29 28" draw:points="0,0 29,0 29,28 0,28">
          <text:p/>
        </draw:polygon>
        <draw:polygon draw:style-name="gr269" draw:text-style-name="P267" draw:layer="layout" svg:width="0.027cm" svg:height="0.027cm" svg:x="4.849cm" svg:y="17.994cm" svg:viewBox="0 0 28 28" draw:points="0,0 28,0 28,28 0,28">
          <text:p/>
        </draw:polygon>
        <draw:polygon draw:style-name="gr269" draw:text-style-name="P267" draw:layer="layout" svg:width="0.027cm" svg:height="0.027cm" svg:x="4.902cm" svg:y="17.994cm" svg:viewBox="0 0 28 28" draw:points="0,0 28,0 28,28 0,28">
          <text:p/>
        </draw:polygon>
        <draw:polygon draw:style-name="gr269" draw:text-style-name="P267" draw:layer="layout" svg:width="0.027cm" svg:height="0.027cm" svg:x="4.955cm" svg:y="17.994cm" svg:viewBox="0 0 28 28" draw:points="0,0 28,0 28,28 0,28">
          <text:p/>
        </draw:polygon>
        <draw:polygon draw:style-name="gr269" draw:text-style-name="P267" draw:layer="layout" svg:width="0.027cm" svg:height="0.027cm" svg:x="5.008cm" svg:y="17.994cm" svg:viewBox="0 0 28 28" draw:points="0,0 28,0 28,28 0,28">
          <text:p/>
        </draw:polygon>
        <draw:polygon draw:style-name="gr269" draw:text-style-name="P267" draw:layer="layout" svg:width="0.027cm" svg:height="0.027cm" svg:x="5.061cm" svg:y="17.994cm" svg:viewBox="0 0 28 28" draw:points="0,0 28,0 28,28 0,28">
          <text:p/>
        </draw:polygon>
        <draw:polygon draw:style-name="gr269" draw:text-style-name="P267" draw:layer="layout" svg:width="0.027cm" svg:height="0.027cm" svg:x="5.114cm" svg:y="17.994cm" svg:viewBox="0 0 28 28" draw:points="0,0 28,0 28,28 0,28">
          <text:p/>
        </draw:polygon>
        <draw:polygon draw:style-name="gr269" draw:text-style-name="P267" draw:layer="layout" svg:width="0.027cm" svg:height="0.027cm" svg:x="5.167cm" svg:y="17.994cm" svg:viewBox="0 0 28 28" draw:points="0,0 28,0 28,28 0,28">
          <text:p/>
        </draw:polygon>
        <draw:polygon draw:style-name="gr269" draw:text-style-name="P267" draw:layer="layout" svg:width="0.027cm" svg:height="0.027cm" svg:x="5.22cm" svg:y="17.994cm" svg:viewBox="0 0 28 28" draw:points="0,0 28,0 28,28 0,28">
          <text:p/>
        </draw:polygon>
        <draw:polygon draw:style-name="gr269" draw:text-style-name="P267" draw:layer="layout" svg:width="0.027cm" svg:height="0.027cm" svg:x="5.273cm" svg:y="17.994cm" svg:viewBox="0 0 28 28" draw:points="0,0 28,0 28,28 0,28">
          <text:p/>
        </draw:polygon>
        <draw:polygon draw:style-name="gr269" draw:text-style-name="P267" draw:layer="layout" svg:width="0.027cm" svg:height="0.027cm" svg:x="5.326cm" svg:y="17.994cm" svg:viewBox="0 0 28 28" draw:points="0,0 28,0 28,28 0,28">
          <text:p/>
        </draw:polygon>
        <draw:polygon draw:style-name="gr269" draw:text-style-name="P267" draw:layer="layout" svg:width="0.027cm" svg:height="0.027cm" svg:x="5.379cm" svg:y="17.994cm" svg:viewBox="0 0 28 28" draw:points="0,0 28,0 28,28 0,28">
          <text:p/>
        </draw:polygon>
        <draw:polygon draw:style-name="gr269" draw:text-style-name="P267" draw:layer="layout" svg:width="0.027cm" svg:height="0.027cm" svg:x="5.432cm" svg:y="17.994cm" svg:viewBox="0 0 28 28" draw:points="0,0 28,0 28,28 0,28">
          <text:p/>
        </draw:polygon>
        <draw:polygon draw:style-name="gr269" draw:text-style-name="P267" draw:layer="layout" svg:width="0.027cm" svg:height="0.027cm" svg:x="5.485cm" svg:y="17.994cm" svg:viewBox="0 0 28 28" draw:points="0,0 28,0 28,28 0,28">
          <text:p/>
        </draw:polygon>
        <draw:polygon draw:style-name="gr269" draw:text-style-name="P267" draw:layer="layout" svg:width="0.027cm" svg:height="0.027cm" svg:x="5.538cm" svg:y="17.994cm" svg:viewBox="0 0 28 28" draw:points="0,0 28,0 28,28 0,28">
          <text:p/>
        </draw:polygon>
        <draw:polygon draw:style-name="gr269" draw:text-style-name="P267" draw:layer="layout" svg:width="0.027cm" svg:height="0.027cm" svg:x="5.591cm" svg:y="17.994cm" svg:viewBox="0 0 28 28" draw:points="0,0 28,0 28,28 0,28">
          <text:p/>
        </draw:polygon>
        <draw:polygon draw:style-name="gr269" draw:text-style-name="P267" draw:layer="layout" svg:width="0.027cm" svg:height="0.027cm" svg:x="5.644cm" svg:y="17.994cm" svg:viewBox="0 0 28 28" draw:points="0,0 28,0 28,28 0,28">
          <text:p/>
        </draw:polygon>
        <draw:polygon draw:style-name="gr269" draw:text-style-name="P267" draw:layer="layout" svg:width="0.027cm" svg:height="0.027cm" svg:x="5.697cm" svg:y="17.994cm" svg:viewBox="0 0 28 28" draw:points="0,0 28,0 28,28 0,28">
          <text:p/>
        </draw:polygon>
        <draw:polygon draw:style-name="gr269" draw:text-style-name="P267" draw:layer="layout" svg:width="0.027cm" svg:height="0.027cm" svg:x="5.75cm" svg:y="17.994cm" svg:viewBox="0 0 28 28" draw:points="0,0 28,0 28,28 0,28">
          <text:p/>
        </draw:polygon>
        <draw:polygon draw:style-name="gr269" draw:text-style-name="P267" draw:layer="layout" svg:width="0.027cm" svg:height="0.027cm" svg:x="5.803cm" svg:y="17.994cm" svg:viewBox="0 0 28 28" draw:points="0,0 28,0 28,28 0,28">
          <text:p/>
        </draw:polygon>
        <draw:polygon draw:style-name="gr269" draw:text-style-name="P267" draw:layer="layout" svg:width="0.027cm" svg:height="0.027cm" svg:x="5.856cm" svg:y="17.994cm" svg:viewBox="0 0 28 28" draw:points="0,0 28,0 28,28 0,28">
          <text:p/>
        </draw:polygon>
        <draw:polygon draw:style-name="gr269" draw:text-style-name="P267" draw:layer="layout" svg:width="0.027cm" svg:height="0.027cm" svg:x="5.909cm" svg:y="17.994cm" svg:viewBox="0 0 28 28" draw:points="0,0 28,0 28,28 0,28">
          <text:p/>
        </draw:polygon>
        <draw:polygon draw:style-name="gr269" draw:text-style-name="P267" draw:layer="layout" svg:width="0.027cm" svg:height="0.027cm" svg:x="5.962cm" svg:y="17.994cm" svg:viewBox="0 0 28 28" draw:points="0,0 28,0 28,28 0,28">
          <text:p/>
        </draw:polygon>
        <draw:polygon draw:style-name="gr269" draw:text-style-name="P267" draw:layer="layout" svg:width="0.027cm" svg:height="0.027cm" svg:x="6.015cm" svg:y="17.994cm" svg:viewBox="0 0 28 28" draw:points="0,0 28,0 28,28 0,28">
          <text:p/>
        </draw:polygon>
        <draw:polygon draw:style-name="gr269" draw:text-style-name="P267" draw:layer="layout" svg:width="0.027cm" svg:height="0.027cm" svg:x="6.068cm" svg:y="17.994cm" svg:viewBox="0 0 28 28" draw:points="0,0 28,0 28,28 0,28">
          <text:p/>
        </draw:polygon>
        <draw:polygon draw:style-name="gr269" draw:text-style-name="P267" draw:layer="layout" svg:width="0.027cm" svg:height="0.027cm" svg:x="6.121cm" svg:y="17.994cm" svg:viewBox="0 0 28 28" draw:points="0,0 28,0 28,28 0,28">
          <text:p/>
        </draw:polygon>
        <draw:polygon draw:style-name="gr269" draw:text-style-name="P267" draw:layer="layout" svg:width="0.028cm" svg:height="0.027cm" svg:x="6.174cm" svg:y="17.994cm" svg:viewBox="0 0 29 28" draw:points="0,0 29,0 29,28 0,28">
          <text:p/>
        </draw:polygon>
        <draw:polygon draw:style-name="gr269" draw:text-style-name="P267" draw:layer="layout" svg:width="0.027cm" svg:height="0.027cm" svg:x="6.227cm" svg:y="17.994cm" svg:viewBox="0 0 28 28" draw:points="0,0 28,0 28,28 0,28">
          <text:p/>
        </draw:polygon>
        <draw:polygon draw:style-name="gr269" draw:text-style-name="P267" draw:layer="layout" svg:width="0.027cm" svg:height="0.027cm" svg:x="6.28cm" svg:y="17.994cm" svg:viewBox="0 0 28 28" draw:points="0,0 28,0 28,28 0,28">
          <text:p/>
        </draw:polygon>
        <draw:polygon draw:style-name="gr269" draw:text-style-name="P267" draw:layer="layout" svg:width="0.027cm" svg:height="0.027cm" svg:x="6.333cm" svg:y="17.994cm" svg:viewBox="0 0 28 28" draw:points="0,0 28,0 28,28 0,28">
          <text:p/>
        </draw:polygon>
        <draw:polygon draw:style-name="gr269" draw:text-style-name="P267" draw:layer="layout" svg:width="0.026cm" svg:height="0.027cm" svg:x="6.387cm" svg:y="17.994cm" svg:viewBox="0 0 27 28" draw:points="0,0 27,0 27,28 0,28">
          <text:p/>
        </draw:polygon>
        <draw:polygon draw:style-name="gr269" draw:text-style-name="P267" draw:layer="layout" svg:width="0.026cm" svg:height="0.027cm" svg:x="6.44cm" svg:y="17.994cm" svg:viewBox="0 0 27 28" draw:points="0,0 27,0 27,28 0,28">
          <text:p/>
        </draw:polygon>
        <draw:polygon draw:style-name="gr269" draw:text-style-name="P267" draw:layer="layout" svg:width="0.026cm" svg:height="0.027cm" svg:x="6.493cm" svg:y="17.994cm" svg:viewBox="0 0 27 28" draw:points="0,0 27,0 27,28 0,28">
          <text:p/>
        </draw:polygon>
        <draw:polygon draw:style-name="gr269" draw:text-style-name="P267" draw:layer="layout" svg:width="0.026cm" svg:height="0.027cm" svg:x="6.546cm" svg:y="17.994cm" svg:viewBox="0 0 27 28" draw:points="0,0 27,0 27,28 0,28">
          <text:p/>
        </draw:polygon>
        <draw:polygon draw:style-name="gr269" draw:text-style-name="P267" draw:layer="layout" svg:width="0.026cm" svg:height="0.027cm" svg:x="6.599cm" svg:y="17.994cm" svg:viewBox="0 0 27 28" draw:points="0,0 27,0 27,28 0,28">
          <text:p/>
        </draw:polygon>
        <draw:polygon draw:style-name="gr269" draw:text-style-name="P267" draw:layer="layout" svg:width="0.026cm" svg:height="0.027cm" svg:x="6.652cm" svg:y="17.994cm" svg:viewBox="0 0 27 28" draw:points="0,0 27,0 27,28 0,28">
          <text:p/>
        </draw:polygon>
        <draw:polygon draw:style-name="gr269" draw:text-style-name="P267" draw:layer="layout" svg:width="0.026cm" svg:height="0.027cm" svg:x="6.705cm" svg:y="17.994cm" svg:viewBox="0 0 27 28" draw:points="0,0 27,0 27,28 0,28">
          <text:p/>
        </draw:polygon>
        <draw:polygon draw:style-name="gr269" draw:text-style-name="P267" draw:layer="layout" svg:width="0.026cm" svg:height="0.027cm" svg:x="6.758cm" svg:y="17.994cm" svg:viewBox="0 0 27 28" draw:points="0,0 27,0 27,28 0,28">
          <text:p/>
        </draw:polygon>
        <draw:polygon draw:style-name="gr269" draw:text-style-name="P267" draw:layer="layout" svg:width="0.026cm" svg:height="0.027cm" svg:x="6.811cm" svg:y="17.994cm" svg:viewBox="0 0 27 28" draw:points="0,0 27,0 27,28 0,28">
          <text:p/>
        </draw:polygon>
        <draw:polygon draw:style-name="gr269" draw:text-style-name="P267" draw:layer="layout" svg:width="0.026cm" svg:height="0.027cm" svg:x="6.864cm" svg:y="17.994cm" svg:viewBox="0 0 27 28" draw:points="0,0 27,0 27,28 0,28">
          <text:p/>
        </draw:polygon>
        <draw:polygon draw:style-name="gr269" draw:text-style-name="P267" draw:layer="layout" svg:width="0.026cm" svg:height="0.027cm" svg:x="6.917cm" svg:y="17.994cm" svg:viewBox="0 0 27 28" draw:points="0,0 27,0 27,28 0,28">
          <text:p/>
        </draw:polygon>
        <draw:polygon draw:style-name="gr269" draw:text-style-name="P267" draw:layer="layout" svg:width="0.026cm" svg:height="0.027cm" svg:x="6.97cm" svg:y="17.994cm" svg:viewBox="0 0 27 28" draw:points="0,0 27,0 27,28 0,28">
          <text:p/>
        </draw:polygon>
        <draw:polygon draw:style-name="gr269" draw:text-style-name="P267" draw:layer="layout" svg:width="0.026cm" svg:height="0.027cm" svg:x="7.023cm" svg:y="17.994cm" svg:viewBox="0 0 27 28" draw:points="0,0 27,0 27,28 0,28">
          <text:p/>
        </draw:polygon>
        <draw:polygon draw:style-name="gr269" draw:text-style-name="P267" draw:layer="layout" svg:width="0.026cm" svg:height="0.027cm" svg:x="7.076cm" svg:y="17.994cm" svg:viewBox="0 0 27 28" draw:points="0,0 27,0 27,28 0,28">
          <text:p/>
        </draw:polygon>
        <draw:polygon draw:style-name="gr269" draw:text-style-name="P267" draw:layer="layout" svg:width="0.026cm" svg:height="0.027cm" svg:x="7.129cm" svg:y="17.994cm" svg:viewBox="0 0 27 28" draw:points="0,0 27,0 27,28 0,28">
          <text:p/>
        </draw:polygon>
        <draw:polygon draw:style-name="gr269" draw:text-style-name="P267" draw:layer="layout" svg:width="0.026cm" svg:height="0.027cm" svg:x="7.182cm" svg:y="17.994cm" svg:viewBox="0 0 27 28" draw:points="0,0 27,0 27,28 0,28">
          <text:p/>
        </draw:polygon>
        <draw:polygon draw:style-name="gr269" draw:text-style-name="P267" draw:layer="layout" svg:width="0.026cm" svg:height="0.027cm" svg:x="7.235cm" svg:y="17.994cm" svg:viewBox="0 0 27 28" draw:points="0,0 27,0 27,28 0,28">
          <text:p/>
        </draw:polygon>
        <draw:polygon draw:style-name="gr269" draw:text-style-name="P267" draw:layer="layout" svg:width="0.026cm" svg:height="0.027cm" svg:x="7.288cm" svg:y="17.994cm" svg:viewBox="0 0 27 28" draw:points="0,0 27,0 27,28 0,28">
          <text:p/>
        </draw:polygon>
        <draw:polygon draw:style-name="gr269" draw:text-style-name="P267" draw:layer="layout" svg:width="0.026cm" svg:height="0.027cm" svg:x="7.341cm" svg:y="17.994cm" svg:viewBox="0 0 27 28" draw:points="0,0 27,0 27,28 0,28">
          <text:p/>
        </draw:polygon>
        <draw:polygon draw:style-name="gr269" draw:text-style-name="P267" draw:layer="layout" svg:width="0.026cm" svg:height="0.027cm" svg:x="7.394cm" svg:y="17.994cm" svg:viewBox="0 0 27 28" draw:points="0,0 27,0 27,28 0,28">
          <text:p/>
        </draw:polygon>
        <draw:polygon draw:style-name="gr269" draw:text-style-name="P267" draw:layer="layout" svg:width="0.026cm" svg:height="0.027cm" svg:x="7.447cm" svg:y="17.994cm" svg:viewBox="0 0 27 28" draw:points="0,0 27,0 27,28 0,28">
          <text:p/>
        </draw:polygon>
        <draw:polygon draw:style-name="gr269" draw:text-style-name="P267" draw:layer="layout" svg:width="0.026cm" svg:height="0.027cm" svg:x="7.5cm" svg:y="17.994cm" svg:viewBox="0 0 27 28" draw:points="0,0 27,0 27,28 0,28">
          <text:p/>
        </draw:polygon>
        <draw:polygon draw:style-name="gr269" draw:text-style-name="P267" draw:layer="layout" svg:width="0.026cm" svg:height="0.027cm" svg:x="7.553cm" svg:y="17.994cm" svg:viewBox="0 0 27 28" draw:points="0,0 27,0 27,28 0,28">
          <text:p/>
        </draw:polygon>
        <draw:polygon draw:style-name="gr269" draw:text-style-name="P267" draw:layer="layout" svg:width="0.026cm" svg:height="0.027cm" svg:x="7.606cm" svg:y="17.994cm" svg:viewBox="0 0 27 28" draw:points="0,0 27,0 27,28 0,28">
          <text:p/>
        </draw:polygon>
        <draw:polygon draw:style-name="gr269" draw:text-style-name="P267" draw:layer="layout" svg:width="0.026cm" svg:height="0.027cm" svg:x="7.659cm" svg:y="17.994cm" svg:viewBox="0 0 27 28" draw:points="0,0 27,0 27,28 0,28">
          <text:p/>
        </draw:polygon>
        <draw:polygon draw:style-name="gr269" draw:text-style-name="P267" draw:layer="layout" svg:width="0.026cm" svg:height="0.027cm" svg:x="7.712cm" svg:y="17.994cm" svg:viewBox="0 0 27 28" draw:points="0,0 27,0 27,28 0,28">
          <text:p/>
        </draw:polygon>
        <draw:polygon draw:style-name="gr269" draw:text-style-name="P267" draw:layer="layout" svg:width="0.026cm" svg:height="0.027cm" svg:x="7.765cm" svg:y="17.994cm" svg:viewBox="0 0 27 28" draw:points="0,0 27,0 27,28 0,28">
          <text:p/>
        </draw:polygon>
        <draw:polygon draw:style-name="gr269" draw:text-style-name="P267" draw:layer="layout" svg:width="0.026cm" svg:height="0.027cm" svg:x="7.818cm" svg:y="17.994cm" svg:viewBox="0 0 27 28" draw:points="0,0 27,0 27,28 0,28">
          <text:p/>
        </draw:polygon>
        <draw:polygon draw:style-name="gr269" draw:text-style-name="P267" draw:layer="layout" svg:width="0.026cm" svg:height="0.027cm" svg:x="7.871cm" svg:y="17.994cm" svg:viewBox="0 0 27 28" draw:points="0,0 27,0 27,28 0,28">
          <text:p/>
        </draw:polygon>
        <draw:polygon draw:style-name="gr269" draw:text-style-name="P267" draw:layer="layout" svg:width="0.026cm" svg:height="0.027cm" svg:x="7.924cm" svg:y="17.994cm" svg:viewBox="0 0 27 28" draw:points="0,0 27,0 27,28 0,28">
          <text:p/>
        </draw:polygon>
        <draw:polygon draw:style-name="gr269" draw:text-style-name="P267" draw:layer="layout" svg:width="0.026cm" svg:height="0.027cm" svg:x="7.977cm" svg:y="17.994cm" svg:viewBox="0 0 27 28" draw:points="0,0 27,0 27,28 0,28">
          <text:p/>
        </draw:polygon>
        <draw:polygon draw:style-name="gr269" draw:text-style-name="P267" draw:layer="layout" svg:width="0.026cm" svg:height="0.027cm" svg:x="8.03cm" svg:y="17.994cm" svg:viewBox="0 0 27 28" draw:points="0,0 27,0 27,28 0,28">
          <text:p/>
        </draw:polygon>
        <draw:polygon draw:style-name="gr269" draw:text-style-name="P267" draw:layer="layout" svg:width="0.026cm" svg:height="0.027cm" svg:x="8.083cm" svg:y="17.994cm" svg:viewBox="0 0 27 28" draw:points="0,0 27,0 27,28 0,28">
          <text:p/>
        </draw:polygon>
        <draw:polygon draw:style-name="gr269" draw:text-style-name="P267" draw:layer="layout" svg:width="0.026cm" svg:height="0.027cm" svg:x="8.136cm" svg:y="17.994cm" svg:viewBox="0 0 27 28" draw:points="0,0 27,0 27,28 0,28">
          <text:p/>
        </draw:polygon>
        <draw:polygon draw:style-name="gr269" draw:text-style-name="P267" draw:layer="layout" svg:width="0.026cm" svg:height="0.027cm" svg:x="8.189cm" svg:y="17.994cm" svg:viewBox="0 0 27 28" draw:points="0,0 27,0 27,28 0,28">
          <text:p/>
        </draw:polygon>
        <draw:polygon draw:style-name="gr269" draw:text-style-name="P267" draw:layer="layout" svg:width="0.026cm" svg:height="0.027cm" svg:x="8.242cm" svg:y="17.994cm" svg:viewBox="0 0 27 28" draw:points="0,0 27,0 27,28 0,28">
          <text:p/>
        </draw:polygon>
        <draw:polygon draw:style-name="gr269" draw:text-style-name="P267" draw:layer="layout" svg:width="0.026cm" svg:height="0.027cm" svg:x="8.295cm" svg:y="17.994cm" svg:viewBox="0 0 27 28" draw:points="0,0 27,0 27,28 0,28">
          <text:p/>
        </draw:polygon>
        <draw:polygon draw:style-name="gr269" draw:text-style-name="P267" draw:layer="layout" svg:width="0.026cm" svg:height="0.027cm" svg:x="8.348cm" svg:y="17.994cm" svg:viewBox="0 0 27 28" draw:points="0,0 27,0 27,28 0,28">
          <text:p/>
        </draw:polygon>
        <draw:polygon draw:style-name="gr269" draw:text-style-name="P267" draw:layer="layout" svg:width="0.026cm" svg:height="0.027cm" svg:x="8.401cm" svg:y="17.994cm" svg:viewBox="0 0 27 28" draw:points="0,0 27,0 27,28 0,28">
          <text:p/>
        </draw:polygon>
        <draw:polygon draw:style-name="gr269" draw:text-style-name="P267" draw:layer="layout" svg:width="0.026cm" svg:height="0.027cm" svg:x="8.454cm" svg:y="17.994cm" svg:viewBox="0 0 27 28" draw:points="0,0 27,0 27,28 0,28">
          <text:p/>
        </draw:polygon>
        <draw:polygon draw:style-name="gr269" draw:text-style-name="P267" draw:layer="layout" svg:width="0.026cm" svg:height="0.027cm" svg:x="8.507cm" svg:y="17.994cm" svg:viewBox="0 0 27 28" draw:points="0,0 27,0 27,28 0,28">
          <text:p/>
        </draw:polygon>
        <draw:polygon draw:style-name="gr269" draw:text-style-name="P267" draw:layer="layout" svg:width="0.026cm" svg:height="0.027cm" svg:x="8.56cm" svg:y="17.994cm" svg:viewBox="0 0 27 28" draw:points="0,0 27,0 27,28 0,28">
          <text:p/>
        </draw:polygon>
        <draw:polygon draw:style-name="gr269" draw:text-style-name="P267" draw:layer="layout" svg:width="0.026cm" svg:height="0.027cm" svg:x="8.613cm" svg:y="17.994cm" svg:viewBox="0 0 27 28" draw:points="0,0 27,0 27,28 0,28">
          <text:p/>
        </draw:polygon>
        <draw:polygon draw:style-name="gr269" draw:text-style-name="P267" draw:layer="layout" svg:width="0.026cm" svg:height="0.027cm" svg:x="8.666cm" svg:y="17.994cm" svg:viewBox="0 0 27 28" draw:points="0,0 27,0 27,28 0,28">
          <text:p/>
        </draw:polygon>
        <draw:polygon draw:style-name="gr269" draw:text-style-name="P267" draw:layer="layout" svg:width="0.026cm" svg:height="0.027cm" svg:x="8.719cm" svg:y="17.994cm" svg:viewBox="0 0 27 28" draw:points="0,0 27,0 27,28 0,28">
          <text:p/>
        </draw:polygon>
        <draw:polygon draw:style-name="gr269" draw:text-style-name="P267" draw:layer="layout" svg:width="0.026cm" svg:height="0.027cm" svg:x="8.772cm" svg:y="17.994cm" svg:viewBox="0 0 27 28" draw:points="0,0 27,0 27,28 0,28">
          <text:p/>
        </draw:polygon>
        <draw:polygon draw:style-name="gr269" draw:text-style-name="P267" draw:layer="layout" svg:width="0.026cm" svg:height="0.027cm" svg:x="8.825cm" svg:y="17.994cm" svg:viewBox="0 0 27 28" draw:points="0,0 27,0 27,28 0,28">
          <text:p/>
        </draw:polygon>
        <draw:polygon draw:style-name="gr269" draw:text-style-name="P267" draw:layer="layout" svg:width="0.026cm" svg:height="0.027cm" svg:x="8.878cm" svg:y="17.994cm" svg:viewBox="0 0 27 28" draw:points="0,0 27,0 27,28 0,28">
          <text:p/>
        </draw:polygon>
        <draw:polygon draw:style-name="gr269" draw:text-style-name="P267" draw:layer="layout" svg:width="0.026cm" svg:height="0.027cm" svg:x="8.931cm" svg:y="17.994cm" svg:viewBox="0 0 27 28" draw:points="0,0 27,0 27,28 0,28">
          <text:p/>
        </draw:polygon>
        <draw:polygon draw:style-name="gr269" draw:text-style-name="P267" draw:layer="layout" svg:width="0.026cm" svg:height="0.027cm" svg:x="8.984cm" svg:y="17.994cm" svg:viewBox="0 0 27 28" draw:points="0,0 27,0 27,28 0,28">
          <text:p/>
        </draw:polygon>
        <draw:polygon draw:style-name="gr269" draw:text-style-name="P267" draw:layer="layout" svg:width="0.026cm" svg:height="0.027cm" svg:x="9.037cm" svg:y="17.994cm" svg:viewBox="0 0 27 28" draw:points="0,0 27,0 27,28 0,28">
          <text:p/>
        </draw:polygon>
        <draw:polygon draw:style-name="gr269" draw:text-style-name="P267" draw:layer="layout" svg:width="0.026cm" svg:height="0.027cm" svg:x="9.09cm" svg:y="17.994cm" svg:viewBox="0 0 27 28" draw:points="0,0 27,0 27,28 0,28">
          <text:p/>
        </draw:polygon>
        <draw:polygon draw:style-name="gr269" draw:text-style-name="P267" draw:layer="layout" svg:width="0.026cm" svg:height="0.027cm" svg:x="9.143cm" svg:y="17.994cm" svg:viewBox="0 0 27 28" draw:points="0,0 27,0 27,28 0,28">
          <text:p/>
        </draw:polygon>
        <draw:polygon draw:style-name="gr269" draw:text-style-name="P267" draw:layer="layout" svg:width="0.026cm" svg:height="0.027cm" svg:x="9.196cm" svg:y="17.994cm" svg:viewBox="0 0 27 28" draw:points="0,0 27,0 27,28 0,28">
          <text:p/>
        </draw:polygon>
        <draw:polygon draw:style-name="gr269" draw:text-style-name="P267" draw:layer="layout" svg:width="0.026cm" svg:height="0.027cm" svg:x="9.249cm" svg:y="17.994cm" svg:viewBox="0 0 27 28" draw:points="0,0 27,0 27,28 0,28">
          <text:p/>
        </draw:polygon>
        <draw:polygon draw:style-name="gr269" draw:text-style-name="P267" draw:layer="layout" svg:width="0.026cm" svg:height="0.027cm" svg:x="9.302cm" svg:y="17.994cm" svg:viewBox="0 0 27 28" draw:points="0,0 27,0 27,28 0,28">
          <text:p/>
        </draw:polygon>
        <draw:polygon draw:style-name="gr269" draw:text-style-name="P267" draw:layer="layout" svg:width="0.026cm" svg:height="0.027cm" svg:x="9.355cm" svg:y="17.994cm" svg:viewBox="0 0 27 28" draw:points="0,0 27,0 27,28 0,28">
          <text:p/>
        </draw:polygon>
        <draw:polygon draw:style-name="gr269" draw:text-style-name="P267" draw:layer="layout" svg:width="0.026cm" svg:height="0.027cm" svg:x="9.408cm" svg:y="17.994cm" svg:viewBox="0 0 27 28" draw:points="0,0 27,0 27,28 0,28">
          <text:p/>
        </draw:polygon>
        <draw:polygon draw:style-name="gr269" draw:text-style-name="P267" draw:layer="layout" svg:width="0.026cm" svg:height="0.027cm" svg:x="9.461cm" svg:y="17.994cm" svg:viewBox="0 0 27 28" draw:points="0,0 27,0 27,28 0,28">
          <text:p/>
        </draw:polygon>
        <draw:polygon draw:style-name="gr269" draw:text-style-name="P267" draw:layer="layout" svg:width="0.026cm" svg:height="0.027cm" svg:x="9.514cm" svg:y="17.994cm" svg:viewBox="0 0 27 28" draw:points="0,0 27,0 27,28 0,28">
          <text:p/>
        </draw:polygon>
        <draw:polygon draw:style-name="gr269" draw:text-style-name="P267" draw:layer="layout" svg:width="0.026cm" svg:height="0.027cm" svg:x="9.567cm" svg:y="17.994cm" svg:viewBox="0 0 27 28" draw:points="0,0 27,0 27,28 0,28">
          <text:p/>
        </draw:polygon>
        <draw:polygon draw:style-name="gr269" draw:text-style-name="P267" draw:layer="layout" svg:width="0.026cm" svg:height="0.027cm" svg:x="9.62cm" svg:y="17.994cm" svg:viewBox="0 0 27 28" draw:points="0,0 27,0 27,28 0,28">
          <text:p/>
        </draw:polygon>
        <draw:polygon draw:style-name="gr269" draw:text-style-name="P267" draw:layer="layout" svg:width="0.026cm" svg:height="0.027cm" svg:x="9.673cm" svg:y="17.994cm" svg:viewBox="0 0 27 28" draw:points="0,0 27,0 27,28 0,28">
          <text:p/>
        </draw:polygon>
        <draw:polygon draw:style-name="gr269" draw:text-style-name="P267" draw:layer="layout" svg:width="0.026cm" svg:height="0.027cm" svg:x="9.726cm" svg:y="17.994cm" svg:viewBox="0 0 27 28" draw:points="0,0 27,0 27,28 0,28">
          <text:p/>
        </draw:polygon>
        <draw:polygon draw:style-name="gr269" draw:text-style-name="P267" draw:layer="layout" svg:width="0.026cm" svg:height="0.027cm" svg:x="9.779cm" svg:y="17.994cm" svg:viewBox="0 0 27 28" draw:points="0,0 27,0 27,28 0,28">
          <text:p/>
        </draw:polygon>
        <draw:polygon draw:style-name="gr269" draw:text-style-name="P267" draw:layer="layout" svg:width="0.026cm" svg:height="0.027cm" svg:x="9.832cm" svg:y="17.994cm" svg:viewBox="0 0 27 28" draw:points="0,0 27,0 27,28 0,28">
          <text:p/>
        </draw:polygon>
        <draw:polygon draw:style-name="gr269" draw:text-style-name="P267" draw:layer="layout" svg:width="0.026cm" svg:height="0.027cm" svg:x="9.885cm" svg:y="17.994cm" svg:viewBox="0 0 27 28" draw:points="0,0 27,0 27,28 0,28">
          <text:p/>
        </draw:polygon>
        <draw:polygon draw:style-name="gr269" draw:text-style-name="P267" draw:layer="layout" svg:width="0.026cm" svg:height="0.027cm" svg:x="9.938cm" svg:y="17.994cm" svg:viewBox="0 0 27 28" draw:points="0,0 27,0 27,28 0,28">
          <text:p/>
        </draw:polygon>
        <draw:polygon draw:style-name="gr269" draw:text-style-name="P267" draw:layer="layout" svg:width="0.026cm" svg:height="0.027cm" svg:x="9.991cm" svg:y="17.994cm" svg:viewBox="0 0 27 28" draw:points="0,0 27,0 27,28 0,28">
          <text:p/>
        </draw:polygon>
        <draw:polygon draw:style-name="gr269" draw:text-style-name="P267" draw:layer="layout" svg:width="0.026cm" svg:height="0.027cm" svg:x="10.044cm" svg:y="17.994cm" svg:viewBox="0 0 27 28" draw:points="0,0 27,0 27,28 0,28">
          <text:p/>
        </draw:polygon>
        <draw:polygon draw:style-name="gr269" draw:text-style-name="P267" draw:layer="layout" svg:width="0.026cm" svg:height="0.027cm" svg:x="10.097cm" svg:y="17.994cm" svg:viewBox="0 0 27 28" draw:points="0,0 27,0 27,28 0,28">
          <text:p/>
        </draw:polygon>
        <draw:polygon draw:style-name="gr269" draw:text-style-name="P267" draw:layer="layout" svg:width="0.026cm" svg:height="0.027cm" svg:x="10.15cm" svg:y="17.994cm" svg:viewBox="0 0 27 28" draw:points="0,0 27,0 27,28 0,28">
          <text:p/>
        </draw:polygon>
        <draw:polygon draw:style-name="gr269" draw:text-style-name="P267" draw:layer="layout" svg:width="0.026cm" svg:height="0.027cm" svg:x="10.203cm" svg:y="17.994cm" svg:viewBox="0 0 27 28" draw:points="0,0 27,0 27,28 0,28">
          <text:p/>
        </draw:polygon>
        <draw:polygon draw:style-name="gr269" draw:text-style-name="P267" draw:layer="layout" svg:width="0.026cm" svg:height="0.027cm" svg:x="10.256cm" svg:y="17.994cm" svg:viewBox="0 0 27 28" draw:points="0,0 27,0 27,28 0,28">
          <text:p/>
        </draw:polygon>
        <draw:polygon draw:style-name="gr269" draw:text-style-name="P267" draw:layer="layout" svg:width="0.026cm" svg:height="0.027cm" svg:x="10.309cm" svg:y="17.994cm" svg:viewBox="0 0 27 28" draw:points="0,0 27,0 27,28 0,28">
          <text:p/>
        </draw:polygon>
        <draw:polygon draw:style-name="gr269" draw:text-style-name="P267" draw:layer="layout" svg:width="0.026cm" svg:height="0.027cm" svg:x="10.362cm" svg:y="17.994cm" svg:viewBox="0 0 27 28" draw:points="0,0 27,0 27,28 0,28">
          <text:p/>
        </draw:polygon>
        <draw:polygon draw:style-name="gr269" draw:text-style-name="P267" draw:layer="layout" svg:width="0.026cm" svg:height="0.027cm" svg:x="10.415cm" svg:y="17.994cm" svg:viewBox="0 0 27 28" draw:points="0,0 27,0 27,28 0,28">
          <text:p/>
        </draw:polygon>
        <draw:polygon draw:style-name="gr269" draw:text-style-name="P267" draw:layer="layout" svg:width="0.026cm" svg:height="0.027cm" svg:x="10.468cm" svg:y="17.994cm" svg:viewBox="0 0 27 28" draw:points="0,0 27,0 27,28 0,28">
          <text:p/>
        </draw:polygon>
        <draw:polygon draw:style-name="gr269" draw:text-style-name="P267" draw:layer="layout" svg:width="0.026cm" svg:height="0.027cm" svg:x="10.521cm" svg:y="17.994cm" svg:viewBox="0 0 27 28" draw:points="0,0 27,0 27,28 0,28">
          <text:p/>
        </draw:polygon>
        <draw:polygon draw:style-name="gr269" draw:text-style-name="P267" draw:layer="layout" svg:width="0.026cm" svg:height="0.027cm" svg:x="10.574cm" svg:y="17.994cm" svg:viewBox="0 0 27 28" draw:points="0,0 27,0 27,28 0,28">
          <text:p/>
        </draw:polygon>
        <draw:polygon draw:style-name="gr269" draw:text-style-name="P267" draw:layer="layout" svg:width="0.026cm" svg:height="0.027cm" svg:x="10.627cm" svg:y="17.994cm" svg:viewBox="0 0 27 28" draw:points="0,0 27,0 27,28 0,28">
          <text:p/>
        </draw:polygon>
        <draw:polygon draw:style-name="gr269" draw:text-style-name="P267" draw:layer="layout" svg:width="0.026cm" svg:height="0.027cm" svg:x="10.68cm" svg:y="17.994cm" svg:viewBox="0 0 27 28" draw:points="0,0 27,0 27,28 0,28">
          <text:p/>
        </draw:polygon>
        <draw:polygon draw:style-name="gr269" draw:text-style-name="P267" draw:layer="layout" svg:width="0.026cm" svg:height="0.027cm" svg:x="10.733cm" svg:y="17.994cm" svg:viewBox="0 0 27 28" draw:points="0,0 27,0 27,28 0,28">
          <text:p/>
        </draw:polygon>
        <draw:polygon draw:style-name="gr269" draw:text-style-name="P267" draw:layer="layout" svg:width="0.026cm" svg:height="0.027cm" svg:x="10.786cm" svg:y="17.994cm" svg:viewBox="0 0 27 28" draw:points="0,0 27,0 27,28 0,28">
          <text:p/>
        </draw:polygon>
        <draw:polygon draw:style-name="gr269" draw:text-style-name="P267" draw:layer="layout" svg:width="0.026cm" svg:height="0.027cm" svg:x="10.839cm" svg:y="17.994cm" svg:viewBox="0 0 27 28" draw:points="0,0 27,0 27,28 0,28">
          <text:p/>
        </draw:polygon>
        <draw:polygon draw:style-name="gr269" draw:text-style-name="P267" draw:layer="layout" svg:width="0.026cm" svg:height="0.027cm" svg:x="10.892cm" svg:y="17.994cm" svg:viewBox="0 0 27 28" draw:points="0,0 27,0 27,28 0,28">
          <text:p/>
        </draw:polygon>
        <draw:polygon draw:style-name="gr269" draw:text-style-name="P267" draw:layer="layout" svg:width="0.026cm" svg:height="0.027cm" svg:x="10.945cm" svg:y="17.994cm" svg:viewBox="0 0 27 28" draw:points="0,0 27,0 27,28 0,28">
          <text:p/>
        </draw:polygon>
        <draw:polygon draw:style-name="gr269" draw:text-style-name="P267" draw:layer="layout" svg:width="0.026cm" svg:height="0.027cm" svg:x="10.998cm" svg:y="17.994cm" svg:viewBox="0 0 27 28" draw:points="0,0 27,0 27,28 0,28">
          <text:p/>
        </draw:polygon>
        <draw:polygon draw:style-name="gr269" draw:text-style-name="P267" draw:layer="layout" svg:width="0.026cm" svg:height="0.027cm" svg:x="11.051cm" svg:y="17.994cm" svg:viewBox="0 0 27 28" draw:points="0,0 27,0 27,28 0,28">
          <text:p/>
        </draw:polygon>
        <draw:polygon draw:style-name="gr269" draw:text-style-name="P267" draw:layer="layout" svg:width="0.026cm" svg:height="0.027cm" svg:x="11.104cm" svg:y="17.994cm" svg:viewBox="0 0 27 28" draw:points="0,0 27,0 27,28 0,28">
          <text:p/>
        </draw:polygon>
        <draw:polygon draw:style-name="gr269" draw:text-style-name="P267" draw:layer="layout" svg:width="0.026cm" svg:height="0.027cm" svg:x="11.157cm" svg:y="17.994cm" svg:viewBox="0 0 27 28" draw:points="0,0 27,0 27,28 0,28">
          <text:p/>
        </draw:polygon>
        <draw:polygon draw:style-name="gr269" draw:text-style-name="P267" draw:layer="layout" svg:width="0.026cm" svg:height="0.027cm" svg:x="11.21cm" svg:y="17.994cm" svg:viewBox="0 0 27 28" draw:points="0,0 27,0 27,28 0,28">
          <text:p/>
        </draw:polygon>
        <draw:polygon draw:style-name="gr269" draw:text-style-name="P267" draw:layer="layout" svg:width="0.026cm" svg:height="0.027cm" svg:x="11.263cm" svg:y="17.994cm" svg:viewBox="0 0 27 28" draw:points="0,0 27,0 27,28 0,28">
          <text:p/>
        </draw:polygon>
        <draw:polygon draw:style-name="gr269" draw:text-style-name="P267" draw:layer="layout" svg:width="0.026cm" svg:height="0.027cm" svg:x="11.316cm" svg:y="17.994cm" svg:viewBox="0 0 27 28" draw:points="0,0 27,0 27,28 0,28">
          <text:p/>
        </draw:polygon>
        <draw:polygon draw:style-name="gr269" draw:text-style-name="P267" draw:layer="layout" svg:width="0.026cm" svg:height="0.027cm" svg:x="11.369cm" svg:y="17.994cm" svg:viewBox="0 0 27 28" draw:points="0,0 27,0 27,28 0,28">
          <text:p/>
        </draw:polygon>
        <draw:polygon draw:style-name="gr269" draw:text-style-name="P267" draw:layer="layout" svg:width="0.026cm" svg:height="0.027cm" svg:x="11.422cm" svg:y="17.994cm" svg:viewBox="0 0 27 28" draw:points="0,0 27,0 27,28 0,28">
          <text:p/>
        </draw:polygon>
        <draw:polygon draw:style-name="gr269" draw:text-style-name="P267" draw:layer="layout" svg:width="0.026cm" svg:height="0.027cm" svg:x="11.475cm" svg:y="17.994cm" svg:viewBox="0 0 27 28" draw:points="0,0 27,0 27,28 0,28">
          <text:p/>
        </draw:polygon>
        <draw:polygon draw:style-name="gr269" draw:text-style-name="P267" draw:layer="layout" svg:width="0.026cm" svg:height="0.027cm" svg:x="11.528cm" svg:y="17.994cm" svg:viewBox="0 0 27 28" draw:points="0,0 27,0 27,28 0,28">
          <text:p/>
        </draw:polygon>
        <draw:polygon draw:style-name="gr269" draw:text-style-name="P267" draw:layer="layout" svg:width="0.026cm" svg:height="0.027cm" svg:x="11.581cm" svg:y="17.994cm" svg:viewBox="0 0 27 28" draw:points="0,0 27,0 27,28 0,28">
          <text:p/>
        </draw:polygon>
        <draw:polygon draw:style-name="gr269" draw:text-style-name="P267" draw:layer="layout" svg:width="0.026cm" svg:height="0.027cm" svg:x="11.634cm" svg:y="17.994cm" svg:viewBox="0 0 27 28" draw:points="0,0 27,0 27,28 0,28">
          <text:p/>
        </draw:polygon>
        <draw:polygon draw:style-name="gr269" draw:text-style-name="P267" draw:layer="layout" svg:width="0.026cm" svg:height="0.027cm" svg:x="11.687cm" svg:y="17.994cm" svg:viewBox="0 0 27 28" draw:points="0,0 27,0 27,28 0,28">
          <text:p/>
        </draw:polygon>
        <draw:polygon draw:style-name="gr269" draw:text-style-name="P267" draw:layer="layout" svg:width="0.026cm" svg:height="0.027cm" svg:x="11.74cm" svg:y="17.994cm" svg:viewBox="0 0 27 28" draw:points="0,0 27,0 27,28 0,28">
          <text:p/>
        </draw:polygon>
        <draw:polygon draw:style-name="gr269" draw:text-style-name="P267" draw:layer="layout" svg:width="0.026cm" svg:height="0.027cm" svg:x="11.793cm" svg:y="17.994cm" svg:viewBox="0 0 27 28" draw:points="0,0 27,0 27,28 0,28">
          <text:p/>
        </draw:polygon>
        <draw:polygon draw:style-name="gr269" draw:text-style-name="P267" draw:layer="layout" svg:width="0.026cm" svg:height="0.027cm" svg:x="11.846cm" svg:y="17.994cm" svg:viewBox="0 0 27 28" draw:points="0,0 27,0 27,28 0,28">
          <text:p/>
        </draw:polygon>
        <draw:polygon draw:style-name="gr269" draw:text-style-name="P267" draw:layer="layout" svg:width="0.026cm" svg:height="0.027cm" svg:x="11.899cm" svg:y="17.994cm" svg:viewBox="0 0 27 28" draw:points="0,0 27,0 27,28 0,28">
          <text:p/>
        </draw:polygon>
        <draw:polygon draw:style-name="gr269" draw:text-style-name="P267" draw:layer="layout" svg:width="0.026cm" svg:height="0.027cm" svg:x="11.952cm" svg:y="17.994cm" svg:viewBox="0 0 27 28" draw:points="0,0 27,0 27,28 0,28">
          <text:p/>
        </draw:polygon>
        <draw:polygon draw:style-name="gr269" draw:text-style-name="P267" draw:layer="layout" svg:width="0.026cm" svg:height="0.027cm" svg:x="12.005cm" svg:y="17.994cm" svg:viewBox="0 0 27 28" draw:points="0,0 27,0 27,28 0,28">
          <text:p/>
        </draw:polygon>
        <draw:polygon draw:style-name="gr269" draw:text-style-name="P267" draw:layer="layout" svg:width="0.026cm" svg:height="0.027cm" svg:x="12.058cm" svg:y="17.994cm" svg:viewBox="0 0 27 28" draw:points="0,0 27,0 27,28 0,28">
          <text:p/>
        </draw:polygon>
        <draw:polygon draw:style-name="gr269" draw:text-style-name="P267" draw:layer="layout" svg:width="0.026cm" svg:height="0.027cm" svg:x="12.111cm" svg:y="17.994cm" svg:viewBox="0 0 27 28" draw:points="0,0 27,0 27,28 0,28">
          <text:p/>
        </draw:polygon>
        <draw:polygon draw:style-name="gr269" draw:text-style-name="P267" draw:layer="layout" svg:width="0.026cm" svg:height="0.027cm" svg:x="12.164cm" svg:y="17.994cm" svg:viewBox="0 0 27 28" draw:points="0,0 27,0 27,28 0,28">
          <text:p/>
        </draw:polygon>
        <draw:polygon draw:style-name="gr269" draw:text-style-name="P267" draw:layer="layout" svg:width="0.026cm" svg:height="0.027cm" svg:x="12.217cm" svg:y="17.994cm" svg:viewBox="0 0 27 28" draw:points="0,0 27,0 27,28 0,28">
          <text:p/>
        </draw:polygon>
        <draw:polygon draw:style-name="gr269" draw:text-style-name="P267" draw:layer="layout" svg:width="0.026cm" svg:height="0.027cm" svg:x="12.27cm" svg:y="17.994cm" svg:viewBox="0 0 27 28" draw:points="0,0 27,0 27,28 0,28">
          <text:p/>
        </draw:polygon>
        <draw:polygon draw:style-name="gr269" draw:text-style-name="P267" draw:layer="layout" svg:width="0.026cm" svg:height="0.027cm" svg:x="12.323cm" svg:y="17.994cm" svg:viewBox="0 0 27 28" draw:points="0,0 27,0 27,28 0,28">
          <text:p/>
        </draw:polygon>
        <draw:polygon draw:style-name="gr269" draw:text-style-name="P267" draw:layer="layout" svg:width="0.026cm" svg:height="0.027cm" svg:x="12.376cm" svg:y="17.994cm" svg:viewBox="0 0 27 28" draw:points="0,0 27,0 27,28 0,28">
          <text:p/>
        </draw:polygon>
        <draw:polygon draw:style-name="gr269" draw:text-style-name="P267" draw:layer="layout" svg:width="0.026cm" svg:height="0.027cm" svg:x="12.429cm" svg:y="17.994cm" svg:viewBox="0 0 27 28" draw:points="0,0 27,0 27,28 0,28">
          <text:p/>
        </draw:polygon>
        <draw:polygon draw:style-name="gr269" draw:text-style-name="P267" draw:layer="layout" svg:width="0.026cm" svg:height="0.027cm" svg:x="12.482cm" svg:y="17.994cm" svg:viewBox="0 0 27 28" draw:points="0,0 27,0 27,28 0,28">
          <text:p/>
        </draw:polygon>
        <draw:polygon draw:style-name="gr269" draw:text-style-name="P267" draw:layer="layout" svg:width="0.026cm" svg:height="0.027cm" svg:x="12.535cm" svg:y="17.994cm" svg:viewBox="0 0 27 28" draw:points="0,0 27,0 27,28 0,28">
          <text:p/>
        </draw:polygon>
        <draw:polygon draw:style-name="gr269" draw:text-style-name="P267" draw:layer="layout" svg:width="0.026cm" svg:height="0.027cm" svg:x="12.588cm" svg:y="17.994cm" svg:viewBox="0 0 27 28" draw:points="0,0 27,0 27,28 0,28">
          <text:p/>
        </draw:polygon>
        <draw:polygon draw:style-name="gr269" draw:text-style-name="P267" draw:layer="layout" svg:width="0.026cm" svg:height="0.027cm" svg:x="12.641cm" svg:y="17.994cm" svg:viewBox="0 0 27 28" draw:points="0,0 27,0 27,28 0,28">
          <text:p/>
        </draw:polygon>
        <draw:polygon draw:style-name="gr269" draw:text-style-name="P267" draw:layer="layout" svg:width="0.027cm" svg:height="0.027cm" svg:x="12.694cm" svg:y="17.994cm" svg:viewBox="0 0 28 28" draw:points="0,0 28,0 28,28 0,28">
          <text:p/>
        </draw:polygon>
        <draw:polygon draw:style-name="gr269" draw:text-style-name="P267" draw:layer="layout" svg:width="0.027cm" svg:height="0.027cm" svg:x="12.747cm" svg:y="17.994cm" svg:viewBox="0 0 28 28" draw:points="0,0 28,0 28,28 0,28">
          <text:p/>
        </draw:polygon>
        <draw:polygon draw:style-name="gr269" draw:text-style-name="P267" draw:layer="layout" svg:width="0.027cm" svg:height="0.027cm" svg:x="12.8cm" svg:y="17.994cm" svg:viewBox="0 0 28 28" draw:points="0,0 28,0 28,28 0,28">
          <text:p/>
        </draw:polygon>
        <draw:polygon draw:style-name="gr269" draw:text-style-name="P267" draw:layer="layout" svg:width="0.027cm" svg:height="0.027cm" svg:x="12.853cm" svg:y="17.994cm" svg:viewBox="0 0 28 28" draw:points="0,0 28,0 28,28 0,28">
          <text:p/>
        </draw:polygon>
        <draw:polygon draw:style-name="gr269" draw:text-style-name="P267" draw:layer="layout" svg:width="0.027cm" svg:height="0.027cm" svg:x="12.906cm" svg:y="17.994cm" svg:viewBox="0 0 28 28" draw:points="0,0 28,0 28,28 0,28">
          <text:p/>
        </draw:polygon>
        <draw:polygon draw:style-name="gr269" draw:text-style-name="P267" draw:layer="layout" svg:width="0.027cm" svg:height="0.027cm" svg:x="12.959cm" svg:y="17.994cm" svg:viewBox="0 0 28 28" draw:points="0,0 28,0 28,28 0,28">
          <text:p/>
        </draw:polygon>
        <draw:polygon draw:style-name="gr269" draw:text-style-name="P267" draw:layer="layout" svg:width="0.028cm" svg:height="0.027cm" svg:x="13.012cm" svg:y="17.994cm" svg:viewBox="0 0 29 28" draw:points="0,0 29,0 29,28 0,28">
          <text:p/>
        </draw:polygon>
        <draw:polygon draw:style-name="gr269" draw:text-style-name="P267" draw:layer="layout" svg:width="0.027cm" svg:height="0.027cm" svg:x="13.065cm" svg:y="17.994cm" svg:viewBox="0 0 28 28" draw:points="0,0 28,0 28,28 0,28">
          <text:p/>
        </draw:polygon>
        <draw:polygon draw:style-name="gr269" draw:text-style-name="P267" draw:layer="layout" svg:width="0.027cm" svg:height="0.027cm" svg:x="13.118cm" svg:y="17.994cm" svg:viewBox="0 0 28 28" draw:points="0,0 28,0 28,28 0,28">
          <text:p/>
        </draw:polygon>
        <draw:polygon draw:style-name="gr269" draw:text-style-name="P267" draw:layer="layout" svg:width="0.027cm" svg:height="0.027cm" svg:x="13.171cm" svg:y="17.994cm" svg:viewBox="0 0 28 28" draw:points="0,0 28,0 28,28 0,28">
          <text:p/>
        </draw:polygon>
        <draw:polygon draw:style-name="gr269" draw:text-style-name="P267" draw:layer="layout" svg:width="0.027cm" svg:height="0.027cm" svg:x="13.224cm" svg:y="17.994cm" svg:viewBox="0 0 28 28" draw:points="0,0 28,0 28,28 0,28">
          <text:p/>
        </draw:polygon>
        <draw:polygon draw:style-name="gr269" draw:text-style-name="P267" draw:layer="layout" svg:width="0.027cm" svg:height="0.027cm" svg:x="13.277cm" svg:y="17.994cm" svg:viewBox="0 0 28 28" draw:points="0,0 28,0 28,28 0,28">
          <text:p/>
        </draw:polygon>
        <draw:polygon draw:style-name="gr269" draw:text-style-name="P267" draw:layer="layout" svg:width="0.027cm" svg:height="0.027cm" svg:x="13.33cm" svg:y="17.994cm" svg:viewBox="0 0 28 28" draw:points="0,0 28,0 28,28 0,28">
          <text:p/>
        </draw:polygon>
        <draw:polygon draw:style-name="gr269" draw:text-style-name="P267" draw:layer="layout" svg:width="0.027cm" svg:height="0.027cm" svg:x="13.383cm" svg:y="17.994cm" svg:viewBox="0 0 28 28" draw:points="0,0 28,0 28,28 0,28">
          <text:p/>
        </draw:polygon>
        <draw:polygon draw:style-name="gr269" draw:text-style-name="P267" draw:layer="layout" svg:width="0.027cm" svg:height="0.027cm" svg:x="13.436cm" svg:y="17.994cm" svg:viewBox="0 0 28 28" draw:points="0,0 28,0 28,28 0,28">
          <text:p/>
        </draw:polygon>
        <draw:polygon draw:style-name="gr269" draw:text-style-name="P267" draw:layer="layout" svg:width="0.027cm" svg:height="0.027cm" svg:x="13.489cm" svg:y="17.994cm" svg:viewBox="0 0 28 28" draw:points="0,0 28,0 28,28 0,28">
          <text:p/>
        </draw:polygon>
        <draw:polygon draw:style-name="gr269" draw:text-style-name="P267" draw:layer="layout" svg:width="0.027cm" svg:height="0.027cm" svg:x="13.542cm" svg:y="17.994cm" svg:viewBox="0 0 28 28" draw:points="0,0 28,0 28,28 0,28">
          <text:p/>
        </draw:polygon>
        <draw:polygon draw:style-name="gr269" draw:text-style-name="P267" draw:layer="layout" svg:width="0.027cm" svg:height="0.027cm" svg:x="13.595cm" svg:y="17.994cm" svg:viewBox="0 0 28 28" draw:points="0,0 28,0 28,28 0,28">
          <text:p/>
        </draw:polygon>
        <draw:polygon draw:style-name="gr269" draw:text-style-name="P267" draw:layer="layout" svg:width="0.027cm" svg:height="0.027cm" svg:x="13.648cm" svg:y="17.994cm" svg:viewBox="0 0 28 28" draw:points="0,0 28,0 28,28 0,28">
          <text:p/>
        </draw:polygon>
        <draw:polygon draw:style-name="gr269" draw:text-style-name="P267" draw:layer="layout" svg:width="0.027cm" svg:height="0.027cm" svg:x="13.701cm" svg:y="17.994cm" svg:viewBox="0 0 28 28" draw:points="0,0 28,0 28,28 0,28">
          <text:p/>
        </draw:polygon>
        <draw:polygon draw:style-name="gr269" draw:text-style-name="P267" draw:layer="layout" svg:width="0.027cm" svg:height="0.027cm" svg:x="13.754cm" svg:y="17.994cm" svg:viewBox="0 0 28 28" draw:points="0,0 28,0 28,28 0,28">
          <text:p/>
        </draw:polygon>
        <draw:polygon draw:style-name="gr269" draw:text-style-name="P267" draw:layer="layout" svg:width="0.027cm" svg:height="0.027cm" svg:x="13.807cm" svg:y="17.994cm" svg:viewBox="0 0 28 28" draw:points="0,0 28,0 28,28 0,28">
          <text:p/>
        </draw:polygon>
        <draw:polygon draw:style-name="gr269" draw:text-style-name="P267" draw:layer="layout" svg:width="0.027cm" svg:height="0.027cm" svg:x="13.86cm" svg:y="17.994cm" svg:viewBox="0 0 28 28" draw:points="0,0 28,0 28,28 0,28">
          <text:p/>
        </draw:polygon>
        <draw:polygon draw:style-name="gr269" draw:text-style-name="P267" draw:layer="layout" svg:width="0.027cm" svg:height="0.027cm" svg:x="13.913cm" svg:y="17.994cm" svg:viewBox="0 0 28 28" draw:points="0,0 28,0 28,28 0,28">
          <text:p/>
        </draw:polygon>
        <draw:polygon draw:style-name="gr269" draw:text-style-name="P267" draw:layer="layout" svg:width="0.027cm" svg:height="0.027cm" svg:x="13.966cm" svg:y="17.994cm" svg:viewBox="0 0 28 28" draw:points="0,0 28,0 28,28 0,28">
          <text:p/>
        </draw:polygon>
        <draw:polygon draw:style-name="gr269" draw:text-style-name="P267" draw:layer="layout" svg:width="0.027cm" svg:height="0.027cm" svg:x="14.019cm" svg:y="17.994cm" svg:viewBox="0 0 28 28" draw:points="0,0 28,0 28,28 0,28">
          <text:p/>
        </draw:polygon>
        <draw:polygon draw:style-name="gr269" draw:text-style-name="P267" draw:layer="layout" svg:width="0.027cm" svg:height="0.027cm" svg:x="14.072cm" svg:y="17.994cm" svg:viewBox="0 0 28 28" draw:points="0,0 28,0 28,28 0,28">
          <text:p/>
        </draw:polygon>
        <draw:polygon draw:style-name="gr269" draw:text-style-name="P267" draw:layer="layout" svg:width="0.027cm" svg:height="0.027cm" svg:x="14.125cm" svg:y="17.994cm" svg:viewBox="0 0 28 28" draw:points="0,0 28,0 28,28 0,28">
          <text:p/>
        </draw:polygon>
        <draw:polygon draw:style-name="gr269" draw:text-style-name="P267" draw:layer="layout" svg:width="0.027cm" svg:height="0.027cm" svg:x="14.178cm" svg:y="17.994cm" svg:viewBox="0 0 28 28" draw:points="0,0 28,0 28,28 0,28">
          <text:p/>
        </draw:polygon>
        <draw:polygon draw:style-name="gr269" draw:text-style-name="P267" draw:layer="layout" svg:width="0.027cm" svg:height="0.027cm" svg:x="14.231cm" svg:y="17.994cm" svg:viewBox="0 0 28 28" draw:points="0,0 28,0 28,28 0,28">
          <text:p/>
        </draw:polygon>
        <draw:polygon draw:style-name="gr269" draw:text-style-name="P267" draw:layer="layout" svg:width="0.027cm" svg:height="0.027cm" svg:x="14.284cm" svg:y="17.994cm" svg:viewBox="0 0 28 28" draw:points="0,0 28,0 28,28 0,28">
          <text:p/>
        </draw:polygon>
        <draw:polygon draw:style-name="gr269" draw:text-style-name="P267" draw:layer="layout" svg:width="0.027cm" svg:height="0.027cm" svg:x="14.337cm" svg:y="17.994cm" svg:viewBox="0 0 28 28" draw:points="0,0 28,0 28,28 0,28">
          <text:p/>
        </draw:polygon>
        <draw:polygon draw:style-name="gr269" draw:text-style-name="P267" draw:layer="layout" svg:width="0.028cm" svg:height="0.027cm" svg:x="14.39cm" svg:y="17.994cm" svg:viewBox="0 0 29 28" draw:points="0,0 29,0 29,28 0,28">
          <text:p/>
        </draw:polygon>
        <draw:polygon draw:style-name="gr269" draw:text-style-name="P267" draw:layer="layout" svg:width="0.027cm" svg:height="0.027cm" svg:x="14.443cm" svg:y="17.994cm" svg:viewBox="0 0 28 28" draw:points="0,0 28,0 28,28 0,28">
          <text:p/>
        </draw:polygon>
        <draw:polygon draw:style-name="gr269" draw:text-style-name="P267" draw:layer="layout" svg:width="0.027cm" svg:height="0.027cm" svg:x="14.496cm" svg:y="17.994cm" svg:viewBox="0 0 28 28" draw:points="0,0 28,0 28,28 0,28">
          <text:p/>
        </draw:polygon>
        <draw:polygon draw:style-name="gr269" draw:text-style-name="P267" draw:layer="layout" svg:width="0.027cm" svg:height="0.027cm" svg:x="14.549cm" svg:y="17.994cm" svg:viewBox="0 0 28 28" draw:points="0,0 28,0 28,28 0,28">
          <text:p/>
        </draw:polygon>
        <draw:polygon draw:style-name="gr269" draw:text-style-name="P267" draw:layer="layout" svg:width="0.027cm" svg:height="0.027cm" svg:x="14.602cm" svg:y="17.994cm" svg:viewBox="0 0 28 28" draw:points="0,0 28,0 28,28 0,28">
          <text:p/>
        </draw:polygon>
        <draw:polygon draw:style-name="gr269" draw:text-style-name="P267" draw:layer="layout" svg:width="0.027cm" svg:height="0.027cm" svg:x="14.655cm" svg:y="17.994cm" svg:viewBox="0 0 28 28" draw:points="0,0 28,0 28,28 0,28">
          <text:p/>
        </draw:polygon>
        <draw:polygon draw:style-name="gr269" draw:text-style-name="P267" draw:layer="layout" svg:width="0.027cm" svg:height="0.027cm" svg:x="14.708cm" svg:y="17.994cm" svg:viewBox="0 0 28 28" draw:points="0,0 28,0 28,28 0,28">
          <text:p/>
        </draw:polygon>
        <draw:polygon draw:style-name="gr269" draw:text-style-name="P267" draw:layer="layout" svg:width="0.027cm" svg:height="0.027cm" svg:x="14.761cm" svg:y="17.994cm" svg:viewBox="0 0 28 28" draw:points="0,0 28,0 28,28 0,28">
          <text:p/>
        </draw:polygon>
        <draw:polygon draw:style-name="gr269" draw:text-style-name="P267" draw:layer="layout" svg:width="0.027cm" svg:height="0.027cm" svg:x="14.814cm" svg:y="17.994cm" svg:viewBox="0 0 28 28" draw:points="0,0 28,0 28,28 0,28">
          <text:p/>
        </draw:polygon>
        <draw:polygon draw:style-name="gr269" draw:text-style-name="P267" draw:layer="layout" svg:width="0.027cm" svg:height="0.027cm" svg:x="14.867cm" svg:y="17.994cm" svg:viewBox="0 0 28 28" draw:points="0,0 28,0 28,28 0,28">
          <text:p/>
        </draw:polygon>
        <draw:polygon draw:style-name="gr269" draw:text-style-name="P267" draw:layer="layout" svg:width="0.027cm" svg:height="0.027cm" svg:x="14.92cm" svg:y="17.994cm" svg:viewBox="0 0 28 28" draw:points="0,0 28,0 28,28 0,28">
          <text:p/>
        </draw:polygon>
        <draw:polygon draw:style-name="gr269" draw:text-style-name="P267" draw:layer="layout" svg:width="0.027cm" svg:height="0.027cm" svg:x="14.973cm" svg:y="17.994cm" svg:viewBox="0 0 28 28" draw:points="0,0 28,0 28,28 0,28">
          <text:p/>
        </draw:polygon>
        <draw:polygon draw:style-name="gr269" draw:text-style-name="P267" draw:layer="layout" svg:width="0.027cm" svg:height="0.027cm" svg:x="15.026cm" svg:y="17.994cm" svg:viewBox="0 0 28 28" draw:points="0,0 28,0 28,28 0,28">
          <text:p/>
        </draw:polygon>
        <draw:polygon draw:style-name="gr269" draw:text-style-name="P267" draw:layer="layout" svg:width="0.027cm" svg:height="0.027cm" svg:x="15.079cm" svg:y="17.994cm" svg:viewBox="0 0 28 28" draw:points="0,0 28,0 28,28 0,28">
          <text:p/>
        </draw:polygon>
        <draw:polygon draw:style-name="gr269" draw:text-style-name="P267" draw:layer="layout" svg:width="0.027cm" svg:height="0.027cm" svg:x="15.132cm" svg:y="17.994cm" svg:viewBox="0 0 28 28" draw:points="0,0 28,0 28,28 0,28">
          <text:p/>
        </draw:polygon>
        <draw:polygon draw:style-name="gr269" draw:text-style-name="P267" draw:layer="layout" svg:width="0.027cm" svg:height="0.027cm" svg:x="15.185cm" svg:y="17.994cm" svg:viewBox="0 0 28 28" draw:points="0,0 28,0 28,28 0,28">
          <text:p/>
        </draw:polygon>
        <draw:polygon draw:style-name="gr269" draw:text-style-name="P267" draw:layer="layout" svg:width="0.027cm" svg:height="0.027cm" svg:x="15.238cm" svg:y="17.994cm" svg:viewBox="0 0 28 28" draw:points="0,0 28,0 28,28 0,28">
          <text:p/>
        </draw:polygon>
        <draw:polygon draw:style-name="gr269" draw:text-style-name="P267" draw:layer="layout" svg:width="0.027cm" svg:height="0.027cm" svg:x="15.291cm" svg:y="17.994cm" svg:viewBox="0 0 28 28" draw:points="0,0 28,0 28,28 0,28">
          <text:p/>
        </draw:polygon>
        <draw:polygon draw:style-name="gr269" draw:text-style-name="P267" draw:layer="layout" svg:width="0.027cm" svg:height="0.027cm" svg:x="15.344cm" svg:y="17.994cm" svg:viewBox="0 0 28 28" draw:points="0,0 28,0 28,28 0,28">
          <text:p/>
        </draw:polygon>
        <draw:polygon draw:style-name="gr269" draw:text-style-name="P267" draw:layer="layout" svg:width="0.027cm" svg:height="0.027cm" svg:x="15.397cm" svg:y="17.994cm" svg:viewBox="0 0 28 28" draw:points="0,0 28,0 28,28 0,28">
          <text:p/>
        </draw:polygon>
        <draw:polygon draw:style-name="gr269" draw:text-style-name="P267" draw:layer="layout" svg:width="0.027cm" svg:height="0.027cm" svg:x="15.45cm" svg:y="17.994cm" svg:viewBox="0 0 28 28" draw:points="0,0 28,0 28,28 0,28">
          <text:p/>
        </draw:polygon>
        <draw:polygon draw:style-name="gr269" draw:text-style-name="P267" draw:layer="layout" svg:width="0.027cm" svg:height="0.027cm" svg:x="15.503cm" svg:y="17.994cm" svg:viewBox="0 0 28 28" draw:points="0,0 28,0 28,28 0,28">
          <text:p/>
        </draw:polygon>
        <draw:polygon draw:style-name="gr269" draw:text-style-name="P267" draw:layer="layout" svg:width="0.027cm" svg:height="0.027cm" svg:x="15.556cm" svg:y="17.994cm" svg:viewBox="0 0 28 28" draw:points="0,0 28,0 28,28 0,28">
          <text:p/>
        </draw:polygon>
        <draw:polygon draw:style-name="gr269" draw:text-style-name="P267" draw:layer="layout" svg:width="0.027cm" svg:height="0.027cm" svg:x="15.609cm" svg:y="17.994cm" svg:viewBox="0 0 28 28" draw:points="0,0 28,0 28,28 0,28">
          <text:p/>
        </draw:polygon>
        <draw:polygon draw:style-name="gr269" draw:text-style-name="P267" draw:layer="layout" svg:width="0.027cm" svg:height="0.027cm" svg:x="15.662cm" svg:y="17.994cm" svg:viewBox="0 0 28 28" draw:points="0,0 28,0 28,28 0,28">
          <text:p/>
        </draw:polygon>
        <draw:polygon draw:style-name="gr269" draw:text-style-name="P267" draw:layer="layout" svg:width="0.027cm" svg:height="0.027cm" svg:x="15.715cm" svg:y="17.994cm" svg:viewBox="0 0 28 28" draw:points="0,0 28,0 28,28 0,28">
          <text:p/>
        </draw:polygon>
        <draw:polygon draw:style-name="gr269" draw:text-style-name="P267" draw:layer="layout" svg:width="0.028cm" svg:height="0.027cm" svg:x="15.768cm" svg:y="17.994cm" svg:viewBox="0 0 29 28" draw:points="0,0 29,0 29,28 0,28">
          <text:p/>
        </draw:polygon>
        <draw:polygon draw:style-name="gr269" draw:text-style-name="P267" draw:layer="layout" svg:width="0.027cm" svg:height="0.027cm" svg:x="15.821cm" svg:y="17.994cm" svg:viewBox="0 0 28 28" draw:points="0,0 28,0 28,28 0,28">
          <text:p/>
        </draw:polygon>
        <draw:polygon draw:style-name="gr269" draw:text-style-name="P267" draw:layer="layout" svg:width="0.027cm" svg:height="0.027cm" svg:x="15.874cm" svg:y="17.994cm" svg:viewBox="0 0 28 28" draw:points="0,0 28,0 28,28 0,28">
          <text:p/>
        </draw:polygon>
        <draw:polygon draw:style-name="gr269" draw:text-style-name="P267" draw:layer="layout" svg:width="0.027cm" svg:height="0.027cm" svg:x="15.927cm" svg:y="17.994cm" svg:viewBox="0 0 28 28" draw:points="0,0 28,0 28,28 0,28">
          <text:p/>
        </draw:polygon>
        <draw:polygon draw:style-name="gr269" draw:text-style-name="P267" draw:layer="layout" svg:width="0.027cm" svg:height="0.027cm" svg:x="15.98cm" svg:y="17.994cm" svg:viewBox="0 0 28 28" draw:points="0,0 28,0 28,28 0,28">
          <text:p/>
        </draw:polygon>
        <draw:polygon draw:style-name="gr269" draw:text-style-name="P267" draw:layer="layout" svg:width="0.027cm" svg:height="0.027cm" svg:x="16.033cm" svg:y="17.994cm" svg:viewBox="0 0 28 28" draw:points="0,0 28,0 28,28 0,28">
          <text:p/>
        </draw:polygon>
        <draw:polygon draw:style-name="gr269" draw:text-style-name="P267" draw:layer="layout" svg:width="0.027cm" svg:height="0.027cm" svg:x="16.086cm" svg:y="17.994cm" svg:viewBox="0 0 28 28" draw:points="0,0 28,0 28,28 0,28">
          <text:p/>
        </draw:polygon>
        <draw:polygon draw:style-name="gr269" draw:text-style-name="P267" draw:layer="layout" svg:width="0.027cm" svg:height="0.027cm" svg:x="16.139cm" svg:y="17.994cm" svg:viewBox="0 0 28 28" draw:points="0,0 28,0 28,28 0,28">
          <text:p/>
        </draw:polygon>
        <draw:polygon draw:style-name="gr269" draw:text-style-name="P267" draw:layer="layout" svg:width="0.027cm" svg:height="0.027cm" svg:x="16.192cm" svg:y="17.994cm" svg:viewBox="0 0 28 28" draw:points="0,0 28,0 28,28 0,28">
          <text:p/>
        </draw:polygon>
        <draw:polygon draw:style-name="gr269" draw:text-style-name="P267" draw:layer="layout" svg:width="0.027cm" svg:height="0.027cm" svg:x="16.245cm" svg:y="17.994cm" svg:viewBox="0 0 28 28" draw:points="0,0 28,0 28,28 0,28">
          <text:p/>
        </draw:polygon>
        <draw:polygon draw:style-name="gr269" draw:text-style-name="P267" draw:layer="layout" svg:width="0.027cm" svg:height="0.027cm" svg:x="16.298cm" svg:y="17.994cm" svg:viewBox="0 0 28 28" draw:points="0,0 28,0 28,28 0,28">
          <text:p/>
        </draw:polygon>
        <draw:polygon draw:style-name="gr269" draw:text-style-name="P267" draw:layer="layout" svg:width="0.027cm" svg:height="0.027cm" svg:x="16.351cm" svg:y="17.994cm" svg:viewBox="0 0 28 28" draw:points="0,0 28,0 28,28 0,28">
          <text:p/>
        </draw:polygon>
        <draw:polygon draw:style-name="gr269" draw:text-style-name="P267" draw:layer="layout" svg:width="0.027cm" svg:height="0.027cm" svg:x="16.404cm" svg:y="17.994cm" svg:viewBox="0 0 28 28" draw:points="0,0 28,0 28,28 0,28">
          <text:p/>
        </draw:polygon>
        <draw:polygon draw:style-name="gr269" draw:text-style-name="P267" draw:layer="layout" svg:width="0.027cm" svg:height="0.027cm" svg:x="16.457cm" svg:y="17.994cm" svg:viewBox="0 0 28 28" draw:points="0,0 28,0 28,28 0,28">
          <text:p/>
        </draw:polygon>
        <draw:polygon draw:style-name="gr269" draw:text-style-name="P267" draw:layer="layout" svg:width="0.027cm" svg:height="0.027cm" svg:x="16.51cm" svg:y="17.994cm" svg:viewBox="0 0 28 28" draw:points="0,0 28,0 28,28 0,28">
          <text:p/>
        </draw:polygon>
        <draw:polygon draw:style-name="gr269" draw:text-style-name="P267" draw:layer="layout" svg:width="0.027cm" svg:height="0.027cm" svg:x="16.563cm" svg:y="17.994cm" svg:viewBox="0 0 28 28" draw:points="0,0 28,0 28,28 0,28">
          <text:p/>
        </draw:polygon>
        <draw:polygon draw:style-name="gr269" draw:text-style-name="P267" draw:layer="layout" svg:width="0.027cm" svg:height="0.027cm" svg:x="16.616cm" svg:y="17.994cm" svg:viewBox="0 0 28 28" draw:points="0,0 28,0 28,28 0,28">
          <text:p/>
        </draw:polygon>
        <draw:polygon draw:style-name="gr269" draw:text-style-name="P267" draw:layer="layout" svg:width="0.027cm" svg:height="0.027cm" svg:x="16.669cm" svg:y="17.994cm" svg:viewBox="0 0 28 28" draw:points="0,0 28,0 28,28 0,28">
          <text:p/>
        </draw:polygon>
        <draw:polygon draw:style-name="gr269" draw:text-style-name="P267" draw:layer="layout" svg:width="0.027cm" svg:height="0.027cm" svg:x="16.722cm" svg:y="17.994cm" svg:viewBox="0 0 28 28" draw:points="0,0 28,0 28,28 0,28">
          <text:p/>
        </draw:polygon>
        <draw:polygon draw:style-name="gr269" draw:text-style-name="P267" draw:layer="layout" svg:width="0.027cm" svg:height="0.027cm" svg:x="16.775cm" svg:y="17.994cm" svg:viewBox="0 0 28 28" draw:points="0,0 28,0 28,28 0,28">
          <text:p/>
        </draw:polygon>
        <draw:polygon draw:style-name="gr269" draw:text-style-name="P267" draw:layer="layout" svg:width="0.027cm" svg:height="0.027cm" svg:x="16.828cm" svg:y="17.994cm" svg:viewBox="0 0 28 28" draw:points="0,0 28,0 28,28 0,28">
          <text:p/>
        </draw:polygon>
        <draw:polygon draw:style-name="gr269" draw:text-style-name="P267" draw:layer="layout" svg:width="0.027cm" svg:height="0.027cm" svg:x="16.881cm" svg:y="17.994cm" svg:viewBox="0 0 28 28" draw:points="0,0 28,0 28,28 0,28">
          <text:p/>
        </draw:polygon>
        <draw:polygon draw:style-name="gr269" draw:text-style-name="P267" draw:layer="layout" svg:width="0.027cm" svg:height="0.027cm" svg:x="16.934cm" svg:y="17.994cm" svg:viewBox="0 0 28 28" draw:points="0,0 28,0 28,28 0,28">
          <text:p/>
        </draw:polygon>
        <draw:polygon draw:style-name="gr269" draw:text-style-name="P267" draw:layer="layout" svg:width="0.027cm" svg:height="0.027cm" svg:x="16.987cm" svg:y="17.994cm" svg:viewBox="0 0 28 28" draw:points="0,0 28,0 28,28 0,28">
          <text:p/>
        </draw:polygon>
        <draw:polygon draw:style-name="gr269" draw:text-style-name="P267" draw:layer="layout" svg:width="0.027cm" svg:height="0.027cm" svg:x="17.04cm" svg:y="17.994cm" svg:viewBox="0 0 28 28" draw:points="0,0 28,0 28,28 0,28">
          <text:p/>
        </draw:polygon>
        <draw:polygon draw:style-name="gr269" draw:text-style-name="P267" draw:layer="layout" svg:width="0.027cm" svg:height="0.027cm" svg:x="17.093cm" svg:y="17.994cm" svg:viewBox="0 0 28 28" draw:points="0,0 28,0 28,28 0,28">
          <text:p/>
        </draw:polygon>
        <draw:polygon draw:style-name="gr269" draw:text-style-name="P267" draw:layer="layout" svg:width="0.028cm" svg:height="0.027cm" svg:x="17.146cm" svg:y="17.994cm" svg:viewBox="0 0 29 28" draw:points="0,0 29,0 29,28 0,28">
          <text:p/>
        </draw:polygon>
        <draw:polygon draw:style-name="gr269" draw:text-style-name="P267" draw:layer="layout" svg:width="0.027cm" svg:height="0.027cm" svg:x="17.199cm" svg:y="17.994cm" svg:viewBox="0 0 28 28" draw:points="0,0 28,0 28,28 0,28">
          <text:p/>
        </draw:polygon>
        <draw:polygon draw:style-name="gr269" draw:text-style-name="P267" draw:layer="layout" svg:width="0.027cm" svg:height="0.027cm" svg:x="17.252cm" svg:y="17.994cm" svg:viewBox="0 0 28 28" draw:points="0,0 28,0 28,28 0,28">
          <text:p/>
        </draw:polygon>
        <draw:polygon draw:style-name="gr269" draw:text-style-name="P267" draw:layer="layout" svg:width="0.027cm" svg:height="0.027cm" svg:x="17.305cm" svg:y="17.994cm" svg:viewBox="0 0 28 28" draw:points="0,0 28,0 28,28 0,28">
          <text:p/>
        </draw:polygon>
        <draw:polygon draw:style-name="gr269" draw:text-style-name="P267" draw:layer="layout" svg:width="0.027cm" svg:height="0.027cm" svg:x="17.358cm" svg:y="17.994cm" svg:viewBox="0 0 28 28" draw:points="0,0 28,0 28,28 0,28">
          <text:p/>
        </draw:polygon>
        <draw:polygon draw:style-name="gr269" draw:text-style-name="P267" draw:layer="layout" svg:width="0.027cm" svg:height="0.027cm" svg:x="17.411cm" svg:y="17.994cm" svg:viewBox="0 0 28 28" draw:points="0,0 28,0 28,28 0,28">
          <text:p/>
        </draw:polygon>
        <draw:polygon draw:style-name="gr269" draw:text-style-name="P267" draw:layer="layout" svg:width="0.027cm" svg:height="0.027cm" svg:x="17.464cm" svg:y="17.994cm" svg:viewBox="0 0 28 28" draw:points="0,0 28,0 28,28 0,28">
          <text:p/>
        </draw:polygon>
        <draw:polygon draw:style-name="gr269" draw:text-style-name="P267" draw:layer="layout" svg:width="0.027cm" svg:height="0.027cm" svg:x="17.517cm" svg:y="17.994cm" svg:viewBox="0 0 28 28" draw:points="0,0 28,0 28,28 0,28">
          <text:p/>
        </draw:polygon>
        <draw:polygon draw:style-name="gr269" draw:text-style-name="P267" draw:layer="layout" svg:width="0.027cm" svg:height="0.027cm" svg:x="17.57cm" svg:y="17.994cm" svg:viewBox="0 0 28 28" draw:points="0,0 28,0 28,28 0,28">
          <text:p/>
        </draw:polygon>
        <draw:polygon draw:style-name="gr269" draw:text-style-name="P267" draw:layer="layout" svg:width="0.027cm" svg:height="0.027cm" svg:x="17.623cm" svg:y="17.994cm" svg:viewBox="0 0 28 28" draw:points="0,0 28,0 28,28 0,28">
          <text:p/>
        </draw:polygon>
        <draw:polygon draw:style-name="gr269" draw:text-style-name="P267" draw:layer="layout" svg:width="0.027cm" svg:height="0.027cm" svg:x="17.676cm" svg:y="17.994cm" svg:viewBox="0 0 28 28" draw:points="0,0 28,0 28,28 0,28">
          <text:p/>
        </draw:polygon>
        <draw:polygon draw:style-name="gr269" draw:text-style-name="P267" draw:layer="layout" svg:width="0.027cm" svg:height="0.027cm" svg:x="17.729cm" svg:y="17.994cm" svg:viewBox="0 0 28 28" draw:points="0,0 28,0 28,28 0,28">
          <text:p/>
        </draw:polygon>
        <draw:polygon draw:style-name="gr269" draw:text-style-name="P267" draw:layer="layout" svg:width="0.027cm" svg:height="0.027cm" svg:x="17.782cm" svg:y="17.994cm" svg:viewBox="0 0 28 28" draw:points="0,0 28,0 28,28 0,28">
          <text:p/>
        </draw:polygon>
        <draw:polygon draw:style-name="gr269" draw:text-style-name="P267" draw:layer="layout" svg:width="0.027cm" svg:height="0.027cm" svg:x="17.835cm" svg:y="17.994cm" svg:viewBox="0 0 28 28" draw:points="0,0 28,0 28,28 0,28">
          <text:p/>
        </draw:polygon>
        <draw:polygon draw:style-name="gr269" draw:text-style-name="P267" draw:layer="layout" svg:width="0.027cm" svg:height="0.027cm" svg:x="17.888cm" svg:y="17.994cm" svg:viewBox="0 0 28 28" draw:points="0,0 28,0 28,28 0,28">
          <text:p/>
        </draw:polygon>
        <draw:polygon draw:style-name="gr269" draw:text-style-name="P267" draw:layer="layout" svg:width="0.027cm" svg:height="0.027cm" svg:x="17.941cm" svg:y="17.994cm" svg:viewBox="0 0 28 28" draw:points="0,0 28,0 28,28 0,28">
          <text:p/>
        </draw:polygon>
        <draw:polygon draw:style-name="gr269" draw:text-style-name="P267" draw:layer="layout" svg:width="0.027cm" svg:height="0.027cm" svg:x="17.994cm" svg:y="17.994cm" svg:viewBox="0 0 28 28" draw:points="0,0 28,0 28,28 0,28">
          <text:p/>
        </draw:polygon>
        <draw:polygon draw:style-name="gr269" draw:text-style-name="P267" draw:layer="layout" svg:width="0.027cm" svg:height="0.027cm" svg:x="18.047cm" svg:y="17.994cm" svg:viewBox="0 0 28 28" draw:points="0,0 28,0 28,28 0,28">
          <text:p/>
        </draw:polygon>
        <draw:polygon draw:style-name="gr269" draw:text-style-name="P267" draw:layer="layout" svg:width="0.027cm" svg:height="0.027cm" svg:x="18.1cm" svg:y="17.994cm" svg:viewBox="0 0 28 28" draw:points="0,0 28,0 28,28 0,28">
          <text:p/>
        </draw:polygon>
        <draw:polygon draw:style-name="gr269" draw:text-style-name="P267" draw:layer="layout" svg:width="0.027cm" svg:height="0.027cm" svg:x="18.153cm" svg:y="17.994cm" svg:viewBox="0 0 28 28" draw:points="0,0 28,0 28,28 0,28">
          <text:p/>
        </draw:polygon>
        <draw:polygon draw:style-name="gr269" draw:text-style-name="P267" draw:layer="layout" svg:width="0.027cm" svg:height="0.027cm" svg:x="18.206cm" svg:y="17.994cm" svg:viewBox="0 0 28 28" draw:points="0,0 28,0 28,28 0,28">
          <text:p/>
        </draw:polygon>
        <draw:polygon draw:style-name="gr269" draw:text-style-name="P267" draw:layer="layout" svg:width="0.027cm" svg:height="0.027cm" svg:x="18.259cm" svg:y="17.994cm" svg:viewBox="0 0 28 28" draw:points="0,0 28,0 28,28 0,28">
          <text:p/>
        </draw:polygon>
        <draw:polygon draw:style-name="gr269" draw:text-style-name="P267" draw:layer="layout" svg:width="0.027cm" svg:height="0.027cm" svg:x="18.312cm" svg:y="17.994cm" svg:viewBox="0 0 28 28" draw:points="0,0 28,0 28,28 0,28">
          <text:p/>
        </draw:polygon>
        <draw:polygon draw:style-name="gr269" draw:text-style-name="P267" draw:layer="layout" svg:width="0.027cm" svg:height="0.027cm" svg:x="18.365cm" svg:y="17.994cm" svg:viewBox="0 0 28 28" draw:points="0,0 28,0 28,28 0,28">
          <text:p/>
        </draw:polygon>
        <draw:polygon draw:style-name="gr269" draw:text-style-name="P267" draw:layer="layout" svg:width="0.027cm" svg:height="0.027cm" svg:x="18.418cm" svg:y="17.994cm" svg:viewBox="0 0 28 28" draw:points="0,0 28,0 28,28 0,28">
          <text:p/>
        </draw:polygon>
        <draw:polygon draw:style-name="gr269" draw:text-style-name="P267" draw:layer="layout" svg:width="0.027cm" svg:height="0.027cm" svg:x="18.471cm" svg:y="17.994cm" svg:viewBox="0 0 28 28" draw:points="0,0 28,0 28,28 0,28">
          <text:p/>
        </draw:polygon>
        <draw:polygon draw:style-name="gr269" draw:text-style-name="P267" draw:layer="layout" svg:width="0.028cm" svg:height="0.027cm" svg:x="18.524cm" svg:y="17.994cm" svg:viewBox="0 0 29 28" draw:points="0,0 29,0 29,28 0,28">
          <text:p/>
        </draw:polygon>
        <draw:polygon draw:style-name="gr269" draw:text-style-name="P267" draw:layer="layout" svg:width="0.027cm" svg:height="0.027cm" svg:x="18.577cm" svg:y="17.994cm" svg:viewBox="0 0 28 28" draw:points="0,0 28,0 28,28 0,28">
          <text:p/>
        </draw:polygon>
        <draw:polygon draw:style-name="gr269" draw:text-style-name="P267" draw:layer="layout" svg:width="0.027cm" svg:height="0.027cm" svg:x="18.63cm" svg:y="17.994cm" svg:viewBox="0 0 28 28" draw:points="0,0 28,0 28,28 0,28">
          <text:p/>
        </draw:polygon>
        <draw:polygon draw:style-name="gr269" draw:text-style-name="P267" draw:layer="layout" svg:width="0.027cm" svg:height="0.027cm" svg:x="18.683cm" svg:y="17.994cm" svg:viewBox="0 0 28 28" draw:points="0,0 28,0 28,28 0,28">
          <text:p/>
        </draw:polygon>
        <draw:polygon draw:style-name="gr269" draw:text-style-name="P267" draw:layer="layout" svg:width="0.027cm" svg:height="0.027cm" svg:x="18.736cm" svg:y="17.994cm" svg:viewBox="0 0 28 28" draw:points="0,0 28,0 28,28 0,28">
          <text:p/>
        </draw:polygon>
        <draw:polygon draw:style-name="gr269" draw:text-style-name="P267" draw:layer="layout" svg:width="0.027cm" svg:height="0.027cm" svg:x="18.789cm" svg:y="17.994cm" svg:viewBox="0 0 28 28" draw:points="0,0 28,0 28,28 0,28">
          <text:p/>
        </draw:polygon>
        <draw:polygon draw:style-name="gr269" draw:text-style-name="P267" draw:layer="layout" svg:width="0.027cm" svg:height="0.027cm" svg:x="18.842cm" svg:y="17.994cm" svg:viewBox="0 0 28 28" draw:points="0,0 28,0 28,28 0,28">
          <text:p/>
        </draw:polygon>
        <draw:polygon draw:style-name="gr269" draw:text-style-name="P267" draw:layer="layout" svg:width="0.027cm" svg:height="0.027cm" svg:x="18.895cm" svg:y="17.994cm" svg:viewBox="0 0 28 28" draw:points="0,0 28,0 28,28 0,28">
          <text:p/>
        </draw:polygon>
        <draw:polygon draw:style-name="gr269" draw:text-style-name="P267" draw:layer="layout" svg:width="0.027cm" svg:height="0.027cm" svg:x="18.948cm" svg:y="17.994cm" svg:viewBox="0 0 28 28" draw:points="0,0 28,0 28,28 0,28">
          <text:p/>
        </draw:polygon>
        <draw:polygon draw:style-name="gr269" draw:text-style-name="P267" draw:layer="layout" svg:width="0.027cm" svg:height="0.027cm" svg:x="19.001cm" svg:y="17.994cm" svg:viewBox="0 0 28 28" draw:points="0,0 28,0 28,28 0,28">
          <text:p/>
        </draw:polygon>
        <draw:polygon draw:style-name="gr269" draw:text-style-name="P267" draw:layer="layout" svg:width="0.053cm" svg:height="0.026cm" svg:x="2.014cm" svg:y="18.975cm" svg:viewBox="0 0 54 27" draw:points="0,0 54,0 54,27 0,27">
          <text:p/>
        </draw:polygon>
        <draw:polygon draw:style-name="gr269" draw:text-style-name="P267" draw:layer="layout" svg:width="0.027cm" svg:height="0.026cm" svg:x="2.093cm" svg:y="18.975cm" svg:viewBox="0 0 28 27" draw:points="0,0 28,0 28,27 0,27">
          <text:p/>
        </draw:polygon>
        <draw:polygon draw:style-name="gr269" draw:text-style-name="P267" draw:layer="layout" svg:width="0.027cm" svg:height="0.026cm" svg:x="2.146cm" svg:y="18.975cm" svg:viewBox="0 0 28 27" draw:points="0,0 28,0 28,27 0,27">
          <text:p/>
        </draw:polygon>
        <draw:polygon draw:style-name="gr269" draw:text-style-name="P267" draw:layer="layout" svg:width="0.027cm" svg:height="0.026cm" svg:x="2.199cm" svg:y="18.975cm" svg:viewBox="0 0 28 27" draw:points="0,0 28,0 28,27 0,27">
          <text:p/>
        </draw:polygon>
        <draw:polygon draw:style-name="gr269" draw:text-style-name="P267" draw:layer="layout" svg:width="0.027cm" svg:height="0.026cm" svg:x="2.252cm" svg:y="18.975cm" svg:viewBox="0 0 28 27" draw:points="0,0 28,0 28,27 0,27">
          <text:p/>
        </draw:polygon>
        <draw:polygon draw:style-name="gr269" draw:text-style-name="P267" draw:layer="layout" svg:width="0.027cm" svg:height="0.026cm" svg:x="2.305cm" svg:y="18.975cm" svg:viewBox="0 0 28 27" draw:points="0,0 28,0 28,27 0,27">
          <text:p/>
        </draw:polygon>
        <draw:polygon draw:style-name="gr269" draw:text-style-name="P267" draw:layer="layout" svg:width="0.027cm" svg:height="0.026cm" svg:x="2.358cm" svg:y="18.975cm" svg:viewBox="0 0 28 27" draw:points="0,0 28,0 28,27 0,27">
          <text:p/>
        </draw:polygon>
        <draw:polygon draw:style-name="gr269" draw:text-style-name="P267" draw:layer="layout" svg:width="0.027cm" svg:height="0.026cm" svg:x="2.411cm" svg:y="18.975cm" svg:viewBox="0 0 28 27" draw:points="0,0 28,0 28,27 0,27">
          <text:p/>
        </draw:polygon>
        <draw:polygon draw:style-name="gr269" draw:text-style-name="P267" draw:layer="layout" svg:width="0.027cm" svg:height="0.026cm" svg:x="2.464cm" svg:y="18.975cm" svg:viewBox="0 0 28 27" draw:points="0,0 28,0 28,27 0,27">
          <text:p/>
        </draw:polygon>
        <draw:polygon draw:style-name="gr269" draw:text-style-name="P267" draw:layer="layout" svg:width="0.027cm" svg:height="0.026cm" svg:x="2.517cm" svg:y="18.975cm" svg:viewBox="0 0 28 27" draw:points="0,0 28,0 28,27 0,27">
          <text:p/>
        </draw:polygon>
        <draw:polygon draw:style-name="gr269" draw:text-style-name="P267" draw:layer="layout" svg:width="0.027cm" svg:height="0.026cm" svg:x="2.57cm" svg:y="18.975cm" svg:viewBox="0 0 28 27" draw:points="0,0 28,0 28,27 0,27">
          <text:p/>
        </draw:polygon>
        <draw:polygon draw:style-name="gr269" draw:text-style-name="P267" draw:layer="layout" svg:width="0.027cm" svg:height="0.026cm" svg:x="2.623cm" svg:y="18.975cm" svg:viewBox="0 0 28 27" draw:points="0,0 28,0 28,27 0,27">
          <text:p/>
        </draw:polygon>
        <draw:polygon draw:style-name="gr269" draw:text-style-name="P267" draw:layer="layout" svg:width="0.027cm" svg:height="0.026cm" svg:x="2.676cm" svg:y="18.975cm" svg:viewBox="0 0 28 27" draw:points="0,0 28,0 28,27 0,27">
          <text:p/>
        </draw:polygon>
        <draw:polygon draw:style-name="gr269" draw:text-style-name="P267" draw:layer="layout" svg:width="0.027cm" svg:height="0.026cm" svg:x="2.729cm" svg:y="18.975cm" svg:viewBox="0 0 28 27" draw:points="0,0 28,0 28,27 0,27">
          <text:p/>
        </draw:polygon>
        <draw:polygon draw:style-name="gr269" draw:text-style-name="P267" draw:layer="layout" svg:width="0.027cm" svg:height="0.026cm" svg:x="2.782cm" svg:y="18.975cm" svg:viewBox="0 0 28 27" draw:points="0,0 28,0 28,27 0,27">
          <text:p/>
        </draw:polygon>
        <draw:polygon draw:style-name="gr269" draw:text-style-name="P267" draw:layer="layout" svg:width="0.027cm" svg:height="0.026cm" svg:x="2.835cm" svg:y="18.975cm" svg:viewBox="0 0 28 27" draw:points="0,0 28,0 28,27 0,27">
          <text:p/>
        </draw:polygon>
        <draw:polygon draw:style-name="gr269" draw:text-style-name="P267" draw:layer="layout" svg:width="0.027cm" svg:height="0.026cm" svg:x="2.888cm" svg:y="18.975cm" svg:viewBox="0 0 28 27" draw:points="0,0 28,0 28,27 0,27">
          <text:p/>
        </draw:polygon>
        <draw:polygon draw:style-name="gr269" draw:text-style-name="P267" draw:layer="layout" svg:width="0.027cm" svg:height="0.026cm" svg:x="2.941cm" svg:y="18.975cm" svg:viewBox="0 0 28 27" draw:points="0,0 28,0 28,27 0,27">
          <text:p/>
        </draw:polygon>
        <draw:polygon draw:style-name="gr269" draw:text-style-name="P267" draw:layer="layout" svg:width="0.027cm" svg:height="0.026cm" svg:x="2.994cm" svg:y="18.975cm" svg:viewBox="0 0 28 27" draw:points="0,0 28,0 28,27 0,27">
          <text:p/>
        </draw:polygon>
        <draw:polygon draw:style-name="gr269" draw:text-style-name="P267" draw:layer="layout" svg:width="0.027cm" svg:height="0.026cm" svg:x="3.047cm" svg:y="18.975cm" svg:viewBox="0 0 28 27" draw:points="0,0 28,0 28,27 0,27">
          <text:p/>
        </draw:polygon>
        <draw:polygon draw:style-name="gr269" draw:text-style-name="P267" draw:layer="layout" svg:width="0.027cm" svg:height="0.026cm" svg:x="3.1cm" svg:y="18.975cm" svg:viewBox="0 0 28 27" draw:points="0,0 28,0 28,27 0,27">
          <text:p/>
        </draw:polygon>
        <draw:polygon draw:style-name="gr269" draw:text-style-name="P267" draw:layer="layout" svg:width="0.027cm" svg:height="0.026cm" svg:x="3.153cm" svg:y="18.975cm" svg:viewBox="0 0 28 27" draw:points="0,0 28,0 28,27 0,27">
          <text:p/>
        </draw:polygon>
        <draw:polygon draw:style-name="gr269" draw:text-style-name="P267" draw:layer="layout" svg:width="0.027cm" svg:height="0.026cm" svg:x="3.206cm" svg:y="18.975cm" svg:viewBox="0 0 28 27" draw:points="0,0 28,0 28,27 0,27">
          <text:p/>
        </draw:polygon>
        <draw:polygon draw:style-name="gr269" draw:text-style-name="P267" draw:layer="layout" svg:width="0.027cm" svg:height="0.026cm" svg:x="3.259cm" svg:y="18.975cm" svg:viewBox="0 0 28 27" draw:points="0,0 28,0 28,27 0,27">
          <text:p/>
        </draw:polygon>
        <draw:polygon draw:style-name="gr269" draw:text-style-name="P267" draw:layer="layout" svg:width="0.027cm" svg:height="0.026cm" svg:x="3.312cm" svg:y="18.975cm" svg:viewBox="0 0 28 27" draw:points="0,0 28,0 28,27 0,27">
          <text:p/>
        </draw:polygon>
        <draw:polygon draw:style-name="gr269" draw:text-style-name="P267" draw:layer="layout" svg:width="0.027cm" svg:height="0.026cm" svg:x="3.365cm" svg:y="18.975cm" svg:viewBox="0 0 28 27" draw:points="0,0 28,0 28,27 0,27">
          <text:p/>
        </draw:polygon>
        <draw:polygon draw:style-name="gr269" draw:text-style-name="P267" draw:layer="layout" svg:width="0.028cm" svg:height="0.026cm" svg:x="3.418cm" svg:y="18.975cm" svg:viewBox="0 0 29 27" draw:points="0,0 29,0 29,27 0,27">
          <text:p/>
        </draw:polygon>
        <draw:polygon draw:style-name="gr269" draw:text-style-name="P267" draw:layer="layout" svg:width="0.027cm" svg:height="0.026cm" svg:x="3.471cm" svg:y="18.975cm" svg:viewBox="0 0 28 27" draw:points="0,0 28,0 28,27 0,27">
          <text:p/>
        </draw:polygon>
        <draw:polygon draw:style-name="gr269" draw:text-style-name="P267" draw:layer="layout" svg:width="0.027cm" svg:height="0.026cm" svg:x="3.524cm" svg:y="18.975cm" svg:viewBox="0 0 28 27" draw:points="0,0 28,0 28,27 0,27">
          <text:p/>
        </draw:polygon>
        <draw:polygon draw:style-name="gr269" draw:text-style-name="P267" draw:layer="layout" svg:width="0.027cm" svg:height="0.026cm" svg:x="3.577cm" svg:y="18.975cm" svg:viewBox="0 0 28 27" draw:points="0,0 28,0 28,27 0,27">
          <text:p/>
        </draw:polygon>
        <draw:polygon draw:style-name="gr269" draw:text-style-name="P267" draw:layer="layout" svg:width="0.027cm" svg:height="0.026cm" svg:x="3.63cm" svg:y="18.975cm" svg:viewBox="0 0 28 27" draw:points="0,0 28,0 28,27 0,27">
          <text:p/>
        </draw:polygon>
        <draw:polygon draw:style-name="gr269" draw:text-style-name="P267" draw:layer="layout" svg:width="0.027cm" svg:height="0.026cm" svg:x="3.683cm" svg:y="18.975cm" svg:viewBox="0 0 28 27" draw:points="0,0 28,0 28,27 0,27">
          <text:p/>
        </draw:polygon>
        <draw:polygon draw:style-name="gr269" draw:text-style-name="P267" draw:layer="layout" svg:width="0.027cm" svg:height="0.026cm" svg:x="3.736cm" svg:y="18.975cm" svg:viewBox="0 0 28 27" draw:points="0,0 28,0 28,27 0,27">
          <text:p/>
        </draw:polygon>
        <draw:polygon draw:style-name="gr269" draw:text-style-name="P267" draw:layer="layout" svg:width="0.027cm" svg:height="0.026cm" svg:x="3.789cm" svg:y="18.975cm" svg:viewBox="0 0 28 27" draw:points="0,0 28,0 28,27 0,27">
          <text:p/>
        </draw:polygon>
        <draw:polygon draw:style-name="gr269" draw:text-style-name="P267" draw:layer="layout" svg:width="0.027cm" svg:height="0.026cm" svg:x="3.842cm" svg:y="18.975cm" svg:viewBox="0 0 28 27" draw:points="0,0 28,0 28,27 0,27">
          <text:p/>
        </draw:polygon>
        <draw:polygon draw:style-name="gr269" draw:text-style-name="P267" draw:layer="layout" svg:width="0.027cm" svg:height="0.026cm" svg:x="3.895cm" svg:y="18.975cm" svg:viewBox="0 0 28 27" draw:points="0,0 28,0 28,27 0,27">
          <text:p/>
        </draw:polygon>
        <draw:polygon draw:style-name="gr269" draw:text-style-name="P267" draw:layer="layout" svg:width="0.027cm" svg:height="0.026cm" svg:x="3.948cm" svg:y="18.975cm" svg:viewBox="0 0 28 27" draw:points="0,0 28,0 28,27 0,27">
          <text:p/>
        </draw:polygon>
        <draw:polygon draw:style-name="gr269" draw:text-style-name="P267" draw:layer="layout" svg:width="0.027cm" svg:height="0.026cm" svg:x="4.001cm" svg:y="18.975cm" svg:viewBox="0 0 28 27" draw:points="0,0 28,0 28,27 0,27">
          <text:p/>
        </draw:polygon>
        <draw:polygon draw:style-name="gr269" draw:text-style-name="P267" draw:layer="layout" svg:width="0.027cm" svg:height="0.026cm" svg:x="4.054cm" svg:y="18.975cm" svg:viewBox="0 0 28 27" draw:points="0,0 28,0 28,27 0,27">
          <text:p/>
        </draw:polygon>
        <draw:polygon draw:style-name="gr269" draw:text-style-name="P267" draw:layer="layout" svg:width="0.027cm" svg:height="0.026cm" svg:x="4.107cm" svg:y="18.975cm" svg:viewBox="0 0 28 27" draw:points="0,0 28,0 28,27 0,27">
          <text:p/>
        </draw:polygon>
        <draw:polygon draw:style-name="gr269" draw:text-style-name="P267" draw:layer="layout" svg:width="0.027cm" svg:height="0.026cm" svg:x="4.16cm" svg:y="18.975cm" svg:viewBox="0 0 28 27" draw:points="0,0 28,0 28,27 0,27">
          <text:p/>
        </draw:polygon>
        <draw:polygon draw:style-name="gr269" draw:text-style-name="P267" draw:layer="layout" svg:width="0.027cm" svg:height="0.026cm" svg:x="4.213cm" svg:y="18.975cm" svg:viewBox="0 0 28 27" draw:points="0,0 28,0 28,27 0,27">
          <text:p/>
        </draw:polygon>
        <draw:polygon draw:style-name="gr269" draw:text-style-name="P267" draw:layer="layout" svg:width="0.027cm" svg:height="0.026cm" svg:x="4.266cm" svg:y="18.975cm" svg:viewBox="0 0 28 27" draw:points="0,0 28,0 28,27 0,27">
          <text:p/>
        </draw:polygon>
        <draw:polygon draw:style-name="gr269" draw:text-style-name="P267" draw:layer="layout" svg:width="0.027cm" svg:height="0.026cm" svg:x="4.319cm" svg:y="18.975cm" svg:viewBox="0 0 28 27" draw:points="0,0 28,0 28,27 0,27">
          <text:p/>
        </draw:polygon>
        <draw:polygon draw:style-name="gr269" draw:text-style-name="P267" draw:layer="layout" svg:width="0.027cm" svg:height="0.026cm" svg:x="4.372cm" svg:y="18.975cm" svg:viewBox="0 0 28 27" draw:points="0,0 28,0 28,27 0,27">
          <text:p/>
        </draw:polygon>
        <draw:polygon draw:style-name="gr269" draw:text-style-name="P267" draw:layer="layout" svg:width="0.027cm" svg:height="0.026cm" svg:x="4.425cm" svg:y="18.975cm" svg:viewBox="0 0 28 27" draw:points="0,0 28,0 28,27 0,27">
          <text:p/>
        </draw:polygon>
        <draw:polygon draw:style-name="gr269" draw:text-style-name="P267" draw:layer="layout" svg:width="0.027cm" svg:height="0.026cm" svg:x="4.478cm" svg:y="18.975cm" svg:viewBox="0 0 28 27" draw:points="0,0 28,0 28,27 0,27">
          <text:p/>
        </draw:polygon>
        <draw:polygon draw:style-name="gr269" draw:text-style-name="P267" draw:layer="layout" svg:width="0.027cm" svg:height="0.026cm" svg:x="4.531cm" svg:y="18.975cm" svg:viewBox="0 0 28 27" draw:points="0,0 28,0 28,27 0,27">
          <text:p/>
        </draw:polygon>
        <draw:polygon draw:style-name="gr269" draw:text-style-name="P267" draw:layer="layout" svg:width="0.027cm" svg:height="0.026cm" svg:x="4.584cm" svg:y="18.975cm" svg:viewBox="0 0 28 27" draw:points="0,0 28,0 28,27 0,27">
          <text:p/>
        </draw:polygon>
        <draw:polygon draw:style-name="gr269" draw:text-style-name="P267" draw:layer="layout" svg:width="0.027cm" svg:height="0.026cm" svg:x="4.637cm" svg:y="18.975cm" svg:viewBox="0 0 28 27" draw:points="0,0 28,0 28,27 0,27">
          <text:p/>
        </draw:polygon>
        <draw:polygon draw:style-name="gr269" draw:text-style-name="P267" draw:layer="layout" svg:width="0.027cm" svg:height="0.026cm" svg:x="4.69cm" svg:y="18.975cm" svg:viewBox="0 0 28 27" draw:points="0,0 28,0 28,27 0,27">
          <text:p/>
        </draw:polygon>
        <draw:polygon draw:style-name="gr269" draw:text-style-name="P267" draw:layer="layout" svg:width="0.027cm" svg:height="0.026cm" svg:x="4.743cm" svg:y="18.975cm" svg:viewBox="0 0 28 27" draw:points="0,0 28,0 28,27 0,27">
          <text:p/>
        </draw:polygon>
        <draw:polygon draw:style-name="gr269" draw:text-style-name="P267" draw:layer="layout" svg:width="0.028cm" svg:height="0.026cm" svg:x="4.796cm" svg:y="18.975cm" svg:viewBox="0 0 29 27" draw:points="0,0 29,0 29,27 0,27">
          <text:p/>
        </draw:polygon>
        <draw:polygon draw:style-name="gr269" draw:text-style-name="P267" draw:layer="layout" svg:width="0.027cm" svg:height="0.026cm" svg:x="4.849cm" svg:y="18.975cm" svg:viewBox="0 0 28 27" draw:points="0,0 28,0 28,27 0,27">
          <text:p/>
        </draw:polygon>
        <draw:polygon draw:style-name="gr269" draw:text-style-name="P267" draw:layer="layout" svg:width="0.027cm" svg:height="0.026cm" svg:x="4.902cm" svg:y="18.975cm" svg:viewBox="0 0 28 27" draw:points="0,0 28,0 28,27 0,27">
          <text:p/>
        </draw:polygon>
        <draw:polygon draw:style-name="gr269" draw:text-style-name="P267" draw:layer="layout" svg:width="0.027cm" svg:height="0.026cm" svg:x="4.955cm" svg:y="18.975cm" svg:viewBox="0 0 28 27" draw:points="0,0 28,0 28,27 0,27">
          <text:p/>
        </draw:polygon>
        <draw:polygon draw:style-name="gr269" draw:text-style-name="P267" draw:layer="layout" svg:width="0.027cm" svg:height="0.026cm" svg:x="5.008cm" svg:y="18.975cm" svg:viewBox="0 0 28 27" draw:points="0,0 28,0 28,27 0,27">
          <text:p/>
        </draw:polygon>
        <draw:polygon draw:style-name="gr269" draw:text-style-name="P267" draw:layer="layout" svg:width="0.027cm" svg:height="0.026cm" svg:x="5.061cm" svg:y="18.975cm" svg:viewBox="0 0 28 27" draw:points="0,0 28,0 28,27 0,27">
          <text:p/>
        </draw:polygon>
        <draw:polygon draw:style-name="gr269" draw:text-style-name="P267" draw:layer="layout" svg:width="0.027cm" svg:height="0.026cm" svg:x="5.114cm" svg:y="18.975cm" svg:viewBox="0 0 28 27" draw:points="0,0 28,0 28,27 0,27">
          <text:p/>
        </draw:polygon>
        <draw:polygon draw:style-name="gr269" draw:text-style-name="P267" draw:layer="layout" svg:width="0.027cm" svg:height="0.026cm" svg:x="5.167cm" svg:y="18.975cm" svg:viewBox="0 0 28 27" draw:points="0,0 28,0 28,27 0,27">
          <text:p/>
        </draw:polygon>
        <draw:polygon draw:style-name="gr269" draw:text-style-name="P267" draw:layer="layout" svg:width="0.027cm" svg:height="0.026cm" svg:x="5.22cm" svg:y="18.975cm" svg:viewBox="0 0 28 27" draw:points="0,0 28,0 28,27 0,27">
          <text:p/>
        </draw:polygon>
        <draw:polygon draw:style-name="gr269" draw:text-style-name="P267" draw:layer="layout" svg:width="0.027cm" svg:height="0.026cm" svg:x="5.273cm" svg:y="18.975cm" svg:viewBox="0 0 28 27" draw:points="0,0 28,0 28,27 0,27">
          <text:p/>
        </draw:polygon>
        <draw:polygon draw:style-name="gr269" draw:text-style-name="P267" draw:layer="layout" svg:width="0.027cm" svg:height="0.026cm" svg:x="5.326cm" svg:y="18.975cm" svg:viewBox="0 0 28 27" draw:points="0,0 28,0 28,27 0,27">
          <text:p/>
        </draw:polygon>
        <draw:polygon draw:style-name="gr269" draw:text-style-name="P267" draw:layer="layout" svg:width="0.027cm" svg:height="0.026cm" svg:x="5.379cm" svg:y="18.975cm" svg:viewBox="0 0 28 27" draw:points="0,0 28,0 28,27 0,27">
          <text:p/>
        </draw:polygon>
        <draw:polygon draw:style-name="gr269" draw:text-style-name="P267" draw:layer="layout" svg:width="0.027cm" svg:height="0.026cm" svg:x="5.432cm" svg:y="18.975cm" svg:viewBox="0 0 28 27" draw:points="0,0 28,0 28,27 0,27">
          <text:p/>
        </draw:polygon>
        <draw:polygon draw:style-name="gr269" draw:text-style-name="P267" draw:layer="layout" svg:width="0.027cm" svg:height="0.026cm" svg:x="5.485cm" svg:y="18.975cm" svg:viewBox="0 0 28 27" draw:points="0,0 28,0 28,27 0,27">
          <text:p/>
        </draw:polygon>
        <draw:polygon draw:style-name="gr269" draw:text-style-name="P267" draw:layer="layout" svg:width="0.027cm" svg:height="0.026cm" svg:x="5.538cm" svg:y="18.975cm" svg:viewBox="0 0 28 27" draw:points="0,0 28,0 28,27 0,27">
          <text:p/>
        </draw:polygon>
        <draw:polygon draw:style-name="gr269" draw:text-style-name="P267" draw:layer="layout" svg:width="0.027cm" svg:height="0.026cm" svg:x="5.591cm" svg:y="18.975cm" svg:viewBox="0 0 28 27" draw:points="0,0 28,0 28,27 0,27">
          <text:p/>
        </draw:polygon>
        <draw:polygon draw:style-name="gr269" draw:text-style-name="P267" draw:layer="layout" svg:width="0.027cm" svg:height="0.026cm" svg:x="5.644cm" svg:y="18.975cm" svg:viewBox="0 0 28 27" draw:points="0,0 28,0 28,27 0,27">
          <text:p/>
        </draw:polygon>
        <draw:polygon draw:style-name="gr269" draw:text-style-name="P267" draw:layer="layout" svg:width="0.027cm" svg:height="0.026cm" svg:x="5.697cm" svg:y="18.975cm" svg:viewBox="0 0 28 27" draw:points="0,0 28,0 28,27 0,27">
          <text:p/>
        </draw:polygon>
        <draw:polygon draw:style-name="gr269" draw:text-style-name="P267" draw:layer="layout" svg:width="0.027cm" svg:height="0.026cm" svg:x="5.75cm" svg:y="18.975cm" svg:viewBox="0 0 28 27" draw:points="0,0 28,0 28,27 0,27">
          <text:p/>
        </draw:polygon>
        <draw:polygon draw:style-name="gr269" draw:text-style-name="P267" draw:layer="layout" svg:width="0.027cm" svg:height="0.026cm" svg:x="5.803cm" svg:y="18.975cm" svg:viewBox="0 0 28 27" draw:points="0,0 28,0 28,27 0,27">
          <text:p/>
        </draw:polygon>
        <draw:polygon draw:style-name="gr269" draw:text-style-name="P267" draw:layer="layout" svg:width="0.027cm" svg:height="0.026cm" svg:x="5.856cm" svg:y="18.975cm" svg:viewBox="0 0 28 27" draw:points="0,0 28,0 28,27 0,27">
          <text:p/>
        </draw:polygon>
        <draw:polygon draw:style-name="gr269" draw:text-style-name="P267" draw:layer="layout" svg:width="0.027cm" svg:height="0.026cm" svg:x="5.909cm" svg:y="18.975cm" svg:viewBox="0 0 28 27" draw:points="0,0 28,0 28,27 0,27">
          <text:p/>
        </draw:polygon>
        <draw:polygon draw:style-name="gr269" draw:text-style-name="P267" draw:layer="layout" svg:width="0.027cm" svg:height="0.026cm" svg:x="5.962cm" svg:y="18.975cm" svg:viewBox="0 0 28 27" draw:points="0,0 28,0 28,27 0,27">
          <text:p/>
        </draw:polygon>
        <draw:polygon draw:style-name="gr269" draw:text-style-name="P267" draw:layer="layout" svg:width="0.027cm" svg:height="0.026cm" svg:x="6.015cm" svg:y="18.975cm" svg:viewBox="0 0 28 27" draw:points="0,0 28,0 28,27 0,27">
          <text:p/>
        </draw:polygon>
        <draw:polygon draw:style-name="gr269" draw:text-style-name="P267" draw:layer="layout" svg:width="0.027cm" svg:height="0.026cm" svg:x="6.068cm" svg:y="18.975cm" svg:viewBox="0 0 28 27" draw:points="0,0 28,0 28,27 0,27">
          <text:p/>
        </draw:polygon>
        <draw:polygon draw:style-name="gr269" draw:text-style-name="P267" draw:layer="layout" svg:width="0.027cm" svg:height="0.026cm" svg:x="6.121cm" svg:y="18.975cm" svg:viewBox="0 0 28 27" draw:points="0,0 28,0 28,27 0,27">
          <text:p/>
        </draw:polygon>
        <draw:polygon draw:style-name="gr269" draw:text-style-name="P267" draw:layer="layout" svg:width="0.028cm" svg:height="0.026cm" svg:x="6.174cm" svg:y="18.975cm" svg:viewBox="0 0 29 27" draw:points="0,0 29,0 29,27 0,27">
          <text:p/>
        </draw:polygon>
        <draw:polygon draw:style-name="gr269" draw:text-style-name="P267" draw:layer="layout" svg:width="0.027cm" svg:height="0.026cm" svg:x="6.227cm" svg:y="18.975cm" svg:viewBox="0 0 28 27" draw:points="0,0 28,0 28,27 0,27">
          <text:p/>
        </draw:polygon>
        <draw:polygon draw:style-name="gr269" draw:text-style-name="P267" draw:layer="layout" svg:width="0.027cm" svg:height="0.026cm" svg:x="6.28cm" svg:y="18.975cm" svg:viewBox="0 0 28 27" draw:points="0,0 28,0 28,27 0,27">
          <text:p/>
        </draw:polygon>
        <draw:polygon draw:style-name="gr269" draw:text-style-name="P267" draw:layer="layout" svg:width="0.027cm" svg:height="0.026cm" svg:x="6.333cm" svg:y="18.975cm" svg:viewBox="0 0 28 27" draw:points="0,0 28,0 28,27 0,27">
          <text:p/>
        </draw:polygon>
        <draw:polygon draw:style-name="gr269" draw:text-style-name="P267" draw:layer="layout" svg:width="0.026cm" svg:height="0.026cm" svg:x="6.387cm" svg:y="18.975cm" svg:viewBox="0 0 27 27" draw:points="0,0 27,0 27,27 0,27">
          <text:p/>
        </draw:polygon>
        <draw:polygon draw:style-name="gr269" draw:text-style-name="P267" draw:layer="layout" svg:width="0.026cm" svg:height="0.026cm" svg:x="6.44cm" svg:y="18.975cm" svg:viewBox="0 0 27 27" draw:points="0,0 27,0 27,27 0,27">
          <text:p/>
        </draw:polygon>
        <draw:polygon draw:style-name="gr269" draw:text-style-name="P267" draw:layer="layout" svg:width="0.026cm" svg:height="0.026cm" svg:x="6.493cm" svg:y="18.975cm" svg:viewBox="0 0 27 27" draw:points="0,0 27,0 27,27 0,27">
          <text:p/>
        </draw:polygon>
        <draw:polygon draw:style-name="gr269" draw:text-style-name="P267" draw:layer="layout" svg:width="0.026cm" svg:height="0.026cm" svg:x="6.546cm" svg:y="18.975cm" svg:viewBox="0 0 27 27" draw:points="0,0 27,0 27,27 0,27">
          <text:p/>
        </draw:polygon>
        <draw:polygon draw:style-name="gr269" draw:text-style-name="P267" draw:layer="layout" svg:width="0.026cm" svg:height="0.026cm" svg:x="6.599cm" svg:y="18.975cm" svg:viewBox="0 0 27 27" draw:points="0,0 27,0 27,27 0,27">
          <text:p/>
        </draw:polygon>
        <draw:polygon draw:style-name="gr269" draw:text-style-name="P267" draw:layer="layout" svg:width="0.026cm" svg:height="0.026cm" svg:x="6.652cm" svg:y="18.975cm" svg:viewBox="0 0 27 27" draw:points="0,0 27,0 27,27 0,27">
          <text:p/>
        </draw:polygon>
        <draw:polygon draw:style-name="gr269" draw:text-style-name="P267" draw:layer="layout" svg:width="0.026cm" svg:height="0.026cm" svg:x="6.705cm" svg:y="18.975cm" svg:viewBox="0 0 27 27" draw:points="0,0 27,0 27,27 0,27">
          <text:p/>
        </draw:polygon>
        <draw:polygon draw:style-name="gr269" draw:text-style-name="P267" draw:layer="layout" svg:width="0.026cm" svg:height="0.026cm" svg:x="6.758cm" svg:y="18.975cm" svg:viewBox="0 0 27 27" draw:points="0,0 27,0 27,27 0,27">
          <text:p/>
        </draw:polygon>
        <draw:polygon draw:style-name="gr269" draw:text-style-name="P267" draw:layer="layout" svg:width="0.026cm" svg:height="0.026cm" svg:x="6.811cm" svg:y="18.975cm" svg:viewBox="0 0 27 27" draw:points="0,0 27,0 27,27 0,27">
          <text:p/>
        </draw:polygon>
        <draw:polygon draw:style-name="gr269" draw:text-style-name="P267" draw:layer="layout" svg:width="0.026cm" svg:height="0.026cm" svg:x="6.864cm" svg:y="18.975cm" svg:viewBox="0 0 27 27" draw:points="0,0 27,0 27,27 0,27">
          <text:p/>
        </draw:polygon>
        <draw:polygon draw:style-name="gr269" draw:text-style-name="P267" draw:layer="layout" svg:width="0.026cm" svg:height="0.026cm" svg:x="6.917cm" svg:y="18.975cm" svg:viewBox="0 0 27 27" draw:points="0,0 27,0 27,27 0,27">
          <text:p/>
        </draw:polygon>
        <draw:polygon draw:style-name="gr269" draw:text-style-name="P267" draw:layer="layout" svg:width="0.026cm" svg:height="0.026cm" svg:x="6.97cm" svg:y="18.975cm" svg:viewBox="0 0 27 27" draw:points="0,0 27,0 27,27 0,27">
          <text:p/>
        </draw:polygon>
        <draw:polygon draw:style-name="gr269" draw:text-style-name="P267" draw:layer="layout" svg:width="0.026cm" svg:height="0.026cm" svg:x="7.023cm" svg:y="18.975cm" svg:viewBox="0 0 27 27" draw:points="0,0 27,0 27,27 0,27">
          <text:p/>
        </draw:polygon>
        <draw:polygon draw:style-name="gr269" draw:text-style-name="P267" draw:layer="layout" svg:width="0.026cm" svg:height="0.026cm" svg:x="7.076cm" svg:y="18.975cm" svg:viewBox="0 0 27 27" draw:points="0,0 27,0 27,27 0,27">
          <text:p/>
        </draw:polygon>
        <draw:polygon draw:style-name="gr269" draw:text-style-name="P267" draw:layer="layout" svg:width="0.026cm" svg:height="0.026cm" svg:x="7.129cm" svg:y="18.975cm" svg:viewBox="0 0 27 27" draw:points="0,0 27,0 27,27 0,27">
          <text:p/>
        </draw:polygon>
        <draw:polygon draw:style-name="gr269" draw:text-style-name="P267" draw:layer="layout" svg:width="0.026cm" svg:height="0.026cm" svg:x="7.182cm" svg:y="18.975cm" svg:viewBox="0 0 27 27" draw:points="0,0 27,0 27,27 0,27">
          <text:p/>
        </draw:polygon>
        <draw:polygon draw:style-name="gr269" draw:text-style-name="P267" draw:layer="layout" svg:width="0.026cm" svg:height="0.026cm" svg:x="7.235cm" svg:y="18.975cm" svg:viewBox="0 0 27 27" draw:points="0,0 27,0 27,27 0,27">
          <text:p/>
        </draw:polygon>
        <draw:polygon draw:style-name="gr269" draw:text-style-name="P267" draw:layer="layout" svg:width="0.026cm" svg:height="0.026cm" svg:x="7.288cm" svg:y="18.975cm" svg:viewBox="0 0 27 27" draw:points="0,0 27,0 27,27 0,27">
          <text:p/>
        </draw:polygon>
        <draw:polygon draw:style-name="gr269" draw:text-style-name="P267" draw:layer="layout" svg:width="0.026cm" svg:height="0.026cm" svg:x="7.341cm" svg:y="18.975cm" svg:viewBox="0 0 27 27" draw:points="0,0 27,0 27,27 0,27">
          <text:p/>
        </draw:polygon>
        <draw:polygon draw:style-name="gr269" draw:text-style-name="P267" draw:layer="layout" svg:width="0.026cm" svg:height="0.026cm" svg:x="7.394cm" svg:y="18.975cm" svg:viewBox="0 0 27 27" draw:points="0,0 27,0 27,27 0,27">
          <text:p/>
        </draw:polygon>
        <draw:polygon draw:style-name="gr269" draw:text-style-name="P267" draw:layer="layout" svg:width="0.026cm" svg:height="0.026cm" svg:x="7.447cm" svg:y="18.975cm" svg:viewBox="0 0 27 27" draw:points="0,0 27,0 27,27 0,27">
          <text:p/>
        </draw:polygon>
        <draw:polygon draw:style-name="gr269" draw:text-style-name="P267" draw:layer="layout" svg:width="0.026cm" svg:height="0.026cm" svg:x="7.5cm" svg:y="18.975cm" svg:viewBox="0 0 27 27" draw:points="0,0 27,0 27,27 0,27">
          <text:p/>
        </draw:polygon>
        <draw:polygon draw:style-name="gr269" draw:text-style-name="P267" draw:layer="layout" svg:width="0.026cm" svg:height="0.026cm" svg:x="7.553cm" svg:y="18.975cm" svg:viewBox="0 0 27 27" draw:points="0,0 27,0 27,27 0,27">
          <text:p/>
        </draw:polygon>
        <draw:polygon draw:style-name="gr269" draw:text-style-name="P267" draw:layer="layout" svg:width="0.026cm" svg:height="0.026cm" svg:x="7.606cm" svg:y="18.975cm" svg:viewBox="0 0 27 27" draw:points="0,0 27,0 27,27 0,27">
          <text:p/>
        </draw:polygon>
        <draw:polygon draw:style-name="gr269" draw:text-style-name="P267" draw:layer="layout" svg:width="0.026cm" svg:height="0.026cm" svg:x="7.659cm" svg:y="18.975cm" svg:viewBox="0 0 27 27" draw:points="0,0 27,0 27,27 0,27">
          <text:p/>
        </draw:polygon>
        <draw:polygon draw:style-name="gr269" draw:text-style-name="P267" draw:layer="layout" svg:width="0.026cm" svg:height="0.026cm" svg:x="7.712cm" svg:y="18.975cm" svg:viewBox="0 0 27 27" draw:points="0,0 27,0 27,27 0,27">
          <text:p/>
        </draw:polygon>
        <draw:polygon draw:style-name="gr269" draw:text-style-name="P267" draw:layer="layout" svg:width="0.026cm" svg:height="0.026cm" svg:x="7.765cm" svg:y="18.975cm" svg:viewBox="0 0 27 27" draw:points="0,0 27,0 27,27 0,27">
          <text:p/>
        </draw:polygon>
        <draw:polygon draw:style-name="gr269" draw:text-style-name="P267" draw:layer="layout" svg:width="0.026cm" svg:height="0.026cm" svg:x="7.818cm" svg:y="18.975cm" svg:viewBox="0 0 27 27" draw:points="0,0 27,0 27,27 0,27">
          <text:p/>
        </draw:polygon>
        <draw:polygon draw:style-name="gr269" draw:text-style-name="P267" draw:layer="layout" svg:width="0.026cm" svg:height="0.026cm" svg:x="7.871cm" svg:y="18.975cm" svg:viewBox="0 0 27 27" draw:points="0,0 27,0 27,27 0,27">
          <text:p/>
        </draw:polygon>
        <draw:polygon draw:style-name="gr269" draw:text-style-name="P267" draw:layer="layout" svg:width="0.026cm" svg:height="0.026cm" svg:x="7.924cm" svg:y="18.975cm" svg:viewBox="0 0 27 27" draw:points="0,0 27,0 27,27 0,27">
          <text:p/>
        </draw:polygon>
        <draw:polygon draw:style-name="gr269" draw:text-style-name="P267" draw:layer="layout" svg:width="0.026cm" svg:height="0.026cm" svg:x="7.977cm" svg:y="18.975cm" svg:viewBox="0 0 27 27" draw:points="0,0 27,0 27,27 0,27">
          <text:p/>
        </draw:polygon>
        <draw:polygon draw:style-name="gr269" draw:text-style-name="P267" draw:layer="layout" svg:width="0.026cm" svg:height="0.026cm" svg:x="8.03cm" svg:y="18.975cm" svg:viewBox="0 0 27 27" draw:points="0,0 27,0 27,27 0,27">
          <text:p/>
        </draw:polygon>
        <draw:polygon draw:style-name="gr269" draw:text-style-name="P267" draw:layer="layout" svg:width="0.026cm" svg:height="0.026cm" svg:x="8.083cm" svg:y="18.975cm" svg:viewBox="0 0 27 27" draw:points="0,0 27,0 27,27 0,27">
          <text:p/>
        </draw:polygon>
        <draw:polygon draw:style-name="gr269" draw:text-style-name="P267" draw:layer="layout" svg:width="0.026cm" svg:height="0.026cm" svg:x="8.136cm" svg:y="18.975cm" svg:viewBox="0 0 27 27" draw:points="0,0 27,0 27,27 0,27">
          <text:p/>
        </draw:polygon>
        <draw:polygon draw:style-name="gr269" draw:text-style-name="P267" draw:layer="layout" svg:width="0.026cm" svg:height="0.026cm" svg:x="8.189cm" svg:y="18.975cm" svg:viewBox="0 0 27 27" draw:points="0,0 27,0 27,27 0,27">
          <text:p/>
        </draw:polygon>
        <draw:polygon draw:style-name="gr269" draw:text-style-name="P267" draw:layer="layout" svg:width="0.026cm" svg:height="0.026cm" svg:x="8.242cm" svg:y="18.975cm" svg:viewBox="0 0 27 27" draw:points="0,0 27,0 27,27 0,27">
          <text:p/>
        </draw:polygon>
        <draw:polygon draw:style-name="gr269" draw:text-style-name="P267" draw:layer="layout" svg:width="0.026cm" svg:height="0.026cm" svg:x="8.295cm" svg:y="18.975cm" svg:viewBox="0 0 27 27" draw:points="0,0 27,0 27,27 0,27">
          <text:p/>
        </draw:polygon>
        <draw:polygon draw:style-name="gr269" draw:text-style-name="P267" draw:layer="layout" svg:width="0.026cm" svg:height="0.026cm" svg:x="8.348cm" svg:y="18.975cm" svg:viewBox="0 0 27 27" draw:points="0,0 27,0 27,27 0,27">
          <text:p/>
        </draw:polygon>
        <draw:polygon draw:style-name="gr269" draw:text-style-name="P267" draw:layer="layout" svg:width="0.026cm" svg:height="0.026cm" svg:x="8.401cm" svg:y="18.975cm" svg:viewBox="0 0 27 27" draw:points="0,0 27,0 27,27 0,27">
          <text:p/>
        </draw:polygon>
        <draw:polygon draw:style-name="gr269" draw:text-style-name="P267" draw:layer="layout" svg:width="0.026cm" svg:height="0.026cm" svg:x="8.454cm" svg:y="18.975cm" svg:viewBox="0 0 27 27" draw:points="0,0 27,0 27,27 0,27">
          <text:p/>
        </draw:polygon>
        <draw:polygon draw:style-name="gr269" draw:text-style-name="P267" draw:layer="layout" svg:width="0.026cm" svg:height="0.026cm" svg:x="8.507cm" svg:y="18.975cm" svg:viewBox="0 0 27 27" draw:points="0,0 27,0 27,27 0,27">
          <text:p/>
        </draw:polygon>
        <draw:polygon draw:style-name="gr269" draw:text-style-name="P267" draw:layer="layout" svg:width="0.026cm" svg:height="0.026cm" svg:x="8.56cm" svg:y="18.975cm" svg:viewBox="0 0 27 27" draw:points="0,0 27,0 27,27 0,27">
          <text:p/>
        </draw:polygon>
        <draw:polygon draw:style-name="gr269" draw:text-style-name="P267" draw:layer="layout" svg:width="0.026cm" svg:height="0.026cm" svg:x="8.613cm" svg:y="18.975cm" svg:viewBox="0 0 27 27" draw:points="0,0 27,0 27,27 0,27">
          <text:p/>
        </draw:polygon>
        <draw:polygon draw:style-name="gr269" draw:text-style-name="P267" draw:layer="layout" svg:width="0.026cm" svg:height="0.026cm" svg:x="8.666cm" svg:y="18.975cm" svg:viewBox="0 0 27 27" draw:points="0,0 27,0 27,27 0,27">
          <text:p/>
        </draw:polygon>
        <draw:polygon draw:style-name="gr269" draw:text-style-name="P267" draw:layer="layout" svg:width="0.026cm" svg:height="0.026cm" svg:x="8.719cm" svg:y="18.975cm" svg:viewBox="0 0 27 27" draw:points="0,0 27,0 27,27 0,27">
          <text:p/>
        </draw:polygon>
        <draw:polygon draw:style-name="gr269" draw:text-style-name="P267" draw:layer="layout" svg:width="0.026cm" svg:height="0.026cm" svg:x="8.772cm" svg:y="18.975cm" svg:viewBox="0 0 27 27" draw:points="0,0 27,0 27,27 0,27">
          <text:p/>
        </draw:polygon>
        <draw:polygon draw:style-name="gr269" draw:text-style-name="P267" draw:layer="layout" svg:width="0.026cm" svg:height="0.026cm" svg:x="8.825cm" svg:y="18.975cm" svg:viewBox="0 0 27 27" draw:points="0,0 27,0 27,27 0,27">
          <text:p/>
        </draw:polygon>
        <draw:polygon draw:style-name="gr269" draw:text-style-name="P267" draw:layer="layout" svg:width="0.026cm" svg:height="0.026cm" svg:x="8.878cm" svg:y="18.975cm" svg:viewBox="0 0 27 27" draw:points="0,0 27,0 27,27 0,27">
          <text:p/>
        </draw:polygon>
        <draw:polygon draw:style-name="gr269" draw:text-style-name="P267" draw:layer="layout" svg:width="0.026cm" svg:height="0.026cm" svg:x="8.931cm" svg:y="18.975cm" svg:viewBox="0 0 27 27" draw:points="0,0 27,0 27,27 0,27">
          <text:p/>
        </draw:polygon>
        <draw:polygon draw:style-name="gr269" draw:text-style-name="P267" draw:layer="layout" svg:width="0.026cm" svg:height="0.026cm" svg:x="8.984cm" svg:y="18.975cm" svg:viewBox="0 0 27 27" draw:points="0,0 27,0 27,27 0,27">
          <text:p/>
        </draw:polygon>
        <draw:polygon draw:style-name="gr269" draw:text-style-name="P267" draw:layer="layout" svg:width="0.026cm" svg:height="0.026cm" svg:x="9.037cm" svg:y="18.975cm" svg:viewBox="0 0 27 27" draw:points="0,0 27,0 27,27 0,27">
          <text:p/>
        </draw:polygon>
        <draw:polygon draw:style-name="gr269" draw:text-style-name="P267" draw:layer="layout" svg:width="0.026cm" svg:height="0.026cm" svg:x="9.09cm" svg:y="18.975cm" svg:viewBox="0 0 27 27" draw:points="0,0 27,0 27,27 0,27">
          <text:p/>
        </draw:polygon>
        <draw:polygon draw:style-name="gr269" draw:text-style-name="P267" draw:layer="layout" svg:width="0.026cm" svg:height="0.026cm" svg:x="9.143cm" svg:y="18.975cm" svg:viewBox="0 0 27 27" draw:points="0,0 27,0 27,27 0,27">
          <text:p/>
        </draw:polygon>
        <draw:polygon draw:style-name="gr269" draw:text-style-name="P267" draw:layer="layout" svg:width="0.026cm" svg:height="0.026cm" svg:x="9.196cm" svg:y="18.975cm" svg:viewBox="0 0 27 27" draw:points="0,0 27,0 27,27 0,27">
          <text:p/>
        </draw:polygon>
        <draw:polygon draw:style-name="gr269" draw:text-style-name="P267" draw:layer="layout" svg:width="0.026cm" svg:height="0.026cm" svg:x="9.249cm" svg:y="18.975cm" svg:viewBox="0 0 27 27" draw:points="0,0 27,0 27,27 0,27">
          <text:p/>
        </draw:polygon>
        <draw:polygon draw:style-name="gr269" draw:text-style-name="P267" draw:layer="layout" svg:width="0.026cm" svg:height="0.026cm" svg:x="9.302cm" svg:y="18.975cm" svg:viewBox="0 0 27 27" draw:points="0,0 27,0 27,27 0,27">
          <text:p/>
        </draw:polygon>
        <draw:polygon draw:style-name="gr269" draw:text-style-name="P267" draw:layer="layout" svg:width="0.026cm" svg:height="0.026cm" svg:x="9.355cm" svg:y="18.975cm" svg:viewBox="0 0 27 27" draw:points="0,0 27,0 27,27 0,27">
          <text:p/>
        </draw:polygon>
        <draw:polygon draw:style-name="gr269" draw:text-style-name="P267" draw:layer="layout" svg:width="0.026cm" svg:height="0.026cm" svg:x="9.408cm" svg:y="18.975cm" svg:viewBox="0 0 27 27" draw:points="0,0 27,0 27,27 0,27">
          <text:p/>
        </draw:polygon>
        <draw:polygon draw:style-name="gr269" draw:text-style-name="P267" draw:layer="layout" svg:width="0.026cm" svg:height="0.026cm" svg:x="9.461cm" svg:y="18.975cm" svg:viewBox="0 0 27 27" draw:points="0,0 27,0 27,27 0,27">
          <text:p/>
        </draw:polygon>
        <draw:polygon draw:style-name="gr269" draw:text-style-name="P267" draw:layer="layout" svg:width="0.026cm" svg:height="0.026cm" svg:x="9.514cm" svg:y="18.975cm" svg:viewBox="0 0 27 27" draw:points="0,0 27,0 27,27 0,27">
          <text:p/>
        </draw:polygon>
        <draw:polygon draw:style-name="gr269" draw:text-style-name="P267" draw:layer="layout" svg:width="0.026cm" svg:height="0.026cm" svg:x="9.567cm" svg:y="18.975cm" svg:viewBox="0 0 27 27" draw:points="0,0 27,0 27,27 0,27">
          <text:p/>
        </draw:polygon>
        <draw:polygon draw:style-name="gr269" draw:text-style-name="P267" draw:layer="layout" svg:width="0.026cm" svg:height="0.026cm" svg:x="9.62cm" svg:y="18.975cm" svg:viewBox="0 0 27 27" draw:points="0,0 27,0 27,27 0,27">
          <text:p/>
        </draw:polygon>
        <draw:polygon draw:style-name="gr269" draw:text-style-name="P267" draw:layer="layout" svg:width="0.026cm" svg:height="0.026cm" svg:x="9.673cm" svg:y="18.975cm" svg:viewBox="0 0 27 27" draw:points="0,0 27,0 27,27 0,27">
          <text:p/>
        </draw:polygon>
        <draw:polygon draw:style-name="gr269" draw:text-style-name="P267" draw:layer="layout" svg:width="0.026cm" svg:height="0.026cm" svg:x="9.726cm" svg:y="18.975cm" svg:viewBox="0 0 27 27" draw:points="0,0 27,0 27,27 0,27">
          <text:p/>
        </draw:polygon>
        <draw:polygon draw:style-name="gr269" draw:text-style-name="P267" draw:layer="layout" svg:width="0.026cm" svg:height="0.026cm" svg:x="9.779cm" svg:y="18.975cm" svg:viewBox="0 0 27 27" draw:points="0,0 27,0 27,27 0,27">
          <text:p/>
        </draw:polygon>
        <draw:polygon draw:style-name="gr269" draw:text-style-name="P267" draw:layer="layout" svg:width="0.026cm" svg:height="0.026cm" svg:x="9.832cm" svg:y="18.975cm" svg:viewBox="0 0 27 27" draw:points="0,0 27,0 27,27 0,27">
          <text:p/>
        </draw:polygon>
        <draw:polygon draw:style-name="gr269" draw:text-style-name="P267" draw:layer="layout" svg:width="0.026cm" svg:height="0.026cm" svg:x="9.885cm" svg:y="18.975cm" svg:viewBox="0 0 27 27" draw:points="0,0 27,0 27,27 0,27">
          <text:p/>
        </draw:polygon>
        <draw:polygon draw:style-name="gr269" draw:text-style-name="P267" draw:layer="layout" svg:width="0.026cm" svg:height="0.026cm" svg:x="9.938cm" svg:y="18.975cm" svg:viewBox="0 0 27 27" draw:points="0,0 27,0 27,27 0,27">
          <text:p/>
        </draw:polygon>
        <draw:polygon draw:style-name="gr269" draw:text-style-name="P267" draw:layer="layout" svg:width="0.026cm" svg:height="0.026cm" svg:x="9.991cm" svg:y="18.975cm" svg:viewBox="0 0 27 27" draw:points="0,0 27,0 27,27 0,27">
          <text:p/>
        </draw:polygon>
        <draw:polygon draw:style-name="gr269" draw:text-style-name="P267" draw:layer="layout" svg:width="0.026cm" svg:height="0.026cm" svg:x="10.044cm" svg:y="18.975cm" svg:viewBox="0 0 27 27" draw:points="0,0 27,0 27,27 0,27">
          <text:p/>
        </draw:polygon>
        <draw:polygon draw:style-name="gr269" draw:text-style-name="P267" draw:layer="layout" svg:width="0.026cm" svg:height="0.026cm" svg:x="10.097cm" svg:y="18.975cm" svg:viewBox="0 0 27 27" draw:points="0,0 27,0 27,27 0,27">
          <text:p/>
        </draw:polygon>
        <draw:polygon draw:style-name="gr269" draw:text-style-name="P267" draw:layer="layout" svg:width="0.026cm" svg:height="0.026cm" svg:x="10.15cm" svg:y="18.975cm" svg:viewBox="0 0 27 27" draw:points="0,0 27,0 27,27 0,27">
          <text:p/>
        </draw:polygon>
        <draw:polygon draw:style-name="gr269" draw:text-style-name="P267" draw:layer="layout" svg:width="0.026cm" svg:height="0.026cm" svg:x="10.203cm" svg:y="18.975cm" svg:viewBox="0 0 27 27" draw:points="0,0 27,0 27,27 0,27">
          <text:p/>
        </draw:polygon>
        <draw:polygon draw:style-name="gr269" draw:text-style-name="P267" draw:layer="layout" svg:width="0.026cm" svg:height="0.026cm" svg:x="10.256cm" svg:y="18.975cm" svg:viewBox="0 0 27 27" draw:points="0,0 27,0 27,27 0,27">
          <text:p/>
        </draw:polygon>
        <draw:polygon draw:style-name="gr269" draw:text-style-name="P267" draw:layer="layout" svg:width="0.026cm" svg:height="0.026cm" svg:x="10.309cm" svg:y="18.975cm" svg:viewBox="0 0 27 27" draw:points="0,0 27,0 27,27 0,27">
          <text:p/>
        </draw:polygon>
        <draw:polygon draw:style-name="gr269" draw:text-style-name="P267" draw:layer="layout" svg:width="0.026cm" svg:height="0.026cm" svg:x="10.362cm" svg:y="18.975cm" svg:viewBox="0 0 27 27" draw:points="0,0 27,0 27,27 0,27">
          <text:p/>
        </draw:polygon>
        <draw:polygon draw:style-name="gr269" draw:text-style-name="P267" draw:layer="layout" svg:width="0.026cm" svg:height="0.026cm" svg:x="10.415cm" svg:y="18.975cm" svg:viewBox="0 0 27 27" draw:points="0,0 27,0 27,27 0,27">
          <text:p/>
        </draw:polygon>
        <draw:polygon draw:style-name="gr269" draw:text-style-name="P267" draw:layer="layout" svg:width="0.026cm" svg:height="0.026cm" svg:x="10.468cm" svg:y="18.975cm" svg:viewBox="0 0 27 27" draw:points="0,0 27,0 27,27 0,27">
          <text:p/>
        </draw:polygon>
        <draw:polygon draw:style-name="gr269" draw:text-style-name="P267" draw:layer="layout" svg:width="0.026cm" svg:height="0.026cm" svg:x="10.521cm" svg:y="18.975cm" svg:viewBox="0 0 27 27" draw:points="0,0 27,0 27,27 0,27">
          <text:p/>
        </draw:polygon>
        <draw:polygon draw:style-name="gr269" draw:text-style-name="P267" draw:layer="layout" svg:width="0.026cm" svg:height="0.026cm" svg:x="10.574cm" svg:y="18.975cm" svg:viewBox="0 0 27 27" draw:points="0,0 27,0 27,27 0,27">
          <text:p/>
        </draw:polygon>
        <draw:polygon draw:style-name="gr269" draw:text-style-name="P267" draw:layer="layout" svg:width="0.026cm" svg:height="0.026cm" svg:x="10.627cm" svg:y="18.975cm" svg:viewBox="0 0 27 27" draw:points="0,0 27,0 27,27 0,27">
          <text:p/>
        </draw:polygon>
        <draw:polygon draw:style-name="gr269" draw:text-style-name="P267" draw:layer="layout" svg:width="0.026cm" svg:height="0.026cm" svg:x="10.68cm" svg:y="18.975cm" svg:viewBox="0 0 27 27" draw:points="0,0 27,0 27,27 0,27">
          <text:p/>
        </draw:polygon>
        <draw:polygon draw:style-name="gr269" draw:text-style-name="P267" draw:layer="layout" svg:width="0.026cm" svg:height="0.026cm" svg:x="10.733cm" svg:y="18.975cm" svg:viewBox="0 0 27 27" draw:points="0,0 27,0 27,27 0,27">
          <text:p/>
        </draw:polygon>
        <draw:polygon draw:style-name="gr269" draw:text-style-name="P267" draw:layer="layout" svg:width="0.026cm" svg:height="0.026cm" svg:x="10.786cm" svg:y="18.975cm" svg:viewBox="0 0 27 27" draw:points="0,0 27,0 27,27 0,27">
          <text:p/>
        </draw:polygon>
        <draw:polygon draw:style-name="gr269" draw:text-style-name="P267" draw:layer="layout" svg:width="0.026cm" svg:height="0.026cm" svg:x="10.839cm" svg:y="18.975cm" svg:viewBox="0 0 27 27" draw:points="0,0 27,0 27,27 0,27">
          <text:p/>
        </draw:polygon>
        <draw:polygon draw:style-name="gr269" draw:text-style-name="P267" draw:layer="layout" svg:width="0.026cm" svg:height="0.026cm" svg:x="10.892cm" svg:y="18.975cm" svg:viewBox="0 0 27 27" draw:points="0,0 27,0 27,27 0,27">
          <text:p/>
        </draw:polygon>
        <draw:polygon draw:style-name="gr269" draw:text-style-name="P267" draw:layer="layout" svg:width="0.026cm" svg:height="0.026cm" svg:x="10.945cm" svg:y="18.975cm" svg:viewBox="0 0 27 27" draw:points="0,0 27,0 27,27 0,27">
          <text:p/>
        </draw:polygon>
        <draw:polygon draw:style-name="gr269" draw:text-style-name="P267" draw:layer="layout" svg:width="0.026cm" svg:height="0.026cm" svg:x="10.998cm" svg:y="18.975cm" svg:viewBox="0 0 27 27" draw:points="0,0 27,0 27,27 0,27">
          <text:p/>
        </draw:polygon>
        <draw:polygon draw:style-name="gr269" draw:text-style-name="P267" draw:layer="layout" svg:width="0.026cm" svg:height="0.026cm" svg:x="11.051cm" svg:y="18.975cm" svg:viewBox="0 0 27 27" draw:points="0,0 27,0 27,27 0,27">
          <text:p/>
        </draw:polygon>
        <draw:polygon draw:style-name="gr269" draw:text-style-name="P267" draw:layer="layout" svg:width="0.026cm" svg:height="0.026cm" svg:x="11.104cm" svg:y="18.975cm" svg:viewBox="0 0 27 27" draw:points="0,0 27,0 27,27 0,27">
          <text:p/>
        </draw:polygon>
        <draw:polygon draw:style-name="gr269" draw:text-style-name="P267" draw:layer="layout" svg:width="0.026cm" svg:height="0.026cm" svg:x="11.157cm" svg:y="18.975cm" svg:viewBox="0 0 27 27" draw:points="0,0 27,0 27,27 0,27">
          <text:p/>
        </draw:polygon>
        <draw:polygon draw:style-name="gr269" draw:text-style-name="P267" draw:layer="layout" svg:width="0.026cm" svg:height="0.026cm" svg:x="11.21cm" svg:y="18.975cm" svg:viewBox="0 0 27 27" draw:points="0,0 27,0 27,27 0,27">
          <text:p/>
        </draw:polygon>
        <draw:polygon draw:style-name="gr269" draw:text-style-name="P267" draw:layer="layout" svg:width="0.026cm" svg:height="0.026cm" svg:x="11.263cm" svg:y="18.975cm" svg:viewBox="0 0 27 27" draw:points="0,0 27,0 27,27 0,27">
          <text:p/>
        </draw:polygon>
        <draw:polygon draw:style-name="gr269" draw:text-style-name="P267" draw:layer="layout" svg:width="0.026cm" svg:height="0.026cm" svg:x="11.316cm" svg:y="18.975cm" svg:viewBox="0 0 27 27" draw:points="0,0 27,0 27,27 0,27">
          <text:p/>
        </draw:polygon>
        <draw:polygon draw:style-name="gr269" draw:text-style-name="P267" draw:layer="layout" svg:width="0.026cm" svg:height="0.026cm" svg:x="11.369cm" svg:y="18.975cm" svg:viewBox="0 0 27 27" draw:points="0,0 27,0 27,27 0,27">
          <text:p/>
        </draw:polygon>
        <draw:polygon draw:style-name="gr269" draw:text-style-name="P267" draw:layer="layout" svg:width="0.026cm" svg:height="0.026cm" svg:x="11.422cm" svg:y="18.975cm" svg:viewBox="0 0 27 27" draw:points="0,0 27,0 27,27 0,27">
          <text:p/>
        </draw:polygon>
        <draw:polygon draw:style-name="gr269" draw:text-style-name="P267" draw:layer="layout" svg:width="0.026cm" svg:height="0.026cm" svg:x="11.475cm" svg:y="18.975cm" svg:viewBox="0 0 27 27" draw:points="0,0 27,0 27,27 0,27">
          <text:p/>
        </draw:polygon>
        <draw:polygon draw:style-name="gr269" draw:text-style-name="P267" draw:layer="layout" svg:width="0.026cm" svg:height="0.026cm" svg:x="11.528cm" svg:y="18.975cm" svg:viewBox="0 0 27 27" draw:points="0,0 27,0 27,27 0,27">
          <text:p/>
        </draw:polygon>
        <draw:polygon draw:style-name="gr269" draw:text-style-name="P267" draw:layer="layout" svg:width="0.026cm" svg:height="0.026cm" svg:x="11.581cm" svg:y="18.975cm" svg:viewBox="0 0 27 27" draw:points="0,0 27,0 27,27 0,27">
          <text:p/>
        </draw:polygon>
        <draw:polygon draw:style-name="gr269" draw:text-style-name="P267" draw:layer="layout" svg:width="0.026cm" svg:height="0.026cm" svg:x="11.634cm" svg:y="18.975cm" svg:viewBox="0 0 27 27" draw:points="0,0 27,0 27,27 0,27">
          <text:p/>
        </draw:polygon>
        <draw:polygon draw:style-name="gr269" draw:text-style-name="P267" draw:layer="layout" svg:width="0.026cm" svg:height="0.026cm" svg:x="11.687cm" svg:y="18.975cm" svg:viewBox="0 0 27 27" draw:points="0,0 27,0 27,27 0,27">
          <text:p/>
        </draw:polygon>
        <draw:polygon draw:style-name="gr269" draw:text-style-name="P267" draw:layer="layout" svg:width="0.026cm" svg:height="0.026cm" svg:x="11.74cm" svg:y="18.975cm" svg:viewBox="0 0 27 27" draw:points="0,0 27,0 27,27 0,27">
          <text:p/>
        </draw:polygon>
        <draw:polygon draw:style-name="gr269" draw:text-style-name="P267" draw:layer="layout" svg:width="0.026cm" svg:height="0.026cm" svg:x="11.793cm" svg:y="18.975cm" svg:viewBox="0 0 27 27" draw:points="0,0 27,0 27,27 0,27">
          <text:p/>
        </draw:polygon>
        <draw:polygon draw:style-name="gr269" draw:text-style-name="P267" draw:layer="layout" svg:width="0.026cm" svg:height="0.026cm" svg:x="11.846cm" svg:y="18.975cm" svg:viewBox="0 0 27 27" draw:points="0,0 27,0 27,27 0,27">
          <text:p/>
        </draw:polygon>
        <draw:polygon draw:style-name="gr269" draw:text-style-name="P267" draw:layer="layout" svg:width="0.026cm" svg:height="0.026cm" svg:x="11.899cm" svg:y="18.975cm" svg:viewBox="0 0 27 27" draw:points="0,0 27,0 27,27 0,27">
          <text:p/>
        </draw:polygon>
        <draw:polygon draw:style-name="gr269" draw:text-style-name="P267" draw:layer="layout" svg:width="0.026cm" svg:height="0.026cm" svg:x="11.952cm" svg:y="18.975cm" svg:viewBox="0 0 27 27" draw:points="0,0 27,0 27,27 0,27">
          <text:p/>
        </draw:polygon>
        <draw:polygon draw:style-name="gr269" draw:text-style-name="P267" draw:layer="layout" svg:width="0.026cm" svg:height="0.026cm" svg:x="12.005cm" svg:y="18.975cm" svg:viewBox="0 0 27 27" draw:points="0,0 27,0 27,27 0,27">
          <text:p/>
        </draw:polygon>
        <draw:polygon draw:style-name="gr269" draw:text-style-name="P267" draw:layer="layout" svg:width="0.026cm" svg:height="0.026cm" svg:x="12.058cm" svg:y="18.975cm" svg:viewBox="0 0 27 27" draw:points="0,0 27,0 27,27 0,27">
          <text:p/>
        </draw:polygon>
        <draw:polygon draw:style-name="gr269" draw:text-style-name="P267" draw:layer="layout" svg:width="0.026cm" svg:height="0.026cm" svg:x="12.111cm" svg:y="18.975cm" svg:viewBox="0 0 27 27" draw:points="0,0 27,0 27,27 0,27">
          <text:p/>
        </draw:polygon>
        <draw:polygon draw:style-name="gr269" draw:text-style-name="P267" draw:layer="layout" svg:width="0.026cm" svg:height="0.026cm" svg:x="12.164cm" svg:y="18.975cm" svg:viewBox="0 0 27 27" draw:points="0,0 27,0 27,27 0,27">
          <text:p/>
        </draw:polygon>
        <draw:polygon draw:style-name="gr269" draw:text-style-name="P267" draw:layer="layout" svg:width="0.026cm" svg:height="0.026cm" svg:x="12.217cm" svg:y="18.975cm" svg:viewBox="0 0 27 27" draw:points="0,0 27,0 27,27 0,27">
          <text:p/>
        </draw:polygon>
        <draw:polygon draw:style-name="gr269" draw:text-style-name="P267" draw:layer="layout" svg:width="0.026cm" svg:height="0.026cm" svg:x="12.27cm" svg:y="18.975cm" svg:viewBox="0 0 27 27" draw:points="0,0 27,0 27,27 0,27">
          <text:p/>
        </draw:polygon>
        <draw:polygon draw:style-name="gr269" draw:text-style-name="P267" draw:layer="layout" svg:width="0.026cm" svg:height="0.026cm" svg:x="12.323cm" svg:y="18.975cm" svg:viewBox="0 0 27 27" draw:points="0,0 27,0 27,27 0,27">
          <text:p/>
        </draw:polygon>
        <draw:polygon draw:style-name="gr269" draw:text-style-name="P267" draw:layer="layout" svg:width="0.026cm" svg:height="0.026cm" svg:x="12.376cm" svg:y="18.975cm" svg:viewBox="0 0 27 27" draw:points="0,0 27,0 27,27 0,27">
          <text:p/>
        </draw:polygon>
        <draw:polygon draw:style-name="gr269" draw:text-style-name="P267" draw:layer="layout" svg:width="0.026cm" svg:height="0.026cm" svg:x="12.429cm" svg:y="18.975cm" svg:viewBox="0 0 27 27" draw:points="0,0 27,0 27,27 0,27">
          <text:p/>
        </draw:polygon>
        <draw:polygon draw:style-name="gr269" draw:text-style-name="P267" draw:layer="layout" svg:width="0.026cm" svg:height="0.026cm" svg:x="12.482cm" svg:y="18.975cm" svg:viewBox="0 0 27 27" draw:points="0,0 27,0 27,27 0,27">
          <text:p/>
        </draw:polygon>
        <draw:polygon draw:style-name="gr269" draw:text-style-name="P267" draw:layer="layout" svg:width="0.026cm" svg:height="0.026cm" svg:x="12.535cm" svg:y="18.975cm" svg:viewBox="0 0 27 27" draw:points="0,0 27,0 27,27 0,27">
          <text:p/>
        </draw:polygon>
        <draw:polygon draw:style-name="gr269" draw:text-style-name="P267" draw:layer="layout" svg:width="0.026cm" svg:height="0.026cm" svg:x="12.588cm" svg:y="18.975cm" svg:viewBox="0 0 27 27" draw:points="0,0 27,0 27,27 0,27">
          <text:p/>
        </draw:polygon>
        <draw:polygon draw:style-name="gr269" draw:text-style-name="P267" draw:layer="layout" svg:width="0.026cm" svg:height="0.026cm" svg:x="12.641cm" svg:y="18.975cm" svg:viewBox="0 0 27 27" draw:points="0,0 27,0 27,27 0,27">
          <text:p/>
        </draw:polygon>
        <draw:polygon draw:style-name="gr269" draw:text-style-name="P267" draw:layer="layout" svg:width="0.027cm" svg:height="0.026cm" svg:x="12.694cm" svg:y="18.975cm" svg:viewBox="0 0 28 27" draw:points="0,0 28,0 28,27 0,27">
          <text:p/>
        </draw:polygon>
        <draw:polygon draw:style-name="gr269" draw:text-style-name="P267" draw:layer="layout" svg:width="0.027cm" svg:height="0.026cm" svg:x="12.747cm" svg:y="18.975cm" svg:viewBox="0 0 28 27" draw:points="0,0 28,0 28,27 0,27">
          <text:p/>
        </draw:polygon>
        <draw:polygon draw:style-name="gr269" draw:text-style-name="P267" draw:layer="layout" svg:width="0.027cm" svg:height="0.026cm" svg:x="12.8cm" svg:y="18.975cm" svg:viewBox="0 0 28 27" draw:points="0,0 28,0 28,27 0,27">
          <text:p/>
        </draw:polygon>
        <draw:polygon draw:style-name="gr269" draw:text-style-name="P267" draw:layer="layout" svg:width="0.027cm" svg:height="0.026cm" svg:x="12.853cm" svg:y="18.975cm" svg:viewBox="0 0 28 27" draw:points="0,0 28,0 28,27 0,27">
          <text:p/>
        </draw:polygon>
        <draw:polygon draw:style-name="gr269" draw:text-style-name="P267" draw:layer="layout" svg:width="0.027cm" svg:height="0.026cm" svg:x="12.906cm" svg:y="18.975cm" svg:viewBox="0 0 28 27" draw:points="0,0 28,0 28,27 0,27">
          <text:p/>
        </draw:polygon>
        <draw:polygon draw:style-name="gr269" draw:text-style-name="P267" draw:layer="layout" svg:width="0.027cm" svg:height="0.026cm" svg:x="12.959cm" svg:y="18.975cm" svg:viewBox="0 0 28 27" draw:points="0,0 28,0 28,27 0,27">
          <text:p/>
        </draw:polygon>
        <draw:polygon draw:style-name="gr269" draw:text-style-name="P267" draw:layer="layout" svg:width="0.028cm" svg:height="0.026cm" svg:x="13.012cm" svg:y="18.975cm" svg:viewBox="0 0 29 27" draw:points="0,0 29,0 29,27 0,27">
          <text:p/>
        </draw:polygon>
        <draw:polygon draw:style-name="gr269" draw:text-style-name="P267" draw:layer="layout" svg:width="0.027cm" svg:height="0.026cm" svg:x="13.065cm" svg:y="18.975cm" svg:viewBox="0 0 28 27" draw:points="0,0 28,0 28,27 0,27">
          <text:p/>
        </draw:polygon>
        <draw:polygon draw:style-name="gr269" draw:text-style-name="P267" draw:layer="layout" svg:width="0.027cm" svg:height="0.026cm" svg:x="13.118cm" svg:y="18.975cm" svg:viewBox="0 0 28 27" draw:points="0,0 28,0 28,27 0,27">
          <text:p/>
        </draw:polygon>
        <draw:polygon draw:style-name="gr269" draw:text-style-name="P267" draw:layer="layout" svg:width="0.027cm" svg:height="0.026cm" svg:x="13.171cm" svg:y="18.975cm" svg:viewBox="0 0 28 27" draw:points="0,0 28,0 28,27 0,27">
          <text:p/>
        </draw:polygon>
        <draw:polygon draw:style-name="gr269" draw:text-style-name="P267" draw:layer="layout" svg:width="0.027cm" svg:height="0.026cm" svg:x="13.224cm" svg:y="18.975cm" svg:viewBox="0 0 28 27" draw:points="0,0 28,0 28,27 0,27">
          <text:p/>
        </draw:polygon>
        <draw:polygon draw:style-name="gr269" draw:text-style-name="P267" draw:layer="layout" svg:width="0.027cm" svg:height="0.026cm" svg:x="13.277cm" svg:y="18.975cm" svg:viewBox="0 0 28 27" draw:points="0,0 28,0 28,27 0,27">
          <text:p/>
        </draw:polygon>
        <draw:polygon draw:style-name="gr269" draw:text-style-name="P267" draw:layer="layout" svg:width="0.027cm" svg:height="0.026cm" svg:x="13.33cm" svg:y="18.975cm" svg:viewBox="0 0 28 27" draw:points="0,0 28,0 28,27 0,27">
          <text:p/>
        </draw:polygon>
        <draw:polygon draw:style-name="gr269" draw:text-style-name="P267" draw:layer="layout" svg:width="0.027cm" svg:height="0.026cm" svg:x="13.383cm" svg:y="18.975cm" svg:viewBox="0 0 28 27" draw:points="0,0 28,0 28,27 0,27">
          <text:p/>
        </draw:polygon>
        <draw:polygon draw:style-name="gr269" draw:text-style-name="P267" draw:layer="layout" svg:width="0.027cm" svg:height="0.026cm" svg:x="13.436cm" svg:y="18.975cm" svg:viewBox="0 0 28 27" draw:points="0,0 28,0 28,27 0,27">
          <text:p/>
        </draw:polygon>
        <draw:polygon draw:style-name="gr269" draw:text-style-name="P267" draw:layer="layout" svg:width="0.027cm" svg:height="0.026cm" svg:x="13.489cm" svg:y="18.975cm" svg:viewBox="0 0 28 27" draw:points="0,0 28,0 28,27 0,27">
          <text:p/>
        </draw:polygon>
        <draw:polygon draw:style-name="gr269" draw:text-style-name="P267" draw:layer="layout" svg:width="0.027cm" svg:height="0.026cm" svg:x="13.542cm" svg:y="18.975cm" svg:viewBox="0 0 28 27" draw:points="0,0 28,0 28,27 0,27">
          <text:p/>
        </draw:polygon>
        <draw:polygon draw:style-name="gr269" draw:text-style-name="P267" draw:layer="layout" svg:width="0.027cm" svg:height="0.026cm" svg:x="13.595cm" svg:y="18.975cm" svg:viewBox="0 0 28 27" draw:points="0,0 28,0 28,27 0,27">
          <text:p/>
        </draw:polygon>
        <draw:polygon draw:style-name="gr269" draw:text-style-name="P267" draw:layer="layout" svg:width="0.027cm" svg:height="0.026cm" svg:x="13.648cm" svg:y="18.975cm" svg:viewBox="0 0 28 27" draw:points="0,0 28,0 28,27 0,27">
          <text:p/>
        </draw:polygon>
        <draw:polygon draw:style-name="gr269" draw:text-style-name="P267" draw:layer="layout" svg:width="0.027cm" svg:height="0.026cm" svg:x="13.701cm" svg:y="18.975cm" svg:viewBox="0 0 28 27" draw:points="0,0 28,0 28,27 0,27">
          <text:p/>
        </draw:polygon>
        <draw:polygon draw:style-name="gr269" draw:text-style-name="P267" draw:layer="layout" svg:width="0.027cm" svg:height="0.026cm" svg:x="13.754cm" svg:y="18.975cm" svg:viewBox="0 0 28 27" draw:points="0,0 28,0 28,27 0,27">
          <text:p/>
        </draw:polygon>
        <draw:polygon draw:style-name="gr269" draw:text-style-name="P267" draw:layer="layout" svg:width="0.027cm" svg:height="0.026cm" svg:x="13.807cm" svg:y="18.975cm" svg:viewBox="0 0 28 27" draw:points="0,0 28,0 28,27 0,27">
          <text:p/>
        </draw:polygon>
        <draw:polygon draw:style-name="gr269" draw:text-style-name="P267" draw:layer="layout" svg:width="0.027cm" svg:height="0.026cm" svg:x="13.86cm" svg:y="18.975cm" svg:viewBox="0 0 28 27" draw:points="0,0 28,0 28,27 0,27">
          <text:p/>
        </draw:polygon>
        <draw:polygon draw:style-name="gr269" draw:text-style-name="P267" draw:layer="layout" svg:width="0.027cm" svg:height="0.026cm" svg:x="13.913cm" svg:y="18.975cm" svg:viewBox="0 0 28 27" draw:points="0,0 28,0 28,27 0,27">
          <text:p/>
        </draw:polygon>
        <draw:polygon draw:style-name="gr269" draw:text-style-name="P267" draw:layer="layout" svg:width="0.027cm" svg:height="0.026cm" svg:x="13.966cm" svg:y="18.975cm" svg:viewBox="0 0 28 27" draw:points="0,0 28,0 28,27 0,27">
          <text:p/>
        </draw:polygon>
        <draw:polygon draw:style-name="gr269" draw:text-style-name="P267" draw:layer="layout" svg:width="0.027cm" svg:height="0.026cm" svg:x="14.019cm" svg:y="18.975cm" svg:viewBox="0 0 28 27" draw:points="0,0 28,0 28,27 0,27">
          <text:p/>
        </draw:polygon>
        <draw:polygon draw:style-name="gr269" draw:text-style-name="P267" draw:layer="layout" svg:width="0.027cm" svg:height="0.026cm" svg:x="14.072cm" svg:y="18.975cm" svg:viewBox="0 0 28 27" draw:points="0,0 28,0 28,27 0,27">
          <text:p/>
        </draw:polygon>
        <draw:polygon draw:style-name="gr269" draw:text-style-name="P267" draw:layer="layout" svg:width="0.027cm" svg:height="0.026cm" svg:x="14.125cm" svg:y="18.975cm" svg:viewBox="0 0 28 27" draw:points="0,0 28,0 28,27 0,27">
          <text:p/>
        </draw:polygon>
        <draw:polygon draw:style-name="gr269" draw:text-style-name="P267" draw:layer="layout" svg:width="0.027cm" svg:height="0.026cm" svg:x="14.178cm" svg:y="18.975cm" svg:viewBox="0 0 28 27" draw:points="0,0 28,0 28,27 0,27">
          <text:p/>
        </draw:polygon>
        <draw:polygon draw:style-name="gr269" draw:text-style-name="P267" draw:layer="layout" svg:width="0.027cm" svg:height="0.026cm" svg:x="14.231cm" svg:y="18.975cm" svg:viewBox="0 0 28 27" draw:points="0,0 28,0 28,27 0,27">
          <text:p/>
        </draw:polygon>
        <draw:polygon draw:style-name="gr269" draw:text-style-name="P267" draw:layer="layout" svg:width="0.027cm" svg:height="0.026cm" svg:x="14.284cm" svg:y="18.975cm" svg:viewBox="0 0 28 27" draw:points="0,0 28,0 28,27 0,27">
          <text:p/>
        </draw:polygon>
        <draw:polygon draw:style-name="gr269" draw:text-style-name="P267" draw:layer="layout" svg:width="0.027cm" svg:height="0.026cm" svg:x="14.337cm" svg:y="18.975cm" svg:viewBox="0 0 28 27" draw:points="0,0 28,0 28,27 0,27">
          <text:p/>
        </draw:polygon>
        <draw:polygon draw:style-name="gr269" draw:text-style-name="P267" draw:layer="layout" svg:width="0.028cm" svg:height="0.026cm" svg:x="14.39cm" svg:y="18.975cm" svg:viewBox="0 0 29 27" draw:points="0,0 29,0 29,27 0,27">
          <text:p/>
        </draw:polygon>
        <draw:polygon draw:style-name="gr269" draw:text-style-name="P267" draw:layer="layout" svg:width="0.027cm" svg:height="0.026cm" svg:x="14.443cm" svg:y="18.975cm" svg:viewBox="0 0 28 27" draw:points="0,0 28,0 28,27 0,27">
          <text:p/>
        </draw:polygon>
        <draw:polygon draw:style-name="gr269" draw:text-style-name="P267" draw:layer="layout" svg:width="0.027cm" svg:height="0.026cm" svg:x="14.496cm" svg:y="18.975cm" svg:viewBox="0 0 28 27" draw:points="0,0 28,0 28,27 0,27">
          <text:p/>
        </draw:polygon>
        <draw:polygon draw:style-name="gr269" draw:text-style-name="P267" draw:layer="layout" svg:width="0.027cm" svg:height="0.026cm" svg:x="14.549cm" svg:y="18.975cm" svg:viewBox="0 0 28 27" draw:points="0,0 28,0 28,27 0,27">
          <text:p/>
        </draw:polygon>
        <draw:polygon draw:style-name="gr269" draw:text-style-name="P267" draw:layer="layout" svg:width="0.027cm" svg:height="0.026cm" svg:x="14.602cm" svg:y="18.975cm" svg:viewBox="0 0 28 27" draw:points="0,0 28,0 28,27 0,27">
          <text:p/>
        </draw:polygon>
        <draw:polygon draw:style-name="gr269" draw:text-style-name="P267" draw:layer="layout" svg:width="0.027cm" svg:height="0.026cm" svg:x="14.655cm" svg:y="18.975cm" svg:viewBox="0 0 28 27" draw:points="0,0 28,0 28,27 0,27">
          <text:p/>
        </draw:polygon>
        <draw:polygon draw:style-name="gr269" draw:text-style-name="P267" draw:layer="layout" svg:width="0.027cm" svg:height="0.026cm" svg:x="14.708cm" svg:y="18.975cm" svg:viewBox="0 0 28 27" draw:points="0,0 28,0 28,27 0,27">
          <text:p/>
        </draw:polygon>
        <draw:polygon draw:style-name="gr269" draw:text-style-name="P267" draw:layer="layout" svg:width="0.027cm" svg:height="0.026cm" svg:x="14.761cm" svg:y="18.975cm" svg:viewBox="0 0 28 27" draw:points="0,0 28,0 28,27 0,27">
          <text:p/>
        </draw:polygon>
        <draw:polygon draw:style-name="gr269" draw:text-style-name="P267" draw:layer="layout" svg:width="0.027cm" svg:height="0.026cm" svg:x="14.814cm" svg:y="18.975cm" svg:viewBox="0 0 28 27" draw:points="0,0 28,0 28,27 0,27">
          <text:p/>
        </draw:polygon>
        <draw:polygon draw:style-name="gr269" draw:text-style-name="P267" draw:layer="layout" svg:width="0.027cm" svg:height="0.026cm" svg:x="14.867cm" svg:y="18.975cm" svg:viewBox="0 0 28 27" draw:points="0,0 28,0 28,27 0,27">
          <text:p/>
        </draw:polygon>
        <draw:polygon draw:style-name="gr269" draw:text-style-name="P267" draw:layer="layout" svg:width="0.027cm" svg:height="0.026cm" svg:x="14.92cm" svg:y="18.975cm" svg:viewBox="0 0 28 27" draw:points="0,0 28,0 28,27 0,27">
          <text:p/>
        </draw:polygon>
        <draw:polygon draw:style-name="gr269" draw:text-style-name="P267" draw:layer="layout" svg:width="0.027cm" svg:height="0.026cm" svg:x="14.973cm" svg:y="18.975cm" svg:viewBox="0 0 28 27" draw:points="0,0 28,0 28,27 0,27">
          <text:p/>
        </draw:polygon>
        <draw:polygon draw:style-name="gr269" draw:text-style-name="P267" draw:layer="layout" svg:width="0.027cm" svg:height="0.026cm" svg:x="15.026cm" svg:y="18.975cm" svg:viewBox="0 0 28 27" draw:points="0,0 28,0 28,27 0,27">
          <text:p/>
        </draw:polygon>
        <draw:polygon draw:style-name="gr269" draw:text-style-name="P267" draw:layer="layout" svg:width="0.027cm" svg:height="0.026cm" svg:x="15.079cm" svg:y="18.975cm" svg:viewBox="0 0 28 27" draw:points="0,0 28,0 28,27 0,27">
          <text:p/>
        </draw:polygon>
        <draw:polygon draw:style-name="gr269" draw:text-style-name="P267" draw:layer="layout" svg:width="0.027cm" svg:height="0.026cm" svg:x="15.132cm" svg:y="18.975cm" svg:viewBox="0 0 28 27" draw:points="0,0 28,0 28,27 0,27">
          <text:p/>
        </draw:polygon>
        <draw:polygon draw:style-name="gr269" draw:text-style-name="P267" draw:layer="layout" svg:width="0.027cm" svg:height="0.026cm" svg:x="15.185cm" svg:y="18.975cm" svg:viewBox="0 0 28 27" draw:points="0,0 28,0 28,27 0,27">
          <text:p/>
        </draw:polygon>
        <draw:polygon draw:style-name="gr269" draw:text-style-name="P267" draw:layer="layout" svg:width="0.027cm" svg:height="0.026cm" svg:x="15.238cm" svg:y="18.975cm" svg:viewBox="0 0 28 27" draw:points="0,0 28,0 28,27 0,27">
          <text:p/>
        </draw:polygon>
        <draw:polygon draw:style-name="gr269" draw:text-style-name="P267" draw:layer="layout" svg:width="0.027cm" svg:height="0.026cm" svg:x="15.291cm" svg:y="18.975cm" svg:viewBox="0 0 28 27" draw:points="0,0 28,0 28,27 0,27">
          <text:p/>
        </draw:polygon>
        <draw:polygon draw:style-name="gr269" draw:text-style-name="P267" draw:layer="layout" svg:width="0.027cm" svg:height="0.026cm" svg:x="15.344cm" svg:y="18.975cm" svg:viewBox="0 0 28 27" draw:points="0,0 28,0 28,27 0,27">
          <text:p/>
        </draw:polygon>
        <draw:polygon draw:style-name="gr269" draw:text-style-name="P267" draw:layer="layout" svg:width="0.027cm" svg:height="0.026cm" svg:x="15.397cm" svg:y="18.975cm" svg:viewBox="0 0 28 27" draw:points="0,0 28,0 28,27 0,27">
          <text:p/>
        </draw:polygon>
        <draw:polygon draw:style-name="gr269" draw:text-style-name="P267" draw:layer="layout" svg:width="0.027cm" svg:height="0.026cm" svg:x="15.45cm" svg:y="18.975cm" svg:viewBox="0 0 28 27" draw:points="0,0 28,0 28,27 0,27">
          <text:p/>
        </draw:polygon>
        <draw:polygon draw:style-name="gr269" draw:text-style-name="P267" draw:layer="layout" svg:width="0.027cm" svg:height="0.026cm" svg:x="15.503cm" svg:y="18.975cm" svg:viewBox="0 0 28 27" draw:points="0,0 28,0 28,27 0,27">
          <text:p/>
        </draw:polygon>
        <draw:polygon draw:style-name="gr269" draw:text-style-name="P267" draw:layer="layout" svg:width="0.027cm" svg:height="0.026cm" svg:x="15.556cm" svg:y="18.975cm" svg:viewBox="0 0 28 27" draw:points="0,0 28,0 28,27 0,27">
          <text:p/>
        </draw:polygon>
        <draw:polygon draw:style-name="gr269" draw:text-style-name="P267" draw:layer="layout" svg:width="0.027cm" svg:height="0.026cm" svg:x="15.609cm" svg:y="18.975cm" svg:viewBox="0 0 28 27" draw:points="0,0 28,0 28,27 0,27">
          <text:p/>
        </draw:polygon>
        <draw:polygon draw:style-name="gr269" draw:text-style-name="P267" draw:layer="layout" svg:width="0.027cm" svg:height="0.026cm" svg:x="15.662cm" svg:y="18.975cm" svg:viewBox="0 0 28 27" draw:points="0,0 28,0 28,27 0,27">
          <text:p/>
        </draw:polygon>
        <draw:polygon draw:style-name="gr269" draw:text-style-name="P267" draw:layer="layout" svg:width="0.027cm" svg:height="0.026cm" svg:x="15.715cm" svg:y="18.975cm" svg:viewBox="0 0 28 27" draw:points="0,0 28,0 28,27 0,27">
          <text:p/>
        </draw:polygon>
        <draw:polygon draw:style-name="gr269" draw:text-style-name="P267" draw:layer="layout" svg:width="0.028cm" svg:height="0.026cm" svg:x="15.768cm" svg:y="18.975cm" svg:viewBox="0 0 29 27" draw:points="0,0 29,0 29,27 0,27">
          <text:p/>
        </draw:polygon>
        <draw:polygon draw:style-name="gr269" draw:text-style-name="P267" draw:layer="layout" svg:width="0.027cm" svg:height="0.026cm" svg:x="15.821cm" svg:y="18.975cm" svg:viewBox="0 0 28 27" draw:points="0,0 28,0 28,27 0,27">
          <text:p/>
        </draw:polygon>
        <draw:polygon draw:style-name="gr269" draw:text-style-name="P267" draw:layer="layout" svg:width="0.027cm" svg:height="0.026cm" svg:x="15.874cm" svg:y="18.975cm" svg:viewBox="0 0 28 27" draw:points="0,0 28,0 28,27 0,27">
          <text:p/>
        </draw:polygon>
        <draw:polygon draw:style-name="gr269" draw:text-style-name="P267" draw:layer="layout" svg:width="0.027cm" svg:height="0.026cm" svg:x="15.927cm" svg:y="18.975cm" svg:viewBox="0 0 28 27" draw:points="0,0 28,0 28,27 0,27">
          <text:p/>
        </draw:polygon>
        <draw:polygon draw:style-name="gr269" draw:text-style-name="P267" draw:layer="layout" svg:width="0.027cm" svg:height="0.026cm" svg:x="15.98cm" svg:y="18.975cm" svg:viewBox="0 0 28 27" draw:points="0,0 28,0 28,27 0,27">
          <text:p/>
        </draw:polygon>
        <draw:polygon draw:style-name="gr269" draw:text-style-name="P267" draw:layer="layout" svg:width="0.027cm" svg:height="0.026cm" svg:x="16.033cm" svg:y="18.975cm" svg:viewBox="0 0 28 27" draw:points="0,0 28,0 28,27 0,27">
          <text:p/>
        </draw:polygon>
        <draw:polygon draw:style-name="gr269" draw:text-style-name="P267" draw:layer="layout" svg:width="0.027cm" svg:height="0.026cm" svg:x="16.086cm" svg:y="18.975cm" svg:viewBox="0 0 28 27" draw:points="0,0 28,0 28,27 0,27">
          <text:p/>
        </draw:polygon>
        <draw:polygon draw:style-name="gr269" draw:text-style-name="P267" draw:layer="layout" svg:width="0.027cm" svg:height="0.026cm" svg:x="16.139cm" svg:y="18.975cm" svg:viewBox="0 0 28 27" draw:points="0,0 28,0 28,27 0,27">
          <text:p/>
        </draw:polygon>
        <draw:polygon draw:style-name="gr269" draw:text-style-name="P267" draw:layer="layout" svg:width="0.027cm" svg:height="0.026cm" svg:x="16.192cm" svg:y="18.975cm" svg:viewBox="0 0 28 27" draw:points="0,0 28,0 28,27 0,27">
          <text:p/>
        </draw:polygon>
        <draw:polygon draw:style-name="gr269" draw:text-style-name="P267" draw:layer="layout" svg:width="0.027cm" svg:height="0.026cm" svg:x="16.245cm" svg:y="18.975cm" svg:viewBox="0 0 28 27" draw:points="0,0 28,0 28,27 0,27">
          <text:p/>
        </draw:polygon>
        <draw:polygon draw:style-name="gr269" draw:text-style-name="P267" draw:layer="layout" svg:width="0.027cm" svg:height="0.026cm" svg:x="16.298cm" svg:y="18.975cm" svg:viewBox="0 0 28 27" draw:points="0,0 28,0 28,27 0,27">
          <text:p/>
        </draw:polygon>
        <draw:polygon draw:style-name="gr269" draw:text-style-name="P267" draw:layer="layout" svg:width="0.027cm" svg:height="0.026cm" svg:x="16.351cm" svg:y="18.975cm" svg:viewBox="0 0 28 27" draw:points="0,0 28,0 28,27 0,27">
          <text:p/>
        </draw:polygon>
        <draw:polygon draw:style-name="gr269" draw:text-style-name="P267" draw:layer="layout" svg:width="0.027cm" svg:height="0.026cm" svg:x="16.404cm" svg:y="18.975cm" svg:viewBox="0 0 28 27" draw:points="0,0 28,0 28,27 0,27">
          <text:p/>
        </draw:polygon>
        <draw:polygon draw:style-name="gr269" draw:text-style-name="P267" draw:layer="layout" svg:width="0.027cm" svg:height="0.026cm" svg:x="16.457cm" svg:y="18.975cm" svg:viewBox="0 0 28 27" draw:points="0,0 28,0 28,27 0,27">
          <text:p/>
        </draw:polygon>
        <draw:polygon draw:style-name="gr269" draw:text-style-name="P267" draw:layer="layout" svg:width="0.027cm" svg:height="0.026cm" svg:x="16.51cm" svg:y="18.975cm" svg:viewBox="0 0 28 27" draw:points="0,0 28,0 28,27 0,27">
          <text:p/>
        </draw:polygon>
        <draw:polygon draw:style-name="gr269" draw:text-style-name="P267" draw:layer="layout" svg:width="0.027cm" svg:height="0.026cm" svg:x="16.563cm" svg:y="18.975cm" svg:viewBox="0 0 28 27" draw:points="0,0 28,0 28,27 0,27">
          <text:p/>
        </draw:polygon>
        <draw:polygon draw:style-name="gr269" draw:text-style-name="P267" draw:layer="layout" svg:width="0.027cm" svg:height="0.026cm" svg:x="16.616cm" svg:y="18.975cm" svg:viewBox="0 0 28 27" draw:points="0,0 28,0 28,27 0,27">
          <text:p/>
        </draw:polygon>
        <draw:polygon draw:style-name="gr269" draw:text-style-name="P267" draw:layer="layout" svg:width="0.027cm" svg:height="0.026cm" svg:x="16.669cm" svg:y="18.975cm" svg:viewBox="0 0 28 27" draw:points="0,0 28,0 28,27 0,27">
          <text:p/>
        </draw:polygon>
        <draw:polygon draw:style-name="gr269" draw:text-style-name="P267" draw:layer="layout" svg:width="0.027cm" svg:height="0.026cm" svg:x="16.722cm" svg:y="18.975cm" svg:viewBox="0 0 28 27" draw:points="0,0 28,0 28,27 0,27">
          <text:p/>
        </draw:polygon>
        <draw:polygon draw:style-name="gr269" draw:text-style-name="P267" draw:layer="layout" svg:width="0.027cm" svg:height="0.026cm" svg:x="16.775cm" svg:y="18.975cm" svg:viewBox="0 0 28 27" draw:points="0,0 28,0 28,27 0,27">
          <text:p/>
        </draw:polygon>
        <draw:polygon draw:style-name="gr269" draw:text-style-name="P267" draw:layer="layout" svg:width="0.027cm" svg:height="0.026cm" svg:x="16.828cm" svg:y="18.975cm" svg:viewBox="0 0 28 27" draw:points="0,0 28,0 28,27 0,27">
          <text:p/>
        </draw:polygon>
        <draw:polygon draw:style-name="gr269" draw:text-style-name="P267" draw:layer="layout" svg:width="0.027cm" svg:height="0.026cm" svg:x="16.881cm" svg:y="18.975cm" svg:viewBox="0 0 28 27" draw:points="0,0 28,0 28,27 0,27">
          <text:p/>
        </draw:polygon>
        <draw:polygon draw:style-name="gr269" draw:text-style-name="P267" draw:layer="layout" svg:width="0.027cm" svg:height="0.026cm" svg:x="16.934cm" svg:y="18.975cm" svg:viewBox="0 0 28 27" draw:points="0,0 28,0 28,27 0,27">
          <text:p/>
        </draw:polygon>
        <draw:polygon draw:style-name="gr269" draw:text-style-name="P267" draw:layer="layout" svg:width="0.027cm" svg:height="0.026cm" svg:x="16.987cm" svg:y="18.975cm" svg:viewBox="0 0 28 27" draw:points="0,0 28,0 28,27 0,27">
          <text:p/>
        </draw:polygon>
        <draw:polygon draw:style-name="gr269" draw:text-style-name="P267" draw:layer="layout" svg:width="0.027cm" svg:height="0.026cm" svg:x="17.04cm" svg:y="18.975cm" svg:viewBox="0 0 28 27" draw:points="0,0 28,0 28,27 0,27">
          <text:p/>
        </draw:polygon>
        <draw:polygon draw:style-name="gr269" draw:text-style-name="P267" draw:layer="layout" svg:width="0.027cm" svg:height="0.026cm" svg:x="17.093cm" svg:y="18.975cm" svg:viewBox="0 0 28 27" draw:points="0,0 28,0 28,27 0,27">
          <text:p/>
        </draw:polygon>
        <draw:polygon draw:style-name="gr269" draw:text-style-name="P267" draw:layer="layout" svg:width="0.028cm" svg:height="0.026cm" svg:x="17.146cm" svg:y="18.975cm" svg:viewBox="0 0 29 27" draw:points="0,0 29,0 29,27 0,27">
          <text:p/>
        </draw:polygon>
        <draw:polygon draw:style-name="gr269" draw:text-style-name="P267" draw:layer="layout" svg:width="0.027cm" svg:height="0.026cm" svg:x="17.199cm" svg:y="18.975cm" svg:viewBox="0 0 28 27" draw:points="0,0 28,0 28,27 0,27">
          <text:p/>
        </draw:polygon>
        <draw:polygon draw:style-name="gr269" draw:text-style-name="P267" draw:layer="layout" svg:width="0.027cm" svg:height="0.026cm" svg:x="17.252cm" svg:y="18.975cm" svg:viewBox="0 0 28 27" draw:points="0,0 28,0 28,27 0,27">
          <text:p/>
        </draw:polygon>
        <draw:polygon draw:style-name="gr269" draw:text-style-name="P267" draw:layer="layout" svg:width="0.027cm" svg:height="0.026cm" svg:x="17.305cm" svg:y="18.975cm" svg:viewBox="0 0 28 27" draw:points="0,0 28,0 28,27 0,27">
          <text:p/>
        </draw:polygon>
        <draw:polygon draw:style-name="gr269" draw:text-style-name="P267" draw:layer="layout" svg:width="0.027cm" svg:height="0.026cm" svg:x="17.358cm" svg:y="18.975cm" svg:viewBox="0 0 28 27" draw:points="0,0 28,0 28,27 0,27">
          <text:p/>
        </draw:polygon>
        <draw:polygon draw:style-name="gr269" draw:text-style-name="P267" draw:layer="layout" svg:width="0.027cm" svg:height="0.026cm" svg:x="17.411cm" svg:y="18.975cm" svg:viewBox="0 0 28 27" draw:points="0,0 28,0 28,27 0,27">
          <text:p/>
        </draw:polygon>
        <draw:polygon draw:style-name="gr269" draw:text-style-name="P267" draw:layer="layout" svg:width="0.027cm" svg:height="0.026cm" svg:x="17.464cm" svg:y="18.975cm" svg:viewBox="0 0 28 27" draw:points="0,0 28,0 28,27 0,27">
          <text:p/>
        </draw:polygon>
        <draw:polygon draw:style-name="gr269" draw:text-style-name="P267" draw:layer="layout" svg:width="0.027cm" svg:height="0.026cm" svg:x="17.517cm" svg:y="18.975cm" svg:viewBox="0 0 28 27" draw:points="0,0 28,0 28,27 0,27">
          <text:p/>
        </draw:polygon>
        <draw:polygon draw:style-name="gr269" draw:text-style-name="P267" draw:layer="layout" svg:width="0.027cm" svg:height="0.026cm" svg:x="17.57cm" svg:y="18.975cm" svg:viewBox="0 0 28 27" draw:points="0,0 28,0 28,27 0,27">
          <text:p/>
        </draw:polygon>
        <draw:polygon draw:style-name="gr269" draw:text-style-name="P267" draw:layer="layout" svg:width="0.027cm" svg:height="0.026cm" svg:x="17.623cm" svg:y="18.975cm" svg:viewBox="0 0 28 27" draw:points="0,0 28,0 28,27 0,27">
          <text:p/>
        </draw:polygon>
        <draw:polygon draw:style-name="gr269" draw:text-style-name="P267" draw:layer="layout" svg:width="0.027cm" svg:height="0.026cm" svg:x="17.676cm" svg:y="18.975cm" svg:viewBox="0 0 28 27" draw:points="0,0 28,0 28,27 0,27">
          <text:p/>
        </draw:polygon>
        <draw:polygon draw:style-name="gr269" draw:text-style-name="P267" draw:layer="layout" svg:width="0.027cm" svg:height="0.026cm" svg:x="17.729cm" svg:y="18.975cm" svg:viewBox="0 0 28 27" draw:points="0,0 28,0 28,27 0,27">
          <text:p/>
        </draw:polygon>
        <draw:polygon draw:style-name="gr269" draw:text-style-name="P267" draw:layer="layout" svg:width="0.027cm" svg:height="0.026cm" svg:x="17.782cm" svg:y="18.975cm" svg:viewBox="0 0 28 27" draw:points="0,0 28,0 28,27 0,27">
          <text:p/>
        </draw:polygon>
        <draw:polygon draw:style-name="gr269" draw:text-style-name="P267" draw:layer="layout" svg:width="0.027cm" svg:height="0.026cm" svg:x="17.835cm" svg:y="18.975cm" svg:viewBox="0 0 28 27" draw:points="0,0 28,0 28,27 0,27">
          <text:p/>
        </draw:polygon>
        <draw:polygon draw:style-name="gr269" draw:text-style-name="P267" draw:layer="layout" svg:width="0.027cm" svg:height="0.026cm" svg:x="17.888cm" svg:y="18.975cm" svg:viewBox="0 0 28 27" draw:points="0,0 28,0 28,27 0,27">
          <text:p/>
        </draw:polygon>
        <draw:polygon draw:style-name="gr269" draw:text-style-name="P267" draw:layer="layout" svg:width="0.027cm" svg:height="0.026cm" svg:x="17.941cm" svg:y="18.975cm" svg:viewBox="0 0 28 27" draw:points="0,0 28,0 28,27 0,27">
          <text:p/>
        </draw:polygon>
        <draw:polygon draw:style-name="gr269" draw:text-style-name="P267" draw:layer="layout" svg:width="0.027cm" svg:height="0.026cm" svg:x="17.994cm" svg:y="18.975cm" svg:viewBox="0 0 28 27" draw:points="0,0 28,0 28,27 0,27">
          <text:p/>
        </draw:polygon>
        <draw:polygon draw:style-name="gr269" draw:text-style-name="P267" draw:layer="layout" svg:width="0.027cm" svg:height="0.026cm" svg:x="18.047cm" svg:y="18.975cm" svg:viewBox="0 0 28 27" draw:points="0,0 28,0 28,27 0,27">
          <text:p/>
        </draw:polygon>
        <draw:polygon draw:style-name="gr269" draw:text-style-name="P267" draw:layer="layout" svg:width="0.027cm" svg:height="0.026cm" svg:x="18.1cm" svg:y="18.975cm" svg:viewBox="0 0 28 27" draw:points="0,0 28,0 28,27 0,27">
          <text:p/>
        </draw:polygon>
        <draw:polygon draw:style-name="gr269" draw:text-style-name="P267" draw:layer="layout" svg:width="0.027cm" svg:height="0.026cm" svg:x="18.153cm" svg:y="18.975cm" svg:viewBox="0 0 28 27" draw:points="0,0 28,0 28,27 0,27">
          <text:p/>
        </draw:polygon>
        <draw:polygon draw:style-name="gr269" draw:text-style-name="P267" draw:layer="layout" svg:width="0.027cm" svg:height="0.026cm" svg:x="18.206cm" svg:y="18.975cm" svg:viewBox="0 0 28 27" draw:points="0,0 28,0 28,27 0,27">
          <text:p/>
        </draw:polygon>
        <draw:polygon draw:style-name="gr269" draw:text-style-name="P267" draw:layer="layout" svg:width="0.027cm" svg:height="0.026cm" svg:x="18.259cm" svg:y="18.975cm" svg:viewBox="0 0 28 27" draw:points="0,0 28,0 28,27 0,27">
          <text:p/>
        </draw:polygon>
        <draw:polygon draw:style-name="gr269" draw:text-style-name="P267" draw:layer="layout" svg:width="0.027cm" svg:height="0.026cm" svg:x="18.312cm" svg:y="18.975cm" svg:viewBox="0 0 28 27" draw:points="0,0 28,0 28,27 0,27">
          <text:p/>
        </draw:polygon>
        <draw:polygon draw:style-name="gr269" draw:text-style-name="P267" draw:layer="layout" svg:width="0.027cm" svg:height="0.026cm" svg:x="18.365cm" svg:y="18.975cm" svg:viewBox="0 0 28 27" draw:points="0,0 28,0 28,27 0,27">
          <text:p/>
        </draw:polygon>
        <draw:polygon draw:style-name="gr269" draw:text-style-name="P267" draw:layer="layout" svg:width="0.027cm" svg:height="0.026cm" svg:x="18.418cm" svg:y="18.975cm" svg:viewBox="0 0 28 27" draw:points="0,0 28,0 28,27 0,27">
          <text:p/>
        </draw:polygon>
        <draw:polygon draw:style-name="gr269" draw:text-style-name="P267" draw:layer="layout" svg:width="0.027cm" svg:height="0.026cm" svg:x="18.471cm" svg:y="18.975cm" svg:viewBox="0 0 28 27" draw:points="0,0 28,0 28,27 0,27">
          <text:p/>
        </draw:polygon>
        <draw:polygon draw:style-name="gr269" draw:text-style-name="P267" draw:layer="layout" svg:width="0.028cm" svg:height="0.026cm" svg:x="18.524cm" svg:y="18.975cm" svg:viewBox="0 0 29 27" draw:points="0,0 29,0 29,27 0,27">
          <text:p/>
        </draw:polygon>
        <draw:polygon draw:style-name="gr269" draw:text-style-name="P267" draw:layer="layout" svg:width="0.027cm" svg:height="0.026cm" svg:x="18.577cm" svg:y="18.975cm" svg:viewBox="0 0 28 27" draw:points="0,0 28,0 28,27 0,27">
          <text:p/>
        </draw:polygon>
        <draw:polygon draw:style-name="gr269" draw:text-style-name="P267" draw:layer="layout" svg:width="0.027cm" svg:height="0.026cm" svg:x="18.63cm" svg:y="18.975cm" svg:viewBox="0 0 28 27" draw:points="0,0 28,0 28,27 0,27">
          <text:p/>
        </draw:polygon>
        <draw:polygon draw:style-name="gr269" draw:text-style-name="P267" draw:layer="layout" svg:width="0.027cm" svg:height="0.026cm" svg:x="18.683cm" svg:y="18.975cm" svg:viewBox="0 0 28 27" draw:points="0,0 28,0 28,27 0,27">
          <text:p/>
        </draw:polygon>
        <draw:polygon draw:style-name="gr269" draw:text-style-name="P267" draw:layer="layout" svg:width="0.027cm" svg:height="0.026cm" svg:x="18.736cm" svg:y="18.975cm" svg:viewBox="0 0 28 27" draw:points="0,0 28,0 28,27 0,27">
          <text:p/>
        </draw:polygon>
        <draw:polygon draw:style-name="gr269" draw:text-style-name="P267" draw:layer="layout" svg:width="0.027cm" svg:height="0.026cm" svg:x="18.789cm" svg:y="18.975cm" svg:viewBox="0 0 28 27" draw:points="0,0 28,0 28,27 0,27">
          <text:p/>
        </draw:polygon>
        <draw:polygon draw:style-name="gr269" draw:text-style-name="P267" draw:layer="layout" svg:width="0.027cm" svg:height="0.026cm" svg:x="18.842cm" svg:y="18.975cm" svg:viewBox="0 0 28 27" draw:points="0,0 28,0 28,27 0,27">
          <text:p/>
        </draw:polygon>
        <draw:polygon draw:style-name="gr269" draw:text-style-name="P267" draw:layer="layout" svg:width="0.027cm" svg:height="0.026cm" svg:x="18.895cm" svg:y="18.975cm" svg:viewBox="0 0 28 27" draw:points="0,0 28,0 28,27 0,27">
          <text:p/>
        </draw:polygon>
        <draw:polygon draw:style-name="gr269" draw:text-style-name="P267" draw:layer="layout" svg:width="0.027cm" svg:height="0.026cm" svg:x="18.948cm" svg:y="18.975cm" svg:viewBox="0 0 28 27" draw:points="0,0 28,0 28,27 0,27">
          <text:p/>
        </draw:polygon>
        <draw:polygon draw:style-name="gr269" draw:text-style-name="P267" draw:layer="layout" svg:width="0.027cm" svg:height="0.026cm" svg:x="19.001cm" svg:y="18.975cm" svg:viewBox="0 0 28 27" draw:points="0,0 28,0 28,27 0,27">
          <text:p/>
        </draw:polygon>
        <draw:polygon draw:style-name="gr269" draw:text-style-name="P267" draw:layer="layout" svg:width="0.053cm" svg:height="0.026cm" svg:x="2.014cm" svg:y="19.956cm" svg:viewBox="0 0 54 27" draw:points="0,0 54,0 54,27 0,27">
          <text:p/>
        </draw:polygon>
        <draw:polygon draw:style-name="gr269" draw:text-style-name="P267" draw:layer="layout" svg:width="0.027cm" svg:height="0.026cm" svg:x="2.093cm" svg:y="19.956cm" svg:viewBox="0 0 28 27" draw:points="0,0 28,0 28,27 0,27">
          <text:p/>
        </draw:polygon>
        <draw:polygon draw:style-name="gr269" draw:text-style-name="P267" draw:layer="layout" svg:width="0.027cm" svg:height="0.026cm" svg:x="2.146cm" svg:y="19.956cm" svg:viewBox="0 0 28 27" draw:points="0,0 28,0 28,27 0,27">
          <text:p/>
        </draw:polygon>
        <draw:polygon draw:style-name="gr269" draw:text-style-name="P267" draw:layer="layout" svg:width="0.027cm" svg:height="0.026cm" svg:x="2.199cm" svg:y="19.956cm" svg:viewBox="0 0 28 27" draw:points="0,0 28,0 28,27 0,27">
          <text:p/>
        </draw:polygon>
        <draw:polygon draw:style-name="gr269" draw:text-style-name="P267" draw:layer="layout" svg:width="0.027cm" svg:height="0.026cm" svg:x="2.252cm" svg:y="19.956cm" svg:viewBox="0 0 28 27" draw:points="0,0 28,0 28,27 0,27">
          <text:p/>
        </draw:polygon>
        <draw:polygon draw:style-name="gr269" draw:text-style-name="P267" draw:layer="layout" svg:width="0.027cm" svg:height="0.026cm" svg:x="2.305cm" svg:y="19.956cm" svg:viewBox="0 0 28 27" draw:points="0,0 28,0 28,27 0,27">
          <text:p/>
        </draw:polygon>
        <draw:polygon draw:style-name="gr269" draw:text-style-name="P267" draw:layer="layout" svg:width="0.027cm" svg:height="0.026cm" svg:x="2.358cm" svg:y="19.956cm" svg:viewBox="0 0 28 27" draw:points="0,0 28,0 28,27 0,27">
          <text:p/>
        </draw:polygon>
        <draw:polygon draw:style-name="gr269" draw:text-style-name="P267" draw:layer="layout" svg:width="0.027cm" svg:height="0.026cm" svg:x="2.411cm" svg:y="19.956cm" svg:viewBox="0 0 28 27" draw:points="0,0 28,0 28,27 0,27">
          <text:p/>
        </draw:polygon>
        <draw:polygon draw:style-name="gr269" draw:text-style-name="P267" draw:layer="layout" svg:width="0.027cm" svg:height="0.026cm" svg:x="2.464cm" svg:y="19.956cm" svg:viewBox="0 0 28 27" draw:points="0,0 28,0 28,27 0,27">
          <text:p/>
        </draw:polygon>
        <draw:polygon draw:style-name="gr269" draw:text-style-name="P267" draw:layer="layout" svg:width="0.027cm" svg:height="0.026cm" svg:x="2.517cm" svg:y="19.956cm" svg:viewBox="0 0 28 27" draw:points="0,0 28,0 28,27 0,27">
          <text:p/>
        </draw:polygon>
        <draw:polygon draw:style-name="gr269" draw:text-style-name="P267" draw:layer="layout" svg:width="0.027cm" svg:height="0.026cm" svg:x="2.57cm" svg:y="19.956cm" svg:viewBox="0 0 28 27" draw:points="0,0 28,0 28,27 0,27">
          <text:p/>
        </draw:polygon>
        <draw:polygon draw:style-name="gr269" draw:text-style-name="P267" draw:layer="layout" svg:width="0.027cm" svg:height="0.026cm" svg:x="2.623cm" svg:y="19.956cm" svg:viewBox="0 0 28 27" draw:points="0,0 28,0 28,27 0,27">
          <text:p/>
        </draw:polygon>
        <draw:polygon draw:style-name="gr269" draw:text-style-name="P267" draw:layer="layout" svg:width="0.027cm" svg:height="0.026cm" svg:x="2.676cm" svg:y="19.956cm" svg:viewBox="0 0 28 27" draw:points="0,0 28,0 28,27 0,27">
          <text:p/>
        </draw:polygon>
        <draw:polygon draw:style-name="gr269" draw:text-style-name="P267" draw:layer="layout" svg:width="0.027cm" svg:height="0.026cm" svg:x="2.729cm" svg:y="19.956cm" svg:viewBox="0 0 28 27" draw:points="0,0 28,0 28,27 0,27">
          <text:p/>
        </draw:polygon>
        <draw:polygon draw:style-name="gr269" draw:text-style-name="P267" draw:layer="layout" svg:width="0.027cm" svg:height="0.026cm" svg:x="2.782cm" svg:y="19.956cm" svg:viewBox="0 0 28 27" draw:points="0,0 28,0 28,27 0,27">
          <text:p/>
        </draw:polygon>
        <draw:polygon draw:style-name="gr269" draw:text-style-name="P267" draw:layer="layout" svg:width="0.027cm" svg:height="0.026cm" svg:x="2.835cm" svg:y="19.956cm" svg:viewBox="0 0 28 27" draw:points="0,0 28,0 28,27 0,27">
          <text:p/>
        </draw:polygon>
        <draw:polygon draw:style-name="gr269" draw:text-style-name="P267" draw:layer="layout" svg:width="0.027cm" svg:height="0.026cm" svg:x="2.888cm" svg:y="19.956cm" svg:viewBox="0 0 28 27" draw:points="0,0 28,0 28,27 0,27">
          <text:p/>
        </draw:polygon>
        <draw:polygon draw:style-name="gr269" draw:text-style-name="P267" draw:layer="layout" svg:width="0.027cm" svg:height="0.026cm" svg:x="2.941cm" svg:y="19.956cm" svg:viewBox="0 0 28 27" draw:points="0,0 28,0 28,27 0,27">
          <text:p/>
        </draw:polygon>
        <draw:polygon draw:style-name="gr269" draw:text-style-name="P267" draw:layer="layout" svg:width="0.027cm" svg:height="0.026cm" svg:x="2.994cm" svg:y="19.956cm" svg:viewBox="0 0 28 27" draw:points="0,0 28,0 28,27 0,27">
          <text:p/>
        </draw:polygon>
        <draw:polygon draw:style-name="gr269" draw:text-style-name="P267" draw:layer="layout" svg:width="0.027cm" svg:height="0.026cm" svg:x="3.047cm" svg:y="19.956cm" svg:viewBox="0 0 28 27" draw:points="0,0 28,0 28,27 0,27">
          <text:p/>
        </draw:polygon>
        <draw:polygon draw:style-name="gr269" draw:text-style-name="P267" draw:layer="layout" svg:width="0.027cm" svg:height="0.026cm" svg:x="3.1cm" svg:y="19.956cm" svg:viewBox="0 0 28 27" draw:points="0,0 28,0 28,27 0,27">
          <text:p/>
        </draw:polygon>
        <draw:polygon draw:style-name="gr269" draw:text-style-name="P267" draw:layer="layout" svg:width="0.027cm" svg:height="0.026cm" svg:x="3.153cm" svg:y="19.956cm" svg:viewBox="0 0 28 27" draw:points="0,0 28,0 28,27 0,27">
          <text:p/>
        </draw:polygon>
        <draw:polygon draw:style-name="gr269" draw:text-style-name="P267" draw:layer="layout" svg:width="0.027cm" svg:height="0.026cm" svg:x="3.206cm" svg:y="19.956cm" svg:viewBox="0 0 28 27" draw:points="0,0 28,0 28,27 0,27">
          <text:p/>
        </draw:polygon>
        <draw:polygon draw:style-name="gr269" draw:text-style-name="P267" draw:layer="layout" svg:width="0.027cm" svg:height="0.026cm" svg:x="3.259cm" svg:y="19.956cm" svg:viewBox="0 0 28 27" draw:points="0,0 28,0 28,27 0,27">
          <text:p/>
        </draw:polygon>
        <draw:polygon draw:style-name="gr269" draw:text-style-name="P267" draw:layer="layout" svg:width="0.027cm" svg:height="0.026cm" svg:x="3.312cm" svg:y="19.956cm" svg:viewBox="0 0 28 27" draw:points="0,0 28,0 28,27 0,27">
          <text:p/>
        </draw:polygon>
        <draw:polygon draw:style-name="gr269" draw:text-style-name="P267" draw:layer="layout" svg:width="0.027cm" svg:height="0.026cm" svg:x="3.365cm" svg:y="19.956cm" svg:viewBox="0 0 28 27" draw:points="0,0 28,0 28,27 0,27">
          <text:p/>
        </draw:polygon>
        <draw:polygon draw:style-name="gr269" draw:text-style-name="P267" draw:layer="layout" svg:width="0.028cm" svg:height="0.026cm" svg:x="3.418cm" svg:y="19.956cm" svg:viewBox="0 0 29 27" draw:points="0,0 29,0 29,27 0,27">
          <text:p/>
        </draw:polygon>
        <draw:polygon draw:style-name="gr269" draw:text-style-name="P267" draw:layer="layout" svg:width="0.027cm" svg:height="0.026cm" svg:x="3.471cm" svg:y="19.956cm" svg:viewBox="0 0 28 27" draw:points="0,0 28,0 28,27 0,27">
          <text:p/>
        </draw:polygon>
        <draw:polygon draw:style-name="gr269" draw:text-style-name="P267" draw:layer="layout" svg:width="0.027cm" svg:height="0.026cm" svg:x="3.524cm" svg:y="19.956cm" svg:viewBox="0 0 28 27" draw:points="0,0 28,0 28,27 0,27">
          <text:p/>
        </draw:polygon>
        <draw:polygon draw:style-name="gr269" draw:text-style-name="P267" draw:layer="layout" svg:width="0.027cm" svg:height="0.026cm" svg:x="3.577cm" svg:y="19.956cm" svg:viewBox="0 0 28 27" draw:points="0,0 28,0 28,27 0,27">
          <text:p/>
        </draw:polygon>
        <draw:polygon draw:style-name="gr269" draw:text-style-name="P267" draw:layer="layout" svg:width="0.027cm" svg:height="0.026cm" svg:x="3.63cm" svg:y="19.956cm" svg:viewBox="0 0 28 27" draw:points="0,0 28,0 28,27 0,27">
          <text:p/>
        </draw:polygon>
        <draw:polygon draw:style-name="gr269" draw:text-style-name="P267" draw:layer="layout" svg:width="0.027cm" svg:height="0.026cm" svg:x="3.683cm" svg:y="19.956cm" svg:viewBox="0 0 28 27" draw:points="0,0 28,0 28,27 0,27">
          <text:p/>
        </draw:polygon>
        <draw:polygon draw:style-name="gr269" draw:text-style-name="P267" draw:layer="layout" svg:width="0.027cm" svg:height="0.026cm" svg:x="3.736cm" svg:y="19.956cm" svg:viewBox="0 0 28 27" draw:points="0,0 28,0 28,27 0,27">
          <text:p/>
        </draw:polygon>
        <draw:polygon draw:style-name="gr269" draw:text-style-name="P267" draw:layer="layout" svg:width="0.027cm" svg:height="0.026cm" svg:x="3.789cm" svg:y="19.956cm" svg:viewBox="0 0 28 27" draw:points="0,0 28,0 28,27 0,27">
          <text:p/>
        </draw:polygon>
        <draw:polygon draw:style-name="gr269" draw:text-style-name="P267" draw:layer="layout" svg:width="0.027cm" svg:height="0.026cm" svg:x="3.842cm" svg:y="19.956cm" svg:viewBox="0 0 28 27" draw:points="0,0 28,0 28,27 0,27">
          <text:p/>
        </draw:polygon>
        <draw:polygon draw:style-name="gr269" draw:text-style-name="P267" draw:layer="layout" svg:width="0.027cm" svg:height="0.026cm" svg:x="3.895cm" svg:y="19.956cm" svg:viewBox="0 0 28 27" draw:points="0,0 28,0 28,27 0,27">
          <text:p/>
        </draw:polygon>
        <draw:polygon draw:style-name="gr269" draw:text-style-name="P267" draw:layer="layout" svg:width="0.027cm" svg:height="0.026cm" svg:x="3.948cm" svg:y="19.956cm" svg:viewBox="0 0 28 27" draw:points="0,0 28,0 28,27 0,27">
          <text:p/>
        </draw:polygon>
        <draw:polygon draw:style-name="gr269" draw:text-style-name="P267" draw:layer="layout" svg:width="0.027cm" svg:height="0.026cm" svg:x="4.001cm" svg:y="19.956cm" svg:viewBox="0 0 28 27" draw:points="0,0 28,0 28,27 0,27">
          <text:p/>
        </draw:polygon>
        <draw:polygon draw:style-name="gr269" draw:text-style-name="P267" draw:layer="layout" svg:width="0.027cm" svg:height="0.026cm" svg:x="4.054cm" svg:y="19.956cm" svg:viewBox="0 0 28 27" draw:points="0,0 28,0 28,27 0,27">
          <text:p/>
        </draw:polygon>
        <draw:polygon draw:style-name="gr269" draw:text-style-name="P267" draw:layer="layout" svg:width="0.027cm" svg:height="0.026cm" svg:x="4.107cm" svg:y="19.956cm" svg:viewBox="0 0 28 27" draw:points="0,0 28,0 28,27 0,27">
          <text:p/>
        </draw:polygon>
        <draw:polygon draw:style-name="gr269" draw:text-style-name="P267" draw:layer="layout" svg:width="0.027cm" svg:height="0.026cm" svg:x="4.16cm" svg:y="19.956cm" svg:viewBox="0 0 28 27" draw:points="0,0 28,0 28,27 0,27">
          <text:p/>
        </draw:polygon>
        <draw:polygon draw:style-name="gr269" draw:text-style-name="P267" draw:layer="layout" svg:width="0.027cm" svg:height="0.026cm" svg:x="4.213cm" svg:y="19.956cm" svg:viewBox="0 0 28 27" draw:points="0,0 28,0 28,27 0,27">
          <text:p/>
        </draw:polygon>
        <draw:polygon draw:style-name="gr269" draw:text-style-name="P267" draw:layer="layout" svg:width="0.027cm" svg:height="0.026cm" svg:x="4.266cm" svg:y="19.956cm" svg:viewBox="0 0 28 27" draw:points="0,0 28,0 28,27 0,27">
          <text:p/>
        </draw:polygon>
        <draw:polygon draw:style-name="gr269" draw:text-style-name="P267" draw:layer="layout" svg:width="0.027cm" svg:height="0.026cm" svg:x="4.319cm" svg:y="19.956cm" svg:viewBox="0 0 28 27" draw:points="0,0 28,0 28,27 0,27">
          <text:p/>
        </draw:polygon>
        <draw:polygon draw:style-name="gr269" draw:text-style-name="P267" draw:layer="layout" svg:width="0.027cm" svg:height="0.026cm" svg:x="4.372cm" svg:y="19.956cm" svg:viewBox="0 0 28 27" draw:points="0,0 28,0 28,27 0,27">
          <text:p/>
        </draw:polygon>
        <draw:polygon draw:style-name="gr269" draw:text-style-name="P267" draw:layer="layout" svg:width="0.027cm" svg:height="0.026cm" svg:x="4.425cm" svg:y="19.956cm" svg:viewBox="0 0 28 27" draw:points="0,0 28,0 28,27 0,27">
          <text:p/>
        </draw:polygon>
        <draw:polygon draw:style-name="gr269" draw:text-style-name="P267" draw:layer="layout" svg:width="0.027cm" svg:height="0.026cm" svg:x="4.478cm" svg:y="19.956cm" svg:viewBox="0 0 28 27" draw:points="0,0 28,0 28,27 0,27">
          <text:p/>
        </draw:polygon>
        <draw:polygon draw:style-name="gr269" draw:text-style-name="P267" draw:layer="layout" svg:width="0.027cm" svg:height="0.026cm" svg:x="4.531cm" svg:y="19.956cm" svg:viewBox="0 0 28 27" draw:points="0,0 28,0 28,27 0,27">
          <text:p/>
        </draw:polygon>
        <draw:polygon draw:style-name="gr269" draw:text-style-name="P267" draw:layer="layout" svg:width="0.027cm" svg:height="0.026cm" svg:x="4.584cm" svg:y="19.956cm" svg:viewBox="0 0 28 27" draw:points="0,0 28,0 28,27 0,27">
          <text:p/>
        </draw:polygon>
        <draw:polygon draw:style-name="gr269" draw:text-style-name="P267" draw:layer="layout" svg:width="0.027cm" svg:height="0.026cm" svg:x="4.637cm" svg:y="19.956cm" svg:viewBox="0 0 28 27" draw:points="0,0 28,0 28,27 0,27">
          <text:p/>
        </draw:polygon>
        <draw:polygon draw:style-name="gr269" draw:text-style-name="P267" draw:layer="layout" svg:width="0.027cm" svg:height="0.026cm" svg:x="4.69cm" svg:y="19.956cm" svg:viewBox="0 0 28 27" draw:points="0,0 28,0 28,27 0,27">
          <text:p/>
        </draw:polygon>
        <draw:polygon draw:style-name="gr269" draw:text-style-name="P267" draw:layer="layout" svg:width="0.027cm" svg:height="0.026cm" svg:x="4.743cm" svg:y="19.956cm" svg:viewBox="0 0 28 27" draw:points="0,0 28,0 28,27 0,27">
          <text:p/>
        </draw:polygon>
        <draw:polygon draw:style-name="gr269" draw:text-style-name="P267" draw:layer="layout" svg:width="0.028cm" svg:height="0.026cm" svg:x="4.796cm" svg:y="19.956cm" svg:viewBox="0 0 29 27" draw:points="0,0 29,0 29,27 0,27">
          <text:p/>
        </draw:polygon>
        <draw:polygon draw:style-name="gr269" draw:text-style-name="P267" draw:layer="layout" svg:width="0.027cm" svg:height="0.026cm" svg:x="4.849cm" svg:y="19.956cm" svg:viewBox="0 0 28 27" draw:points="0,0 28,0 28,27 0,27">
          <text:p/>
        </draw:polygon>
        <draw:polygon draw:style-name="gr269" draw:text-style-name="P267" draw:layer="layout" svg:width="0.027cm" svg:height="0.026cm" svg:x="4.902cm" svg:y="19.956cm" svg:viewBox="0 0 28 27" draw:points="0,0 28,0 28,27 0,27">
          <text:p/>
        </draw:polygon>
        <draw:polygon draw:style-name="gr269" draw:text-style-name="P267" draw:layer="layout" svg:width="0.027cm" svg:height="0.026cm" svg:x="4.955cm" svg:y="19.956cm" svg:viewBox="0 0 28 27" draw:points="0,0 28,0 28,27 0,27">
          <text:p/>
        </draw:polygon>
        <draw:polygon draw:style-name="gr269" draw:text-style-name="P267" draw:layer="layout" svg:width="0.027cm" svg:height="0.026cm" svg:x="5.008cm" svg:y="19.956cm" svg:viewBox="0 0 28 27" draw:points="0,0 28,0 28,27 0,27">
          <text:p/>
        </draw:polygon>
        <draw:polygon draw:style-name="gr269" draw:text-style-name="P267" draw:layer="layout" svg:width="0.027cm" svg:height="0.026cm" svg:x="5.061cm" svg:y="19.956cm" svg:viewBox="0 0 28 27" draw:points="0,0 28,0 28,27 0,27">
          <text:p/>
        </draw:polygon>
        <draw:polygon draw:style-name="gr269" draw:text-style-name="P267" draw:layer="layout" svg:width="0.027cm" svg:height="0.026cm" svg:x="5.114cm" svg:y="19.956cm" svg:viewBox="0 0 28 27" draw:points="0,0 28,0 28,27 0,27">
          <text:p/>
        </draw:polygon>
        <draw:polygon draw:style-name="gr269" draw:text-style-name="P267" draw:layer="layout" svg:width="0.027cm" svg:height="0.026cm" svg:x="5.167cm" svg:y="19.956cm" svg:viewBox="0 0 28 27" draw:points="0,0 28,0 28,27 0,27">
          <text:p/>
        </draw:polygon>
        <draw:polygon draw:style-name="gr269" draw:text-style-name="P267" draw:layer="layout" svg:width="0.027cm" svg:height="0.026cm" svg:x="5.22cm" svg:y="19.956cm" svg:viewBox="0 0 28 27" draw:points="0,0 28,0 28,27 0,27">
          <text:p/>
        </draw:polygon>
        <draw:polygon draw:style-name="gr269" draw:text-style-name="P267" draw:layer="layout" svg:width="0.027cm" svg:height="0.026cm" svg:x="5.273cm" svg:y="19.956cm" svg:viewBox="0 0 28 27" draw:points="0,0 28,0 28,27 0,27">
          <text:p/>
        </draw:polygon>
        <draw:polygon draw:style-name="gr269" draw:text-style-name="P267" draw:layer="layout" svg:width="0.027cm" svg:height="0.026cm" svg:x="5.326cm" svg:y="19.956cm" svg:viewBox="0 0 28 27" draw:points="0,0 28,0 28,27 0,27">
          <text:p/>
        </draw:polygon>
        <draw:polygon draw:style-name="gr269" draw:text-style-name="P267" draw:layer="layout" svg:width="0.027cm" svg:height="0.026cm" svg:x="5.379cm" svg:y="19.956cm" svg:viewBox="0 0 28 27" draw:points="0,0 28,0 28,27 0,27">
          <text:p/>
        </draw:polygon>
        <draw:polygon draw:style-name="gr269" draw:text-style-name="P267" draw:layer="layout" svg:width="0.027cm" svg:height="0.026cm" svg:x="5.432cm" svg:y="19.956cm" svg:viewBox="0 0 28 27" draw:points="0,0 28,0 28,27 0,27">
          <text:p/>
        </draw:polygon>
        <draw:polygon draw:style-name="gr269" draw:text-style-name="P267" draw:layer="layout" svg:width="0.027cm" svg:height="0.026cm" svg:x="5.485cm" svg:y="19.956cm" svg:viewBox="0 0 28 27" draw:points="0,0 28,0 28,27 0,27">
          <text:p/>
        </draw:polygon>
        <draw:polygon draw:style-name="gr269" draw:text-style-name="P267" draw:layer="layout" svg:width="0.027cm" svg:height="0.026cm" svg:x="5.538cm" svg:y="19.956cm" svg:viewBox="0 0 28 27" draw:points="0,0 28,0 28,27 0,27">
          <text:p/>
        </draw:polygon>
        <draw:polygon draw:style-name="gr269" draw:text-style-name="P267" draw:layer="layout" svg:width="0.027cm" svg:height="0.026cm" svg:x="5.591cm" svg:y="19.956cm" svg:viewBox="0 0 28 27" draw:points="0,0 28,0 28,27 0,27">
          <text:p/>
        </draw:polygon>
        <draw:polygon draw:style-name="gr269" draw:text-style-name="P267" draw:layer="layout" svg:width="0.027cm" svg:height="0.026cm" svg:x="5.644cm" svg:y="19.956cm" svg:viewBox="0 0 28 27" draw:points="0,0 28,0 28,27 0,27">
          <text:p/>
        </draw:polygon>
        <draw:polygon draw:style-name="gr269" draw:text-style-name="P267" draw:layer="layout" svg:width="0.027cm" svg:height="0.026cm" svg:x="5.697cm" svg:y="19.956cm" svg:viewBox="0 0 28 27" draw:points="0,0 28,0 28,27 0,27">
          <text:p/>
        </draw:polygon>
        <draw:polygon draw:style-name="gr269" draw:text-style-name="P267" draw:layer="layout" svg:width="0.027cm" svg:height="0.026cm" svg:x="5.75cm" svg:y="19.956cm" svg:viewBox="0 0 28 27" draw:points="0,0 28,0 28,27 0,27">
          <text:p/>
        </draw:polygon>
        <draw:polygon draw:style-name="gr269" draw:text-style-name="P267" draw:layer="layout" svg:width="0.027cm" svg:height="0.026cm" svg:x="5.803cm" svg:y="19.956cm" svg:viewBox="0 0 28 27" draw:points="0,0 28,0 28,27 0,27">
          <text:p/>
        </draw:polygon>
        <draw:polygon draw:style-name="gr269" draw:text-style-name="P267" draw:layer="layout" svg:width="0.027cm" svg:height="0.026cm" svg:x="5.856cm" svg:y="19.956cm" svg:viewBox="0 0 28 27" draw:points="0,0 28,0 28,27 0,27">
          <text:p/>
        </draw:polygon>
        <draw:polygon draw:style-name="gr269" draw:text-style-name="P267" draw:layer="layout" svg:width="0.027cm" svg:height="0.026cm" svg:x="5.909cm" svg:y="19.956cm" svg:viewBox="0 0 28 27" draw:points="0,0 28,0 28,27 0,27">
          <text:p/>
        </draw:polygon>
        <draw:polygon draw:style-name="gr269" draw:text-style-name="P267" draw:layer="layout" svg:width="0.027cm" svg:height="0.026cm" svg:x="5.962cm" svg:y="19.956cm" svg:viewBox="0 0 28 27" draw:points="0,0 28,0 28,27 0,27">
          <text:p/>
        </draw:polygon>
        <draw:polygon draw:style-name="gr269" draw:text-style-name="P267" draw:layer="layout" svg:width="0.027cm" svg:height="0.026cm" svg:x="6.015cm" svg:y="19.956cm" svg:viewBox="0 0 28 27" draw:points="0,0 28,0 28,27 0,27">
          <text:p/>
        </draw:polygon>
        <draw:polygon draw:style-name="gr269" draw:text-style-name="P267" draw:layer="layout" svg:width="0.027cm" svg:height="0.026cm" svg:x="6.068cm" svg:y="19.956cm" svg:viewBox="0 0 28 27" draw:points="0,0 28,0 28,27 0,27">
          <text:p/>
        </draw:polygon>
        <draw:polygon draw:style-name="gr269" draw:text-style-name="P267" draw:layer="layout" svg:width="0.027cm" svg:height="0.026cm" svg:x="6.121cm" svg:y="19.956cm" svg:viewBox="0 0 28 27" draw:points="0,0 28,0 28,27 0,27">
          <text:p/>
        </draw:polygon>
        <draw:polygon draw:style-name="gr269" draw:text-style-name="P267" draw:layer="layout" svg:width="0.028cm" svg:height="0.026cm" svg:x="6.174cm" svg:y="19.956cm" svg:viewBox="0 0 29 27" draw:points="0,0 29,0 29,27 0,27">
          <text:p/>
        </draw:polygon>
        <draw:polygon draw:style-name="gr269" draw:text-style-name="P267" draw:layer="layout" svg:width="0.027cm" svg:height="0.026cm" svg:x="6.227cm" svg:y="19.956cm" svg:viewBox="0 0 28 27" draw:points="0,0 28,0 28,27 0,27">
          <text:p/>
        </draw:polygon>
        <draw:polygon draw:style-name="gr269" draw:text-style-name="P267" draw:layer="layout" svg:width="0.027cm" svg:height="0.026cm" svg:x="6.28cm" svg:y="19.956cm" svg:viewBox="0 0 28 27" draw:points="0,0 28,0 28,27 0,27">
          <text:p/>
        </draw:polygon>
        <draw:polygon draw:style-name="gr269" draw:text-style-name="P267" draw:layer="layout" svg:width="0.027cm" svg:height="0.026cm" svg:x="6.333cm" svg:y="19.956cm" svg:viewBox="0 0 28 27" draw:points="0,0 28,0 28,27 0,27">
          <text:p/>
        </draw:polygon>
        <draw:polygon draw:style-name="gr269" draw:text-style-name="P267" draw:layer="layout" svg:width="0.026cm" svg:height="0.026cm" svg:x="6.387cm" svg:y="19.956cm" svg:viewBox="0 0 27 27" draw:points="0,0 27,0 27,27 0,27">
          <text:p/>
        </draw:polygon>
        <draw:polygon draw:style-name="gr269" draw:text-style-name="P267" draw:layer="layout" svg:width="0.026cm" svg:height="0.026cm" svg:x="6.44cm" svg:y="19.956cm" svg:viewBox="0 0 27 27" draw:points="0,0 27,0 27,27 0,27">
          <text:p/>
        </draw:polygon>
        <draw:polygon draw:style-name="gr269" draw:text-style-name="P267" draw:layer="layout" svg:width="0.026cm" svg:height="0.026cm" svg:x="6.493cm" svg:y="19.956cm" svg:viewBox="0 0 27 27" draw:points="0,0 27,0 27,27 0,27">
          <text:p/>
        </draw:polygon>
        <draw:polygon draw:style-name="gr269" draw:text-style-name="P267" draw:layer="layout" svg:width="0.026cm" svg:height="0.026cm" svg:x="6.546cm" svg:y="19.956cm" svg:viewBox="0 0 27 27" draw:points="0,0 27,0 27,27 0,27">
          <text:p/>
        </draw:polygon>
        <draw:polygon draw:style-name="gr269" draw:text-style-name="P267" draw:layer="layout" svg:width="0.026cm" svg:height="0.026cm" svg:x="6.599cm" svg:y="19.956cm" svg:viewBox="0 0 27 27" draw:points="0,0 27,0 27,27 0,27">
          <text:p/>
        </draw:polygon>
        <draw:polygon draw:style-name="gr269" draw:text-style-name="P267" draw:layer="layout" svg:width="0.026cm" svg:height="0.026cm" svg:x="6.652cm" svg:y="19.956cm" svg:viewBox="0 0 27 27" draw:points="0,0 27,0 27,27 0,27">
          <text:p/>
        </draw:polygon>
        <draw:polygon draw:style-name="gr269" draw:text-style-name="P267" draw:layer="layout" svg:width="0.026cm" svg:height="0.026cm" svg:x="6.705cm" svg:y="19.956cm" svg:viewBox="0 0 27 27" draw:points="0,0 27,0 27,27 0,27">
          <text:p/>
        </draw:polygon>
        <draw:polygon draw:style-name="gr269" draw:text-style-name="P267" draw:layer="layout" svg:width="0.026cm" svg:height="0.026cm" svg:x="6.758cm" svg:y="19.956cm" svg:viewBox="0 0 27 27" draw:points="0,0 27,0 27,27 0,27">
          <text:p/>
        </draw:polygon>
        <draw:polygon draw:style-name="gr269" draw:text-style-name="P267" draw:layer="layout" svg:width="0.026cm" svg:height="0.026cm" svg:x="6.811cm" svg:y="19.956cm" svg:viewBox="0 0 27 27" draw:points="0,0 27,0 27,27 0,27">
          <text:p/>
        </draw:polygon>
        <draw:polygon draw:style-name="gr269" draw:text-style-name="P267" draw:layer="layout" svg:width="0.026cm" svg:height="0.026cm" svg:x="6.864cm" svg:y="19.956cm" svg:viewBox="0 0 27 27" draw:points="0,0 27,0 27,27 0,27">
          <text:p/>
        </draw:polygon>
        <draw:polygon draw:style-name="gr269" draw:text-style-name="P267" draw:layer="layout" svg:width="0.026cm" svg:height="0.026cm" svg:x="6.917cm" svg:y="19.956cm" svg:viewBox="0 0 27 27" draw:points="0,0 27,0 27,27 0,27">
          <text:p/>
        </draw:polygon>
        <draw:polygon draw:style-name="gr269" draw:text-style-name="P267" draw:layer="layout" svg:width="0.026cm" svg:height="0.026cm" svg:x="6.97cm" svg:y="19.956cm" svg:viewBox="0 0 27 27" draw:points="0,0 27,0 27,27 0,27">
          <text:p/>
        </draw:polygon>
        <draw:polygon draw:style-name="gr269" draw:text-style-name="P267" draw:layer="layout" svg:width="0.026cm" svg:height="0.026cm" svg:x="7.023cm" svg:y="19.956cm" svg:viewBox="0 0 27 27" draw:points="0,0 27,0 27,27 0,27">
          <text:p/>
        </draw:polygon>
        <draw:polygon draw:style-name="gr269" draw:text-style-name="P267" draw:layer="layout" svg:width="0.026cm" svg:height="0.026cm" svg:x="7.076cm" svg:y="19.956cm" svg:viewBox="0 0 27 27" draw:points="0,0 27,0 27,27 0,27">
          <text:p/>
        </draw:polygon>
        <draw:polygon draw:style-name="gr269" draw:text-style-name="P267" draw:layer="layout" svg:width="0.026cm" svg:height="0.026cm" svg:x="7.129cm" svg:y="19.956cm" svg:viewBox="0 0 27 27" draw:points="0,0 27,0 27,27 0,27">
          <text:p/>
        </draw:polygon>
        <draw:polygon draw:style-name="gr269" draw:text-style-name="P267" draw:layer="layout" svg:width="0.026cm" svg:height="0.026cm" svg:x="7.182cm" svg:y="19.956cm" svg:viewBox="0 0 27 27" draw:points="0,0 27,0 27,27 0,27">
          <text:p/>
        </draw:polygon>
        <draw:polygon draw:style-name="gr269" draw:text-style-name="P267" draw:layer="layout" svg:width="0.026cm" svg:height="0.026cm" svg:x="7.235cm" svg:y="19.956cm" svg:viewBox="0 0 27 27" draw:points="0,0 27,0 27,27 0,27">
          <text:p/>
        </draw:polygon>
        <draw:polygon draw:style-name="gr269" draw:text-style-name="P267" draw:layer="layout" svg:width="0.026cm" svg:height="0.026cm" svg:x="7.288cm" svg:y="19.956cm" svg:viewBox="0 0 27 27" draw:points="0,0 27,0 27,27 0,27">
          <text:p/>
        </draw:polygon>
        <draw:polygon draw:style-name="gr269" draw:text-style-name="P267" draw:layer="layout" svg:width="0.026cm" svg:height="0.026cm" svg:x="7.341cm" svg:y="19.956cm" svg:viewBox="0 0 27 27" draw:points="0,0 27,0 27,27 0,27">
          <text:p/>
        </draw:polygon>
        <draw:polygon draw:style-name="gr269" draw:text-style-name="P267" draw:layer="layout" svg:width="0.026cm" svg:height="0.026cm" svg:x="7.394cm" svg:y="19.956cm" svg:viewBox="0 0 27 27" draw:points="0,0 27,0 27,27 0,27">
          <text:p/>
        </draw:polygon>
        <draw:polygon draw:style-name="gr269" draw:text-style-name="P267" draw:layer="layout" svg:width="0.026cm" svg:height="0.026cm" svg:x="7.447cm" svg:y="19.956cm" svg:viewBox="0 0 27 27" draw:points="0,0 27,0 27,27 0,27">
          <text:p/>
        </draw:polygon>
        <draw:polygon draw:style-name="gr269" draw:text-style-name="P267" draw:layer="layout" svg:width="0.026cm" svg:height="0.026cm" svg:x="7.5cm" svg:y="19.956cm" svg:viewBox="0 0 27 27" draw:points="0,0 27,0 27,27 0,27">
          <text:p/>
        </draw:polygon>
        <draw:polygon draw:style-name="gr269" draw:text-style-name="P267" draw:layer="layout" svg:width="0.026cm" svg:height="0.026cm" svg:x="7.553cm" svg:y="19.956cm" svg:viewBox="0 0 27 27" draw:points="0,0 27,0 27,27 0,27">
          <text:p/>
        </draw:polygon>
        <draw:polygon draw:style-name="gr269" draw:text-style-name="P267" draw:layer="layout" svg:width="0.026cm" svg:height="0.026cm" svg:x="7.606cm" svg:y="19.956cm" svg:viewBox="0 0 27 27" draw:points="0,0 27,0 27,27 0,27">
          <text:p/>
        </draw:polygon>
        <draw:polygon draw:style-name="gr269" draw:text-style-name="P267" draw:layer="layout" svg:width="0.026cm" svg:height="0.026cm" svg:x="7.659cm" svg:y="19.956cm" svg:viewBox="0 0 27 27" draw:points="0,0 27,0 27,27 0,27">
          <text:p/>
        </draw:polygon>
        <draw:polygon draw:style-name="gr269" draw:text-style-name="P267" draw:layer="layout" svg:width="0.026cm" svg:height="0.026cm" svg:x="7.712cm" svg:y="19.956cm" svg:viewBox="0 0 27 27" draw:points="0,0 27,0 27,27 0,27">
          <text:p/>
        </draw:polygon>
        <draw:polygon draw:style-name="gr269" draw:text-style-name="P267" draw:layer="layout" svg:width="0.026cm" svg:height="0.026cm" svg:x="7.765cm" svg:y="19.956cm" svg:viewBox="0 0 27 27" draw:points="0,0 27,0 27,27 0,27">
          <text:p/>
        </draw:polygon>
        <draw:polygon draw:style-name="gr269" draw:text-style-name="P267" draw:layer="layout" svg:width="0.026cm" svg:height="0.026cm" svg:x="7.818cm" svg:y="19.956cm" svg:viewBox="0 0 27 27" draw:points="0,0 27,0 27,27 0,27">
          <text:p/>
        </draw:polygon>
        <draw:polygon draw:style-name="gr269" draw:text-style-name="P267" draw:layer="layout" svg:width="0.026cm" svg:height="0.026cm" svg:x="7.871cm" svg:y="19.956cm" svg:viewBox="0 0 27 27" draw:points="0,0 27,0 27,27 0,27">
          <text:p/>
        </draw:polygon>
        <draw:polygon draw:style-name="gr269" draw:text-style-name="P267" draw:layer="layout" svg:width="0.026cm" svg:height="0.026cm" svg:x="7.924cm" svg:y="19.956cm" svg:viewBox="0 0 27 27" draw:points="0,0 27,0 27,27 0,27">
          <text:p/>
        </draw:polygon>
        <draw:polygon draw:style-name="gr269" draw:text-style-name="P267" draw:layer="layout" svg:width="0.026cm" svg:height="0.026cm" svg:x="7.977cm" svg:y="19.956cm" svg:viewBox="0 0 27 27" draw:points="0,0 27,0 27,27 0,27">
          <text:p/>
        </draw:polygon>
        <draw:polygon draw:style-name="gr269" draw:text-style-name="P267" draw:layer="layout" svg:width="0.026cm" svg:height="0.026cm" svg:x="8.03cm" svg:y="19.956cm" svg:viewBox="0 0 27 27" draw:points="0,0 27,0 27,27 0,27">
          <text:p/>
        </draw:polygon>
        <draw:polygon draw:style-name="gr269" draw:text-style-name="P267" draw:layer="layout" svg:width="0.026cm" svg:height="0.026cm" svg:x="8.083cm" svg:y="19.956cm" svg:viewBox="0 0 27 27" draw:points="0,0 27,0 27,27 0,27">
          <text:p/>
        </draw:polygon>
        <draw:polygon draw:style-name="gr269" draw:text-style-name="P267" draw:layer="layout" svg:width="0.026cm" svg:height="0.026cm" svg:x="8.136cm" svg:y="19.956cm" svg:viewBox="0 0 27 27" draw:points="0,0 27,0 27,27 0,27">
          <text:p/>
        </draw:polygon>
        <draw:polygon draw:style-name="gr269" draw:text-style-name="P267" draw:layer="layout" svg:width="0.026cm" svg:height="0.026cm" svg:x="8.189cm" svg:y="19.956cm" svg:viewBox="0 0 27 27" draw:points="0,0 27,0 27,27 0,27">
          <text:p/>
        </draw:polygon>
        <draw:polygon draw:style-name="gr269" draw:text-style-name="P267" draw:layer="layout" svg:width="0.026cm" svg:height="0.026cm" svg:x="8.242cm" svg:y="19.956cm" svg:viewBox="0 0 27 27" draw:points="0,0 27,0 27,27 0,27">
          <text:p/>
        </draw:polygon>
        <draw:polygon draw:style-name="gr269" draw:text-style-name="P267" draw:layer="layout" svg:width="0.026cm" svg:height="0.026cm" svg:x="8.295cm" svg:y="19.956cm" svg:viewBox="0 0 27 27" draw:points="0,0 27,0 27,27 0,27">
          <text:p/>
        </draw:polygon>
        <draw:polygon draw:style-name="gr269" draw:text-style-name="P267" draw:layer="layout" svg:width="0.026cm" svg:height="0.026cm" svg:x="8.348cm" svg:y="19.956cm" svg:viewBox="0 0 27 27" draw:points="0,0 27,0 27,27 0,27">
          <text:p/>
        </draw:polygon>
        <draw:polygon draw:style-name="gr269" draw:text-style-name="P267" draw:layer="layout" svg:width="0.026cm" svg:height="0.026cm" svg:x="8.401cm" svg:y="19.956cm" svg:viewBox="0 0 27 27" draw:points="0,0 27,0 27,27 0,27">
          <text:p/>
        </draw:polygon>
        <draw:polygon draw:style-name="gr269" draw:text-style-name="P267" draw:layer="layout" svg:width="0.026cm" svg:height="0.026cm" svg:x="8.454cm" svg:y="19.956cm" svg:viewBox="0 0 27 27" draw:points="0,0 27,0 27,27 0,27">
          <text:p/>
        </draw:polygon>
        <draw:polygon draw:style-name="gr269" draw:text-style-name="P267" draw:layer="layout" svg:width="0.026cm" svg:height="0.026cm" svg:x="8.507cm" svg:y="19.956cm" svg:viewBox="0 0 27 27" draw:points="0,0 27,0 27,27 0,27">
          <text:p/>
        </draw:polygon>
        <draw:polygon draw:style-name="gr269" draw:text-style-name="P267" draw:layer="layout" svg:width="0.026cm" svg:height="0.026cm" svg:x="8.56cm" svg:y="19.956cm" svg:viewBox="0 0 27 27" draw:points="0,0 27,0 27,27 0,27">
          <text:p/>
        </draw:polygon>
        <draw:polygon draw:style-name="gr269" draw:text-style-name="P267" draw:layer="layout" svg:width="0.026cm" svg:height="0.026cm" svg:x="8.613cm" svg:y="19.956cm" svg:viewBox="0 0 27 27" draw:points="0,0 27,0 27,27 0,27">
          <text:p/>
        </draw:polygon>
        <draw:polygon draw:style-name="gr269" draw:text-style-name="P267" draw:layer="layout" svg:width="0.026cm" svg:height="0.026cm" svg:x="8.666cm" svg:y="19.956cm" svg:viewBox="0 0 27 27" draw:points="0,0 27,0 27,27 0,27">
          <text:p/>
        </draw:polygon>
        <draw:polygon draw:style-name="gr269" draw:text-style-name="P267" draw:layer="layout" svg:width="0.026cm" svg:height="0.026cm" svg:x="8.719cm" svg:y="19.956cm" svg:viewBox="0 0 27 27" draw:points="0,0 27,0 27,27 0,27">
          <text:p/>
        </draw:polygon>
        <draw:polygon draw:style-name="gr269" draw:text-style-name="P267" draw:layer="layout" svg:width="0.026cm" svg:height="0.026cm" svg:x="8.772cm" svg:y="19.956cm" svg:viewBox="0 0 27 27" draw:points="0,0 27,0 27,27 0,27">
          <text:p/>
        </draw:polygon>
        <draw:polygon draw:style-name="gr269" draw:text-style-name="P267" draw:layer="layout" svg:width="0.026cm" svg:height="0.026cm" svg:x="8.825cm" svg:y="19.956cm" svg:viewBox="0 0 27 27" draw:points="0,0 27,0 27,27 0,27">
          <text:p/>
        </draw:polygon>
        <draw:polygon draw:style-name="gr269" draw:text-style-name="P267" draw:layer="layout" svg:width="0.026cm" svg:height="0.026cm" svg:x="8.878cm" svg:y="19.956cm" svg:viewBox="0 0 27 27" draw:points="0,0 27,0 27,27 0,27">
          <text:p/>
        </draw:polygon>
        <draw:polygon draw:style-name="gr269" draw:text-style-name="P267" draw:layer="layout" svg:width="0.026cm" svg:height="0.026cm" svg:x="8.931cm" svg:y="19.956cm" svg:viewBox="0 0 27 27" draw:points="0,0 27,0 27,27 0,27">
          <text:p/>
        </draw:polygon>
        <draw:polygon draw:style-name="gr269" draw:text-style-name="P267" draw:layer="layout" svg:width="0.026cm" svg:height="0.026cm" svg:x="8.984cm" svg:y="19.956cm" svg:viewBox="0 0 27 27" draw:points="0,0 27,0 27,27 0,27">
          <text:p/>
        </draw:polygon>
        <draw:polygon draw:style-name="gr269" draw:text-style-name="P267" draw:layer="layout" svg:width="0.026cm" svg:height="0.026cm" svg:x="9.037cm" svg:y="19.956cm" svg:viewBox="0 0 27 27" draw:points="0,0 27,0 27,27 0,27">
          <text:p/>
        </draw:polygon>
        <draw:polygon draw:style-name="gr269" draw:text-style-name="P267" draw:layer="layout" svg:width="0.026cm" svg:height="0.026cm" svg:x="9.09cm" svg:y="19.956cm" svg:viewBox="0 0 27 27" draw:points="0,0 27,0 27,27 0,27">
          <text:p/>
        </draw:polygon>
        <draw:polygon draw:style-name="gr269" draw:text-style-name="P267" draw:layer="layout" svg:width="0.026cm" svg:height="0.026cm" svg:x="9.143cm" svg:y="19.956cm" svg:viewBox="0 0 27 27" draw:points="0,0 27,0 27,27 0,27">
          <text:p/>
        </draw:polygon>
        <draw:polygon draw:style-name="gr269" draw:text-style-name="P267" draw:layer="layout" svg:width="0.026cm" svg:height="0.026cm" svg:x="9.196cm" svg:y="19.956cm" svg:viewBox="0 0 27 27" draw:points="0,0 27,0 27,27 0,27">
          <text:p/>
        </draw:polygon>
        <draw:polygon draw:style-name="gr269" draw:text-style-name="P267" draw:layer="layout" svg:width="0.026cm" svg:height="0.026cm" svg:x="9.249cm" svg:y="19.956cm" svg:viewBox="0 0 27 27" draw:points="0,0 27,0 27,27 0,27">
          <text:p/>
        </draw:polygon>
        <draw:polygon draw:style-name="gr269" draw:text-style-name="P267" draw:layer="layout" svg:width="0.026cm" svg:height="0.026cm" svg:x="9.302cm" svg:y="19.956cm" svg:viewBox="0 0 27 27" draw:points="0,0 27,0 27,27 0,27">
          <text:p/>
        </draw:polygon>
        <draw:polygon draw:style-name="gr269" draw:text-style-name="P267" draw:layer="layout" svg:width="0.026cm" svg:height="0.026cm" svg:x="9.355cm" svg:y="19.956cm" svg:viewBox="0 0 27 27" draw:points="0,0 27,0 27,27 0,27">
          <text:p/>
        </draw:polygon>
        <draw:polygon draw:style-name="gr269" draw:text-style-name="P267" draw:layer="layout" svg:width="0.026cm" svg:height="0.026cm" svg:x="9.408cm" svg:y="19.956cm" svg:viewBox="0 0 27 27" draw:points="0,0 27,0 27,27 0,27">
          <text:p/>
        </draw:polygon>
        <draw:polygon draw:style-name="gr269" draw:text-style-name="P267" draw:layer="layout" svg:width="0.026cm" svg:height="0.026cm" svg:x="9.461cm" svg:y="19.956cm" svg:viewBox="0 0 27 27" draw:points="0,0 27,0 27,27 0,27">
          <text:p/>
        </draw:polygon>
        <draw:polygon draw:style-name="gr269" draw:text-style-name="P267" draw:layer="layout" svg:width="0.026cm" svg:height="0.026cm" svg:x="9.514cm" svg:y="19.956cm" svg:viewBox="0 0 27 27" draw:points="0,0 27,0 27,27 0,27">
          <text:p/>
        </draw:polygon>
        <draw:polygon draw:style-name="gr269" draw:text-style-name="P267" draw:layer="layout" svg:width="0.026cm" svg:height="0.026cm" svg:x="9.567cm" svg:y="19.956cm" svg:viewBox="0 0 27 27" draw:points="0,0 27,0 27,27 0,27">
          <text:p/>
        </draw:polygon>
        <draw:polygon draw:style-name="gr269" draw:text-style-name="P267" draw:layer="layout" svg:width="0.026cm" svg:height="0.026cm" svg:x="9.62cm" svg:y="19.956cm" svg:viewBox="0 0 27 27" draw:points="0,0 27,0 27,27 0,27">
          <text:p/>
        </draw:polygon>
        <draw:polygon draw:style-name="gr269" draw:text-style-name="P267" draw:layer="layout" svg:width="0.026cm" svg:height="0.026cm" svg:x="9.673cm" svg:y="19.956cm" svg:viewBox="0 0 27 27" draw:points="0,0 27,0 27,27 0,27">
          <text:p/>
        </draw:polygon>
        <draw:polygon draw:style-name="gr269" draw:text-style-name="P267" draw:layer="layout" svg:width="0.026cm" svg:height="0.026cm" svg:x="9.726cm" svg:y="19.956cm" svg:viewBox="0 0 27 27" draw:points="0,0 27,0 27,27 0,27">
          <text:p/>
        </draw:polygon>
        <draw:polygon draw:style-name="gr269" draw:text-style-name="P267" draw:layer="layout" svg:width="0.026cm" svg:height="0.026cm" svg:x="9.779cm" svg:y="19.956cm" svg:viewBox="0 0 27 27" draw:points="0,0 27,0 27,27 0,27">
          <text:p/>
        </draw:polygon>
        <draw:polygon draw:style-name="gr269" draw:text-style-name="P267" draw:layer="layout" svg:width="0.026cm" svg:height="0.026cm" svg:x="9.832cm" svg:y="19.956cm" svg:viewBox="0 0 27 27" draw:points="0,0 27,0 27,27 0,27">
          <text:p/>
        </draw:polygon>
        <draw:polygon draw:style-name="gr269" draw:text-style-name="P267" draw:layer="layout" svg:width="0.026cm" svg:height="0.026cm" svg:x="9.885cm" svg:y="19.956cm" svg:viewBox="0 0 27 27" draw:points="0,0 27,0 27,27 0,27">
          <text:p/>
        </draw:polygon>
        <draw:polygon draw:style-name="gr269" draw:text-style-name="P267" draw:layer="layout" svg:width="0.026cm" svg:height="0.026cm" svg:x="9.938cm" svg:y="19.956cm" svg:viewBox="0 0 27 27" draw:points="0,0 27,0 27,27 0,27">
          <text:p/>
        </draw:polygon>
        <draw:polygon draw:style-name="gr269" draw:text-style-name="P267" draw:layer="layout" svg:width="0.026cm" svg:height="0.026cm" svg:x="9.991cm" svg:y="19.956cm" svg:viewBox="0 0 27 27" draw:points="0,0 27,0 27,27 0,27">
          <text:p/>
        </draw:polygon>
        <draw:polygon draw:style-name="gr269" draw:text-style-name="P267" draw:layer="layout" svg:width="0.026cm" svg:height="0.026cm" svg:x="10.044cm" svg:y="19.956cm" svg:viewBox="0 0 27 27" draw:points="0,0 27,0 27,27 0,27">
          <text:p/>
        </draw:polygon>
        <draw:polygon draw:style-name="gr269" draw:text-style-name="P267" draw:layer="layout" svg:width="0.026cm" svg:height="0.026cm" svg:x="10.097cm" svg:y="19.956cm" svg:viewBox="0 0 27 27" draw:points="0,0 27,0 27,27 0,27">
          <text:p/>
        </draw:polygon>
        <draw:polygon draw:style-name="gr269" draw:text-style-name="P267" draw:layer="layout" svg:width="0.026cm" svg:height="0.026cm" svg:x="10.15cm" svg:y="19.956cm" svg:viewBox="0 0 27 27" draw:points="0,0 27,0 27,27 0,27">
          <text:p/>
        </draw:polygon>
        <draw:polygon draw:style-name="gr269" draw:text-style-name="P267" draw:layer="layout" svg:width="0.026cm" svg:height="0.026cm" svg:x="10.203cm" svg:y="19.956cm" svg:viewBox="0 0 27 27" draw:points="0,0 27,0 27,27 0,27">
          <text:p/>
        </draw:polygon>
        <draw:polygon draw:style-name="gr269" draw:text-style-name="P267" draw:layer="layout" svg:width="0.026cm" svg:height="0.026cm" svg:x="10.256cm" svg:y="19.956cm" svg:viewBox="0 0 27 27" draw:points="0,0 27,0 27,27 0,27">
          <text:p/>
        </draw:polygon>
        <draw:polygon draw:style-name="gr269" draw:text-style-name="P267" draw:layer="layout" svg:width="0.026cm" svg:height="0.026cm" svg:x="10.309cm" svg:y="19.956cm" svg:viewBox="0 0 27 27" draw:points="0,0 27,0 27,27 0,27">
          <text:p/>
        </draw:polygon>
        <draw:polygon draw:style-name="gr269" draw:text-style-name="P267" draw:layer="layout" svg:width="0.026cm" svg:height="0.026cm" svg:x="10.362cm" svg:y="19.956cm" svg:viewBox="0 0 27 27" draw:points="0,0 27,0 27,27 0,27">
          <text:p/>
        </draw:polygon>
        <draw:polygon draw:style-name="gr269" draw:text-style-name="P267" draw:layer="layout" svg:width="0.026cm" svg:height="0.026cm" svg:x="10.415cm" svg:y="19.956cm" svg:viewBox="0 0 27 27" draw:points="0,0 27,0 27,27 0,27">
          <text:p/>
        </draw:polygon>
        <draw:polygon draw:style-name="gr269" draw:text-style-name="P267" draw:layer="layout" svg:width="0.026cm" svg:height="0.026cm" svg:x="10.468cm" svg:y="19.956cm" svg:viewBox="0 0 27 27" draw:points="0,0 27,0 27,27 0,27">
          <text:p/>
        </draw:polygon>
        <draw:polygon draw:style-name="gr269" draw:text-style-name="P267" draw:layer="layout" svg:width="0.026cm" svg:height="0.026cm" svg:x="10.521cm" svg:y="19.956cm" svg:viewBox="0 0 27 27" draw:points="0,0 27,0 27,27 0,27">
          <text:p/>
        </draw:polygon>
        <draw:polygon draw:style-name="gr269" draw:text-style-name="P267" draw:layer="layout" svg:width="0.026cm" svg:height="0.026cm" svg:x="10.574cm" svg:y="19.956cm" svg:viewBox="0 0 27 27" draw:points="0,0 27,0 27,27 0,27">
          <text:p/>
        </draw:polygon>
        <draw:polygon draw:style-name="gr269" draw:text-style-name="P267" draw:layer="layout" svg:width="0.026cm" svg:height="0.026cm" svg:x="10.627cm" svg:y="19.956cm" svg:viewBox="0 0 27 27" draw:points="0,0 27,0 27,27 0,27">
          <text:p/>
        </draw:polygon>
        <draw:polygon draw:style-name="gr269" draw:text-style-name="P267" draw:layer="layout" svg:width="0.026cm" svg:height="0.026cm" svg:x="10.68cm" svg:y="19.956cm" svg:viewBox="0 0 27 27" draw:points="0,0 27,0 27,27 0,27">
          <text:p/>
        </draw:polygon>
        <draw:polygon draw:style-name="gr269" draw:text-style-name="P267" draw:layer="layout" svg:width="0.026cm" svg:height="0.026cm" svg:x="10.733cm" svg:y="19.956cm" svg:viewBox="0 0 27 27" draw:points="0,0 27,0 27,27 0,27">
          <text:p/>
        </draw:polygon>
        <draw:polygon draw:style-name="gr269" draw:text-style-name="P267" draw:layer="layout" svg:width="0.026cm" svg:height="0.026cm" svg:x="10.786cm" svg:y="19.956cm" svg:viewBox="0 0 27 27" draw:points="0,0 27,0 27,27 0,27">
          <text:p/>
        </draw:polygon>
        <draw:polygon draw:style-name="gr269" draw:text-style-name="P267" draw:layer="layout" svg:width="0.026cm" svg:height="0.026cm" svg:x="10.839cm" svg:y="19.956cm" svg:viewBox="0 0 27 27" draw:points="0,0 27,0 27,27 0,27">
          <text:p/>
        </draw:polygon>
        <draw:polygon draw:style-name="gr269" draw:text-style-name="P267" draw:layer="layout" svg:width="0.026cm" svg:height="0.026cm" svg:x="10.892cm" svg:y="19.956cm" svg:viewBox="0 0 27 27" draw:points="0,0 27,0 27,27 0,27">
          <text:p/>
        </draw:polygon>
        <draw:polygon draw:style-name="gr269" draw:text-style-name="P267" draw:layer="layout" svg:width="0.026cm" svg:height="0.026cm" svg:x="10.945cm" svg:y="19.956cm" svg:viewBox="0 0 27 27" draw:points="0,0 27,0 27,27 0,27">
          <text:p/>
        </draw:polygon>
        <draw:polygon draw:style-name="gr269" draw:text-style-name="P267" draw:layer="layout" svg:width="0.026cm" svg:height="0.026cm" svg:x="10.998cm" svg:y="19.956cm" svg:viewBox="0 0 27 27" draw:points="0,0 27,0 27,27 0,27">
          <text:p/>
        </draw:polygon>
        <draw:polygon draw:style-name="gr269" draw:text-style-name="P267" draw:layer="layout" svg:width="0.026cm" svg:height="0.026cm" svg:x="11.051cm" svg:y="19.956cm" svg:viewBox="0 0 27 27" draw:points="0,0 27,0 27,27 0,27">
          <text:p/>
        </draw:polygon>
        <draw:polygon draw:style-name="gr269" draw:text-style-name="P267" draw:layer="layout" svg:width="0.026cm" svg:height="0.026cm" svg:x="11.104cm" svg:y="19.956cm" svg:viewBox="0 0 27 27" draw:points="0,0 27,0 27,27 0,27">
          <text:p/>
        </draw:polygon>
        <draw:polygon draw:style-name="gr269" draw:text-style-name="P267" draw:layer="layout" svg:width="0.026cm" svg:height="0.026cm" svg:x="11.157cm" svg:y="19.956cm" svg:viewBox="0 0 27 27" draw:points="0,0 27,0 27,27 0,27">
          <text:p/>
        </draw:polygon>
        <draw:polygon draw:style-name="gr269" draw:text-style-name="P267" draw:layer="layout" svg:width="0.026cm" svg:height="0.026cm" svg:x="11.21cm" svg:y="19.956cm" svg:viewBox="0 0 27 27" draw:points="0,0 27,0 27,27 0,27">
          <text:p/>
        </draw:polygon>
        <draw:polygon draw:style-name="gr269" draw:text-style-name="P267" draw:layer="layout" svg:width="0.026cm" svg:height="0.026cm" svg:x="11.263cm" svg:y="19.956cm" svg:viewBox="0 0 27 27" draw:points="0,0 27,0 27,27 0,27">
          <text:p/>
        </draw:polygon>
        <draw:polygon draw:style-name="gr269" draw:text-style-name="P267" draw:layer="layout" svg:width="0.026cm" svg:height="0.026cm" svg:x="11.316cm" svg:y="19.956cm" svg:viewBox="0 0 27 27" draw:points="0,0 27,0 27,27 0,27">
          <text:p/>
        </draw:polygon>
        <draw:polygon draw:style-name="gr269" draw:text-style-name="P267" draw:layer="layout" svg:width="0.026cm" svg:height="0.026cm" svg:x="11.369cm" svg:y="19.956cm" svg:viewBox="0 0 27 27" draw:points="0,0 27,0 27,27 0,27">
          <text:p/>
        </draw:polygon>
        <draw:polygon draw:style-name="gr269" draw:text-style-name="P267" draw:layer="layout" svg:width="0.026cm" svg:height="0.026cm" svg:x="11.422cm" svg:y="19.956cm" svg:viewBox="0 0 27 27" draw:points="0,0 27,0 27,27 0,27">
          <text:p/>
        </draw:polygon>
        <draw:polygon draw:style-name="gr269" draw:text-style-name="P267" draw:layer="layout" svg:width="0.026cm" svg:height="0.026cm" svg:x="11.475cm" svg:y="19.956cm" svg:viewBox="0 0 27 27" draw:points="0,0 27,0 27,27 0,27">
          <text:p/>
        </draw:polygon>
        <draw:polygon draw:style-name="gr269" draw:text-style-name="P267" draw:layer="layout" svg:width="0.026cm" svg:height="0.026cm" svg:x="11.528cm" svg:y="19.956cm" svg:viewBox="0 0 27 27" draw:points="0,0 27,0 27,27 0,27">
          <text:p/>
        </draw:polygon>
        <draw:polygon draw:style-name="gr269" draw:text-style-name="P267" draw:layer="layout" svg:width="0.026cm" svg:height="0.026cm" svg:x="11.581cm" svg:y="19.956cm" svg:viewBox="0 0 27 27" draw:points="0,0 27,0 27,27 0,27">
          <text:p/>
        </draw:polygon>
        <draw:polygon draw:style-name="gr269" draw:text-style-name="P267" draw:layer="layout" svg:width="0.026cm" svg:height="0.026cm" svg:x="11.634cm" svg:y="19.956cm" svg:viewBox="0 0 27 27" draw:points="0,0 27,0 27,27 0,27">
          <text:p/>
        </draw:polygon>
        <draw:polygon draw:style-name="gr269" draw:text-style-name="P267" draw:layer="layout" svg:width="0.026cm" svg:height="0.026cm" svg:x="11.687cm" svg:y="19.956cm" svg:viewBox="0 0 27 27" draw:points="0,0 27,0 27,27 0,27">
          <text:p/>
        </draw:polygon>
        <draw:polygon draw:style-name="gr269" draw:text-style-name="P267" draw:layer="layout" svg:width="0.026cm" svg:height="0.026cm" svg:x="11.74cm" svg:y="19.956cm" svg:viewBox="0 0 27 27" draw:points="0,0 27,0 27,27 0,27">
          <text:p/>
        </draw:polygon>
        <draw:polygon draw:style-name="gr269" draw:text-style-name="P267" draw:layer="layout" svg:width="0.026cm" svg:height="0.026cm" svg:x="11.793cm" svg:y="19.956cm" svg:viewBox="0 0 27 27" draw:points="0,0 27,0 27,27 0,27">
          <text:p/>
        </draw:polygon>
        <draw:polygon draw:style-name="gr269" draw:text-style-name="P267" draw:layer="layout" svg:width="0.026cm" svg:height="0.026cm" svg:x="11.846cm" svg:y="19.956cm" svg:viewBox="0 0 27 27" draw:points="0,0 27,0 27,27 0,27">
          <text:p/>
        </draw:polygon>
        <draw:polygon draw:style-name="gr269" draw:text-style-name="P267" draw:layer="layout" svg:width="0.026cm" svg:height="0.026cm" svg:x="11.899cm" svg:y="19.956cm" svg:viewBox="0 0 27 27" draw:points="0,0 27,0 27,27 0,27">
          <text:p/>
        </draw:polygon>
        <draw:polygon draw:style-name="gr269" draw:text-style-name="P267" draw:layer="layout" svg:width="0.026cm" svg:height="0.026cm" svg:x="11.952cm" svg:y="19.956cm" svg:viewBox="0 0 27 27" draw:points="0,0 27,0 27,27 0,27">
          <text:p/>
        </draw:polygon>
        <draw:polygon draw:style-name="gr269" draw:text-style-name="P267" draw:layer="layout" svg:width="0.026cm" svg:height="0.026cm" svg:x="12.005cm" svg:y="19.956cm" svg:viewBox="0 0 27 27" draw:points="0,0 27,0 27,27 0,27">
          <text:p/>
        </draw:polygon>
        <draw:polygon draw:style-name="gr269" draw:text-style-name="P267" draw:layer="layout" svg:width="0.026cm" svg:height="0.026cm" svg:x="12.058cm" svg:y="19.956cm" svg:viewBox="0 0 27 27" draw:points="0,0 27,0 27,27 0,27">
          <text:p/>
        </draw:polygon>
        <draw:polygon draw:style-name="gr269" draw:text-style-name="P267" draw:layer="layout" svg:width="0.026cm" svg:height="0.026cm" svg:x="12.111cm" svg:y="19.956cm" svg:viewBox="0 0 27 27" draw:points="0,0 27,0 27,27 0,27">
          <text:p/>
        </draw:polygon>
        <draw:polygon draw:style-name="gr269" draw:text-style-name="P267" draw:layer="layout" svg:width="0.026cm" svg:height="0.026cm" svg:x="12.164cm" svg:y="19.956cm" svg:viewBox="0 0 27 27" draw:points="0,0 27,0 27,27 0,27">
          <text:p/>
        </draw:polygon>
        <draw:polygon draw:style-name="gr269" draw:text-style-name="P267" draw:layer="layout" svg:width="0.026cm" svg:height="0.026cm" svg:x="12.217cm" svg:y="19.956cm" svg:viewBox="0 0 27 27" draw:points="0,0 27,0 27,27 0,27">
          <text:p/>
        </draw:polygon>
        <draw:polygon draw:style-name="gr269" draw:text-style-name="P267" draw:layer="layout" svg:width="0.026cm" svg:height="0.026cm" svg:x="12.27cm" svg:y="19.956cm" svg:viewBox="0 0 27 27" draw:points="0,0 27,0 27,27 0,27">
          <text:p/>
        </draw:polygon>
        <draw:polygon draw:style-name="gr269" draw:text-style-name="P267" draw:layer="layout" svg:width="0.026cm" svg:height="0.026cm" svg:x="12.323cm" svg:y="19.956cm" svg:viewBox="0 0 27 27" draw:points="0,0 27,0 27,27 0,27">
          <text:p/>
        </draw:polygon>
        <draw:polygon draw:style-name="gr269" draw:text-style-name="P267" draw:layer="layout" svg:width="0.026cm" svg:height="0.026cm" svg:x="12.376cm" svg:y="19.956cm" svg:viewBox="0 0 27 27" draw:points="0,0 27,0 27,27 0,27">
          <text:p/>
        </draw:polygon>
        <draw:polygon draw:style-name="gr269" draw:text-style-name="P267" draw:layer="layout" svg:width="0.026cm" svg:height="0.026cm" svg:x="12.429cm" svg:y="19.956cm" svg:viewBox="0 0 27 27" draw:points="0,0 27,0 27,27 0,27">
          <text:p/>
        </draw:polygon>
        <draw:polygon draw:style-name="gr269" draw:text-style-name="P267" draw:layer="layout" svg:width="0.026cm" svg:height="0.026cm" svg:x="12.482cm" svg:y="19.956cm" svg:viewBox="0 0 27 27" draw:points="0,0 27,0 27,27 0,27">
          <text:p/>
        </draw:polygon>
        <draw:polygon draw:style-name="gr269" draw:text-style-name="P267" draw:layer="layout" svg:width="0.026cm" svg:height="0.026cm" svg:x="12.535cm" svg:y="19.956cm" svg:viewBox="0 0 27 27" draw:points="0,0 27,0 27,27 0,27">
          <text:p/>
        </draw:polygon>
        <draw:polygon draw:style-name="gr269" draw:text-style-name="P267" draw:layer="layout" svg:width="0.026cm" svg:height="0.026cm" svg:x="12.588cm" svg:y="19.956cm" svg:viewBox="0 0 27 27" draw:points="0,0 27,0 27,27 0,27">
          <text:p/>
        </draw:polygon>
        <draw:polygon draw:style-name="gr269" draw:text-style-name="P267" draw:layer="layout" svg:width="0.026cm" svg:height="0.026cm" svg:x="12.641cm" svg:y="19.956cm" svg:viewBox="0 0 27 27" draw:points="0,0 27,0 27,27 0,27">
          <text:p/>
        </draw:polygon>
        <draw:polygon draw:style-name="gr269" draw:text-style-name="P267" draw:layer="layout" svg:width="0.027cm" svg:height="0.026cm" svg:x="12.694cm" svg:y="19.956cm" svg:viewBox="0 0 28 27" draw:points="0,0 28,0 28,27 0,27">
          <text:p/>
        </draw:polygon>
        <draw:polygon draw:style-name="gr269" draw:text-style-name="P267" draw:layer="layout" svg:width="0.027cm" svg:height="0.026cm" svg:x="12.747cm" svg:y="19.956cm" svg:viewBox="0 0 28 27" draw:points="0,0 28,0 28,27 0,27">
          <text:p/>
        </draw:polygon>
        <draw:polygon draw:style-name="gr269" draw:text-style-name="P267" draw:layer="layout" svg:width="0.027cm" svg:height="0.026cm" svg:x="12.8cm" svg:y="19.956cm" svg:viewBox="0 0 28 27" draw:points="0,0 28,0 28,27 0,27">
          <text:p/>
        </draw:polygon>
        <draw:polygon draw:style-name="gr269" draw:text-style-name="P267" draw:layer="layout" svg:width="0.027cm" svg:height="0.026cm" svg:x="12.853cm" svg:y="19.956cm" svg:viewBox="0 0 28 27" draw:points="0,0 28,0 28,27 0,27">
          <text:p/>
        </draw:polygon>
        <draw:polygon draw:style-name="gr269" draw:text-style-name="P267" draw:layer="layout" svg:width="0.027cm" svg:height="0.026cm" svg:x="12.906cm" svg:y="19.956cm" svg:viewBox="0 0 28 27" draw:points="0,0 28,0 28,27 0,27">
          <text:p/>
        </draw:polygon>
        <draw:polygon draw:style-name="gr269" draw:text-style-name="P267" draw:layer="layout" svg:width="0.027cm" svg:height="0.026cm" svg:x="12.959cm" svg:y="19.956cm" svg:viewBox="0 0 28 27" draw:points="0,0 28,0 28,27 0,27">
          <text:p/>
        </draw:polygon>
        <draw:polygon draw:style-name="gr269" draw:text-style-name="P267" draw:layer="layout" svg:width="0.028cm" svg:height="0.026cm" svg:x="13.012cm" svg:y="19.956cm" svg:viewBox="0 0 29 27" draw:points="0,0 29,0 29,27 0,27">
          <text:p/>
        </draw:polygon>
        <draw:polygon draw:style-name="gr269" draw:text-style-name="P267" draw:layer="layout" svg:width="0.027cm" svg:height="0.026cm" svg:x="13.065cm" svg:y="19.956cm" svg:viewBox="0 0 28 27" draw:points="0,0 28,0 28,27 0,27">
          <text:p/>
        </draw:polygon>
        <draw:polygon draw:style-name="gr269" draw:text-style-name="P267" draw:layer="layout" svg:width="0.027cm" svg:height="0.026cm" svg:x="13.118cm" svg:y="19.956cm" svg:viewBox="0 0 28 27" draw:points="0,0 28,0 28,27 0,27">
          <text:p/>
        </draw:polygon>
        <draw:polygon draw:style-name="gr269" draw:text-style-name="P267" draw:layer="layout" svg:width="0.027cm" svg:height="0.026cm" svg:x="13.171cm" svg:y="19.956cm" svg:viewBox="0 0 28 27" draw:points="0,0 28,0 28,27 0,27">
          <text:p/>
        </draw:polygon>
        <draw:polygon draw:style-name="gr269" draw:text-style-name="P267" draw:layer="layout" svg:width="0.027cm" svg:height="0.026cm" svg:x="13.224cm" svg:y="19.956cm" svg:viewBox="0 0 28 27" draw:points="0,0 28,0 28,27 0,27">
          <text:p/>
        </draw:polygon>
        <draw:polygon draw:style-name="gr269" draw:text-style-name="P267" draw:layer="layout" svg:width="0.027cm" svg:height="0.026cm" svg:x="13.277cm" svg:y="19.956cm" svg:viewBox="0 0 28 27" draw:points="0,0 28,0 28,27 0,27">
          <text:p/>
        </draw:polygon>
        <draw:polygon draw:style-name="gr269" draw:text-style-name="P267" draw:layer="layout" svg:width="0.027cm" svg:height="0.026cm" svg:x="13.33cm" svg:y="19.956cm" svg:viewBox="0 0 28 27" draw:points="0,0 28,0 28,27 0,27">
          <text:p/>
        </draw:polygon>
        <draw:polygon draw:style-name="gr269" draw:text-style-name="P267" draw:layer="layout" svg:width="0.027cm" svg:height="0.026cm" svg:x="13.383cm" svg:y="19.956cm" svg:viewBox="0 0 28 27" draw:points="0,0 28,0 28,27 0,27">
          <text:p/>
        </draw:polygon>
        <draw:polygon draw:style-name="gr269" draw:text-style-name="P267" draw:layer="layout" svg:width="0.027cm" svg:height="0.026cm" svg:x="13.436cm" svg:y="19.956cm" svg:viewBox="0 0 28 27" draw:points="0,0 28,0 28,27 0,27">
          <text:p/>
        </draw:polygon>
        <draw:polygon draw:style-name="gr269" draw:text-style-name="P267" draw:layer="layout" svg:width="0.027cm" svg:height="0.026cm" svg:x="13.489cm" svg:y="19.956cm" svg:viewBox="0 0 28 27" draw:points="0,0 28,0 28,27 0,27">
          <text:p/>
        </draw:polygon>
        <draw:polygon draw:style-name="gr269" draw:text-style-name="P267" draw:layer="layout" svg:width="0.027cm" svg:height="0.026cm" svg:x="13.542cm" svg:y="19.956cm" svg:viewBox="0 0 28 27" draw:points="0,0 28,0 28,27 0,27">
          <text:p/>
        </draw:polygon>
        <draw:polygon draw:style-name="gr269" draw:text-style-name="P267" draw:layer="layout" svg:width="0.027cm" svg:height="0.026cm" svg:x="13.595cm" svg:y="19.956cm" svg:viewBox="0 0 28 27" draw:points="0,0 28,0 28,27 0,27">
          <text:p/>
        </draw:polygon>
        <draw:polygon draw:style-name="gr269" draw:text-style-name="P267" draw:layer="layout" svg:width="0.027cm" svg:height="0.026cm" svg:x="13.648cm" svg:y="19.956cm" svg:viewBox="0 0 28 27" draw:points="0,0 28,0 28,27 0,27">
          <text:p/>
        </draw:polygon>
        <draw:polygon draw:style-name="gr269" draw:text-style-name="P267" draw:layer="layout" svg:width="0.027cm" svg:height="0.026cm" svg:x="13.701cm" svg:y="19.956cm" svg:viewBox="0 0 28 27" draw:points="0,0 28,0 28,27 0,27">
          <text:p/>
        </draw:polygon>
        <draw:polygon draw:style-name="gr269" draw:text-style-name="P267" draw:layer="layout" svg:width="0.027cm" svg:height="0.026cm" svg:x="13.754cm" svg:y="19.956cm" svg:viewBox="0 0 28 27" draw:points="0,0 28,0 28,27 0,27">
          <text:p/>
        </draw:polygon>
        <draw:polygon draw:style-name="gr269" draw:text-style-name="P267" draw:layer="layout" svg:width="0.027cm" svg:height="0.026cm" svg:x="13.807cm" svg:y="19.956cm" svg:viewBox="0 0 28 27" draw:points="0,0 28,0 28,27 0,27">
          <text:p/>
        </draw:polygon>
        <draw:polygon draw:style-name="gr269" draw:text-style-name="P267" draw:layer="layout" svg:width="0.027cm" svg:height="0.026cm" svg:x="13.86cm" svg:y="19.956cm" svg:viewBox="0 0 28 27" draw:points="0,0 28,0 28,27 0,27">
          <text:p/>
        </draw:polygon>
        <draw:polygon draw:style-name="gr269" draw:text-style-name="P267" draw:layer="layout" svg:width="0.027cm" svg:height="0.026cm" svg:x="13.913cm" svg:y="19.956cm" svg:viewBox="0 0 28 27" draw:points="0,0 28,0 28,27 0,27">
          <text:p/>
        </draw:polygon>
        <draw:polygon draw:style-name="gr269" draw:text-style-name="P267" draw:layer="layout" svg:width="0.027cm" svg:height="0.026cm" svg:x="13.966cm" svg:y="19.956cm" svg:viewBox="0 0 28 27" draw:points="0,0 28,0 28,27 0,27">
          <text:p/>
        </draw:polygon>
        <draw:polygon draw:style-name="gr269" draw:text-style-name="P267" draw:layer="layout" svg:width="0.027cm" svg:height="0.026cm" svg:x="14.019cm" svg:y="19.956cm" svg:viewBox="0 0 28 27" draw:points="0,0 28,0 28,27 0,27">
          <text:p/>
        </draw:polygon>
        <draw:polygon draw:style-name="gr269" draw:text-style-name="P267" draw:layer="layout" svg:width="0.027cm" svg:height="0.026cm" svg:x="14.072cm" svg:y="19.956cm" svg:viewBox="0 0 28 27" draw:points="0,0 28,0 28,27 0,27">
          <text:p/>
        </draw:polygon>
        <draw:polygon draw:style-name="gr269" draw:text-style-name="P267" draw:layer="layout" svg:width="0.027cm" svg:height="0.026cm" svg:x="14.125cm" svg:y="19.956cm" svg:viewBox="0 0 28 27" draw:points="0,0 28,0 28,27 0,27">
          <text:p/>
        </draw:polygon>
        <draw:polygon draw:style-name="gr269" draw:text-style-name="P267" draw:layer="layout" svg:width="0.027cm" svg:height="0.026cm" svg:x="14.178cm" svg:y="19.956cm" svg:viewBox="0 0 28 27" draw:points="0,0 28,0 28,27 0,27">
          <text:p/>
        </draw:polygon>
        <draw:polygon draw:style-name="gr269" draw:text-style-name="P267" draw:layer="layout" svg:width="0.027cm" svg:height="0.026cm" svg:x="14.231cm" svg:y="19.956cm" svg:viewBox="0 0 28 27" draw:points="0,0 28,0 28,27 0,27">
          <text:p/>
        </draw:polygon>
        <draw:polygon draw:style-name="gr269" draw:text-style-name="P267" draw:layer="layout" svg:width="0.027cm" svg:height="0.026cm" svg:x="14.284cm" svg:y="19.956cm" svg:viewBox="0 0 28 27" draw:points="0,0 28,0 28,27 0,27">
          <text:p/>
        </draw:polygon>
        <draw:polygon draw:style-name="gr269" draw:text-style-name="P267" draw:layer="layout" svg:width="0.027cm" svg:height="0.026cm" svg:x="14.337cm" svg:y="19.956cm" svg:viewBox="0 0 28 27" draw:points="0,0 28,0 28,27 0,27">
          <text:p/>
        </draw:polygon>
        <draw:polygon draw:style-name="gr269" draw:text-style-name="P267" draw:layer="layout" svg:width="0.028cm" svg:height="0.026cm" svg:x="14.39cm" svg:y="19.956cm" svg:viewBox="0 0 29 27" draw:points="0,0 29,0 29,27 0,27">
          <text:p/>
        </draw:polygon>
        <draw:polygon draw:style-name="gr269" draw:text-style-name="P267" draw:layer="layout" svg:width="0.027cm" svg:height="0.026cm" svg:x="14.443cm" svg:y="19.956cm" svg:viewBox="0 0 28 27" draw:points="0,0 28,0 28,27 0,27">
          <text:p/>
        </draw:polygon>
        <draw:polygon draw:style-name="gr269" draw:text-style-name="P267" draw:layer="layout" svg:width="0.027cm" svg:height="0.026cm" svg:x="14.496cm" svg:y="19.956cm" svg:viewBox="0 0 28 27" draw:points="0,0 28,0 28,27 0,27">
          <text:p/>
        </draw:polygon>
        <draw:polygon draw:style-name="gr269" draw:text-style-name="P267" draw:layer="layout" svg:width="0.027cm" svg:height="0.026cm" svg:x="14.549cm" svg:y="19.956cm" svg:viewBox="0 0 28 27" draw:points="0,0 28,0 28,27 0,27">
          <text:p/>
        </draw:polygon>
        <draw:polygon draw:style-name="gr269" draw:text-style-name="P267" draw:layer="layout" svg:width="0.027cm" svg:height="0.026cm" svg:x="14.602cm" svg:y="19.956cm" svg:viewBox="0 0 28 27" draw:points="0,0 28,0 28,27 0,27">
          <text:p/>
        </draw:polygon>
        <draw:polygon draw:style-name="gr269" draw:text-style-name="P267" draw:layer="layout" svg:width="0.027cm" svg:height="0.026cm" svg:x="14.655cm" svg:y="19.956cm" svg:viewBox="0 0 28 27" draw:points="0,0 28,0 28,27 0,27">
          <text:p/>
        </draw:polygon>
        <draw:polygon draw:style-name="gr269" draw:text-style-name="P267" draw:layer="layout" svg:width="0.027cm" svg:height="0.026cm" svg:x="14.708cm" svg:y="19.956cm" svg:viewBox="0 0 28 27" draw:points="0,0 28,0 28,27 0,27">
          <text:p/>
        </draw:polygon>
        <draw:polygon draw:style-name="gr269" draw:text-style-name="P267" draw:layer="layout" svg:width="0.027cm" svg:height="0.026cm" svg:x="14.761cm" svg:y="19.956cm" svg:viewBox="0 0 28 27" draw:points="0,0 28,0 28,27 0,27">
          <text:p/>
        </draw:polygon>
        <draw:polygon draw:style-name="gr269" draw:text-style-name="P267" draw:layer="layout" svg:width="0.027cm" svg:height="0.026cm" svg:x="14.814cm" svg:y="19.956cm" svg:viewBox="0 0 28 27" draw:points="0,0 28,0 28,27 0,27">
          <text:p/>
        </draw:polygon>
        <draw:polygon draw:style-name="gr269" draw:text-style-name="P267" draw:layer="layout" svg:width="0.027cm" svg:height="0.026cm" svg:x="14.867cm" svg:y="19.956cm" svg:viewBox="0 0 28 27" draw:points="0,0 28,0 28,27 0,27">
          <text:p/>
        </draw:polygon>
        <draw:polygon draw:style-name="gr269" draw:text-style-name="P267" draw:layer="layout" svg:width="0.027cm" svg:height="0.026cm" svg:x="14.92cm" svg:y="19.956cm" svg:viewBox="0 0 28 27" draw:points="0,0 28,0 28,27 0,27">
          <text:p/>
        </draw:polygon>
        <draw:polygon draw:style-name="gr269" draw:text-style-name="P267" draw:layer="layout" svg:width="0.027cm" svg:height="0.026cm" svg:x="14.973cm" svg:y="19.956cm" svg:viewBox="0 0 28 27" draw:points="0,0 28,0 28,27 0,27">
          <text:p/>
        </draw:polygon>
        <draw:polygon draw:style-name="gr269" draw:text-style-name="P267" draw:layer="layout" svg:width="0.027cm" svg:height="0.026cm" svg:x="15.026cm" svg:y="19.956cm" svg:viewBox="0 0 28 27" draw:points="0,0 28,0 28,27 0,27">
          <text:p/>
        </draw:polygon>
        <draw:polygon draw:style-name="gr269" draw:text-style-name="P267" draw:layer="layout" svg:width="0.027cm" svg:height="0.026cm" svg:x="15.079cm" svg:y="19.956cm" svg:viewBox="0 0 28 27" draw:points="0,0 28,0 28,27 0,27">
          <text:p/>
        </draw:polygon>
        <draw:polygon draw:style-name="gr269" draw:text-style-name="P267" draw:layer="layout" svg:width="0.027cm" svg:height="0.026cm" svg:x="15.132cm" svg:y="19.956cm" svg:viewBox="0 0 28 27" draw:points="0,0 28,0 28,27 0,27">
          <text:p/>
        </draw:polygon>
        <draw:polygon draw:style-name="gr269" draw:text-style-name="P267" draw:layer="layout" svg:width="0.027cm" svg:height="0.026cm" svg:x="15.185cm" svg:y="19.956cm" svg:viewBox="0 0 28 27" draw:points="0,0 28,0 28,27 0,27">
          <text:p/>
        </draw:polygon>
        <draw:polygon draw:style-name="gr269" draw:text-style-name="P267" draw:layer="layout" svg:width="0.027cm" svg:height="0.026cm" svg:x="15.238cm" svg:y="19.956cm" svg:viewBox="0 0 28 27" draw:points="0,0 28,0 28,27 0,27">
          <text:p/>
        </draw:polygon>
        <draw:polygon draw:style-name="gr269" draw:text-style-name="P267" draw:layer="layout" svg:width="0.027cm" svg:height="0.026cm" svg:x="15.291cm" svg:y="19.956cm" svg:viewBox="0 0 28 27" draw:points="0,0 28,0 28,27 0,27">
          <text:p/>
        </draw:polygon>
        <draw:polygon draw:style-name="gr269" draw:text-style-name="P267" draw:layer="layout" svg:width="0.027cm" svg:height="0.026cm" svg:x="15.344cm" svg:y="19.956cm" svg:viewBox="0 0 28 27" draw:points="0,0 28,0 28,27 0,27">
          <text:p/>
        </draw:polygon>
        <draw:polygon draw:style-name="gr269" draw:text-style-name="P267" draw:layer="layout" svg:width="0.027cm" svg:height="0.026cm" svg:x="15.397cm" svg:y="19.956cm" svg:viewBox="0 0 28 27" draw:points="0,0 28,0 28,27 0,27">
          <text:p/>
        </draw:polygon>
        <draw:polygon draw:style-name="gr269" draw:text-style-name="P267" draw:layer="layout" svg:width="0.027cm" svg:height="0.026cm" svg:x="15.45cm" svg:y="19.956cm" svg:viewBox="0 0 28 27" draw:points="0,0 28,0 28,27 0,27">
          <text:p/>
        </draw:polygon>
        <draw:polygon draw:style-name="gr269" draw:text-style-name="P267" draw:layer="layout" svg:width="0.027cm" svg:height="0.026cm" svg:x="15.503cm" svg:y="19.956cm" svg:viewBox="0 0 28 27" draw:points="0,0 28,0 28,27 0,27">
          <text:p/>
        </draw:polygon>
        <draw:polygon draw:style-name="gr269" draw:text-style-name="P267" draw:layer="layout" svg:width="0.027cm" svg:height="0.026cm" svg:x="15.556cm" svg:y="19.956cm" svg:viewBox="0 0 28 27" draw:points="0,0 28,0 28,27 0,27">
          <text:p/>
        </draw:polygon>
        <draw:polygon draw:style-name="gr269" draw:text-style-name="P267" draw:layer="layout" svg:width="0.027cm" svg:height="0.026cm" svg:x="15.609cm" svg:y="19.956cm" svg:viewBox="0 0 28 27" draw:points="0,0 28,0 28,27 0,27">
          <text:p/>
        </draw:polygon>
        <draw:polygon draw:style-name="gr269" draw:text-style-name="P267" draw:layer="layout" svg:width="0.027cm" svg:height="0.026cm" svg:x="15.662cm" svg:y="19.956cm" svg:viewBox="0 0 28 27" draw:points="0,0 28,0 28,27 0,27">
          <text:p/>
        </draw:polygon>
        <draw:polygon draw:style-name="gr269" draw:text-style-name="P267" draw:layer="layout" svg:width="0.027cm" svg:height="0.026cm" svg:x="15.715cm" svg:y="19.956cm" svg:viewBox="0 0 28 27" draw:points="0,0 28,0 28,27 0,27">
          <text:p/>
        </draw:polygon>
        <draw:polygon draw:style-name="gr269" draw:text-style-name="P267" draw:layer="layout" svg:width="0.028cm" svg:height="0.026cm" svg:x="15.768cm" svg:y="19.956cm" svg:viewBox="0 0 29 27" draw:points="0,0 29,0 29,27 0,27">
          <text:p/>
        </draw:polygon>
        <draw:polygon draw:style-name="gr269" draw:text-style-name="P267" draw:layer="layout" svg:width="0.027cm" svg:height="0.026cm" svg:x="15.821cm" svg:y="19.956cm" svg:viewBox="0 0 28 27" draw:points="0,0 28,0 28,27 0,27">
          <text:p/>
        </draw:polygon>
        <draw:polygon draw:style-name="gr269" draw:text-style-name="P267" draw:layer="layout" svg:width="0.027cm" svg:height="0.026cm" svg:x="15.874cm" svg:y="19.956cm" svg:viewBox="0 0 28 27" draw:points="0,0 28,0 28,27 0,27">
          <text:p/>
        </draw:polygon>
        <draw:polygon draw:style-name="gr269" draw:text-style-name="P267" draw:layer="layout" svg:width="0.027cm" svg:height="0.026cm" svg:x="15.927cm" svg:y="19.956cm" svg:viewBox="0 0 28 27" draw:points="0,0 28,0 28,27 0,27">
          <text:p/>
        </draw:polygon>
        <draw:polygon draw:style-name="gr269" draw:text-style-name="P267" draw:layer="layout" svg:width="0.027cm" svg:height="0.026cm" svg:x="15.98cm" svg:y="19.956cm" svg:viewBox="0 0 28 27" draw:points="0,0 28,0 28,27 0,27">
          <text:p/>
        </draw:polygon>
        <draw:polygon draw:style-name="gr269" draw:text-style-name="P267" draw:layer="layout" svg:width="0.027cm" svg:height="0.026cm" svg:x="16.033cm" svg:y="19.956cm" svg:viewBox="0 0 28 27" draw:points="0,0 28,0 28,27 0,27">
          <text:p/>
        </draw:polygon>
        <draw:polygon draw:style-name="gr269" draw:text-style-name="P267" draw:layer="layout" svg:width="0.027cm" svg:height="0.026cm" svg:x="16.086cm" svg:y="19.956cm" svg:viewBox="0 0 28 27" draw:points="0,0 28,0 28,27 0,27">
          <text:p/>
        </draw:polygon>
        <draw:polygon draw:style-name="gr269" draw:text-style-name="P267" draw:layer="layout" svg:width="0.027cm" svg:height="0.026cm" svg:x="16.139cm" svg:y="19.956cm" svg:viewBox="0 0 28 27" draw:points="0,0 28,0 28,27 0,27">
          <text:p/>
        </draw:polygon>
        <draw:polygon draw:style-name="gr269" draw:text-style-name="P267" draw:layer="layout" svg:width="0.027cm" svg:height="0.026cm" svg:x="16.192cm" svg:y="19.956cm" svg:viewBox="0 0 28 27" draw:points="0,0 28,0 28,27 0,27">
          <text:p/>
        </draw:polygon>
        <draw:polygon draw:style-name="gr269" draw:text-style-name="P267" draw:layer="layout" svg:width="0.027cm" svg:height="0.026cm" svg:x="16.245cm" svg:y="19.956cm" svg:viewBox="0 0 28 27" draw:points="0,0 28,0 28,27 0,27">
          <text:p/>
        </draw:polygon>
        <draw:polygon draw:style-name="gr269" draw:text-style-name="P267" draw:layer="layout" svg:width="0.027cm" svg:height="0.026cm" svg:x="16.298cm" svg:y="19.956cm" svg:viewBox="0 0 28 27" draw:points="0,0 28,0 28,27 0,27">
          <text:p/>
        </draw:polygon>
        <draw:polygon draw:style-name="gr269" draw:text-style-name="P267" draw:layer="layout" svg:width="0.027cm" svg:height="0.026cm" svg:x="16.351cm" svg:y="19.956cm" svg:viewBox="0 0 28 27" draw:points="0,0 28,0 28,27 0,27">
          <text:p/>
        </draw:polygon>
        <draw:polygon draw:style-name="gr269" draw:text-style-name="P267" draw:layer="layout" svg:width="0.027cm" svg:height="0.026cm" svg:x="16.404cm" svg:y="19.956cm" svg:viewBox="0 0 28 27" draw:points="0,0 28,0 28,27 0,27">
          <text:p/>
        </draw:polygon>
        <draw:polygon draw:style-name="gr269" draw:text-style-name="P267" draw:layer="layout" svg:width="0.027cm" svg:height="0.026cm" svg:x="16.457cm" svg:y="19.956cm" svg:viewBox="0 0 28 27" draw:points="0,0 28,0 28,27 0,27">
          <text:p/>
        </draw:polygon>
        <draw:polygon draw:style-name="gr269" draw:text-style-name="P267" draw:layer="layout" svg:width="0.027cm" svg:height="0.026cm" svg:x="16.51cm" svg:y="19.956cm" svg:viewBox="0 0 28 27" draw:points="0,0 28,0 28,27 0,27">
          <text:p/>
        </draw:polygon>
        <draw:polygon draw:style-name="gr269" draw:text-style-name="P267" draw:layer="layout" svg:width="0.027cm" svg:height="0.026cm" svg:x="16.563cm" svg:y="19.956cm" svg:viewBox="0 0 28 27" draw:points="0,0 28,0 28,27 0,27">
          <text:p/>
        </draw:polygon>
        <draw:polygon draw:style-name="gr269" draw:text-style-name="P267" draw:layer="layout" svg:width="0.027cm" svg:height="0.026cm" svg:x="16.616cm" svg:y="19.956cm" svg:viewBox="0 0 28 27" draw:points="0,0 28,0 28,27 0,27">
          <text:p/>
        </draw:polygon>
        <draw:polygon draw:style-name="gr269" draw:text-style-name="P267" draw:layer="layout" svg:width="0.027cm" svg:height="0.026cm" svg:x="16.669cm" svg:y="19.956cm" svg:viewBox="0 0 28 27" draw:points="0,0 28,0 28,27 0,27">
          <text:p/>
        </draw:polygon>
        <draw:polygon draw:style-name="gr269" draw:text-style-name="P267" draw:layer="layout" svg:width="0.027cm" svg:height="0.026cm" svg:x="16.722cm" svg:y="19.956cm" svg:viewBox="0 0 28 27" draw:points="0,0 28,0 28,27 0,27">
          <text:p/>
        </draw:polygon>
        <draw:polygon draw:style-name="gr269" draw:text-style-name="P267" draw:layer="layout" svg:width="0.027cm" svg:height="0.026cm" svg:x="16.775cm" svg:y="19.956cm" svg:viewBox="0 0 28 27" draw:points="0,0 28,0 28,27 0,27">
          <text:p/>
        </draw:polygon>
        <draw:polygon draw:style-name="gr269" draw:text-style-name="P267" draw:layer="layout" svg:width="0.027cm" svg:height="0.026cm" svg:x="16.828cm" svg:y="19.956cm" svg:viewBox="0 0 28 27" draw:points="0,0 28,0 28,27 0,27">
          <text:p/>
        </draw:polygon>
        <draw:polygon draw:style-name="gr269" draw:text-style-name="P267" draw:layer="layout" svg:width="0.027cm" svg:height="0.026cm" svg:x="16.881cm" svg:y="19.956cm" svg:viewBox="0 0 28 27" draw:points="0,0 28,0 28,27 0,27">
          <text:p/>
        </draw:polygon>
        <draw:polygon draw:style-name="gr269" draw:text-style-name="P267" draw:layer="layout" svg:width="0.027cm" svg:height="0.026cm" svg:x="16.934cm" svg:y="19.956cm" svg:viewBox="0 0 28 27" draw:points="0,0 28,0 28,27 0,27">
          <text:p/>
        </draw:polygon>
        <draw:polygon draw:style-name="gr269" draw:text-style-name="P267" draw:layer="layout" svg:width="0.027cm" svg:height="0.026cm" svg:x="16.987cm" svg:y="19.956cm" svg:viewBox="0 0 28 27" draw:points="0,0 28,0 28,27 0,27">
          <text:p/>
        </draw:polygon>
        <draw:polygon draw:style-name="gr269" draw:text-style-name="P267" draw:layer="layout" svg:width="0.027cm" svg:height="0.026cm" svg:x="17.04cm" svg:y="19.956cm" svg:viewBox="0 0 28 27" draw:points="0,0 28,0 28,27 0,27">
          <text:p/>
        </draw:polygon>
        <draw:polygon draw:style-name="gr269" draw:text-style-name="P267" draw:layer="layout" svg:width="0.027cm" svg:height="0.026cm" svg:x="17.093cm" svg:y="19.956cm" svg:viewBox="0 0 28 27" draw:points="0,0 28,0 28,27 0,27">
          <text:p/>
        </draw:polygon>
        <draw:polygon draw:style-name="gr269" draw:text-style-name="P267" draw:layer="layout" svg:width="0.028cm" svg:height="0.026cm" svg:x="17.146cm" svg:y="19.956cm" svg:viewBox="0 0 29 27" draw:points="0,0 29,0 29,27 0,27">
          <text:p/>
        </draw:polygon>
        <draw:polygon draw:style-name="gr269" draw:text-style-name="P267" draw:layer="layout" svg:width="0.027cm" svg:height="0.026cm" svg:x="17.199cm" svg:y="19.956cm" svg:viewBox="0 0 28 27" draw:points="0,0 28,0 28,27 0,27">
          <text:p/>
        </draw:polygon>
        <draw:polygon draw:style-name="gr269" draw:text-style-name="P267" draw:layer="layout" svg:width="0.027cm" svg:height="0.026cm" svg:x="17.252cm" svg:y="19.956cm" svg:viewBox="0 0 28 27" draw:points="0,0 28,0 28,27 0,27">
          <text:p/>
        </draw:polygon>
        <draw:polygon draw:style-name="gr269" draw:text-style-name="P267" draw:layer="layout" svg:width="0.027cm" svg:height="0.026cm" svg:x="17.305cm" svg:y="19.956cm" svg:viewBox="0 0 28 27" draw:points="0,0 28,0 28,27 0,27">
          <text:p/>
        </draw:polygon>
        <draw:polygon draw:style-name="gr269" draw:text-style-name="P267" draw:layer="layout" svg:width="0.027cm" svg:height="0.026cm" svg:x="17.358cm" svg:y="19.956cm" svg:viewBox="0 0 28 27" draw:points="0,0 28,0 28,27 0,27">
          <text:p/>
        </draw:polygon>
        <draw:polygon draw:style-name="gr269" draw:text-style-name="P267" draw:layer="layout" svg:width="0.027cm" svg:height="0.026cm" svg:x="17.411cm" svg:y="19.956cm" svg:viewBox="0 0 28 27" draw:points="0,0 28,0 28,27 0,27">
          <text:p/>
        </draw:polygon>
        <draw:polygon draw:style-name="gr269" draw:text-style-name="P267" draw:layer="layout" svg:width="0.027cm" svg:height="0.026cm" svg:x="17.464cm" svg:y="19.956cm" svg:viewBox="0 0 28 27" draw:points="0,0 28,0 28,27 0,27">
          <text:p/>
        </draw:polygon>
        <draw:polygon draw:style-name="gr269" draw:text-style-name="P267" draw:layer="layout" svg:width="0.027cm" svg:height="0.026cm" svg:x="17.517cm" svg:y="19.956cm" svg:viewBox="0 0 28 27" draw:points="0,0 28,0 28,27 0,27">
          <text:p/>
        </draw:polygon>
        <draw:polygon draw:style-name="gr269" draw:text-style-name="P267" draw:layer="layout" svg:width="0.027cm" svg:height="0.026cm" svg:x="17.57cm" svg:y="19.956cm" svg:viewBox="0 0 28 27" draw:points="0,0 28,0 28,27 0,27">
          <text:p/>
        </draw:polygon>
        <draw:polygon draw:style-name="gr269" draw:text-style-name="P267" draw:layer="layout" svg:width="0.027cm" svg:height="0.026cm" svg:x="17.623cm" svg:y="19.956cm" svg:viewBox="0 0 28 27" draw:points="0,0 28,0 28,27 0,27">
          <text:p/>
        </draw:polygon>
        <draw:polygon draw:style-name="gr269" draw:text-style-name="P267" draw:layer="layout" svg:width="0.027cm" svg:height="0.026cm" svg:x="17.676cm" svg:y="19.956cm" svg:viewBox="0 0 28 27" draw:points="0,0 28,0 28,27 0,27">
          <text:p/>
        </draw:polygon>
        <draw:polygon draw:style-name="gr269" draw:text-style-name="P267" draw:layer="layout" svg:width="0.027cm" svg:height="0.026cm" svg:x="17.729cm" svg:y="19.956cm" svg:viewBox="0 0 28 27" draw:points="0,0 28,0 28,27 0,27">
          <text:p/>
        </draw:polygon>
        <draw:polygon draw:style-name="gr269" draw:text-style-name="P267" draw:layer="layout" svg:width="0.027cm" svg:height="0.026cm" svg:x="17.782cm" svg:y="19.956cm" svg:viewBox="0 0 28 27" draw:points="0,0 28,0 28,27 0,27">
          <text:p/>
        </draw:polygon>
        <draw:polygon draw:style-name="gr269" draw:text-style-name="P267" draw:layer="layout" svg:width="0.027cm" svg:height="0.026cm" svg:x="17.835cm" svg:y="19.956cm" svg:viewBox="0 0 28 27" draw:points="0,0 28,0 28,27 0,27">
          <text:p/>
        </draw:polygon>
        <draw:polygon draw:style-name="gr269" draw:text-style-name="P267" draw:layer="layout" svg:width="0.027cm" svg:height="0.026cm" svg:x="17.888cm" svg:y="19.956cm" svg:viewBox="0 0 28 27" draw:points="0,0 28,0 28,27 0,27">
          <text:p/>
        </draw:polygon>
        <draw:polygon draw:style-name="gr269" draw:text-style-name="P267" draw:layer="layout" svg:width="0.027cm" svg:height="0.026cm" svg:x="17.941cm" svg:y="19.956cm" svg:viewBox="0 0 28 27" draw:points="0,0 28,0 28,27 0,27">
          <text:p/>
        </draw:polygon>
        <draw:polygon draw:style-name="gr269" draw:text-style-name="P267" draw:layer="layout" svg:width="0.027cm" svg:height="0.026cm" svg:x="17.994cm" svg:y="19.956cm" svg:viewBox="0 0 28 27" draw:points="0,0 28,0 28,27 0,27">
          <text:p/>
        </draw:polygon>
        <draw:polygon draw:style-name="gr269" draw:text-style-name="P267" draw:layer="layout" svg:width="0.027cm" svg:height="0.026cm" svg:x="18.047cm" svg:y="19.956cm" svg:viewBox="0 0 28 27" draw:points="0,0 28,0 28,27 0,27">
          <text:p/>
        </draw:polygon>
        <draw:polygon draw:style-name="gr269" draw:text-style-name="P267" draw:layer="layout" svg:width="0.027cm" svg:height="0.026cm" svg:x="18.1cm" svg:y="19.956cm" svg:viewBox="0 0 28 27" draw:points="0,0 28,0 28,27 0,27">
          <text:p/>
        </draw:polygon>
        <draw:polygon draw:style-name="gr269" draw:text-style-name="P267" draw:layer="layout" svg:width="0.027cm" svg:height="0.026cm" svg:x="18.153cm" svg:y="19.956cm" svg:viewBox="0 0 28 27" draw:points="0,0 28,0 28,27 0,27">
          <text:p/>
        </draw:polygon>
        <draw:polygon draw:style-name="gr269" draw:text-style-name="P267" draw:layer="layout" svg:width="0.027cm" svg:height="0.026cm" svg:x="18.206cm" svg:y="19.956cm" svg:viewBox="0 0 28 27" draw:points="0,0 28,0 28,27 0,27">
          <text:p/>
        </draw:polygon>
        <draw:polygon draw:style-name="gr269" draw:text-style-name="P267" draw:layer="layout" svg:width="0.027cm" svg:height="0.026cm" svg:x="18.259cm" svg:y="19.956cm" svg:viewBox="0 0 28 27" draw:points="0,0 28,0 28,27 0,27">
          <text:p/>
        </draw:polygon>
        <draw:polygon draw:style-name="gr269" draw:text-style-name="P267" draw:layer="layout" svg:width="0.027cm" svg:height="0.026cm" svg:x="18.312cm" svg:y="19.956cm" svg:viewBox="0 0 28 27" draw:points="0,0 28,0 28,27 0,27">
          <text:p/>
        </draw:polygon>
        <draw:polygon draw:style-name="gr269" draw:text-style-name="P267" draw:layer="layout" svg:width="0.027cm" svg:height="0.026cm" svg:x="18.365cm" svg:y="19.956cm" svg:viewBox="0 0 28 27" draw:points="0,0 28,0 28,27 0,27">
          <text:p/>
        </draw:polygon>
        <draw:polygon draw:style-name="gr269" draw:text-style-name="P267" draw:layer="layout" svg:width="0.027cm" svg:height="0.026cm" svg:x="18.418cm" svg:y="19.956cm" svg:viewBox="0 0 28 27" draw:points="0,0 28,0 28,27 0,27">
          <text:p/>
        </draw:polygon>
        <draw:polygon draw:style-name="gr269" draw:text-style-name="P267" draw:layer="layout" svg:width="0.027cm" svg:height="0.026cm" svg:x="18.471cm" svg:y="19.956cm" svg:viewBox="0 0 28 27" draw:points="0,0 28,0 28,27 0,27">
          <text:p/>
        </draw:polygon>
        <draw:polygon draw:style-name="gr269" draw:text-style-name="P267" draw:layer="layout" svg:width="0.028cm" svg:height="0.026cm" svg:x="18.524cm" svg:y="19.956cm" svg:viewBox="0 0 29 27" draw:points="0,0 29,0 29,27 0,27">
          <text:p/>
        </draw:polygon>
        <draw:polygon draw:style-name="gr269" draw:text-style-name="P267" draw:layer="layout" svg:width="0.027cm" svg:height="0.026cm" svg:x="18.577cm" svg:y="19.956cm" svg:viewBox="0 0 28 27" draw:points="0,0 28,0 28,27 0,27">
          <text:p/>
        </draw:polygon>
        <draw:polygon draw:style-name="gr269" draw:text-style-name="P267" draw:layer="layout" svg:width="0.027cm" svg:height="0.026cm" svg:x="18.63cm" svg:y="19.956cm" svg:viewBox="0 0 28 27" draw:points="0,0 28,0 28,27 0,27">
          <text:p/>
        </draw:polygon>
        <draw:polygon draw:style-name="gr269" draw:text-style-name="P267" draw:layer="layout" svg:width="0.027cm" svg:height="0.026cm" svg:x="18.683cm" svg:y="19.956cm" svg:viewBox="0 0 28 27" draw:points="0,0 28,0 28,27 0,27">
          <text:p/>
        </draw:polygon>
        <draw:polygon draw:style-name="gr269" draw:text-style-name="P267" draw:layer="layout" svg:width="0.027cm" svg:height="0.026cm" svg:x="18.736cm" svg:y="19.956cm" svg:viewBox="0 0 28 27" draw:points="0,0 28,0 28,27 0,27">
          <text:p/>
        </draw:polygon>
        <draw:polygon draw:style-name="gr269" draw:text-style-name="P267" draw:layer="layout" svg:width="0.027cm" svg:height="0.026cm" svg:x="18.789cm" svg:y="19.956cm" svg:viewBox="0 0 28 27" draw:points="0,0 28,0 28,27 0,27">
          <text:p/>
        </draw:polygon>
        <draw:polygon draw:style-name="gr269" draw:text-style-name="P267" draw:layer="layout" svg:width="0.027cm" svg:height="0.026cm" svg:x="18.842cm" svg:y="19.956cm" svg:viewBox="0 0 28 27" draw:points="0,0 28,0 28,27 0,27">
          <text:p/>
        </draw:polygon>
        <draw:polygon draw:style-name="gr269" draw:text-style-name="P267" draw:layer="layout" svg:width="0.027cm" svg:height="0.026cm" svg:x="18.895cm" svg:y="19.956cm" svg:viewBox="0 0 28 27" draw:points="0,0 28,0 28,27 0,27">
          <text:p/>
        </draw:polygon>
        <draw:polygon draw:style-name="gr269" draw:text-style-name="P267" draw:layer="layout" svg:width="0.027cm" svg:height="0.026cm" svg:x="18.948cm" svg:y="19.956cm" svg:viewBox="0 0 28 27" draw:points="0,0 28,0 28,27 0,27">
          <text:p/>
        </draw:polygon>
        <draw:polygon draw:style-name="gr269" draw:text-style-name="P267" draw:layer="layout" svg:width="0.027cm" svg:height="0.026cm" svg:x="19.001cm" svg:y="19.956cm" svg:viewBox="0 0 28 27" draw:points="0,0 28,0 28,27 0,27">
          <text:p/>
        </draw:polygon>
        <draw:polygon draw:style-name="gr269" draw:text-style-name="P267" draw:layer="layout" svg:width="0.053cm" svg:height="0.026cm" svg:x="2.014cm" svg:y="20.963cm" svg:viewBox="0 0 54 27" draw:points="0,0 54,0 54,27 0,27">
          <text:p/>
        </draw:polygon>
        <draw:polygon draw:style-name="gr269" draw:text-style-name="P267" draw:layer="layout" svg:width="0.027cm" svg:height="0.026cm" svg:x="2.093cm" svg:y="20.963cm" svg:viewBox="0 0 28 27" draw:points="0,0 28,0 28,27 0,27">
          <text:p/>
        </draw:polygon>
        <draw:polygon draw:style-name="gr269" draw:text-style-name="P267" draw:layer="layout" svg:width="0.027cm" svg:height="0.026cm" svg:x="2.146cm" svg:y="20.963cm" svg:viewBox="0 0 28 27" draw:points="0,0 28,0 28,27 0,27">
          <text:p/>
        </draw:polygon>
        <draw:polygon draw:style-name="gr269" draw:text-style-name="P267" draw:layer="layout" svg:width="0.027cm" svg:height="0.026cm" svg:x="2.199cm" svg:y="20.963cm" svg:viewBox="0 0 28 27" draw:points="0,0 28,0 28,27 0,27">
          <text:p/>
        </draw:polygon>
        <draw:polygon draw:style-name="gr269" draw:text-style-name="P267" draw:layer="layout" svg:width="0.027cm" svg:height="0.026cm" svg:x="2.252cm" svg:y="20.963cm" svg:viewBox="0 0 28 27" draw:points="0,0 28,0 28,27 0,27">
          <text:p/>
        </draw:polygon>
        <draw:polygon draw:style-name="gr269" draw:text-style-name="P267" draw:layer="layout" svg:width="0.027cm" svg:height="0.026cm" svg:x="2.305cm" svg:y="20.963cm" svg:viewBox="0 0 28 27" draw:points="0,0 28,0 28,27 0,27">
          <text:p/>
        </draw:polygon>
        <draw:polygon draw:style-name="gr269" draw:text-style-name="P267" draw:layer="layout" svg:width="0.027cm" svg:height="0.026cm" svg:x="2.358cm" svg:y="20.963cm" svg:viewBox="0 0 28 27" draw:points="0,0 28,0 28,27 0,27">
          <text:p/>
        </draw:polygon>
        <draw:polygon draw:style-name="gr269" draw:text-style-name="P267" draw:layer="layout" svg:width="0.027cm" svg:height="0.026cm" svg:x="2.411cm" svg:y="20.963cm" svg:viewBox="0 0 28 27" draw:points="0,0 28,0 28,27 0,27">
          <text:p/>
        </draw:polygon>
        <draw:polygon draw:style-name="gr269" draw:text-style-name="P267" draw:layer="layout" svg:width="0.027cm" svg:height="0.026cm" svg:x="2.464cm" svg:y="20.963cm" svg:viewBox="0 0 28 27" draw:points="0,0 28,0 28,27 0,27">
          <text:p/>
        </draw:polygon>
        <draw:polygon draw:style-name="gr269" draw:text-style-name="P267" draw:layer="layout" svg:width="0.027cm" svg:height="0.026cm" svg:x="2.517cm" svg:y="20.963cm" svg:viewBox="0 0 28 27" draw:points="0,0 28,0 28,27 0,27">
          <text:p/>
        </draw:polygon>
        <draw:polygon draw:style-name="gr269" draw:text-style-name="P267" draw:layer="layout" svg:width="0.027cm" svg:height="0.026cm" svg:x="2.57cm" svg:y="20.963cm" svg:viewBox="0 0 28 27" draw:points="0,0 28,0 28,27 0,27">
          <text:p/>
        </draw:polygon>
        <draw:polygon draw:style-name="gr269" draw:text-style-name="P267" draw:layer="layout" svg:width="0.027cm" svg:height="0.026cm" svg:x="2.623cm" svg:y="20.963cm" svg:viewBox="0 0 28 27" draw:points="0,0 28,0 28,27 0,27">
          <text:p/>
        </draw:polygon>
        <draw:polygon draw:style-name="gr269" draw:text-style-name="P267" draw:layer="layout" svg:width="0.027cm" svg:height="0.026cm" svg:x="2.676cm" svg:y="20.963cm" svg:viewBox="0 0 28 27" draw:points="0,0 28,0 28,27 0,27">
          <text:p/>
        </draw:polygon>
        <draw:polygon draw:style-name="gr269" draw:text-style-name="P267" draw:layer="layout" svg:width="0.027cm" svg:height="0.026cm" svg:x="2.729cm" svg:y="20.963cm" svg:viewBox="0 0 28 27" draw:points="0,0 28,0 28,27 0,27">
          <text:p/>
        </draw:polygon>
        <draw:polygon draw:style-name="gr269" draw:text-style-name="P267" draw:layer="layout" svg:width="0.027cm" svg:height="0.026cm" svg:x="2.782cm" svg:y="20.963cm" svg:viewBox="0 0 28 27" draw:points="0,0 28,0 28,27 0,27">
          <text:p/>
        </draw:polygon>
        <draw:polygon draw:style-name="gr269" draw:text-style-name="P267" draw:layer="layout" svg:width="0.027cm" svg:height="0.026cm" svg:x="2.835cm" svg:y="20.963cm" svg:viewBox="0 0 28 27" draw:points="0,0 28,0 28,27 0,27">
          <text:p/>
        </draw:polygon>
        <draw:polygon draw:style-name="gr269" draw:text-style-name="P267" draw:layer="layout" svg:width="0.027cm" svg:height="0.026cm" svg:x="2.888cm" svg:y="20.963cm" svg:viewBox="0 0 28 27" draw:points="0,0 28,0 28,27 0,27">
          <text:p/>
        </draw:polygon>
        <draw:polygon draw:style-name="gr269" draw:text-style-name="P267" draw:layer="layout" svg:width="0.027cm" svg:height="0.026cm" svg:x="2.941cm" svg:y="20.963cm" svg:viewBox="0 0 28 27" draw:points="0,0 28,0 28,27 0,27">
          <text:p/>
        </draw:polygon>
        <draw:polygon draw:style-name="gr269" draw:text-style-name="P267" draw:layer="layout" svg:width="0.027cm" svg:height="0.026cm" svg:x="2.994cm" svg:y="20.963cm" svg:viewBox="0 0 28 27" draw:points="0,0 28,0 28,27 0,27">
          <text:p/>
        </draw:polygon>
        <draw:polygon draw:style-name="gr269" draw:text-style-name="P267" draw:layer="layout" svg:width="0.027cm" svg:height="0.026cm" svg:x="3.047cm" svg:y="20.963cm" svg:viewBox="0 0 28 27" draw:points="0,0 28,0 28,27 0,27">
          <text:p/>
        </draw:polygon>
        <draw:polygon draw:style-name="gr269" draw:text-style-name="P267" draw:layer="layout" svg:width="0.027cm" svg:height="0.026cm" svg:x="3.1cm" svg:y="20.963cm" svg:viewBox="0 0 28 27" draw:points="0,0 28,0 28,27 0,27">
          <text:p/>
        </draw:polygon>
        <draw:polygon draw:style-name="gr269" draw:text-style-name="P267" draw:layer="layout" svg:width="0.027cm" svg:height="0.026cm" svg:x="3.153cm" svg:y="20.963cm" svg:viewBox="0 0 28 27" draw:points="0,0 28,0 28,27 0,27">
          <text:p/>
        </draw:polygon>
        <draw:polygon draw:style-name="gr269" draw:text-style-name="P267" draw:layer="layout" svg:width="0.027cm" svg:height="0.026cm" svg:x="3.206cm" svg:y="20.963cm" svg:viewBox="0 0 28 27" draw:points="0,0 28,0 28,27 0,27">
          <text:p/>
        </draw:polygon>
        <draw:polygon draw:style-name="gr269" draw:text-style-name="P267" draw:layer="layout" svg:width="0.027cm" svg:height="0.026cm" svg:x="3.259cm" svg:y="20.963cm" svg:viewBox="0 0 28 27" draw:points="0,0 28,0 28,27 0,27">
          <text:p/>
        </draw:polygon>
        <draw:polygon draw:style-name="gr269" draw:text-style-name="P267" draw:layer="layout" svg:width="0.027cm" svg:height="0.026cm" svg:x="3.312cm" svg:y="20.963cm" svg:viewBox="0 0 28 27" draw:points="0,0 28,0 28,27 0,27">
          <text:p/>
        </draw:polygon>
        <draw:polygon draw:style-name="gr269" draw:text-style-name="P267" draw:layer="layout" svg:width="0.027cm" svg:height="0.026cm" svg:x="3.365cm" svg:y="20.963cm" svg:viewBox="0 0 28 27" draw:points="0,0 28,0 28,27 0,27">
          <text:p/>
        </draw:polygon>
        <draw:polygon draw:style-name="gr269" draw:text-style-name="P267" draw:layer="layout" svg:width="0.028cm" svg:height="0.026cm" svg:x="3.418cm" svg:y="20.963cm" svg:viewBox="0 0 29 27" draw:points="0,0 29,0 29,27 0,27">
          <text:p/>
        </draw:polygon>
        <draw:polygon draw:style-name="gr269" draw:text-style-name="P267" draw:layer="layout" svg:width="0.027cm" svg:height="0.026cm" svg:x="3.471cm" svg:y="20.963cm" svg:viewBox="0 0 28 27" draw:points="0,0 28,0 28,27 0,27">
          <text:p/>
        </draw:polygon>
        <draw:polygon draw:style-name="gr269" draw:text-style-name="P267" draw:layer="layout" svg:width="0.027cm" svg:height="0.026cm" svg:x="3.524cm" svg:y="20.963cm" svg:viewBox="0 0 28 27" draw:points="0,0 28,0 28,27 0,27">
          <text:p/>
        </draw:polygon>
        <draw:polygon draw:style-name="gr269" draw:text-style-name="P267" draw:layer="layout" svg:width="0.027cm" svg:height="0.026cm" svg:x="3.577cm" svg:y="20.963cm" svg:viewBox="0 0 28 27" draw:points="0,0 28,0 28,27 0,27">
          <text:p/>
        </draw:polygon>
        <draw:polygon draw:style-name="gr269" draw:text-style-name="P267" draw:layer="layout" svg:width="0.027cm" svg:height="0.026cm" svg:x="3.63cm" svg:y="20.963cm" svg:viewBox="0 0 28 27" draw:points="0,0 28,0 28,27 0,27">
          <text:p/>
        </draw:polygon>
        <draw:polygon draw:style-name="gr269" draw:text-style-name="P267" draw:layer="layout" svg:width="0.027cm" svg:height="0.026cm" svg:x="3.683cm" svg:y="20.963cm" svg:viewBox="0 0 28 27" draw:points="0,0 28,0 28,27 0,27">
          <text:p/>
        </draw:polygon>
        <draw:polygon draw:style-name="gr269" draw:text-style-name="P267" draw:layer="layout" svg:width="0.027cm" svg:height="0.026cm" svg:x="3.736cm" svg:y="20.963cm" svg:viewBox="0 0 28 27" draw:points="0,0 28,0 28,27 0,27">
          <text:p/>
        </draw:polygon>
        <draw:polygon draw:style-name="gr269" draw:text-style-name="P267" draw:layer="layout" svg:width="0.027cm" svg:height="0.026cm" svg:x="3.789cm" svg:y="20.963cm" svg:viewBox="0 0 28 27" draw:points="0,0 28,0 28,27 0,27">
          <text:p/>
        </draw:polygon>
        <draw:polygon draw:style-name="gr269" draw:text-style-name="P267" draw:layer="layout" svg:width="0.027cm" svg:height="0.026cm" svg:x="3.842cm" svg:y="20.963cm" svg:viewBox="0 0 28 27" draw:points="0,0 28,0 28,27 0,27">
          <text:p/>
        </draw:polygon>
        <draw:polygon draw:style-name="gr269" draw:text-style-name="P267" draw:layer="layout" svg:width="0.027cm" svg:height="0.026cm" svg:x="3.895cm" svg:y="20.963cm" svg:viewBox="0 0 28 27" draw:points="0,0 28,0 28,27 0,27">
          <text:p/>
        </draw:polygon>
        <draw:polygon draw:style-name="gr269" draw:text-style-name="P267" draw:layer="layout" svg:width="0.027cm" svg:height="0.026cm" svg:x="3.948cm" svg:y="20.963cm" svg:viewBox="0 0 28 27" draw:points="0,0 28,0 28,27 0,27">
          <text:p/>
        </draw:polygon>
        <draw:polygon draw:style-name="gr269" draw:text-style-name="P267" draw:layer="layout" svg:width="0.027cm" svg:height="0.026cm" svg:x="4.001cm" svg:y="20.963cm" svg:viewBox="0 0 28 27" draw:points="0,0 28,0 28,27 0,27">
          <text:p/>
        </draw:polygon>
        <draw:polygon draw:style-name="gr269" draw:text-style-name="P267" draw:layer="layout" svg:width="0.027cm" svg:height="0.026cm" svg:x="4.054cm" svg:y="20.963cm" svg:viewBox="0 0 28 27" draw:points="0,0 28,0 28,27 0,27">
          <text:p/>
        </draw:polygon>
        <draw:polygon draw:style-name="gr269" draw:text-style-name="P267" draw:layer="layout" svg:width="0.027cm" svg:height="0.026cm" svg:x="4.107cm" svg:y="20.963cm" svg:viewBox="0 0 28 27" draw:points="0,0 28,0 28,27 0,27">
          <text:p/>
        </draw:polygon>
        <draw:polygon draw:style-name="gr269" draw:text-style-name="P267" draw:layer="layout" svg:width="0.027cm" svg:height="0.026cm" svg:x="4.16cm" svg:y="20.963cm" svg:viewBox="0 0 28 27" draw:points="0,0 28,0 28,27 0,27">
          <text:p/>
        </draw:polygon>
        <draw:polygon draw:style-name="gr269" draw:text-style-name="P267" draw:layer="layout" svg:width="0.027cm" svg:height="0.026cm" svg:x="4.213cm" svg:y="20.963cm" svg:viewBox="0 0 28 27" draw:points="0,0 28,0 28,27 0,27">
          <text:p/>
        </draw:polygon>
        <draw:polygon draw:style-name="gr269" draw:text-style-name="P267" draw:layer="layout" svg:width="0.027cm" svg:height="0.026cm" svg:x="4.266cm" svg:y="20.963cm" svg:viewBox="0 0 28 27" draw:points="0,0 28,0 28,27 0,27">
          <text:p/>
        </draw:polygon>
        <draw:polygon draw:style-name="gr269" draw:text-style-name="P267" draw:layer="layout" svg:width="0.027cm" svg:height="0.026cm" svg:x="4.319cm" svg:y="20.963cm" svg:viewBox="0 0 28 27" draw:points="0,0 28,0 28,27 0,27">
          <text:p/>
        </draw:polygon>
        <draw:polygon draw:style-name="gr269" draw:text-style-name="P267" draw:layer="layout" svg:width="0.027cm" svg:height="0.026cm" svg:x="4.372cm" svg:y="20.963cm" svg:viewBox="0 0 28 27" draw:points="0,0 28,0 28,27 0,27">
          <text:p/>
        </draw:polygon>
        <draw:polygon draw:style-name="gr269" draw:text-style-name="P267" draw:layer="layout" svg:width="0.027cm" svg:height="0.026cm" svg:x="4.425cm" svg:y="20.963cm" svg:viewBox="0 0 28 27" draw:points="0,0 28,0 28,27 0,27">
          <text:p/>
        </draw:polygon>
        <draw:polygon draw:style-name="gr269" draw:text-style-name="P267" draw:layer="layout" svg:width="0.027cm" svg:height="0.026cm" svg:x="4.478cm" svg:y="20.963cm" svg:viewBox="0 0 28 27" draw:points="0,0 28,0 28,27 0,27">
          <text:p/>
        </draw:polygon>
        <draw:polygon draw:style-name="gr269" draw:text-style-name="P267" draw:layer="layout" svg:width="0.027cm" svg:height="0.026cm" svg:x="4.531cm" svg:y="20.963cm" svg:viewBox="0 0 28 27" draw:points="0,0 28,0 28,27 0,27">
          <text:p/>
        </draw:polygon>
        <draw:polygon draw:style-name="gr269" draw:text-style-name="P267" draw:layer="layout" svg:width="0.027cm" svg:height="0.026cm" svg:x="4.584cm" svg:y="20.963cm" svg:viewBox="0 0 28 27" draw:points="0,0 28,0 28,27 0,27">
          <text:p/>
        </draw:polygon>
        <draw:polygon draw:style-name="gr269" draw:text-style-name="P267" draw:layer="layout" svg:width="0.027cm" svg:height="0.026cm" svg:x="4.637cm" svg:y="20.963cm" svg:viewBox="0 0 28 27" draw:points="0,0 28,0 28,27 0,27">
          <text:p/>
        </draw:polygon>
        <draw:polygon draw:style-name="gr269" draw:text-style-name="P267" draw:layer="layout" svg:width="0.027cm" svg:height="0.026cm" svg:x="4.69cm" svg:y="20.963cm" svg:viewBox="0 0 28 27" draw:points="0,0 28,0 28,27 0,27">
          <text:p/>
        </draw:polygon>
        <draw:polygon draw:style-name="gr269" draw:text-style-name="P267" draw:layer="layout" svg:width="0.027cm" svg:height="0.026cm" svg:x="4.743cm" svg:y="20.963cm" svg:viewBox="0 0 28 27" draw:points="0,0 28,0 28,27 0,27">
          <text:p/>
        </draw:polygon>
        <draw:polygon draw:style-name="gr269" draw:text-style-name="P267" draw:layer="layout" svg:width="0.028cm" svg:height="0.026cm" svg:x="4.796cm" svg:y="20.963cm" svg:viewBox="0 0 29 27" draw:points="0,0 29,0 29,27 0,27">
          <text:p/>
        </draw:polygon>
        <draw:polygon draw:style-name="gr269" draw:text-style-name="P267" draw:layer="layout" svg:width="0.027cm" svg:height="0.026cm" svg:x="4.849cm" svg:y="20.963cm" svg:viewBox="0 0 28 27" draw:points="0,0 28,0 28,27 0,27">
          <text:p/>
        </draw:polygon>
        <draw:polygon draw:style-name="gr269" draw:text-style-name="P267" draw:layer="layout" svg:width="0.027cm" svg:height="0.026cm" svg:x="4.902cm" svg:y="20.963cm" svg:viewBox="0 0 28 27" draw:points="0,0 28,0 28,27 0,27">
          <text:p/>
        </draw:polygon>
        <draw:polygon draw:style-name="gr269" draw:text-style-name="P267" draw:layer="layout" svg:width="0.027cm" svg:height="0.026cm" svg:x="4.955cm" svg:y="20.963cm" svg:viewBox="0 0 28 27" draw:points="0,0 28,0 28,27 0,27">
          <text:p/>
        </draw:polygon>
        <draw:polygon draw:style-name="gr269" draw:text-style-name="P267" draw:layer="layout" svg:width="0.027cm" svg:height="0.026cm" svg:x="5.008cm" svg:y="20.963cm" svg:viewBox="0 0 28 27" draw:points="0,0 28,0 28,27 0,27">
          <text:p/>
        </draw:polygon>
        <draw:polygon draw:style-name="gr269" draw:text-style-name="P267" draw:layer="layout" svg:width="0.027cm" svg:height="0.026cm" svg:x="5.061cm" svg:y="20.963cm" svg:viewBox="0 0 28 27" draw:points="0,0 28,0 28,27 0,27">
          <text:p/>
        </draw:polygon>
        <draw:polygon draw:style-name="gr269" draw:text-style-name="P267" draw:layer="layout" svg:width="0.027cm" svg:height="0.026cm" svg:x="5.114cm" svg:y="20.963cm" svg:viewBox="0 0 28 27" draw:points="0,0 28,0 28,27 0,27">
          <text:p/>
        </draw:polygon>
        <draw:polygon draw:style-name="gr269" draw:text-style-name="P267" draw:layer="layout" svg:width="0.027cm" svg:height="0.026cm" svg:x="5.167cm" svg:y="20.963cm" svg:viewBox="0 0 28 27" draw:points="0,0 28,0 28,27 0,27">
          <text:p/>
        </draw:polygon>
        <draw:polygon draw:style-name="gr269" draw:text-style-name="P267" draw:layer="layout" svg:width="0.027cm" svg:height="0.026cm" svg:x="5.22cm" svg:y="20.963cm" svg:viewBox="0 0 28 27" draw:points="0,0 28,0 28,27 0,27">
          <text:p/>
        </draw:polygon>
        <draw:polygon draw:style-name="gr269" draw:text-style-name="P267" draw:layer="layout" svg:width="0.027cm" svg:height="0.026cm" svg:x="5.273cm" svg:y="20.963cm" svg:viewBox="0 0 28 27" draw:points="0,0 28,0 28,27 0,27">
          <text:p/>
        </draw:polygon>
        <draw:polygon draw:style-name="gr269" draw:text-style-name="P267" draw:layer="layout" svg:width="0.027cm" svg:height="0.026cm" svg:x="5.326cm" svg:y="20.963cm" svg:viewBox="0 0 28 27" draw:points="0,0 28,0 28,27 0,27">
          <text:p/>
        </draw:polygon>
        <draw:polygon draw:style-name="gr269" draw:text-style-name="P267" draw:layer="layout" svg:width="0.027cm" svg:height="0.026cm" svg:x="5.379cm" svg:y="20.963cm" svg:viewBox="0 0 28 27" draw:points="0,0 28,0 28,27 0,27">
          <text:p/>
        </draw:polygon>
        <draw:polygon draw:style-name="gr269" draw:text-style-name="P267" draw:layer="layout" svg:width="0.027cm" svg:height="0.026cm" svg:x="5.432cm" svg:y="20.963cm" svg:viewBox="0 0 28 27" draw:points="0,0 28,0 28,27 0,27">
          <text:p/>
        </draw:polygon>
        <draw:polygon draw:style-name="gr269" draw:text-style-name="P267" draw:layer="layout" svg:width="0.027cm" svg:height="0.026cm" svg:x="5.485cm" svg:y="20.963cm" svg:viewBox="0 0 28 27" draw:points="0,0 28,0 28,27 0,27">
          <text:p/>
        </draw:polygon>
        <draw:polygon draw:style-name="gr269" draw:text-style-name="P267" draw:layer="layout" svg:width="0.027cm" svg:height="0.026cm" svg:x="5.538cm" svg:y="20.963cm" svg:viewBox="0 0 28 27" draw:points="0,0 28,0 28,27 0,27">
          <text:p/>
        </draw:polygon>
        <draw:polygon draw:style-name="gr269" draw:text-style-name="P267" draw:layer="layout" svg:width="0.027cm" svg:height="0.026cm" svg:x="5.591cm" svg:y="20.963cm" svg:viewBox="0 0 28 27" draw:points="0,0 28,0 28,27 0,27">
          <text:p/>
        </draw:polygon>
        <draw:polygon draw:style-name="gr269" draw:text-style-name="P267" draw:layer="layout" svg:width="0.027cm" svg:height="0.026cm" svg:x="5.644cm" svg:y="20.963cm" svg:viewBox="0 0 28 27" draw:points="0,0 28,0 28,27 0,27">
          <text:p/>
        </draw:polygon>
        <draw:polygon draw:style-name="gr269" draw:text-style-name="P267" draw:layer="layout" svg:width="0.027cm" svg:height="0.026cm" svg:x="5.697cm" svg:y="20.963cm" svg:viewBox="0 0 28 27" draw:points="0,0 28,0 28,27 0,27">
          <text:p/>
        </draw:polygon>
        <draw:polygon draw:style-name="gr269" draw:text-style-name="P267" draw:layer="layout" svg:width="0.027cm" svg:height="0.026cm" svg:x="5.75cm" svg:y="20.963cm" svg:viewBox="0 0 28 27" draw:points="0,0 28,0 28,27 0,27">
          <text:p/>
        </draw:polygon>
        <draw:polygon draw:style-name="gr269" draw:text-style-name="P267" draw:layer="layout" svg:width="0.027cm" svg:height="0.026cm" svg:x="5.803cm" svg:y="20.963cm" svg:viewBox="0 0 28 27" draw:points="0,0 28,0 28,27 0,27">
          <text:p/>
        </draw:polygon>
        <draw:polygon draw:style-name="gr269" draw:text-style-name="P267" draw:layer="layout" svg:width="0.027cm" svg:height="0.026cm" svg:x="5.856cm" svg:y="20.963cm" svg:viewBox="0 0 28 27" draw:points="0,0 28,0 28,27 0,27">
          <text:p/>
        </draw:polygon>
        <draw:polygon draw:style-name="gr269" draw:text-style-name="P267" draw:layer="layout" svg:width="0.027cm" svg:height="0.026cm" svg:x="5.909cm" svg:y="20.963cm" svg:viewBox="0 0 28 27" draw:points="0,0 28,0 28,27 0,27">
          <text:p/>
        </draw:polygon>
        <draw:polygon draw:style-name="gr269" draw:text-style-name="P267" draw:layer="layout" svg:width="0.027cm" svg:height="0.026cm" svg:x="5.962cm" svg:y="20.963cm" svg:viewBox="0 0 28 27" draw:points="0,0 28,0 28,27 0,27">
          <text:p/>
        </draw:polygon>
        <draw:polygon draw:style-name="gr269" draw:text-style-name="P267" draw:layer="layout" svg:width="0.027cm" svg:height="0.026cm" svg:x="6.015cm" svg:y="20.963cm" svg:viewBox="0 0 28 27" draw:points="0,0 28,0 28,27 0,27">
          <text:p/>
        </draw:polygon>
        <draw:polygon draw:style-name="gr269" draw:text-style-name="P267" draw:layer="layout" svg:width="0.027cm" svg:height="0.026cm" svg:x="6.068cm" svg:y="20.963cm" svg:viewBox="0 0 28 27" draw:points="0,0 28,0 28,27 0,27">
          <text:p/>
        </draw:polygon>
        <draw:polygon draw:style-name="gr269" draw:text-style-name="P267" draw:layer="layout" svg:width="0.027cm" svg:height="0.026cm" svg:x="6.121cm" svg:y="20.963cm" svg:viewBox="0 0 28 27" draw:points="0,0 28,0 28,27 0,27">
          <text:p/>
        </draw:polygon>
        <draw:polygon draw:style-name="gr269" draw:text-style-name="P267" draw:layer="layout" svg:width="0.028cm" svg:height="0.026cm" svg:x="6.174cm" svg:y="20.963cm" svg:viewBox="0 0 29 27" draw:points="0,0 29,0 29,27 0,27">
          <text:p/>
        </draw:polygon>
        <draw:polygon draw:style-name="gr269" draw:text-style-name="P267" draw:layer="layout" svg:width="0.027cm" svg:height="0.026cm" svg:x="6.227cm" svg:y="20.963cm" svg:viewBox="0 0 28 27" draw:points="0,0 28,0 28,27 0,27">
          <text:p/>
        </draw:polygon>
        <draw:polygon draw:style-name="gr269" draw:text-style-name="P267" draw:layer="layout" svg:width="0.027cm" svg:height="0.026cm" svg:x="6.28cm" svg:y="20.963cm" svg:viewBox="0 0 28 27" draw:points="0,0 28,0 28,27 0,27">
          <text:p/>
        </draw:polygon>
        <draw:polygon draw:style-name="gr269" draw:text-style-name="P267" draw:layer="layout" svg:width="0.027cm" svg:height="0.026cm" svg:x="6.333cm" svg:y="20.963cm" svg:viewBox="0 0 28 27" draw:points="0,0 28,0 28,27 0,27">
          <text:p/>
        </draw:polygon>
        <draw:polygon draw:style-name="gr269" draw:text-style-name="P267" draw:layer="layout" svg:width="0.026cm" svg:height="0.026cm" svg:x="6.387cm" svg:y="20.963cm" svg:viewBox="0 0 27 27" draw:points="0,0 27,0 27,27 0,27">
          <text:p/>
        </draw:polygon>
        <draw:polygon draw:style-name="gr269" draw:text-style-name="P267" draw:layer="layout" svg:width="0.026cm" svg:height="0.026cm" svg:x="6.44cm" svg:y="20.963cm" svg:viewBox="0 0 27 27" draw:points="0,0 27,0 27,27 0,27">
          <text:p/>
        </draw:polygon>
        <draw:polygon draw:style-name="gr269" draw:text-style-name="P267" draw:layer="layout" svg:width="0.026cm" svg:height="0.026cm" svg:x="6.493cm" svg:y="20.963cm" svg:viewBox="0 0 27 27" draw:points="0,0 27,0 27,27 0,27">
          <text:p/>
        </draw:polygon>
        <draw:polygon draw:style-name="gr269" draw:text-style-name="P267" draw:layer="layout" svg:width="0.026cm" svg:height="0.026cm" svg:x="6.546cm" svg:y="20.963cm" svg:viewBox="0 0 27 27" draw:points="0,0 27,0 27,27 0,27">
          <text:p/>
        </draw:polygon>
        <draw:polygon draw:style-name="gr269" draw:text-style-name="P267" draw:layer="layout" svg:width="0.026cm" svg:height="0.026cm" svg:x="6.599cm" svg:y="20.963cm" svg:viewBox="0 0 27 27" draw:points="0,0 27,0 27,27 0,27">
          <text:p/>
        </draw:polygon>
        <draw:polygon draw:style-name="gr269" draw:text-style-name="P267" draw:layer="layout" svg:width="0.026cm" svg:height="0.026cm" svg:x="6.652cm" svg:y="20.963cm" svg:viewBox="0 0 27 27" draw:points="0,0 27,0 27,27 0,27">
          <text:p/>
        </draw:polygon>
        <draw:polygon draw:style-name="gr269" draw:text-style-name="P267" draw:layer="layout" svg:width="0.026cm" svg:height="0.026cm" svg:x="6.705cm" svg:y="20.963cm" svg:viewBox="0 0 27 27" draw:points="0,0 27,0 27,27 0,27">
          <text:p/>
        </draw:polygon>
        <draw:polygon draw:style-name="gr269" draw:text-style-name="P267" draw:layer="layout" svg:width="0.026cm" svg:height="0.026cm" svg:x="6.758cm" svg:y="20.963cm" svg:viewBox="0 0 27 27" draw:points="0,0 27,0 27,27 0,27">
          <text:p/>
        </draw:polygon>
        <draw:polygon draw:style-name="gr269" draw:text-style-name="P267" draw:layer="layout" svg:width="0.026cm" svg:height="0.026cm" svg:x="6.811cm" svg:y="20.963cm" svg:viewBox="0 0 27 27" draw:points="0,0 27,0 27,27 0,27">
          <text:p/>
        </draw:polygon>
        <draw:polygon draw:style-name="gr269" draw:text-style-name="P267" draw:layer="layout" svg:width="0.026cm" svg:height="0.026cm" svg:x="6.864cm" svg:y="20.963cm" svg:viewBox="0 0 27 27" draw:points="0,0 27,0 27,27 0,27">
          <text:p/>
        </draw:polygon>
        <draw:polygon draw:style-name="gr269" draw:text-style-name="P267" draw:layer="layout" svg:width="0.026cm" svg:height="0.026cm" svg:x="6.917cm" svg:y="20.963cm" svg:viewBox="0 0 27 27" draw:points="0,0 27,0 27,27 0,27">
          <text:p/>
        </draw:polygon>
        <draw:polygon draw:style-name="gr269" draw:text-style-name="P267" draw:layer="layout" svg:width="0.026cm" svg:height="0.026cm" svg:x="6.97cm" svg:y="20.963cm" svg:viewBox="0 0 27 27" draw:points="0,0 27,0 27,27 0,27">
          <text:p/>
        </draw:polygon>
        <draw:polygon draw:style-name="gr269" draw:text-style-name="P267" draw:layer="layout" svg:width="0.026cm" svg:height="0.026cm" svg:x="7.023cm" svg:y="20.963cm" svg:viewBox="0 0 27 27" draw:points="0,0 27,0 27,27 0,27">
          <text:p/>
        </draw:polygon>
        <draw:polygon draw:style-name="gr269" draw:text-style-name="P267" draw:layer="layout" svg:width="0.026cm" svg:height="0.026cm" svg:x="7.076cm" svg:y="20.963cm" svg:viewBox="0 0 27 27" draw:points="0,0 27,0 27,27 0,27">
          <text:p/>
        </draw:polygon>
        <draw:polygon draw:style-name="gr269" draw:text-style-name="P267" draw:layer="layout" svg:width="0.026cm" svg:height="0.026cm" svg:x="7.129cm" svg:y="20.963cm" svg:viewBox="0 0 27 27" draw:points="0,0 27,0 27,27 0,27">
          <text:p/>
        </draw:polygon>
        <draw:polygon draw:style-name="gr269" draw:text-style-name="P267" draw:layer="layout" svg:width="0.026cm" svg:height="0.026cm" svg:x="7.182cm" svg:y="20.963cm" svg:viewBox="0 0 27 27" draw:points="0,0 27,0 27,27 0,27">
          <text:p/>
        </draw:polygon>
        <draw:polygon draw:style-name="gr269" draw:text-style-name="P267" draw:layer="layout" svg:width="0.026cm" svg:height="0.026cm" svg:x="7.235cm" svg:y="20.963cm" svg:viewBox="0 0 27 27" draw:points="0,0 27,0 27,27 0,27">
          <text:p/>
        </draw:polygon>
        <draw:polygon draw:style-name="gr269" draw:text-style-name="P267" draw:layer="layout" svg:width="0.026cm" svg:height="0.026cm" svg:x="7.288cm" svg:y="20.963cm" svg:viewBox="0 0 27 27" draw:points="0,0 27,0 27,27 0,27">
          <text:p/>
        </draw:polygon>
        <draw:polygon draw:style-name="gr269" draw:text-style-name="P267" draw:layer="layout" svg:width="0.026cm" svg:height="0.026cm" svg:x="7.341cm" svg:y="20.963cm" svg:viewBox="0 0 27 27" draw:points="0,0 27,0 27,27 0,27">
          <text:p/>
        </draw:polygon>
        <draw:polygon draw:style-name="gr269" draw:text-style-name="P267" draw:layer="layout" svg:width="0.026cm" svg:height="0.026cm" svg:x="7.394cm" svg:y="20.963cm" svg:viewBox="0 0 27 27" draw:points="0,0 27,0 27,27 0,27">
          <text:p/>
        </draw:polygon>
        <draw:polygon draw:style-name="gr269" draw:text-style-name="P267" draw:layer="layout" svg:width="0.026cm" svg:height="0.026cm" svg:x="7.447cm" svg:y="20.963cm" svg:viewBox="0 0 27 27" draw:points="0,0 27,0 27,27 0,27">
          <text:p/>
        </draw:polygon>
        <draw:polygon draw:style-name="gr269" draw:text-style-name="P267" draw:layer="layout" svg:width="0.026cm" svg:height="0.026cm" svg:x="7.5cm" svg:y="20.963cm" svg:viewBox="0 0 27 27" draw:points="0,0 27,0 27,27 0,27">
          <text:p/>
        </draw:polygon>
        <draw:polygon draw:style-name="gr269" draw:text-style-name="P267" draw:layer="layout" svg:width="0.026cm" svg:height="0.026cm" svg:x="7.553cm" svg:y="20.963cm" svg:viewBox="0 0 27 27" draw:points="0,0 27,0 27,27 0,27">
          <text:p/>
        </draw:polygon>
        <draw:polygon draw:style-name="gr269" draw:text-style-name="P267" draw:layer="layout" svg:width="0.026cm" svg:height="0.026cm" svg:x="7.606cm" svg:y="20.963cm" svg:viewBox="0 0 27 27" draw:points="0,0 27,0 27,27 0,27">
          <text:p/>
        </draw:polygon>
        <draw:polygon draw:style-name="gr269" draw:text-style-name="P267" draw:layer="layout" svg:width="0.026cm" svg:height="0.026cm" svg:x="7.659cm" svg:y="20.963cm" svg:viewBox="0 0 27 27" draw:points="0,0 27,0 27,27 0,27">
          <text:p/>
        </draw:polygon>
        <draw:polygon draw:style-name="gr269" draw:text-style-name="P267" draw:layer="layout" svg:width="0.026cm" svg:height="0.026cm" svg:x="7.712cm" svg:y="20.963cm" svg:viewBox="0 0 27 27" draw:points="0,0 27,0 27,27 0,27">
          <text:p/>
        </draw:polygon>
        <draw:polygon draw:style-name="gr269" draw:text-style-name="P267" draw:layer="layout" svg:width="0.026cm" svg:height="0.026cm" svg:x="7.765cm" svg:y="20.963cm" svg:viewBox="0 0 27 27" draw:points="0,0 27,0 27,27 0,27">
          <text:p/>
        </draw:polygon>
        <draw:polygon draw:style-name="gr269" draw:text-style-name="P267" draw:layer="layout" svg:width="0.026cm" svg:height="0.026cm" svg:x="7.818cm" svg:y="20.963cm" svg:viewBox="0 0 27 27" draw:points="0,0 27,0 27,27 0,27">
          <text:p/>
        </draw:polygon>
        <draw:polygon draw:style-name="gr269" draw:text-style-name="P267" draw:layer="layout" svg:width="0.026cm" svg:height="0.026cm" svg:x="7.871cm" svg:y="20.963cm" svg:viewBox="0 0 27 27" draw:points="0,0 27,0 27,27 0,27">
          <text:p/>
        </draw:polygon>
        <draw:polygon draw:style-name="gr269" draw:text-style-name="P267" draw:layer="layout" svg:width="0.026cm" svg:height="0.026cm" svg:x="7.924cm" svg:y="20.963cm" svg:viewBox="0 0 27 27" draw:points="0,0 27,0 27,27 0,27">
          <text:p/>
        </draw:polygon>
        <draw:polygon draw:style-name="gr269" draw:text-style-name="P267" draw:layer="layout" svg:width="0.026cm" svg:height="0.026cm" svg:x="7.977cm" svg:y="20.963cm" svg:viewBox="0 0 27 27" draw:points="0,0 27,0 27,27 0,27">
          <text:p/>
        </draw:polygon>
        <draw:polygon draw:style-name="gr269" draw:text-style-name="P267" draw:layer="layout" svg:width="0.026cm" svg:height="0.026cm" svg:x="8.03cm" svg:y="20.963cm" svg:viewBox="0 0 27 27" draw:points="0,0 27,0 27,27 0,27">
          <text:p/>
        </draw:polygon>
        <draw:polygon draw:style-name="gr269" draw:text-style-name="P267" draw:layer="layout" svg:width="0.026cm" svg:height="0.026cm" svg:x="8.083cm" svg:y="20.963cm" svg:viewBox="0 0 27 27" draw:points="0,0 27,0 27,27 0,27">
          <text:p/>
        </draw:polygon>
        <draw:polygon draw:style-name="gr269" draw:text-style-name="P267" draw:layer="layout" svg:width="0.026cm" svg:height="0.026cm" svg:x="8.136cm" svg:y="20.963cm" svg:viewBox="0 0 27 27" draw:points="0,0 27,0 27,27 0,27">
          <text:p/>
        </draw:polygon>
        <draw:polygon draw:style-name="gr269" draw:text-style-name="P267" draw:layer="layout" svg:width="0.026cm" svg:height="0.026cm" svg:x="8.189cm" svg:y="20.963cm" svg:viewBox="0 0 27 27" draw:points="0,0 27,0 27,27 0,27">
          <text:p/>
        </draw:polygon>
        <draw:polygon draw:style-name="gr269" draw:text-style-name="P267" draw:layer="layout" svg:width="0.026cm" svg:height="0.026cm" svg:x="8.242cm" svg:y="20.963cm" svg:viewBox="0 0 27 27" draw:points="0,0 27,0 27,27 0,27">
          <text:p/>
        </draw:polygon>
        <draw:polygon draw:style-name="gr269" draw:text-style-name="P267" draw:layer="layout" svg:width="0.026cm" svg:height="0.026cm" svg:x="8.295cm" svg:y="20.963cm" svg:viewBox="0 0 27 27" draw:points="0,0 27,0 27,27 0,27">
          <text:p/>
        </draw:polygon>
        <draw:polygon draw:style-name="gr269" draw:text-style-name="P267" draw:layer="layout" svg:width="0.026cm" svg:height="0.026cm" svg:x="8.348cm" svg:y="20.963cm" svg:viewBox="0 0 27 27" draw:points="0,0 27,0 27,27 0,27">
          <text:p/>
        </draw:polygon>
        <draw:polygon draw:style-name="gr269" draw:text-style-name="P267" draw:layer="layout" svg:width="0.026cm" svg:height="0.026cm" svg:x="8.401cm" svg:y="20.963cm" svg:viewBox="0 0 27 27" draw:points="0,0 27,0 27,27 0,27">
          <text:p/>
        </draw:polygon>
        <draw:polygon draw:style-name="gr269" draw:text-style-name="P267" draw:layer="layout" svg:width="0.026cm" svg:height="0.026cm" svg:x="8.454cm" svg:y="20.963cm" svg:viewBox="0 0 27 27" draw:points="0,0 27,0 27,27 0,27">
          <text:p/>
        </draw:polygon>
        <draw:polygon draw:style-name="gr269" draw:text-style-name="P267" draw:layer="layout" svg:width="0.026cm" svg:height="0.026cm" svg:x="8.507cm" svg:y="20.963cm" svg:viewBox="0 0 27 27" draw:points="0,0 27,0 27,27 0,27">
          <text:p/>
        </draw:polygon>
        <draw:polygon draw:style-name="gr269" draw:text-style-name="P267" draw:layer="layout" svg:width="0.026cm" svg:height="0.026cm" svg:x="8.56cm" svg:y="20.963cm" svg:viewBox="0 0 27 27" draw:points="0,0 27,0 27,27 0,27">
          <text:p/>
        </draw:polygon>
        <draw:polygon draw:style-name="gr269" draw:text-style-name="P267" draw:layer="layout" svg:width="0.026cm" svg:height="0.026cm" svg:x="8.613cm" svg:y="20.963cm" svg:viewBox="0 0 27 27" draw:points="0,0 27,0 27,27 0,27">
          <text:p/>
        </draw:polygon>
        <draw:polygon draw:style-name="gr269" draw:text-style-name="P267" draw:layer="layout" svg:width="0.026cm" svg:height="0.026cm" svg:x="8.666cm" svg:y="20.963cm" svg:viewBox="0 0 27 27" draw:points="0,0 27,0 27,27 0,27">
          <text:p/>
        </draw:polygon>
        <draw:polygon draw:style-name="gr269" draw:text-style-name="P267" draw:layer="layout" svg:width="0.026cm" svg:height="0.026cm" svg:x="8.719cm" svg:y="20.963cm" svg:viewBox="0 0 27 27" draw:points="0,0 27,0 27,27 0,27">
          <text:p/>
        </draw:polygon>
        <draw:polygon draw:style-name="gr269" draw:text-style-name="P267" draw:layer="layout" svg:width="0.026cm" svg:height="0.026cm" svg:x="8.772cm" svg:y="20.963cm" svg:viewBox="0 0 27 27" draw:points="0,0 27,0 27,27 0,27">
          <text:p/>
        </draw:polygon>
        <draw:polygon draw:style-name="gr269" draw:text-style-name="P267" draw:layer="layout" svg:width="0.026cm" svg:height="0.026cm" svg:x="8.825cm" svg:y="20.963cm" svg:viewBox="0 0 27 27" draw:points="0,0 27,0 27,27 0,27">
          <text:p/>
        </draw:polygon>
        <draw:polygon draw:style-name="gr269" draw:text-style-name="P267" draw:layer="layout" svg:width="0.026cm" svg:height="0.026cm" svg:x="8.878cm" svg:y="20.963cm" svg:viewBox="0 0 27 27" draw:points="0,0 27,0 27,27 0,27">
          <text:p/>
        </draw:polygon>
        <draw:polygon draw:style-name="gr269" draw:text-style-name="P267" draw:layer="layout" svg:width="0.026cm" svg:height="0.026cm" svg:x="8.931cm" svg:y="20.963cm" svg:viewBox="0 0 27 27" draw:points="0,0 27,0 27,27 0,27">
          <text:p/>
        </draw:polygon>
        <draw:polygon draw:style-name="gr269" draw:text-style-name="P267" draw:layer="layout" svg:width="0.026cm" svg:height="0.026cm" svg:x="8.984cm" svg:y="20.963cm" svg:viewBox="0 0 27 27" draw:points="0,0 27,0 27,27 0,27">
          <text:p/>
        </draw:polygon>
        <draw:polygon draw:style-name="gr269" draw:text-style-name="P267" draw:layer="layout" svg:width="0.026cm" svg:height="0.026cm" svg:x="9.037cm" svg:y="20.963cm" svg:viewBox="0 0 27 27" draw:points="0,0 27,0 27,27 0,27">
          <text:p/>
        </draw:polygon>
        <draw:polygon draw:style-name="gr269" draw:text-style-name="P267" draw:layer="layout" svg:width="0.026cm" svg:height="0.026cm" svg:x="9.09cm" svg:y="20.963cm" svg:viewBox="0 0 27 27" draw:points="0,0 27,0 27,27 0,27">
          <text:p/>
        </draw:polygon>
        <draw:polygon draw:style-name="gr269" draw:text-style-name="P267" draw:layer="layout" svg:width="0.026cm" svg:height="0.026cm" svg:x="9.143cm" svg:y="20.963cm" svg:viewBox="0 0 27 27" draw:points="0,0 27,0 27,27 0,27">
          <text:p/>
        </draw:polygon>
        <draw:polygon draw:style-name="gr269" draw:text-style-name="P267" draw:layer="layout" svg:width="0.026cm" svg:height="0.026cm" svg:x="9.196cm" svg:y="20.963cm" svg:viewBox="0 0 27 27" draw:points="0,0 27,0 27,27 0,27">
          <text:p/>
        </draw:polygon>
        <draw:polygon draw:style-name="gr269" draw:text-style-name="P267" draw:layer="layout" svg:width="0.026cm" svg:height="0.026cm" svg:x="9.249cm" svg:y="20.963cm" svg:viewBox="0 0 27 27" draw:points="0,0 27,0 27,27 0,27">
          <text:p/>
        </draw:polygon>
        <draw:polygon draw:style-name="gr269" draw:text-style-name="P267" draw:layer="layout" svg:width="0.026cm" svg:height="0.026cm" svg:x="9.302cm" svg:y="20.963cm" svg:viewBox="0 0 27 27" draw:points="0,0 27,0 27,27 0,27">
          <text:p/>
        </draw:polygon>
        <draw:polygon draw:style-name="gr269" draw:text-style-name="P267" draw:layer="layout" svg:width="0.026cm" svg:height="0.026cm" svg:x="9.355cm" svg:y="20.963cm" svg:viewBox="0 0 27 27" draw:points="0,0 27,0 27,27 0,27">
          <text:p/>
        </draw:polygon>
        <draw:polygon draw:style-name="gr269" draw:text-style-name="P267" draw:layer="layout" svg:width="0.026cm" svg:height="0.026cm" svg:x="9.408cm" svg:y="20.963cm" svg:viewBox="0 0 27 27" draw:points="0,0 27,0 27,27 0,27">
          <text:p/>
        </draw:polygon>
        <draw:polygon draw:style-name="gr269" draw:text-style-name="P267" draw:layer="layout" svg:width="0.026cm" svg:height="0.026cm" svg:x="9.461cm" svg:y="20.963cm" svg:viewBox="0 0 27 27" draw:points="0,0 27,0 27,27 0,27">
          <text:p/>
        </draw:polygon>
        <draw:polygon draw:style-name="gr269" draw:text-style-name="P267" draw:layer="layout" svg:width="0.026cm" svg:height="0.026cm" svg:x="9.514cm" svg:y="20.963cm" svg:viewBox="0 0 27 27" draw:points="0,0 27,0 27,27 0,27">
          <text:p/>
        </draw:polygon>
        <draw:polygon draw:style-name="gr269" draw:text-style-name="P267" draw:layer="layout" svg:width="0.026cm" svg:height="0.026cm" svg:x="9.567cm" svg:y="20.963cm" svg:viewBox="0 0 27 27" draw:points="0,0 27,0 27,27 0,27">
          <text:p/>
        </draw:polygon>
        <draw:polygon draw:style-name="gr269" draw:text-style-name="P267" draw:layer="layout" svg:width="0.026cm" svg:height="0.026cm" svg:x="9.62cm" svg:y="20.963cm" svg:viewBox="0 0 27 27" draw:points="0,0 27,0 27,27 0,27">
          <text:p/>
        </draw:polygon>
        <draw:polygon draw:style-name="gr269" draw:text-style-name="P267" draw:layer="layout" svg:width="0.026cm" svg:height="0.026cm" svg:x="9.673cm" svg:y="20.963cm" svg:viewBox="0 0 27 27" draw:points="0,0 27,0 27,27 0,27">
          <text:p/>
        </draw:polygon>
        <draw:polygon draw:style-name="gr269" draw:text-style-name="P267" draw:layer="layout" svg:width="0.026cm" svg:height="0.026cm" svg:x="9.726cm" svg:y="20.963cm" svg:viewBox="0 0 27 27" draw:points="0,0 27,0 27,27 0,27">
          <text:p/>
        </draw:polygon>
        <draw:polygon draw:style-name="gr269" draw:text-style-name="P267" draw:layer="layout" svg:width="0.026cm" svg:height="0.026cm" svg:x="9.779cm" svg:y="20.963cm" svg:viewBox="0 0 27 27" draw:points="0,0 27,0 27,27 0,27">
          <text:p/>
        </draw:polygon>
        <draw:polygon draw:style-name="gr269" draw:text-style-name="P267" draw:layer="layout" svg:width="0.026cm" svg:height="0.026cm" svg:x="9.832cm" svg:y="20.963cm" svg:viewBox="0 0 27 27" draw:points="0,0 27,0 27,27 0,27">
          <text:p/>
        </draw:polygon>
        <draw:polygon draw:style-name="gr269" draw:text-style-name="P267" draw:layer="layout" svg:width="0.026cm" svg:height="0.026cm" svg:x="9.885cm" svg:y="20.963cm" svg:viewBox="0 0 27 27" draw:points="0,0 27,0 27,27 0,27">
          <text:p/>
        </draw:polygon>
        <draw:polygon draw:style-name="gr269" draw:text-style-name="P267" draw:layer="layout" svg:width="0.026cm" svg:height="0.026cm" svg:x="9.938cm" svg:y="20.963cm" svg:viewBox="0 0 27 27" draw:points="0,0 27,0 27,27 0,27">
          <text:p/>
        </draw:polygon>
        <draw:polygon draw:style-name="gr269" draw:text-style-name="P267" draw:layer="layout" svg:width="0.026cm" svg:height="0.026cm" svg:x="9.991cm" svg:y="20.963cm" svg:viewBox="0 0 27 27" draw:points="0,0 27,0 27,27 0,27">
          <text:p/>
        </draw:polygon>
        <draw:polygon draw:style-name="gr269" draw:text-style-name="P267" draw:layer="layout" svg:width="0.026cm" svg:height="0.026cm" svg:x="10.044cm" svg:y="20.963cm" svg:viewBox="0 0 27 27" draw:points="0,0 27,0 27,27 0,27">
          <text:p/>
        </draw:polygon>
        <draw:polygon draw:style-name="gr269" draw:text-style-name="P267" draw:layer="layout" svg:width="0.026cm" svg:height="0.026cm" svg:x="10.097cm" svg:y="20.963cm" svg:viewBox="0 0 27 27" draw:points="0,0 27,0 27,27 0,27">
          <text:p/>
        </draw:polygon>
        <draw:polygon draw:style-name="gr269" draw:text-style-name="P267" draw:layer="layout" svg:width="0.026cm" svg:height="0.026cm" svg:x="10.15cm" svg:y="20.963cm" svg:viewBox="0 0 27 27" draw:points="0,0 27,0 27,27 0,27">
          <text:p/>
        </draw:polygon>
        <draw:polygon draw:style-name="gr269" draw:text-style-name="P267" draw:layer="layout" svg:width="0.026cm" svg:height="0.026cm" svg:x="10.203cm" svg:y="20.963cm" svg:viewBox="0 0 27 27" draw:points="0,0 27,0 27,27 0,27">
          <text:p/>
        </draw:polygon>
        <draw:polygon draw:style-name="gr269" draw:text-style-name="P267" draw:layer="layout" svg:width="0.026cm" svg:height="0.026cm" svg:x="10.256cm" svg:y="20.963cm" svg:viewBox="0 0 27 27" draw:points="0,0 27,0 27,27 0,27">
          <text:p/>
        </draw:polygon>
        <draw:polygon draw:style-name="gr269" draw:text-style-name="P267" draw:layer="layout" svg:width="0.026cm" svg:height="0.026cm" svg:x="10.309cm" svg:y="20.963cm" svg:viewBox="0 0 27 27" draw:points="0,0 27,0 27,27 0,27">
          <text:p/>
        </draw:polygon>
        <draw:polygon draw:style-name="gr269" draw:text-style-name="P267" draw:layer="layout" svg:width="0.026cm" svg:height="0.026cm" svg:x="10.362cm" svg:y="20.963cm" svg:viewBox="0 0 27 27" draw:points="0,0 27,0 27,27 0,27">
          <text:p/>
        </draw:polygon>
        <draw:polygon draw:style-name="gr269" draw:text-style-name="P267" draw:layer="layout" svg:width="0.026cm" svg:height="0.026cm" svg:x="10.415cm" svg:y="20.963cm" svg:viewBox="0 0 27 27" draw:points="0,0 27,0 27,27 0,27">
          <text:p/>
        </draw:polygon>
        <draw:polygon draw:style-name="gr269" draw:text-style-name="P267" draw:layer="layout" svg:width="0.026cm" svg:height="0.026cm" svg:x="10.468cm" svg:y="20.963cm" svg:viewBox="0 0 27 27" draw:points="0,0 27,0 27,27 0,27">
          <text:p/>
        </draw:polygon>
        <draw:polygon draw:style-name="gr269" draw:text-style-name="P267" draw:layer="layout" svg:width="0.026cm" svg:height="0.026cm" svg:x="10.521cm" svg:y="20.963cm" svg:viewBox="0 0 27 27" draw:points="0,0 27,0 27,27 0,27">
          <text:p/>
        </draw:polygon>
        <draw:polygon draw:style-name="gr269" draw:text-style-name="P267" draw:layer="layout" svg:width="0.026cm" svg:height="0.026cm" svg:x="10.574cm" svg:y="20.963cm" svg:viewBox="0 0 27 27" draw:points="0,0 27,0 27,27 0,27">
          <text:p/>
        </draw:polygon>
        <draw:polygon draw:style-name="gr269" draw:text-style-name="P267" draw:layer="layout" svg:width="0.026cm" svg:height="0.026cm" svg:x="10.627cm" svg:y="20.963cm" svg:viewBox="0 0 27 27" draw:points="0,0 27,0 27,27 0,27">
          <text:p/>
        </draw:polygon>
        <draw:polygon draw:style-name="gr269" draw:text-style-name="P267" draw:layer="layout" svg:width="0.026cm" svg:height="0.026cm" svg:x="10.68cm" svg:y="20.963cm" svg:viewBox="0 0 27 27" draw:points="0,0 27,0 27,27 0,27">
          <text:p/>
        </draw:polygon>
        <draw:polygon draw:style-name="gr269" draw:text-style-name="P267" draw:layer="layout" svg:width="0.026cm" svg:height="0.026cm" svg:x="10.733cm" svg:y="20.963cm" svg:viewBox="0 0 27 27" draw:points="0,0 27,0 27,27 0,27">
          <text:p/>
        </draw:polygon>
        <draw:polygon draw:style-name="gr269" draw:text-style-name="P267" draw:layer="layout" svg:width="0.026cm" svg:height="0.026cm" svg:x="10.786cm" svg:y="20.963cm" svg:viewBox="0 0 27 27" draw:points="0,0 27,0 27,27 0,27">
          <text:p/>
        </draw:polygon>
        <draw:polygon draw:style-name="gr269" draw:text-style-name="P267" draw:layer="layout" svg:width="0.026cm" svg:height="0.026cm" svg:x="10.839cm" svg:y="20.963cm" svg:viewBox="0 0 27 27" draw:points="0,0 27,0 27,27 0,27">
          <text:p/>
        </draw:polygon>
        <draw:polygon draw:style-name="gr269" draw:text-style-name="P267" draw:layer="layout" svg:width="0.026cm" svg:height="0.026cm" svg:x="10.892cm" svg:y="20.963cm" svg:viewBox="0 0 27 27" draw:points="0,0 27,0 27,27 0,27">
          <text:p/>
        </draw:polygon>
        <draw:polygon draw:style-name="gr269" draw:text-style-name="P267" draw:layer="layout" svg:width="0.026cm" svg:height="0.026cm" svg:x="10.945cm" svg:y="20.963cm" svg:viewBox="0 0 27 27" draw:points="0,0 27,0 27,27 0,27">
          <text:p/>
        </draw:polygon>
        <draw:polygon draw:style-name="gr269" draw:text-style-name="P267" draw:layer="layout" svg:width="0.026cm" svg:height="0.026cm" svg:x="10.998cm" svg:y="20.963cm" svg:viewBox="0 0 27 27" draw:points="0,0 27,0 27,27 0,27">
          <text:p/>
        </draw:polygon>
        <draw:polygon draw:style-name="gr269" draw:text-style-name="P267" draw:layer="layout" svg:width="0.026cm" svg:height="0.026cm" svg:x="11.051cm" svg:y="20.963cm" svg:viewBox="0 0 27 27" draw:points="0,0 27,0 27,27 0,27">
          <text:p/>
        </draw:polygon>
        <draw:polygon draw:style-name="gr269" draw:text-style-name="P267" draw:layer="layout" svg:width="0.026cm" svg:height="0.026cm" svg:x="11.104cm" svg:y="20.963cm" svg:viewBox="0 0 27 27" draw:points="0,0 27,0 27,27 0,27">
          <text:p/>
        </draw:polygon>
        <draw:polygon draw:style-name="gr269" draw:text-style-name="P267" draw:layer="layout" svg:width="0.026cm" svg:height="0.026cm" svg:x="11.157cm" svg:y="20.963cm" svg:viewBox="0 0 27 27" draw:points="0,0 27,0 27,27 0,27">
          <text:p/>
        </draw:polygon>
        <draw:polygon draw:style-name="gr269" draw:text-style-name="P267" draw:layer="layout" svg:width="0.026cm" svg:height="0.026cm" svg:x="11.21cm" svg:y="20.963cm" svg:viewBox="0 0 27 27" draw:points="0,0 27,0 27,27 0,27">
          <text:p/>
        </draw:polygon>
        <draw:polygon draw:style-name="gr269" draw:text-style-name="P267" draw:layer="layout" svg:width="0.026cm" svg:height="0.026cm" svg:x="11.263cm" svg:y="20.963cm" svg:viewBox="0 0 27 27" draw:points="0,0 27,0 27,27 0,27">
          <text:p/>
        </draw:polygon>
        <draw:polygon draw:style-name="gr269" draw:text-style-name="P267" draw:layer="layout" svg:width="0.026cm" svg:height="0.026cm" svg:x="11.316cm" svg:y="20.963cm" svg:viewBox="0 0 27 27" draw:points="0,0 27,0 27,27 0,27">
          <text:p/>
        </draw:polygon>
        <draw:polygon draw:style-name="gr269" draw:text-style-name="P267" draw:layer="layout" svg:width="0.026cm" svg:height="0.026cm" svg:x="11.369cm" svg:y="20.963cm" svg:viewBox="0 0 27 27" draw:points="0,0 27,0 27,27 0,27">
          <text:p/>
        </draw:polygon>
        <draw:polygon draw:style-name="gr269" draw:text-style-name="P267" draw:layer="layout" svg:width="0.026cm" svg:height="0.026cm" svg:x="11.422cm" svg:y="20.963cm" svg:viewBox="0 0 27 27" draw:points="0,0 27,0 27,27 0,27">
          <text:p/>
        </draw:polygon>
        <draw:polygon draw:style-name="gr269" draw:text-style-name="P267" draw:layer="layout" svg:width="0.026cm" svg:height="0.026cm" svg:x="11.475cm" svg:y="20.963cm" svg:viewBox="0 0 27 27" draw:points="0,0 27,0 27,27 0,27">
          <text:p/>
        </draw:polygon>
        <draw:polygon draw:style-name="gr269" draw:text-style-name="P267" draw:layer="layout" svg:width="0.026cm" svg:height="0.026cm" svg:x="11.528cm" svg:y="20.963cm" svg:viewBox="0 0 27 27" draw:points="0,0 27,0 27,27 0,27">
          <text:p/>
        </draw:polygon>
        <draw:polygon draw:style-name="gr269" draw:text-style-name="P267" draw:layer="layout" svg:width="0.026cm" svg:height="0.026cm" svg:x="11.581cm" svg:y="20.963cm" svg:viewBox="0 0 27 27" draw:points="0,0 27,0 27,27 0,27">
          <text:p/>
        </draw:polygon>
        <draw:polygon draw:style-name="gr269" draw:text-style-name="P267" draw:layer="layout" svg:width="0.026cm" svg:height="0.026cm" svg:x="11.634cm" svg:y="20.963cm" svg:viewBox="0 0 27 27" draw:points="0,0 27,0 27,27 0,27">
          <text:p/>
        </draw:polygon>
        <draw:polygon draw:style-name="gr269" draw:text-style-name="P267" draw:layer="layout" svg:width="0.026cm" svg:height="0.026cm" svg:x="11.687cm" svg:y="20.963cm" svg:viewBox="0 0 27 27" draw:points="0,0 27,0 27,27 0,27">
          <text:p/>
        </draw:polygon>
        <draw:polygon draw:style-name="gr269" draw:text-style-name="P267" draw:layer="layout" svg:width="0.026cm" svg:height="0.026cm" svg:x="11.74cm" svg:y="20.963cm" svg:viewBox="0 0 27 27" draw:points="0,0 27,0 27,27 0,27">
          <text:p/>
        </draw:polygon>
        <draw:polygon draw:style-name="gr269" draw:text-style-name="P267" draw:layer="layout" svg:width="0.026cm" svg:height="0.026cm" svg:x="11.793cm" svg:y="20.963cm" svg:viewBox="0 0 27 27" draw:points="0,0 27,0 27,27 0,27">
          <text:p/>
        </draw:polygon>
        <draw:polygon draw:style-name="gr269" draw:text-style-name="P267" draw:layer="layout" svg:width="0.026cm" svg:height="0.026cm" svg:x="11.846cm" svg:y="20.963cm" svg:viewBox="0 0 27 27" draw:points="0,0 27,0 27,27 0,27">
          <text:p/>
        </draw:polygon>
        <draw:polygon draw:style-name="gr269" draw:text-style-name="P267" draw:layer="layout" svg:width="0.026cm" svg:height="0.026cm" svg:x="11.899cm" svg:y="20.963cm" svg:viewBox="0 0 27 27" draw:points="0,0 27,0 27,27 0,27">
          <text:p/>
        </draw:polygon>
        <draw:polygon draw:style-name="gr269" draw:text-style-name="P267" draw:layer="layout" svg:width="0.026cm" svg:height="0.026cm" svg:x="11.952cm" svg:y="20.963cm" svg:viewBox="0 0 27 27" draw:points="0,0 27,0 27,27 0,27">
          <text:p/>
        </draw:polygon>
        <draw:polygon draw:style-name="gr269" draw:text-style-name="P267" draw:layer="layout" svg:width="0.026cm" svg:height="0.026cm" svg:x="12.005cm" svg:y="20.963cm" svg:viewBox="0 0 27 27" draw:points="0,0 27,0 27,27 0,27">
          <text:p/>
        </draw:polygon>
        <draw:polygon draw:style-name="gr269" draw:text-style-name="P267" draw:layer="layout" svg:width="0.026cm" svg:height="0.026cm" svg:x="12.058cm" svg:y="20.963cm" svg:viewBox="0 0 27 27" draw:points="0,0 27,0 27,27 0,27">
          <text:p/>
        </draw:polygon>
        <draw:polygon draw:style-name="gr269" draw:text-style-name="P267" draw:layer="layout" svg:width="0.026cm" svg:height="0.026cm" svg:x="12.111cm" svg:y="20.963cm" svg:viewBox="0 0 27 27" draw:points="0,0 27,0 27,27 0,27">
          <text:p/>
        </draw:polygon>
        <draw:polygon draw:style-name="gr269" draw:text-style-name="P267" draw:layer="layout" svg:width="0.026cm" svg:height="0.026cm" svg:x="12.164cm" svg:y="20.963cm" svg:viewBox="0 0 27 27" draw:points="0,0 27,0 27,27 0,27">
          <text:p/>
        </draw:polygon>
        <draw:polygon draw:style-name="gr269" draw:text-style-name="P267" draw:layer="layout" svg:width="0.026cm" svg:height="0.026cm" svg:x="12.217cm" svg:y="20.963cm" svg:viewBox="0 0 27 27" draw:points="0,0 27,0 27,27 0,27">
          <text:p/>
        </draw:polygon>
        <draw:polygon draw:style-name="gr269" draw:text-style-name="P267" draw:layer="layout" svg:width="0.026cm" svg:height="0.026cm" svg:x="12.27cm" svg:y="20.963cm" svg:viewBox="0 0 27 27" draw:points="0,0 27,0 27,27 0,27">
          <text:p/>
        </draw:polygon>
        <draw:polygon draw:style-name="gr269" draw:text-style-name="P267" draw:layer="layout" svg:width="0.026cm" svg:height="0.026cm" svg:x="12.323cm" svg:y="20.963cm" svg:viewBox="0 0 27 27" draw:points="0,0 27,0 27,27 0,27">
          <text:p/>
        </draw:polygon>
        <draw:polygon draw:style-name="gr269" draw:text-style-name="P267" draw:layer="layout" svg:width="0.026cm" svg:height="0.026cm" svg:x="12.376cm" svg:y="20.963cm" svg:viewBox="0 0 27 27" draw:points="0,0 27,0 27,27 0,27">
          <text:p/>
        </draw:polygon>
        <draw:polygon draw:style-name="gr269" draw:text-style-name="P267" draw:layer="layout" svg:width="0.026cm" svg:height="0.026cm" svg:x="12.429cm" svg:y="20.963cm" svg:viewBox="0 0 27 27" draw:points="0,0 27,0 27,27 0,27">
          <text:p/>
        </draw:polygon>
        <draw:polygon draw:style-name="gr269" draw:text-style-name="P267" draw:layer="layout" svg:width="0.026cm" svg:height="0.026cm" svg:x="12.482cm" svg:y="20.963cm" svg:viewBox="0 0 27 27" draw:points="0,0 27,0 27,27 0,27">
          <text:p/>
        </draw:polygon>
        <draw:polygon draw:style-name="gr269" draw:text-style-name="P267" draw:layer="layout" svg:width="0.026cm" svg:height="0.026cm" svg:x="12.535cm" svg:y="20.963cm" svg:viewBox="0 0 27 27" draw:points="0,0 27,0 27,27 0,27">
          <text:p/>
        </draw:polygon>
        <draw:polygon draw:style-name="gr269" draw:text-style-name="P267" draw:layer="layout" svg:width="0.026cm" svg:height="0.026cm" svg:x="12.588cm" svg:y="20.963cm" svg:viewBox="0 0 27 27" draw:points="0,0 27,0 27,27 0,27">
          <text:p/>
        </draw:polygon>
        <draw:polygon draw:style-name="gr269" draw:text-style-name="P267" draw:layer="layout" svg:width="0.026cm" svg:height="0.026cm" svg:x="12.641cm" svg:y="20.963cm" svg:viewBox="0 0 27 27" draw:points="0,0 27,0 27,27 0,27">
          <text:p/>
        </draw:polygon>
        <draw:polygon draw:style-name="gr269" draw:text-style-name="P267" draw:layer="layout" svg:width="0.027cm" svg:height="0.026cm" svg:x="12.694cm" svg:y="20.963cm" svg:viewBox="0 0 28 27" draw:points="0,0 28,0 28,27 0,27">
          <text:p/>
        </draw:polygon>
        <draw:polygon draw:style-name="gr269" draw:text-style-name="P267" draw:layer="layout" svg:width="0.027cm" svg:height="0.026cm" svg:x="12.747cm" svg:y="20.963cm" svg:viewBox="0 0 28 27" draw:points="0,0 28,0 28,27 0,27">
          <text:p/>
        </draw:polygon>
        <draw:polygon draw:style-name="gr269" draw:text-style-name="P267" draw:layer="layout" svg:width="0.027cm" svg:height="0.026cm" svg:x="12.8cm" svg:y="20.963cm" svg:viewBox="0 0 28 27" draw:points="0,0 28,0 28,27 0,27">
          <text:p/>
        </draw:polygon>
        <draw:polygon draw:style-name="gr269" draw:text-style-name="P267" draw:layer="layout" svg:width="0.027cm" svg:height="0.026cm" svg:x="12.853cm" svg:y="20.963cm" svg:viewBox="0 0 28 27" draw:points="0,0 28,0 28,27 0,27">
          <text:p/>
        </draw:polygon>
        <draw:polygon draw:style-name="gr269" draw:text-style-name="P267" draw:layer="layout" svg:width="0.027cm" svg:height="0.026cm" svg:x="12.906cm" svg:y="20.963cm" svg:viewBox="0 0 28 27" draw:points="0,0 28,0 28,27 0,27">
          <text:p/>
        </draw:polygon>
        <draw:polygon draw:style-name="gr269" draw:text-style-name="P267" draw:layer="layout" svg:width="0.027cm" svg:height="0.026cm" svg:x="12.959cm" svg:y="20.963cm" svg:viewBox="0 0 28 27" draw:points="0,0 28,0 28,27 0,27">
          <text:p/>
        </draw:polygon>
        <draw:polygon draw:style-name="gr269" draw:text-style-name="P267" draw:layer="layout" svg:width="0.028cm" svg:height="0.026cm" svg:x="13.012cm" svg:y="20.963cm" svg:viewBox="0 0 29 27" draw:points="0,0 29,0 29,27 0,27">
          <text:p/>
        </draw:polygon>
        <draw:polygon draw:style-name="gr269" draw:text-style-name="P267" draw:layer="layout" svg:width="0.027cm" svg:height="0.026cm" svg:x="13.065cm" svg:y="20.963cm" svg:viewBox="0 0 28 27" draw:points="0,0 28,0 28,27 0,27">
          <text:p/>
        </draw:polygon>
        <draw:polygon draw:style-name="gr269" draw:text-style-name="P267" draw:layer="layout" svg:width="0.027cm" svg:height="0.026cm" svg:x="13.118cm" svg:y="20.963cm" svg:viewBox="0 0 28 27" draw:points="0,0 28,0 28,27 0,27">
          <text:p/>
        </draw:polygon>
        <draw:polygon draw:style-name="gr269" draw:text-style-name="P267" draw:layer="layout" svg:width="0.027cm" svg:height="0.026cm" svg:x="13.171cm" svg:y="20.963cm" svg:viewBox="0 0 28 27" draw:points="0,0 28,0 28,27 0,27">
          <text:p/>
        </draw:polygon>
        <draw:polygon draw:style-name="gr269" draw:text-style-name="P267" draw:layer="layout" svg:width="0.027cm" svg:height="0.026cm" svg:x="13.224cm" svg:y="20.963cm" svg:viewBox="0 0 28 27" draw:points="0,0 28,0 28,27 0,27">
          <text:p/>
        </draw:polygon>
        <draw:polygon draw:style-name="gr269" draw:text-style-name="P267" draw:layer="layout" svg:width="0.027cm" svg:height="0.026cm" svg:x="13.277cm" svg:y="20.963cm" svg:viewBox="0 0 28 27" draw:points="0,0 28,0 28,27 0,27">
          <text:p/>
        </draw:polygon>
        <draw:polygon draw:style-name="gr269" draw:text-style-name="P267" draw:layer="layout" svg:width="0.027cm" svg:height="0.026cm" svg:x="13.33cm" svg:y="20.963cm" svg:viewBox="0 0 28 27" draw:points="0,0 28,0 28,27 0,27">
          <text:p/>
        </draw:polygon>
        <draw:polygon draw:style-name="gr269" draw:text-style-name="P267" draw:layer="layout" svg:width="0.027cm" svg:height="0.026cm" svg:x="13.383cm" svg:y="20.963cm" svg:viewBox="0 0 28 27" draw:points="0,0 28,0 28,27 0,27">
          <text:p/>
        </draw:polygon>
        <draw:polygon draw:style-name="gr269" draw:text-style-name="P267" draw:layer="layout" svg:width="0.027cm" svg:height="0.026cm" svg:x="13.436cm" svg:y="20.963cm" svg:viewBox="0 0 28 27" draw:points="0,0 28,0 28,27 0,27">
          <text:p/>
        </draw:polygon>
        <draw:polygon draw:style-name="gr269" draw:text-style-name="P267" draw:layer="layout" svg:width="0.027cm" svg:height="0.026cm" svg:x="13.489cm" svg:y="20.963cm" svg:viewBox="0 0 28 27" draw:points="0,0 28,0 28,27 0,27">
          <text:p/>
        </draw:polygon>
        <draw:polygon draw:style-name="gr269" draw:text-style-name="P267" draw:layer="layout" svg:width="0.027cm" svg:height="0.026cm" svg:x="13.542cm" svg:y="20.963cm" svg:viewBox="0 0 28 27" draw:points="0,0 28,0 28,27 0,27">
          <text:p/>
        </draw:polygon>
        <draw:polygon draw:style-name="gr269" draw:text-style-name="P267" draw:layer="layout" svg:width="0.027cm" svg:height="0.026cm" svg:x="13.595cm" svg:y="20.963cm" svg:viewBox="0 0 28 27" draw:points="0,0 28,0 28,27 0,27">
          <text:p/>
        </draw:polygon>
        <draw:polygon draw:style-name="gr269" draw:text-style-name="P267" draw:layer="layout" svg:width="0.027cm" svg:height="0.026cm" svg:x="13.648cm" svg:y="20.963cm" svg:viewBox="0 0 28 27" draw:points="0,0 28,0 28,27 0,27">
          <text:p/>
        </draw:polygon>
        <draw:polygon draw:style-name="gr269" draw:text-style-name="P267" draw:layer="layout" svg:width="0.027cm" svg:height="0.026cm" svg:x="13.701cm" svg:y="20.963cm" svg:viewBox="0 0 28 27" draw:points="0,0 28,0 28,27 0,27">
          <text:p/>
        </draw:polygon>
        <draw:polygon draw:style-name="gr269" draw:text-style-name="P267" draw:layer="layout" svg:width="0.027cm" svg:height="0.026cm" svg:x="13.754cm" svg:y="20.963cm" svg:viewBox="0 0 28 27" draw:points="0,0 28,0 28,27 0,27">
          <text:p/>
        </draw:polygon>
        <draw:polygon draw:style-name="gr269" draw:text-style-name="P267" draw:layer="layout" svg:width="0.027cm" svg:height="0.026cm" svg:x="13.807cm" svg:y="20.963cm" svg:viewBox="0 0 28 27" draw:points="0,0 28,0 28,27 0,27">
          <text:p/>
        </draw:polygon>
        <draw:polygon draw:style-name="gr269" draw:text-style-name="P267" draw:layer="layout" svg:width="0.027cm" svg:height="0.026cm" svg:x="13.86cm" svg:y="20.963cm" svg:viewBox="0 0 28 27" draw:points="0,0 28,0 28,27 0,27">
          <text:p/>
        </draw:polygon>
        <draw:polygon draw:style-name="gr269" draw:text-style-name="P267" draw:layer="layout" svg:width="0.027cm" svg:height="0.026cm" svg:x="13.913cm" svg:y="20.963cm" svg:viewBox="0 0 28 27" draw:points="0,0 28,0 28,27 0,27">
          <text:p/>
        </draw:polygon>
        <draw:polygon draw:style-name="gr269" draw:text-style-name="P267" draw:layer="layout" svg:width="0.027cm" svg:height="0.026cm" svg:x="13.966cm" svg:y="20.963cm" svg:viewBox="0 0 28 27" draw:points="0,0 28,0 28,27 0,27">
          <text:p/>
        </draw:polygon>
        <draw:polygon draw:style-name="gr269" draw:text-style-name="P267" draw:layer="layout" svg:width="0.027cm" svg:height="0.026cm" svg:x="14.019cm" svg:y="20.963cm" svg:viewBox="0 0 28 27" draw:points="0,0 28,0 28,27 0,27">
          <text:p/>
        </draw:polygon>
        <draw:polygon draw:style-name="gr269" draw:text-style-name="P267" draw:layer="layout" svg:width="0.027cm" svg:height="0.026cm" svg:x="14.072cm" svg:y="20.963cm" svg:viewBox="0 0 28 27" draw:points="0,0 28,0 28,27 0,27">
          <text:p/>
        </draw:polygon>
        <draw:polygon draw:style-name="gr269" draw:text-style-name="P267" draw:layer="layout" svg:width="0.027cm" svg:height="0.026cm" svg:x="14.125cm" svg:y="20.963cm" svg:viewBox="0 0 28 27" draw:points="0,0 28,0 28,27 0,27">
          <text:p/>
        </draw:polygon>
        <draw:polygon draw:style-name="gr269" draw:text-style-name="P267" draw:layer="layout" svg:width="0.027cm" svg:height="0.026cm" svg:x="14.178cm" svg:y="20.963cm" svg:viewBox="0 0 28 27" draw:points="0,0 28,0 28,27 0,27">
          <text:p/>
        </draw:polygon>
        <draw:polygon draw:style-name="gr269" draw:text-style-name="P267" draw:layer="layout" svg:width="0.027cm" svg:height="0.026cm" svg:x="14.231cm" svg:y="20.963cm" svg:viewBox="0 0 28 27" draw:points="0,0 28,0 28,27 0,27">
          <text:p/>
        </draw:polygon>
        <draw:polygon draw:style-name="gr269" draw:text-style-name="P267" draw:layer="layout" svg:width="0.027cm" svg:height="0.026cm" svg:x="14.284cm" svg:y="20.963cm" svg:viewBox="0 0 28 27" draw:points="0,0 28,0 28,27 0,27">
          <text:p/>
        </draw:polygon>
        <draw:polygon draw:style-name="gr269" draw:text-style-name="P267" draw:layer="layout" svg:width="0.027cm" svg:height="0.026cm" svg:x="14.337cm" svg:y="20.963cm" svg:viewBox="0 0 28 27" draw:points="0,0 28,0 28,27 0,27">
          <text:p/>
        </draw:polygon>
        <draw:polygon draw:style-name="gr269" draw:text-style-name="P267" draw:layer="layout" svg:width="0.028cm" svg:height="0.026cm" svg:x="14.39cm" svg:y="20.963cm" svg:viewBox="0 0 29 27" draw:points="0,0 29,0 29,27 0,27">
          <text:p/>
        </draw:polygon>
        <draw:polygon draw:style-name="gr269" draw:text-style-name="P267" draw:layer="layout" svg:width="0.027cm" svg:height="0.026cm" svg:x="14.443cm" svg:y="20.963cm" svg:viewBox="0 0 28 27" draw:points="0,0 28,0 28,27 0,27">
          <text:p/>
        </draw:polygon>
        <draw:polygon draw:style-name="gr269" draw:text-style-name="P267" draw:layer="layout" svg:width="0.027cm" svg:height="0.026cm" svg:x="14.496cm" svg:y="20.963cm" svg:viewBox="0 0 28 27" draw:points="0,0 28,0 28,27 0,27">
          <text:p/>
        </draw:polygon>
        <draw:polygon draw:style-name="gr269" draw:text-style-name="P267" draw:layer="layout" svg:width="0.027cm" svg:height="0.026cm" svg:x="14.549cm" svg:y="20.963cm" svg:viewBox="0 0 28 27" draw:points="0,0 28,0 28,27 0,27">
          <text:p/>
        </draw:polygon>
        <draw:polygon draw:style-name="gr269" draw:text-style-name="P267" draw:layer="layout" svg:width="0.027cm" svg:height="0.026cm" svg:x="14.602cm" svg:y="20.963cm" svg:viewBox="0 0 28 27" draw:points="0,0 28,0 28,27 0,27">
          <text:p/>
        </draw:polygon>
        <draw:polygon draw:style-name="gr269" draw:text-style-name="P267" draw:layer="layout" svg:width="0.027cm" svg:height="0.026cm" svg:x="14.655cm" svg:y="20.963cm" svg:viewBox="0 0 28 27" draw:points="0,0 28,0 28,27 0,27">
          <text:p/>
        </draw:polygon>
        <draw:polygon draw:style-name="gr269" draw:text-style-name="P267" draw:layer="layout" svg:width="0.027cm" svg:height="0.026cm" svg:x="14.708cm" svg:y="20.963cm" svg:viewBox="0 0 28 27" draw:points="0,0 28,0 28,27 0,27">
          <text:p/>
        </draw:polygon>
        <draw:polygon draw:style-name="gr269" draw:text-style-name="P267" draw:layer="layout" svg:width="0.027cm" svg:height="0.026cm" svg:x="14.761cm" svg:y="20.963cm" svg:viewBox="0 0 28 27" draw:points="0,0 28,0 28,27 0,27">
          <text:p/>
        </draw:polygon>
        <draw:polygon draw:style-name="gr269" draw:text-style-name="P267" draw:layer="layout" svg:width="0.027cm" svg:height="0.026cm" svg:x="14.814cm" svg:y="20.963cm" svg:viewBox="0 0 28 27" draw:points="0,0 28,0 28,27 0,27">
          <text:p/>
        </draw:polygon>
        <draw:polygon draw:style-name="gr269" draw:text-style-name="P267" draw:layer="layout" svg:width="0.027cm" svg:height="0.026cm" svg:x="14.867cm" svg:y="20.963cm" svg:viewBox="0 0 28 27" draw:points="0,0 28,0 28,27 0,27">
          <text:p/>
        </draw:polygon>
        <draw:polygon draw:style-name="gr269" draw:text-style-name="P267" draw:layer="layout" svg:width="0.027cm" svg:height="0.026cm" svg:x="14.92cm" svg:y="20.963cm" svg:viewBox="0 0 28 27" draw:points="0,0 28,0 28,27 0,27">
          <text:p/>
        </draw:polygon>
        <draw:polygon draw:style-name="gr269" draw:text-style-name="P267" draw:layer="layout" svg:width="0.027cm" svg:height="0.026cm" svg:x="14.973cm" svg:y="20.963cm" svg:viewBox="0 0 28 27" draw:points="0,0 28,0 28,27 0,27">
          <text:p/>
        </draw:polygon>
        <draw:polygon draw:style-name="gr269" draw:text-style-name="P267" draw:layer="layout" svg:width="0.027cm" svg:height="0.026cm" svg:x="15.026cm" svg:y="20.963cm" svg:viewBox="0 0 28 27" draw:points="0,0 28,0 28,27 0,27">
          <text:p/>
        </draw:polygon>
        <draw:polygon draw:style-name="gr269" draw:text-style-name="P267" draw:layer="layout" svg:width="0.027cm" svg:height="0.026cm" svg:x="15.079cm" svg:y="20.963cm" svg:viewBox="0 0 28 27" draw:points="0,0 28,0 28,27 0,27">
          <text:p/>
        </draw:polygon>
        <draw:polygon draw:style-name="gr269" draw:text-style-name="P267" draw:layer="layout" svg:width="0.027cm" svg:height="0.026cm" svg:x="15.132cm" svg:y="20.963cm" svg:viewBox="0 0 28 27" draw:points="0,0 28,0 28,27 0,27">
          <text:p/>
        </draw:polygon>
        <draw:polygon draw:style-name="gr269" draw:text-style-name="P267" draw:layer="layout" svg:width="0.027cm" svg:height="0.026cm" svg:x="15.185cm" svg:y="20.963cm" svg:viewBox="0 0 28 27" draw:points="0,0 28,0 28,27 0,27">
          <text:p/>
        </draw:polygon>
        <draw:polygon draw:style-name="gr269" draw:text-style-name="P267" draw:layer="layout" svg:width="0.027cm" svg:height="0.026cm" svg:x="15.238cm" svg:y="20.963cm" svg:viewBox="0 0 28 27" draw:points="0,0 28,0 28,27 0,27">
          <text:p/>
        </draw:polygon>
        <draw:polygon draw:style-name="gr269" draw:text-style-name="P267" draw:layer="layout" svg:width="0.027cm" svg:height="0.026cm" svg:x="15.291cm" svg:y="20.963cm" svg:viewBox="0 0 28 27" draw:points="0,0 28,0 28,27 0,27">
          <text:p/>
        </draw:polygon>
        <draw:polygon draw:style-name="gr269" draw:text-style-name="P267" draw:layer="layout" svg:width="0.027cm" svg:height="0.026cm" svg:x="15.344cm" svg:y="20.963cm" svg:viewBox="0 0 28 27" draw:points="0,0 28,0 28,27 0,27">
          <text:p/>
        </draw:polygon>
        <draw:polygon draw:style-name="gr269" draw:text-style-name="P267" draw:layer="layout" svg:width="0.027cm" svg:height="0.026cm" svg:x="15.397cm" svg:y="20.963cm" svg:viewBox="0 0 28 27" draw:points="0,0 28,0 28,27 0,27">
          <text:p/>
        </draw:polygon>
        <draw:polygon draw:style-name="gr269" draw:text-style-name="P267" draw:layer="layout" svg:width="0.027cm" svg:height="0.026cm" svg:x="15.45cm" svg:y="20.963cm" svg:viewBox="0 0 28 27" draw:points="0,0 28,0 28,27 0,27">
          <text:p/>
        </draw:polygon>
        <draw:polygon draw:style-name="gr269" draw:text-style-name="P267" draw:layer="layout" svg:width="0.027cm" svg:height="0.026cm" svg:x="15.503cm" svg:y="20.963cm" svg:viewBox="0 0 28 27" draw:points="0,0 28,0 28,27 0,27">
          <text:p/>
        </draw:polygon>
        <draw:polygon draw:style-name="gr269" draw:text-style-name="P267" draw:layer="layout" svg:width="0.027cm" svg:height="0.026cm" svg:x="15.556cm" svg:y="20.963cm" svg:viewBox="0 0 28 27" draw:points="0,0 28,0 28,27 0,27">
          <text:p/>
        </draw:polygon>
        <draw:polygon draw:style-name="gr269" draw:text-style-name="P267" draw:layer="layout" svg:width="0.027cm" svg:height="0.026cm" svg:x="15.609cm" svg:y="20.963cm" svg:viewBox="0 0 28 27" draw:points="0,0 28,0 28,27 0,27">
          <text:p/>
        </draw:polygon>
        <draw:polygon draw:style-name="gr269" draw:text-style-name="P267" draw:layer="layout" svg:width="0.027cm" svg:height="0.026cm" svg:x="15.662cm" svg:y="20.963cm" svg:viewBox="0 0 28 27" draw:points="0,0 28,0 28,27 0,27">
          <text:p/>
        </draw:polygon>
        <draw:polygon draw:style-name="gr269" draw:text-style-name="P267" draw:layer="layout" svg:width="0.027cm" svg:height="0.026cm" svg:x="15.715cm" svg:y="20.963cm" svg:viewBox="0 0 28 27" draw:points="0,0 28,0 28,27 0,27">
          <text:p/>
        </draw:polygon>
        <draw:polygon draw:style-name="gr269" draw:text-style-name="P267" draw:layer="layout" svg:width="0.028cm" svg:height="0.026cm" svg:x="15.768cm" svg:y="20.963cm" svg:viewBox="0 0 29 27" draw:points="0,0 29,0 29,27 0,27">
          <text:p/>
        </draw:polygon>
        <draw:polygon draw:style-name="gr269" draw:text-style-name="P267" draw:layer="layout" svg:width="0.027cm" svg:height="0.026cm" svg:x="15.821cm" svg:y="20.963cm" svg:viewBox="0 0 28 27" draw:points="0,0 28,0 28,27 0,27">
          <text:p/>
        </draw:polygon>
        <draw:polygon draw:style-name="gr269" draw:text-style-name="P267" draw:layer="layout" svg:width="0.027cm" svg:height="0.026cm" svg:x="15.874cm" svg:y="20.963cm" svg:viewBox="0 0 28 27" draw:points="0,0 28,0 28,27 0,27">
          <text:p/>
        </draw:polygon>
        <draw:polygon draw:style-name="gr269" draw:text-style-name="P267" draw:layer="layout" svg:width="0.027cm" svg:height="0.026cm" svg:x="15.927cm" svg:y="20.963cm" svg:viewBox="0 0 28 27" draw:points="0,0 28,0 28,27 0,27">
          <text:p/>
        </draw:polygon>
        <draw:polygon draw:style-name="gr269" draw:text-style-name="P267" draw:layer="layout" svg:width="0.027cm" svg:height="0.026cm" svg:x="15.98cm" svg:y="20.963cm" svg:viewBox="0 0 28 27" draw:points="0,0 28,0 28,27 0,27">
          <text:p/>
        </draw:polygon>
        <draw:polygon draw:style-name="gr269" draw:text-style-name="P267" draw:layer="layout" svg:width="0.027cm" svg:height="0.026cm" svg:x="16.033cm" svg:y="20.963cm" svg:viewBox="0 0 28 27" draw:points="0,0 28,0 28,27 0,27">
          <text:p/>
        </draw:polygon>
        <draw:polygon draw:style-name="gr269" draw:text-style-name="P267" draw:layer="layout" svg:width="0.027cm" svg:height="0.026cm" svg:x="16.086cm" svg:y="20.963cm" svg:viewBox="0 0 28 27" draw:points="0,0 28,0 28,27 0,27">
          <text:p/>
        </draw:polygon>
        <draw:polygon draw:style-name="gr269" draw:text-style-name="P267" draw:layer="layout" svg:width="0.027cm" svg:height="0.026cm" svg:x="16.139cm" svg:y="20.963cm" svg:viewBox="0 0 28 27" draw:points="0,0 28,0 28,27 0,27">
          <text:p/>
        </draw:polygon>
        <draw:polygon draw:style-name="gr269" draw:text-style-name="P267" draw:layer="layout" svg:width="0.027cm" svg:height="0.026cm" svg:x="16.192cm" svg:y="20.963cm" svg:viewBox="0 0 28 27" draw:points="0,0 28,0 28,27 0,27">
          <text:p/>
        </draw:polygon>
        <draw:polygon draw:style-name="gr269" draw:text-style-name="P267" draw:layer="layout" svg:width="0.027cm" svg:height="0.026cm" svg:x="16.245cm" svg:y="20.963cm" svg:viewBox="0 0 28 27" draw:points="0,0 28,0 28,27 0,27">
          <text:p/>
        </draw:polygon>
        <draw:polygon draw:style-name="gr269" draw:text-style-name="P267" draw:layer="layout" svg:width="0.027cm" svg:height="0.026cm" svg:x="16.298cm" svg:y="20.963cm" svg:viewBox="0 0 28 27" draw:points="0,0 28,0 28,27 0,27">
          <text:p/>
        </draw:polygon>
        <draw:polygon draw:style-name="gr269" draw:text-style-name="P267" draw:layer="layout" svg:width="0.027cm" svg:height="0.026cm" svg:x="16.351cm" svg:y="20.963cm" svg:viewBox="0 0 28 27" draw:points="0,0 28,0 28,27 0,27">
          <text:p/>
        </draw:polygon>
        <draw:polygon draw:style-name="gr269" draw:text-style-name="P267" draw:layer="layout" svg:width="0.027cm" svg:height="0.026cm" svg:x="16.404cm" svg:y="20.963cm" svg:viewBox="0 0 28 27" draw:points="0,0 28,0 28,27 0,27">
          <text:p/>
        </draw:polygon>
        <draw:polygon draw:style-name="gr269" draw:text-style-name="P267" draw:layer="layout" svg:width="0.027cm" svg:height="0.026cm" svg:x="16.457cm" svg:y="20.963cm" svg:viewBox="0 0 28 27" draw:points="0,0 28,0 28,27 0,27">
          <text:p/>
        </draw:polygon>
        <draw:polygon draw:style-name="gr269" draw:text-style-name="P267" draw:layer="layout" svg:width="0.027cm" svg:height="0.026cm" svg:x="16.51cm" svg:y="20.963cm" svg:viewBox="0 0 28 27" draw:points="0,0 28,0 28,27 0,27">
          <text:p/>
        </draw:polygon>
        <draw:polygon draw:style-name="gr269" draw:text-style-name="P267" draw:layer="layout" svg:width="0.027cm" svg:height="0.026cm" svg:x="16.563cm" svg:y="20.963cm" svg:viewBox="0 0 28 27" draw:points="0,0 28,0 28,27 0,27">
          <text:p/>
        </draw:polygon>
        <draw:polygon draw:style-name="gr269" draw:text-style-name="P267" draw:layer="layout" svg:width="0.027cm" svg:height="0.026cm" svg:x="16.616cm" svg:y="20.963cm" svg:viewBox="0 0 28 27" draw:points="0,0 28,0 28,27 0,27">
          <text:p/>
        </draw:polygon>
        <draw:polygon draw:style-name="gr269" draw:text-style-name="P267" draw:layer="layout" svg:width="0.027cm" svg:height="0.026cm" svg:x="16.669cm" svg:y="20.963cm" svg:viewBox="0 0 28 27" draw:points="0,0 28,0 28,27 0,27">
          <text:p/>
        </draw:polygon>
        <draw:polygon draw:style-name="gr269" draw:text-style-name="P267" draw:layer="layout" svg:width="0.027cm" svg:height="0.026cm" svg:x="16.722cm" svg:y="20.963cm" svg:viewBox="0 0 28 27" draw:points="0,0 28,0 28,27 0,27">
          <text:p/>
        </draw:polygon>
        <draw:polygon draw:style-name="gr269" draw:text-style-name="P267" draw:layer="layout" svg:width="0.027cm" svg:height="0.026cm" svg:x="16.775cm" svg:y="20.963cm" svg:viewBox="0 0 28 27" draw:points="0,0 28,0 28,27 0,27">
          <text:p/>
        </draw:polygon>
        <draw:polygon draw:style-name="gr269" draw:text-style-name="P267" draw:layer="layout" svg:width="0.027cm" svg:height="0.026cm" svg:x="16.828cm" svg:y="20.963cm" svg:viewBox="0 0 28 27" draw:points="0,0 28,0 28,27 0,27">
          <text:p/>
        </draw:polygon>
        <draw:polygon draw:style-name="gr269" draw:text-style-name="P267" draw:layer="layout" svg:width="0.027cm" svg:height="0.026cm" svg:x="16.881cm" svg:y="20.963cm" svg:viewBox="0 0 28 27" draw:points="0,0 28,0 28,27 0,27">
          <text:p/>
        </draw:polygon>
        <draw:polygon draw:style-name="gr269" draw:text-style-name="P267" draw:layer="layout" svg:width="0.027cm" svg:height="0.026cm" svg:x="16.934cm" svg:y="20.963cm" svg:viewBox="0 0 28 27" draw:points="0,0 28,0 28,27 0,27">
          <text:p/>
        </draw:polygon>
        <draw:polygon draw:style-name="gr269" draw:text-style-name="P267" draw:layer="layout" svg:width="0.027cm" svg:height="0.026cm" svg:x="16.987cm" svg:y="20.963cm" svg:viewBox="0 0 28 27" draw:points="0,0 28,0 28,27 0,27">
          <text:p/>
        </draw:polygon>
        <draw:polygon draw:style-name="gr269" draw:text-style-name="P267" draw:layer="layout" svg:width="0.027cm" svg:height="0.026cm" svg:x="17.04cm" svg:y="20.963cm" svg:viewBox="0 0 28 27" draw:points="0,0 28,0 28,27 0,27">
          <text:p/>
        </draw:polygon>
        <draw:polygon draw:style-name="gr269" draw:text-style-name="P267" draw:layer="layout" svg:width="0.027cm" svg:height="0.026cm" svg:x="17.093cm" svg:y="20.963cm" svg:viewBox="0 0 28 27" draw:points="0,0 28,0 28,27 0,27">
          <text:p/>
        </draw:polygon>
        <draw:polygon draw:style-name="gr269" draw:text-style-name="P267" draw:layer="layout" svg:width="0.028cm" svg:height="0.026cm" svg:x="17.146cm" svg:y="20.963cm" svg:viewBox="0 0 29 27" draw:points="0,0 29,0 29,27 0,27">
          <text:p/>
        </draw:polygon>
        <draw:polygon draw:style-name="gr269" draw:text-style-name="P267" draw:layer="layout" svg:width="0.027cm" svg:height="0.026cm" svg:x="17.199cm" svg:y="20.963cm" svg:viewBox="0 0 28 27" draw:points="0,0 28,0 28,27 0,27">
          <text:p/>
        </draw:polygon>
        <draw:polygon draw:style-name="gr269" draw:text-style-name="P267" draw:layer="layout" svg:width="0.027cm" svg:height="0.026cm" svg:x="17.252cm" svg:y="20.963cm" svg:viewBox="0 0 28 27" draw:points="0,0 28,0 28,27 0,27">
          <text:p/>
        </draw:polygon>
        <draw:polygon draw:style-name="gr269" draw:text-style-name="P267" draw:layer="layout" svg:width="0.027cm" svg:height="0.026cm" svg:x="17.305cm" svg:y="20.963cm" svg:viewBox="0 0 28 27" draw:points="0,0 28,0 28,27 0,27">
          <text:p/>
        </draw:polygon>
        <draw:polygon draw:style-name="gr269" draw:text-style-name="P267" draw:layer="layout" svg:width="0.027cm" svg:height="0.026cm" svg:x="17.358cm" svg:y="20.963cm" svg:viewBox="0 0 28 27" draw:points="0,0 28,0 28,27 0,27">
          <text:p/>
        </draw:polygon>
        <draw:polygon draw:style-name="gr269" draw:text-style-name="P267" draw:layer="layout" svg:width="0.027cm" svg:height="0.026cm" svg:x="17.411cm" svg:y="20.963cm" svg:viewBox="0 0 28 27" draw:points="0,0 28,0 28,27 0,27">
          <text:p/>
        </draw:polygon>
        <draw:polygon draw:style-name="gr269" draw:text-style-name="P267" draw:layer="layout" svg:width="0.027cm" svg:height="0.026cm" svg:x="17.464cm" svg:y="20.963cm" svg:viewBox="0 0 28 27" draw:points="0,0 28,0 28,27 0,27">
          <text:p/>
        </draw:polygon>
        <draw:polygon draw:style-name="gr269" draw:text-style-name="P267" draw:layer="layout" svg:width="0.027cm" svg:height="0.026cm" svg:x="17.517cm" svg:y="20.963cm" svg:viewBox="0 0 28 27" draw:points="0,0 28,0 28,27 0,27">
          <text:p/>
        </draw:polygon>
        <draw:polygon draw:style-name="gr269" draw:text-style-name="P267" draw:layer="layout" svg:width="0.027cm" svg:height="0.026cm" svg:x="17.57cm" svg:y="20.963cm" svg:viewBox="0 0 28 27" draw:points="0,0 28,0 28,27 0,27">
          <text:p/>
        </draw:polygon>
        <draw:polygon draw:style-name="gr269" draw:text-style-name="P267" draw:layer="layout" svg:width="0.027cm" svg:height="0.026cm" svg:x="17.623cm" svg:y="20.963cm" svg:viewBox="0 0 28 27" draw:points="0,0 28,0 28,27 0,27">
          <text:p/>
        </draw:polygon>
        <draw:polygon draw:style-name="gr269" draw:text-style-name="P267" draw:layer="layout" svg:width="0.027cm" svg:height="0.026cm" svg:x="17.676cm" svg:y="20.963cm" svg:viewBox="0 0 28 27" draw:points="0,0 28,0 28,27 0,27">
          <text:p/>
        </draw:polygon>
        <draw:polygon draw:style-name="gr269" draw:text-style-name="P267" draw:layer="layout" svg:width="0.027cm" svg:height="0.026cm" svg:x="17.729cm" svg:y="20.963cm" svg:viewBox="0 0 28 27" draw:points="0,0 28,0 28,27 0,27">
          <text:p/>
        </draw:polygon>
        <draw:polygon draw:style-name="gr269" draw:text-style-name="P267" draw:layer="layout" svg:width="0.027cm" svg:height="0.026cm" svg:x="17.782cm" svg:y="20.963cm" svg:viewBox="0 0 28 27" draw:points="0,0 28,0 28,27 0,27">
          <text:p/>
        </draw:polygon>
        <draw:polygon draw:style-name="gr269" draw:text-style-name="P267" draw:layer="layout" svg:width="0.027cm" svg:height="0.026cm" svg:x="17.835cm" svg:y="20.963cm" svg:viewBox="0 0 28 27" draw:points="0,0 28,0 28,27 0,27">
          <text:p/>
        </draw:polygon>
        <draw:polygon draw:style-name="gr269" draw:text-style-name="P267" draw:layer="layout" svg:width="0.027cm" svg:height="0.026cm" svg:x="17.888cm" svg:y="20.963cm" svg:viewBox="0 0 28 27" draw:points="0,0 28,0 28,27 0,27">
          <text:p/>
        </draw:polygon>
        <draw:polygon draw:style-name="gr269" draw:text-style-name="P267" draw:layer="layout" svg:width="0.027cm" svg:height="0.026cm" svg:x="17.941cm" svg:y="20.963cm" svg:viewBox="0 0 28 27" draw:points="0,0 28,0 28,27 0,27">
          <text:p/>
        </draw:polygon>
        <draw:polygon draw:style-name="gr269" draw:text-style-name="P267" draw:layer="layout" svg:width="0.027cm" svg:height="0.026cm" svg:x="17.994cm" svg:y="20.963cm" svg:viewBox="0 0 28 27" draw:points="0,0 28,0 28,27 0,27">
          <text:p/>
        </draw:polygon>
        <draw:polygon draw:style-name="gr269" draw:text-style-name="P267" draw:layer="layout" svg:width="0.027cm" svg:height="0.026cm" svg:x="18.047cm" svg:y="20.963cm" svg:viewBox="0 0 28 27" draw:points="0,0 28,0 28,27 0,27">
          <text:p/>
        </draw:polygon>
        <draw:polygon draw:style-name="gr269" draw:text-style-name="P267" draw:layer="layout" svg:width="0.027cm" svg:height="0.026cm" svg:x="18.1cm" svg:y="20.963cm" svg:viewBox="0 0 28 27" draw:points="0,0 28,0 28,27 0,27">
          <text:p/>
        </draw:polygon>
        <draw:polygon draw:style-name="gr269" draw:text-style-name="P267" draw:layer="layout" svg:width="0.027cm" svg:height="0.026cm" svg:x="18.153cm" svg:y="20.963cm" svg:viewBox="0 0 28 27" draw:points="0,0 28,0 28,27 0,27">
          <text:p/>
        </draw:polygon>
        <draw:polygon draw:style-name="gr269" draw:text-style-name="P267" draw:layer="layout" svg:width="0.027cm" svg:height="0.026cm" svg:x="18.206cm" svg:y="20.963cm" svg:viewBox="0 0 28 27" draw:points="0,0 28,0 28,27 0,27">
          <text:p/>
        </draw:polygon>
        <draw:polygon draw:style-name="gr269" draw:text-style-name="P267" draw:layer="layout" svg:width="0.027cm" svg:height="0.026cm" svg:x="18.259cm" svg:y="20.963cm" svg:viewBox="0 0 28 27" draw:points="0,0 28,0 28,27 0,27">
          <text:p/>
        </draw:polygon>
        <draw:polygon draw:style-name="gr269" draw:text-style-name="P267" draw:layer="layout" svg:width="0.027cm" svg:height="0.026cm" svg:x="18.312cm" svg:y="20.963cm" svg:viewBox="0 0 28 27" draw:points="0,0 28,0 28,27 0,27">
          <text:p/>
        </draw:polygon>
        <draw:polygon draw:style-name="gr269" draw:text-style-name="P267" draw:layer="layout" svg:width="0.027cm" svg:height="0.026cm" svg:x="18.365cm" svg:y="20.963cm" svg:viewBox="0 0 28 27" draw:points="0,0 28,0 28,27 0,27">
          <text:p/>
        </draw:polygon>
        <draw:polygon draw:style-name="gr269" draw:text-style-name="P267" draw:layer="layout" svg:width="0.027cm" svg:height="0.026cm" svg:x="18.418cm" svg:y="20.963cm" svg:viewBox="0 0 28 27" draw:points="0,0 28,0 28,27 0,27">
          <text:p/>
        </draw:polygon>
        <draw:polygon draw:style-name="gr269" draw:text-style-name="P267" draw:layer="layout" svg:width="0.027cm" svg:height="0.026cm" svg:x="18.471cm" svg:y="20.963cm" svg:viewBox="0 0 28 27" draw:points="0,0 28,0 28,27 0,27">
          <text:p/>
        </draw:polygon>
        <draw:polygon draw:style-name="gr269" draw:text-style-name="P267" draw:layer="layout" svg:width="0.028cm" svg:height="0.026cm" svg:x="18.524cm" svg:y="20.963cm" svg:viewBox="0 0 29 27" draw:points="0,0 29,0 29,27 0,27">
          <text:p/>
        </draw:polygon>
        <draw:polygon draw:style-name="gr269" draw:text-style-name="P267" draw:layer="layout" svg:width="0.027cm" svg:height="0.026cm" svg:x="18.577cm" svg:y="20.963cm" svg:viewBox="0 0 28 27" draw:points="0,0 28,0 28,27 0,27">
          <text:p/>
        </draw:polygon>
        <draw:polygon draw:style-name="gr269" draw:text-style-name="P267" draw:layer="layout" svg:width="0.027cm" svg:height="0.026cm" svg:x="18.63cm" svg:y="20.963cm" svg:viewBox="0 0 28 27" draw:points="0,0 28,0 28,27 0,27">
          <text:p/>
        </draw:polygon>
        <draw:polygon draw:style-name="gr269" draw:text-style-name="P267" draw:layer="layout" svg:width="0.027cm" svg:height="0.026cm" svg:x="18.683cm" svg:y="20.963cm" svg:viewBox="0 0 28 27" draw:points="0,0 28,0 28,27 0,27">
          <text:p/>
        </draw:polygon>
        <draw:polygon draw:style-name="gr269" draw:text-style-name="P267" draw:layer="layout" svg:width="0.027cm" svg:height="0.026cm" svg:x="18.736cm" svg:y="20.963cm" svg:viewBox="0 0 28 27" draw:points="0,0 28,0 28,27 0,27">
          <text:p/>
        </draw:polygon>
        <draw:polygon draw:style-name="gr269" draw:text-style-name="P267" draw:layer="layout" svg:width="0.027cm" svg:height="0.026cm" svg:x="18.789cm" svg:y="20.963cm" svg:viewBox="0 0 28 27" draw:points="0,0 28,0 28,27 0,27">
          <text:p/>
        </draw:polygon>
        <draw:polygon draw:style-name="gr269" draw:text-style-name="P267" draw:layer="layout" svg:width="0.027cm" svg:height="0.026cm" svg:x="18.842cm" svg:y="20.963cm" svg:viewBox="0 0 28 27" draw:points="0,0 28,0 28,27 0,27">
          <text:p/>
        </draw:polygon>
        <draw:polygon draw:style-name="gr269" draw:text-style-name="P267" draw:layer="layout" svg:width="0.027cm" svg:height="0.026cm" svg:x="18.895cm" svg:y="20.963cm" svg:viewBox="0 0 28 27" draw:points="0,0 28,0 28,27 0,27">
          <text:p/>
        </draw:polygon>
        <draw:polygon draw:style-name="gr269" draw:text-style-name="P267" draw:layer="layout" svg:width="0.027cm" svg:height="0.026cm" svg:x="18.948cm" svg:y="20.963cm" svg:viewBox="0 0 28 27" draw:points="0,0 28,0 28,27 0,27">
          <text:p/>
        </draw:polygon>
        <draw:polygon draw:style-name="gr269" draw:text-style-name="P267" draw:layer="layout" svg:width="0.027cm" svg:height="0.026cm" svg:x="19.001cm" svg:y="20.963cm" svg:viewBox="0 0 28 27" draw:points="0,0 28,0 28,27 0,27">
          <text:p/>
        </draw:polygon>
        <draw:polygon draw:style-name="gr269" draw:text-style-name="P267" draw:layer="layout" svg:width="0.053cm" svg:height="0.027cm" svg:x="2.014cm" svg:y="21.943cm" svg:viewBox="0 0 54 28" draw:points="0,0 54,0 54,28 0,28">
          <text:p/>
        </draw:polygon>
        <draw:polygon draw:style-name="gr269" draw:text-style-name="P267" draw:layer="layout" svg:width="0.027cm" svg:height="0.027cm" svg:x="2.093cm" svg:y="21.943cm" svg:viewBox="0 0 28 28" draw:points="0,0 28,0 28,28 0,28">
          <text:p/>
        </draw:polygon>
        <draw:polygon draw:style-name="gr269" draw:text-style-name="P267" draw:layer="layout" svg:width="0.027cm" svg:height="0.027cm" svg:x="2.146cm" svg:y="21.943cm" svg:viewBox="0 0 28 28" draw:points="0,0 28,0 28,28 0,28">
          <text:p/>
        </draw:polygon>
        <draw:polygon draw:style-name="gr269" draw:text-style-name="P267" draw:layer="layout" svg:width="0.027cm" svg:height="0.027cm" svg:x="2.199cm" svg:y="21.943cm" svg:viewBox="0 0 28 28" draw:points="0,0 28,0 28,28 0,28">
          <text:p/>
        </draw:polygon>
        <draw:polygon draw:style-name="gr269" draw:text-style-name="P267" draw:layer="layout" svg:width="0.027cm" svg:height="0.027cm" svg:x="2.252cm" svg:y="21.943cm" svg:viewBox="0 0 28 28" draw:points="0,0 28,0 28,28 0,28">
          <text:p/>
        </draw:polygon>
        <draw:polygon draw:style-name="gr269" draw:text-style-name="P267" draw:layer="layout" svg:width="0.027cm" svg:height="0.027cm" svg:x="2.305cm" svg:y="21.943cm" svg:viewBox="0 0 28 28" draw:points="0,0 28,0 28,28 0,28">
          <text:p/>
        </draw:polygon>
        <draw:polygon draw:style-name="gr269" draw:text-style-name="P267" draw:layer="layout" svg:width="0.027cm" svg:height="0.027cm" svg:x="2.358cm" svg:y="21.943cm" svg:viewBox="0 0 28 28" draw:points="0,0 28,0 28,28 0,28">
          <text:p/>
        </draw:polygon>
        <draw:polygon draw:style-name="gr269" draw:text-style-name="P267" draw:layer="layout" svg:width="0.027cm" svg:height="0.027cm" svg:x="2.411cm" svg:y="21.943cm" svg:viewBox="0 0 28 28" draw:points="0,0 28,0 28,28 0,28">
          <text:p/>
        </draw:polygon>
        <draw:polygon draw:style-name="gr269" draw:text-style-name="P267" draw:layer="layout" svg:width="0.027cm" svg:height="0.027cm" svg:x="2.464cm" svg:y="21.943cm" svg:viewBox="0 0 28 28" draw:points="0,0 28,0 28,28 0,28">
          <text:p/>
        </draw:polygon>
        <draw:polygon draw:style-name="gr269" draw:text-style-name="P267" draw:layer="layout" svg:width="0.027cm" svg:height="0.027cm" svg:x="2.517cm" svg:y="21.943cm" svg:viewBox="0 0 28 28" draw:points="0,0 28,0 28,28 0,28">
          <text:p/>
        </draw:polygon>
        <draw:polygon draw:style-name="gr269" draw:text-style-name="P267" draw:layer="layout" svg:width="0.027cm" svg:height="0.027cm" svg:x="2.57cm" svg:y="21.943cm" svg:viewBox="0 0 28 28" draw:points="0,0 28,0 28,28 0,28">
          <text:p/>
        </draw:polygon>
        <draw:polygon draw:style-name="gr269" draw:text-style-name="P267" draw:layer="layout" svg:width="0.027cm" svg:height="0.027cm" svg:x="2.623cm" svg:y="21.943cm" svg:viewBox="0 0 28 28" draw:points="0,0 28,0 28,28 0,28">
          <text:p/>
        </draw:polygon>
        <draw:polygon draw:style-name="gr269" draw:text-style-name="P267" draw:layer="layout" svg:width="0.027cm" svg:height="0.027cm" svg:x="2.676cm" svg:y="21.943cm" svg:viewBox="0 0 28 28" draw:points="0,0 28,0 28,28 0,28">
          <text:p/>
        </draw:polygon>
        <draw:polygon draw:style-name="gr269" draw:text-style-name="P267" draw:layer="layout" svg:width="0.027cm" svg:height="0.027cm" svg:x="2.729cm" svg:y="21.943cm" svg:viewBox="0 0 28 28" draw:points="0,0 28,0 28,28 0,28">
          <text:p/>
        </draw:polygon>
        <draw:polygon draw:style-name="gr269" draw:text-style-name="P267" draw:layer="layout" svg:width="0.027cm" svg:height="0.027cm" svg:x="2.782cm" svg:y="21.943cm" svg:viewBox="0 0 28 28" draw:points="0,0 28,0 28,28 0,28">
          <text:p/>
        </draw:polygon>
        <draw:polygon draw:style-name="gr269" draw:text-style-name="P267" draw:layer="layout" svg:width="0.027cm" svg:height="0.027cm" svg:x="2.835cm" svg:y="21.943cm" svg:viewBox="0 0 28 28" draw:points="0,0 28,0 28,28 0,28">
          <text:p/>
        </draw:polygon>
        <draw:polygon draw:style-name="gr269" draw:text-style-name="P267" draw:layer="layout" svg:width="0.027cm" svg:height="0.027cm" svg:x="2.888cm" svg:y="21.943cm" svg:viewBox="0 0 28 28" draw:points="0,0 28,0 28,28 0,28">
          <text:p/>
        </draw:polygon>
        <draw:polygon draw:style-name="gr269" draw:text-style-name="P267" draw:layer="layout" svg:width="0.027cm" svg:height="0.027cm" svg:x="2.941cm" svg:y="21.943cm" svg:viewBox="0 0 28 28" draw:points="0,0 28,0 28,28 0,28">
          <text:p/>
        </draw:polygon>
        <draw:polygon draw:style-name="gr269" draw:text-style-name="P267" draw:layer="layout" svg:width="0.027cm" svg:height="0.027cm" svg:x="2.994cm" svg:y="21.943cm" svg:viewBox="0 0 28 28" draw:points="0,0 28,0 28,28 0,28">
          <text:p/>
        </draw:polygon>
        <draw:polygon draw:style-name="gr269" draw:text-style-name="P267" draw:layer="layout" svg:width="0.027cm" svg:height="0.027cm" svg:x="3.047cm" svg:y="21.943cm" svg:viewBox="0 0 28 28" draw:points="0,0 28,0 28,28 0,28">
          <text:p/>
        </draw:polygon>
        <draw:polygon draw:style-name="gr269" draw:text-style-name="P267" draw:layer="layout" svg:width="0.027cm" svg:height="0.027cm" svg:x="3.1cm" svg:y="21.943cm" svg:viewBox="0 0 28 28" draw:points="0,0 28,0 28,28 0,28">
          <text:p/>
        </draw:polygon>
        <draw:polygon draw:style-name="gr269" draw:text-style-name="P267" draw:layer="layout" svg:width="0.027cm" svg:height="0.027cm" svg:x="3.153cm" svg:y="21.943cm" svg:viewBox="0 0 28 28" draw:points="0,0 28,0 28,28 0,28">
          <text:p/>
        </draw:polygon>
        <draw:polygon draw:style-name="gr269" draw:text-style-name="P267" draw:layer="layout" svg:width="0.027cm" svg:height="0.027cm" svg:x="3.206cm" svg:y="21.943cm" svg:viewBox="0 0 28 28" draw:points="0,0 28,0 28,28 0,28">
          <text:p/>
        </draw:polygon>
        <draw:polygon draw:style-name="gr269" draw:text-style-name="P267" draw:layer="layout" svg:width="0.027cm" svg:height="0.027cm" svg:x="3.259cm" svg:y="21.943cm" svg:viewBox="0 0 28 28" draw:points="0,0 28,0 28,28 0,28">
          <text:p/>
        </draw:polygon>
        <draw:polygon draw:style-name="gr269" draw:text-style-name="P267" draw:layer="layout" svg:width="0.027cm" svg:height="0.027cm" svg:x="3.312cm" svg:y="21.943cm" svg:viewBox="0 0 28 28" draw:points="0,0 28,0 28,28 0,28">
          <text:p/>
        </draw:polygon>
        <draw:polygon draw:style-name="gr269" draw:text-style-name="P267" draw:layer="layout" svg:width="0.027cm" svg:height="0.027cm" svg:x="3.365cm" svg:y="21.943cm" svg:viewBox="0 0 28 28" draw:points="0,0 28,0 28,28 0,28">
          <text:p/>
        </draw:polygon>
        <draw:polygon draw:style-name="gr269" draw:text-style-name="P267" draw:layer="layout" svg:width="0.028cm" svg:height="0.027cm" svg:x="3.418cm" svg:y="21.943cm" svg:viewBox="0 0 29 28" draw:points="0,0 29,0 29,28 0,28">
          <text:p/>
        </draw:polygon>
        <draw:polygon draw:style-name="gr269" draw:text-style-name="P267" draw:layer="layout" svg:width="0.027cm" svg:height="0.027cm" svg:x="3.471cm" svg:y="21.943cm" svg:viewBox="0 0 28 28" draw:points="0,0 28,0 28,28 0,28">
          <text:p/>
        </draw:polygon>
        <draw:polygon draw:style-name="gr269" draw:text-style-name="P267" draw:layer="layout" svg:width="0.027cm" svg:height="0.027cm" svg:x="3.524cm" svg:y="21.943cm" svg:viewBox="0 0 28 28" draw:points="0,0 28,0 28,28 0,28">
          <text:p/>
        </draw:polygon>
        <draw:polygon draw:style-name="gr269" draw:text-style-name="P267" draw:layer="layout" svg:width="0.027cm" svg:height="0.027cm" svg:x="3.577cm" svg:y="21.943cm" svg:viewBox="0 0 28 28" draw:points="0,0 28,0 28,28 0,28">
          <text:p/>
        </draw:polygon>
        <draw:polygon draw:style-name="gr269" draw:text-style-name="P267" draw:layer="layout" svg:width="0.027cm" svg:height="0.027cm" svg:x="3.63cm" svg:y="21.943cm" svg:viewBox="0 0 28 28" draw:points="0,0 28,0 28,28 0,28">
          <text:p/>
        </draw:polygon>
        <draw:polygon draw:style-name="gr269" draw:text-style-name="P267" draw:layer="layout" svg:width="0.027cm" svg:height="0.027cm" svg:x="3.683cm" svg:y="21.943cm" svg:viewBox="0 0 28 28" draw:points="0,0 28,0 28,28 0,28">
          <text:p/>
        </draw:polygon>
        <draw:polygon draw:style-name="gr269" draw:text-style-name="P267" draw:layer="layout" svg:width="0.027cm" svg:height="0.027cm" svg:x="3.736cm" svg:y="21.943cm" svg:viewBox="0 0 28 28" draw:points="0,0 28,0 28,28 0,28">
          <text:p/>
        </draw:polygon>
        <draw:polygon draw:style-name="gr269" draw:text-style-name="P267" draw:layer="layout" svg:width="0.027cm" svg:height="0.027cm" svg:x="3.789cm" svg:y="21.943cm" svg:viewBox="0 0 28 28" draw:points="0,0 28,0 28,28 0,28">
          <text:p/>
        </draw:polygon>
        <draw:polygon draw:style-name="gr269" draw:text-style-name="P267" draw:layer="layout" svg:width="0.027cm" svg:height="0.027cm" svg:x="3.842cm" svg:y="21.943cm" svg:viewBox="0 0 28 28" draw:points="0,0 28,0 28,28 0,28">
          <text:p/>
        </draw:polygon>
        <draw:polygon draw:style-name="gr269" draw:text-style-name="P267" draw:layer="layout" svg:width="0.027cm" svg:height="0.027cm" svg:x="3.895cm" svg:y="21.943cm" svg:viewBox="0 0 28 28" draw:points="0,0 28,0 28,28 0,28">
          <text:p/>
        </draw:polygon>
        <draw:polygon draw:style-name="gr269" draw:text-style-name="P267" draw:layer="layout" svg:width="0.027cm" svg:height="0.027cm" svg:x="3.948cm" svg:y="21.943cm" svg:viewBox="0 0 28 28" draw:points="0,0 28,0 28,28 0,28">
          <text:p/>
        </draw:polygon>
        <draw:polygon draw:style-name="gr269" draw:text-style-name="P267" draw:layer="layout" svg:width="0.027cm" svg:height="0.027cm" svg:x="4.001cm" svg:y="21.943cm" svg:viewBox="0 0 28 28" draw:points="0,0 28,0 28,28 0,28">
          <text:p/>
        </draw:polygon>
        <draw:polygon draw:style-name="gr269" draw:text-style-name="P267" draw:layer="layout" svg:width="0.027cm" svg:height="0.027cm" svg:x="4.054cm" svg:y="21.943cm" svg:viewBox="0 0 28 28" draw:points="0,0 28,0 28,28 0,28">
          <text:p/>
        </draw:polygon>
        <draw:polygon draw:style-name="gr269" draw:text-style-name="P267" draw:layer="layout" svg:width="0.027cm" svg:height="0.027cm" svg:x="4.107cm" svg:y="21.943cm" svg:viewBox="0 0 28 28" draw:points="0,0 28,0 28,28 0,28">
          <text:p/>
        </draw:polygon>
        <draw:polygon draw:style-name="gr269" draw:text-style-name="P267" draw:layer="layout" svg:width="0.027cm" svg:height="0.027cm" svg:x="4.16cm" svg:y="21.943cm" svg:viewBox="0 0 28 28" draw:points="0,0 28,0 28,28 0,28">
          <text:p/>
        </draw:polygon>
        <draw:polygon draw:style-name="gr269" draw:text-style-name="P267" draw:layer="layout" svg:width="0.027cm" svg:height="0.027cm" svg:x="4.213cm" svg:y="21.943cm" svg:viewBox="0 0 28 28" draw:points="0,0 28,0 28,28 0,28">
          <text:p/>
        </draw:polygon>
        <draw:polygon draw:style-name="gr269" draw:text-style-name="P267" draw:layer="layout" svg:width="0.027cm" svg:height="0.027cm" svg:x="4.266cm" svg:y="21.943cm" svg:viewBox="0 0 28 28" draw:points="0,0 28,0 28,28 0,28">
          <text:p/>
        </draw:polygon>
        <draw:polygon draw:style-name="gr269" draw:text-style-name="P267" draw:layer="layout" svg:width="0.027cm" svg:height="0.027cm" svg:x="4.319cm" svg:y="21.943cm" svg:viewBox="0 0 28 28" draw:points="0,0 28,0 28,28 0,28">
          <text:p/>
        </draw:polygon>
        <draw:polygon draw:style-name="gr269" draw:text-style-name="P267" draw:layer="layout" svg:width="0.027cm" svg:height="0.027cm" svg:x="4.372cm" svg:y="21.943cm" svg:viewBox="0 0 28 28" draw:points="0,0 28,0 28,28 0,28">
          <text:p/>
        </draw:polygon>
        <draw:polygon draw:style-name="gr269" draw:text-style-name="P267" draw:layer="layout" svg:width="0.027cm" svg:height="0.027cm" svg:x="4.425cm" svg:y="21.943cm" svg:viewBox="0 0 28 28" draw:points="0,0 28,0 28,28 0,28">
          <text:p/>
        </draw:polygon>
        <draw:polygon draw:style-name="gr269" draw:text-style-name="P267" draw:layer="layout" svg:width="0.027cm" svg:height="0.027cm" svg:x="4.478cm" svg:y="21.943cm" svg:viewBox="0 0 28 28" draw:points="0,0 28,0 28,28 0,28">
          <text:p/>
        </draw:polygon>
        <draw:polygon draw:style-name="gr269" draw:text-style-name="P267" draw:layer="layout" svg:width="0.027cm" svg:height="0.027cm" svg:x="4.531cm" svg:y="21.943cm" svg:viewBox="0 0 28 28" draw:points="0,0 28,0 28,28 0,28">
          <text:p/>
        </draw:polygon>
        <draw:polygon draw:style-name="gr269" draw:text-style-name="P267" draw:layer="layout" svg:width="0.027cm" svg:height="0.027cm" svg:x="4.584cm" svg:y="21.943cm" svg:viewBox="0 0 28 28" draw:points="0,0 28,0 28,28 0,28">
          <text:p/>
        </draw:polygon>
        <draw:polygon draw:style-name="gr269" draw:text-style-name="P267" draw:layer="layout" svg:width="0.027cm" svg:height="0.027cm" svg:x="4.637cm" svg:y="21.943cm" svg:viewBox="0 0 28 28" draw:points="0,0 28,0 28,28 0,28">
          <text:p/>
        </draw:polygon>
        <draw:polygon draw:style-name="gr269" draw:text-style-name="P267" draw:layer="layout" svg:width="0.027cm" svg:height="0.027cm" svg:x="4.69cm" svg:y="21.943cm" svg:viewBox="0 0 28 28" draw:points="0,0 28,0 28,28 0,28">
          <text:p/>
        </draw:polygon>
        <draw:polygon draw:style-name="gr269" draw:text-style-name="P267" draw:layer="layout" svg:width="0.027cm" svg:height="0.027cm" svg:x="4.743cm" svg:y="21.943cm" svg:viewBox="0 0 28 28" draw:points="0,0 28,0 28,28 0,28">
          <text:p/>
        </draw:polygon>
        <draw:polygon draw:style-name="gr269" draw:text-style-name="P267" draw:layer="layout" svg:width="0.028cm" svg:height="0.027cm" svg:x="4.796cm" svg:y="21.943cm" svg:viewBox="0 0 29 28" draw:points="0,0 29,0 29,28 0,28">
          <text:p/>
        </draw:polygon>
        <draw:polygon draw:style-name="gr269" draw:text-style-name="P267" draw:layer="layout" svg:width="0.027cm" svg:height="0.027cm" svg:x="4.849cm" svg:y="21.943cm" svg:viewBox="0 0 28 28" draw:points="0,0 28,0 28,28 0,28">
          <text:p/>
        </draw:polygon>
        <draw:polygon draw:style-name="gr269" draw:text-style-name="P267" draw:layer="layout" svg:width="0.027cm" svg:height="0.027cm" svg:x="4.902cm" svg:y="21.943cm" svg:viewBox="0 0 28 28" draw:points="0,0 28,0 28,28 0,28">
          <text:p/>
        </draw:polygon>
        <draw:polygon draw:style-name="gr269" draw:text-style-name="P267" draw:layer="layout" svg:width="0.027cm" svg:height="0.027cm" svg:x="4.955cm" svg:y="21.943cm" svg:viewBox="0 0 28 28" draw:points="0,0 28,0 28,28 0,28">
          <text:p/>
        </draw:polygon>
        <draw:polygon draw:style-name="gr269" draw:text-style-name="P267" draw:layer="layout" svg:width="0.027cm" svg:height="0.027cm" svg:x="5.008cm" svg:y="21.943cm" svg:viewBox="0 0 28 28" draw:points="0,0 28,0 28,28 0,28">
          <text:p/>
        </draw:polygon>
        <draw:polygon draw:style-name="gr269" draw:text-style-name="P267" draw:layer="layout" svg:width="0.027cm" svg:height="0.027cm" svg:x="5.061cm" svg:y="21.943cm" svg:viewBox="0 0 28 28" draw:points="0,0 28,0 28,28 0,28">
          <text:p/>
        </draw:polygon>
        <draw:polygon draw:style-name="gr269" draw:text-style-name="P267" draw:layer="layout" svg:width="0.027cm" svg:height="0.027cm" svg:x="5.114cm" svg:y="21.943cm" svg:viewBox="0 0 28 28" draw:points="0,0 28,0 28,28 0,28">
          <text:p/>
        </draw:polygon>
        <draw:polygon draw:style-name="gr269" draw:text-style-name="P267" draw:layer="layout" svg:width="0.027cm" svg:height="0.027cm" svg:x="5.167cm" svg:y="21.943cm" svg:viewBox="0 0 28 28" draw:points="0,0 28,0 28,28 0,28">
          <text:p/>
        </draw:polygon>
        <draw:polygon draw:style-name="gr269" draw:text-style-name="P267" draw:layer="layout" svg:width="0.027cm" svg:height="0.027cm" svg:x="5.22cm" svg:y="21.943cm" svg:viewBox="0 0 28 28" draw:points="0,0 28,0 28,28 0,28">
          <text:p/>
        </draw:polygon>
        <draw:polygon draw:style-name="gr269" draw:text-style-name="P267" draw:layer="layout" svg:width="0.027cm" svg:height="0.027cm" svg:x="5.273cm" svg:y="21.943cm" svg:viewBox="0 0 28 28" draw:points="0,0 28,0 28,28 0,28">
          <text:p/>
        </draw:polygon>
        <draw:polygon draw:style-name="gr269" draw:text-style-name="P267" draw:layer="layout" svg:width="0.027cm" svg:height="0.027cm" svg:x="5.326cm" svg:y="21.943cm" svg:viewBox="0 0 28 28" draw:points="0,0 28,0 28,28 0,28">
          <text:p/>
        </draw:polygon>
        <draw:polygon draw:style-name="gr269" draw:text-style-name="P267" draw:layer="layout" svg:width="0.027cm" svg:height="0.027cm" svg:x="5.379cm" svg:y="21.943cm" svg:viewBox="0 0 28 28" draw:points="0,0 28,0 28,28 0,28">
          <text:p/>
        </draw:polygon>
        <draw:polygon draw:style-name="gr269" draw:text-style-name="P267" draw:layer="layout" svg:width="0.027cm" svg:height="0.027cm" svg:x="5.432cm" svg:y="21.943cm" svg:viewBox="0 0 28 28" draw:points="0,0 28,0 28,28 0,28">
          <text:p/>
        </draw:polygon>
        <draw:polygon draw:style-name="gr269" draw:text-style-name="P267" draw:layer="layout" svg:width="0.027cm" svg:height="0.027cm" svg:x="5.485cm" svg:y="21.943cm" svg:viewBox="0 0 28 28" draw:points="0,0 28,0 28,28 0,28">
          <text:p/>
        </draw:polygon>
        <draw:polygon draw:style-name="gr269" draw:text-style-name="P267" draw:layer="layout" svg:width="0.027cm" svg:height="0.027cm" svg:x="5.538cm" svg:y="21.943cm" svg:viewBox="0 0 28 28" draw:points="0,0 28,0 28,28 0,28">
          <text:p/>
        </draw:polygon>
        <draw:polygon draw:style-name="gr269" draw:text-style-name="P267" draw:layer="layout" svg:width="0.027cm" svg:height="0.027cm" svg:x="5.591cm" svg:y="21.943cm" svg:viewBox="0 0 28 28" draw:points="0,0 28,0 28,28 0,28">
          <text:p/>
        </draw:polygon>
        <draw:polygon draw:style-name="gr269" draw:text-style-name="P267" draw:layer="layout" svg:width="0.027cm" svg:height="0.027cm" svg:x="5.644cm" svg:y="21.943cm" svg:viewBox="0 0 28 28" draw:points="0,0 28,0 28,28 0,28">
          <text:p/>
        </draw:polygon>
        <draw:polygon draw:style-name="gr269" draw:text-style-name="P267" draw:layer="layout" svg:width="0.027cm" svg:height="0.027cm" svg:x="5.697cm" svg:y="21.943cm" svg:viewBox="0 0 28 28" draw:points="0,0 28,0 28,28 0,28">
          <text:p/>
        </draw:polygon>
        <draw:polygon draw:style-name="gr269" draw:text-style-name="P267" draw:layer="layout" svg:width="0.027cm" svg:height="0.027cm" svg:x="5.75cm" svg:y="21.943cm" svg:viewBox="0 0 28 28" draw:points="0,0 28,0 28,28 0,28">
          <text:p/>
        </draw:polygon>
        <draw:polygon draw:style-name="gr269" draw:text-style-name="P267" draw:layer="layout" svg:width="0.027cm" svg:height="0.027cm" svg:x="5.803cm" svg:y="21.943cm" svg:viewBox="0 0 28 28" draw:points="0,0 28,0 28,28 0,28">
          <text:p/>
        </draw:polygon>
        <draw:polygon draw:style-name="gr269" draw:text-style-name="P267" draw:layer="layout" svg:width="0.027cm" svg:height="0.027cm" svg:x="5.856cm" svg:y="21.943cm" svg:viewBox="0 0 28 28" draw:points="0,0 28,0 28,28 0,28">
          <text:p/>
        </draw:polygon>
        <draw:polygon draw:style-name="gr269" draw:text-style-name="P267" draw:layer="layout" svg:width="0.027cm" svg:height="0.027cm" svg:x="5.909cm" svg:y="21.943cm" svg:viewBox="0 0 28 28" draw:points="0,0 28,0 28,28 0,28">
          <text:p/>
        </draw:polygon>
        <draw:polygon draw:style-name="gr269" draw:text-style-name="P267" draw:layer="layout" svg:width="0.027cm" svg:height="0.027cm" svg:x="5.962cm" svg:y="21.943cm" svg:viewBox="0 0 28 28" draw:points="0,0 28,0 28,28 0,28">
          <text:p/>
        </draw:polygon>
        <draw:polygon draw:style-name="gr269" draw:text-style-name="P267" draw:layer="layout" svg:width="0.027cm" svg:height="0.027cm" svg:x="6.015cm" svg:y="21.943cm" svg:viewBox="0 0 28 28" draw:points="0,0 28,0 28,28 0,28">
          <text:p/>
        </draw:polygon>
        <draw:polygon draw:style-name="gr269" draw:text-style-name="P267" draw:layer="layout" svg:width="0.027cm" svg:height="0.027cm" svg:x="6.068cm" svg:y="21.943cm" svg:viewBox="0 0 28 28" draw:points="0,0 28,0 28,28 0,28">
          <text:p/>
        </draw:polygon>
        <draw:polygon draw:style-name="gr269" draw:text-style-name="P267" draw:layer="layout" svg:width="0.027cm" svg:height="0.027cm" svg:x="6.121cm" svg:y="21.943cm" svg:viewBox="0 0 28 28" draw:points="0,0 28,0 28,28 0,28">
          <text:p/>
        </draw:polygon>
        <draw:polygon draw:style-name="gr269" draw:text-style-name="P267" draw:layer="layout" svg:width="0.028cm" svg:height="0.027cm" svg:x="6.174cm" svg:y="21.943cm" svg:viewBox="0 0 29 28" draw:points="0,0 29,0 29,28 0,28">
          <text:p/>
        </draw:polygon>
        <draw:polygon draw:style-name="gr269" draw:text-style-name="P267" draw:layer="layout" svg:width="0.027cm" svg:height="0.027cm" svg:x="6.227cm" svg:y="21.943cm" svg:viewBox="0 0 28 28" draw:points="0,0 28,0 28,28 0,28">
          <text:p/>
        </draw:polygon>
        <draw:polygon draw:style-name="gr269" draw:text-style-name="P267" draw:layer="layout" svg:width="0.027cm" svg:height="0.027cm" svg:x="6.28cm" svg:y="21.943cm" svg:viewBox="0 0 28 28" draw:points="0,0 28,0 28,28 0,28">
          <text:p/>
        </draw:polygon>
        <draw:polygon draw:style-name="gr269" draw:text-style-name="P267" draw:layer="layout" svg:width="0.027cm" svg:height="0.027cm" svg:x="6.333cm" svg:y="21.943cm" svg:viewBox="0 0 28 28" draw:points="0,0 28,0 28,28 0,28">
          <text:p/>
        </draw:polygon>
        <draw:polygon draw:style-name="gr269" draw:text-style-name="P267" draw:layer="layout" svg:width="0.026cm" svg:height="0.027cm" svg:x="6.387cm" svg:y="21.943cm" svg:viewBox="0 0 27 28" draw:points="0,0 27,0 27,28 0,28">
          <text:p/>
        </draw:polygon>
        <draw:polygon draw:style-name="gr269" draw:text-style-name="P267" draw:layer="layout" svg:width="0.026cm" svg:height="0.027cm" svg:x="6.44cm" svg:y="21.943cm" svg:viewBox="0 0 27 28" draw:points="0,0 27,0 27,28 0,28">
          <text:p/>
        </draw:polygon>
        <draw:polygon draw:style-name="gr269" draw:text-style-name="P267" draw:layer="layout" svg:width="0.026cm" svg:height="0.027cm" svg:x="6.493cm" svg:y="21.943cm" svg:viewBox="0 0 27 28" draw:points="0,0 27,0 27,28 0,28">
          <text:p/>
        </draw:polygon>
        <draw:polygon draw:style-name="gr269" draw:text-style-name="P267" draw:layer="layout" svg:width="0.026cm" svg:height="0.027cm" svg:x="6.546cm" svg:y="21.943cm" svg:viewBox="0 0 27 28" draw:points="0,0 27,0 27,28 0,28">
          <text:p/>
        </draw:polygon>
        <draw:polygon draw:style-name="gr269" draw:text-style-name="P267" draw:layer="layout" svg:width="0.026cm" svg:height="0.027cm" svg:x="6.599cm" svg:y="21.943cm" svg:viewBox="0 0 27 28" draw:points="0,0 27,0 27,28 0,28">
          <text:p/>
        </draw:polygon>
        <draw:polygon draw:style-name="gr269" draw:text-style-name="P267" draw:layer="layout" svg:width="0.026cm" svg:height="0.027cm" svg:x="6.652cm" svg:y="21.943cm" svg:viewBox="0 0 27 28" draw:points="0,0 27,0 27,28 0,28">
          <text:p/>
        </draw:polygon>
        <draw:polygon draw:style-name="gr269" draw:text-style-name="P267" draw:layer="layout" svg:width="0.026cm" svg:height="0.027cm" svg:x="6.705cm" svg:y="21.943cm" svg:viewBox="0 0 27 28" draw:points="0,0 27,0 27,28 0,28">
          <text:p/>
        </draw:polygon>
        <draw:polygon draw:style-name="gr269" draw:text-style-name="P267" draw:layer="layout" svg:width="0.026cm" svg:height="0.027cm" svg:x="6.758cm" svg:y="21.943cm" svg:viewBox="0 0 27 28" draw:points="0,0 27,0 27,28 0,28">
          <text:p/>
        </draw:polygon>
        <draw:polygon draw:style-name="gr269" draw:text-style-name="P267" draw:layer="layout" svg:width="0.026cm" svg:height="0.027cm" svg:x="6.811cm" svg:y="21.943cm" svg:viewBox="0 0 27 28" draw:points="0,0 27,0 27,28 0,28">
          <text:p/>
        </draw:polygon>
        <draw:polygon draw:style-name="gr269" draw:text-style-name="P267" draw:layer="layout" svg:width="0.026cm" svg:height="0.027cm" svg:x="6.864cm" svg:y="21.943cm" svg:viewBox="0 0 27 28" draw:points="0,0 27,0 27,28 0,28">
          <text:p/>
        </draw:polygon>
        <draw:polygon draw:style-name="gr269" draw:text-style-name="P267" draw:layer="layout" svg:width="0.026cm" svg:height="0.027cm" svg:x="6.917cm" svg:y="21.943cm" svg:viewBox="0 0 27 28" draw:points="0,0 27,0 27,28 0,28">
          <text:p/>
        </draw:polygon>
        <draw:polygon draw:style-name="gr269" draw:text-style-name="P267" draw:layer="layout" svg:width="0.026cm" svg:height="0.027cm" svg:x="6.97cm" svg:y="21.943cm" svg:viewBox="0 0 27 28" draw:points="0,0 27,0 27,28 0,28">
          <text:p/>
        </draw:polygon>
        <draw:polygon draw:style-name="gr269" draw:text-style-name="P267" draw:layer="layout" svg:width="0.026cm" svg:height="0.027cm" svg:x="7.023cm" svg:y="21.943cm" svg:viewBox="0 0 27 28" draw:points="0,0 27,0 27,28 0,28">
          <text:p/>
        </draw:polygon>
        <draw:polygon draw:style-name="gr269" draw:text-style-name="P267" draw:layer="layout" svg:width="0.026cm" svg:height="0.027cm" svg:x="7.076cm" svg:y="21.943cm" svg:viewBox="0 0 27 28" draw:points="0,0 27,0 27,28 0,28">
          <text:p/>
        </draw:polygon>
        <draw:polygon draw:style-name="gr269" draw:text-style-name="P267" draw:layer="layout" svg:width="0.026cm" svg:height="0.027cm" svg:x="7.129cm" svg:y="21.943cm" svg:viewBox="0 0 27 28" draw:points="0,0 27,0 27,28 0,28">
          <text:p/>
        </draw:polygon>
        <draw:polygon draw:style-name="gr269" draw:text-style-name="P267" draw:layer="layout" svg:width="0.026cm" svg:height="0.027cm" svg:x="7.182cm" svg:y="21.943cm" svg:viewBox="0 0 27 28" draw:points="0,0 27,0 27,28 0,28">
          <text:p/>
        </draw:polygon>
        <draw:polygon draw:style-name="gr269" draw:text-style-name="P267" draw:layer="layout" svg:width="0.026cm" svg:height="0.027cm" svg:x="7.235cm" svg:y="21.943cm" svg:viewBox="0 0 27 28" draw:points="0,0 27,0 27,28 0,28">
          <text:p/>
        </draw:polygon>
        <draw:polygon draw:style-name="gr269" draw:text-style-name="P267" draw:layer="layout" svg:width="0.026cm" svg:height="0.027cm" svg:x="7.288cm" svg:y="21.943cm" svg:viewBox="0 0 27 28" draw:points="0,0 27,0 27,28 0,28">
          <text:p/>
        </draw:polygon>
        <draw:polygon draw:style-name="gr269" draw:text-style-name="P267" draw:layer="layout" svg:width="0.026cm" svg:height="0.027cm" svg:x="7.341cm" svg:y="21.943cm" svg:viewBox="0 0 27 28" draw:points="0,0 27,0 27,28 0,28">
          <text:p/>
        </draw:polygon>
        <draw:polygon draw:style-name="gr269" draw:text-style-name="P267" draw:layer="layout" svg:width="0.026cm" svg:height="0.027cm" svg:x="7.394cm" svg:y="21.943cm" svg:viewBox="0 0 27 28" draw:points="0,0 27,0 27,28 0,28">
          <text:p/>
        </draw:polygon>
        <draw:polygon draw:style-name="gr269" draw:text-style-name="P267" draw:layer="layout" svg:width="0.026cm" svg:height="0.027cm" svg:x="7.447cm" svg:y="21.943cm" svg:viewBox="0 0 27 28" draw:points="0,0 27,0 27,28 0,28">
          <text:p/>
        </draw:polygon>
        <draw:polygon draw:style-name="gr269" draw:text-style-name="P267" draw:layer="layout" svg:width="0.026cm" svg:height="0.027cm" svg:x="7.5cm" svg:y="21.943cm" svg:viewBox="0 0 27 28" draw:points="0,0 27,0 27,28 0,28">
          <text:p/>
        </draw:polygon>
        <draw:polygon draw:style-name="gr269" draw:text-style-name="P267" draw:layer="layout" svg:width="0.026cm" svg:height="0.027cm" svg:x="7.553cm" svg:y="21.943cm" svg:viewBox="0 0 27 28" draw:points="0,0 27,0 27,28 0,28">
          <text:p/>
        </draw:polygon>
        <draw:polygon draw:style-name="gr269" draw:text-style-name="P267" draw:layer="layout" svg:width="0.026cm" svg:height="0.027cm" svg:x="7.606cm" svg:y="21.943cm" svg:viewBox="0 0 27 28" draw:points="0,0 27,0 27,28 0,28">
          <text:p/>
        </draw:polygon>
        <draw:polygon draw:style-name="gr269" draw:text-style-name="P267" draw:layer="layout" svg:width="0.026cm" svg:height="0.027cm" svg:x="7.659cm" svg:y="21.943cm" svg:viewBox="0 0 27 28" draw:points="0,0 27,0 27,28 0,28">
          <text:p/>
        </draw:polygon>
        <draw:polygon draw:style-name="gr269" draw:text-style-name="P267" draw:layer="layout" svg:width="0.026cm" svg:height="0.027cm" svg:x="7.712cm" svg:y="21.943cm" svg:viewBox="0 0 27 28" draw:points="0,0 27,0 27,28 0,28">
          <text:p/>
        </draw:polygon>
        <draw:polygon draw:style-name="gr269" draw:text-style-name="P267" draw:layer="layout" svg:width="0.026cm" svg:height="0.027cm" svg:x="7.765cm" svg:y="21.943cm" svg:viewBox="0 0 27 28" draw:points="0,0 27,0 27,28 0,28">
          <text:p/>
        </draw:polygon>
        <draw:polygon draw:style-name="gr269" draw:text-style-name="P267" draw:layer="layout" svg:width="0.026cm" svg:height="0.027cm" svg:x="7.818cm" svg:y="21.943cm" svg:viewBox="0 0 27 28" draw:points="0,0 27,0 27,28 0,28">
          <text:p/>
        </draw:polygon>
        <draw:polygon draw:style-name="gr269" draw:text-style-name="P267" draw:layer="layout" svg:width="0.026cm" svg:height="0.027cm" svg:x="7.871cm" svg:y="21.943cm" svg:viewBox="0 0 27 28" draw:points="0,0 27,0 27,28 0,28">
          <text:p/>
        </draw:polygon>
        <draw:polygon draw:style-name="gr269" draw:text-style-name="P267" draw:layer="layout" svg:width="0.026cm" svg:height="0.027cm" svg:x="7.924cm" svg:y="21.943cm" svg:viewBox="0 0 27 28" draw:points="0,0 27,0 27,28 0,28">
          <text:p/>
        </draw:polygon>
        <draw:polygon draw:style-name="gr269" draw:text-style-name="P267" draw:layer="layout" svg:width="0.026cm" svg:height="0.027cm" svg:x="7.977cm" svg:y="21.943cm" svg:viewBox="0 0 27 28" draw:points="0,0 27,0 27,28 0,28">
          <text:p/>
        </draw:polygon>
        <draw:polygon draw:style-name="gr269" draw:text-style-name="P267" draw:layer="layout" svg:width="0.026cm" svg:height="0.027cm" svg:x="8.03cm" svg:y="21.943cm" svg:viewBox="0 0 27 28" draw:points="0,0 27,0 27,28 0,28">
          <text:p/>
        </draw:polygon>
        <draw:polygon draw:style-name="gr269" draw:text-style-name="P267" draw:layer="layout" svg:width="0.026cm" svg:height="0.027cm" svg:x="8.083cm" svg:y="21.943cm" svg:viewBox="0 0 27 28" draw:points="0,0 27,0 27,28 0,28">
          <text:p/>
        </draw:polygon>
        <draw:polygon draw:style-name="gr269" draw:text-style-name="P267" draw:layer="layout" svg:width="0.026cm" svg:height="0.027cm" svg:x="8.136cm" svg:y="21.943cm" svg:viewBox="0 0 27 28" draw:points="0,0 27,0 27,28 0,28">
          <text:p/>
        </draw:polygon>
        <draw:polygon draw:style-name="gr269" draw:text-style-name="P267" draw:layer="layout" svg:width="0.026cm" svg:height="0.027cm" svg:x="8.189cm" svg:y="21.943cm" svg:viewBox="0 0 27 28" draw:points="0,0 27,0 27,28 0,28">
          <text:p/>
        </draw:polygon>
        <draw:polygon draw:style-name="gr269" draw:text-style-name="P267" draw:layer="layout" svg:width="0.026cm" svg:height="0.027cm" svg:x="8.242cm" svg:y="21.943cm" svg:viewBox="0 0 27 28" draw:points="0,0 27,0 27,28 0,28">
          <text:p/>
        </draw:polygon>
        <draw:polygon draw:style-name="gr269" draw:text-style-name="P267" draw:layer="layout" svg:width="0.026cm" svg:height="0.027cm" svg:x="8.295cm" svg:y="21.943cm" svg:viewBox="0 0 27 28" draw:points="0,0 27,0 27,28 0,28">
          <text:p/>
        </draw:polygon>
        <draw:polygon draw:style-name="gr269" draw:text-style-name="P267" draw:layer="layout" svg:width="0.026cm" svg:height="0.027cm" svg:x="8.348cm" svg:y="21.943cm" svg:viewBox="0 0 27 28" draw:points="0,0 27,0 27,28 0,28">
          <text:p/>
        </draw:polygon>
        <draw:polygon draw:style-name="gr269" draw:text-style-name="P267" draw:layer="layout" svg:width="0.026cm" svg:height="0.027cm" svg:x="8.401cm" svg:y="21.943cm" svg:viewBox="0 0 27 28" draw:points="0,0 27,0 27,28 0,28">
          <text:p/>
        </draw:polygon>
        <draw:polygon draw:style-name="gr269" draw:text-style-name="P267" draw:layer="layout" svg:width="0.026cm" svg:height="0.027cm" svg:x="8.454cm" svg:y="21.943cm" svg:viewBox="0 0 27 28" draw:points="0,0 27,0 27,28 0,28">
          <text:p/>
        </draw:polygon>
        <draw:polygon draw:style-name="gr269" draw:text-style-name="P267" draw:layer="layout" svg:width="0.026cm" svg:height="0.027cm" svg:x="8.507cm" svg:y="21.943cm" svg:viewBox="0 0 27 28" draw:points="0,0 27,0 27,28 0,28">
          <text:p/>
        </draw:polygon>
        <draw:polygon draw:style-name="gr269" draw:text-style-name="P267" draw:layer="layout" svg:width="0.026cm" svg:height="0.027cm" svg:x="8.56cm" svg:y="21.943cm" svg:viewBox="0 0 27 28" draw:points="0,0 27,0 27,28 0,28">
          <text:p/>
        </draw:polygon>
        <draw:polygon draw:style-name="gr269" draw:text-style-name="P267" draw:layer="layout" svg:width="0.026cm" svg:height="0.027cm" svg:x="8.613cm" svg:y="21.943cm" svg:viewBox="0 0 27 28" draw:points="0,0 27,0 27,28 0,28">
          <text:p/>
        </draw:polygon>
        <draw:polygon draw:style-name="gr269" draw:text-style-name="P267" draw:layer="layout" svg:width="0.026cm" svg:height="0.027cm" svg:x="8.666cm" svg:y="21.943cm" svg:viewBox="0 0 27 28" draw:points="0,0 27,0 27,28 0,28">
          <text:p/>
        </draw:polygon>
        <draw:polygon draw:style-name="gr269" draw:text-style-name="P267" draw:layer="layout" svg:width="0.026cm" svg:height="0.027cm" svg:x="8.719cm" svg:y="21.943cm" svg:viewBox="0 0 27 28" draw:points="0,0 27,0 27,28 0,28">
          <text:p/>
        </draw:polygon>
        <draw:polygon draw:style-name="gr269" draw:text-style-name="P267" draw:layer="layout" svg:width="0.026cm" svg:height="0.027cm" svg:x="8.772cm" svg:y="21.943cm" svg:viewBox="0 0 27 28" draw:points="0,0 27,0 27,28 0,28">
          <text:p/>
        </draw:polygon>
        <draw:polygon draw:style-name="gr269" draw:text-style-name="P267" draw:layer="layout" svg:width="0.026cm" svg:height="0.027cm" svg:x="8.825cm" svg:y="21.943cm" svg:viewBox="0 0 27 28" draw:points="0,0 27,0 27,28 0,28">
          <text:p/>
        </draw:polygon>
        <draw:polygon draw:style-name="gr269" draw:text-style-name="P267" draw:layer="layout" svg:width="0.026cm" svg:height="0.027cm" svg:x="8.878cm" svg:y="21.943cm" svg:viewBox="0 0 27 28" draw:points="0,0 27,0 27,28 0,28">
          <text:p/>
        </draw:polygon>
        <draw:polygon draw:style-name="gr269" draw:text-style-name="P267" draw:layer="layout" svg:width="0.026cm" svg:height="0.027cm" svg:x="8.931cm" svg:y="21.943cm" svg:viewBox="0 0 27 28" draw:points="0,0 27,0 27,28 0,28">
          <text:p/>
        </draw:polygon>
        <draw:polygon draw:style-name="gr269" draw:text-style-name="P267" draw:layer="layout" svg:width="0.026cm" svg:height="0.027cm" svg:x="8.984cm" svg:y="21.943cm" svg:viewBox="0 0 27 28" draw:points="0,0 27,0 27,28 0,28">
          <text:p/>
        </draw:polygon>
        <draw:polygon draw:style-name="gr269" draw:text-style-name="P267" draw:layer="layout" svg:width="0.026cm" svg:height="0.027cm" svg:x="9.037cm" svg:y="21.943cm" svg:viewBox="0 0 27 28" draw:points="0,0 27,0 27,28 0,28">
          <text:p/>
        </draw:polygon>
        <draw:polygon draw:style-name="gr269" draw:text-style-name="P267" draw:layer="layout" svg:width="0.026cm" svg:height="0.027cm" svg:x="9.09cm" svg:y="21.943cm" svg:viewBox="0 0 27 28" draw:points="0,0 27,0 27,28 0,28">
          <text:p/>
        </draw:polygon>
        <draw:polygon draw:style-name="gr269" draw:text-style-name="P267" draw:layer="layout" svg:width="0.026cm" svg:height="0.027cm" svg:x="9.143cm" svg:y="21.943cm" svg:viewBox="0 0 27 28" draw:points="0,0 27,0 27,28 0,28">
          <text:p/>
        </draw:polygon>
        <draw:polygon draw:style-name="gr269" draw:text-style-name="P267" draw:layer="layout" svg:width="0.026cm" svg:height="0.027cm" svg:x="9.196cm" svg:y="21.943cm" svg:viewBox="0 0 27 28" draw:points="0,0 27,0 27,28 0,28">
          <text:p/>
        </draw:polygon>
        <draw:polygon draw:style-name="gr269" draw:text-style-name="P267" draw:layer="layout" svg:width="0.026cm" svg:height="0.027cm" svg:x="9.249cm" svg:y="21.943cm" svg:viewBox="0 0 27 28" draw:points="0,0 27,0 27,28 0,28">
          <text:p/>
        </draw:polygon>
        <draw:polygon draw:style-name="gr269" draw:text-style-name="P267" draw:layer="layout" svg:width="0.026cm" svg:height="0.027cm" svg:x="9.302cm" svg:y="21.943cm" svg:viewBox="0 0 27 28" draw:points="0,0 27,0 27,28 0,28">
          <text:p/>
        </draw:polygon>
        <draw:polygon draw:style-name="gr269" draw:text-style-name="P267" draw:layer="layout" svg:width="0.026cm" svg:height="0.027cm" svg:x="9.355cm" svg:y="21.943cm" svg:viewBox="0 0 27 28" draw:points="0,0 27,0 27,28 0,28">
          <text:p/>
        </draw:polygon>
        <draw:polygon draw:style-name="gr269" draw:text-style-name="P267" draw:layer="layout" svg:width="0.026cm" svg:height="0.027cm" svg:x="9.408cm" svg:y="21.943cm" svg:viewBox="0 0 27 28" draw:points="0,0 27,0 27,28 0,28">
          <text:p/>
        </draw:polygon>
        <draw:polygon draw:style-name="gr269" draw:text-style-name="P267" draw:layer="layout" svg:width="0.026cm" svg:height="0.027cm" svg:x="9.461cm" svg:y="21.943cm" svg:viewBox="0 0 27 28" draw:points="0,0 27,0 27,28 0,28">
          <text:p/>
        </draw:polygon>
        <draw:polygon draw:style-name="gr269" draw:text-style-name="P267" draw:layer="layout" svg:width="0.026cm" svg:height="0.027cm" svg:x="9.514cm" svg:y="21.943cm" svg:viewBox="0 0 27 28" draw:points="0,0 27,0 27,28 0,28">
          <text:p/>
        </draw:polygon>
        <draw:polygon draw:style-name="gr269" draw:text-style-name="P267" draw:layer="layout" svg:width="0.026cm" svg:height="0.027cm" svg:x="9.567cm" svg:y="21.943cm" svg:viewBox="0 0 27 28" draw:points="0,0 27,0 27,28 0,28">
          <text:p/>
        </draw:polygon>
        <draw:polygon draw:style-name="gr269" draw:text-style-name="P267" draw:layer="layout" svg:width="0.026cm" svg:height="0.027cm" svg:x="9.62cm" svg:y="21.943cm" svg:viewBox="0 0 27 28" draw:points="0,0 27,0 27,28 0,28">
          <text:p/>
        </draw:polygon>
        <draw:polygon draw:style-name="gr269" draw:text-style-name="P267" draw:layer="layout" svg:width="0.026cm" svg:height="0.027cm" svg:x="9.673cm" svg:y="21.943cm" svg:viewBox="0 0 27 28" draw:points="0,0 27,0 27,28 0,28">
          <text:p/>
        </draw:polygon>
        <draw:polygon draw:style-name="gr269" draw:text-style-name="P267" draw:layer="layout" svg:width="0.026cm" svg:height="0.027cm" svg:x="9.726cm" svg:y="21.943cm" svg:viewBox="0 0 27 28" draw:points="0,0 27,0 27,28 0,28">
          <text:p/>
        </draw:polygon>
        <draw:polygon draw:style-name="gr269" draw:text-style-name="P267" draw:layer="layout" svg:width="0.026cm" svg:height="0.027cm" svg:x="9.779cm" svg:y="21.943cm" svg:viewBox="0 0 27 28" draw:points="0,0 27,0 27,28 0,28">
          <text:p/>
        </draw:polygon>
        <draw:polygon draw:style-name="gr269" draw:text-style-name="P267" draw:layer="layout" svg:width="0.026cm" svg:height="0.027cm" svg:x="9.832cm" svg:y="21.943cm" svg:viewBox="0 0 27 28" draw:points="0,0 27,0 27,28 0,28">
          <text:p/>
        </draw:polygon>
        <draw:polygon draw:style-name="gr269" draw:text-style-name="P267" draw:layer="layout" svg:width="0.026cm" svg:height="0.027cm" svg:x="9.885cm" svg:y="21.943cm" svg:viewBox="0 0 27 28" draw:points="0,0 27,0 27,28 0,28">
          <text:p/>
        </draw:polygon>
        <draw:polygon draw:style-name="gr269" draw:text-style-name="P267" draw:layer="layout" svg:width="0.026cm" svg:height="0.027cm" svg:x="9.938cm" svg:y="21.943cm" svg:viewBox="0 0 27 28" draw:points="0,0 27,0 27,28 0,28">
          <text:p/>
        </draw:polygon>
        <draw:polygon draw:style-name="gr269" draw:text-style-name="P267" draw:layer="layout" svg:width="0.026cm" svg:height="0.027cm" svg:x="9.991cm" svg:y="21.943cm" svg:viewBox="0 0 27 28" draw:points="0,0 27,0 27,28 0,28">
          <text:p/>
        </draw:polygon>
        <draw:polygon draw:style-name="gr269" draw:text-style-name="P267" draw:layer="layout" svg:width="0.026cm" svg:height="0.027cm" svg:x="10.044cm" svg:y="21.943cm" svg:viewBox="0 0 27 28" draw:points="0,0 27,0 27,28 0,28">
          <text:p/>
        </draw:polygon>
        <draw:polygon draw:style-name="gr269" draw:text-style-name="P267" draw:layer="layout" svg:width="0.026cm" svg:height="0.027cm" svg:x="10.097cm" svg:y="21.943cm" svg:viewBox="0 0 27 28" draw:points="0,0 27,0 27,28 0,28">
          <text:p/>
        </draw:polygon>
        <draw:polygon draw:style-name="gr269" draw:text-style-name="P267" draw:layer="layout" svg:width="0.026cm" svg:height="0.027cm" svg:x="10.15cm" svg:y="21.943cm" svg:viewBox="0 0 27 28" draw:points="0,0 27,0 27,28 0,28">
          <text:p/>
        </draw:polygon>
        <draw:polygon draw:style-name="gr269" draw:text-style-name="P267" draw:layer="layout" svg:width="0.026cm" svg:height="0.027cm" svg:x="10.203cm" svg:y="21.943cm" svg:viewBox="0 0 27 28" draw:points="0,0 27,0 27,28 0,28">
          <text:p/>
        </draw:polygon>
        <draw:polygon draw:style-name="gr269" draw:text-style-name="P267" draw:layer="layout" svg:width="0.026cm" svg:height="0.027cm" svg:x="10.256cm" svg:y="21.943cm" svg:viewBox="0 0 27 28" draw:points="0,0 27,0 27,28 0,28">
          <text:p/>
        </draw:polygon>
        <draw:polygon draw:style-name="gr269" draw:text-style-name="P267" draw:layer="layout" svg:width="0.026cm" svg:height="0.027cm" svg:x="10.309cm" svg:y="21.943cm" svg:viewBox="0 0 27 28" draw:points="0,0 27,0 27,28 0,28">
          <text:p/>
        </draw:polygon>
        <draw:polygon draw:style-name="gr269" draw:text-style-name="P267" draw:layer="layout" svg:width="0.026cm" svg:height="0.027cm" svg:x="10.362cm" svg:y="21.943cm" svg:viewBox="0 0 27 28" draw:points="0,0 27,0 27,28 0,28">
          <text:p/>
        </draw:polygon>
        <draw:polygon draw:style-name="gr269" draw:text-style-name="P267" draw:layer="layout" svg:width="0.026cm" svg:height="0.027cm" svg:x="10.415cm" svg:y="21.943cm" svg:viewBox="0 0 27 28" draw:points="0,0 27,0 27,28 0,28">
          <text:p/>
        </draw:polygon>
        <draw:polygon draw:style-name="gr269" draw:text-style-name="P267" draw:layer="layout" svg:width="0.026cm" svg:height="0.027cm" svg:x="10.468cm" svg:y="21.943cm" svg:viewBox="0 0 27 28" draw:points="0,0 27,0 27,28 0,28">
          <text:p/>
        </draw:polygon>
        <draw:polygon draw:style-name="gr269" draw:text-style-name="P267" draw:layer="layout" svg:width="0.026cm" svg:height="0.027cm" svg:x="10.521cm" svg:y="21.943cm" svg:viewBox="0 0 27 28" draw:points="0,0 27,0 27,28 0,28">
          <text:p/>
        </draw:polygon>
        <draw:polygon draw:style-name="gr269" draw:text-style-name="P267" draw:layer="layout" svg:width="0.026cm" svg:height="0.027cm" svg:x="10.574cm" svg:y="21.943cm" svg:viewBox="0 0 27 28" draw:points="0,0 27,0 27,28 0,28">
          <text:p/>
        </draw:polygon>
        <draw:polygon draw:style-name="gr269" draw:text-style-name="P267" draw:layer="layout" svg:width="0.026cm" svg:height="0.027cm" svg:x="10.627cm" svg:y="21.943cm" svg:viewBox="0 0 27 28" draw:points="0,0 27,0 27,28 0,28">
          <text:p/>
        </draw:polygon>
        <draw:polygon draw:style-name="gr269" draw:text-style-name="P267" draw:layer="layout" svg:width="0.026cm" svg:height="0.027cm" svg:x="10.68cm" svg:y="21.943cm" svg:viewBox="0 0 27 28" draw:points="0,0 27,0 27,28 0,28">
          <text:p/>
        </draw:polygon>
        <draw:polygon draw:style-name="gr269" draw:text-style-name="P267" draw:layer="layout" svg:width="0.026cm" svg:height="0.027cm" svg:x="10.733cm" svg:y="21.943cm" svg:viewBox="0 0 27 28" draw:points="0,0 27,0 27,28 0,28">
          <text:p/>
        </draw:polygon>
        <draw:polygon draw:style-name="gr269" draw:text-style-name="P267" draw:layer="layout" svg:width="0.026cm" svg:height="0.027cm" svg:x="10.786cm" svg:y="21.943cm" svg:viewBox="0 0 27 28" draw:points="0,0 27,0 27,28 0,28">
          <text:p/>
        </draw:polygon>
        <draw:polygon draw:style-name="gr269" draw:text-style-name="P267" draw:layer="layout" svg:width="0.026cm" svg:height="0.027cm" svg:x="10.839cm" svg:y="21.943cm" svg:viewBox="0 0 27 28" draw:points="0,0 27,0 27,28 0,28">
          <text:p/>
        </draw:polygon>
        <draw:polygon draw:style-name="gr269" draw:text-style-name="P267" draw:layer="layout" svg:width="0.026cm" svg:height="0.027cm" svg:x="10.892cm" svg:y="21.943cm" svg:viewBox="0 0 27 28" draw:points="0,0 27,0 27,28 0,28">
          <text:p/>
        </draw:polygon>
        <draw:polygon draw:style-name="gr269" draw:text-style-name="P267" draw:layer="layout" svg:width="0.026cm" svg:height="0.027cm" svg:x="10.945cm" svg:y="21.943cm" svg:viewBox="0 0 27 28" draw:points="0,0 27,0 27,28 0,28">
          <text:p/>
        </draw:polygon>
        <draw:polygon draw:style-name="gr269" draw:text-style-name="P267" draw:layer="layout" svg:width="0.026cm" svg:height="0.027cm" svg:x="10.998cm" svg:y="21.943cm" svg:viewBox="0 0 27 28" draw:points="0,0 27,0 27,28 0,28">
          <text:p/>
        </draw:polygon>
        <draw:polygon draw:style-name="gr269" draw:text-style-name="P267" draw:layer="layout" svg:width="0.026cm" svg:height="0.027cm" svg:x="11.051cm" svg:y="21.943cm" svg:viewBox="0 0 27 28" draw:points="0,0 27,0 27,28 0,28">
          <text:p/>
        </draw:polygon>
        <draw:polygon draw:style-name="gr269" draw:text-style-name="P267" draw:layer="layout" svg:width="0.026cm" svg:height="0.027cm" svg:x="11.104cm" svg:y="21.943cm" svg:viewBox="0 0 27 28" draw:points="0,0 27,0 27,28 0,28">
          <text:p/>
        </draw:polygon>
        <draw:polygon draw:style-name="gr269" draw:text-style-name="P267" draw:layer="layout" svg:width="0.026cm" svg:height="0.027cm" svg:x="11.157cm" svg:y="21.943cm" svg:viewBox="0 0 27 28" draw:points="0,0 27,0 27,28 0,28">
          <text:p/>
        </draw:polygon>
        <draw:polygon draw:style-name="gr269" draw:text-style-name="P267" draw:layer="layout" svg:width="0.026cm" svg:height="0.027cm" svg:x="11.21cm" svg:y="21.943cm" svg:viewBox="0 0 27 28" draw:points="0,0 27,0 27,28 0,28">
          <text:p/>
        </draw:polygon>
        <draw:polygon draw:style-name="gr269" draw:text-style-name="P267" draw:layer="layout" svg:width="0.026cm" svg:height="0.027cm" svg:x="11.263cm" svg:y="21.943cm" svg:viewBox="0 0 27 28" draw:points="0,0 27,0 27,28 0,28">
          <text:p/>
        </draw:polygon>
        <draw:polygon draw:style-name="gr269" draw:text-style-name="P267" draw:layer="layout" svg:width="0.026cm" svg:height="0.027cm" svg:x="11.316cm" svg:y="21.943cm" svg:viewBox="0 0 27 28" draw:points="0,0 27,0 27,28 0,28">
          <text:p/>
        </draw:polygon>
        <draw:polygon draw:style-name="gr269" draw:text-style-name="P267" draw:layer="layout" svg:width="0.026cm" svg:height="0.027cm" svg:x="11.369cm" svg:y="21.943cm" svg:viewBox="0 0 27 28" draw:points="0,0 27,0 27,28 0,28">
          <text:p/>
        </draw:polygon>
        <draw:polygon draw:style-name="gr269" draw:text-style-name="P267" draw:layer="layout" svg:width="0.026cm" svg:height="0.027cm" svg:x="11.422cm" svg:y="21.943cm" svg:viewBox="0 0 27 28" draw:points="0,0 27,0 27,28 0,28">
          <text:p/>
        </draw:polygon>
        <draw:polygon draw:style-name="gr269" draw:text-style-name="P267" draw:layer="layout" svg:width="0.026cm" svg:height="0.027cm" svg:x="11.475cm" svg:y="21.943cm" svg:viewBox="0 0 27 28" draw:points="0,0 27,0 27,28 0,28">
          <text:p/>
        </draw:polygon>
        <draw:polygon draw:style-name="gr269" draw:text-style-name="P267" draw:layer="layout" svg:width="0.026cm" svg:height="0.027cm" svg:x="11.528cm" svg:y="21.943cm" svg:viewBox="0 0 27 28" draw:points="0,0 27,0 27,28 0,28">
          <text:p/>
        </draw:polygon>
        <draw:polygon draw:style-name="gr269" draw:text-style-name="P267" draw:layer="layout" svg:width="0.026cm" svg:height="0.027cm" svg:x="11.581cm" svg:y="21.943cm" svg:viewBox="0 0 27 28" draw:points="0,0 27,0 27,28 0,28">
          <text:p/>
        </draw:polygon>
        <draw:polygon draw:style-name="gr269" draw:text-style-name="P267" draw:layer="layout" svg:width="0.026cm" svg:height="0.027cm" svg:x="11.634cm" svg:y="21.943cm" svg:viewBox="0 0 27 28" draw:points="0,0 27,0 27,28 0,28">
          <text:p/>
        </draw:polygon>
        <draw:polygon draw:style-name="gr269" draw:text-style-name="P267" draw:layer="layout" svg:width="0.026cm" svg:height="0.027cm" svg:x="11.687cm" svg:y="21.943cm" svg:viewBox="0 0 27 28" draw:points="0,0 27,0 27,28 0,28">
          <text:p/>
        </draw:polygon>
        <draw:polygon draw:style-name="gr269" draw:text-style-name="P267" draw:layer="layout" svg:width="0.026cm" svg:height="0.027cm" svg:x="11.74cm" svg:y="21.943cm" svg:viewBox="0 0 27 28" draw:points="0,0 27,0 27,28 0,28">
          <text:p/>
        </draw:polygon>
        <draw:polygon draw:style-name="gr269" draw:text-style-name="P267" draw:layer="layout" svg:width="0.026cm" svg:height="0.027cm" svg:x="11.793cm" svg:y="21.943cm" svg:viewBox="0 0 27 28" draw:points="0,0 27,0 27,28 0,28">
          <text:p/>
        </draw:polygon>
        <draw:polygon draw:style-name="gr269" draw:text-style-name="P267" draw:layer="layout" svg:width="0.026cm" svg:height="0.027cm" svg:x="11.846cm" svg:y="21.943cm" svg:viewBox="0 0 27 28" draw:points="0,0 27,0 27,28 0,28">
          <text:p/>
        </draw:polygon>
        <draw:polygon draw:style-name="gr269" draw:text-style-name="P267" draw:layer="layout" svg:width="0.026cm" svg:height="0.027cm" svg:x="11.899cm" svg:y="21.943cm" svg:viewBox="0 0 27 28" draw:points="0,0 27,0 27,28 0,28">
          <text:p/>
        </draw:polygon>
        <draw:polygon draw:style-name="gr269" draw:text-style-name="P267" draw:layer="layout" svg:width="0.026cm" svg:height="0.027cm" svg:x="11.952cm" svg:y="21.943cm" svg:viewBox="0 0 27 28" draw:points="0,0 27,0 27,28 0,28">
          <text:p/>
        </draw:polygon>
        <draw:polygon draw:style-name="gr269" draw:text-style-name="P267" draw:layer="layout" svg:width="0.026cm" svg:height="0.027cm" svg:x="12.005cm" svg:y="21.943cm" svg:viewBox="0 0 27 28" draw:points="0,0 27,0 27,28 0,28">
          <text:p/>
        </draw:polygon>
        <draw:polygon draw:style-name="gr269" draw:text-style-name="P267" draw:layer="layout" svg:width="0.026cm" svg:height="0.027cm" svg:x="12.058cm" svg:y="21.943cm" svg:viewBox="0 0 27 28" draw:points="0,0 27,0 27,28 0,28">
          <text:p/>
        </draw:polygon>
        <draw:polygon draw:style-name="gr269" draw:text-style-name="P267" draw:layer="layout" svg:width="0.026cm" svg:height="0.027cm" svg:x="12.111cm" svg:y="21.943cm" svg:viewBox="0 0 27 28" draw:points="0,0 27,0 27,28 0,28">
          <text:p/>
        </draw:polygon>
        <draw:polygon draw:style-name="gr269" draw:text-style-name="P267" draw:layer="layout" svg:width="0.026cm" svg:height="0.027cm" svg:x="12.164cm" svg:y="21.943cm" svg:viewBox="0 0 27 28" draw:points="0,0 27,0 27,28 0,28">
          <text:p/>
        </draw:polygon>
        <draw:polygon draw:style-name="gr269" draw:text-style-name="P267" draw:layer="layout" svg:width="0.026cm" svg:height="0.027cm" svg:x="12.217cm" svg:y="21.943cm" svg:viewBox="0 0 27 28" draw:points="0,0 27,0 27,28 0,28">
          <text:p/>
        </draw:polygon>
        <draw:polygon draw:style-name="gr269" draw:text-style-name="P267" draw:layer="layout" svg:width="0.026cm" svg:height="0.027cm" svg:x="12.27cm" svg:y="21.943cm" svg:viewBox="0 0 27 28" draw:points="0,0 27,0 27,28 0,28">
          <text:p/>
        </draw:polygon>
        <draw:polygon draw:style-name="gr269" draw:text-style-name="P267" draw:layer="layout" svg:width="0.026cm" svg:height="0.027cm" svg:x="12.323cm" svg:y="21.943cm" svg:viewBox="0 0 27 28" draw:points="0,0 27,0 27,28 0,28">
          <text:p/>
        </draw:polygon>
        <draw:polygon draw:style-name="gr269" draw:text-style-name="P267" draw:layer="layout" svg:width="0.026cm" svg:height="0.027cm" svg:x="12.376cm" svg:y="21.943cm" svg:viewBox="0 0 27 28" draw:points="0,0 27,0 27,28 0,28">
          <text:p/>
        </draw:polygon>
        <draw:polygon draw:style-name="gr269" draw:text-style-name="P267" draw:layer="layout" svg:width="0.026cm" svg:height="0.027cm" svg:x="12.429cm" svg:y="21.943cm" svg:viewBox="0 0 27 28" draw:points="0,0 27,0 27,28 0,28">
          <text:p/>
        </draw:polygon>
        <draw:polygon draw:style-name="gr269" draw:text-style-name="P267" draw:layer="layout" svg:width="0.026cm" svg:height="0.027cm" svg:x="12.482cm" svg:y="21.943cm" svg:viewBox="0 0 27 28" draw:points="0,0 27,0 27,28 0,28">
          <text:p/>
        </draw:polygon>
        <draw:polygon draw:style-name="gr269" draw:text-style-name="P267" draw:layer="layout" svg:width="0.026cm" svg:height="0.027cm" svg:x="12.535cm" svg:y="21.943cm" svg:viewBox="0 0 27 28" draw:points="0,0 27,0 27,28 0,28">
          <text:p/>
        </draw:polygon>
        <draw:polygon draw:style-name="gr269" draw:text-style-name="P267" draw:layer="layout" svg:width="0.026cm" svg:height="0.027cm" svg:x="12.588cm" svg:y="21.943cm" svg:viewBox="0 0 27 28" draw:points="0,0 27,0 27,28 0,28">
          <text:p/>
        </draw:polygon>
        <draw:polygon draw:style-name="gr269" draw:text-style-name="P267" draw:layer="layout" svg:width="0.026cm" svg:height="0.027cm" svg:x="12.641cm" svg:y="21.943cm" svg:viewBox="0 0 27 28" draw:points="0,0 27,0 27,28 0,28">
          <text:p/>
        </draw:polygon>
        <draw:polygon draw:style-name="gr269" draw:text-style-name="P267" draw:layer="layout" svg:width="0.027cm" svg:height="0.027cm" svg:x="12.694cm" svg:y="21.943cm" svg:viewBox="0 0 28 28" draw:points="0,0 28,0 28,28 0,28">
          <text:p/>
        </draw:polygon>
        <draw:polygon draw:style-name="gr269" draw:text-style-name="P267" draw:layer="layout" svg:width="0.027cm" svg:height="0.027cm" svg:x="12.747cm" svg:y="21.943cm" svg:viewBox="0 0 28 28" draw:points="0,0 28,0 28,28 0,28">
          <text:p/>
        </draw:polygon>
        <draw:polygon draw:style-name="gr269" draw:text-style-name="P267" draw:layer="layout" svg:width="0.027cm" svg:height="0.027cm" svg:x="12.8cm" svg:y="21.943cm" svg:viewBox="0 0 28 28" draw:points="0,0 28,0 28,28 0,28">
          <text:p/>
        </draw:polygon>
        <draw:polygon draw:style-name="gr269" draw:text-style-name="P267" draw:layer="layout" svg:width="0.027cm" svg:height="0.027cm" svg:x="12.853cm" svg:y="21.943cm" svg:viewBox="0 0 28 28" draw:points="0,0 28,0 28,28 0,28">
          <text:p/>
        </draw:polygon>
        <draw:polygon draw:style-name="gr269" draw:text-style-name="P267" draw:layer="layout" svg:width="0.027cm" svg:height="0.027cm" svg:x="12.906cm" svg:y="21.943cm" svg:viewBox="0 0 28 28" draw:points="0,0 28,0 28,28 0,28">
          <text:p/>
        </draw:polygon>
        <draw:polygon draw:style-name="gr269" draw:text-style-name="P267" draw:layer="layout" svg:width="0.027cm" svg:height="0.027cm" svg:x="12.959cm" svg:y="21.943cm" svg:viewBox="0 0 28 28" draw:points="0,0 28,0 28,28 0,28">
          <text:p/>
        </draw:polygon>
        <draw:polygon draw:style-name="gr269" draw:text-style-name="P267" draw:layer="layout" svg:width="0.028cm" svg:height="0.027cm" svg:x="13.012cm" svg:y="21.943cm" svg:viewBox="0 0 29 28" draw:points="0,0 29,0 29,28 0,28">
          <text:p/>
        </draw:polygon>
        <draw:polygon draw:style-name="gr269" draw:text-style-name="P267" draw:layer="layout" svg:width="0.027cm" svg:height="0.027cm" svg:x="13.065cm" svg:y="21.943cm" svg:viewBox="0 0 28 28" draw:points="0,0 28,0 28,28 0,28">
          <text:p/>
        </draw:polygon>
        <draw:polygon draw:style-name="gr269" draw:text-style-name="P267" draw:layer="layout" svg:width="0.027cm" svg:height="0.027cm" svg:x="13.118cm" svg:y="21.943cm" svg:viewBox="0 0 28 28" draw:points="0,0 28,0 28,28 0,28">
          <text:p/>
        </draw:polygon>
        <draw:polygon draw:style-name="gr269" draw:text-style-name="P267" draw:layer="layout" svg:width="0.027cm" svg:height="0.027cm" svg:x="13.171cm" svg:y="21.943cm" svg:viewBox="0 0 28 28" draw:points="0,0 28,0 28,28 0,28">
          <text:p/>
        </draw:polygon>
        <draw:polygon draw:style-name="gr269" draw:text-style-name="P267" draw:layer="layout" svg:width="0.027cm" svg:height="0.027cm" svg:x="13.224cm" svg:y="21.943cm" svg:viewBox="0 0 28 28" draw:points="0,0 28,0 28,28 0,28">
          <text:p/>
        </draw:polygon>
        <draw:polygon draw:style-name="gr269" draw:text-style-name="P267" draw:layer="layout" svg:width="0.027cm" svg:height="0.027cm" svg:x="13.277cm" svg:y="21.943cm" svg:viewBox="0 0 28 28" draw:points="0,0 28,0 28,28 0,28">
          <text:p/>
        </draw:polygon>
        <draw:polygon draw:style-name="gr269" draw:text-style-name="P267" draw:layer="layout" svg:width="0.027cm" svg:height="0.027cm" svg:x="13.33cm" svg:y="21.943cm" svg:viewBox="0 0 28 28" draw:points="0,0 28,0 28,28 0,28">
          <text:p/>
        </draw:polygon>
        <draw:polygon draw:style-name="gr269" draw:text-style-name="P267" draw:layer="layout" svg:width="0.027cm" svg:height="0.027cm" svg:x="13.383cm" svg:y="21.943cm" svg:viewBox="0 0 28 28" draw:points="0,0 28,0 28,28 0,28">
          <text:p/>
        </draw:polygon>
        <draw:polygon draw:style-name="gr269" draw:text-style-name="P267" draw:layer="layout" svg:width="0.027cm" svg:height="0.027cm" svg:x="13.436cm" svg:y="21.943cm" svg:viewBox="0 0 28 28" draw:points="0,0 28,0 28,28 0,28">
          <text:p/>
        </draw:polygon>
        <draw:polygon draw:style-name="gr269" draw:text-style-name="P267" draw:layer="layout" svg:width="0.027cm" svg:height="0.027cm" svg:x="13.489cm" svg:y="21.943cm" svg:viewBox="0 0 28 28" draw:points="0,0 28,0 28,28 0,28">
          <text:p/>
        </draw:polygon>
        <draw:polygon draw:style-name="gr269" draw:text-style-name="P267" draw:layer="layout" svg:width="0.027cm" svg:height="0.027cm" svg:x="13.542cm" svg:y="21.943cm" svg:viewBox="0 0 28 28" draw:points="0,0 28,0 28,28 0,28">
          <text:p/>
        </draw:polygon>
        <draw:polygon draw:style-name="gr269" draw:text-style-name="P267" draw:layer="layout" svg:width="0.027cm" svg:height="0.027cm" svg:x="13.595cm" svg:y="21.943cm" svg:viewBox="0 0 28 28" draw:points="0,0 28,0 28,28 0,28">
          <text:p/>
        </draw:polygon>
        <draw:polygon draw:style-name="gr269" draw:text-style-name="P267" draw:layer="layout" svg:width="0.027cm" svg:height="0.027cm" svg:x="13.648cm" svg:y="21.943cm" svg:viewBox="0 0 28 28" draw:points="0,0 28,0 28,28 0,28">
          <text:p/>
        </draw:polygon>
        <draw:polygon draw:style-name="gr269" draw:text-style-name="P267" draw:layer="layout" svg:width="0.027cm" svg:height="0.027cm" svg:x="13.701cm" svg:y="21.943cm" svg:viewBox="0 0 28 28" draw:points="0,0 28,0 28,28 0,28">
          <text:p/>
        </draw:polygon>
        <draw:polygon draw:style-name="gr269" draw:text-style-name="P267" draw:layer="layout" svg:width="0.027cm" svg:height="0.027cm" svg:x="13.754cm" svg:y="21.943cm" svg:viewBox="0 0 28 28" draw:points="0,0 28,0 28,28 0,28">
          <text:p/>
        </draw:polygon>
        <draw:polygon draw:style-name="gr269" draw:text-style-name="P267" draw:layer="layout" svg:width="0.027cm" svg:height="0.027cm" svg:x="13.807cm" svg:y="21.943cm" svg:viewBox="0 0 28 28" draw:points="0,0 28,0 28,28 0,28">
          <text:p/>
        </draw:polygon>
        <draw:polygon draw:style-name="gr269" draw:text-style-name="P267" draw:layer="layout" svg:width="0.027cm" svg:height="0.027cm" svg:x="13.86cm" svg:y="21.943cm" svg:viewBox="0 0 28 28" draw:points="0,0 28,0 28,28 0,28">
          <text:p/>
        </draw:polygon>
        <draw:polygon draw:style-name="gr269" draw:text-style-name="P267" draw:layer="layout" svg:width="0.027cm" svg:height="0.027cm" svg:x="13.913cm" svg:y="21.943cm" svg:viewBox="0 0 28 28" draw:points="0,0 28,0 28,28 0,28">
          <text:p/>
        </draw:polygon>
        <draw:polygon draw:style-name="gr269" draw:text-style-name="P267" draw:layer="layout" svg:width="0.027cm" svg:height="0.027cm" svg:x="13.966cm" svg:y="21.943cm" svg:viewBox="0 0 28 28" draw:points="0,0 28,0 28,28 0,28">
          <text:p/>
        </draw:polygon>
        <draw:polygon draw:style-name="gr269" draw:text-style-name="P267" draw:layer="layout" svg:width="0.027cm" svg:height="0.027cm" svg:x="14.019cm" svg:y="21.943cm" svg:viewBox="0 0 28 28" draw:points="0,0 28,0 28,28 0,28">
          <text:p/>
        </draw:polygon>
        <draw:polygon draw:style-name="gr269" draw:text-style-name="P267" draw:layer="layout" svg:width="0.027cm" svg:height="0.027cm" svg:x="14.072cm" svg:y="21.943cm" svg:viewBox="0 0 28 28" draw:points="0,0 28,0 28,28 0,28">
          <text:p/>
        </draw:polygon>
        <draw:polygon draw:style-name="gr269" draw:text-style-name="P267" draw:layer="layout" svg:width="0.027cm" svg:height="0.027cm" svg:x="14.125cm" svg:y="21.943cm" svg:viewBox="0 0 28 28" draw:points="0,0 28,0 28,28 0,28">
          <text:p/>
        </draw:polygon>
        <draw:polygon draw:style-name="gr269" draw:text-style-name="P267" draw:layer="layout" svg:width="0.027cm" svg:height="0.027cm" svg:x="14.178cm" svg:y="21.943cm" svg:viewBox="0 0 28 28" draw:points="0,0 28,0 28,28 0,28">
          <text:p/>
        </draw:polygon>
        <draw:polygon draw:style-name="gr269" draw:text-style-name="P267" draw:layer="layout" svg:width="0.027cm" svg:height="0.027cm" svg:x="14.231cm" svg:y="21.943cm" svg:viewBox="0 0 28 28" draw:points="0,0 28,0 28,28 0,28">
          <text:p/>
        </draw:polygon>
        <draw:polygon draw:style-name="gr269" draw:text-style-name="P267" draw:layer="layout" svg:width="0.027cm" svg:height="0.027cm" svg:x="14.284cm" svg:y="21.943cm" svg:viewBox="0 0 28 28" draw:points="0,0 28,0 28,28 0,28">
          <text:p/>
        </draw:polygon>
        <draw:polygon draw:style-name="gr269" draw:text-style-name="P267" draw:layer="layout" svg:width="0.027cm" svg:height="0.027cm" svg:x="14.337cm" svg:y="21.943cm" svg:viewBox="0 0 28 28" draw:points="0,0 28,0 28,28 0,28">
          <text:p/>
        </draw:polygon>
        <draw:polygon draw:style-name="gr269" draw:text-style-name="P267" draw:layer="layout" svg:width="0.028cm" svg:height="0.027cm" svg:x="14.39cm" svg:y="21.943cm" svg:viewBox="0 0 29 28" draw:points="0,0 29,0 29,28 0,28">
          <text:p/>
        </draw:polygon>
        <draw:polygon draw:style-name="gr269" draw:text-style-name="P267" draw:layer="layout" svg:width="0.027cm" svg:height="0.027cm" svg:x="14.443cm" svg:y="21.943cm" svg:viewBox="0 0 28 28" draw:points="0,0 28,0 28,28 0,28">
          <text:p/>
        </draw:polygon>
        <draw:polygon draw:style-name="gr269" draw:text-style-name="P267" draw:layer="layout" svg:width="0.027cm" svg:height="0.027cm" svg:x="14.496cm" svg:y="21.943cm" svg:viewBox="0 0 28 28" draw:points="0,0 28,0 28,28 0,28">
          <text:p/>
        </draw:polygon>
        <draw:polygon draw:style-name="gr269" draw:text-style-name="P267" draw:layer="layout" svg:width="0.027cm" svg:height="0.027cm" svg:x="14.549cm" svg:y="21.943cm" svg:viewBox="0 0 28 28" draw:points="0,0 28,0 28,28 0,28">
          <text:p/>
        </draw:polygon>
        <draw:polygon draw:style-name="gr269" draw:text-style-name="P267" draw:layer="layout" svg:width="0.027cm" svg:height="0.027cm" svg:x="14.602cm" svg:y="21.943cm" svg:viewBox="0 0 28 28" draw:points="0,0 28,0 28,28 0,28">
          <text:p/>
        </draw:polygon>
        <draw:polygon draw:style-name="gr269" draw:text-style-name="P267" draw:layer="layout" svg:width="0.027cm" svg:height="0.027cm" svg:x="14.655cm" svg:y="21.943cm" svg:viewBox="0 0 28 28" draw:points="0,0 28,0 28,28 0,28">
          <text:p/>
        </draw:polygon>
        <draw:polygon draw:style-name="gr269" draw:text-style-name="P267" draw:layer="layout" svg:width="0.027cm" svg:height="0.027cm" svg:x="14.708cm" svg:y="21.943cm" svg:viewBox="0 0 28 28" draw:points="0,0 28,0 28,28 0,28">
          <text:p/>
        </draw:polygon>
        <draw:polygon draw:style-name="gr269" draw:text-style-name="P267" draw:layer="layout" svg:width="0.027cm" svg:height="0.027cm" svg:x="14.761cm" svg:y="21.943cm" svg:viewBox="0 0 28 28" draw:points="0,0 28,0 28,28 0,28">
          <text:p/>
        </draw:polygon>
        <draw:polygon draw:style-name="gr269" draw:text-style-name="P267" draw:layer="layout" svg:width="0.027cm" svg:height="0.027cm" svg:x="14.814cm" svg:y="21.943cm" svg:viewBox="0 0 28 28" draw:points="0,0 28,0 28,28 0,28">
          <text:p/>
        </draw:polygon>
        <draw:polygon draw:style-name="gr269" draw:text-style-name="P267" draw:layer="layout" svg:width="0.027cm" svg:height="0.027cm" svg:x="14.867cm" svg:y="21.943cm" svg:viewBox="0 0 28 28" draw:points="0,0 28,0 28,28 0,28">
          <text:p/>
        </draw:polygon>
        <draw:polygon draw:style-name="gr269" draw:text-style-name="P267" draw:layer="layout" svg:width="0.027cm" svg:height="0.027cm" svg:x="14.92cm" svg:y="21.943cm" svg:viewBox="0 0 28 28" draw:points="0,0 28,0 28,28 0,28">
          <text:p/>
        </draw:polygon>
        <draw:polygon draw:style-name="gr269" draw:text-style-name="P267" draw:layer="layout" svg:width="0.027cm" svg:height="0.027cm" svg:x="14.973cm" svg:y="21.943cm" svg:viewBox="0 0 28 28" draw:points="0,0 28,0 28,28 0,28">
          <text:p/>
        </draw:polygon>
        <draw:polygon draw:style-name="gr269" draw:text-style-name="P267" draw:layer="layout" svg:width="0.027cm" svg:height="0.027cm" svg:x="15.026cm" svg:y="21.943cm" svg:viewBox="0 0 28 28" draw:points="0,0 28,0 28,28 0,28">
          <text:p/>
        </draw:polygon>
        <draw:polygon draw:style-name="gr269" draw:text-style-name="P267" draw:layer="layout" svg:width="0.027cm" svg:height="0.027cm" svg:x="15.079cm" svg:y="21.943cm" svg:viewBox="0 0 28 28" draw:points="0,0 28,0 28,28 0,28">
          <text:p/>
        </draw:polygon>
        <draw:polygon draw:style-name="gr269" draw:text-style-name="P267" draw:layer="layout" svg:width="0.027cm" svg:height="0.027cm" svg:x="15.132cm" svg:y="21.943cm" svg:viewBox="0 0 28 28" draw:points="0,0 28,0 28,28 0,28">
          <text:p/>
        </draw:polygon>
        <draw:polygon draw:style-name="gr269" draw:text-style-name="P267" draw:layer="layout" svg:width="0.027cm" svg:height="0.027cm" svg:x="15.185cm" svg:y="21.943cm" svg:viewBox="0 0 28 28" draw:points="0,0 28,0 28,28 0,28">
          <text:p/>
        </draw:polygon>
        <draw:polygon draw:style-name="gr269" draw:text-style-name="P267" draw:layer="layout" svg:width="0.027cm" svg:height="0.027cm" svg:x="15.238cm" svg:y="21.943cm" svg:viewBox="0 0 28 28" draw:points="0,0 28,0 28,28 0,28">
          <text:p/>
        </draw:polygon>
        <draw:polygon draw:style-name="gr269" draw:text-style-name="P267" draw:layer="layout" svg:width="0.027cm" svg:height="0.027cm" svg:x="15.291cm" svg:y="21.943cm" svg:viewBox="0 0 28 28" draw:points="0,0 28,0 28,28 0,28">
          <text:p/>
        </draw:polygon>
        <draw:polygon draw:style-name="gr269" draw:text-style-name="P267" draw:layer="layout" svg:width="0.027cm" svg:height="0.027cm" svg:x="15.344cm" svg:y="21.943cm" svg:viewBox="0 0 28 28" draw:points="0,0 28,0 28,28 0,28">
          <text:p/>
        </draw:polygon>
        <draw:polygon draw:style-name="gr269" draw:text-style-name="P267" draw:layer="layout" svg:width="0.027cm" svg:height="0.027cm" svg:x="15.397cm" svg:y="21.943cm" svg:viewBox="0 0 28 28" draw:points="0,0 28,0 28,28 0,28">
          <text:p/>
        </draw:polygon>
        <draw:polygon draw:style-name="gr269" draw:text-style-name="P267" draw:layer="layout" svg:width="0.027cm" svg:height="0.027cm" svg:x="15.45cm" svg:y="21.943cm" svg:viewBox="0 0 28 28" draw:points="0,0 28,0 28,28 0,28">
          <text:p/>
        </draw:polygon>
        <draw:polygon draw:style-name="gr269" draw:text-style-name="P267" draw:layer="layout" svg:width="0.027cm" svg:height="0.027cm" svg:x="15.503cm" svg:y="21.943cm" svg:viewBox="0 0 28 28" draw:points="0,0 28,0 28,28 0,28">
          <text:p/>
        </draw:polygon>
        <draw:polygon draw:style-name="gr269" draw:text-style-name="P267" draw:layer="layout" svg:width="0.027cm" svg:height="0.027cm" svg:x="15.556cm" svg:y="21.943cm" svg:viewBox="0 0 28 28" draw:points="0,0 28,0 28,28 0,28">
          <text:p/>
        </draw:polygon>
        <draw:polygon draw:style-name="gr269" draw:text-style-name="P267" draw:layer="layout" svg:width="0.027cm" svg:height="0.027cm" svg:x="15.609cm" svg:y="21.943cm" svg:viewBox="0 0 28 28" draw:points="0,0 28,0 28,28 0,28">
          <text:p/>
        </draw:polygon>
        <draw:polygon draw:style-name="gr269" draw:text-style-name="P267" draw:layer="layout" svg:width="0.027cm" svg:height="0.027cm" svg:x="15.662cm" svg:y="21.943cm" svg:viewBox="0 0 28 28" draw:points="0,0 28,0 28,28 0,28">
          <text:p/>
        </draw:polygon>
        <draw:polygon draw:style-name="gr269" draw:text-style-name="P267" draw:layer="layout" svg:width="0.027cm" svg:height="0.027cm" svg:x="15.715cm" svg:y="21.943cm" svg:viewBox="0 0 28 28" draw:points="0,0 28,0 28,28 0,28">
          <text:p/>
        </draw:polygon>
        <draw:polygon draw:style-name="gr269" draw:text-style-name="P267" draw:layer="layout" svg:width="0.028cm" svg:height="0.027cm" svg:x="15.768cm" svg:y="21.943cm" svg:viewBox="0 0 29 28" draw:points="0,0 29,0 29,28 0,28">
          <text:p/>
        </draw:polygon>
        <draw:polygon draw:style-name="gr269" draw:text-style-name="P267" draw:layer="layout" svg:width="0.027cm" svg:height="0.027cm" svg:x="15.821cm" svg:y="21.943cm" svg:viewBox="0 0 28 28" draw:points="0,0 28,0 28,28 0,28">
          <text:p/>
        </draw:polygon>
        <draw:polygon draw:style-name="gr269" draw:text-style-name="P267" draw:layer="layout" svg:width="0.027cm" svg:height="0.027cm" svg:x="15.874cm" svg:y="21.943cm" svg:viewBox="0 0 28 28" draw:points="0,0 28,0 28,28 0,28">
          <text:p/>
        </draw:polygon>
        <draw:polygon draw:style-name="gr269" draw:text-style-name="P267" draw:layer="layout" svg:width="0.027cm" svg:height="0.027cm" svg:x="15.927cm" svg:y="21.943cm" svg:viewBox="0 0 28 28" draw:points="0,0 28,0 28,28 0,28">
          <text:p/>
        </draw:polygon>
        <draw:polygon draw:style-name="gr269" draw:text-style-name="P267" draw:layer="layout" svg:width="0.027cm" svg:height="0.027cm" svg:x="15.98cm" svg:y="21.943cm" svg:viewBox="0 0 28 28" draw:points="0,0 28,0 28,28 0,28">
          <text:p/>
        </draw:polygon>
        <draw:polygon draw:style-name="gr269" draw:text-style-name="P267" draw:layer="layout" svg:width="0.027cm" svg:height="0.027cm" svg:x="16.033cm" svg:y="21.943cm" svg:viewBox="0 0 28 28" draw:points="0,0 28,0 28,28 0,28">
          <text:p/>
        </draw:polygon>
        <draw:polygon draw:style-name="gr269" draw:text-style-name="P267" draw:layer="layout" svg:width="0.027cm" svg:height="0.027cm" svg:x="16.086cm" svg:y="21.943cm" svg:viewBox="0 0 28 28" draw:points="0,0 28,0 28,28 0,28">
          <text:p/>
        </draw:polygon>
        <draw:polygon draw:style-name="gr269" draw:text-style-name="P267" draw:layer="layout" svg:width="0.027cm" svg:height="0.027cm" svg:x="16.139cm" svg:y="21.943cm" svg:viewBox="0 0 28 28" draw:points="0,0 28,0 28,28 0,28">
          <text:p/>
        </draw:polygon>
        <draw:polygon draw:style-name="gr269" draw:text-style-name="P267" draw:layer="layout" svg:width="0.027cm" svg:height="0.027cm" svg:x="16.192cm" svg:y="21.943cm" svg:viewBox="0 0 28 28" draw:points="0,0 28,0 28,28 0,28">
          <text:p/>
        </draw:polygon>
        <draw:polygon draw:style-name="gr269" draw:text-style-name="P267" draw:layer="layout" svg:width="0.027cm" svg:height="0.027cm" svg:x="16.245cm" svg:y="21.943cm" svg:viewBox="0 0 28 28" draw:points="0,0 28,0 28,28 0,28">
          <text:p/>
        </draw:polygon>
        <draw:polygon draw:style-name="gr269" draw:text-style-name="P267" draw:layer="layout" svg:width="0.027cm" svg:height="0.027cm" svg:x="16.298cm" svg:y="21.943cm" svg:viewBox="0 0 28 28" draw:points="0,0 28,0 28,28 0,28">
          <text:p/>
        </draw:polygon>
        <draw:polygon draw:style-name="gr269" draw:text-style-name="P267" draw:layer="layout" svg:width="0.027cm" svg:height="0.027cm" svg:x="16.351cm" svg:y="21.943cm" svg:viewBox="0 0 28 28" draw:points="0,0 28,0 28,28 0,28">
          <text:p/>
        </draw:polygon>
        <draw:polygon draw:style-name="gr269" draw:text-style-name="P267" draw:layer="layout" svg:width="0.027cm" svg:height="0.027cm" svg:x="16.404cm" svg:y="21.943cm" svg:viewBox="0 0 28 28" draw:points="0,0 28,0 28,28 0,28">
          <text:p/>
        </draw:polygon>
        <draw:polygon draw:style-name="gr269" draw:text-style-name="P267" draw:layer="layout" svg:width="0.027cm" svg:height="0.027cm" svg:x="16.457cm" svg:y="21.943cm" svg:viewBox="0 0 28 28" draw:points="0,0 28,0 28,28 0,28">
          <text:p/>
        </draw:polygon>
        <draw:polygon draw:style-name="gr269" draw:text-style-name="P267" draw:layer="layout" svg:width="0.027cm" svg:height="0.027cm" svg:x="16.51cm" svg:y="21.943cm" svg:viewBox="0 0 28 28" draw:points="0,0 28,0 28,28 0,28">
          <text:p/>
        </draw:polygon>
        <draw:polygon draw:style-name="gr269" draw:text-style-name="P267" draw:layer="layout" svg:width="0.027cm" svg:height="0.027cm" svg:x="16.563cm" svg:y="21.943cm" svg:viewBox="0 0 28 28" draw:points="0,0 28,0 28,28 0,28">
          <text:p/>
        </draw:polygon>
        <draw:polygon draw:style-name="gr269" draw:text-style-name="P267" draw:layer="layout" svg:width="0.027cm" svg:height="0.027cm" svg:x="16.616cm" svg:y="21.943cm" svg:viewBox="0 0 28 28" draw:points="0,0 28,0 28,28 0,28">
          <text:p/>
        </draw:polygon>
        <draw:polygon draw:style-name="gr269" draw:text-style-name="P267" draw:layer="layout" svg:width="0.027cm" svg:height="0.027cm" svg:x="16.669cm" svg:y="21.943cm" svg:viewBox="0 0 28 28" draw:points="0,0 28,0 28,28 0,28">
          <text:p/>
        </draw:polygon>
        <draw:polygon draw:style-name="gr269" draw:text-style-name="P267" draw:layer="layout" svg:width="0.027cm" svg:height="0.027cm" svg:x="16.722cm" svg:y="21.943cm" svg:viewBox="0 0 28 28" draw:points="0,0 28,0 28,28 0,28">
          <text:p/>
        </draw:polygon>
        <draw:polygon draw:style-name="gr269" draw:text-style-name="P267" draw:layer="layout" svg:width="0.027cm" svg:height="0.027cm" svg:x="16.775cm" svg:y="21.943cm" svg:viewBox="0 0 28 28" draw:points="0,0 28,0 28,28 0,28">
          <text:p/>
        </draw:polygon>
        <draw:polygon draw:style-name="gr269" draw:text-style-name="P267" draw:layer="layout" svg:width="0.027cm" svg:height="0.027cm" svg:x="16.828cm" svg:y="21.943cm" svg:viewBox="0 0 28 28" draw:points="0,0 28,0 28,28 0,28">
          <text:p/>
        </draw:polygon>
        <draw:polygon draw:style-name="gr269" draw:text-style-name="P267" draw:layer="layout" svg:width="0.027cm" svg:height="0.027cm" svg:x="16.881cm" svg:y="21.943cm" svg:viewBox="0 0 28 28" draw:points="0,0 28,0 28,28 0,28">
          <text:p/>
        </draw:polygon>
        <draw:polygon draw:style-name="gr269" draw:text-style-name="P267" draw:layer="layout" svg:width="0.027cm" svg:height="0.027cm" svg:x="16.934cm" svg:y="21.943cm" svg:viewBox="0 0 28 28" draw:points="0,0 28,0 28,28 0,28">
          <text:p/>
        </draw:polygon>
        <draw:polygon draw:style-name="gr269" draw:text-style-name="P267" draw:layer="layout" svg:width="0.027cm" svg:height="0.027cm" svg:x="16.987cm" svg:y="21.943cm" svg:viewBox="0 0 28 28" draw:points="0,0 28,0 28,28 0,28">
          <text:p/>
        </draw:polygon>
        <draw:polygon draw:style-name="gr269" draw:text-style-name="P267" draw:layer="layout" svg:width="0.027cm" svg:height="0.027cm" svg:x="17.04cm" svg:y="21.943cm" svg:viewBox="0 0 28 28" draw:points="0,0 28,0 28,28 0,28">
          <text:p/>
        </draw:polygon>
        <draw:polygon draw:style-name="gr269" draw:text-style-name="P267" draw:layer="layout" svg:width="0.027cm" svg:height="0.027cm" svg:x="17.093cm" svg:y="21.943cm" svg:viewBox="0 0 28 28" draw:points="0,0 28,0 28,28 0,28">
          <text:p/>
        </draw:polygon>
        <draw:polygon draw:style-name="gr269" draw:text-style-name="P267" draw:layer="layout" svg:width="0.028cm" svg:height="0.027cm" svg:x="17.146cm" svg:y="21.943cm" svg:viewBox="0 0 29 28" draw:points="0,0 29,0 29,28 0,28">
          <text:p/>
        </draw:polygon>
        <draw:polygon draw:style-name="gr269" draw:text-style-name="P267" draw:layer="layout" svg:width="0.027cm" svg:height="0.027cm" svg:x="17.199cm" svg:y="21.943cm" svg:viewBox="0 0 28 28" draw:points="0,0 28,0 28,28 0,28">
          <text:p/>
        </draw:polygon>
        <draw:polygon draw:style-name="gr269" draw:text-style-name="P267" draw:layer="layout" svg:width="0.027cm" svg:height="0.027cm" svg:x="17.252cm" svg:y="21.943cm" svg:viewBox="0 0 28 28" draw:points="0,0 28,0 28,28 0,28">
          <text:p/>
        </draw:polygon>
        <draw:polygon draw:style-name="gr269" draw:text-style-name="P267" draw:layer="layout" svg:width="0.027cm" svg:height="0.027cm" svg:x="17.305cm" svg:y="21.943cm" svg:viewBox="0 0 28 28" draw:points="0,0 28,0 28,28 0,28">
          <text:p/>
        </draw:polygon>
        <draw:polygon draw:style-name="gr269" draw:text-style-name="P267" draw:layer="layout" svg:width="0.027cm" svg:height="0.027cm" svg:x="17.358cm" svg:y="21.943cm" svg:viewBox="0 0 28 28" draw:points="0,0 28,0 28,28 0,28">
          <text:p/>
        </draw:polygon>
        <draw:polygon draw:style-name="gr269" draw:text-style-name="P267" draw:layer="layout" svg:width="0.027cm" svg:height="0.027cm" svg:x="17.411cm" svg:y="21.943cm" svg:viewBox="0 0 28 28" draw:points="0,0 28,0 28,28 0,28">
          <text:p/>
        </draw:polygon>
        <draw:polygon draw:style-name="gr269" draw:text-style-name="P267" draw:layer="layout" svg:width="0.027cm" svg:height="0.027cm" svg:x="17.464cm" svg:y="21.943cm" svg:viewBox="0 0 28 28" draw:points="0,0 28,0 28,28 0,28">
          <text:p/>
        </draw:polygon>
        <draw:polygon draw:style-name="gr269" draw:text-style-name="P267" draw:layer="layout" svg:width="0.027cm" svg:height="0.027cm" svg:x="17.517cm" svg:y="21.943cm" svg:viewBox="0 0 28 28" draw:points="0,0 28,0 28,28 0,28">
          <text:p/>
        </draw:polygon>
        <draw:polygon draw:style-name="gr269" draw:text-style-name="P267" draw:layer="layout" svg:width="0.027cm" svg:height="0.027cm" svg:x="17.57cm" svg:y="21.943cm" svg:viewBox="0 0 28 28" draw:points="0,0 28,0 28,28 0,28">
          <text:p/>
        </draw:polygon>
        <draw:polygon draw:style-name="gr269" draw:text-style-name="P267" draw:layer="layout" svg:width="0.027cm" svg:height="0.027cm" svg:x="17.623cm" svg:y="21.943cm" svg:viewBox="0 0 28 28" draw:points="0,0 28,0 28,28 0,28">
          <text:p/>
        </draw:polygon>
        <draw:polygon draw:style-name="gr269" draw:text-style-name="P267" draw:layer="layout" svg:width="0.027cm" svg:height="0.027cm" svg:x="17.676cm" svg:y="21.943cm" svg:viewBox="0 0 28 28" draw:points="0,0 28,0 28,28 0,28">
          <text:p/>
        </draw:polygon>
        <draw:polygon draw:style-name="gr269" draw:text-style-name="P267" draw:layer="layout" svg:width="0.027cm" svg:height="0.027cm" svg:x="17.729cm" svg:y="21.943cm" svg:viewBox="0 0 28 28" draw:points="0,0 28,0 28,28 0,28">
          <text:p/>
        </draw:polygon>
        <draw:polygon draw:style-name="gr269" draw:text-style-name="P267" draw:layer="layout" svg:width="0.027cm" svg:height="0.027cm" svg:x="17.782cm" svg:y="21.943cm" svg:viewBox="0 0 28 28" draw:points="0,0 28,0 28,28 0,28">
          <text:p/>
        </draw:polygon>
        <draw:polygon draw:style-name="gr269" draw:text-style-name="P267" draw:layer="layout" svg:width="0.027cm" svg:height="0.027cm" svg:x="17.835cm" svg:y="21.943cm" svg:viewBox="0 0 28 28" draw:points="0,0 28,0 28,28 0,28">
          <text:p/>
        </draw:polygon>
        <draw:polygon draw:style-name="gr269" draw:text-style-name="P267" draw:layer="layout" svg:width="0.027cm" svg:height="0.027cm" svg:x="17.888cm" svg:y="21.943cm" svg:viewBox="0 0 28 28" draw:points="0,0 28,0 28,28 0,28">
          <text:p/>
        </draw:polygon>
        <draw:polygon draw:style-name="gr269" draw:text-style-name="P267" draw:layer="layout" svg:width="0.027cm" svg:height="0.027cm" svg:x="17.941cm" svg:y="21.943cm" svg:viewBox="0 0 28 28" draw:points="0,0 28,0 28,28 0,28">
          <text:p/>
        </draw:polygon>
        <draw:polygon draw:style-name="gr269" draw:text-style-name="P267" draw:layer="layout" svg:width="0.027cm" svg:height="0.027cm" svg:x="17.994cm" svg:y="21.943cm" svg:viewBox="0 0 28 28" draw:points="0,0 28,0 28,28 0,28">
          <text:p/>
        </draw:polygon>
        <draw:polygon draw:style-name="gr269" draw:text-style-name="P267" draw:layer="layout" svg:width="0.027cm" svg:height="0.027cm" svg:x="18.047cm" svg:y="21.943cm" svg:viewBox="0 0 28 28" draw:points="0,0 28,0 28,28 0,28">
          <text:p/>
        </draw:polygon>
        <draw:polygon draw:style-name="gr269" draw:text-style-name="P267" draw:layer="layout" svg:width="0.027cm" svg:height="0.027cm" svg:x="18.1cm" svg:y="21.943cm" svg:viewBox="0 0 28 28" draw:points="0,0 28,0 28,28 0,28">
          <text:p/>
        </draw:polygon>
        <draw:polygon draw:style-name="gr269" draw:text-style-name="P267" draw:layer="layout" svg:width="0.027cm" svg:height="0.027cm" svg:x="18.153cm" svg:y="21.943cm" svg:viewBox="0 0 28 28" draw:points="0,0 28,0 28,28 0,28">
          <text:p/>
        </draw:polygon>
        <draw:polygon draw:style-name="gr269" draw:text-style-name="P267" draw:layer="layout" svg:width="0.027cm" svg:height="0.027cm" svg:x="18.206cm" svg:y="21.943cm" svg:viewBox="0 0 28 28" draw:points="0,0 28,0 28,28 0,28">
          <text:p/>
        </draw:polygon>
        <draw:polygon draw:style-name="gr269" draw:text-style-name="P267" draw:layer="layout" svg:width="0.027cm" svg:height="0.027cm" svg:x="18.259cm" svg:y="21.943cm" svg:viewBox="0 0 28 28" draw:points="0,0 28,0 28,28 0,28">
          <text:p/>
        </draw:polygon>
        <draw:polygon draw:style-name="gr269" draw:text-style-name="P267" draw:layer="layout" svg:width="0.027cm" svg:height="0.027cm" svg:x="18.312cm" svg:y="21.943cm" svg:viewBox="0 0 28 28" draw:points="0,0 28,0 28,28 0,28">
          <text:p/>
        </draw:polygon>
        <draw:polygon draw:style-name="gr269" draw:text-style-name="P267" draw:layer="layout" svg:width="0.027cm" svg:height="0.027cm" svg:x="18.365cm" svg:y="21.943cm" svg:viewBox="0 0 28 28" draw:points="0,0 28,0 28,28 0,28">
          <text:p/>
        </draw:polygon>
        <draw:polygon draw:style-name="gr269" draw:text-style-name="P267" draw:layer="layout" svg:width="0.027cm" svg:height="0.027cm" svg:x="18.418cm" svg:y="21.943cm" svg:viewBox="0 0 28 28" draw:points="0,0 28,0 28,28 0,28">
          <text:p/>
        </draw:polygon>
        <draw:polygon draw:style-name="gr269" draw:text-style-name="P267" draw:layer="layout" svg:width="0.027cm" svg:height="0.027cm" svg:x="18.471cm" svg:y="21.943cm" svg:viewBox="0 0 28 28" draw:points="0,0 28,0 28,28 0,28">
          <text:p/>
        </draw:polygon>
        <draw:polygon draw:style-name="gr269" draw:text-style-name="P267" draw:layer="layout" svg:width="0.028cm" svg:height="0.027cm" svg:x="18.524cm" svg:y="21.943cm" svg:viewBox="0 0 29 28" draw:points="0,0 29,0 29,28 0,28">
          <text:p/>
        </draw:polygon>
        <draw:polygon draw:style-name="gr269" draw:text-style-name="P267" draw:layer="layout" svg:width="0.027cm" svg:height="0.027cm" svg:x="18.577cm" svg:y="21.943cm" svg:viewBox="0 0 28 28" draw:points="0,0 28,0 28,28 0,28">
          <text:p/>
        </draw:polygon>
        <draw:polygon draw:style-name="gr269" draw:text-style-name="P267" draw:layer="layout" svg:width="0.027cm" svg:height="0.027cm" svg:x="18.63cm" svg:y="21.943cm" svg:viewBox="0 0 28 28" draw:points="0,0 28,0 28,28 0,28">
          <text:p/>
        </draw:polygon>
        <draw:polygon draw:style-name="gr269" draw:text-style-name="P267" draw:layer="layout" svg:width="0.027cm" svg:height="0.027cm" svg:x="18.683cm" svg:y="21.943cm" svg:viewBox="0 0 28 28" draw:points="0,0 28,0 28,28 0,28">
          <text:p/>
        </draw:polygon>
        <draw:polygon draw:style-name="gr269" draw:text-style-name="P267" draw:layer="layout" svg:width="0.027cm" svg:height="0.027cm" svg:x="18.736cm" svg:y="21.943cm" svg:viewBox="0 0 28 28" draw:points="0,0 28,0 28,28 0,28">
          <text:p/>
        </draw:polygon>
        <draw:polygon draw:style-name="gr269" draw:text-style-name="P267" draw:layer="layout" svg:width="0.027cm" svg:height="0.027cm" svg:x="18.789cm" svg:y="21.943cm" svg:viewBox="0 0 28 28" draw:points="0,0 28,0 28,28 0,28">
          <text:p/>
        </draw:polygon>
        <draw:polygon draw:style-name="gr269" draw:text-style-name="P267" draw:layer="layout" svg:width="0.027cm" svg:height="0.027cm" svg:x="18.842cm" svg:y="21.943cm" svg:viewBox="0 0 28 28" draw:points="0,0 28,0 28,28 0,28">
          <text:p/>
        </draw:polygon>
        <draw:polygon draw:style-name="gr269" draw:text-style-name="P267" draw:layer="layout" svg:width="0.027cm" svg:height="0.027cm" svg:x="18.895cm" svg:y="21.943cm" svg:viewBox="0 0 28 28" draw:points="0,0 28,0 28,28 0,28">
          <text:p/>
        </draw:polygon>
        <draw:polygon draw:style-name="gr269" draw:text-style-name="P267" draw:layer="layout" svg:width="0.027cm" svg:height="0.027cm" svg:x="18.948cm" svg:y="21.943cm" svg:viewBox="0 0 28 28" draw:points="0,0 28,0 28,28 0,28">
          <text:p/>
        </draw:polygon>
        <draw:polygon draw:style-name="gr269" draw:text-style-name="P267" draw:layer="layout" svg:width="0.027cm" svg:height="0.027cm" svg:x="19.001cm" svg:y="21.943cm" svg:viewBox="0 0 28 28" draw:points="0,0 28,0 28,28 0,28">
          <text:p/>
        </draw:polygon>
        <draw:polygon draw:style-name="gr269" draw:text-style-name="P267" draw:layer="layout" svg:width="0.053cm" svg:height="0.026cm" svg:x="2.014cm" svg:y="22.924cm" svg:viewBox="0 0 54 27" draw:points="0,0 54,0 54,27 0,27">
          <text:p/>
        </draw:polygon>
        <draw:polygon draw:style-name="gr269" draw:text-style-name="P267" draw:layer="layout" svg:width="0.027cm" svg:height="0.026cm" svg:x="2.093cm" svg:y="22.924cm" svg:viewBox="0 0 28 27" draw:points="0,0 28,0 28,27 0,27">
          <text:p/>
        </draw:polygon>
        <draw:polygon draw:style-name="gr269" draw:text-style-name="P267" draw:layer="layout" svg:width="0.027cm" svg:height="0.026cm" svg:x="2.146cm" svg:y="22.924cm" svg:viewBox="0 0 28 27" draw:points="0,0 28,0 28,27 0,27">
          <text:p/>
        </draw:polygon>
        <draw:polygon draw:style-name="gr269" draw:text-style-name="P267" draw:layer="layout" svg:width="0.027cm" svg:height="0.026cm" svg:x="2.199cm" svg:y="22.924cm" svg:viewBox="0 0 28 27" draw:points="0,0 28,0 28,27 0,27">
          <text:p/>
        </draw:polygon>
        <draw:polygon draw:style-name="gr269" draw:text-style-name="P267" draw:layer="layout" svg:width="0.027cm" svg:height="0.026cm" svg:x="2.252cm" svg:y="22.924cm" svg:viewBox="0 0 28 27" draw:points="0,0 28,0 28,27 0,27">
          <text:p/>
        </draw:polygon>
        <draw:polygon draw:style-name="gr269" draw:text-style-name="P267" draw:layer="layout" svg:width="0.027cm" svg:height="0.026cm" svg:x="2.305cm" svg:y="22.924cm" svg:viewBox="0 0 28 27" draw:points="0,0 28,0 28,27 0,27">
          <text:p/>
        </draw:polygon>
        <draw:polygon draw:style-name="gr269" draw:text-style-name="P267" draw:layer="layout" svg:width="0.027cm" svg:height="0.026cm" svg:x="2.358cm" svg:y="22.924cm" svg:viewBox="0 0 28 27" draw:points="0,0 28,0 28,27 0,27">
          <text:p/>
        </draw:polygon>
        <draw:polygon draw:style-name="gr269" draw:text-style-name="P267" draw:layer="layout" svg:width="0.027cm" svg:height="0.026cm" svg:x="2.411cm" svg:y="22.924cm" svg:viewBox="0 0 28 27" draw:points="0,0 28,0 28,27 0,27">
          <text:p/>
        </draw:polygon>
        <draw:polygon draw:style-name="gr269" draw:text-style-name="P267" draw:layer="layout" svg:width="0.027cm" svg:height="0.026cm" svg:x="2.464cm" svg:y="22.924cm" svg:viewBox="0 0 28 27" draw:points="0,0 28,0 28,27 0,27">
          <text:p/>
        </draw:polygon>
        <draw:polygon draw:style-name="gr269" draw:text-style-name="P267" draw:layer="layout" svg:width="0.027cm" svg:height="0.026cm" svg:x="2.517cm" svg:y="22.924cm" svg:viewBox="0 0 28 27" draw:points="0,0 28,0 28,27 0,27">
          <text:p/>
        </draw:polygon>
        <draw:polygon draw:style-name="gr269" draw:text-style-name="P267" draw:layer="layout" svg:width="0.027cm" svg:height="0.026cm" svg:x="2.57cm" svg:y="22.924cm" svg:viewBox="0 0 28 27" draw:points="0,0 28,0 28,27 0,27">
          <text:p/>
        </draw:polygon>
        <draw:polygon draw:style-name="gr269" draw:text-style-name="P267" draw:layer="layout" svg:width="0.027cm" svg:height="0.026cm" svg:x="2.623cm" svg:y="22.924cm" svg:viewBox="0 0 28 27" draw:points="0,0 28,0 28,27 0,27">
          <text:p/>
        </draw:polygon>
        <draw:polygon draw:style-name="gr269" draw:text-style-name="P267" draw:layer="layout" svg:width="0.027cm" svg:height="0.026cm" svg:x="2.676cm" svg:y="22.924cm" svg:viewBox="0 0 28 27" draw:points="0,0 28,0 28,27 0,27">
          <text:p/>
        </draw:polygon>
        <draw:polygon draw:style-name="gr269" draw:text-style-name="P267" draw:layer="layout" svg:width="0.027cm" svg:height="0.026cm" svg:x="2.729cm" svg:y="22.924cm" svg:viewBox="0 0 28 27" draw:points="0,0 28,0 28,27 0,27">
          <text:p/>
        </draw:polygon>
        <draw:polygon draw:style-name="gr269" draw:text-style-name="P267" draw:layer="layout" svg:width="0.027cm" svg:height="0.026cm" svg:x="2.782cm" svg:y="22.924cm" svg:viewBox="0 0 28 27" draw:points="0,0 28,0 28,27 0,27">
          <text:p/>
        </draw:polygon>
        <draw:polygon draw:style-name="gr269" draw:text-style-name="P267" draw:layer="layout" svg:width="0.027cm" svg:height="0.026cm" svg:x="2.835cm" svg:y="22.924cm" svg:viewBox="0 0 28 27" draw:points="0,0 28,0 28,27 0,27">
          <text:p/>
        </draw:polygon>
        <draw:polygon draw:style-name="gr269" draw:text-style-name="P267" draw:layer="layout" svg:width="0.027cm" svg:height="0.026cm" svg:x="2.888cm" svg:y="22.924cm" svg:viewBox="0 0 28 27" draw:points="0,0 28,0 28,27 0,27">
          <text:p/>
        </draw:polygon>
        <draw:polygon draw:style-name="gr269" draw:text-style-name="P267" draw:layer="layout" svg:width="0.027cm" svg:height="0.026cm" svg:x="2.941cm" svg:y="22.924cm" svg:viewBox="0 0 28 27" draw:points="0,0 28,0 28,27 0,27">
          <text:p/>
        </draw:polygon>
        <draw:polygon draw:style-name="gr269" draw:text-style-name="P267" draw:layer="layout" svg:width="0.027cm" svg:height="0.026cm" svg:x="2.994cm" svg:y="22.924cm" svg:viewBox="0 0 28 27" draw:points="0,0 28,0 28,27 0,27">
          <text:p/>
        </draw:polygon>
        <draw:polygon draw:style-name="gr269" draw:text-style-name="P267" draw:layer="layout" svg:width="0.027cm" svg:height="0.026cm" svg:x="3.047cm" svg:y="22.924cm" svg:viewBox="0 0 28 27" draw:points="0,0 28,0 28,27 0,27">
          <text:p/>
        </draw:polygon>
        <draw:polygon draw:style-name="gr269" draw:text-style-name="P267" draw:layer="layout" svg:width="0.027cm" svg:height="0.026cm" svg:x="3.1cm" svg:y="22.924cm" svg:viewBox="0 0 28 27" draw:points="0,0 28,0 28,27 0,27">
          <text:p/>
        </draw:polygon>
        <draw:polygon draw:style-name="gr269" draw:text-style-name="P267" draw:layer="layout" svg:width="0.027cm" svg:height="0.026cm" svg:x="3.153cm" svg:y="22.924cm" svg:viewBox="0 0 28 27" draw:points="0,0 28,0 28,27 0,27">
          <text:p/>
        </draw:polygon>
        <draw:polygon draw:style-name="gr269" draw:text-style-name="P267" draw:layer="layout" svg:width="0.027cm" svg:height="0.026cm" svg:x="3.206cm" svg:y="22.924cm" svg:viewBox="0 0 28 27" draw:points="0,0 28,0 28,27 0,27">
          <text:p/>
        </draw:polygon>
        <draw:polygon draw:style-name="gr269" draw:text-style-name="P267" draw:layer="layout" svg:width="0.027cm" svg:height="0.026cm" svg:x="3.259cm" svg:y="22.924cm" svg:viewBox="0 0 28 27" draw:points="0,0 28,0 28,27 0,27">
          <text:p/>
        </draw:polygon>
        <draw:polygon draw:style-name="gr269" draw:text-style-name="P267" draw:layer="layout" svg:width="0.027cm" svg:height="0.026cm" svg:x="3.312cm" svg:y="22.924cm" svg:viewBox="0 0 28 27" draw:points="0,0 28,0 28,27 0,27">
          <text:p/>
        </draw:polygon>
        <draw:polygon draw:style-name="gr269" draw:text-style-name="P267" draw:layer="layout" svg:width="0.027cm" svg:height="0.026cm" svg:x="3.365cm" svg:y="22.924cm" svg:viewBox="0 0 28 27" draw:points="0,0 28,0 28,27 0,27">
          <text:p/>
        </draw:polygon>
        <draw:polygon draw:style-name="gr269" draw:text-style-name="P267" draw:layer="layout" svg:width="0.028cm" svg:height="0.026cm" svg:x="3.418cm" svg:y="22.924cm" svg:viewBox="0 0 29 27" draw:points="0,0 29,0 29,27 0,27">
          <text:p/>
        </draw:polygon>
        <draw:polygon draw:style-name="gr269" draw:text-style-name="P267" draw:layer="layout" svg:width="0.027cm" svg:height="0.026cm" svg:x="3.471cm" svg:y="22.924cm" svg:viewBox="0 0 28 27" draw:points="0,0 28,0 28,27 0,27">
          <text:p/>
        </draw:polygon>
        <draw:polygon draw:style-name="gr269" draw:text-style-name="P267" draw:layer="layout" svg:width="0.027cm" svg:height="0.026cm" svg:x="3.524cm" svg:y="22.924cm" svg:viewBox="0 0 28 27" draw:points="0,0 28,0 28,27 0,27">
          <text:p/>
        </draw:polygon>
        <draw:polygon draw:style-name="gr269" draw:text-style-name="P267" draw:layer="layout" svg:width="0.027cm" svg:height="0.026cm" svg:x="3.577cm" svg:y="22.924cm" svg:viewBox="0 0 28 27" draw:points="0,0 28,0 28,27 0,27">
          <text:p/>
        </draw:polygon>
        <draw:polygon draw:style-name="gr269" draw:text-style-name="P267" draw:layer="layout" svg:width="0.027cm" svg:height="0.026cm" svg:x="3.63cm" svg:y="22.924cm" svg:viewBox="0 0 28 27" draw:points="0,0 28,0 28,27 0,27">
          <text:p/>
        </draw:polygon>
        <draw:polygon draw:style-name="gr269" draw:text-style-name="P267" draw:layer="layout" svg:width="0.027cm" svg:height="0.026cm" svg:x="3.683cm" svg:y="22.924cm" svg:viewBox="0 0 28 27" draw:points="0,0 28,0 28,27 0,27">
          <text:p/>
        </draw:polygon>
        <draw:polygon draw:style-name="gr269" draw:text-style-name="P267" draw:layer="layout" svg:width="0.027cm" svg:height="0.026cm" svg:x="3.736cm" svg:y="22.924cm" svg:viewBox="0 0 28 27" draw:points="0,0 28,0 28,27 0,27">
          <text:p/>
        </draw:polygon>
        <draw:polygon draw:style-name="gr269" draw:text-style-name="P267" draw:layer="layout" svg:width="0.027cm" svg:height="0.026cm" svg:x="3.789cm" svg:y="22.924cm" svg:viewBox="0 0 28 27" draw:points="0,0 28,0 28,27 0,27">
          <text:p/>
        </draw:polygon>
        <draw:polygon draw:style-name="gr269" draw:text-style-name="P267" draw:layer="layout" svg:width="0.027cm" svg:height="0.026cm" svg:x="3.842cm" svg:y="22.924cm" svg:viewBox="0 0 28 27" draw:points="0,0 28,0 28,27 0,27">
          <text:p/>
        </draw:polygon>
        <draw:polygon draw:style-name="gr269" draw:text-style-name="P267" draw:layer="layout" svg:width="0.027cm" svg:height="0.026cm" svg:x="3.895cm" svg:y="22.924cm" svg:viewBox="0 0 28 27" draw:points="0,0 28,0 28,27 0,27">
          <text:p/>
        </draw:polygon>
        <draw:polygon draw:style-name="gr269" draw:text-style-name="P267" draw:layer="layout" svg:width="0.027cm" svg:height="0.026cm" svg:x="3.948cm" svg:y="22.924cm" svg:viewBox="0 0 28 27" draw:points="0,0 28,0 28,27 0,27">
          <text:p/>
        </draw:polygon>
        <draw:polygon draw:style-name="gr269" draw:text-style-name="P267" draw:layer="layout" svg:width="0.027cm" svg:height="0.026cm" svg:x="4.001cm" svg:y="22.924cm" svg:viewBox="0 0 28 27" draw:points="0,0 28,0 28,27 0,27">
          <text:p/>
        </draw:polygon>
        <draw:polygon draw:style-name="gr269" draw:text-style-name="P267" draw:layer="layout" svg:width="0.027cm" svg:height="0.026cm" svg:x="4.054cm" svg:y="22.924cm" svg:viewBox="0 0 28 27" draw:points="0,0 28,0 28,27 0,27">
          <text:p/>
        </draw:polygon>
        <draw:polygon draw:style-name="gr269" draw:text-style-name="P267" draw:layer="layout" svg:width="0.027cm" svg:height="0.026cm" svg:x="4.107cm" svg:y="22.924cm" svg:viewBox="0 0 28 27" draw:points="0,0 28,0 28,27 0,27">
          <text:p/>
        </draw:polygon>
        <draw:polygon draw:style-name="gr269" draw:text-style-name="P267" draw:layer="layout" svg:width="0.027cm" svg:height="0.026cm" svg:x="4.16cm" svg:y="22.924cm" svg:viewBox="0 0 28 27" draw:points="0,0 28,0 28,27 0,27">
          <text:p/>
        </draw:polygon>
        <draw:polygon draw:style-name="gr269" draw:text-style-name="P267" draw:layer="layout" svg:width="0.027cm" svg:height="0.026cm" svg:x="4.213cm" svg:y="22.924cm" svg:viewBox="0 0 28 27" draw:points="0,0 28,0 28,27 0,27">
          <text:p/>
        </draw:polygon>
        <draw:polygon draw:style-name="gr269" draw:text-style-name="P267" draw:layer="layout" svg:width="0.027cm" svg:height="0.026cm" svg:x="4.266cm" svg:y="22.924cm" svg:viewBox="0 0 28 27" draw:points="0,0 28,0 28,27 0,27">
          <text:p/>
        </draw:polygon>
        <draw:polygon draw:style-name="gr269" draw:text-style-name="P267" draw:layer="layout" svg:width="0.027cm" svg:height="0.026cm" svg:x="4.319cm" svg:y="22.924cm" svg:viewBox="0 0 28 27" draw:points="0,0 28,0 28,27 0,27">
          <text:p/>
        </draw:polygon>
        <draw:polygon draw:style-name="gr269" draw:text-style-name="P267" draw:layer="layout" svg:width="0.027cm" svg:height="0.026cm" svg:x="4.372cm" svg:y="22.924cm" svg:viewBox="0 0 28 27" draw:points="0,0 28,0 28,27 0,27">
          <text:p/>
        </draw:polygon>
        <draw:polygon draw:style-name="gr269" draw:text-style-name="P267" draw:layer="layout" svg:width="0.027cm" svg:height="0.026cm" svg:x="4.425cm" svg:y="22.924cm" svg:viewBox="0 0 28 27" draw:points="0,0 28,0 28,27 0,27">
          <text:p/>
        </draw:polygon>
        <draw:polygon draw:style-name="gr269" draw:text-style-name="P267" draw:layer="layout" svg:width="0.027cm" svg:height="0.026cm" svg:x="4.478cm" svg:y="22.924cm" svg:viewBox="0 0 28 27" draw:points="0,0 28,0 28,27 0,27">
          <text:p/>
        </draw:polygon>
        <draw:polygon draw:style-name="gr269" draw:text-style-name="P267" draw:layer="layout" svg:width="0.027cm" svg:height="0.026cm" svg:x="4.531cm" svg:y="22.924cm" svg:viewBox="0 0 28 27" draw:points="0,0 28,0 28,27 0,27">
          <text:p/>
        </draw:polygon>
        <draw:polygon draw:style-name="gr269" draw:text-style-name="P267" draw:layer="layout" svg:width="0.027cm" svg:height="0.026cm" svg:x="4.584cm" svg:y="22.924cm" svg:viewBox="0 0 28 27" draw:points="0,0 28,0 28,27 0,27">
          <text:p/>
        </draw:polygon>
        <draw:polygon draw:style-name="gr269" draw:text-style-name="P267" draw:layer="layout" svg:width="0.027cm" svg:height="0.026cm" svg:x="4.637cm" svg:y="22.924cm" svg:viewBox="0 0 28 27" draw:points="0,0 28,0 28,27 0,27">
          <text:p/>
        </draw:polygon>
        <draw:polygon draw:style-name="gr269" draw:text-style-name="P267" draw:layer="layout" svg:width="0.027cm" svg:height="0.026cm" svg:x="4.69cm" svg:y="22.924cm" svg:viewBox="0 0 28 27" draw:points="0,0 28,0 28,27 0,27">
          <text:p/>
        </draw:polygon>
        <draw:polygon draw:style-name="gr269" draw:text-style-name="P267" draw:layer="layout" svg:width="0.027cm" svg:height="0.026cm" svg:x="4.743cm" svg:y="22.924cm" svg:viewBox="0 0 28 27" draw:points="0,0 28,0 28,27 0,27">
          <text:p/>
        </draw:polygon>
        <draw:polygon draw:style-name="gr269" draw:text-style-name="P267" draw:layer="layout" svg:width="0.028cm" svg:height="0.026cm" svg:x="4.796cm" svg:y="22.924cm" svg:viewBox="0 0 29 27" draw:points="0,0 29,0 29,27 0,27">
          <text:p/>
        </draw:polygon>
        <draw:polygon draw:style-name="gr269" draw:text-style-name="P267" draw:layer="layout" svg:width="0.027cm" svg:height="0.026cm" svg:x="4.849cm" svg:y="22.924cm" svg:viewBox="0 0 28 27" draw:points="0,0 28,0 28,27 0,27">
          <text:p/>
        </draw:polygon>
        <draw:polygon draw:style-name="gr269" draw:text-style-name="P267" draw:layer="layout" svg:width="0.027cm" svg:height="0.026cm" svg:x="4.902cm" svg:y="22.924cm" svg:viewBox="0 0 28 27" draw:points="0,0 28,0 28,27 0,27">
          <text:p/>
        </draw:polygon>
        <draw:polygon draw:style-name="gr269" draw:text-style-name="P267" draw:layer="layout" svg:width="0.027cm" svg:height="0.026cm" svg:x="4.955cm" svg:y="22.924cm" svg:viewBox="0 0 28 27" draw:points="0,0 28,0 28,27 0,27">
          <text:p/>
        </draw:polygon>
        <draw:polygon draw:style-name="gr269" draw:text-style-name="P267" draw:layer="layout" svg:width="0.027cm" svg:height="0.026cm" svg:x="5.008cm" svg:y="22.924cm" svg:viewBox="0 0 28 27" draw:points="0,0 28,0 28,27 0,27">
          <text:p/>
        </draw:polygon>
        <draw:polygon draw:style-name="gr269" draw:text-style-name="P267" draw:layer="layout" svg:width="0.027cm" svg:height="0.026cm" svg:x="5.061cm" svg:y="22.924cm" svg:viewBox="0 0 28 27" draw:points="0,0 28,0 28,27 0,27">
          <text:p/>
        </draw:polygon>
        <draw:polygon draw:style-name="gr269" draw:text-style-name="P267" draw:layer="layout" svg:width="0.027cm" svg:height="0.026cm" svg:x="5.114cm" svg:y="22.924cm" svg:viewBox="0 0 28 27" draw:points="0,0 28,0 28,27 0,27">
          <text:p/>
        </draw:polygon>
        <draw:polygon draw:style-name="gr269" draw:text-style-name="P267" draw:layer="layout" svg:width="0.027cm" svg:height="0.026cm" svg:x="5.167cm" svg:y="22.924cm" svg:viewBox="0 0 28 27" draw:points="0,0 28,0 28,27 0,27">
          <text:p/>
        </draw:polygon>
        <draw:polygon draw:style-name="gr269" draw:text-style-name="P267" draw:layer="layout" svg:width="0.027cm" svg:height="0.026cm" svg:x="5.22cm" svg:y="22.924cm" svg:viewBox="0 0 28 27" draw:points="0,0 28,0 28,27 0,27">
          <text:p/>
        </draw:polygon>
        <draw:polygon draw:style-name="gr269" draw:text-style-name="P267" draw:layer="layout" svg:width="0.027cm" svg:height="0.026cm" svg:x="5.273cm" svg:y="22.924cm" svg:viewBox="0 0 28 27" draw:points="0,0 28,0 28,27 0,27">
          <text:p/>
        </draw:polygon>
        <draw:polygon draw:style-name="gr269" draw:text-style-name="P267" draw:layer="layout" svg:width="0.027cm" svg:height="0.026cm" svg:x="5.326cm" svg:y="22.924cm" svg:viewBox="0 0 28 27" draw:points="0,0 28,0 28,27 0,27">
          <text:p/>
        </draw:polygon>
        <draw:polygon draw:style-name="gr269" draw:text-style-name="P267" draw:layer="layout" svg:width="0.027cm" svg:height="0.026cm" svg:x="5.379cm" svg:y="22.924cm" svg:viewBox="0 0 28 27" draw:points="0,0 28,0 28,27 0,27">
          <text:p/>
        </draw:polygon>
        <draw:polygon draw:style-name="gr269" draw:text-style-name="P267" draw:layer="layout" svg:width="0.027cm" svg:height="0.026cm" svg:x="5.432cm" svg:y="22.924cm" svg:viewBox="0 0 28 27" draw:points="0,0 28,0 28,27 0,27">
          <text:p/>
        </draw:polygon>
        <draw:polygon draw:style-name="gr269" draw:text-style-name="P267" draw:layer="layout" svg:width="0.027cm" svg:height="0.026cm" svg:x="5.485cm" svg:y="22.924cm" svg:viewBox="0 0 28 27" draw:points="0,0 28,0 28,27 0,27">
          <text:p/>
        </draw:polygon>
        <draw:polygon draw:style-name="gr269" draw:text-style-name="P267" draw:layer="layout" svg:width="0.027cm" svg:height="0.026cm" svg:x="5.538cm" svg:y="22.924cm" svg:viewBox="0 0 28 27" draw:points="0,0 28,0 28,27 0,27">
          <text:p/>
        </draw:polygon>
        <draw:polygon draw:style-name="gr269" draw:text-style-name="P267" draw:layer="layout" svg:width="0.027cm" svg:height="0.026cm" svg:x="5.591cm" svg:y="22.924cm" svg:viewBox="0 0 28 27" draw:points="0,0 28,0 28,27 0,27">
          <text:p/>
        </draw:polygon>
        <draw:polygon draw:style-name="gr269" draw:text-style-name="P267" draw:layer="layout" svg:width="0.027cm" svg:height="0.026cm" svg:x="5.644cm" svg:y="22.924cm" svg:viewBox="0 0 28 27" draw:points="0,0 28,0 28,27 0,27">
          <text:p/>
        </draw:polygon>
        <draw:polygon draw:style-name="gr269" draw:text-style-name="P267" draw:layer="layout" svg:width="0.027cm" svg:height="0.026cm" svg:x="5.697cm" svg:y="22.924cm" svg:viewBox="0 0 28 27" draw:points="0,0 28,0 28,27 0,27">
          <text:p/>
        </draw:polygon>
        <draw:polygon draw:style-name="gr269" draw:text-style-name="P267" draw:layer="layout" svg:width="0.027cm" svg:height="0.026cm" svg:x="5.75cm" svg:y="22.924cm" svg:viewBox="0 0 28 27" draw:points="0,0 28,0 28,27 0,27">
          <text:p/>
        </draw:polygon>
        <draw:polygon draw:style-name="gr269" draw:text-style-name="P267" draw:layer="layout" svg:width="0.027cm" svg:height="0.026cm" svg:x="5.803cm" svg:y="22.924cm" svg:viewBox="0 0 28 27" draw:points="0,0 28,0 28,27 0,27">
          <text:p/>
        </draw:polygon>
        <draw:polygon draw:style-name="gr269" draw:text-style-name="P267" draw:layer="layout" svg:width="0.027cm" svg:height="0.026cm" svg:x="5.856cm" svg:y="22.924cm" svg:viewBox="0 0 28 27" draw:points="0,0 28,0 28,27 0,27">
          <text:p/>
        </draw:polygon>
        <draw:polygon draw:style-name="gr269" draw:text-style-name="P267" draw:layer="layout" svg:width="0.027cm" svg:height="0.026cm" svg:x="5.909cm" svg:y="22.924cm" svg:viewBox="0 0 28 27" draw:points="0,0 28,0 28,27 0,27">
          <text:p/>
        </draw:polygon>
        <draw:polygon draw:style-name="gr269" draw:text-style-name="P267" draw:layer="layout" svg:width="0.027cm" svg:height="0.026cm" svg:x="5.962cm" svg:y="22.924cm" svg:viewBox="0 0 28 27" draw:points="0,0 28,0 28,27 0,27">
          <text:p/>
        </draw:polygon>
        <draw:polygon draw:style-name="gr269" draw:text-style-name="P267" draw:layer="layout" svg:width="0.027cm" svg:height="0.026cm" svg:x="6.015cm" svg:y="22.924cm" svg:viewBox="0 0 28 27" draw:points="0,0 28,0 28,27 0,27">
          <text:p/>
        </draw:polygon>
        <draw:polygon draw:style-name="gr269" draw:text-style-name="P267" draw:layer="layout" svg:width="0.027cm" svg:height="0.026cm" svg:x="6.068cm" svg:y="22.924cm" svg:viewBox="0 0 28 27" draw:points="0,0 28,0 28,27 0,27">
          <text:p/>
        </draw:polygon>
        <draw:polygon draw:style-name="gr269" draw:text-style-name="P267" draw:layer="layout" svg:width="0.027cm" svg:height="0.026cm" svg:x="6.121cm" svg:y="22.924cm" svg:viewBox="0 0 28 27" draw:points="0,0 28,0 28,27 0,27">
          <text:p/>
        </draw:polygon>
        <draw:polygon draw:style-name="gr269" draw:text-style-name="P267" draw:layer="layout" svg:width="0.028cm" svg:height="0.026cm" svg:x="6.174cm" svg:y="22.924cm" svg:viewBox="0 0 29 27" draw:points="0,0 29,0 29,27 0,27">
          <text:p/>
        </draw:polygon>
        <draw:polygon draw:style-name="gr269" draw:text-style-name="P267" draw:layer="layout" svg:width="0.027cm" svg:height="0.026cm" svg:x="6.227cm" svg:y="22.924cm" svg:viewBox="0 0 28 27" draw:points="0,0 28,0 28,27 0,27">
          <text:p/>
        </draw:polygon>
        <draw:polygon draw:style-name="gr269" draw:text-style-name="P267" draw:layer="layout" svg:width="0.027cm" svg:height="0.026cm" svg:x="6.28cm" svg:y="22.924cm" svg:viewBox="0 0 28 27" draw:points="0,0 28,0 28,27 0,27">
          <text:p/>
        </draw:polygon>
        <draw:polygon draw:style-name="gr269" draw:text-style-name="P267" draw:layer="layout" svg:width="0.027cm" svg:height="0.026cm" svg:x="6.333cm" svg:y="22.924cm" svg:viewBox="0 0 28 27" draw:points="0,0 28,0 28,27 0,27">
          <text:p/>
        </draw:polygon>
        <draw:polygon draw:style-name="gr269" draw:text-style-name="P267" draw:layer="layout" svg:width="0.026cm" svg:height="0.026cm" svg:x="6.387cm" svg:y="22.924cm" svg:viewBox="0 0 27 27" draw:points="0,0 27,0 27,27 0,27">
          <text:p/>
        </draw:polygon>
        <draw:polygon draw:style-name="gr269" draw:text-style-name="P267" draw:layer="layout" svg:width="0.026cm" svg:height="0.026cm" svg:x="6.44cm" svg:y="22.924cm" svg:viewBox="0 0 27 27" draw:points="0,0 27,0 27,27 0,27">
          <text:p/>
        </draw:polygon>
        <draw:polygon draw:style-name="gr269" draw:text-style-name="P267" draw:layer="layout" svg:width="0.026cm" svg:height="0.026cm" svg:x="6.493cm" svg:y="22.924cm" svg:viewBox="0 0 27 27" draw:points="0,0 27,0 27,27 0,27">
          <text:p/>
        </draw:polygon>
        <draw:polygon draw:style-name="gr269" draw:text-style-name="P267" draw:layer="layout" svg:width="0.026cm" svg:height="0.026cm" svg:x="6.546cm" svg:y="22.924cm" svg:viewBox="0 0 27 27" draw:points="0,0 27,0 27,27 0,27">
          <text:p/>
        </draw:polygon>
        <draw:polygon draw:style-name="gr269" draw:text-style-name="P267" draw:layer="layout" svg:width="0.026cm" svg:height="0.026cm" svg:x="6.599cm" svg:y="22.924cm" svg:viewBox="0 0 27 27" draw:points="0,0 27,0 27,27 0,27">
          <text:p/>
        </draw:polygon>
        <draw:polygon draw:style-name="gr269" draw:text-style-name="P267" draw:layer="layout" svg:width="0.026cm" svg:height="0.026cm" svg:x="6.652cm" svg:y="22.924cm" svg:viewBox="0 0 27 27" draw:points="0,0 27,0 27,27 0,27">
          <text:p/>
        </draw:polygon>
        <draw:polygon draw:style-name="gr269" draw:text-style-name="P267" draw:layer="layout" svg:width="0.026cm" svg:height="0.026cm" svg:x="6.705cm" svg:y="22.924cm" svg:viewBox="0 0 27 27" draw:points="0,0 27,0 27,27 0,27">
          <text:p/>
        </draw:polygon>
        <draw:polygon draw:style-name="gr269" draw:text-style-name="P267" draw:layer="layout" svg:width="0.026cm" svg:height="0.026cm" svg:x="6.758cm" svg:y="22.924cm" svg:viewBox="0 0 27 27" draw:points="0,0 27,0 27,27 0,27">
          <text:p/>
        </draw:polygon>
        <draw:polygon draw:style-name="gr269" draw:text-style-name="P267" draw:layer="layout" svg:width="0.026cm" svg:height="0.026cm" svg:x="6.811cm" svg:y="22.924cm" svg:viewBox="0 0 27 27" draw:points="0,0 27,0 27,27 0,27">
          <text:p/>
        </draw:polygon>
        <draw:polygon draw:style-name="gr269" draw:text-style-name="P267" draw:layer="layout" svg:width="0.026cm" svg:height="0.026cm" svg:x="6.864cm" svg:y="22.924cm" svg:viewBox="0 0 27 27" draw:points="0,0 27,0 27,27 0,27">
          <text:p/>
        </draw:polygon>
        <draw:polygon draw:style-name="gr269" draw:text-style-name="P267" draw:layer="layout" svg:width="0.026cm" svg:height="0.026cm" svg:x="6.917cm" svg:y="22.924cm" svg:viewBox="0 0 27 27" draw:points="0,0 27,0 27,27 0,27">
          <text:p/>
        </draw:polygon>
        <draw:polygon draw:style-name="gr269" draw:text-style-name="P267" draw:layer="layout" svg:width="0.026cm" svg:height="0.026cm" svg:x="6.97cm" svg:y="22.924cm" svg:viewBox="0 0 27 27" draw:points="0,0 27,0 27,27 0,27">
          <text:p/>
        </draw:polygon>
        <draw:polygon draw:style-name="gr269" draw:text-style-name="P267" draw:layer="layout" svg:width="0.026cm" svg:height="0.026cm" svg:x="7.023cm" svg:y="22.924cm" svg:viewBox="0 0 27 27" draw:points="0,0 27,0 27,27 0,27">
          <text:p/>
        </draw:polygon>
        <draw:polygon draw:style-name="gr269" draw:text-style-name="P267" draw:layer="layout" svg:width="0.026cm" svg:height="0.026cm" svg:x="7.076cm" svg:y="22.924cm" svg:viewBox="0 0 27 27" draw:points="0,0 27,0 27,27 0,27">
          <text:p/>
        </draw:polygon>
        <draw:polygon draw:style-name="gr269" draw:text-style-name="P267" draw:layer="layout" svg:width="0.026cm" svg:height="0.026cm" svg:x="7.129cm" svg:y="22.924cm" svg:viewBox="0 0 27 27" draw:points="0,0 27,0 27,27 0,27">
          <text:p/>
        </draw:polygon>
        <draw:polygon draw:style-name="gr269" draw:text-style-name="P267" draw:layer="layout" svg:width="0.026cm" svg:height="0.026cm" svg:x="7.182cm" svg:y="22.924cm" svg:viewBox="0 0 27 27" draw:points="0,0 27,0 27,27 0,27">
          <text:p/>
        </draw:polygon>
        <draw:polygon draw:style-name="gr269" draw:text-style-name="P267" draw:layer="layout" svg:width="0.026cm" svg:height="0.026cm" svg:x="7.235cm" svg:y="22.924cm" svg:viewBox="0 0 27 27" draw:points="0,0 27,0 27,27 0,27">
          <text:p/>
        </draw:polygon>
        <draw:polygon draw:style-name="gr269" draw:text-style-name="P267" draw:layer="layout" svg:width="0.026cm" svg:height="0.026cm" svg:x="7.288cm" svg:y="22.924cm" svg:viewBox="0 0 27 27" draw:points="0,0 27,0 27,27 0,27">
          <text:p/>
        </draw:polygon>
        <draw:polygon draw:style-name="gr269" draw:text-style-name="P267" draw:layer="layout" svg:width="0.026cm" svg:height="0.026cm" svg:x="7.341cm" svg:y="22.924cm" svg:viewBox="0 0 27 27" draw:points="0,0 27,0 27,27 0,27">
          <text:p/>
        </draw:polygon>
        <draw:polygon draw:style-name="gr269" draw:text-style-name="P267" draw:layer="layout" svg:width="0.026cm" svg:height="0.026cm" svg:x="7.394cm" svg:y="22.924cm" svg:viewBox="0 0 27 27" draw:points="0,0 27,0 27,27 0,27">
          <text:p/>
        </draw:polygon>
        <draw:polygon draw:style-name="gr269" draw:text-style-name="P267" draw:layer="layout" svg:width="0.026cm" svg:height="0.026cm" svg:x="7.447cm" svg:y="22.924cm" svg:viewBox="0 0 27 27" draw:points="0,0 27,0 27,27 0,27">
          <text:p/>
        </draw:polygon>
        <draw:polygon draw:style-name="gr269" draw:text-style-name="P267" draw:layer="layout" svg:width="0.026cm" svg:height="0.026cm" svg:x="7.5cm" svg:y="22.924cm" svg:viewBox="0 0 27 27" draw:points="0,0 27,0 27,27 0,27">
          <text:p/>
        </draw:polygon>
        <draw:polygon draw:style-name="gr269" draw:text-style-name="P267" draw:layer="layout" svg:width="0.026cm" svg:height="0.026cm" svg:x="7.553cm" svg:y="22.924cm" svg:viewBox="0 0 27 27" draw:points="0,0 27,0 27,27 0,27">
          <text:p/>
        </draw:polygon>
        <draw:polygon draw:style-name="gr269" draw:text-style-name="P267" draw:layer="layout" svg:width="0.026cm" svg:height="0.026cm" svg:x="7.606cm" svg:y="22.924cm" svg:viewBox="0 0 27 27" draw:points="0,0 27,0 27,27 0,27">
          <text:p/>
        </draw:polygon>
        <draw:polygon draw:style-name="gr269" draw:text-style-name="P267" draw:layer="layout" svg:width="0.026cm" svg:height="0.026cm" svg:x="7.659cm" svg:y="22.924cm" svg:viewBox="0 0 27 27" draw:points="0,0 27,0 27,27 0,27">
          <text:p/>
        </draw:polygon>
        <draw:polygon draw:style-name="gr269" draw:text-style-name="P267" draw:layer="layout" svg:width="0.026cm" svg:height="0.026cm" svg:x="7.712cm" svg:y="22.924cm" svg:viewBox="0 0 27 27" draw:points="0,0 27,0 27,27 0,27">
          <text:p/>
        </draw:polygon>
        <draw:polygon draw:style-name="gr269" draw:text-style-name="P267" draw:layer="layout" svg:width="0.026cm" svg:height="0.026cm" svg:x="7.765cm" svg:y="22.924cm" svg:viewBox="0 0 27 27" draw:points="0,0 27,0 27,27 0,27">
          <text:p/>
        </draw:polygon>
        <draw:polygon draw:style-name="gr269" draw:text-style-name="P267" draw:layer="layout" svg:width="0.026cm" svg:height="0.026cm" svg:x="7.818cm" svg:y="22.924cm" svg:viewBox="0 0 27 27" draw:points="0,0 27,0 27,27 0,27">
          <text:p/>
        </draw:polygon>
        <draw:polygon draw:style-name="gr269" draw:text-style-name="P267" draw:layer="layout" svg:width="0.026cm" svg:height="0.026cm" svg:x="7.871cm" svg:y="22.924cm" svg:viewBox="0 0 27 27" draw:points="0,0 27,0 27,27 0,27">
          <text:p/>
        </draw:polygon>
        <draw:polygon draw:style-name="gr269" draw:text-style-name="P267" draw:layer="layout" svg:width="0.026cm" svg:height="0.026cm" svg:x="7.924cm" svg:y="22.924cm" svg:viewBox="0 0 27 27" draw:points="0,0 27,0 27,27 0,27">
          <text:p/>
        </draw:polygon>
        <draw:polygon draw:style-name="gr269" draw:text-style-name="P267" draw:layer="layout" svg:width="0.026cm" svg:height="0.026cm" svg:x="7.977cm" svg:y="22.924cm" svg:viewBox="0 0 27 27" draw:points="0,0 27,0 27,27 0,27">
          <text:p/>
        </draw:polygon>
        <draw:polygon draw:style-name="gr269" draw:text-style-name="P267" draw:layer="layout" svg:width="0.026cm" svg:height="0.026cm" svg:x="8.03cm" svg:y="22.924cm" svg:viewBox="0 0 27 27" draw:points="0,0 27,0 27,27 0,27">
          <text:p/>
        </draw:polygon>
        <draw:polygon draw:style-name="gr269" draw:text-style-name="P267" draw:layer="layout" svg:width="0.026cm" svg:height="0.026cm" svg:x="8.083cm" svg:y="22.924cm" svg:viewBox="0 0 27 27" draw:points="0,0 27,0 27,27 0,27">
          <text:p/>
        </draw:polygon>
        <draw:polygon draw:style-name="gr269" draw:text-style-name="P267" draw:layer="layout" svg:width="0.026cm" svg:height="0.026cm" svg:x="8.136cm" svg:y="22.924cm" svg:viewBox="0 0 27 27" draw:points="0,0 27,0 27,27 0,27">
          <text:p/>
        </draw:polygon>
        <draw:polygon draw:style-name="gr269" draw:text-style-name="P267" draw:layer="layout" svg:width="0.026cm" svg:height="0.026cm" svg:x="8.189cm" svg:y="22.924cm" svg:viewBox="0 0 27 27" draw:points="0,0 27,0 27,27 0,27">
          <text:p/>
        </draw:polygon>
        <draw:polygon draw:style-name="gr269" draw:text-style-name="P267" draw:layer="layout" svg:width="0.026cm" svg:height="0.026cm" svg:x="8.242cm" svg:y="22.924cm" svg:viewBox="0 0 27 27" draw:points="0,0 27,0 27,27 0,27">
          <text:p/>
        </draw:polygon>
        <draw:polygon draw:style-name="gr269" draw:text-style-name="P267" draw:layer="layout" svg:width="0.026cm" svg:height="0.026cm" svg:x="8.295cm" svg:y="22.924cm" svg:viewBox="0 0 27 27" draw:points="0,0 27,0 27,27 0,27">
          <text:p/>
        </draw:polygon>
        <draw:polygon draw:style-name="gr269" draw:text-style-name="P267" draw:layer="layout" svg:width="0.026cm" svg:height="0.026cm" svg:x="8.348cm" svg:y="22.924cm" svg:viewBox="0 0 27 27" draw:points="0,0 27,0 27,27 0,27">
          <text:p/>
        </draw:polygon>
        <draw:polygon draw:style-name="gr269" draw:text-style-name="P267" draw:layer="layout" svg:width="0.026cm" svg:height="0.026cm" svg:x="8.401cm" svg:y="22.924cm" svg:viewBox="0 0 27 27" draw:points="0,0 27,0 27,27 0,27">
          <text:p/>
        </draw:polygon>
        <draw:polygon draw:style-name="gr269" draw:text-style-name="P267" draw:layer="layout" svg:width="0.026cm" svg:height="0.026cm" svg:x="8.454cm" svg:y="22.924cm" svg:viewBox="0 0 27 27" draw:points="0,0 27,0 27,27 0,27">
          <text:p/>
        </draw:polygon>
        <draw:polygon draw:style-name="gr269" draw:text-style-name="P267" draw:layer="layout" svg:width="0.026cm" svg:height="0.026cm" svg:x="8.507cm" svg:y="22.924cm" svg:viewBox="0 0 27 27" draw:points="0,0 27,0 27,27 0,27">
          <text:p/>
        </draw:polygon>
        <draw:polygon draw:style-name="gr269" draw:text-style-name="P267" draw:layer="layout" svg:width="0.026cm" svg:height="0.026cm" svg:x="8.56cm" svg:y="22.924cm" svg:viewBox="0 0 27 27" draw:points="0,0 27,0 27,27 0,27">
          <text:p/>
        </draw:polygon>
        <draw:polygon draw:style-name="gr269" draw:text-style-name="P267" draw:layer="layout" svg:width="0.026cm" svg:height="0.026cm" svg:x="8.613cm" svg:y="22.924cm" svg:viewBox="0 0 27 27" draw:points="0,0 27,0 27,27 0,27">
          <text:p/>
        </draw:polygon>
        <draw:polygon draw:style-name="gr269" draw:text-style-name="P267" draw:layer="layout" svg:width="0.026cm" svg:height="0.026cm" svg:x="8.666cm" svg:y="22.924cm" svg:viewBox="0 0 27 27" draw:points="0,0 27,0 27,27 0,27">
          <text:p/>
        </draw:polygon>
        <draw:polygon draw:style-name="gr269" draw:text-style-name="P267" draw:layer="layout" svg:width="0.026cm" svg:height="0.026cm" svg:x="8.719cm" svg:y="22.924cm" svg:viewBox="0 0 27 27" draw:points="0,0 27,0 27,27 0,27">
          <text:p/>
        </draw:polygon>
        <draw:polygon draw:style-name="gr269" draw:text-style-name="P267" draw:layer="layout" svg:width="0.026cm" svg:height="0.026cm" svg:x="8.772cm" svg:y="22.924cm" svg:viewBox="0 0 27 27" draw:points="0,0 27,0 27,27 0,27">
          <text:p/>
        </draw:polygon>
        <draw:polygon draw:style-name="gr269" draw:text-style-name="P267" draw:layer="layout" svg:width="0.026cm" svg:height="0.026cm" svg:x="8.825cm" svg:y="22.924cm" svg:viewBox="0 0 27 27" draw:points="0,0 27,0 27,27 0,27">
          <text:p/>
        </draw:polygon>
        <draw:polygon draw:style-name="gr269" draw:text-style-name="P267" draw:layer="layout" svg:width="0.026cm" svg:height="0.026cm" svg:x="8.878cm" svg:y="22.924cm" svg:viewBox="0 0 27 27" draw:points="0,0 27,0 27,27 0,27">
          <text:p/>
        </draw:polygon>
        <draw:polygon draw:style-name="gr269" draw:text-style-name="P267" draw:layer="layout" svg:width="0.026cm" svg:height="0.026cm" svg:x="8.931cm" svg:y="22.924cm" svg:viewBox="0 0 27 27" draw:points="0,0 27,0 27,27 0,27">
          <text:p/>
        </draw:polygon>
        <draw:polygon draw:style-name="gr269" draw:text-style-name="P267" draw:layer="layout" svg:width="0.026cm" svg:height="0.026cm" svg:x="8.984cm" svg:y="22.924cm" svg:viewBox="0 0 27 27" draw:points="0,0 27,0 27,27 0,27">
          <text:p/>
        </draw:polygon>
        <draw:polygon draw:style-name="gr269" draw:text-style-name="P267" draw:layer="layout" svg:width="0.026cm" svg:height="0.026cm" svg:x="9.037cm" svg:y="22.924cm" svg:viewBox="0 0 27 27" draw:points="0,0 27,0 27,27 0,27">
          <text:p/>
        </draw:polygon>
        <draw:polygon draw:style-name="gr269" draw:text-style-name="P267" draw:layer="layout" svg:width="0.026cm" svg:height="0.026cm" svg:x="9.09cm" svg:y="22.924cm" svg:viewBox="0 0 27 27" draw:points="0,0 27,0 27,27 0,27">
          <text:p/>
        </draw:polygon>
        <draw:polygon draw:style-name="gr269" draw:text-style-name="P267" draw:layer="layout" svg:width="0.026cm" svg:height="0.026cm" svg:x="9.143cm" svg:y="22.924cm" svg:viewBox="0 0 27 27" draw:points="0,0 27,0 27,27 0,27">
          <text:p/>
        </draw:polygon>
        <draw:polygon draw:style-name="gr269" draw:text-style-name="P267" draw:layer="layout" svg:width="0.026cm" svg:height="0.026cm" svg:x="9.196cm" svg:y="22.924cm" svg:viewBox="0 0 27 27" draw:points="0,0 27,0 27,27 0,27">
          <text:p/>
        </draw:polygon>
        <draw:polygon draw:style-name="gr269" draw:text-style-name="P267" draw:layer="layout" svg:width="0.026cm" svg:height="0.026cm" svg:x="9.249cm" svg:y="22.924cm" svg:viewBox="0 0 27 27" draw:points="0,0 27,0 27,27 0,27">
          <text:p/>
        </draw:polygon>
        <draw:polygon draw:style-name="gr269" draw:text-style-name="P267" draw:layer="layout" svg:width="0.026cm" svg:height="0.026cm" svg:x="9.302cm" svg:y="22.924cm" svg:viewBox="0 0 27 27" draw:points="0,0 27,0 27,27 0,27">
          <text:p/>
        </draw:polygon>
        <draw:polygon draw:style-name="gr269" draw:text-style-name="P267" draw:layer="layout" svg:width="0.026cm" svg:height="0.026cm" svg:x="9.355cm" svg:y="22.924cm" svg:viewBox="0 0 27 27" draw:points="0,0 27,0 27,27 0,27">
          <text:p/>
        </draw:polygon>
        <draw:polygon draw:style-name="gr269" draw:text-style-name="P267" draw:layer="layout" svg:width="0.026cm" svg:height="0.026cm" svg:x="9.408cm" svg:y="22.924cm" svg:viewBox="0 0 27 27" draw:points="0,0 27,0 27,27 0,27">
          <text:p/>
        </draw:polygon>
        <draw:polygon draw:style-name="gr269" draw:text-style-name="P267" draw:layer="layout" svg:width="0.026cm" svg:height="0.026cm" svg:x="9.461cm" svg:y="22.924cm" svg:viewBox="0 0 27 27" draw:points="0,0 27,0 27,27 0,27">
          <text:p/>
        </draw:polygon>
        <draw:polygon draw:style-name="gr269" draw:text-style-name="P267" draw:layer="layout" svg:width="0.026cm" svg:height="0.026cm" svg:x="9.514cm" svg:y="22.924cm" svg:viewBox="0 0 27 27" draw:points="0,0 27,0 27,27 0,27">
          <text:p/>
        </draw:polygon>
        <draw:polygon draw:style-name="gr269" draw:text-style-name="P267" draw:layer="layout" svg:width="0.026cm" svg:height="0.026cm" svg:x="9.567cm" svg:y="22.924cm" svg:viewBox="0 0 27 27" draw:points="0,0 27,0 27,27 0,27">
          <text:p/>
        </draw:polygon>
        <draw:polygon draw:style-name="gr269" draw:text-style-name="P267" draw:layer="layout" svg:width="0.026cm" svg:height="0.026cm" svg:x="9.62cm" svg:y="22.924cm" svg:viewBox="0 0 27 27" draw:points="0,0 27,0 27,27 0,27">
          <text:p/>
        </draw:polygon>
        <draw:polygon draw:style-name="gr269" draw:text-style-name="P267" draw:layer="layout" svg:width="0.026cm" svg:height="0.026cm" svg:x="9.673cm" svg:y="22.924cm" svg:viewBox="0 0 27 27" draw:points="0,0 27,0 27,27 0,27">
          <text:p/>
        </draw:polygon>
        <draw:polygon draw:style-name="gr269" draw:text-style-name="P267" draw:layer="layout" svg:width="0.026cm" svg:height="0.026cm" svg:x="9.726cm" svg:y="22.924cm" svg:viewBox="0 0 27 27" draw:points="0,0 27,0 27,27 0,27">
          <text:p/>
        </draw:polygon>
        <draw:polygon draw:style-name="gr269" draw:text-style-name="P267" draw:layer="layout" svg:width="0.026cm" svg:height="0.026cm" svg:x="9.779cm" svg:y="22.924cm" svg:viewBox="0 0 27 27" draw:points="0,0 27,0 27,27 0,27">
          <text:p/>
        </draw:polygon>
        <draw:polygon draw:style-name="gr269" draw:text-style-name="P267" draw:layer="layout" svg:width="0.026cm" svg:height="0.026cm" svg:x="9.832cm" svg:y="22.924cm" svg:viewBox="0 0 27 27" draw:points="0,0 27,0 27,27 0,27">
          <text:p/>
        </draw:polygon>
        <draw:polygon draw:style-name="gr269" draw:text-style-name="P267" draw:layer="layout" svg:width="0.026cm" svg:height="0.026cm" svg:x="9.885cm" svg:y="22.924cm" svg:viewBox="0 0 27 27" draw:points="0,0 27,0 27,27 0,27">
          <text:p/>
        </draw:polygon>
        <draw:polygon draw:style-name="gr269" draw:text-style-name="P267" draw:layer="layout" svg:width="0.026cm" svg:height="0.026cm" svg:x="9.938cm" svg:y="22.924cm" svg:viewBox="0 0 27 27" draw:points="0,0 27,0 27,27 0,27">
          <text:p/>
        </draw:polygon>
        <draw:polygon draw:style-name="gr269" draw:text-style-name="P267" draw:layer="layout" svg:width="0.026cm" svg:height="0.026cm" svg:x="9.991cm" svg:y="22.924cm" svg:viewBox="0 0 27 27" draw:points="0,0 27,0 27,27 0,27">
          <text:p/>
        </draw:polygon>
        <draw:polygon draw:style-name="gr269" draw:text-style-name="P267" draw:layer="layout" svg:width="0.026cm" svg:height="0.026cm" svg:x="10.044cm" svg:y="22.924cm" svg:viewBox="0 0 27 27" draw:points="0,0 27,0 27,27 0,27">
          <text:p/>
        </draw:polygon>
        <draw:polygon draw:style-name="gr269" draw:text-style-name="P267" draw:layer="layout" svg:width="0.026cm" svg:height="0.026cm" svg:x="10.097cm" svg:y="22.924cm" svg:viewBox="0 0 27 27" draw:points="0,0 27,0 27,27 0,27">
          <text:p/>
        </draw:polygon>
        <draw:polygon draw:style-name="gr269" draw:text-style-name="P267" draw:layer="layout" svg:width="0.026cm" svg:height="0.026cm" svg:x="10.15cm" svg:y="22.924cm" svg:viewBox="0 0 27 27" draw:points="0,0 27,0 27,27 0,27">
          <text:p/>
        </draw:polygon>
        <draw:polygon draw:style-name="gr269" draw:text-style-name="P267" draw:layer="layout" svg:width="0.026cm" svg:height="0.026cm" svg:x="10.203cm" svg:y="22.924cm" svg:viewBox="0 0 27 27" draw:points="0,0 27,0 27,27 0,27">
          <text:p/>
        </draw:polygon>
        <draw:polygon draw:style-name="gr269" draw:text-style-name="P267" draw:layer="layout" svg:width="0.026cm" svg:height="0.026cm" svg:x="10.256cm" svg:y="22.924cm" svg:viewBox="0 0 27 27" draw:points="0,0 27,0 27,27 0,27">
          <text:p/>
        </draw:polygon>
        <draw:polygon draw:style-name="gr269" draw:text-style-name="P267" draw:layer="layout" svg:width="0.026cm" svg:height="0.026cm" svg:x="10.309cm" svg:y="22.924cm" svg:viewBox="0 0 27 27" draw:points="0,0 27,0 27,27 0,27">
          <text:p/>
        </draw:polygon>
        <draw:polygon draw:style-name="gr269" draw:text-style-name="P267" draw:layer="layout" svg:width="0.026cm" svg:height="0.026cm" svg:x="10.362cm" svg:y="22.924cm" svg:viewBox="0 0 27 27" draw:points="0,0 27,0 27,27 0,27">
          <text:p/>
        </draw:polygon>
        <draw:polygon draw:style-name="gr269" draw:text-style-name="P267" draw:layer="layout" svg:width="0.026cm" svg:height="0.026cm" svg:x="10.415cm" svg:y="22.924cm" svg:viewBox="0 0 27 27" draw:points="0,0 27,0 27,27 0,27">
          <text:p/>
        </draw:polygon>
        <draw:polygon draw:style-name="gr269" draw:text-style-name="P267" draw:layer="layout" svg:width="0.026cm" svg:height="0.026cm" svg:x="10.468cm" svg:y="22.924cm" svg:viewBox="0 0 27 27" draw:points="0,0 27,0 27,27 0,27">
          <text:p/>
        </draw:polygon>
        <draw:polygon draw:style-name="gr269" draw:text-style-name="P267" draw:layer="layout" svg:width="0.026cm" svg:height="0.026cm" svg:x="10.521cm" svg:y="22.924cm" svg:viewBox="0 0 27 27" draw:points="0,0 27,0 27,27 0,27">
          <text:p/>
        </draw:polygon>
        <draw:polygon draw:style-name="gr269" draw:text-style-name="P267" draw:layer="layout" svg:width="0.026cm" svg:height="0.026cm" svg:x="10.574cm" svg:y="22.924cm" svg:viewBox="0 0 27 27" draw:points="0,0 27,0 27,27 0,27">
          <text:p/>
        </draw:polygon>
        <draw:polygon draw:style-name="gr269" draw:text-style-name="P267" draw:layer="layout" svg:width="0.026cm" svg:height="0.026cm" svg:x="10.627cm" svg:y="22.924cm" svg:viewBox="0 0 27 27" draw:points="0,0 27,0 27,27 0,27">
          <text:p/>
        </draw:polygon>
        <draw:polygon draw:style-name="gr269" draw:text-style-name="P267" draw:layer="layout" svg:width="0.026cm" svg:height="0.026cm" svg:x="10.68cm" svg:y="22.924cm" svg:viewBox="0 0 27 27" draw:points="0,0 27,0 27,27 0,27">
          <text:p/>
        </draw:polygon>
        <draw:polygon draw:style-name="gr269" draw:text-style-name="P267" draw:layer="layout" svg:width="0.026cm" svg:height="0.026cm" svg:x="10.733cm" svg:y="22.924cm" svg:viewBox="0 0 27 27" draw:points="0,0 27,0 27,27 0,27">
          <text:p/>
        </draw:polygon>
        <draw:polygon draw:style-name="gr269" draw:text-style-name="P267" draw:layer="layout" svg:width="0.026cm" svg:height="0.026cm" svg:x="10.786cm" svg:y="22.924cm" svg:viewBox="0 0 27 27" draw:points="0,0 27,0 27,27 0,27">
          <text:p/>
        </draw:polygon>
        <draw:polygon draw:style-name="gr269" draw:text-style-name="P267" draw:layer="layout" svg:width="0.026cm" svg:height="0.026cm" svg:x="10.839cm" svg:y="22.924cm" svg:viewBox="0 0 27 27" draw:points="0,0 27,0 27,27 0,27">
          <text:p/>
        </draw:polygon>
        <draw:polygon draw:style-name="gr269" draw:text-style-name="P267" draw:layer="layout" svg:width="0.026cm" svg:height="0.026cm" svg:x="10.892cm" svg:y="22.924cm" svg:viewBox="0 0 27 27" draw:points="0,0 27,0 27,27 0,27">
          <text:p/>
        </draw:polygon>
        <draw:polygon draw:style-name="gr269" draw:text-style-name="P267" draw:layer="layout" svg:width="0.026cm" svg:height="0.026cm" svg:x="10.945cm" svg:y="22.924cm" svg:viewBox="0 0 27 27" draw:points="0,0 27,0 27,27 0,27">
          <text:p/>
        </draw:polygon>
        <draw:polygon draw:style-name="gr269" draw:text-style-name="P267" draw:layer="layout" svg:width="0.026cm" svg:height="0.026cm" svg:x="10.998cm" svg:y="22.924cm" svg:viewBox="0 0 27 27" draw:points="0,0 27,0 27,27 0,27">
          <text:p/>
        </draw:polygon>
        <draw:polygon draw:style-name="gr269" draw:text-style-name="P267" draw:layer="layout" svg:width="0.026cm" svg:height="0.026cm" svg:x="11.051cm" svg:y="22.924cm" svg:viewBox="0 0 27 27" draw:points="0,0 27,0 27,27 0,27">
          <text:p/>
        </draw:polygon>
        <draw:polygon draw:style-name="gr269" draw:text-style-name="P267" draw:layer="layout" svg:width="0.026cm" svg:height="0.026cm" svg:x="11.104cm" svg:y="22.924cm" svg:viewBox="0 0 27 27" draw:points="0,0 27,0 27,27 0,27">
          <text:p/>
        </draw:polygon>
        <draw:polygon draw:style-name="gr269" draw:text-style-name="P267" draw:layer="layout" svg:width="0.026cm" svg:height="0.026cm" svg:x="11.157cm" svg:y="22.924cm" svg:viewBox="0 0 27 27" draw:points="0,0 27,0 27,27 0,27">
          <text:p/>
        </draw:polygon>
        <draw:polygon draw:style-name="gr269" draw:text-style-name="P267" draw:layer="layout" svg:width="0.026cm" svg:height="0.026cm" svg:x="11.21cm" svg:y="22.924cm" svg:viewBox="0 0 27 27" draw:points="0,0 27,0 27,27 0,27">
          <text:p/>
        </draw:polygon>
        <draw:polygon draw:style-name="gr269" draw:text-style-name="P267" draw:layer="layout" svg:width="0.026cm" svg:height="0.026cm" svg:x="11.263cm" svg:y="22.924cm" svg:viewBox="0 0 27 27" draw:points="0,0 27,0 27,27 0,27">
          <text:p/>
        </draw:polygon>
        <draw:polygon draw:style-name="gr269" draw:text-style-name="P267" draw:layer="layout" svg:width="0.026cm" svg:height="0.026cm" svg:x="11.316cm" svg:y="22.924cm" svg:viewBox="0 0 27 27" draw:points="0,0 27,0 27,27 0,27">
          <text:p/>
        </draw:polygon>
        <draw:polygon draw:style-name="gr269" draw:text-style-name="P267" draw:layer="layout" svg:width="0.026cm" svg:height="0.026cm" svg:x="11.369cm" svg:y="22.924cm" svg:viewBox="0 0 27 27" draw:points="0,0 27,0 27,27 0,27">
          <text:p/>
        </draw:polygon>
        <draw:polygon draw:style-name="gr269" draw:text-style-name="P267" draw:layer="layout" svg:width="0.026cm" svg:height="0.026cm" svg:x="11.422cm" svg:y="22.924cm" svg:viewBox="0 0 27 27" draw:points="0,0 27,0 27,27 0,27">
          <text:p/>
        </draw:polygon>
        <draw:polygon draw:style-name="gr269" draw:text-style-name="P267" draw:layer="layout" svg:width="0.026cm" svg:height="0.026cm" svg:x="11.475cm" svg:y="22.924cm" svg:viewBox="0 0 27 27" draw:points="0,0 27,0 27,27 0,27">
          <text:p/>
        </draw:polygon>
        <draw:polygon draw:style-name="gr269" draw:text-style-name="P267" draw:layer="layout" svg:width="0.026cm" svg:height="0.026cm" svg:x="11.528cm" svg:y="22.924cm" svg:viewBox="0 0 27 27" draw:points="0,0 27,0 27,27 0,27">
          <text:p/>
        </draw:polygon>
        <draw:polygon draw:style-name="gr269" draw:text-style-name="P267" draw:layer="layout" svg:width="0.026cm" svg:height="0.026cm" svg:x="11.581cm" svg:y="22.924cm" svg:viewBox="0 0 27 27" draw:points="0,0 27,0 27,27 0,27">
          <text:p/>
        </draw:polygon>
        <draw:polygon draw:style-name="gr269" draw:text-style-name="P267" draw:layer="layout" svg:width="0.026cm" svg:height="0.026cm" svg:x="11.634cm" svg:y="22.924cm" svg:viewBox="0 0 27 27" draw:points="0,0 27,0 27,27 0,27">
          <text:p/>
        </draw:polygon>
        <draw:polygon draw:style-name="gr269" draw:text-style-name="P267" draw:layer="layout" svg:width="0.026cm" svg:height="0.026cm" svg:x="11.687cm" svg:y="22.924cm" svg:viewBox="0 0 27 27" draw:points="0,0 27,0 27,27 0,27">
          <text:p/>
        </draw:polygon>
        <draw:polygon draw:style-name="gr269" draw:text-style-name="P267" draw:layer="layout" svg:width="0.026cm" svg:height="0.026cm" svg:x="11.74cm" svg:y="22.924cm" svg:viewBox="0 0 27 27" draw:points="0,0 27,0 27,27 0,27">
          <text:p/>
        </draw:polygon>
        <draw:polygon draw:style-name="gr269" draw:text-style-name="P267" draw:layer="layout" svg:width="0.026cm" svg:height="0.026cm" svg:x="11.793cm" svg:y="22.924cm" svg:viewBox="0 0 27 27" draw:points="0,0 27,0 27,27 0,27">
          <text:p/>
        </draw:polygon>
        <draw:polygon draw:style-name="gr269" draw:text-style-name="P267" draw:layer="layout" svg:width="0.026cm" svg:height="0.026cm" svg:x="11.846cm" svg:y="22.924cm" svg:viewBox="0 0 27 27" draw:points="0,0 27,0 27,27 0,27">
          <text:p/>
        </draw:polygon>
        <draw:polygon draw:style-name="gr269" draw:text-style-name="P267" draw:layer="layout" svg:width="0.026cm" svg:height="0.026cm" svg:x="11.899cm" svg:y="22.924cm" svg:viewBox="0 0 27 27" draw:points="0,0 27,0 27,27 0,27">
          <text:p/>
        </draw:polygon>
        <draw:polygon draw:style-name="gr269" draw:text-style-name="P267" draw:layer="layout" svg:width="0.026cm" svg:height="0.026cm" svg:x="11.952cm" svg:y="22.924cm" svg:viewBox="0 0 27 27" draw:points="0,0 27,0 27,27 0,27">
          <text:p/>
        </draw:polygon>
        <draw:polygon draw:style-name="gr269" draw:text-style-name="P267" draw:layer="layout" svg:width="0.026cm" svg:height="0.026cm" svg:x="12.005cm" svg:y="22.924cm" svg:viewBox="0 0 27 27" draw:points="0,0 27,0 27,27 0,27">
          <text:p/>
        </draw:polygon>
        <draw:polygon draw:style-name="gr269" draw:text-style-name="P267" draw:layer="layout" svg:width="0.026cm" svg:height="0.026cm" svg:x="12.058cm" svg:y="22.924cm" svg:viewBox="0 0 27 27" draw:points="0,0 27,0 27,27 0,27">
          <text:p/>
        </draw:polygon>
        <draw:polygon draw:style-name="gr269" draw:text-style-name="P267" draw:layer="layout" svg:width="0.026cm" svg:height="0.026cm" svg:x="12.111cm" svg:y="22.924cm" svg:viewBox="0 0 27 27" draw:points="0,0 27,0 27,27 0,27">
          <text:p/>
        </draw:polygon>
        <draw:polygon draw:style-name="gr269" draw:text-style-name="P267" draw:layer="layout" svg:width="0.026cm" svg:height="0.026cm" svg:x="12.164cm" svg:y="22.924cm" svg:viewBox="0 0 27 27" draw:points="0,0 27,0 27,27 0,27">
          <text:p/>
        </draw:polygon>
        <draw:polygon draw:style-name="gr269" draw:text-style-name="P267" draw:layer="layout" svg:width="0.026cm" svg:height="0.026cm" svg:x="12.217cm" svg:y="22.924cm" svg:viewBox="0 0 27 27" draw:points="0,0 27,0 27,27 0,27">
          <text:p/>
        </draw:polygon>
        <draw:polygon draw:style-name="gr269" draw:text-style-name="P267" draw:layer="layout" svg:width="0.026cm" svg:height="0.026cm" svg:x="12.27cm" svg:y="22.924cm" svg:viewBox="0 0 27 27" draw:points="0,0 27,0 27,27 0,27">
          <text:p/>
        </draw:polygon>
        <draw:polygon draw:style-name="gr269" draw:text-style-name="P267" draw:layer="layout" svg:width="0.026cm" svg:height="0.026cm" svg:x="12.323cm" svg:y="22.924cm" svg:viewBox="0 0 27 27" draw:points="0,0 27,0 27,27 0,27">
          <text:p/>
        </draw:polygon>
        <draw:polygon draw:style-name="gr269" draw:text-style-name="P267" draw:layer="layout" svg:width="0.026cm" svg:height="0.026cm" svg:x="12.376cm" svg:y="22.924cm" svg:viewBox="0 0 27 27" draw:points="0,0 27,0 27,27 0,27">
          <text:p/>
        </draw:polygon>
        <draw:polygon draw:style-name="gr269" draw:text-style-name="P267" draw:layer="layout" svg:width="0.026cm" svg:height="0.026cm" svg:x="12.429cm" svg:y="22.924cm" svg:viewBox="0 0 27 27" draw:points="0,0 27,0 27,27 0,27">
          <text:p/>
        </draw:polygon>
        <draw:polygon draw:style-name="gr269" draw:text-style-name="P267" draw:layer="layout" svg:width="0.026cm" svg:height="0.026cm" svg:x="12.482cm" svg:y="22.924cm" svg:viewBox="0 0 27 27" draw:points="0,0 27,0 27,27 0,27">
          <text:p/>
        </draw:polygon>
        <draw:polygon draw:style-name="gr269" draw:text-style-name="P267" draw:layer="layout" svg:width="0.026cm" svg:height="0.026cm" svg:x="12.535cm" svg:y="22.924cm" svg:viewBox="0 0 27 27" draw:points="0,0 27,0 27,27 0,27">
          <text:p/>
        </draw:polygon>
        <draw:polygon draw:style-name="gr269" draw:text-style-name="P267" draw:layer="layout" svg:width="0.026cm" svg:height="0.026cm" svg:x="12.588cm" svg:y="22.924cm" svg:viewBox="0 0 27 27" draw:points="0,0 27,0 27,27 0,27">
          <text:p/>
        </draw:polygon>
        <draw:polygon draw:style-name="gr269" draw:text-style-name="P267" draw:layer="layout" svg:width="0.026cm" svg:height="0.026cm" svg:x="12.641cm" svg:y="22.924cm" svg:viewBox="0 0 27 27" draw:points="0,0 27,0 27,27 0,27">
          <text:p/>
        </draw:polygon>
        <draw:polygon draw:style-name="gr269" draw:text-style-name="P267" draw:layer="layout" svg:width="0.027cm" svg:height="0.026cm" svg:x="12.694cm" svg:y="22.924cm" svg:viewBox="0 0 28 27" draw:points="0,0 28,0 28,27 0,27">
          <text:p/>
        </draw:polygon>
        <draw:polygon draw:style-name="gr269" draw:text-style-name="P267" draw:layer="layout" svg:width="0.027cm" svg:height="0.026cm" svg:x="12.747cm" svg:y="22.924cm" svg:viewBox="0 0 28 27" draw:points="0,0 28,0 28,27 0,27">
          <text:p/>
        </draw:polygon>
        <draw:polygon draw:style-name="gr269" draw:text-style-name="P267" draw:layer="layout" svg:width="0.027cm" svg:height="0.026cm" svg:x="12.8cm" svg:y="22.924cm" svg:viewBox="0 0 28 27" draw:points="0,0 28,0 28,27 0,27">
          <text:p/>
        </draw:polygon>
        <draw:polygon draw:style-name="gr269" draw:text-style-name="P267" draw:layer="layout" svg:width="0.027cm" svg:height="0.026cm" svg:x="12.853cm" svg:y="22.924cm" svg:viewBox="0 0 28 27" draw:points="0,0 28,0 28,27 0,27">
          <text:p/>
        </draw:polygon>
        <draw:polygon draw:style-name="gr269" draw:text-style-name="P267" draw:layer="layout" svg:width="0.027cm" svg:height="0.026cm" svg:x="12.906cm" svg:y="22.924cm" svg:viewBox="0 0 28 27" draw:points="0,0 28,0 28,27 0,27">
          <text:p/>
        </draw:polygon>
        <draw:polygon draw:style-name="gr269" draw:text-style-name="P267" draw:layer="layout" svg:width="0.027cm" svg:height="0.026cm" svg:x="12.959cm" svg:y="22.924cm" svg:viewBox="0 0 28 27" draw:points="0,0 28,0 28,27 0,27">
          <text:p/>
        </draw:polygon>
        <draw:polygon draw:style-name="gr269" draw:text-style-name="P267" draw:layer="layout" svg:width="0.028cm" svg:height="0.026cm" svg:x="13.012cm" svg:y="22.924cm" svg:viewBox="0 0 29 27" draw:points="0,0 29,0 29,27 0,27">
          <text:p/>
        </draw:polygon>
        <draw:polygon draw:style-name="gr269" draw:text-style-name="P267" draw:layer="layout" svg:width="0.027cm" svg:height="0.026cm" svg:x="13.065cm" svg:y="22.924cm" svg:viewBox="0 0 28 27" draw:points="0,0 28,0 28,27 0,27">
          <text:p/>
        </draw:polygon>
        <draw:polygon draw:style-name="gr269" draw:text-style-name="P267" draw:layer="layout" svg:width="0.027cm" svg:height="0.026cm" svg:x="13.118cm" svg:y="22.924cm" svg:viewBox="0 0 28 27" draw:points="0,0 28,0 28,27 0,27">
          <text:p/>
        </draw:polygon>
        <draw:polygon draw:style-name="gr269" draw:text-style-name="P267" draw:layer="layout" svg:width="0.027cm" svg:height="0.026cm" svg:x="13.171cm" svg:y="22.924cm" svg:viewBox="0 0 28 27" draw:points="0,0 28,0 28,27 0,27">
          <text:p/>
        </draw:polygon>
        <draw:polygon draw:style-name="gr269" draw:text-style-name="P267" draw:layer="layout" svg:width="0.027cm" svg:height="0.026cm" svg:x="13.224cm" svg:y="22.924cm" svg:viewBox="0 0 28 27" draw:points="0,0 28,0 28,27 0,27">
          <text:p/>
        </draw:polygon>
        <draw:polygon draw:style-name="gr269" draw:text-style-name="P267" draw:layer="layout" svg:width="0.027cm" svg:height="0.026cm" svg:x="13.277cm" svg:y="22.924cm" svg:viewBox="0 0 28 27" draw:points="0,0 28,0 28,27 0,27">
          <text:p/>
        </draw:polygon>
        <draw:polygon draw:style-name="gr269" draw:text-style-name="P267" draw:layer="layout" svg:width="0.027cm" svg:height="0.026cm" svg:x="13.33cm" svg:y="22.924cm" svg:viewBox="0 0 28 27" draw:points="0,0 28,0 28,27 0,27">
          <text:p/>
        </draw:polygon>
        <draw:polygon draw:style-name="gr269" draw:text-style-name="P267" draw:layer="layout" svg:width="0.027cm" svg:height="0.026cm" svg:x="13.383cm" svg:y="22.924cm" svg:viewBox="0 0 28 27" draw:points="0,0 28,0 28,27 0,27">
          <text:p/>
        </draw:polygon>
        <draw:polygon draw:style-name="gr269" draw:text-style-name="P267" draw:layer="layout" svg:width="0.027cm" svg:height="0.026cm" svg:x="13.436cm" svg:y="22.924cm" svg:viewBox="0 0 28 27" draw:points="0,0 28,0 28,27 0,27">
          <text:p/>
        </draw:polygon>
        <draw:polygon draw:style-name="gr269" draw:text-style-name="P267" draw:layer="layout" svg:width="0.027cm" svg:height="0.026cm" svg:x="13.489cm" svg:y="22.924cm" svg:viewBox="0 0 28 27" draw:points="0,0 28,0 28,27 0,27">
          <text:p/>
        </draw:polygon>
        <draw:polygon draw:style-name="gr269" draw:text-style-name="P267" draw:layer="layout" svg:width="0.027cm" svg:height="0.026cm" svg:x="13.542cm" svg:y="22.924cm" svg:viewBox="0 0 28 27" draw:points="0,0 28,0 28,27 0,27">
          <text:p/>
        </draw:polygon>
        <draw:polygon draw:style-name="gr269" draw:text-style-name="P267" draw:layer="layout" svg:width="0.027cm" svg:height="0.026cm" svg:x="13.595cm" svg:y="22.924cm" svg:viewBox="0 0 28 27" draw:points="0,0 28,0 28,27 0,27">
          <text:p/>
        </draw:polygon>
        <draw:polygon draw:style-name="gr269" draw:text-style-name="P267" draw:layer="layout" svg:width="0.027cm" svg:height="0.026cm" svg:x="13.648cm" svg:y="22.924cm" svg:viewBox="0 0 28 27" draw:points="0,0 28,0 28,27 0,27">
          <text:p/>
        </draw:polygon>
        <draw:polygon draw:style-name="gr269" draw:text-style-name="P267" draw:layer="layout" svg:width="0.027cm" svg:height="0.026cm" svg:x="13.701cm" svg:y="22.924cm" svg:viewBox="0 0 28 27" draw:points="0,0 28,0 28,27 0,27">
          <text:p/>
        </draw:polygon>
        <draw:polygon draw:style-name="gr269" draw:text-style-name="P267" draw:layer="layout" svg:width="0.027cm" svg:height="0.026cm" svg:x="13.754cm" svg:y="22.924cm" svg:viewBox="0 0 28 27" draw:points="0,0 28,0 28,27 0,27">
          <text:p/>
        </draw:polygon>
        <draw:polygon draw:style-name="gr269" draw:text-style-name="P267" draw:layer="layout" svg:width="0.027cm" svg:height="0.026cm" svg:x="13.807cm" svg:y="22.924cm" svg:viewBox="0 0 28 27" draw:points="0,0 28,0 28,27 0,27">
          <text:p/>
        </draw:polygon>
        <draw:polygon draw:style-name="gr269" draw:text-style-name="P267" draw:layer="layout" svg:width="0.027cm" svg:height="0.026cm" svg:x="13.86cm" svg:y="22.924cm" svg:viewBox="0 0 28 27" draw:points="0,0 28,0 28,27 0,27">
          <text:p/>
        </draw:polygon>
        <draw:polygon draw:style-name="gr269" draw:text-style-name="P267" draw:layer="layout" svg:width="0.027cm" svg:height="0.026cm" svg:x="13.913cm" svg:y="22.924cm" svg:viewBox="0 0 28 27" draw:points="0,0 28,0 28,27 0,27">
          <text:p/>
        </draw:polygon>
        <draw:polygon draw:style-name="gr269" draw:text-style-name="P267" draw:layer="layout" svg:width="0.027cm" svg:height="0.026cm" svg:x="13.966cm" svg:y="22.924cm" svg:viewBox="0 0 28 27" draw:points="0,0 28,0 28,27 0,27">
          <text:p/>
        </draw:polygon>
        <draw:polygon draw:style-name="gr269" draw:text-style-name="P267" draw:layer="layout" svg:width="0.027cm" svg:height="0.026cm" svg:x="14.019cm" svg:y="22.924cm" svg:viewBox="0 0 28 27" draw:points="0,0 28,0 28,27 0,27">
          <text:p/>
        </draw:polygon>
        <draw:polygon draw:style-name="gr269" draw:text-style-name="P267" draw:layer="layout" svg:width="0.027cm" svg:height="0.026cm" svg:x="14.072cm" svg:y="22.924cm" svg:viewBox="0 0 28 27" draw:points="0,0 28,0 28,27 0,27">
          <text:p/>
        </draw:polygon>
        <draw:polygon draw:style-name="gr269" draw:text-style-name="P267" draw:layer="layout" svg:width="0.027cm" svg:height="0.026cm" svg:x="14.125cm" svg:y="22.924cm" svg:viewBox="0 0 28 27" draw:points="0,0 28,0 28,27 0,27">
          <text:p/>
        </draw:polygon>
        <draw:polygon draw:style-name="gr269" draw:text-style-name="P267" draw:layer="layout" svg:width="0.027cm" svg:height="0.026cm" svg:x="14.178cm" svg:y="22.924cm" svg:viewBox="0 0 28 27" draw:points="0,0 28,0 28,27 0,27">
          <text:p/>
        </draw:polygon>
        <draw:polygon draw:style-name="gr269" draw:text-style-name="P267" draw:layer="layout" svg:width="0.027cm" svg:height="0.026cm" svg:x="14.231cm" svg:y="22.924cm" svg:viewBox="0 0 28 27" draw:points="0,0 28,0 28,27 0,27">
          <text:p/>
        </draw:polygon>
        <draw:polygon draw:style-name="gr269" draw:text-style-name="P267" draw:layer="layout" svg:width="0.027cm" svg:height="0.026cm" svg:x="14.284cm" svg:y="22.924cm" svg:viewBox="0 0 28 27" draw:points="0,0 28,0 28,27 0,27">
          <text:p/>
        </draw:polygon>
        <draw:polygon draw:style-name="gr269" draw:text-style-name="P267" draw:layer="layout" svg:width="0.027cm" svg:height="0.026cm" svg:x="14.337cm" svg:y="22.924cm" svg:viewBox="0 0 28 27" draw:points="0,0 28,0 28,27 0,27">
          <text:p/>
        </draw:polygon>
        <draw:polygon draw:style-name="gr269" draw:text-style-name="P267" draw:layer="layout" svg:width="0.028cm" svg:height="0.026cm" svg:x="14.39cm" svg:y="22.924cm" svg:viewBox="0 0 29 27" draw:points="0,0 29,0 29,27 0,27">
          <text:p/>
        </draw:polygon>
        <draw:polygon draw:style-name="gr269" draw:text-style-name="P267" draw:layer="layout" svg:width="0.027cm" svg:height="0.026cm" svg:x="14.443cm" svg:y="22.924cm" svg:viewBox="0 0 28 27" draw:points="0,0 28,0 28,27 0,27">
          <text:p/>
        </draw:polygon>
        <draw:polygon draw:style-name="gr269" draw:text-style-name="P267" draw:layer="layout" svg:width="0.027cm" svg:height="0.026cm" svg:x="14.496cm" svg:y="22.924cm" svg:viewBox="0 0 28 27" draw:points="0,0 28,0 28,27 0,27">
          <text:p/>
        </draw:polygon>
        <draw:polygon draw:style-name="gr269" draw:text-style-name="P267" draw:layer="layout" svg:width="0.027cm" svg:height="0.026cm" svg:x="14.549cm" svg:y="22.924cm" svg:viewBox="0 0 28 27" draw:points="0,0 28,0 28,27 0,27">
          <text:p/>
        </draw:polygon>
        <draw:polygon draw:style-name="gr269" draw:text-style-name="P267" draw:layer="layout" svg:width="0.027cm" svg:height="0.026cm" svg:x="14.602cm" svg:y="22.924cm" svg:viewBox="0 0 28 27" draw:points="0,0 28,0 28,27 0,27">
          <text:p/>
        </draw:polygon>
        <draw:polygon draw:style-name="gr269" draw:text-style-name="P267" draw:layer="layout" svg:width="0.027cm" svg:height="0.026cm" svg:x="14.655cm" svg:y="22.924cm" svg:viewBox="0 0 28 27" draw:points="0,0 28,0 28,27 0,27">
          <text:p/>
        </draw:polygon>
        <draw:polygon draw:style-name="gr269" draw:text-style-name="P267" draw:layer="layout" svg:width="0.027cm" svg:height="0.026cm" svg:x="14.708cm" svg:y="22.924cm" svg:viewBox="0 0 28 27" draw:points="0,0 28,0 28,27 0,27">
          <text:p/>
        </draw:polygon>
        <draw:polygon draw:style-name="gr269" draw:text-style-name="P267" draw:layer="layout" svg:width="0.027cm" svg:height="0.026cm" svg:x="14.761cm" svg:y="22.924cm" svg:viewBox="0 0 28 27" draw:points="0,0 28,0 28,27 0,27">
          <text:p/>
        </draw:polygon>
        <draw:polygon draw:style-name="gr269" draw:text-style-name="P267" draw:layer="layout" svg:width="0.027cm" svg:height="0.026cm" svg:x="14.814cm" svg:y="22.924cm" svg:viewBox="0 0 28 27" draw:points="0,0 28,0 28,27 0,27">
          <text:p/>
        </draw:polygon>
        <draw:polygon draw:style-name="gr269" draw:text-style-name="P267" draw:layer="layout" svg:width="0.027cm" svg:height="0.026cm" svg:x="14.867cm" svg:y="22.924cm" svg:viewBox="0 0 28 27" draw:points="0,0 28,0 28,27 0,27">
          <text:p/>
        </draw:polygon>
        <draw:polygon draw:style-name="gr269" draw:text-style-name="P267" draw:layer="layout" svg:width="0.027cm" svg:height="0.026cm" svg:x="14.92cm" svg:y="22.924cm" svg:viewBox="0 0 28 27" draw:points="0,0 28,0 28,27 0,27">
          <text:p/>
        </draw:polygon>
        <draw:polygon draw:style-name="gr269" draw:text-style-name="P267" draw:layer="layout" svg:width="0.027cm" svg:height="0.026cm" svg:x="14.973cm" svg:y="22.924cm" svg:viewBox="0 0 28 27" draw:points="0,0 28,0 28,27 0,27">
          <text:p/>
        </draw:polygon>
        <draw:polygon draw:style-name="gr269" draw:text-style-name="P267" draw:layer="layout" svg:width="0.027cm" svg:height="0.026cm" svg:x="15.026cm" svg:y="22.924cm" svg:viewBox="0 0 28 27" draw:points="0,0 28,0 28,27 0,27">
          <text:p/>
        </draw:polygon>
        <draw:polygon draw:style-name="gr269" draw:text-style-name="P267" draw:layer="layout" svg:width="0.027cm" svg:height="0.026cm" svg:x="15.079cm" svg:y="22.924cm" svg:viewBox="0 0 28 27" draw:points="0,0 28,0 28,27 0,27">
          <text:p/>
        </draw:polygon>
        <draw:polygon draw:style-name="gr269" draw:text-style-name="P267" draw:layer="layout" svg:width="0.027cm" svg:height="0.026cm" svg:x="15.132cm" svg:y="22.924cm" svg:viewBox="0 0 28 27" draw:points="0,0 28,0 28,27 0,27">
          <text:p/>
        </draw:polygon>
        <draw:polygon draw:style-name="gr269" draw:text-style-name="P267" draw:layer="layout" svg:width="0.027cm" svg:height="0.026cm" svg:x="15.185cm" svg:y="22.924cm" svg:viewBox="0 0 28 27" draw:points="0,0 28,0 28,27 0,27">
          <text:p/>
        </draw:polygon>
        <draw:polygon draw:style-name="gr269" draw:text-style-name="P267" draw:layer="layout" svg:width="0.027cm" svg:height="0.026cm" svg:x="15.238cm" svg:y="22.924cm" svg:viewBox="0 0 28 27" draw:points="0,0 28,0 28,27 0,27">
          <text:p/>
        </draw:polygon>
        <draw:polygon draw:style-name="gr269" draw:text-style-name="P267" draw:layer="layout" svg:width="0.027cm" svg:height="0.026cm" svg:x="15.291cm" svg:y="22.924cm" svg:viewBox="0 0 28 27" draw:points="0,0 28,0 28,27 0,27">
          <text:p/>
        </draw:polygon>
        <draw:polygon draw:style-name="gr269" draw:text-style-name="P267" draw:layer="layout" svg:width="0.027cm" svg:height="0.026cm" svg:x="15.344cm" svg:y="22.924cm" svg:viewBox="0 0 28 27" draw:points="0,0 28,0 28,27 0,27">
          <text:p/>
        </draw:polygon>
        <draw:polygon draw:style-name="gr269" draw:text-style-name="P267" draw:layer="layout" svg:width="0.027cm" svg:height="0.026cm" svg:x="15.397cm" svg:y="22.924cm" svg:viewBox="0 0 28 27" draw:points="0,0 28,0 28,27 0,27">
          <text:p/>
        </draw:polygon>
        <draw:polygon draw:style-name="gr269" draw:text-style-name="P267" draw:layer="layout" svg:width="0.027cm" svg:height="0.026cm" svg:x="15.45cm" svg:y="22.924cm" svg:viewBox="0 0 28 27" draw:points="0,0 28,0 28,27 0,27">
          <text:p/>
        </draw:polygon>
        <draw:polygon draw:style-name="gr269" draw:text-style-name="P267" draw:layer="layout" svg:width="0.027cm" svg:height="0.026cm" svg:x="15.503cm" svg:y="22.924cm" svg:viewBox="0 0 28 27" draw:points="0,0 28,0 28,27 0,27">
          <text:p/>
        </draw:polygon>
        <draw:polygon draw:style-name="gr269" draw:text-style-name="P267" draw:layer="layout" svg:width="0.027cm" svg:height="0.026cm" svg:x="15.556cm" svg:y="22.924cm" svg:viewBox="0 0 28 27" draw:points="0,0 28,0 28,27 0,27">
          <text:p/>
        </draw:polygon>
        <draw:polygon draw:style-name="gr269" draw:text-style-name="P267" draw:layer="layout" svg:width="0.027cm" svg:height="0.026cm" svg:x="15.609cm" svg:y="22.924cm" svg:viewBox="0 0 28 27" draw:points="0,0 28,0 28,27 0,27">
          <text:p/>
        </draw:polygon>
        <draw:polygon draw:style-name="gr269" draw:text-style-name="P267" draw:layer="layout" svg:width="0.027cm" svg:height="0.026cm" svg:x="15.662cm" svg:y="22.924cm" svg:viewBox="0 0 28 27" draw:points="0,0 28,0 28,27 0,27">
          <text:p/>
        </draw:polygon>
        <draw:polygon draw:style-name="gr269" draw:text-style-name="P267" draw:layer="layout" svg:width="0.027cm" svg:height="0.026cm" svg:x="15.715cm" svg:y="22.924cm" svg:viewBox="0 0 28 27" draw:points="0,0 28,0 28,27 0,27">
          <text:p/>
        </draw:polygon>
        <draw:polygon draw:style-name="gr269" draw:text-style-name="P267" draw:layer="layout" svg:width="0.028cm" svg:height="0.026cm" svg:x="15.768cm" svg:y="22.924cm" svg:viewBox="0 0 29 27" draw:points="0,0 29,0 29,27 0,27">
          <text:p/>
        </draw:polygon>
        <draw:polygon draw:style-name="gr269" draw:text-style-name="P267" draw:layer="layout" svg:width="0.027cm" svg:height="0.026cm" svg:x="15.821cm" svg:y="22.924cm" svg:viewBox="0 0 28 27" draw:points="0,0 28,0 28,27 0,27">
          <text:p/>
        </draw:polygon>
        <draw:polygon draw:style-name="gr269" draw:text-style-name="P267" draw:layer="layout" svg:width="0.027cm" svg:height="0.026cm" svg:x="15.874cm" svg:y="22.924cm" svg:viewBox="0 0 28 27" draw:points="0,0 28,0 28,27 0,27">
          <text:p/>
        </draw:polygon>
        <draw:polygon draw:style-name="gr269" draw:text-style-name="P267" draw:layer="layout" svg:width="0.027cm" svg:height="0.026cm" svg:x="15.927cm" svg:y="22.924cm" svg:viewBox="0 0 28 27" draw:points="0,0 28,0 28,27 0,27">
          <text:p/>
        </draw:polygon>
        <draw:polygon draw:style-name="gr269" draw:text-style-name="P267" draw:layer="layout" svg:width="0.027cm" svg:height="0.026cm" svg:x="15.98cm" svg:y="22.924cm" svg:viewBox="0 0 28 27" draw:points="0,0 28,0 28,27 0,27">
          <text:p/>
        </draw:polygon>
        <draw:polygon draw:style-name="gr269" draw:text-style-name="P267" draw:layer="layout" svg:width="0.027cm" svg:height="0.026cm" svg:x="16.033cm" svg:y="22.924cm" svg:viewBox="0 0 28 27" draw:points="0,0 28,0 28,27 0,27">
          <text:p/>
        </draw:polygon>
        <draw:polygon draw:style-name="gr269" draw:text-style-name="P267" draw:layer="layout" svg:width="0.027cm" svg:height="0.026cm" svg:x="16.086cm" svg:y="22.924cm" svg:viewBox="0 0 28 27" draw:points="0,0 28,0 28,27 0,27">
          <text:p/>
        </draw:polygon>
        <draw:polygon draw:style-name="gr269" draw:text-style-name="P267" draw:layer="layout" svg:width="0.027cm" svg:height="0.026cm" svg:x="16.139cm" svg:y="22.924cm" svg:viewBox="0 0 28 27" draw:points="0,0 28,0 28,27 0,27">
          <text:p/>
        </draw:polygon>
        <draw:polygon draw:style-name="gr269" draw:text-style-name="P267" draw:layer="layout" svg:width="0.027cm" svg:height="0.026cm" svg:x="16.192cm" svg:y="22.924cm" svg:viewBox="0 0 28 27" draw:points="0,0 28,0 28,27 0,27">
          <text:p/>
        </draw:polygon>
        <draw:polygon draw:style-name="gr269" draw:text-style-name="P267" draw:layer="layout" svg:width="0.027cm" svg:height="0.026cm" svg:x="16.245cm" svg:y="22.924cm" svg:viewBox="0 0 28 27" draw:points="0,0 28,0 28,27 0,27">
          <text:p/>
        </draw:polygon>
        <draw:polygon draw:style-name="gr269" draw:text-style-name="P267" draw:layer="layout" svg:width="0.027cm" svg:height="0.026cm" svg:x="16.298cm" svg:y="22.924cm" svg:viewBox="0 0 28 27" draw:points="0,0 28,0 28,27 0,27">
          <text:p/>
        </draw:polygon>
        <draw:polygon draw:style-name="gr269" draw:text-style-name="P267" draw:layer="layout" svg:width="0.027cm" svg:height="0.026cm" svg:x="16.351cm" svg:y="22.924cm" svg:viewBox="0 0 28 27" draw:points="0,0 28,0 28,27 0,27">
          <text:p/>
        </draw:polygon>
        <draw:polygon draw:style-name="gr269" draw:text-style-name="P267" draw:layer="layout" svg:width="0.027cm" svg:height="0.026cm" svg:x="16.404cm" svg:y="22.924cm" svg:viewBox="0 0 28 27" draw:points="0,0 28,0 28,27 0,27">
          <text:p/>
        </draw:polygon>
        <draw:polygon draw:style-name="gr269" draw:text-style-name="P267" draw:layer="layout" svg:width="0.027cm" svg:height="0.026cm" svg:x="16.457cm" svg:y="22.924cm" svg:viewBox="0 0 28 27" draw:points="0,0 28,0 28,27 0,27">
          <text:p/>
        </draw:polygon>
        <draw:polygon draw:style-name="gr269" draw:text-style-name="P267" draw:layer="layout" svg:width="0.027cm" svg:height="0.026cm" svg:x="16.51cm" svg:y="22.924cm" svg:viewBox="0 0 28 27" draw:points="0,0 28,0 28,27 0,27">
          <text:p/>
        </draw:polygon>
        <draw:polygon draw:style-name="gr269" draw:text-style-name="P267" draw:layer="layout" svg:width="0.027cm" svg:height="0.026cm" svg:x="16.563cm" svg:y="22.924cm" svg:viewBox="0 0 28 27" draw:points="0,0 28,0 28,27 0,27">
          <text:p/>
        </draw:polygon>
        <draw:polygon draw:style-name="gr269" draw:text-style-name="P267" draw:layer="layout" svg:width="0.027cm" svg:height="0.026cm" svg:x="16.616cm" svg:y="22.924cm" svg:viewBox="0 0 28 27" draw:points="0,0 28,0 28,27 0,27">
          <text:p/>
        </draw:polygon>
        <draw:polygon draw:style-name="gr269" draw:text-style-name="P267" draw:layer="layout" svg:width="0.027cm" svg:height="0.026cm" svg:x="16.669cm" svg:y="22.924cm" svg:viewBox="0 0 28 27" draw:points="0,0 28,0 28,27 0,27">
          <text:p/>
        </draw:polygon>
        <draw:polygon draw:style-name="gr269" draw:text-style-name="P267" draw:layer="layout" svg:width="0.027cm" svg:height="0.026cm" svg:x="16.722cm" svg:y="22.924cm" svg:viewBox="0 0 28 27" draw:points="0,0 28,0 28,27 0,27">
          <text:p/>
        </draw:polygon>
        <draw:polygon draw:style-name="gr269" draw:text-style-name="P267" draw:layer="layout" svg:width="0.027cm" svg:height="0.026cm" svg:x="16.775cm" svg:y="22.924cm" svg:viewBox="0 0 28 27" draw:points="0,0 28,0 28,27 0,27">
          <text:p/>
        </draw:polygon>
        <draw:polygon draw:style-name="gr269" draw:text-style-name="P267" draw:layer="layout" svg:width="0.027cm" svg:height="0.026cm" svg:x="16.828cm" svg:y="22.924cm" svg:viewBox="0 0 28 27" draw:points="0,0 28,0 28,27 0,27">
          <text:p/>
        </draw:polygon>
        <draw:polygon draw:style-name="gr269" draw:text-style-name="P267" draw:layer="layout" svg:width="0.027cm" svg:height="0.026cm" svg:x="16.881cm" svg:y="22.924cm" svg:viewBox="0 0 28 27" draw:points="0,0 28,0 28,27 0,27">
          <text:p/>
        </draw:polygon>
        <draw:polygon draw:style-name="gr269" draw:text-style-name="P267" draw:layer="layout" svg:width="0.027cm" svg:height="0.026cm" svg:x="16.934cm" svg:y="22.924cm" svg:viewBox="0 0 28 27" draw:points="0,0 28,0 28,27 0,27">
          <text:p/>
        </draw:polygon>
        <draw:polygon draw:style-name="gr269" draw:text-style-name="P267" draw:layer="layout" svg:width="0.027cm" svg:height="0.026cm" svg:x="16.987cm" svg:y="22.924cm" svg:viewBox="0 0 28 27" draw:points="0,0 28,0 28,27 0,27">
          <text:p/>
        </draw:polygon>
        <draw:polygon draw:style-name="gr269" draw:text-style-name="P267" draw:layer="layout" svg:width="0.027cm" svg:height="0.026cm" svg:x="17.04cm" svg:y="22.924cm" svg:viewBox="0 0 28 27" draw:points="0,0 28,0 28,27 0,27">
          <text:p/>
        </draw:polygon>
        <draw:polygon draw:style-name="gr269" draw:text-style-name="P267" draw:layer="layout" svg:width="0.027cm" svg:height="0.026cm" svg:x="17.093cm" svg:y="22.924cm" svg:viewBox="0 0 28 27" draw:points="0,0 28,0 28,27 0,27">
          <text:p/>
        </draw:polygon>
        <draw:polygon draw:style-name="gr269" draw:text-style-name="P267" draw:layer="layout" svg:width="0.028cm" svg:height="0.026cm" svg:x="17.146cm" svg:y="22.924cm" svg:viewBox="0 0 29 27" draw:points="0,0 29,0 29,27 0,27">
          <text:p/>
        </draw:polygon>
        <draw:polygon draw:style-name="gr269" draw:text-style-name="P267" draw:layer="layout" svg:width="0.027cm" svg:height="0.026cm" svg:x="17.199cm" svg:y="22.924cm" svg:viewBox="0 0 28 27" draw:points="0,0 28,0 28,27 0,27">
          <text:p/>
        </draw:polygon>
        <draw:polygon draw:style-name="gr269" draw:text-style-name="P267" draw:layer="layout" svg:width="0.027cm" svg:height="0.026cm" svg:x="17.252cm" svg:y="22.924cm" svg:viewBox="0 0 28 27" draw:points="0,0 28,0 28,27 0,27">
          <text:p/>
        </draw:polygon>
        <draw:polygon draw:style-name="gr269" draw:text-style-name="P267" draw:layer="layout" svg:width="0.027cm" svg:height="0.026cm" svg:x="17.305cm" svg:y="22.924cm" svg:viewBox="0 0 28 27" draw:points="0,0 28,0 28,27 0,27">
          <text:p/>
        </draw:polygon>
        <draw:polygon draw:style-name="gr269" draw:text-style-name="P267" draw:layer="layout" svg:width="0.027cm" svg:height="0.026cm" svg:x="17.358cm" svg:y="22.924cm" svg:viewBox="0 0 28 27" draw:points="0,0 28,0 28,27 0,27">
          <text:p/>
        </draw:polygon>
        <draw:polygon draw:style-name="gr269" draw:text-style-name="P267" draw:layer="layout" svg:width="0.027cm" svg:height="0.026cm" svg:x="17.411cm" svg:y="22.924cm" svg:viewBox="0 0 28 27" draw:points="0,0 28,0 28,27 0,27">
          <text:p/>
        </draw:polygon>
        <draw:polygon draw:style-name="gr269" draw:text-style-name="P267" draw:layer="layout" svg:width="0.027cm" svg:height="0.026cm" svg:x="17.464cm" svg:y="22.924cm" svg:viewBox="0 0 28 27" draw:points="0,0 28,0 28,27 0,27">
          <text:p/>
        </draw:polygon>
        <draw:polygon draw:style-name="gr269" draw:text-style-name="P267" draw:layer="layout" svg:width="0.027cm" svg:height="0.026cm" svg:x="17.517cm" svg:y="22.924cm" svg:viewBox="0 0 28 27" draw:points="0,0 28,0 28,27 0,27">
          <text:p/>
        </draw:polygon>
        <draw:polygon draw:style-name="gr269" draw:text-style-name="P267" draw:layer="layout" svg:width="0.027cm" svg:height="0.026cm" svg:x="17.57cm" svg:y="22.924cm" svg:viewBox="0 0 28 27" draw:points="0,0 28,0 28,27 0,27">
          <text:p/>
        </draw:polygon>
        <draw:polygon draw:style-name="gr269" draw:text-style-name="P267" draw:layer="layout" svg:width="0.027cm" svg:height="0.026cm" svg:x="17.623cm" svg:y="22.924cm" svg:viewBox="0 0 28 27" draw:points="0,0 28,0 28,27 0,27">
          <text:p/>
        </draw:polygon>
        <draw:polygon draw:style-name="gr269" draw:text-style-name="P267" draw:layer="layout" svg:width="0.027cm" svg:height="0.026cm" svg:x="17.676cm" svg:y="22.924cm" svg:viewBox="0 0 28 27" draw:points="0,0 28,0 28,27 0,27">
          <text:p/>
        </draw:polygon>
        <draw:polygon draw:style-name="gr269" draw:text-style-name="P267" draw:layer="layout" svg:width="0.027cm" svg:height="0.026cm" svg:x="17.729cm" svg:y="22.924cm" svg:viewBox="0 0 28 27" draw:points="0,0 28,0 28,27 0,27">
          <text:p/>
        </draw:polygon>
        <draw:polygon draw:style-name="gr269" draw:text-style-name="P267" draw:layer="layout" svg:width="0.027cm" svg:height="0.026cm" svg:x="17.782cm" svg:y="22.924cm" svg:viewBox="0 0 28 27" draw:points="0,0 28,0 28,27 0,27">
          <text:p/>
        </draw:polygon>
        <draw:polygon draw:style-name="gr269" draw:text-style-name="P267" draw:layer="layout" svg:width="0.027cm" svg:height="0.026cm" svg:x="17.835cm" svg:y="22.924cm" svg:viewBox="0 0 28 27" draw:points="0,0 28,0 28,27 0,27">
          <text:p/>
        </draw:polygon>
        <draw:polygon draw:style-name="gr269" draw:text-style-name="P267" draw:layer="layout" svg:width="0.027cm" svg:height="0.026cm" svg:x="17.888cm" svg:y="22.924cm" svg:viewBox="0 0 28 27" draw:points="0,0 28,0 28,27 0,27">
          <text:p/>
        </draw:polygon>
        <draw:polygon draw:style-name="gr269" draw:text-style-name="P267" draw:layer="layout" svg:width="0.027cm" svg:height="0.026cm" svg:x="17.941cm" svg:y="22.924cm" svg:viewBox="0 0 28 27" draw:points="0,0 28,0 28,27 0,27">
          <text:p/>
        </draw:polygon>
        <draw:polygon draw:style-name="gr269" draw:text-style-name="P267" draw:layer="layout" svg:width="0.027cm" svg:height="0.026cm" svg:x="17.994cm" svg:y="22.924cm" svg:viewBox="0 0 28 27" draw:points="0,0 28,0 28,27 0,27">
          <text:p/>
        </draw:polygon>
        <draw:polygon draw:style-name="gr269" draw:text-style-name="P267" draw:layer="layout" svg:width="0.027cm" svg:height="0.026cm" svg:x="18.047cm" svg:y="22.924cm" svg:viewBox="0 0 28 27" draw:points="0,0 28,0 28,27 0,27">
          <text:p/>
        </draw:polygon>
        <draw:polygon draw:style-name="gr269" draw:text-style-name="P267" draw:layer="layout" svg:width="0.027cm" svg:height="0.026cm" svg:x="18.1cm" svg:y="22.924cm" svg:viewBox="0 0 28 27" draw:points="0,0 28,0 28,27 0,27">
          <text:p/>
        </draw:polygon>
        <draw:polygon draw:style-name="gr269" draw:text-style-name="P267" draw:layer="layout" svg:width="0.027cm" svg:height="0.026cm" svg:x="18.153cm" svg:y="22.924cm" svg:viewBox="0 0 28 27" draw:points="0,0 28,0 28,27 0,27">
          <text:p/>
        </draw:polygon>
        <draw:polygon draw:style-name="gr269" draw:text-style-name="P267" draw:layer="layout" svg:width="0.027cm" svg:height="0.026cm" svg:x="18.206cm" svg:y="22.924cm" svg:viewBox="0 0 28 27" draw:points="0,0 28,0 28,27 0,27">
          <text:p/>
        </draw:polygon>
        <draw:polygon draw:style-name="gr269" draw:text-style-name="P267" draw:layer="layout" svg:width="0.027cm" svg:height="0.026cm" svg:x="18.259cm" svg:y="22.924cm" svg:viewBox="0 0 28 27" draw:points="0,0 28,0 28,27 0,27">
          <text:p/>
        </draw:polygon>
        <draw:polygon draw:style-name="gr269" draw:text-style-name="P267" draw:layer="layout" svg:width="0.027cm" svg:height="0.026cm" svg:x="18.312cm" svg:y="22.924cm" svg:viewBox="0 0 28 27" draw:points="0,0 28,0 28,27 0,27">
          <text:p/>
        </draw:polygon>
        <draw:polygon draw:style-name="gr269" draw:text-style-name="P267" draw:layer="layout" svg:width="0.027cm" svg:height="0.026cm" svg:x="18.365cm" svg:y="22.924cm" svg:viewBox="0 0 28 27" draw:points="0,0 28,0 28,27 0,27">
          <text:p/>
        </draw:polygon>
        <draw:polygon draw:style-name="gr269" draw:text-style-name="P267" draw:layer="layout" svg:width="0.027cm" svg:height="0.026cm" svg:x="18.418cm" svg:y="22.924cm" svg:viewBox="0 0 28 27" draw:points="0,0 28,0 28,27 0,27">
          <text:p/>
        </draw:polygon>
        <draw:polygon draw:style-name="gr269" draw:text-style-name="P267" draw:layer="layout" svg:width="0.027cm" svg:height="0.026cm" svg:x="18.471cm" svg:y="22.924cm" svg:viewBox="0 0 28 27" draw:points="0,0 28,0 28,27 0,27">
          <text:p/>
        </draw:polygon>
        <draw:polygon draw:style-name="gr269" draw:text-style-name="P267" draw:layer="layout" svg:width="0.028cm" svg:height="0.026cm" svg:x="18.524cm" svg:y="22.924cm" svg:viewBox="0 0 29 27" draw:points="0,0 29,0 29,27 0,27">
          <text:p/>
        </draw:polygon>
        <draw:polygon draw:style-name="gr269" draw:text-style-name="P267" draw:layer="layout" svg:width="0.027cm" svg:height="0.026cm" svg:x="18.577cm" svg:y="22.924cm" svg:viewBox="0 0 28 27" draw:points="0,0 28,0 28,27 0,27">
          <text:p/>
        </draw:polygon>
        <draw:polygon draw:style-name="gr269" draw:text-style-name="P267" draw:layer="layout" svg:width="0.027cm" svg:height="0.026cm" svg:x="18.63cm" svg:y="22.924cm" svg:viewBox="0 0 28 27" draw:points="0,0 28,0 28,27 0,27">
          <text:p/>
        </draw:polygon>
        <draw:polygon draw:style-name="gr269" draw:text-style-name="P267" draw:layer="layout" svg:width="0.027cm" svg:height="0.026cm" svg:x="18.683cm" svg:y="22.924cm" svg:viewBox="0 0 28 27" draw:points="0,0 28,0 28,27 0,27">
          <text:p/>
        </draw:polygon>
        <draw:polygon draw:style-name="gr269" draw:text-style-name="P267" draw:layer="layout" svg:width="0.027cm" svg:height="0.026cm" svg:x="18.736cm" svg:y="22.924cm" svg:viewBox="0 0 28 27" draw:points="0,0 28,0 28,27 0,27">
          <text:p/>
        </draw:polygon>
        <draw:polygon draw:style-name="gr269" draw:text-style-name="P267" draw:layer="layout" svg:width="0.027cm" svg:height="0.026cm" svg:x="18.789cm" svg:y="22.924cm" svg:viewBox="0 0 28 27" draw:points="0,0 28,0 28,27 0,27">
          <text:p/>
        </draw:polygon>
        <draw:polygon draw:style-name="gr269" draw:text-style-name="P267" draw:layer="layout" svg:width="0.027cm" svg:height="0.026cm" svg:x="18.842cm" svg:y="22.924cm" svg:viewBox="0 0 28 27" draw:points="0,0 28,0 28,27 0,27">
          <text:p/>
        </draw:polygon>
        <draw:polygon draw:style-name="gr269" draw:text-style-name="P267" draw:layer="layout" svg:width="0.027cm" svg:height="0.026cm" svg:x="18.895cm" svg:y="22.924cm" svg:viewBox="0 0 28 27" draw:points="0,0 28,0 28,27 0,27">
          <text:p/>
        </draw:polygon>
        <draw:polygon draw:style-name="gr269" draw:text-style-name="P267" draw:layer="layout" svg:width="0.027cm" svg:height="0.026cm" svg:x="18.948cm" svg:y="22.924cm" svg:viewBox="0 0 28 27" draw:points="0,0 28,0 28,27 0,27">
          <text:p/>
        </draw:polygon>
        <draw:polygon draw:style-name="gr269" draw:text-style-name="P267" draw:layer="layout" svg:width="0.027cm" svg:height="0.026cm" svg:x="19.001cm" svg:y="22.924cm" svg:viewBox="0 0 28 27" draw:points="0,0 28,0 28,27 0,27">
          <text:p/>
        </draw:polygon>
        <draw:polygon draw:style-name="gr269" draw:text-style-name="P267" draw:layer="layout" svg:width="0.053cm" svg:height="0.027cm" svg:x="2.014cm" svg:y="23.904cm" svg:viewBox="0 0 54 28" draw:points="0,0 54,0 54,28 0,28">
          <text:p/>
        </draw:polygon>
        <draw:polygon draw:style-name="gr269" draw:text-style-name="P267" draw:layer="layout" svg:width="0.027cm" svg:height="0.027cm" svg:x="2.093cm" svg:y="23.904cm" svg:viewBox="0 0 28 28" draw:points="0,0 28,0 28,28 0,28">
          <text:p/>
        </draw:polygon>
        <draw:polygon draw:style-name="gr269" draw:text-style-name="P267" draw:layer="layout" svg:width="0.027cm" svg:height="0.027cm" svg:x="2.146cm" svg:y="23.904cm" svg:viewBox="0 0 28 28" draw:points="0,0 28,0 28,28 0,28">
          <text:p/>
        </draw:polygon>
        <draw:polygon draw:style-name="gr269" draw:text-style-name="P267" draw:layer="layout" svg:width="0.027cm" svg:height="0.027cm" svg:x="2.199cm" svg:y="23.904cm" svg:viewBox="0 0 28 28" draw:points="0,0 28,0 28,28 0,28">
          <text:p/>
        </draw:polygon>
        <draw:polygon draw:style-name="gr269" draw:text-style-name="P267" draw:layer="layout" svg:width="0.027cm" svg:height="0.027cm" svg:x="2.252cm" svg:y="23.904cm" svg:viewBox="0 0 28 28" draw:points="0,0 28,0 28,28 0,28">
          <text:p/>
        </draw:polygon>
        <draw:polygon draw:style-name="gr269" draw:text-style-name="P267" draw:layer="layout" svg:width="0.027cm" svg:height="0.027cm" svg:x="2.305cm" svg:y="23.904cm" svg:viewBox="0 0 28 28" draw:points="0,0 28,0 28,28 0,28">
          <text:p/>
        </draw:polygon>
        <draw:polygon draw:style-name="gr269" draw:text-style-name="P267" draw:layer="layout" svg:width="0.027cm" svg:height="0.027cm" svg:x="2.358cm" svg:y="23.904cm" svg:viewBox="0 0 28 28" draw:points="0,0 28,0 28,28 0,28">
          <text:p/>
        </draw:polygon>
        <draw:polygon draw:style-name="gr269" draw:text-style-name="P267" draw:layer="layout" svg:width="0.027cm" svg:height="0.027cm" svg:x="2.411cm" svg:y="23.904cm" svg:viewBox="0 0 28 28" draw:points="0,0 28,0 28,28 0,28">
          <text:p/>
        </draw:polygon>
        <draw:polygon draw:style-name="gr269" draw:text-style-name="P267" draw:layer="layout" svg:width="0.027cm" svg:height="0.027cm" svg:x="2.464cm" svg:y="23.904cm" svg:viewBox="0 0 28 28" draw:points="0,0 28,0 28,28 0,28">
          <text:p/>
        </draw:polygon>
        <draw:polygon draw:style-name="gr269" draw:text-style-name="P267" draw:layer="layout" svg:width="0.027cm" svg:height="0.027cm" svg:x="2.517cm" svg:y="23.904cm" svg:viewBox="0 0 28 28" draw:points="0,0 28,0 28,28 0,28">
          <text:p/>
        </draw:polygon>
        <draw:polygon draw:style-name="gr269" draw:text-style-name="P267" draw:layer="layout" svg:width="0.027cm" svg:height="0.027cm" svg:x="2.57cm" svg:y="23.904cm" svg:viewBox="0 0 28 28" draw:points="0,0 28,0 28,28 0,28">
          <text:p/>
        </draw:polygon>
        <draw:polygon draw:style-name="gr269" draw:text-style-name="P267" draw:layer="layout" svg:width="0.027cm" svg:height="0.027cm" svg:x="2.623cm" svg:y="23.904cm" svg:viewBox="0 0 28 28" draw:points="0,0 28,0 28,28 0,28">
          <text:p/>
        </draw:polygon>
        <draw:polygon draw:style-name="gr269" draw:text-style-name="P267" draw:layer="layout" svg:width="0.027cm" svg:height="0.027cm" svg:x="2.676cm" svg:y="23.904cm" svg:viewBox="0 0 28 28" draw:points="0,0 28,0 28,28 0,28">
          <text:p/>
        </draw:polygon>
        <draw:polygon draw:style-name="gr269" draw:text-style-name="P267" draw:layer="layout" svg:width="0.027cm" svg:height="0.027cm" svg:x="2.729cm" svg:y="23.904cm" svg:viewBox="0 0 28 28" draw:points="0,0 28,0 28,28 0,28">
          <text:p/>
        </draw:polygon>
        <draw:polygon draw:style-name="gr269" draw:text-style-name="P267" draw:layer="layout" svg:width="0.027cm" svg:height="0.027cm" svg:x="2.782cm" svg:y="23.904cm" svg:viewBox="0 0 28 28" draw:points="0,0 28,0 28,28 0,28">
          <text:p/>
        </draw:polygon>
        <draw:polygon draw:style-name="gr269" draw:text-style-name="P267" draw:layer="layout" svg:width="0.027cm" svg:height="0.027cm" svg:x="2.835cm" svg:y="23.904cm" svg:viewBox="0 0 28 28" draw:points="0,0 28,0 28,28 0,28">
          <text:p/>
        </draw:polygon>
        <draw:polygon draw:style-name="gr269" draw:text-style-name="P267" draw:layer="layout" svg:width="0.027cm" svg:height="0.027cm" svg:x="2.888cm" svg:y="23.904cm" svg:viewBox="0 0 28 28" draw:points="0,0 28,0 28,28 0,28">
          <text:p/>
        </draw:polygon>
        <draw:polygon draw:style-name="gr269" draw:text-style-name="P267" draw:layer="layout" svg:width="0.027cm" svg:height="0.027cm" svg:x="2.941cm" svg:y="23.904cm" svg:viewBox="0 0 28 28" draw:points="0,0 28,0 28,28 0,28">
          <text:p/>
        </draw:polygon>
        <draw:polygon draw:style-name="gr269" draw:text-style-name="P267" draw:layer="layout" svg:width="0.027cm" svg:height="0.027cm" svg:x="2.994cm" svg:y="23.904cm" svg:viewBox="0 0 28 28" draw:points="0,0 28,0 28,28 0,28">
          <text:p/>
        </draw:polygon>
        <draw:polygon draw:style-name="gr269" draw:text-style-name="P267" draw:layer="layout" svg:width="0.027cm" svg:height="0.027cm" svg:x="3.047cm" svg:y="23.904cm" svg:viewBox="0 0 28 28" draw:points="0,0 28,0 28,28 0,28">
          <text:p/>
        </draw:polygon>
        <draw:polygon draw:style-name="gr269" draw:text-style-name="P267" draw:layer="layout" svg:width="0.027cm" svg:height="0.027cm" svg:x="3.1cm" svg:y="23.904cm" svg:viewBox="0 0 28 28" draw:points="0,0 28,0 28,28 0,28">
          <text:p/>
        </draw:polygon>
        <draw:polygon draw:style-name="gr269" draw:text-style-name="P267" draw:layer="layout" svg:width="0.027cm" svg:height="0.027cm" svg:x="3.153cm" svg:y="23.904cm" svg:viewBox="0 0 28 28" draw:points="0,0 28,0 28,28 0,28">
          <text:p/>
        </draw:polygon>
        <draw:polygon draw:style-name="gr269" draw:text-style-name="P267" draw:layer="layout" svg:width="0.027cm" svg:height="0.027cm" svg:x="3.206cm" svg:y="23.904cm" svg:viewBox="0 0 28 28" draw:points="0,0 28,0 28,28 0,28">
          <text:p/>
        </draw:polygon>
        <draw:polygon draw:style-name="gr269" draw:text-style-name="P267" draw:layer="layout" svg:width="0.027cm" svg:height="0.027cm" svg:x="3.259cm" svg:y="23.904cm" svg:viewBox="0 0 28 28" draw:points="0,0 28,0 28,28 0,28">
          <text:p/>
        </draw:polygon>
        <draw:polygon draw:style-name="gr269" draw:text-style-name="P267" draw:layer="layout" svg:width="0.027cm" svg:height="0.027cm" svg:x="3.312cm" svg:y="23.904cm" svg:viewBox="0 0 28 28" draw:points="0,0 28,0 28,28 0,28">
          <text:p/>
        </draw:polygon>
        <draw:polygon draw:style-name="gr269" draw:text-style-name="P267" draw:layer="layout" svg:width="0.027cm" svg:height="0.027cm" svg:x="3.365cm" svg:y="23.904cm" svg:viewBox="0 0 28 28" draw:points="0,0 28,0 28,28 0,28">
          <text:p/>
        </draw:polygon>
        <draw:polygon draw:style-name="gr269" draw:text-style-name="P267" draw:layer="layout" svg:width="0.028cm" svg:height="0.027cm" svg:x="3.418cm" svg:y="23.904cm" svg:viewBox="0 0 29 28" draw:points="0,0 29,0 29,28 0,28">
          <text:p/>
        </draw:polygon>
        <draw:polygon draw:style-name="gr269" draw:text-style-name="P267" draw:layer="layout" svg:width="0.027cm" svg:height="0.027cm" svg:x="3.471cm" svg:y="23.904cm" svg:viewBox="0 0 28 28" draw:points="0,0 28,0 28,28 0,28">
          <text:p/>
        </draw:polygon>
        <draw:polygon draw:style-name="gr269" draw:text-style-name="P267" draw:layer="layout" svg:width="0.027cm" svg:height="0.027cm" svg:x="3.524cm" svg:y="23.904cm" svg:viewBox="0 0 28 28" draw:points="0,0 28,0 28,28 0,28">
          <text:p/>
        </draw:polygon>
        <draw:polygon draw:style-name="gr269" draw:text-style-name="P267" draw:layer="layout" svg:width="0.027cm" svg:height="0.027cm" svg:x="3.577cm" svg:y="23.904cm" svg:viewBox="0 0 28 28" draw:points="0,0 28,0 28,28 0,28">
          <text:p/>
        </draw:polygon>
        <draw:polygon draw:style-name="gr269" draw:text-style-name="P267" draw:layer="layout" svg:width="0.027cm" svg:height="0.027cm" svg:x="3.63cm" svg:y="23.904cm" svg:viewBox="0 0 28 28" draw:points="0,0 28,0 28,28 0,28">
          <text:p/>
        </draw:polygon>
        <draw:polygon draw:style-name="gr269" draw:text-style-name="P267" draw:layer="layout" svg:width="0.027cm" svg:height="0.027cm" svg:x="3.683cm" svg:y="23.904cm" svg:viewBox="0 0 28 28" draw:points="0,0 28,0 28,28 0,28">
          <text:p/>
        </draw:polygon>
        <draw:polygon draw:style-name="gr269" draw:text-style-name="P267" draw:layer="layout" svg:width="0.027cm" svg:height="0.027cm" svg:x="3.736cm" svg:y="23.904cm" svg:viewBox="0 0 28 28" draw:points="0,0 28,0 28,28 0,28">
          <text:p/>
        </draw:polygon>
        <draw:polygon draw:style-name="gr269" draw:text-style-name="P267" draw:layer="layout" svg:width="0.027cm" svg:height="0.027cm" svg:x="3.789cm" svg:y="23.904cm" svg:viewBox="0 0 28 28" draw:points="0,0 28,0 28,28 0,28">
          <text:p/>
        </draw:polygon>
        <draw:polygon draw:style-name="gr269" draw:text-style-name="P267" draw:layer="layout" svg:width="0.027cm" svg:height="0.027cm" svg:x="3.842cm" svg:y="23.904cm" svg:viewBox="0 0 28 28" draw:points="0,0 28,0 28,28 0,28">
          <text:p/>
        </draw:polygon>
        <draw:polygon draw:style-name="gr269" draw:text-style-name="P267" draw:layer="layout" svg:width="0.027cm" svg:height="0.027cm" svg:x="3.895cm" svg:y="23.904cm" svg:viewBox="0 0 28 28" draw:points="0,0 28,0 28,28 0,28">
          <text:p/>
        </draw:polygon>
        <draw:polygon draw:style-name="gr269" draw:text-style-name="P267" draw:layer="layout" svg:width="0.027cm" svg:height="0.027cm" svg:x="3.948cm" svg:y="23.904cm" svg:viewBox="0 0 28 28" draw:points="0,0 28,0 28,28 0,28">
          <text:p/>
        </draw:polygon>
        <draw:polygon draw:style-name="gr269" draw:text-style-name="P267" draw:layer="layout" svg:width="0.027cm" svg:height="0.027cm" svg:x="4.001cm" svg:y="23.904cm" svg:viewBox="0 0 28 28" draw:points="0,0 28,0 28,28 0,28">
          <text:p/>
        </draw:polygon>
        <draw:polygon draw:style-name="gr269" draw:text-style-name="P267" draw:layer="layout" svg:width="0.027cm" svg:height="0.027cm" svg:x="4.054cm" svg:y="23.904cm" svg:viewBox="0 0 28 28" draw:points="0,0 28,0 28,28 0,28">
          <text:p/>
        </draw:polygon>
        <draw:polygon draw:style-name="gr269" draw:text-style-name="P267" draw:layer="layout" svg:width="0.027cm" svg:height="0.027cm" svg:x="4.107cm" svg:y="23.904cm" svg:viewBox="0 0 28 28" draw:points="0,0 28,0 28,28 0,28">
          <text:p/>
        </draw:polygon>
        <draw:polygon draw:style-name="gr269" draw:text-style-name="P267" draw:layer="layout" svg:width="0.027cm" svg:height="0.027cm" svg:x="4.16cm" svg:y="23.904cm" svg:viewBox="0 0 28 28" draw:points="0,0 28,0 28,28 0,28">
          <text:p/>
        </draw:polygon>
        <draw:polygon draw:style-name="gr269" draw:text-style-name="P267" draw:layer="layout" svg:width="0.027cm" svg:height="0.027cm" svg:x="4.213cm" svg:y="23.904cm" svg:viewBox="0 0 28 28" draw:points="0,0 28,0 28,28 0,28">
          <text:p/>
        </draw:polygon>
        <draw:polygon draw:style-name="gr269" draw:text-style-name="P267" draw:layer="layout" svg:width="0.027cm" svg:height="0.027cm" svg:x="4.266cm" svg:y="23.904cm" svg:viewBox="0 0 28 28" draw:points="0,0 28,0 28,28 0,28">
          <text:p/>
        </draw:polygon>
        <draw:polygon draw:style-name="gr269" draw:text-style-name="P267" draw:layer="layout" svg:width="0.027cm" svg:height="0.027cm" svg:x="4.319cm" svg:y="23.904cm" svg:viewBox="0 0 28 28" draw:points="0,0 28,0 28,28 0,28">
          <text:p/>
        </draw:polygon>
        <draw:polygon draw:style-name="gr269" draw:text-style-name="P267" draw:layer="layout" svg:width="0.027cm" svg:height="0.027cm" svg:x="4.372cm" svg:y="23.904cm" svg:viewBox="0 0 28 28" draw:points="0,0 28,0 28,28 0,28">
          <text:p/>
        </draw:polygon>
        <draw:polygon draw:style-name="gr269" draw:text-style-name="P267" draw:layer="layout" svg:width="0.027cm" svg:height="0.027cm" svg:x="4.425cm" svg:y="23.904cm" svg:viewBox="0 0 28 28" draw:points="0,0 28,0 28,28 0,28">
          <text:p/>
        </draw:polygon>
        <draw:polygon draw:style-name="gr269" draw:text-style-name="P267" draw:layer="layout" svg:width="0.027cm" svg:height="0.027cm" svg:x="4.478cm" svg:y="23.904cm" svg:viewBox="0 0 28 28" draw:points="0,0 28,0 28,28 0,28">
          <text:p/>
        </draw:polygon>
        <draw:polygon draw:style-name="gr269" draw:text-style-name="P267" draw:layer="layout" svg:width="0.027cm" svg:height="0.027cm" svg:x="4.531cm" svg:y="23.904cm" svg:viewBox="0 0 28 28" draw:points="0,0 28,0 28,28 0,28">
          <text:p/>
        </draw:polygon>
        <draw:polygon draw:style-name="gr269" draw:text-style-name="P267" draw:layer="layout" svg:width="0.027cm" svg:height="0.027cm" svg:x="4.584cm" svg:y="23.904cm" svg:viewBox="0 0 28 28" draw:points="0,0 28,0 28,28 0,28">
          <text:p/>
        </draw:polygon>
        <draw:polygon draw:style-name="gr269" draw:text-style-name="P267" draw:layer="layout" svg:width="0.027cm" svg:height="0.027cm" svg:x="4.637cm" svg:y="23.904cm" svg:viewBox="0 0 28 28" draw:points="0,0 28,0 28,28 0,28">
          <text:p/>
        </draw:polygon>
        <draw:polygon draw:style-name="gr269" draw:text-style-name="P267" draw:layer="layout" svg:width="0.027cm" svg:height="0.027cm" svg:x="4.69cm" svg:y="23.904cm" svg:viewBox="0 0 28 28" draw:points="0,0 28,0 28,28 0,28">
          <text:p/>
        </draw:polygon>
        <draw:polygon draw:style-name="gr269" draw:text-style-name="P267" draw:layer="layout" svg:width="0.027cm" svg:height="0.027cm" svg:x="4.743cm" svg:y="23.904cm" svg:viewBox="0 0 28 28" draw:points="0,0 28,0 28,28 0,28">
          <text:p/>
        </draw:polygon>
        <draw:polygon draw:style-name="gr269" draw:text-style-name="P267" draw:layer="layout" svg:width="0.028cm" svg:height="0.027cm" svg:x="4.796cm" svg:y="23.904cm" svg:viewBox="0 0 29 28" draw:points="0,0 29,0 29,28 0,28">
          <text:p/>
        </draw:polygon>
        <draw:polygon draw:style-name="gr269" draw:text-style-name="P267" draw:layer="layout" svg:width="0.027cm" svg:height="0.027cm" svg:x="4.849cm" svg:y="23.904cm" svg:viewBox="0 0 28 28" draw:points="0,0 28,0 28,28 0,28">
          <text:p/>
        </draw:polygon>
        <draw:polygon draw:style-name="gr269" draw:text-style-name="P267" draw:layer="layout" svg:width="0.027cm" svg:height="0.027cm" svg:x="4.902cm" svg:y="23.904cm" svg:viewBox="0 0 28 28" draw:points="0,0 28,0 28,28 0,28">
          <text:p/>
        </draw:polygon>
        <draw:polygon draw:style-name="gr269" draw:text-style-name="P267" draw:layer="layout" svg:width="0.027cm" svg:height="0.027cm" svg:x="4.955cm" svg:y="23.904cm" svg:viewBox="0 0 28 28" draw:points="0,0 28,0 28,28 0,28">
          <text:p/>
        </draw:polygon>
        <draw:polygon draw:style-name="gr269" draw:text-style-name="P267" draw:layer="layout" svg:width="0.027cm" svg:height="0.027cm" svg:x="5.008cm" svg:y="23.904cm" svg:viewBox="0 0 28 28" draw:points="0,0 28,0 28,28 0,28">
          <text:p/>
        </draw:polygon>
        <draw:polygon draw:style-name="gr269" draw:text-style-name="P267" draw:layer="layout" svg:width="0.027cm" svg:height="0.027cm" svg:x="5.061cm" svg:y="23.904cm" svg:viewBox="0 0 28 28" draw:points="0,0 28,0 28,28 0,28">
          <text:p/>
        </draw:polygon>
        <draw:polygon draw:style-name="gr269" draw:text-style-name="P267" draw:layer="layout" svg:width="0.027cm" svg:height="0.027cm" svg:x="5.114cm" svg:y="23.904cm" svg:viewBox="0 0 28 28" draw:points="0,0 28,0 28,28 0,28">
          <text:p/>
        </draw:polygon>
        <draw:polygon draw:style-name="gr269" draw:text-style-name="P267" draw:layer="layout" svg:width="0.027cm" svg:height="0.027cm" svg:x="5.167cm" svg:y="23.904cm" svg:viewBox="0 0 28 28" draw:points="0,0 28,0 28,28 0,28">
          <text:p/>
        </draw:polygon>
        <draw:polygon draw:style-name="gr269" draw:text-style-name="P267" draw:layer="layout" svg:width="0.027cm" svg:height="0.027cm" svg:x="5.22cm" svg:y="23.904cm" svg:viewBox="0 0 28 28" draw:points="0,0 28,0 28,28 0,28">
          <text:p/>
        </draw:polygon>
        <draw:polygon draw:style-name="gr269" draw:text-style-name="P267" draw:layer="layout" svg:width="0.027cm" svg:height="0.027cm" svg:x="5.273cm" svg:y="23.904cm" svg:viewBox="0 0 28 28" draw:points="0,0 28,0 28,28 0,28">
          <text:p/>
        </draw:polygon>
        <draw:polygon draw:style-name="gr269" draw:text-style-name="P267" draw:layer="layout" svg:width="0.027cm" svg:height="0.027cm" svg:x="5.326cm" svg:y="23.904cm" svg:viewBox="0 0 28 28" draw:points="0,0 28,0 28,28 0,28">
          <text:p/>
        </draw:polygon>
        <draw:polygon draw:style-name="gr269" draw:text-style-name="P267" draw:layer="layout" svg:width="0.027cm" svg:height="0.027cm" svg:x="5.379cm" svg:y="23.904cm" svg:viewBox="0 0 28 28" draw:points="0,0 28,0 28,28 0,28">
          <text:p/>
        </draw:polygon>
        <draw:polygon draw:style-name="gr269" draw:text-style-name="P267" draw:layer="layout" svg:width="0.027cm" svg:height="0.027cm" svg:x="5.432cm" svg:y="23.904cm" svg:viewBox="0 0 28 28" draw:points="0,0 28,0 28,28 0,28">
          <text:p/>
        </draw:polygon>
        <draw:polygon draw:style-name="gr269" draw:text-style-name="P267" draw:layer="layout" svg:width="0.027cm" svg:height="0.027cm" svg:x="5.485cm" svg:y="23.904cm" svg:viewBox="0 0 28 28" draw:points="0,0 28,0 28,28 0,28">
          <text:p/>
        </draw:polygon>
        <draw:polygon draw:style-name="gr269" draw:text-style-name="P267" draw:layer="layout" svg:width="0.027cm" svg:height="0.027cm" svg:x="5.538cm" svg:y="23.904cm" svg:viewBox="0 0 28 28" draw:points="0,0 28,0 28,28 0,28">
          <text:p/>
        </draw:polygon>
        <draw:polygon draw:style-name="gr269" draw:text-style-name="P267" draw:layer="layout" svg:width="0.027cm" svg:height="0.027cm" svg:x="5.591cm" svg:y="23.904cm" svg:viewBox="0 0 28 28" draw:points="0,0 28,0 28,28 0,28">
          <text:p/>
        </draw:polygon>
        <draw:polygon draw:style-name="gr269" draw:text-style-name="P267" draw:layer="layout" svg:width="0.027cm" svg:height="0.027cm" svg:x="5.644cm" svg:y="23.904cm" svg:viewBox="0 0 28 28" draw:points="0,0 28,0 28,28 0,28">
          <text:p/>
        </draw:polygon>
        <draw:polygon draw:style-name="gr269" draw:text-style-name="P267" draw:layer="layout" svg:width="0.027cm" svg:height="0.027cm" svg:x="5.697cm" svg:y="23.904cm" svg:viewBox="0 0 28 28" draw:points="0,0 28,0 28,28 0,28">
          <text:p/>
        </draw:polygon>
        <draw:polygon draw:style-name="gr269" draw:text-style-name="P267" draw:layer="layout" svg:width="0.027cm" svg:height="0.027cm" svg:x="5.75cm" svg:y="23.904cm" svg:viewBox="0 0 28 28" draw:points="0,0 28,0 28,28 0,28">
          <text:p/>
        </draw:polygon>
        <draw:polygon draw:style-name="gr269" draw:text-style-name="P267" draw:layer="layout" svg:width="0.027cm" svg:height="0.027cm" svg:x="5.803cm" svg:y="23.904cm" svg:viewBox="0 0 28 28" draw:points="0,0 28,0 28,28 0,28">
          <text:p/>
        </draw:polygon>
        <draw:polygon draw:style-name="gr269" draw:text-style-name="P267" draw:layer="layout" svg:width="0.027cm" svg:height="0.027cm" svg:x="5.856cm" svg:y="23.904cm" svg:viewBox="0 0 28 28" draw:points="0,0 28,0 28,28 0,28">
          <text:p/>
        </draw:polygon>
        <draw:polygon draw:style-name="gr269" draw:text-style-name="P267" draw:layer="layout" svg:width="0.027cm" svg:height="0.027cm" svg:x="5.909cm" svg:y="23.904cm" svg:viewBox="0 0 28 28" draw:points="0,0 28,0 28,28 0,28">
          <text:p/>
        </draw:polygon>
        <draw:polygon draw:style-name="gr269" draw:text-style-name="P267" draw:layer="layout" svg:width="0.027cm" svg:height="0.027cm" svg:x="5.962cm" svg:y="23.904cm" svg:viewBox="0 0 28 28" draw:points="0,0 28,0 28,28 0,28">
          <text:p/>
        </draw:polygon>
        <draw:polygon draw:style-name="gr269" draw:text-style-name="P267" draw:layer="layout" svg:width="0.027cm" svg:height="0.027cm" svg:x="6.015cm" svg:y="23.904cm" svg:viewBox="0 0 28 28" draw:points="0,0 28,0 28,28 0,28">
          <text:p/>
        </draw:polygon>
        <draw:polygon draw:style-name="gr269" draw:text-style-name="P267" draw:layer="layout" svg:width="0.027cm" svg:height="0.027cm" svg:x="6.068cm" svg:y="23.904cm" svg:viewBox="0 0 28 28" draw:points="0,0 28,0 28,28 0,28">
          <text:p/>
        </draw:polygon>
        <draw:polygon draw:style-name="gr269" draw:text-style-name="P267" draw:layer="layout" svg:width="0.027cm" svg:height="0.027cm" svg:x="6.121cm" svg:y="23.904cm" svg:viewBox="0 0 28 28" draw:points="0,0 28,0 28,28 0,28">
          <text:p/>
        </draw:polygon>
        <draw:polygon draw:style-name="gr269" draw:text-style-name="P267" draw:layer="layout" svg:width="0.028cm" svg:height="0.027cm" svg:x="6.174cm" svg:y="23.904cm" svg:viewBox="0 0 29 28" draw:points="0,0 29,0 29,28 0,28">
          <text:p/>
        </draw:polygon>
        <draw:polygon draw:style-name="gr269" draw:text-style-name="P267" draw:layer="layout" svg:width="0.027cm" svg:height="0.027cm" svg:x="6.227cm" svg:y="23.904cm" svg:viewBox="0 0 28 28" draw:points="0,0 28,0 28,28 0,28">
          <text:p/>
        </draw:polygon>
        <draw:polygon draw:style-name="gr269" draw:text-style-name="P267" draw:layer="layout" svg:width="0.027cm" svg:height="0.027cm" svg:x="6.28cm" svg:y="23.904cm" svg:viewBox="0 0 28 28" draw:points="0,0 28,0 28,28 0,28">
          <text:p/>
        </draw:polygon>
        <draw:polygon draw:style-name="gr269" draw:text-style-name="P267" draw:layer="layout" svg:width="0.027cm" svg:height="0.027cm" svg:x="6.333cm" svg:y="23.904cm" svg:viewBox="0 0 28 28" draw:points="0,0 28,0 28,28 0,28">
          <text:p/>
        </draw:polygon>
        <draw:polygon draw:style-name="gr269" draw:text-style-name="P267" draw:layer="layout" svg:width="0.026cm" svg:height="0.027cm" svg:x="6.387cm" svg:y="23.904cm" svg:viewBox="0 0 27 28" draw:points="0,0 27,0 27,28 0,28">
          <text:p/>
        </draw:polygon>
        <draw:polygon draw:style-name="gr269" draw:text-style-name="P267" draw:layer="layout" svg:width="0.026cm" svg:height="0.027cm" svg:x="6.44cm" svg:y="23.904cm" svg:viewBox="0 0 27 28" draw:points="0,0 27,0 27,28 0,28">
          <text:p/>
        </draw:polygon>
        <draw:polygon draw:style-name="gr269" draw:text-style-name="P267" draw:layer="layout" svg:width="0.026cm" svg:height="0.027cm" svg:x="6.493cm" svg:y="23.904cm" svg:viewBox="0 0 27 28" draw:points="0,0 27,0 27,28 0,28">
          <text:p/>
        </draw:polygon>
        <draw:polygon draw:style-name="gr269" draw:text-style-name="P267" draw:layer="layout" svg:width="0.026cm" svg:height="0.027cm" svg:x="6.546cm" svg:y="23.904cm" svg:viewBox="0 0 27 28" draw:points="0,0 27,0 27,28 0,28">
          <text:p/>
        </draw:polygon>
        <draw:polygon draw:style-name="gr269" draw:text-style-name="P267" draw:layer="layout" svg:width="0.026cm" svg:height="0.027cm" svg:x="6.599cm" svg:y="23.904cm" svg:viewBox="0 0 27 28" draw:points="0,0 27,0 27,28 0,28">
          <text:p/>
        </draw:polygon>
        <draw:polygon draw:style-name="gr269" draw:text-style-name="P267" draw:layer="layout" svg:width="0.026cm" svg:height="0.027cm" svg:x="6.652cm" svg:y="23.904cm" svg:viewBox="0 0 27 28" draw:points="0,0 27,0 27,28 0,28">
          <text:p/>
        </draw:polygon>
        <draw:polygon draw:style-name="gr269" draw:text-style-name="P267" draw:layer="layout" svg:width="0.026cm" svg:height="0.027cm" svg:x="6.705cm" svg:y="23.904cm" svg:viewBox="0 0 27 28" draw:points="0,0 27,0 27,28 0,28">
          <text:p/>
        </draw:polygon>
        <draw:polygon draw:style-name="gr269" draw:text-style-name="P267" draw:layer="layout" svg:width="0.026cm" svg:height="0.027cm" svg:x="6.758cm" svg:y="23.904cm" svg:viewBox="0 0 27 28" draw:points="0,0 27,0 27,28 0,28">
          <text:p/>
        </draw:polygon>
        <draw:polygon draw:style-name="gr269" draw:text-style-name="P267" draw:layer="layout" svg:width="0.026cm" svg:height="0.027cm" svg:x="6.811cm" svg:y="23.904cm" svg:viewBox="0 0 27 28" draw:points="0,0 27,0 27,28 0,28">
          <text:p/>
        </draw:polygon>
        <draw:polygon draw:style-name="gr269" draw:text-style-name="P267" draw:layer="layout" svg:width="0.026cm" svg:height="0.027cm" svg:x="6.864cm" svg:y="23.904cm" svg:viewBox="0 0 27 28" draw:points="0,0 27,0 27,28 0,28">
          <text:p/>
        </draw:polygon>
        <draw:polygon draw:style-name="gr269" draw:text-style-name="P267" draw:layer="layout" svg:width="0.026cm" svg:height="0.027cm" svg:x="6.917cm" svg:y="23.904cm" svg:viewBox="0 0 27 28" draw:points="0,0 27,0 27,28 0,28">
          <text:p/>
        </draw:polygon>
        <draw:polygon draw:style-name="gr269" draw:text-style-name="P267" draw:layer="layout" svg:width="0.026cm" svg:height="0.027cm" svg:x="6.97cm" svg:y="23.904cm" svg:viewBox="0 0 27 28" draw:points="0,0 27,0 27,28 0,28">
          <text:p/>
        </draw:polygon>
        <draw:polygon draw:style-name="gr269" draw:text-style-name="P267" draw:layer="layout" svg:width="0.026cm" svg:height="0.027cm" svg:x="7.023cm" svg:y="23.904cm" svg:viewBox="0 0 27 28" draw:points="0,0 27,0 27,28 0,28">
          <text:p/>
        </draw:polygon>
        <draw:polygon draw:style-name="gr269" draw:text-style-name="P267" draw:layer="layout" svg:width="0.026cm" svg:height="0.027cm" svg:x="7.076cm" svg:y="23.904cm" svg:viewBox="0 0 27 28" draw:points="0,0 27,0 27,28 0,28">
          <text:p/>
        </draw:polygon>
        <draw:polygon draw:style-name="gr269" draw:text-style-name="P267" draw:layer="layout" svg:width="0.026cm" svg:height="0.027cm" svg:x="7.129cm" svg:y="23.904cm" svg:viewBox="0 0 27 28" draw:points="0,0 27,0 27,28 0,28">
          <text:p/>
        </draw:polygon>
        <draw:polygon draw:style-name="gr269" draw:text-style-name="P267" draw:layer="layout" svg:width="0.026cm" svg:height="0.027cm" svg:x="7.182cm" svg:y="23.904cm" svg:viewBox="0 0 27 28" draw:points="0,0 27,0 27,28 0,28">
          <text:p/>
        </draw:polygon>
        <draw:polygon draw:style-name="gr269" draw:text-style-name="P267" draw:layer="layout" svg:width="0.026cm" svg:height="0.027cm" svg:x="7.235cm" svg:y="23.904cm" svg:viewBox="0 0 27 28" draw:points="0,0 27,0 27,28 0,28">
          <text:p/>
        </draw:polygon>
        <draw:polygon draw:style-name="gr269" draw:text-style-name="P267" draw:layer="layout" svg:width="0.026cm" svg:height="0.027cm" svg:x="7.288cm" svg:y="23.904cm" svg:viewBox="0 0 27 28" draw:points="0,0 27,0 27,28 0,28">
          <text:p/>
        </draw:polygon>
        <draw:polygon draw:style-name="gr269" draw:text-style-name="P267" draw:layer="layout" svg:width="0.026cm" svg:height="0.027cm" svg:x="7.341cm" svg:y="23.904cm" svg:viewBox="0 0 27 28" draw:points="0,0 27,0 27,28 0,28">
          <text:p/>
        </draw:polygon>
        <draw:polygon draw:style-name="gr269" draw:text-style-name="P267" draw:layer="layout" svg:width="0.026cm" svg:height="0.027cm" svg:x="7.394cm" svg:y="23.904cm" svg:viewBox="0 0 27 28" draw:points="0,0 27,0 27,28 0,28">
          <text:p/>
        </draw:polygon>
        <draw:polygon draw:style-name="gr269" draw:text-style-name="P267" draw:layer="layout" svg:width="0.026cm" svg:height="0.027cm" svg:x="7.447cm" svg:y="23.904cm" svg:viewBox="0 0 27 28" draw:points="0,0 27,0 27,28 0,28">
          <text:p/>
        </draw:polygon>
        <draw:polygon draw:style-name="gr269" draw:text-style-name="P267" draw:layer="layout" svg:width="0.026cm" svg:height="0.027cm" svg:x="7.5cm" svg:y="23.904cm" svg:viewBox="0 0 27 28" draw:points="0,0 27,0 27,28 0,28">
          <text:p/>
        </draw:polygon>
        <draw:polygon draw:style-name="gr269" draw:text-style-name="P267" draw:layer="layout" svg:width="0.026cm" svg:height="0.027cm" svg:x="7.553cm" svg:y="23.904cm" svg:viewBox="0 0 27 28" draw:points="0,0 27,0 27,28 0,28">
          <text:p/>
        </draw:polygon>
        <draw:polygon draw:style-name="gr269" draw:text-style-name="P267" draw:layer="layout" svg:width="0.026cm" svg:height="0.027cm" svg:x="7.606cm" svg:y="23.904cm" svg:viewBox="0 0 27 28" draw:points="0,0 27,0 27,28 0,28">
          <text:p/>
        </draw:polygon>
        <draw:polygon draw:style-name="gr269" draw:text-style-name="P267" draw:layer="layout" svg:width="0.026cm" svg:height="0.027cm" svg:x="7.659cm" svg:y="23.904cm" svg:viewBox="0 0 27 28" draw:points="0,0 27,0 27,28 0,28">
          <text:p/>
        </draw:polygon>
        <draw:polygon draw:style-name="gr269" draw:text-style-name="P267" draw:layer="layout" svg:width="0.026cm" svg:height="0.027cm" svg:x="7.712cm" svg:y="23.904cm" svg:viewBox="0 0 27 28" draw:points="0,0 27,0 27,28 0,28">
          <text:p/>
        </draw:polygon>
        <draw:polygon draw:style-name="gr269" draw:text-style-name="P267" draw:layer="layout" svg:width="0.026cm" svg:height="0.027cm" svg:x="7.765cm" svg:y="23.904cm" svg:viewBox="0 0 27 28" draw:points="0,0 27,0 27,28 0,28">
          <text:p/>
        </draw:polygon>
        <draw:polygon draw:style-name="gr269" draw:text-style-name="P267" draw:layer="layout" svg:width="0.026cm" svg:height="0.027cm" svg:x="7.818cm" svg:y="23.904cm" svg:viewBox="0 0 27 28" draw:points="0,0 27,0 27,28 0,28">
          <text:p/>
        </draw:polygon>
        <draw:polygon draw:style-name="gr269" draw:text-style-name="P267" draw:layer="layout" svg:width="0.026cm" svg:height="0.027cm" svg:x="7.871cm" svg:y="23.904cm" svg:viewBox="0 0 27 28" draw:points="0,0 27,0 27,28 0,28">
          <text:p/>
        </draw:polygon>
        <draw:polygon draw:style-name="gr269" draw:text-style-name="P267" draw:layer="layout" svg:width="0.026cm" svg:height="0.027cm" svg:x="7.924cm" svg:y="23.904cm" svg:viewBox="0 0 27 28" draw:points="0,0 27,0 27,28 0,28">
          <text:p/>
        </draw:polygon>
        <draw:polygon draw:style-name="gr269" draw:text-style-name="P267" draw:layer="layout" svg:width="0.026cm" svg:height="0.027cm" svg:x="7.977cm" svg:y="23.904cm" svg:viewBox="0 0 27 28" draw:points="0,0 27,0 27,28 0,28">
          <text:p/>
        </draw:polygon>
        <draw:polygon draw:style-name="gr269" draw:text-style-name="P267" draw:layer="layout" svg:width="0.026cm" svg:height="0.027cm" svg:x="8.03cm" svg:y="23.904cm" svg:viewBox="0 0 27 28" draw:points="0,0 27,0 27,28 0,28">
          <text:p/>
        </draw:polygon>
        <draw:polygon draw:style-name="gr269" draw:text-style-name="P267" draw:layer="layout" svg:width="0.026cm" svg:height="0.027cm" svg:x="8.083cm" svg:y="23.904cm" svg:viewBox="0 0 27 28" draw:points="0,0 27,0 27,28 0,28">
          <text:p/>
        </draw:polygon>
        <draw:polygon draw:style-name="gr269" draw:text-style-name="P267" draw:layer="layout" svg:width="0.026cm" svg:height="0.027cm" svg:x="8.136cm" svg:y="23.904cm" svg:viewBox="0 0 27 28" draw:points="0,0 27,0 27,28 0,28">
          <text:p/>
        </draw:polygon>
        <draw:polygon draw:style-name="gr269" draw:text-style-name="P267" draw:layer="layout" svg:width="0.026cm" svg:height="0.027cm" svg:x="8.189cm" svg:y="23.904cm" svg:viewBox="0 0 27 28" draw:points="0,0 27,0 27,28 0,28">
          <text:p/>
        </draw:polygon>
        <draw:polygon draw:style-name="gr269" draw:text-style-name="P267" draw:layer="layout" svg:width="0.026cm" svg:height="0.027cm" svg:x="8.242cm" svg:y="23.904cm" svg:viewBox="0 0 27 28" draw:points="0,0 27,0 27,28 0,28">
          <text:p/>
        </draw:polygon>
        <draw:polygon draw:style-name="gr269" draw:text-style-name="P267" draw:layer="layout" svg:width="0.026cm" svg:height="0.027cm" svg:x="8.295cm" svg:y="23.904cm" svg:viewBox="0 0 27 28" draw:points="0,0 27,0 27,28 0,28">
          <text:p/>
        </draw:polygon>
        <draw:polygon draw:style-name="gr269" draw:text-style-name="P267" draw:layer="layout" svg:width="0.026cm" svg:height="0.027cm" svg:x="8.348cm" svg:y="23.904cm" svg:viewBox="0 0 27 28" draw:points="0,0 27,0 27,28 0,28">
          <text:p/>
        </draw:polygon>
        <draw:polygon draw:style-name="gr269" draw:text-style-name="P267" draw:layer="layout" svg:width="0.026cm" svg:height="0.027cm" svg:x="8.401cm" svg:y="23.904cm" svg:viewBox="0 0 27 28" draw:points="0,0 27,0 27,28 0,28">
          <text:p/>
        </draw:polygon>
        <draw:polygon draw:style-name="gr269" draw:text-style-name="P267" draw:layer="layout" svg:width="0.026cm" svg:height="0.027cm" svg:x="8.454cm" svg:y="23.904cm" svg:viewBox="0 0 27 28" draw:points="0,0 27,0 27,28 0,28">
          <text:p/>
        </draw:polygon>
        <draw:polygon draw:style-name="gr269" draw:text-style-name="P267" draw:layer="layout" svg:width="0.026cm" svg:height="0.027cm" svg:x="8.507cm" svg:y="23.904cm" svg:viewBox="0 0 27 28" draw:points="0,0 27,0 27,28 0,28">
          <text:p/>
        </draw:polygon>
        <draw:polygon draw:style-name="gr269" draw:text-style-name="P267" draw:layer="layout" svg:width="0.026cm" svg:height="0.027cm" svg:x="8.56cm" svg:y="23.904cm" svg:viewBox="0 0 27 28" draw:points="0,0 27,0 27,28 0,28">
          <text:p/>
        </draw:polygon>
        <draw:polygon draw:style-name="gr269" draw:text-style-name="P267" draw:layer="layout" svg:width="0.026cm" svg:height="0.027cm" svg:x="8.613cm" svg:y="23.904cm" svg:viewBox="0 0 27 28" draw:points="0,0 27,0 27,28 0,28">
          <text:p/>
        </draw:polygon>
        <draw:polygon draw:style-name="gr269" draw:text-style-name="P267" draw:layer="layout" svg:width="0.026cm" svg:height="0.027cm" svg:x="8.666cm" svg:y="23.904cm" svg:viewBox="0 0 27 28" draw:points="0,0 27,0 27,28 0,28">
          <text:p/>
        </draw:polygon>
        <draw:polygon draw:style-name="gr269" draw:text-style-name="P267" draw:layer="layout" svg:width="0.026cm" svg:height="0.027cm" svg:x="8.719cm" svg:y="23.904cm" svg:viewBox="0 0 27 28" draw:points="0,0 27,0 27,28 0,28">
          <text:p/>
        </draw:polygon>
        <draw:polygon draw:style-name="gr269" draw:text-style-name="P267" draw:layer="layout" svg:width="0.026cm" svg:height="0.027cm" svg:x="8.772cm" svg:y="23.904cm" svg:viewBox="0 0 27 28" draw:points="0,0 27,0 27,28 0,28">
          <text:p/>
        </draw:polygon>
        <draw:polygon draw:style-name="gr269" draw:text-style-name="P267" draw:layer="layout" svg:width="0.026cm" svg:height="0.027cm" svg:x="8.825cm" svg:y="23.904cm" svg:viewBox="0 0 27 28" draw:points="0,0 27,0 27,28 0,28">
          <text:p/>
        </draw:polygon>
        <draw:polygon draw:style-name="gr269" draw:text-style-name="P267" draw:layer="layout" svg:width="0.026cm" svg:height="0.027cm" svg:x="8.878cm" svg:y="23.904cm" svg:viewBox="0 0 27 28" draw:points="0,0 27,0 27,28 0,28">
          <text:p/>
        </draw:polygon>
        <draw:polygon draw:style-name="gr269" draw:text-style-name="P267" draw:layer="layout" svg:width="0.026cm" svg:height="0.027cm" svg:x="8.931cm" svg:y="23.904cm" svg:viewBox="0 0 27 28" draw:points="0,0 27,0 27,28 0,28">
          <text:p/>
        </draw:polygon>
        <draw:polygon draw:style-name="gr269" draw:text-style-name="P267" draw:layer="layout" svg:width="0.026cm" svg:height="0.027cm" svg:x="8.984cm" svg:y="23.904cm" svg:viewBox="0 0 27 28" draw:points="0,0 27,0 27,28 0,28">
          <text:p/>
        </draw:polygon>
        <draw:polygon draw:style-name="gr269" draw:text-style-name="P267" draw:layer="layout" svg:width="0.026cm" svg:height="0.027cm" svg:x="9.037cm" svg:y="23.904cm" svg:viewBox="0 0 27 28" draw:points="0,0 27,0 27,28 0,28">
          <text:p/>
        </draw:polygon>
        <draw:polygon draw:style-name="gr269" draw:text-style-name="P267" draw:layer="layout" svg:width="0.026cm" svg:height="0.027cm" svg:x="9.09cm" svg:y="23.904cm" svg:viewBox="0 0 27 28" draw:points="0,0 27,0 27,28 0,28">
          <text:p/>
        </draw:polygon>
        <draw:polygon draw:style-name="gr269" draw:text-style-name="P267" draw:layer="layout" svg:width="0.026cm" svg:height="0.027cm" svg:x="9.143cm" svg:y="23.904cm" svg:viewBox="0 0 27 28" draw:points="0,0 27,0 27,28 0,28">
          <text:p/>
        </draw:polygon>
        <draw:polygon draw:style-name="gr269" draw:text-style-name="P267" draw:layer="layout" svg:width="0.026cm" svg:height="0.027cm" svg:x="9.196cm" svg:y="23.904cm" svg:viewBox="0 0 27 28" draw:points="0,0 27,0 27,28 0,28">
          <text:p/>
        </draw:polygon>
        <draw:polygon draw:style-name="gr269" draw:text-style-name="P267" draw:layer="layout" svg:width="0.026cm" svg:height="0.027cm" svg:x="9.249cm" svg:y="23.904cm" svg:viewBox="0 0 27 28" draw:points="0,0 27,0 27,28 0,28">
          <text:p/>
        </draw:polygon>
        <draw:polygon draw:style-name="gr269" draw:text-style-name="P267" draw:layer="layout" svg:width="0.026cm" svg:height="0.027cm" svg:x="9.302cm" svg:y="23.904cm" svg:viewBox="0 0 27 28" draw:points="0,0 27,0 27,28 0,28">
          <text:p/>
        </draw:polygon>
        <draw:polygon draw:style-name="gr269" draw:text-style-name="P267" draw:layer="layout" svg:width="0.026cm" svg:height="0.027cm" svg:x="9.355cm" svg:y="23.904cm" svg:viewBox="0 0 27 28" draw:points="0,0 27,0 27,28 0,28">
          <text:p/>
        </draw:polygon>
        <draw:polygon draw:style-name="gr269" draw:text-style-name="P267" draw:layer="layout" svg:width="0.026cm" svg:height="0.027cm" svg:x="9.408cm" svg:y="23.904cm" svg:viewBox="0 0 27 28" draw:points="0,0 27,0 27,28 0,28">
          <text:p/>
        </draw:polygon>
        <draw:polygon draw:style-name="gr269" draw:text-style-name="P267" draw:layer="layout" svg:width="0.026cm" svg:height="0.027cm" svg:x="9.461cm" svg:y="23.904cm" svg:viewBox="0 0 27 28" draw:points="0,0 27,0 27,28 0,28">
          <text:p/>
        </draw:polygon>
        <draw:polygon draw:style-name="gr269" draw:text-style-name="P267" draw:layer="layout" svg:width="0.026cm" svg:height="0.027cm" svg:x="9.514cm" svg:y="23.904cm" svg:viewBox="0 0 27 28" draw:points="0,0 27,0 27,28 0,28">
          <text:p/>
        </draw:polygon>
        <draw:polygon draw:style-name="gr269" draw:text-style-name="P267" draw:layer="layout" svg:width="0.026cm" svg:height="0.027cm" svg:x="9.567cm" svg:y="23.904cm" svg:viewBox="0 0 27 28" draw:points="0,0 27,0 27,28 0,28">
          <text:p/>
        </draw:polygon>
        <draw:polygon draw:style-name="gr269" draw:text-style-name="P267" draw:layer="layout" svg:width="0.026cm" svg:height="0.027cm" svg:x="9.62cm" svg:y="23.904cm" svg:viewBox="0 0 27 28" draw:points="0,0 27,0 27,28 0,28">
          <text:p/>
        </draw:polygon>
        <draw:polygon draw:style-name="gr269" draw:text-style-name="P267" draw:layer="layout" svg:width="0.026cm" svg:height="0.027cm" svg:x="9.673cm" svg:y="23.904cm" svg:viewBox="0 0 27 28" draw:points="0,0 27,0 27,28 0,28">
          <text:p/>
        </draw:polygon>
        <draw:polygon draw:style-name="gr269" draw:text-style-name="P267" draw:layer="layout" svg:width="0.026cm" svg:height="0.027cm" svg:x="9.726cm" svg:y="23.904cm" svg:viewBox="0 0 27 28" draw:points="0,0 27,0 27,28 0,28">
          <text:p/>
        </draw:polygon>
        <draw:polygon draw:style-name="gr269" draw:text-style-name="P267" draw:layer="layout" svg:width="0.026cm" svg:height="0.027cm" svg:x="9.779cm" svg:y="23.904cm" svg:viewBox="0 0 27 28" draw:points="0,0 27,0 27,28 0,28">
          <text:p/>
        </draw:polygon>
        <draw:polygon draw:style-name="gr269" draw:text-style-name="P267" draw:layer="layout" svg:width="0.026cm" svg:height="0.027cm" svg:x="9.832cm" svg:y="23.904cm" svg:viewBox="0 0 27 28" draw:points="0,0 27,0 27,28 0,28">
          <text:p/>
        </draw:polygon>
        <draw:polygon draw:style-name="gr269" draw:text-style-name="P267" draw:layer="layout" svg:width="0.026cm" svg:height="0.027cm" svg:x="9.885cm" svg:y="23.904cm" svg:viewBox="0 0 27 28" draw:points="0,0 27,0 27,28 0,28">
          <text:p/>
        </draw:polygon>
        <draw:polygon draw:style-name="gr269" draw:text-style-name="P267" draw:layer="layout" svg:width="0.026cm" svg:height="0.027cm" svg:x="9.938cm" svg:y="23.904cm" svg:viewBox="0 0 27 28" draw:points="0,0 27,0 27,28 0,28">
          <text:p/>
        </draw:polygon>
        <draw:polygon draw:style-name="gr269" draw:text-style-name="P267" draw:layer="layout" svg:width="0.026cm" svg:height="0.027cm" svg:x="9.991cm" svg:y="23.904cm" svg:viewBox="0 0 27 28" draw:points="0,0 27,0 27,28 0,28">
          <text:p/>
        </draw:polygon>
        <draw:polygon draw:style-name="gr269" draw:text-style-name="P267" draw:layer="layout" svg:width="0.026cm" svg:height="0.027cm" svg:x="10.044cm" svg:y="23.904cm" svg:viewBox="0 0 27 28" draw:points="0,0 27,0 27,28 0,28">
          <text:p/>
        </draw:polygon>
        <draw:polygon draw:style-name="gr269" draw:text-style-name="P267" draw:layer="layout" svg:width="0.026cm" svg:height="0.027cm" svg:x="10.097cm" svg:y="23.904cm" svg:viewBox="0 0 27 28" draw:points="0,0 27,0 27,28 0,28">
          <text:p/>
        </draw:polygon>
        <draw:polygon draw:style-name="gr269" draw:text-style-name="P267" draw:layer="layout" svg:width="0.026cm" svg:height="0.027cm" svg:x="10.15cm" svg:y="23.904cm" svg:viewBox="0 0 27 28" draw:points="0,0 27,0 27,28 0,28">
          <text:p/>
        </draw:polygon>
        <draw:polygon draw:style-name="gr269" draw:text-style-name="P267" draw:layer="layout" svg:width="0.026cm" svg:height="0.027cm" svg:x="10.203cm" svg:y="23.904cm" svg:viewBox="0 0 27 28" draw:points="0,0 27,0 27,28 0,28">
          <text:p/>
        </draw:polygon>
        <draw:polygon draw:style-name="gr269" draw:text-style-name="P267" draw:layer="layout" svg:width="0.026cm" svg:height="0.027cm" svg:x="10.256cm" svg:y="23.904cm" svg:viewBox="0 0 27 28" draw:points="0,0 27,0 27,28 0,28">
          <text:p/>
        </draw:polygon>
        <draw:polygon draw:style-name="gr269" draw:text-style-name="P267" draw:layer="layout" svg:width="0.026cm" svg:height="0.027cm" svg:x="10.309cm" svg:y="23.904cm" svg:viewBox="0 0 27 28" draw:points="0,0 27,0 27,28 0,28">
          <text:p/>
        </draw:polygon>
        <draw:polygon draw:style-name="gr269" draw:text-style-name="P267" draw:layer="layout" svg:width="0.026cm" svg:height="0.027cm" svg:x="10.362cm" svg:y="23.904cm" svg:viewBox="0 0 27 28" draw:points="0,0 27,0 27,28 0,28">
          <text:p/>
        </draw:polygon>
        <draw:polygon draw:style-name="gr269" draw:text-style-name="P267" draw:layer="layout" svg:width="0.026cm" svg:height="0.027cm" svg:x="10.415cm" svg:y="23.904cm" svg:viewBox="0 0 27 28" draw:points="0,0 27,0 27,28 0,28">
          <text:p/>
        </draw:polygon>
        <draw:polygon draw:style-name="gr269" draw:text-style-name="P267" draw:layer="layout" svg:width="0.026cm" svg:height="0.027cm" svg:x="10.468cm" svg:y="23.904cm" svg:viewBox="0 0 27 28" draw:points="0,0 27,0 27,28 0,28">
          <text:p/>
        </draw:polygon>
        <draw:polygon draw:style-name="gr269" draw:text-style-name="P267" draw:layer="layout" svg:width="0.026cm" svg:height="0.027cm" svg:x="10.521cm" svg:y="23.904cm" svg:viewBox="0 0 27 28" draw:points="0,0 27,0 27,28 0,28">
          <text:p/>
        </draw:polygon>
        <draw:polygon draw:style-name="gr269" draw:text-style-name="P267" draw:layer="layout" svg:width="0.026cm" svg:height="0.027cm" svg:x="10.574cm" svg:y="23.904cm" svg:viewBox="0 0 27 28" draw:points="0,0 27,0 27,28 0,28">
          <text:p/>
        </draw:polygon>
        <draw:polygon draw:style-name="gr269" draw:text-style-name="P267" draw:layer="layout" svg:width="0.026cm" svg:height="0.027cm" svg:x="10.627cm" svg:y="23.904cm" svg:viewBox="0 0 27 28" draw:points="0,0 27,0 27,28 0,28">
          <text:p/>
        </draw:polygon>
        <draw:polygon draw:style-name="gr269" draw:text-style-name="P267" draw:layer="layout" svg:width="0.026cm" svg:height="0.027cm" svg:x="10.68cm" svg:y="23.904cm" svg:viewBox="0 0 27 28" draw:points="0,0 27,0 27,28 0,28">
          <text:p/>
        </draw:polygon>
        <draw:polygon draw:style-name="gr269" draw:text-style-name="P267" draw:layer="layout" svg:width="0.026cm" svg:height="0.027cm" svg:x="10.733cm" svg:y="23.904cm" svg:viewBox="0 0 27 28" draw:points="0,0 27,0 27,28 0,28">
          <text:p/>
        </draw:polygon>
        <draw:polygon draw:style-name="gr269" draw:text-style-name="P267" draw:layer="layout" svg:width="0.026cm" svg:height="0.027cm" svg:x="10.786cm" svg:y="23.904cm" svg:viewBox="0 0 27 28" draw:points="0,0 27,0 27,28 0,28">
          <text:p/>
        </draw:polygon>
        <draw:polygon draw:style-name="gr269" draw:text-style-name="P267" draw:layer="layout" svg:width="0.026cm" svg:height="0.027cm" svg:x="10.839cm" svg:y="23.904cm" svg:viewBox="0 0 27 28" draw:points="0,0 27,0 27,28 0,28">
          <text:p/>
        </draw:polygon>
        <draw:polygon draw:style-name="gr269" draw:text-style-name="P267" draw:layer="layout" svg:width="0.026cm" svg:height="0.027cm" svg:x="10.892cm" svg:y="23.904cm" svg:viewBox="0 0 27 28" draw:points="0,0 27,0 27,28 0,28">
          <text:p/>
        </draw:polygon>
        <draw:polygon draw:style-name="gr269" draw:text-style-name="P267" draw:layer="layout" svg:width="0.026cm" svg:height="0.027cm" svg:x="10.945cm" svg:y="23.904cm" svg:viewBox="0 0 27 28" draw:points="0,0 27,0 27,28 0,28">
          <text:p/>
        </draw:polygon>
        <draw:polygon draw:style-name="gr269" draw:text-style-name="P267" draw:layer="layout" svg:width="0.026cm" svg:height="0.027cm" svg:x="10.998cm" svg:y="23.904cm" svg:viewBox="0 0 27 28" draw:points="0,0 27,0 27,28 0,28">
          <text:p/>
        </draw:polygon>
        <draw:polygon draw:style-name="gr269" draw:text-style-name="P267" draw:layer="layout" svg:width="0.026cm" svg:height="0.027cm" svg:x="11.051cm" svg:y="23.904cm" svg:viewBox="0 0 27 28" draw:points="0,0 27,0 27,28 0,28">
          <text:p/>
        </draw:polygon>
        <draw:polygon draw:style-name="gr269" draw:text-style-name="P267" draw:layer="layout" svg:width="0.026cm" svg:height="0.027cm" svg:x="11.104cm" svg:y="23.904cm" svg:viewBox="0 0 27 28" draw:points="0,0 27,0 27,28 0,28">
          <text:p/>
        </draw:polygon>
        <draw:polygon draw:style-name="gr269" draw:text-style-name="P267" draw:layer="layout" svg:width="0.026cm" svg:height="0.027cm" svg:x="11.157cm" svg:y="23.904cm" svg:viewBox="0 0 27 28" draw:points="0,0 27,0 27,28 0,28">
          <text:p/>
        </draw:polygon>
        <draw:polygon draw:style-name="gr269" draw:text-style-name="P267" draw:layer="layout" svg:width="0.026cm" svg:height="0.027cm" svg:x="11.21cm" svg:y="23.904cm" svg:viewBox="0 0 27 28" draw:points="0,0 27,0 27,28 0,28">
          <text:p/>
        </draw:polygon>
        <draw:polygon draw:style-name="gr269" draw:text-style-name="P267" draw:layer="layout" svg:width="0.026cm" svg:height="0.027cm" svg:x="11.263cm" svg:y="23.904cm" svg:viewBox="0 0 27 28" draw:points="0,0 27,0 27,28 0,28">
          <text:p/>
        </draw:polygon>
        <draw:polygon draw:style-name="gr269" draw:text-style-name="P267" draw:layer="layout" svg:width="0.026cm" svg:height="0.027cm" svg:x="11.316cm" svg:y="23.904cm" svg:viewBox="0 0 27 28" draw:points="0,0 27,0 27,28 0,28">
          <text:p/>
        </draw:polygon>
        <draw:polygon draw:style-name="gr269" draw:text-style-name="P267" draw:layer="layout" svg:width="0.026cm" svg:height="0.027cm" svg:x="11.369cm" svg:y="23.904cm" svg:viewBox="0 0 27 28" draw:points="0,0 27,0 27,28 0,28">
          <text:p/>
        </draw:polygon>
        <draw:polygon draw:style-name="gr269" draw:text-style-name="P267" draw:layer="layout" svg:width="0.026cm" svg:height="0.027cm" svg:x="11.422cm" svg:y="23.904cm" svg:viewBox="0 0 27 28" draw:points="0,0 27,0 27,28 0,28">
          <text:p/>
        </draw:polygon>
        <draw:polygon draw:style-name="gr269" draw:text-style-name="P267" draw:layer="layout" svg:width="0.026cm" svg:height="0.027cm" svg:x="11.475cm" svg:y="23.904cm" svg:viewBox="0 0 27 28" draw:points="0,0 27,0 27,28 0,28">
          <text:p/>
        </draw:polygon>
        <draw:polygon draw:style-name="gr269" draw:text-style-name="P267" draw:layer="layout" svg:width="0.026cm" svg:height="0.027cm" svg:x="11.528cm" svg:y="23.904cm" svg:viewBox="0 0 27 28" draw:points="0,0 27,0 27,28 0,28">
          <text:p/>
        </draw:polygon>
        <draw:polygon draw:style-name="gr269" draw:text-style-name="P267" draw:layer="layout" svg:width="0.026cm" svg:height="0.027cm" svg:x="11.581cm" svg:y="23.904cm" svg:viewBox="0 0 27 28" draw:points="0,0 27,0 27,28 0,28">
          <text:p/>
        </draw:polygon>
        <draw:polygon draw:style-name="gr269" draw:text-style-name="P267" draw:layer="layout" svg:width="0.026cm" svg:height="0.027cm" svg:x="11.634cm" svg:y="23.904cm" svg:viewBox="0 0 27 28" draw:points="0,0 27,0 27,28 0,28">
          <text:p/>
        </draw:polygon>
        <draw:polygon draw:style-name="gr269" draw:text-style-name="P267" draw:layer="layout" svg:width="0.026cm" svg:height="0.027cm" svg:x="11.687cm" svg:y="23.904cm" svg:viewBox="0 0 27 28" draw:points="0,0 27,0 27,28 0,28">
          <text:p/>
        </draw:polygon>
        <draw:polygon draw:style-name="gr269" draw:text-style-name="P267" draw:layer="layout" svg:width="0.026cm" svg:height="0.027cm" svg:x="11.74cm" svg:y="23.904cm" svg:viewBox="0 0 27 28" draw:points="0,0 27,0 27,28 0,28">
          <text:p/>
        </draw:polygon>
        <draw:polygon draw:style-name="gr269" draw:text-style-name="P267" draw:layer="layout" svg:width="0.026cm" svg:height="0.027cm" svg:x="11.793cm" svg:y="23.904cm" svg:viewBox="0 0 27 28" draw:points="0,0 27,0 27,28 0,28">
          <text:p/>
        </draw:polygon>
        <draw:polygon draw:style-name="gr269" draw:text-style-name="P267" draw:layer="layout" svg:width="0.026cm" svg:height="0.027cm" svg:x="11.846cm" svg:y="23.904cm" svg:viewBox="0 0 27 28" draw:points="0,0 27,0 27,28 0,28">
          <text:p/>
        </draw:polygon>
        <draw:polygon draw:style-name="gr269" draw:text-style-name="P267" draw:layer="layout" svg:width="0.026cm" svg:height="0.027cm" svg:x="11.899cm" svg:y="23.904cm" svg:viewBox="0 0 27 28" draw:points="0,0 27,0 27,28 0,28">
          <text:p/>
        </draw:polygon>
        <draw:polygon draw:style-name="gr269" draw:text-style-name="P267" draw:layer="layout" svg:width="0.026cm" svg:height="0.027cm" svg:x="11.952cm" svg:y="23.904cm" svg:viewBox="0 0 27 28" draw:points="0,0 27,0 27,28 0,28">
          <text:p/>
        </draw:polygon>
        <draw:polygon draw:style-name="gr269" draw:text-style-name="P267" draw:layer="layout" svg:width="0.026cm" svg:height="0.027cm" svg:x="12.005cm" svg:y="23.904cm" svg:viewBox="0 0 27 28" draw:points="0,0 27,0 27,28 0,28">
          <text:p/>
        </draw:polygon>
        <draw:polygon draw:style-name="gr269" draw:text-style-name="P267" draw:layer="layout" svg:width="0.026cm" svg:height="0.027cm" svg:x="12.058cm" svg:y="23.904cm" svg:viewBox="0 0 27 28" draw:points="0,0 27,0 27,28 0,28">
          <text:p/>
        </draw:polygon>
        <draw:polygon draw:style-name="gr269" draw:text-style-name="P267" draw:layer="layout" svg:width="0.026cm" svg:height="0.027cm" svg:x="12.111cm" svg:y="23.904cm" svg:viewBox="0 0 27 28" draw:points="0,0 27,0 27,28 0,28">
          <text:p/>
        </draw:polygon>
        <draw:polygon draw:style-name="gr269" draw:text-style-name="P267" draw:layer="layout" svg:width="0.026cm" svg:height="0.027cm" svg:x="12.164cm" svg:y="23.904cm" svg:viewBox="0 0 27 28" draw:points="0,0 27,0 27,28 0,28">
          <text:p/>
        </draw:polygon>
        <draw:polygon draw:style-name="gr269" draw:text-style-name="P267" draw:layer="layout" svg:width="0.026cm" svg:height="0.027cm" svg:x="12.217cm" svg:y="23.904cm" svg:viewBox="0 0 27 28" draw:points="0,0 27,0 27,28 0,28">
          <text:p/>
        </draw:polygon>
        <draw:polygon draw:style-name="gr269" draw:text-style-name="P267" draw:layer="layout" svg:width="0.026cm" svg:height="0.027cm" svg:x="12.27cm" svg:y="23.904cm" svg:viewBox="0 0 27 28" draw:points="0,0 27,0 27,28 0,28">
          <text:p/>
        </draw:polygon>
        <draw:polygon draw:style-name="gr269" draw:text-style-name="P267" draw:layer="layout" svg:width="0.026cm" svg:height="0.027cm" svg:x="12.323cm" svg:y="23.904cm" svg:viewBox="0 0 27 28" draw:points="0,0 27,0 27,28 0,28">
          <text:p/>
        </draw:polygon>
        <draw:polygon draw:style-name="gr269" draw:text-style-name="P267" draw:layer="layout" svg:width="0.026cm" svg:height="0.027cm" svg:x="12.376cm" svg:y="23.904cm" svg:viewBox="0 0 27 28" draw:points="0,0 27,0 27,28 0,28">
          <text:p/>
        </draw:polygon>
        <draw:polygon draw:style-name="gr269" draw:text-style-name="P267" draw:layer="layout" svg:width="0.026cm" svg:height="0.027cm" svg:x="12.429cm" svg:y="23.904cm" svg:viewBox="0 0 27 28" draw:points="0,0 27,0 27,28 0,28">
          <text:p/>
        </draw:polygon>
        <draw:polygon draw:style-name="gr269" draw:text-style-name="P267" draw:layer="layout" svg:width="0.026cm" svg:height="0.027cm" svg:x="12.482cm" svg:y="23.904cm" svg:viewBox="0 0 27 28" draw:points="0,0 27,0 27,28 0,28">
          <text:p/>
        </draw:polygon>
        <draw:polygon draw:style-name="gr269" draw:text-style-name="P267" draw:layer="layout" svg:width="0.026cm" svg:height="0.027cm" svg:x="12.535cm" svg:y="23.904cm" svg:viewBox="0 0 27 28" draw:points="0,0 27,0 27,28 0,28">
          <text:p/>
        </draw:polygon>
        <draw:polygon draw:style-name="gr269" draw:text-style-name="P267" draw:layer="layout" svg:width="0.026cm" svg:height="0.027cm" svg:x="12.588cm" svg:y="23.904cm" svg:viewBox="0 0 27 28" draw:points="0,0 27,0 27,28 0,28">
          <text:p/>
        </draw:polygon>
        <draw:polygon draw:style-name="gr269" draw:text-style-name="P267" draw:layer="layout" svg:width="0.026cm" svg:height="0.027cm" svg:x="12.641cm" svg:y="23.904cm" svg:viewBox="0 0 27 28" draw:points="0,0 27,0 27,28 0,28">
          <text:p/>
        </draw:polygon>
        <draw:polygon draw:style-name="gr269" draw:text-style-name="P267" draw:layer="layout" svg:width="0.027cm" svg:height="0.027cm" svg:x="12.694cm" svg:y="23.904cm" svg:viewBox="0 0 28 28" draw:points="0,0 28,0 28,28 0,28">
          <text:p/>
        </draw:polygon>
        <draw:polygon draw:style-name="gr269" draw:text-style-name="P267" draw:layer="layout" svg:width="0.027cm" svg:height="0.027cm" svg:x="12.747cm" svg:y="23.904cm" svg:viewBox="0 0 28 28" draw:points="0,0 28,0 28,28 0,28">
          <text:p/>
        </draw:polygon>
        <draw:polygon draw:style-name="gr269" draw:text-style-name="P267" draw:layer="layout" svg:width="0.027cm" svg:height="0.027cm" svg:x="12.8cm" svg:y="23.904cm" svg:viewBox="0 0 28 28" draw:points="0,0 28,0 28,28 0,28">
          <text:p/>
        </draw:polygon>
        <draw:polygon draw:style-name="gr269" draw:text-style-name="P267" draw:layer="layout" svg:width="0.027cm" svg:height="0.027cm" svg:x="12.853cm" svg:y="23.904cm" svg:viewBox="0 0 28 28" draw:points="0,0 28,0 28,28 0,28">
          <text:p/>
        </draw:polygon>
        <draw:polygon draw:style-name="gr269" draw:text-style-name="P267" draw:layer="layout" svg:width="0.027cm" svg:height="0.027cm" svg:x="12.906cm" svg:y="23.904cm" svg:viewBox="0 0 28 28" draw:points="0,0 28,0 28,28 0,28">
          <text:p/>
        </draw:polygon>
        <draw:polygon draw:style-name="gr269" draw:text-style-name="P267" draw:layer="layout" svg:width="0.027cm" svg:height="0.027cm" svg:x="12.959cm" svg:y="23.904cm" svg:viewBox="0 0 28 28" draw:points="0,0 28,0 28,28 0,28">
          <text:p/>
        </draw:polygon>
        <draw:polygon draw:style-name="gr269" draw:text-style-name="P267" draw:layer="layout" svg:width="0.028cm" svg:height="0.027cm" svg:x="13.012cm" svg:y="23.904cm" svg:viewBox="0 0 29 28" draw:points="0,0 29,0 29,28 0,28">
          <text:p/>
        </draw:polygon>
        <draw:polygon draw:style-name="gr269" draw:text-style-name="P267" draw:layer="layout" svg:width="0.027cm" svg:height="0.027cm" svg:x="13.065cm" svg:y="23.904cm" svg:viewBox="0 0 28 28" draw:points="0,0 28,0 28,28 0,28">
          <text:p/>
        </draw:polygon>
        <draw:polygon draw:style-name="gr269" draw:text-style-name="P267" draw:layer="layout" svg:width="0.027cm" svg:height="0.027cm" svg:x="13.118cm" svg:y="23.904cm" svg:viewBox="0 0 28 28" draw:points="0,0 28,0 28,28 0,28">
          <text:p/>
        </draw:polygon>
        <draw:polygon draw:style-name="gr269" draw:text-style-name="P267" draw:layer="layout" svg:width="0.027cm" svg:height="0.027cm" svg:x="13.171cm" svg:y="23.904cm" svg:viewBox="0 0 28 28" draw:points="0,0 28,0 28,28 0,28">
          <text:p/>
        </draw:polygon>
        <draw:polygon draw:style-name="gr269" draw:text-style-name="P267" draw:layer="layout" svg:width="0.027cm" svg:height="0.027cm" svg:x="13.224cm" svg:y="23.904cm" svg:viewBox="0 0 28 28" draw:points="0,0 28,0 28,28 0,28">
          <text:p/>
        </draw:polygon>
        <draw:polygon draw:style-name="gr269" draw:text-style-name="P267" draw:layer="layout" svg:width="0.027cm" svg:height="0.027cm" svg:x="13.277cm" svg:y="23.904cm" svg:viewBox="0 0 28 28" draw:points="0,0 28,0 28,28 0,28">
          <text:p/>
        </draw:polygon>
        <draw:polygon draw:style-name="gr269" draw:text-style-name="P267" draw:layer="layout" svg:width="0.027cm" svg:height="0.027cm" svg:x="13.33cm" svg:y="23.904cm" svg:viewBox="0 0 28 28" draw:points="0,0 28,0 28,28 0,28">
          <text:p/>
        </draw:polygon>
        <draw:polygon draw:style-name="gr269" draw:text-style-name="P267" draw:layer="layout" svg:width="0.027cm" svg:height="0.027cm" svg:x="13.383cm" svg:y="23.904cm" svg:viewBox="0 0 28 28" draw:points="0,0 28,0 28,28 0,28">
          <text:p/>
        </draw:polygon>
        <draw:polygon draw:style-name="gr269" draw:text-style-name="P267" draw:layer="layout" svg:width="0.027cm" svg:height="0.027cm" svg:x="13.436cm" svg:y="23.904cm" svg:viewBox="0 0 28 28" draw:points="0,0 28,0 28,28 0,28">
          <text:p/>
        </draw:polygon>
        <draw:polygon draw:style-name="gr269" draw:text-style-name="P267" draw:layer="layout" svg:width="0.027cm" svg:height="0.027cm" svg:x="13.489cm" svg:y="23.904cm" svg:viewBox="0 0 28 28" draw:points="0,0 28,0 28,28 0,28">
          <text:p/>
        </draw:polygon>
        <draw:polygon draw:style-name="gr269" draw:text-style-name="P267" draw:layer="layout" svg:width="0.027cm" svg:height="0.027cm" svg:x="13.542cm" svg:y="23.904cm" svg:viewBox="0 0 28 28" draw:points="0,0 28,0 28,28 0,28">
          <text:p/>
        </draw:polygon>
        <draw:polygon draw:style-name="gr269" draw:text-style-name="P267" draw:layer="layout" svg:width="0.027cm" svg:height="0.027cm" svg:x="13.595cm" svg:y="23.904cm" svg:viewBox="0 0 28 28" draw:points="0,0 28,0 28,28 0,28">
          <text:p/>
        </draw:polygon>
        <draw:polygon draw:style-name="gr269" draw:text-style-name="P267" draw:layer="layout" svg:width="0.027cm" svg:height="0.027cm" svg:x="13.648cm" svg:y="23.904cm" svg:viewBox="0 0 28 28" draw:points="0,0 28,0 28,28 0,28">
          <text:p/>
        </draw:polygon>
        <draw:polygon draw:style-name="gr269" draw:text-style-name="P267" draw:layer="layout" svg:width="0.027cm" svg:height="0.027cm" svg:x="13.701cm" svg:y="23.904cm" svg:viewBox="0 0 28 28" draw:points="0,0 28,0 28,28 0,28">
          <text:p/>
        </draw:polygon>
        <draw:polygon draw:style-name="gr269" draw:text-style-name="P267" draw:layer="layout" svg:width="0.027cm" svg:height="0.027cm" svg:x="13.754cm" svg:y="23.904cm" svg:viewBox="0 0 28 28" draw:points="0,0 28,0 28,28 0,28">
          <text:p/>
        </draw:polygon>
        <draw:polygon draw:style-name="gr269" draw:text-style-name="P267" draw:layer="layout" svg:width="0.027cm" svg:height="0.027cm" svg:x="13.807cm" svg:y="23.904cm" svg:viewBox="0 0 28 28" draw:points="0,0 28,0 28,28 0,28">
          <text:p/>
        </draw:polygon>
        <draw:polygon draw:style-name="gr269" draw:text-style-name="P267" draw:layer="layout" svg:width="0.027cm" svg:height="0.027cm" svg:x="13.86cm" svg:y="23.904cm" svg:viewBox="0 0 28 28" draw:points="0,0 28,0 28,28 0,28">
          <text:p/>
        </draw:polygon>
        <draw:polygon draw:style-name="gr269" draw:text-style-name="P267" draw:layer="layout" svg:width="0.027cm" svg:height="0.027cm" svg:x="13.913cm" svg:y="23.904cm" svg:viewBox="0 0 28 28" draw:points="0,0 28,0 28,28 0,28">
          <text:p/>
        </draw:polygon>
        <draw:polygon draw:style-name="gr269" draw:text-style-name="P267" draw:layer="layout" svg:width="0.027cm" svg:height="0.027cm" svg:x="13.966cm" svg:y="23.904cm" svg:viewBox="0 0 28 28" draw:points="0,0 28,0 28,28 0,28">
          <text:p/>
        </draw:polygon>
        <draw:polygon draw:style-name="gr269" draw:text-style-name="P267" draw:layer="layout" svg:width="0.027cm" svg:height="0.027cm" svg:x="14.019cm" svg:y="23.904cm" svg:viewBox="0 0 28 28" draw:points="0,0 28,0 28,28 0,28">
          <text:p/>
        </draw:polygon>
        <draw:polygon draw:style-name="gr269" draw:text-style-name="P267" draw:layer="layout" svg:width="0.027cm" svg:height="0.027cm" svg:x="14.072cm" svg:y="23.904cm" svg:viewBox="0 0 28 28" draw:points="0,0 28,0 28,28 0,28">
          <text:p/>
        </draw:polygon>
        <draw:polygon draw:style-name="gr269" draw:text-style-name="P267" draw:layer="layout" svg:width="0.027cm" svg:height="0.027cm" svg:x="14.125cm" svg:y="23.904cm" svg:viewBox="0 0 28 28" draw:points="0,0 28,0 28,28 0,28">
          <text:p/>
        </draw:polygon>
        <draw:polygon draw:style-name="gr269" draw:text-style-name="P267" draw:layer="layout" svg:width="0.027cm" svg:height="0.027cm" svg:x="14.178cm" svg:y="23.904cm" svg:viewBox="0 0 28 28" draw:points="0,0 28,0 28,28 0,28">
          <text:p/>
        </draw:polygon>
        <draw:polygon draw:style-name="gr269" draw:text-style-name="P267" draw:layer="layout" svg:width="0.027cm" svg:height="0.027cm" svg:x="14.231cm" svg:y="23.904cm" svg:viewBox="0 0 28 28" draw:points="0,0 28,0 28,28 0,28">
          <text:p/>
        </draw:polygon>
        <draw:polygon draw:style-name="gr269" draw:text-style-name="P267" draw:layer="layout" svg:width="0.027cm" svg:height="0.027cm" svg:x="14.284cm" svg:y="23.904cm" svg:viewBox="0 0 28 28" draw:points="0,0 28,0 28,28 0,28">
          <text:p/>
        </draw:polygon>
        <draw:polygon draw:style-name="gr269" draw:text-style-name="P267" draw:layer="layout" svg:width="0.027cm" svg:height="0.027cm" svg:x="14.337cm" svg:y="23.904cm" svg:viewBox="0 0 28 28" draw:points="0,0 28,0 28,28 0,28">
          <text:p/>
        </draw:polygon>
        <draw:polygon draw:style-name="gr269" draw:text-style-name="P267" draw:layer="layout" svg:width="0.028cm" svg:height="0.027cm" svg:x="14.39cm" svg:y="23.904cm" svg:viewBox="0 0 29 28" draw:points="0,0 29,0 29,28 0,28">
          <text:p/>
        </draw:polygon>
        <draw:polygon draw:style-name="gr269" draw:text-style-name="P267" draw:layer="layout" svg:width="0.027cm" svg:height="0.027cm" svg:x="14.443cm" svg:y="23.904cm" svg:viewBox="0 0 28 28" draw:points="0,0 28,0 28,28 0,28">
          <text:p/>
        </draw:polygon>
        <draw:polygon draw:style-name="gr269" draw:text-style-name="P267" draw:layer="layout" svg:width="0.027cm" svg:height="0.027cm" svg:x="14.496cm" svg:y="23.904cm" svg:viewBox="0 0 28 28" draw:points="0,0 28,0 28,28 0,28">
          <text:p/>
        </draw:polygon>
        <draw:polygon draw:style-name="gr269" draw:text-style-name="P267" draw:layer="layout" svg:width="0.027cm" svg:height="0.027cm" svg:x="14.549cm" svg:y="23.904cm" svg:viewBox="0 0 28 28" draw:points="0,0 28,0 28,28 0,28">
          <text:p/>
        </draw:polygon>
        <draw:polygon draw:style-name="gr269" draw:text-style-name="P267" draw:layer="layout" svg:width="0.027cm" svg:height="0.027cm" svg:x="14.602cm" svg:y="23.904cm" svg:viewBox="0 0 28 28" draw:points="0,0 28,0 28,28 0,28">
          <text:p/>
        </draw:polygon>
        <draw:polygon draw:style-name="gr269" draw:text-style-name="P267" draw:layer="layout" svg:width="0.027cm" svg:height="0.027cm" svg:x="14.655cm" svg:y="23.904cm" svg:viewBox="0 0 28 28" draw:points="0,0 28,0 28,28 0,28">
          <text:p/>
        </draw:polygon>
        <draw:polygon draw:style-name="gr269" draw:text-style-name="P267" draw:layer="layout" svg:width="0.027cm" svg:height="0.027cm" svg:x="14.708cm" svg:y="23.904cm" svg:viewBox="0 0 28 28" draw:points="0,0 28,0 28,28 0,28">
          <text:p/>
        </draw:polygon>
        <draw:polygon draw:style-name="gr269" draw:text-style-name="P267" draw:layer="layout" svg:width="0.027cm" svg:height="0.027cm" svg:x="14.761cm" svg:y="23.904cm" svg:viewBox="0 0 28 28" draw:points="0,0 28,0 28,28 0,28">
          <text:p/>
        </draw:polygon>
        <draw:polygon draw:style-name="gr269" draw:text-style-name="P267" draw:layer="layout" svg:width="0.027cm" svg:height="0.027cm" svg:x="14.814cm" svg:y="23.904cm" svg:viewBox="0 0 28 28" draw:points="0,0 28,0 28,28 0,28">
          <text:p/>
        </draw:polygon>
        <draw:polygon draw:style-name="gr269" draw:text-style-name="P267" draw:layer="layout" svg:width="0.027cm" svg:height="0.027cm" svg:x="14.867cm" svg:y="23.904cm" svg:viewBox="0 0 28 28" draw:points="0,0 28,0 28,28 0,28">
          <text:p/>
        </draw:polygon>
        <draw:polygon draw:style-name="gr269" draw:text-style-name="P267" draw:layer="layout" svg:width="0.027cm" svg:height="0.027cm" svg:x="14.92cm" svg:y="23.904cm" svg:viewBox="0 0 28 28" draw:points="0,0 28,0 28,28 0,28">
          <text:p/>
        </draw:polygon>
        <draw:polygon draw:style-name="gr269" draw:text-style-name="P267" draw:layer="layout" svg:width="0.027cm" svg:height="0.027cm" svg:x="14.973cm" svg:y="23.904cm" svg:viewBox="0 0 28 28" draw:points="0,0 28,0 28,28 0,28">
          <text:p/>
        </draw:polygon>
        <draw:polygon draw:style-name="gr269" draw:text-style-name="P267" draw:layer="layout" svg:width="0.027cm" svg:height="0.027cm" svg:x="15.026cm" svg:y="23.904cm" svg:viewBox="0 0 28 28" draw:points="0,0 28,0 28,28 0,28">
          <text:p/>
        </draw:polygon>
        <draw:polygon draw:style-name="gr269" draw:text-style-name="P267" draw:layer="layout" svg:width="0.027cm" svg:height="0.027cm" svg:x="15.079cm" svg:y="23.904cm" svg:viewBox="0 0 28 28" draw:points="0,0 28,0 28,28 0,28">
          <text:p/>
        </draw:polygon>
        <draw:polygon draw:style-name="gr269" draw:text-style-name="P267" draw:layer="layout" svg:width="0.027cm" svg:height="0.027cm" svg:x="15.132cm" svg:y="23.904cm" svg:viewBox="0 0 28 28" draw:points="0,0 28,0 28,28 0,28">
          <text:p/>
        </draw:polygon>
        <draw:polygon draw:style-name="gr269" draw:text-style-name="P267" draw:layer="layout" svg:width="0.027cm" svg:height="0.027cm" svg:x="15.185cm" svg:y="23.904cm" svg:viewBox="0 0 28 28" draw:points="0,0 28,0 28,28 0,28">
          <text:p/>
        </draw:polygon>
        <draw:polygon draw:style-name="gr269" draw:text-style-name="P267" draw:layer="layout" svg:width="0.027cm" svg:height="0.027cm" svg:x="15.238cm" svg:y="23.904cm" svg:viewBox="0 0 28 28" draw:points="0,0 28,0 28,28 0,28">
          <text:p/>
        </draw:polygon>
        <draw:polygon draw:style-name="gr269" draw:text-style-name="P267" draw:layer="layout" svg:width="0.027cm" svg:height="0.027cm" svg:x="15.291cm" svg:y="23.904cm" svg:viewBox="0 0 28 28" draw:points="0,0 28,0 28,28 0,28">
          <text:p/>
        </draw:polygon>
        <draw:polygon draw:style-name="gr269" draw:text-style-name="P267" draw:layer="layout" svg:width="0.027cm" svg:height="0.027cm" svg:x="15.344cm" svg:y="23.904cm" svg:viewBox="0 0 28 28" draw:points="0,0 28,0 28,28 0,28">
          <text:p/>
        </draw:polygon>
        <draw:polygon draw:style-name="gr269" draw:text-style-name="P267" draw:layer="layout" svg:width="0.027cm" svg:height="0.027cm" svg:x="15.397cm" svg:y="23.904cm" svg:viewBox="0 0 28 28" draw:points="0,0 28,0 28,28 0,28">
          <text:p/>
        </draw:polygon>
        <draw:polygon draw:style-name="gr269" draw:text-style-name="P267" draw:layer="layout" svg:width="0.027cm" svg:height="0.027cm" svg:x="15.45cm" svg:y="23.904cm" svg:viewBox="0 0 28 28" draw:points="0,0 28,0 28,28 0,28">
          <text:p/>
        </draw:polygon>
        <draw:polygon draw:style-name="gr269" draw:text-style-name="P267" draw:layer="layout" svg:width="0.027cm" svg:height="0.027cm" svg:x="15.503cm" svg:y="23.904cm" svg:viewBox="0 0 28 28" draw:points="0,0 28,0 28,28 0,28">
          <text:p/>
        </draw:polygon>
        <draw:polygon draw:style-name="gr269" draw:text-style-name="P267" draw:layer="layout" svg:width="0.027cm" svg:height="0.027cm" svg:x="15.556cm" svg:y="23.904cm" svg:viewBox="0 0 28 28" draw:points="0,0 28,0 28,28 0,28">
          <text:p/>
        </draw:polygon>
        <draw:polygon draw:style-name="gr269" draw:text-style-name="P267" draw:layer="layout" svg:width="0.027cm" svg:height="0.027cm" svg:x="15.609cm" svg:y="23.904cm" svg:viewBox="0 0 28 28" draw:points="0,0 28,0 28,28 0,28">
          <text:p/>
        </draw:polygon>
        <draw:polygon draw:style-name="gr269" draw:text-style-name="P267" draw:layer="layout" svg:width="0.027cm" svg:height="0.027cm" svg:x="15.662cm" svg:y="23.904cm" svg:viewBox="0 0 28 28" draw:points="0,0 28,0 28,28 0,28">
          <text:p/>
        </draw:polygon>
        <draw:polygon draw:style-name="gr269" draw:text-style-name="P267" draw:layer="layout" svg:width="0.027cm" svg:height="0.027cm" svg:x="15.715cm" svg:y="23.904cm" svg:viewBox="0 0 28 28" draw:points="0,0 28,0 28,28 0,28">
          <text:p/>
        </draw:polygon>
        <draw:polygon draw:style-name="gr269" draw:text-style-name="P267" draw:layer="layout" svg:width="0.028cm" svg:height="0.027cm" svg:x="15.768cm" svg:y="23.904cm" svg:viewBox="0 0 29 28" draw:points="0,0 29,0 29,28 0,28">
          <text:p/>
        </draw:polygon>
        <draw:polygon draw:style-name="gr269" draw:text-style-name="P267" draw:layer="layout" svg:width="0.027cm" svg:height="0.027cm" svg:x="15.821cm" svg:y="23.904cm" svg:viewBox="0 0 28 28" draw:points="0,0 28,0 28,28 0,28">
          <text:p/>
        </draw:polygon>
        <draw:polygon draw:style-name="gr269" draw:text-style-name="P267" draw:layer="layout" svg:width="0.027cm" svg:height="0.027cm" svg:x="15.874cm" svg:y="23.904cm" svg:viewBox="0 0 28 28" draw:points="0,0 28,0 28,28 0,28">
          <text:p/>
        </draw:polygon>
        <draw:polygon draw:style-name="gr269" draw:text-style-name="P267" draw:layer="layout" svg:width="0.027cm" svg:height="0.027cm" svg:x="15.927cm" svg:y="23.904cm" svg:viewBox="0 0 28 28" draw:points="0,0 28,0 28,28 0,28">
          <text:p/>
        </draw:polygon>
        <draw:polygon draw:style-name="gr269" draw:text-style-name="P267" draw:layer="layout" svg:width="0.027cm" svg:height="0.027cm" svg:x="15.98cm" svg:y="23.904cm" svg:viewBox="0 0 28 28" draw:points="0,0 28,0 28,28 0,28">
          <text:p/>
        </draw:polygon>
        <draw:polygon draw:style-name="gr269" draw:text-style-name="P267" draw:layer="layout" svg:width="0.027cm" svg:height="0.027cm" svg:x="16.033cm" svg:y="23.904cm" svg:viewBox="0 0 28 28" draw:points="0,0 28,0 28,28 0,28">
          <text:p/>
        </draw:polygon>
        <draw:polygon draw:style-name="gr269" draw:text-style-name="P267" draw:layer="layout" svg:width="0.027cm" svg:height="0.027cm" svg:x="16.086cm" svg:y="23.904cm" svg:viewBox="0 0 28 28" draw:points="0,0 28,0 28,28 0,28">
          <text:p/>
        </draw:polygon>
        <draw:polygon draw:style-name="gr269" draw:text-style-name="P267" draw:layer="layout" svg:width="0.027cm" svg:height="0.027cm" svg:x="16.139cm" svg:y="23.904cm" svg:viewBox="0 0 28 28" draw:points="0,0 28,0 28,28 0,28">
          <text:p/>
        </draw:polygon>
        <draw:polygon draw:style-name="gr269" draw:text-style-name="P267" draw:layer="layout" svg:width="0.027cm" svg:height="0.027cm" svg:x="16.192cm" svg:y="23.904cm" svg:viewBox="0 0 28 28" draw:points="0,0 28,0 28,28 0,28">
          <text:p/>
        </draw:polygon>
        <draw:polygon draw:style-name="gr269" draw:text-style-name="P267" draw:layer="layout" svg:width="0.027cm" svg:height="0.027cm" svg:x="16.245cm" svg:y="23.904cm" svg:viewBox="0 0 28 28" draw:points="0,0 28,0 28,28 0,28">
          <text:p/>
        </draw:polygon>
        <draw:polygon draw:style-name="gr269" draw:text-style-name="P267" draw:layer="layout" svg:width="0.027cm" svg:height="0.027cm" svg:x="16.298cm" svg:y="23.904cm" svg:viewBox="0 0 28 28" draw:points="0,0 28,0 28,28 0,28">
          <text:p/>
        </draw:polygon>
        <draw:polygon draw:style-name="gr269" draw:text-style-name="P267" draw:layer="layout" svg:width="0.027cm" svg:height="0.027cm" svg:x="16.351cm" svg:y="23.904cm" svg:viewBox="0 0 28 28" draw:points="0,0 28,0 28,28 0,28">
          <text:p/>
        </draw:polygon>
        <draw:polygon draw:style-name="gr269" draw:text-style-name="P267" draw:layer="layout" svg:width="0.027cm" svg:height="0.027cm" svg:x="16.404cm" svg:y="23.904cm" svg:viewBox="0 0 28 28" draw:points="0,0 28,0 28,28 0,28">
          <text:p/>
        </draw:polygon>
        <draw:polygon draw:style-name="gr269" draw:text-style-name="P267" draw:layer="layout" svg:width="0.027cm" svg:height="0.027cm" svg:x="16.457cm" svg:y="23.904cm" svg:viewBox="0 0 28 28" draw:points="0,0 28,0 28,28 0,28">
          <text:p/>
        </draw:polygon>
        <draw:polygon draw:style-name="gr269" draw:text-style-name="P267" draw:layer="layout" svg:width="0.027cm" svg:height="0.027cm" svg:x="16.51cm" svg:y="23.904cm" svg:viewBox="0 0 28 28" draw:points="0,0 28,0 28,28 0,28">
          <text:p/>
        </draw:polygon>
        <draw:polygon draw:style-name="gr269" draw:text-style-name="P267" draw:layer="layout" svg:width="0.027cm" svg:height="0.027cm" svg:x="16.563cm" svg:y="23.904cm" svg:viewBox="0 0 28 28" draw:points="0,0 28,0 28,28 0,28">
          <text:p/>
        </draw:polygon>
        <draw:polygon draw:style-name="gr269" draw:text-style-name="P267" draw:layer="layout" svg:width="0.027cm" svg:height="0.027cm" svg:x="16.616cm" svg:y="23.904cm" svg:viewBox="0 0 28 28" draw:points="0,0 28,0 28,28 0,28">
          <text:p/>
        </draw:polygon>
        <draw:polygon draw:style-name="gr269" draw:text-style-name="P267" draw:layer="layout" svg:width="0.027cm" svg:height="0.027cm" svg:x="16.669cm" svg:y="23.904cm" svg:viewBox="0 0 28 28" draw:points="0,0 28,0 28,28 0,28">
          <text:p/>
        </draw:polygon>
        <draw:polygon draw:style-name="gr269" draw:text-style-name="P267" draw:layer="layout" svg:width="0.027cm" svg:height="0.027cm" svg:x="16.722cm" svg:y="23.904cm" svg:viewBox="0 0 28 28" draw:points="0,0 28,0 28,28 0,28">
          <text:p/>
        </draw:polygon>
        <draw:polygon draw:style-name="gr269" draw:text-style-name="P267" draw:layer="layout" svg:width="0.027cm" svg:height="0.027cm" svg:x="16.775cm" svg:y="23.904cm" svg:viewBox="0 0 28 28" draw:points="0,0 28,0 28,28 0,28">
          <text:p/>
        </draw:polygon>
        <draw:polygon draw:style-name="gr269" draw:text-style-name="P267" draw:layer="layout" svg:width="0.027cm" svg:height="0.027cm" svg:x="16.828cm" svg:y="23.904cm" svg:viewBox="0 0 28 28" draw:points="0,0 28,0 28,28 0,28">
          <text:p/>
        </draw:polygon>
        <draw:polygon draw:style-name="gr269" draw:text-style-name="P267" draw:layer="layout" svg:width="0.027cm" svg:height="0.027cm" svg:x="16.881cm" svg:y="23.904cm" svg:viewBox="0 0 28 28" draw:points="0,0 28,0 28,28 0,28">
          <text:p/>
        </draw:polygon>
        <draw:polygon draw:style-name="gr269" draw:text-style-name="P267" draw:layer="layout" svg:width="0.027cm" svg:height="0.027cm" svg:x="16.934cm" svg:y="23.904cm" svg:viewBox="0 0 28 28" draw:points="0,0 28,0 28,28 0,28">
          <text:p/>
        </draw:polygon>
        <draw:polygon draw:style-name="gr269" draw:text-style-name="P267" draw:layer="layout" svg:width="0.027cm" svg:height="0.027cm" svg:x="16.987cm" svg:y="23.904cm" svg:viewBox="0 0 28 28" draw:points="0,0 28,0 28,28 0,28">
          <text:p/>
        </draw:polygon>
        <draw:polygon draw:style-name="gr269" draw:text-style-name="P267" draw:layer="layout" svg:width="0.027cm" svg:height="0.027cm" svg:x="17.04cm" svg:y="23.904cm" svg:viewBox="0 0 28 28" draw:points="0,0 28,0 28,28 0,28">
          <text:p/>
        </draw:polygon>
        <draw:polygon draw:style-name="gr269" draw:text-style-name="P267" draw:layer="layout" svg:width="0.027cm" svg:height="0.027cm" svg:x="17.093cm" svg:y="23.904cm" svg:viewBox="0 0 28 28" draw:points="0,0 28,0 28,28 0,28">
          <text:p/>
        </draw:polygon>
        <draw:polygon draw:style-name="gr269" draw:text-style-name="P267" draw:layer="layout" svg:width="0.028cm" svg:height="0.027cm" svg:x="17.146cm" svg:y="23.904cm" svg:viewBox="0 0 29 28" draw:points="0,0 29,0 29,28 0,28">
          <text:p/>
        </draw:polygon>
        <draw:polygon draw:style-name="gr269" draw:text-style-name="P267" draw:layer="layout" svg:width="0.027cm" svg:height="0.027cm" svg:x="17.199cm" svg:y="23.904cm" svg:viewBox="0 0 28 28" draw:points="0,0 28,0 28,28 0,28">
          <text:p/>
        </draw:polygon>
        <draw:polygon draw:style-name="gr269" draw:text-style-name="P267" draw:layer="layout" svg:width="0.027cm" svg:height="0.027cm" svg:x="17.252cm" svg:y="23.904cm" svg:viewBox="0 0 28 28" draw:points="0,0 28,0 28,28 0,28">
          <text:p/>
        </draw:polygon>
        <draw:polygon draw:style-name="gr269" draw:text-style-name="P267" draw:layer="layout" svg:width="0.027cm" svg:height="0.027cm" svg:x="17.305cm" svg:y="23.904cm" svg:viewBox="0 0 28 28" draw:points="0,0 28,0 28,28 0,28">
          <text:p/>
        </draw:polygon>
        <draw:polygon draw:style-name="gr269" draw:text-style-name="P267" draw:layer="layout" svg:width="0.027cm" svg:height="0.027cm" svg:x="17.358cm" svg:y="23.904cm" svg:viewBox="0 0 28 28" draw:points="0,0 28,0 28,28 0,28">
          <text:p/>
        </draw:polygon>
        <draw:polygon draw:style-name="gr269" draw:text-style-name="P267" draw:layer="layout" svg:width="0.027cm" svg:height="0.027cm" svg:x="17.411cm" svg:y="23.904cm" svg:viewBox="0 0 28 28" draw:points="0,0 28,0 28,28 0,28">
          <text:p/>
        </draw:polygon>
        <draw:polygon draw:style-name="gr269" draw:text-style-name="P267" draw:layer="layout" svg:width="0.027cm" svg:height="0.027cm" svg:x="17.464cm" svg:y="23.904cm" svg:viewBox="0 0 28 28" draw:points="0,0 28,0 28,28 0,28">
          <text:p/>
        </draw:polygon>
        <draw:polygon draw:style-name="gr269" draw:text-style-name="P267" draw:layer="layout" svg:width="0.027cm" svg:height="0.027cm" svg:x="17.517cm" svg:y="23.904cm" svg:viewBox="0 0 28 28" draw:points="0,0 28,0 28,28 0,28">
          <text:p/>
        </draw:polygon>
        <draw:polygon draw:style-name="gr269" draw:text-style-name="P267" draw:layer="layout" svg:width="0.027cm" svg:height="0.027cm" svg:x="17.57cm" svg:y="23.904cm" svg:viewBox="0 0 28 28" draw:points="0,0 28,0 28,28 0,28">
          <text:p/>
        </draw:polygon>
        <draw:polygon draw:style-name="gr269" draw:text-style-name="P267" draw:layer="layout" svg:width="0.027cm" svg:height="0.027cm" svg:x="17.623cm" svg:y="23.904cm" svg:viewBox="0 0 28 28" draw:points="0,0 28,0 28,28 0,28">
          <text:p/>
        </draw:polygon>
        <draw:polygon draw:style-name="gr269" draw:text-style-name="P267" draw:layer="layout" svg:width="0.027cm" svg:height="0.027cm" svg:x="17.676cm" svg:y="23.904cm" svg:viewBox="0 0 28 28" draw:points="0,0 28,0 28,28 0,28">
          <text:p/>
        </draw:polygon>
        <draw:polygon draw:style-name="gr269" draw:text-style-name="P267" draw:layer="layout" svg:width="0.027cm" svg:height="0.027cm" svg:x="17.729cm" svg:y="23.904cm" svg:viewBox="0 0 28 28" draw:points="0,0 28,0 28,28 0,28">
          <text:p/>
        </draw:polygon>
        <draw:polygon draw:style-name="gr269" draw:text-style-name="P267" draw:layer="layout" svg:width="0.027cm" svg:height="0.027cm" svg:x="17.782cm" svg:y="23.904cm" svg:viewBox="0 0 28 28" draw:points="0,0 28,0 28,28 0,28">
          <text:p/>
        </draw:polygon>
        <draw:polygon draw:style-name="gr269" draw:text-style-name="P267" draw:layer="layout" svg:width="0.027cm" svg:height="0.027cm" svg:x="17.835cm" svg:y="23.904cm" svg:viewBox="0 0 28 28" draw:points="0,0 28,0 28,28 0,28">
          <text:p/>
        </draw:polygon>
        <draw:polygon draw:style-name="gr269" draw:text-style-name="P267" draw:layer="layout" svg:width="0.027cm" svg:height="0.027cm" svg:x="17.888cm" svg:y="23.904cm" svg:viewBox="0 0 28 28" draw:points="0,0 28,0 28,28 0,28">
          <text:p/>
        </draw:polygon>
        <draw:polygon draw:style-name="gr269" draw:text-style-name="P267" draw:layer="layout" svg:width="0.027cm" svg:height="0.027cm" svg:x="17.941cm" svg:y="23.904cm" svg:viewBox="0 0 28 28" draw:points="0,0 28,0 28,28 0,28">
          <text:p/>
        </draw:polygon>
        <draw:polygon draw:style-name="gr269" draw:text-style-name="P267" draw:layer="layout" svg:width="0.027cm" svg:height="0.027cm" svg:x="17.994cm" svg:y="23.904cm" svg:viewBox="0 0 28 28" draw:points="0,0 28,0 28,28 0,28">
          <text:p/>
        </draw:polygon>
        <draw:polygon draw:style-name="gr269" draw:text-style-name="P267" draw:layer="layout" svg:width="0.027cm" svg:height="0.027cm" svg:x="18.047cm" svg:y="23.904cm" svg:viewBox="0 0 28 28" draw:points="0,0 28,0 28,28 0,28">
          <text:p/>
        </draw:polygon>
        <draw:polygon draw:style-name="gr269" draw:text-style-name="P267" draw:layer="layout" svg:width="0.027cm" svg:height="0.027cm" svg:x="18.1cm" svg:y="23.904cm" svg:viewBox="0 0 28 28" draw:points="0,0 28,0 28,28 0,28">
          <text:p/>
        </draw:polygon>
        <draw:polygon draw:style-name="gr269" draw:text-style-name="P267" draw:layer="layout" svg:width="0.027cm" svg:height="0.027cm" svg:x="18.153cm" svg:y="23.904cm" svg:viewBox="0 0 28 28" draw:points="0,0 28,0 28,28 0,28">
          <text:p/>
        </draw:polygon>
        <draw:polygon draw:style-name="gr269" draw:text-style-name="P267" draw:layer="layout" svg:width="0.027cm" svg:height="0.027cm" svg:x="18.206cm" svg:y="23.904cm" svg:viewBox="0 0 28 28" draw:points="0,0 28,0 28,28 0,28">
          <text:p/>
        </draw:polygon>
        <draw:polygon draw:style-name="gr269" draw:text-style-name="P267" draw:layer="layout" svg:width="0.027cm" svg:height="0.027cm" svg:x="18.259cm" svg:y="23.904cm" svg:viewBox="0 0 28 28" draw:points="0,0 28,0 28,28 0,28">
          <text:p/>
        </draw:polygon>
        <draw:polygon draw:style-name="gr269" draw:text-style-name="P267" draw:layer="layout" svg:width="0.027cm" svg:height="0.027cm" svg:x="18.312cm" svg:y="23.904cm" svg:viewBox="0 0 28 28" draw:points="0,0 28,0 28,28 0,28">
          <text:p/>
        </draw:polygon>
        <draw:polygon draw:style-name="gr269" draw:text-style-name="P267" draw:layer="layout" svg:width="0.027cm" svg:height="0.027cm" svg:x="18.365cm" svg:y="23.904cm" svg:viewBox="0 0 28 28" draw:points="0,0 28,0 28,28 0,28">
          <text:p/>
        </draw:polygon>
        <draw:polygon draw:style-name="gr269" draw:text-style-name="P267" draw:layer="layout" svg:width="0.027cm" svg:height="0.027cm" svg:x="18.418cm" svg:y="23.904cm" svg:viewBox="0 0 28 28" draw:points="0,0 28,0 28,28 0,28">
          <text:p/>
        </draw:polygon>
        <draw:polygon draw:style-name="gr269" draw:text-style-name="P267" draw:layer="layout" svg:width="0.027cm" svg:height="0.027cm" svg:x="18.471cm" svg:y="23.904cm" svg:viewBox="0 0 28 28" draw:points="0,0 28,0 28,28 0,28">
          <text:p/>
        </draw:polygon>
        <draw:polygon draw:style-name="gr269" draw:text-style-name="P267" draw:layer="layout" svg:width="0.028cm" svg:height="0.027cm" svg:x="18.524cm" svg:y="23.904cm" svg:viewBox="0 0 29 28" draw:points="0,0 29,0 29,28 0,28">
          <text:p/>
        </draw:polygon>
        <draw:polygon draw:style-name="gr269" draw:text-style-name="P267" draw:layer="layout" svg:width="0.027cm" svg:height="0.027cm" svg:x="18.577cm" svg:y="23.904cm" svg:viewBox="0 0 28 28" draw:points="0,0 28,0 28,28 0,28">
          <text:p/>
        </draw:polygon>
        <draw:polygon draw:style-name="gr269" draw:text-style-name="P267" draw:layer="layout" svg:width="0.027cm" svg:height="0.027cm" svg:x="18.63cm" svg:y="23.904cm" svg:viewBox="0 0 28 28" draw:points="0,0 28,0 28,28 0,28">
          <text:p/>
        </draw:polygon>
        <draw:polygon draw:style-name="gr269" draw:text-style-name="P267" draw:layer="layout" svg:width="0.027cm" svg:height="0.027cm" svg:x="18.683cm" svg:y="23.904cm" svg:viewBox="0 0 28 28" draw:points="0,0 28,0 28,28 0,28">
          <text:p/>
        </draw:polygon>
        <draw:polygon draw:style-name="gr269" draw:text-style-name="P267" draw:layer="layout" svg:width="0.027cm" svg:height="0.027cm" svg:x="18.736cm" svg:y="23.904cm" svg:viewBox="0 0 28 28" draw:points="0,0 28,0 28,28 0,28">
          <text:p/>
        </draw:polygon>
        <draw:polygon draw:style-name="gr269" draw:text-style-name="P267" draw:layer="layout" svg:width="0.027cm" svg:height="0.027cm" svg:x="18.789cm" svg:y="23.904cm" svg:viewBox="0 0 28 28" draw:points="0,0 28,0 28,28 0,28">
          <text:p/>
        </draw:polygon>
        <draw:polygon draw:style-name="gr269" draw:text-style-name="P267" draw:layer="layout" svg:width="0.027cm" svg:height="0.027cm" svg:x="18.842cm" svg:y="23.904cm" svg:viewBox="0 0 28 28" draw:points="0,0 28,0 28,28 0,28">
          <text:p/>
        </draw:polygon>
        <draw:polygon draw:style-name="gr269" draw:text-style-name="P267" draw:layer="layout" svg:width="0.027cm" svg:height="0.027cm" svg:x="18.895cm" svg:y="23.904cm" svg:viewBox="0 0 28 28" draw:points="0,0 28,0 28,28 0,28">
          <text:p/>
        </draw:polygon>
        <draw:polygon draw:style-name="gr269" draw:text-style-name="P267" draw:layer="layout" svg:width="0.027cm" svg:height="0.027cm" svg:x="18.948cm" svg:y="23.904cm" svg:viewBox="0 0 28 28" draw:points="0,0 28,0 28,28 0,28">
          <text:p/>
        </draw:polygon>
        <draw:polygon draw:style-name="gr269" draw:text-style-name="P267" draw:layer="layout" svg:width="0.027cm" svg:height="0.027cm" svg:x="19.001cm" svg:y="23.904cm" svg:viewBox="0 0 28 28" draw:points="0,0 28,0 28,28 0,28">
          <text:p/>
        </draw:polygon>
        <draw:frame draw:style-name="gr270" draw:text-style-name="P268" draw:layer="layout" svg:width="5.842cm" svg:height="0.966cm" svg:x="2.003cm" svg:y="2.292cm">
          <draw:text-box>
            <text:p text:style-name="P261"><text:span text:style-name="T6">Table of Contents</text:span></text:p>
          </draw:text-box>
        </draw:frame>
        <draw:frame draw:style-name="gr271" draw:text-style-name="P269" draw:layer="layout" svg:width="4.85cm" svg:height="0.53cm" svg:x="2.003cm" svg:y="4.408cm">
          <draw:text-box>
            <text:p text:style-name="P261"><text:span text:style-name="T7">1. Introduction to JS Recon</text:span></text:p>
          </draw:text-box>
        </draw:frame>
        <draw:frame draw:style-name="gr271" draw:text-style-name="P269" draw:layer="layout" svg:width="5.269cm" svg:height="0.53cm" svg:x="2.003cm" svg:y="5.389cm">
          <draw:text-box>
            <text:p text:style-name="P261"><text:span text:style-name="T7">2. Manual JavaScript Analysis</text:span></text:p>
          </draw:text-box>
        </draw:frame>
        <draw:frame draw:style-name="gr271" draw:text-style-name="P269" draw:layer="layout" svg:width="4.812cm" svg:height="0.53cm" svg:x="2.003cm" svg:y="6.396cm">
          <draw:text-box>
            <text:p text:style-name="P261"><text:span text:style-name="T7">2.1 Finding JavaScript Files</text:span></text:p>
          </draw:text-box>
        </draw:frame>
        <draw:frame draw:style-name="gr271" draw:text-style-name="P269" draw:layer="layout" svg:width="5.851cm" svg:height="0.53cm" svg:x="2.003cm" svg:y="7.376cm">
          <draw:text-box>
            <text:p text:style-name="P261"><text:span text:style-name="T7">2.2 Extracting Endpoints &amp; URLs</text:span></text:p>
          </draw:text-box>
        </draw:frame>
        <draw:frame draw:style-name="gr271" draw:text-style-name="P269" draw:layer="layout" svg:width="5.267cm" svg:height="0.53cm" svg:x="2.003cm" svg:y="8.357cm">
          <draw:text-box>
            <text:p text:style-name="P261"><text:span text:style-name="T7">2.3 Extracting Secrets &amp; Keys</text:span></text:p>
          </draw:text-box>
        </draw:frame>
        <draw:frame draw:style-name="gr271" draw:text-style-name="P269" draw:layer="layout" svg:width="4.405cm" svg:height="0.53cm" svg:x="2.003cm" svg:y="9.337cm">
          <draw:text-box>
            <text:p text:style-name="P261"><text:span text:style-name="T7">2.4 Source Map Analysis</text:span></text:p>
          </draw:text-box>
        </draw:frame>
        <draw:frame draw:style-name="gr271" draw:text-style-name="P269" draw:layer="layout" svg:width="5.481cm" svg:height="0.53cm" svg:x="2.003cm" svg:y="10.318cm">
          <draw:text-box>
            <text:p text:style-name="P261"><text:span text:style-name="T7">3. Regex Patterns for JS Recon</text:span></text:p>
          </draw:text-box>
        </draw:frame>
        <draw:frame draw:style-name="gr271" draw:text-style-name="P269" draw:layer="layout" svg:width="3.675cm" svg:height="0.53cm" svg:x="2.003cm" svg:y="11.325cm">
          <draw:text-box>
            <text:p text:style-name="P261"><text:span text:style-name="T7">3.1 API Key Patterns</text:span></text:p>
          </draw:text-box>
        </draw:frame>
        <draw:frame draw:style-name="gr271" draw:text-style-name="P269" draw:layer="layout" svg:width="5.047cm" svg:height="0.53cm" svg:x="2.003cm" svg:y="12.306cm">
          <draw:text-box>
            <text:p text:style-name="P261"><text:span text:style-name="T7">3.2 Token &amp; Secret Patterns</text:span></text:p>
          </draw:text-box>
        </draw:frame>
        <draw:frame draw:style-name="gr271" draw:text-style-name="P269" draw:layer="layout" svg:width="5.17cm" svg:height="0.53cm" svg:x="2.003cm" svg:y="13.286cm">
          <draw:text-box>
            <text:p text:style-name="P261"><text:span text:style-name="T7">3.3 Endpoint &amp; URL Patterns</text:span></text:p>
          </draw:text-box>
        </draw:frame>
        <draw:frame draw:style-name="gr271" draw:text-style-name="P269" draw:layer="layout" svg:width="5.085cm" svg:height="0.53cm" svg:x="2.003cm" svg:y="14.267cm">
          <draw:text-box>
            <text:p text:style-name="P261"><text:span text:style-name="T7">4. Essential Tools Deep Dive</text:span></text:p>
          </draw:text-box>
        </draw:frame>
        <draw:frame draw:style-name="gr271" draw:text-style-name="P269" draw:layer="layout" svg:width="2.57cm" svg:height="0.53cm" svg:x="2.003cm" svg:y="15.247cm">
          <draw:text-box>
            <text:p text:style-name="P261"><text:span text:style-name="T7">4.1 LinkFinder</text:span></text:p>
          </draw:text-box>
        </draw:frame>
        <draw:frame draw:style-name="gr271" draw:text-style-name="P269" draw:layer="layout" svg:width="2.958cm" svg:height="0.53cm" svg:x="2.003cm" svg:y="16.254cm">
          <draw:text-box>
            <text:p text:style-name="P261"><text:span text:style-name="T7">4.2 SecretFinder</text:span></text:p>
          </draw:text-box>
        </draw:frame>
        <draw:frame draw:style-name="gr271" draw:text-style-name="P269" draw:layer="layout" svg:width="3.114cm" svg:height="0.53cm" svg:x="2.003cm" svg:y="17.235cm">
          <draw:text-box>
            <text:p text:style-name="P261"><text:span text:style-name="T7">4.3 JSMon / GetJS</text:span></text:p>
          </draw:text-box>
        </draw:frame>
        <draw:frame draw:style-name="gr271" draw:text-style-name="P269" draw:layer="layout" svg:width="4.084cm" svg:height="0.53cm" svg:x="2.003cm" svg:y="18.216cm">
          <draw:text-box>
            <text:p text:style-name="P261"><text:span text:style-name="T7">4.4 Katana &amp; Gospider</text:span></text:p>
          </draw:text-box>
        </draw:frame>
        <draw:frame draw:style-name="gr271" draw:text-style-name="P269" draw:layer="layout" svg:width="4.979cm" svg:height="0.53cm" svg:x="2.003cm" svg:y="19.196cm">
          <draw:text-box>
            <text:p text:style-name="P261"><text:span text:style-name="T7">4.5 Nuclei (Exposed Panels)</text:span></text:p>
          </draw:text-box>
        </draw:frame>
        <draw:frame draw:style-name="gr271" draw:text-style-name="P269" draw:layer="layout" svg:width="4.727cm" svg:height="0.53cm" svg:x="2.003cm" svg:y="20.177cm">
          <draw:text-box>
            <text:p text:style-name="P261"><text:span text:style-name="T7">5. Automation &amp; Pipelines</text:span></text:p>
          </draw:text-box>
        </draw:frame>
        <draw:frame draw:style-name="gr271" draw:text-style-name="P269" draw:layer="layout" svg:width="4.415cm" svg:height="0.53cm" svg:x="2.003cm" svg:y="21.184cm">
          <draw:text-box>
            <text:p text:style-name="P261"><text:span text:style-name="T7">6. Advanced Techniques</text:span></text:p>
          </draw:text-box>
        </draw:frame>
        <draw:frame draw:style-name="gr271" draw:text-style-name="P269" draw:layer="layout" svg:width="4.419cm" svg:height="0.53cm" svg:x="2.003cm" svg:y="22.164cm">
          <draw:text-box>
            <text:p text:style-name="P261"><text:span text:style-name="T7">7. Tips, Tricks &amp; Gotchas</text:span></text:p>
          </draw:text-box>
        </draw:frame>
        <draw:frame draw:style-name="gr271" draw:text-style-name="P269" draw:layer="layout" svg:width="4.438cm" svg:height="0.53cm" svg:x="2.003cm" svg:y="23.145cm">
          <draw:text-box>
            <text:p text:style-name="P261"><text:span text:style-name="T7">8. Best Practices &amp; Legal</text:span></text:p>
          </draw:text-box>
        </draw:frame>
      </draw:page>
      <draw:page draw:name="page3" draw:style-name="dp1" draw:master-page-name="master-page569">
        <draw:frame draw:style-name="gr268" draw:text-style-name="P270" draw:layer="layout" svg:width="4.06cm" svg:height="0.446cm" svg:x="2.088cm" svg:y="0.879cm">
          <draw:text-box>
            <text:p text:style-name="P261"><text:span text:style-name="T8">1. Introduction to JS Recon</text:span></text:p>
          </draw:text-box>
        </draw:frame>
        <draw:path draw:style-name="gr272" draw:text-style-name="P271" draw:layer="layout" svg:width="16.961cm" svg:height="5.115cm" svg:x="2.067cm" svg:y="9.434cm" svg:viewBox="0 0 16962 5116" svg:d="M0 4957v-4798c0-21 2-41 8-61 5-19 13-36 23-51s21-27 34-35 27-12 41-12h16697c10 0 21 1 31 3s20 5 30 9c9 4 19 9 27 15 9 6 17 12 24 20 8 7 14 15 20 24s11 18 15 27c4 10 7 20 9 30s3 21 3 31v4798c0 11-1 21-3 31s-5 20-9 30-9 19-15 27c-6 9-12 17-20 25-7 7-15 14-24 19-8 6-18 11-27 15-10 4-20 7-30 9s-21 3-31 3h-16697c-14 0-28-4-41-12s-24-20-34-34c-10-15-18-33-23-52-6-20-8-40-8-61z">
          <text:p/>
        </draw:path>
        <draw:polygon draw:style-name="gr273" draw:text-style-name="P272" draw:layer="layout" svg:width="0.159cm" svg:height="5.115cm" svg:x="2.014cm" svg:y="9.434cm" svg:viewBox="0 0 160 5116" draw:points="0,0 160,0 160,5116 0,5116">
          <text:p/>
        </draw:polygon>
        <draw:path draw:style-name="gr274" draw:text-style-name="P273" draw:layer="layout" svg:width="16.961cm" svg:height="3.949cm" svg:x="2.067cm" svg:y="14.92cm" svg:viewBox="0 0 16962 3950" svg:d="M0 3791v-3632c0-21 2-41 8-61 5-19 13-36 23-51s21-27 34-35 27-12 41-12h16697c10 0 21 1 31 3s20 5 30 9c9 4 19 9 27 15 9 6 17 12 24 20 8 7 14 15 20 24s11 18 15 27c4 10 7 20 9 30s3 21 3 31v3632c0 10-1 21-3 31s-5 20-9 30c-4 9-9 19-15 27-6 9-12 17-20 24-7 8-15 14-24 20-8 6-18 11-27 15-10 4-20 7-30 9s-21 3-31 3h-16697c-14 0-28-4-41-12s-24-20-34-35-18-32-23-51c-6-20-8-40-8-61z">
          <text:p/>
        </draw:path>
        <draw:polygon draw:style-name="gr275" draw:text-style-name="P274" draw:layer="layout" svg:width="0.159cm" svg:height="3.949cm" svg:x="2.014cm" svg:y="14.92cm" svg:viewBox="0 0 160 3950" draw:points="0,0 160,0 160,3950 0,3950">
          <text:p/>
        </draw:polygon>
        <draw:polygon draw:style-name="gr276" draw:text-style-name="P275" draw:layer="layout" svg:width="17.014cm" svg:height="0.053cm" svg:x="2.014cm" svg:y="24.09cm" svg:viewBox="0 0 17015 54" draw:points="0,0 17015,0 17015,54 0,54">
          <text:p/>
        </draw:polygon>
        <draw:frame draw:style-name="gr268" draw:text-style-name="P266" draw:layer="layout" svg:width="0.317cm" svg:height="0.433cm" svg:x="2.003cm" svg:y="28.256cm">
          <draw:text-box>
            <text:p text:style-name="P261"><text:span text:style-name="T9">3</text:span></text:p>
          </draw:text-box>
        </draw:frame>
        <draw:frame draw:style-name="gr277" draw:text-style-name="P276" draw:layer="layout" svg:width="9.698cm" svg:height="1.064cm" svg:x="2.003cm" svg:y="2.27cm">
          <draw:text-box>
            <text:p text:style-name="P261"><text:span text:style-name="T10">1. Introduction to JS Recon</text:span></text:p>
          </draw:text-box>
        </draw:frame>
        <draw:frame draw:style-name="gr278" draw:text-style-name="P277" draw:layer="layout" svg:width="17.089cm" svg:height="0.501cm" svg:x="2.003cm" svg:y="4.003cm">
          <draw:text-box>
            <text:p text:style-name="P261"><text:span text:style-name="T11">Modern <text:s/>web <text:s/>applications <text:s/>ship <text:s/>massive <text:s/>amounts <text:s/>of <text:s/>JavaScript <text:s/>to <text:s/>the <text:s/>browser. <text:s/>This <text:s/>client-side</text:span></text:p>
          </draw:text-box>
        </draw:frame>
        <draw:frame draw:style-name="gr278" draw:text-style-name="P277" draw:layer="layout" svg:width="17.194cm" svg:height="0.501cm" svg:x="2.003cm" svg:y="4.612cm">
          <draw:text-box>
            <text:p text:style-name="P261"><text:span text:style-name="T11">code <text:s/>often <text:s/>contains <text:s/>hidden <text:s/>API <text:s/>endpoints, <text:s/>hardcoded <text:s/>credentials, <text:s/>internal <text:s/>URLs, <text:s/>debug <text:s/>flags,</text:span></text:p>
          </draw:text-box>
        </draw:frame>
        <draw:frame draw:style-name="gr278" draw:text-style-name="P277" draw:layer="layout" svg:width="17.329cm" svg:height="0.501cm" svg:x="2.003cm" svg:y="5.222cm">
          <draw:text-box>
            <text:p text:style-name="P261"><text:span text:style-name="T11">and <text:s/>technology <text:s/>fingerprints <text:s/>that <text:s/>are <text:s/>invisible <text:s/>to <text:s/>traditional <text:s/>scanners. <text:s/>For <text:s/>bug <text:s/>bounty <text:s/>hunters,</text:span></text:p>
          </draw:text-box>
        </draw:frame>
        <draw:frame draw:style-name="gr278" draw:text-style-name="P277" draw:layer="layout" svg:width="12.79cm" svg:height="0.501cm" svg:x="2.003cm" svg:y="5.831cm">
          <draw:text-box>
            <text:p text:style-name="P261"><text:span text:style-name="T11">analyzing JavaScript is one of the highest-ROI reconnaissance techniques. </text:span></text:p>
          </draw:text-box>
        </draw:frame>
        <draw:frame draw:style-name="gr278" draw:text-style-name="P277" draw:layer="layout" svg:width="0.461cm" svg:height="0.433cm" svg:x="15.095cm" svg:y="5.884cm">
          <draw:text-box>
            <text:p text:style-name="P261"><text:span text:style-name="T12">🔍</text:span></text:p>
          </draw:text-box>
        </draw:frame>
        <draw:frame draw:style-name="gr278" draw:text-style-name="P277" draw:layer="layout" svg:width="17.234cm" svg:height="0.501cm" svg:x="2.003cm" svg:y="6.679cm">
          <draw:text-box>
            <text:p text:style-name="P261"><text:span text:style-name="T11">When <text:s/>developers <text:s/>build <text:s/>single-page <text:s/>applications <text:s/>(SPAs) <text:s/>with <text:s/>React, <text:s/>Angular, <text:s/>or <text:s/>Vue, <text:s/>the <text:s/>entire</text:span></text:p>
          </draw:text-box>
        </draw:frame>
        <draw:frame draw:style-name="gr278" draw:text-style-name="P277" draw:layer="layout" svg:width="16.42cm" svg:height="0.501cm" svg:x="2.003cm" svg:y="7.289cm">
          <draw:text-box>
            <text:p text:style-name="P261"><text:span text:style-name="T11">frontend logic lives in JS files. These files communicate with backend APIs, and the code reveals</text:span></text:p>
          </draw:text-box>
        </draw:frame>
        <draw:frame draw:style-name="gr278" draw:text-style-name="P277" draw:layer="layout" svg:width="16.603cm" svg:height="0.501cm" svg:x="2.003cm" svg:y="7.899cm">
          <draw:text-box>
            <text:p text:style-name="P261"><text:span text:style-name="T11">exactly which endpoints exist, what parameters they accept, and sometimes how authentication</text:span></text:p>
          </draw:text-box>
        </draw:frame>
        <draw:frame draw:style-name="gr278" draw:text-style-name="P277" draw:layer="layout" svg:width="11.046cm" svg:height="0.501cm" svg:x="2.003cm" svg:y="8.508cm">
          <draw:text-box>
            <text:p text:style-name="P261"><text:span text:style-name="T11">works. A single JS file can unlock dozens of new attack surfaces. </text:span></text:p>
          </draw:text-box>
        </draw:frame>
        <draw:frame draw:style-name="gr278" draw:text-style-name="P277" draw:layer="layout" svg:width="0.461cm" svg:height="0.433cm" svg:x="13.452cm" svg:y="8.56cm">
          <draw:text-box>
            <text:p text:style-name="P261"><text:span text:style-name="T12">🔓</text:span></text:p>
          </draw:text-box>
        </draw:frame>
        <draw:frame draw:style-name="gr278" draw:text-style-name="P277" draw:layer="layout" svg:width="5.141cm" svg:height="0.501cm" svg:x="2.533cm" svg:y="9.86cm">
          <draw:text-box>
            <text:p text:style-name="P261"><text:span text:style-name="T13">Why JavaScript Recon Matters</text:span></text:p>
          </draw:text-box>
        </draw:frame>
        <draw:frame draw:style-name="gr264" draw:text-style-name="P262" draw:layer="layout" svg:width="15.571cm" svg:height="0.48cm" svg:x="2.533cm" svg:y="10.594cm">
          <draw:text-box>
            <text:p text:style-name="P261"><text:span text:style-name="T14">Hidden Endpoints:</text:span><text:span text:style-name="T15"> JS files reference internal API paths not listed in documentation. </text:span><text:span text:style-name="T14">Hardcoded</text:span></text:p>
          </draw:text-box>
        </draw:frame>
        <draw:frame draw:style-name="gr264" draw:text-style-name="P262" draw:layer="layout" svg:width="1.385cm" svg:height="0.48cm" svg:x="2.533cm" svg:y="11.177cm">
          <draw:text-box>
            <text:p text:style-name="P261"><text:span text:style-name="T14">Secrets:</text:span><text:span text:style-name="T15"> </text:span></text:p>
          </draw:text-box>
        </draw:frame>
        <draw:frame draw:style-name="gr264" draw:text-style-name="P262" draw:layer="layout" svg:width="0.65cm" svg:height="0.48cm" svg:x="4.201cm" svg:y="11.177cm">
          <draw:text-box>
            <text:p text:style-name="P261"><text:span text:style-name="T15">API </text:span></text:p>
          </draw:text-box>
        </draw:frame>
        <draw:frame draw:style-name="gr264" draw:text-style-name="P262" draw:layer="layout" svg:width="0.921cm" svg:height="0.48cm" svg:x="5.022cm" svg:y="11.177cm">
          <draw:text-box>
            <text:p text:style-name="P261"><text:span text:style-name="T15">keys, </text:span></text:p>
          </draw:text-box>
        </draw:frame>
        <draw:frame draw:style-name="gr264" draw:text-style-name="P262" draw:layer="layout" svg:width="1.298cm" svg:height="0.48cm" svg:x="6.134cm" svg:y="11.177cm">
          <draw:text-box>
            <text:p text:style-name="P261"><text:span text:style-name="T15">tokens, </text:span></text:p>
          </draw:text-box>
        </draw:frame>
        <draw:frame draw:style-name="gr264" draw:text-style-name="P262" draw:layer="layout" svg:width="0.724cm" svg:height="0.48cm" svg:x="7.59cm" svg:y="11.177cm">
          <draw:text-box>
            <text:p text:style-name="P261"><text:span text:style-name="T15">and </text:span></text:p>
          </draw:text-box>
        </draw:frame>
        <draw:frame draw:style-name="gr264" draw:text-style-name="P262" draw:layer="layout" svg:width="1.861cm" svg:height="0.48cm" svg:x="8.437cm" svg:y="11.177cm">
          <draw:text-box>
            <text:p text:style-name="P261"><text:span text:style-name="T15">passwords </text:span></text:p>
          </draw:text-box>
        </draw:frame>
        <draw:frame draw:style-name="gr264" draw:text-style-name="P262" draw:layer="layout" svg:width="1.881cm" svg:height="0.48cm" svg:x="10.477cm" svg:y="11.177cm">
          <draw:text-box>
            <text:p text:style-name="P261"><text:span text:style-name="T15">embedded </text:span></text:p>
          </draw:text-box>
        </draw:frame>
        <draw:frame draw:style-name="gr264" draw:text-style-name="P262" draw:layer="layout" svg:width="0.401cm" svg:height="0.48cm" svg:x="12.516cm" svg:y="11.177cm">
          <draw:text-box>
            <text:p text:style-name="P261"><text:span text:style-name="T15">in </text:span></text:p>
          </draw:text-box>
        </draw:frame>
        <draw:frame draw:style-name="gr264" draw:text-style-name="P262" draw:layer="layout" svg:width="1.772cm" svg:height="0.48cm" svg:x="13.045cm" svg:y="11.177cm">
          <draw:text-box>
            <text:p text:style-name="P261"><text:span text:style-name="T15">client-side </text:span></text:p>
          </draw:text-box>
        </draw:frame>
        <draw:frame draw:style-name="gr264" draw:text-style-name="P262" draw:layer="layout" svg:width="0.983cm" svg:height="0.48cm" svg:x="15.032cm" svg:y="11.177cm">
          <draw:text-box>
            <text:p text:style-name="P261"><text:span text:style-name="T15">code. </text:span></text:p>
          </draw:text-box>
        </draw:frame>
        <draw:frame draw:style-name="gr264" draw:text-style-name="P262" draw:layer="layout" svg:width="1.197cm" svg:height="0.48cm" svg:x="16.223cm" svg:y="11.177cm">
          <draw:text-box>
            <text:p text:style-name="P261"><text:span text:style-name="T14">Debug </text:span></text:p>
          </draw:text-box>
        </draw:frame>
        <draw:frame draw:style-name="gr264" draw:text-style-name="P262" draw:layer="layout" svg:width="1.042cm" svg:height="0.48cm" svg:x="17.547cm" svg:y="11.177cm">
          <draw:text-box>
            <text:p text:style-name="P261"><text:span text:style-name="T14">Mode:</text:span></text:p>
          </draw:text-box>
        </draw:frame>
        <draw:frame draw:style-name="gr264" draw:text-style-name="P262" draw:layer="layout" svg:width="2.315cm" svg:height="0.48cm" svg:x="2.533cm" svg:y="11.76cm">
          <draw:text-box>
            <text:p text:style-name="P261"><text:span text:style-name="T15">Development </text:span></text:p>
          </draw:text-box>
        </draw:frame>
        <draw:frame draw:style-name="gr264" draw:text-style-name="P262" draw:layer="layout" svg:width="0.886cm" svg:height="0.48cm" svg:x="5.002cm" svg:y="11.76cm">
          <draw:text-box>
            <text:p text:style-name="P261"><text:span text:style-name="T15">flags </text:span></text:p>
          </draw:text-box>
        </draw:frame>
        <draw:frame draw:style-name="gr264" draw:text-style-name="P262" draw:layer="layout" svg:width="0.724cm" svg:height="0.48cm" svg:x="6.039cm" svg:y="11.76cm">
          <draw:text-box>
            <text:p text:style-name="P261"><text:span text:style-name="T15">and </text:span></text:p>
          </draw:text-box>
        </draw:frame>
        <draw:frame draw:style-name="gr264" draw:text-style-name="P262" draw:layer="layout" svg:width="1.353cm" svg:height="0.48cm" svg:x="6.891cm" svg:y="11.76cm">
          <draw:text-box>
            <text:p text:style-name="P261"><text:span text:style-name="T15">logging </text:span></text:p>
          </draw:text-box>
        </draw:frame>
        <draw:frame draw:style-name="gr264" draw:text-style-name="P262" draw:layer="layout" svg:width="1.756cm" svg:height="0.48cm" svg:x="8.353cm" svg:y="11.76cm">
          <draw:text-box>
            <text:p text:style-name="P261"><text:span text:style-name="T15">endpoints </text:span></text:p>
          </draw:text-box>
        </draw:frame>
        <draw:frame draw:style-name="gr264" draw:text-style-name="P262" draw:layer="layout" svg:width="0.63cm" svg:height="0.48cm" svg:x="10.239cm" svg:y="11.76cm">
          <draw:text-box>
            <text:p text:style-name="P261"><text:span text:style-name="T15">left </text:span></text:p>
          </draw:text-box>
        </draw:frame>
        <draw:frame draw:style-name="gr264" draw:text-style-name="P262" draw:layer="layout" svg:width="1.427cm" svg:height="0.48cm" svg:x="11.011cm" svg:y="11.76cm">
          <draw:text-box>
            <text:p text:style-name="P261"><text:span text:style-name="T15">enabled </text:span></text:p>
          </draw:text-box>
        </draw:frame>
        <draw:frame draw:style-name="gr264" draw:text-style-name="P262" draw:layer="layout" svg:width="0.401cm" svg:height="0.48cm" svg:x="12.579cm" svg:y="11.76cm">
          <draw:text-box>
            <text:p text:style-name="P261"><text:span text:style-name="T15">in </text:span></text:p>
          </draw:text-box>
        </draw:frame>
        <draw:frame draw:style-name="gr264" draw:text-style-name="P262" draw:layer="layout" svg:width="2.01cm" svg:height="0.48cm" svg:x="13.113cm" svg:y="11.76cm">
          <draw:text-box>
            <text:p text:style-name="P261"><text:span text:style-name="T15">production. </text:span></text:p>
          </draw:text-box>
        </draw:frame>
        <draw:frame draw:style-name="gr264" draw:text-style-name="P262" draw:layer="layout" svg:width="2.001cm" svg:height="0.48cm" svg:x="15.264cm" svg:y="11.76cm">
          <draw:text-box>
            <text:p text:style-name="P261"><text:span text:style-name="T14">Technology </text:span></text:p>
          </draw:text-box>
        </draw:frame>
        <draw:frame draw:style-name="gr264" draw:text-style-name="P262" draw:layer="layout" svg:width="0.969cm" svg:height="0.48cm" svg:x="17.494cm" svg:y="11.76cm">
          <draw:text-box>
            <text:p text:style-name="P261"><text:span text:style-name="T14">Stack:</text:span></text:p>
          </draw:text-box>
        </draw:frame>
        <draw:frame draw:style-name="gr264" draw:text-style-name="P262" draw:layer="layout" svg:width="16.25cm" svg:height="0.48cm" svg:x="2.533cm" svg:y="12.343cm">
          <draw:text-box>
            <text:p text:style-name="P261"><text:span text:style-name="T15">Framework <text:s/>versions, <text:s/>libraries, <text:s/>and <text:s/>build <text:s/>tools <text:s/>with <text:s/>known <text:s/>CVEs. </text:span><text:span text:style-name="T14"><text:s/>Source Maps:</text:span><text:span text:style-name="T15"> <text:s/>Map <text:s/>files <text:s/>that</text:span></text:p>
          </draw:text-box>
        </draw:frame>
        <draw:frame draw:style-name="gr264" draw:text-style-name="P262" draw:layer="layout" svg:width="15.055cm" svg:height="0.48cm" svg:x="2.533cm" svg:y="12.926cm">
          <draw:text-box>
            <text:p text:style-name="P261"><text:span text:style-name="T15">reconstruct original source code from minified JS. </text:span><text:span text:style-name="T14">Third-Party Services:</text:span><text:span text:style-name="T15"> Integration URLs for</text:span></text:p>
          </draw:text-box>
        </draw:frame>
        <draw:frame draw:style-name="gr264" draw:text-style-name="P262" draw:layer="layout" svg:width="8.386cm" svg:height="0.48cm" svg:x="2.533cm" svg:y="13.509cm">
          <draw:text-box>
            <text:p text:style-name="P261"><text:span text:style-name="T15">analytics, payment, messaging, and cloud services.</text:span></text:p>
          </draw:text-box>
        </draw:frame>
        <draw:frame draw:style-name="gr278" draw:text-style-name="P277" draw:layer="layout" svg:width="4.086cm" svg:height="0.501cm" svg:x="2.533cm" svg:y="15.346cm">
          <draw:text-box>
            <text:p text:style-name="P261"><text:span text:style-name="T16">Scope &amp; Ethics Warning</text:span></text:p>
          </draw:text-box>
        </draw:frame>
        <draw:frame draw:style-name="gr264" draw:text-style-name="P262" draw:layer="layout" svg:width="16.483cm" svg:height="0.48cm" svg:x="2.533cm" svg:y="16.08cm">
          <draw:text-box>
            <text:p text:style-name="P261"><text:span text:style-name="T15">JavaScript <text:s/>files <text:s/>are <text:s/>downloaded <text:s/>to <text:s/>your <text:s/>browser <text:s/>when <text:s/>you <text:s/>visit <text:s/>a <text:s/>page <text:s/>— <text:s/>this <text:s/>is <text:s/>normal <text:s/>and</text:span></text:p>
          </draw:text-box>
        </draw:frame>
        <draw:frame draw:style-name="gr264" draw:text-style-name="P262" draw:layer="layout" svg:width="15.124cm" svg:height="0.48cm" svg:x="2.533cm" svg:y="16.663cm">
          <draw:text-box>
            <text:p text:style-name="P261"><text:span text:style-name="T15">expected. </text:span><text:span text:style-name="T14"><text:s/>Downloading <text:s/>and <text:s/>analyzing <text:s/>JS <text:s/>files <text:s/>from <text:s/>a <text:s/>target <text:s/>is <text:s/>passive <text:s/>reconnaissance.</text:span></text:p>
          </draw:text-box>
        </draw:frame>
        <draw:frame draw:style-name="gr264" draw:text-style-name="P262" draw:layer="layout" svg:width="1.657cm" svg:height="0.48cm" svg:x="2.533cm" svg:y="17.246cm">
          <draw:text-box>
            <text:p text:style-name="P261"><text:span text:style-name="T15">However, </text:span></text:p>
          </draw:text-box>
        </draw:frame>
        <draw:frame draw:style-name="gr264" draw:text-style-name="P262" draw:layer="layout" svg:width="1.003cm" svg:height="0.48cm" svg:x="4.385cm" svg:y="17.246cm">
          <draw:text-box>
            <text:p text:style-name="P261"><text:span text:style-name="T15">using </text:span></text:p>
          </draw:text-box>
        </draw:frame>
        <draw:frame draw:style-name="gr264" draw:text-style-name="P262" draw:layer="layout" svg:width="1.886cm" svg:height="0.48cm" svg:x="5.547cm" svg:y="17.246cm">
          <draw:text-box>
            <text:p text:style-name="P261"><text:span text:style-name="T15">discovered </text:span></text:p>
          </draw:text-box>
        </draw:frame>
        <draw:frame draw:style-name="gr264" draw:text-style-name="P262" draw:layer="layout" svg:width="0.65cm" svg:height="0.48cm" svg:x="7.664cm" svg:y="17.246cm">
          <draw:text-box>
            <text:p text:style-name="P261"><text:span text:style-name="T15">API </text:span></text:p>
          </draw:text-box>
        </draw:frame>
        <draw:frame draw:style-name="gr264" draw:text-style-name="P262" draw:layer="layout" svg:width="0.827cm" svg:height="0.48cm" svg:x="8.508cm" svg:y="17.246cm">
          <draw:text-box>
            <text:p text:style-name="P261"><text:span text:style-name="T15">keys </text:span></text:p>
          </draw:text-box>
        </draw:frame>
        <draw:frame draw:style-name="gr264" draw:text-style-name="P262" draw:layer="layout" svg:width="0.433cm" svg:height="0.48cm" svg:x="9.538cm" svg:y="17.246cm">
          <draw:text-box>
            <text:p text:style-name="P261"><text:span text:style-name="T15">to </text:span></text:p>
          </draw:text-box>
        </draw:frame>
        <draw:frame draw:style-name="gr264" draw:text-style-name="P262" draw:layer="layout" svg:width="1.005cm" svg:height="0.48cm" svg:x="10.118cm" svg:y="17.246cm">
          <draw:text-box>
            <text:p text:style-name="P261"><text:span text:style-name="T15">make </text:span></text:p>
          </draw:text-box>
        </draw:frame>
        <draw:frame draw:style-name="gr264" draw:text-style-name="P262" draw:layer="layout" svg:width="2.314cm" svg:height="0.48cm" svg:x="11.28cm" svg:y="17.246cm">
          <draw:text-box>
            <text:p text:style-name="P261"><text:span text:style-name="T15">unauthorized </text:span></text:p>
          </draw:text-box>
        </draw:frame>
        <draw:frame draw:style-name="gr264" draw:text-style-name="P262" draw:layer="layout" svg:width="1.626cm" svg:height="0.48cm" svg:x="13.715cm" svg:y="17.246cm">
          <draw:text-box>
            <text:p text:style-name="P261"><text:span text:style-name="T15">requests, </text:span></text:p>
          </draw:text-box>
        </draw:frame>
        <draw:frame draw:style-name="gr264" draw:text-style-name="P262" draw:layer="layout" svg:width="0.451cm" svg:height="0.48cm" svg:x="15.54cm" svg:y="17.246cm">
          <draw:text-box>
            <text:p text:style-name="P261"><text:span text:style-name="T15">or </text:span></text:p>
          </draw:text-box>
        </draw:frame>
        <draw:frame draw:style-name="gr264" draw:text-style-name="P262" draw:layer="layout" svg:width="1.164cm" svg:height="0.48cm" svg:x="16.146cm" svg:y="17.246cm">
          <draw:text-box>
            <text:p text:style-name="P261"><text:span text:style-name="T15">calling </text:span></text:p>
          </draw:text-box>
        </draw:frame>
        <draw:frame draw:style-name="gr264" draw:text-style-name="P262" draw:layer="layout" svg:width="1.157cm" svg:height="0.48cm" svg:x="17.467cm" svg:y="17.246cm">
          <draw:text-box>
            <text:p text:style-name="P261"><text:span text:style-name="T15">hidden</text:span></text:p>
          </draw:text-box>
        </draw:frame>
        <draw:frame draw:style-name="gr264" draw:text-style-name="P262" draw:layer="layout" svg:width="15.738cm" svg:height="0.48cm" svg:x="2.533cm" svg:y="17.829cm">
          <draw:text-box>
            <text:p text:style-name="P261"><text:span text:style-name="T15">endpoints without permission, may violate scope and laws. Always validate your program rules.</text:span></text:p>
          </draw:text-box>
        </draw:frame>
        <draw:frame draw:style-name="gr277" draw:text-style-name="P276" draw:layer="layout" svg:width="10.536cm" svg:height="1.064cm" svg:x="2.003cm" svg:y="19.311cm">
          <draw:text-box>
            <text:p text:style-name="P261"><text:span text:style-name="T10">2. Manual JavaScript Analysis</text:span></text:p>
          </draw:text-box>
        </draw:frame>
        <draw:frame draw:style-name="gr278" draw:text-style-name="P277" draw:layer="layout" svg:width="16.647cm" svg:height="0.501cm" svg:x="2.003cm" svg:y="21.044cm">
          <draw:text-box>
            <text:p text:style-name="P261"><text:span text:style-name="T11">Before automating, understand how to manually analyze JS files. This builds intuition for what to</text:span></text:p>
          </draw:text-box>
        </draw:frame>
        <draw:frame draw:style-name="gr278" draw:text-style-name="P277" draw:layer="layout" svg:width="8.271cm" svg:height="0.501cm" svg:x="2.003cm" svg:y="21.653cm">
          <draw:text-box>
            <text:p text:style-name="P261"><text:span text:style-name="T11">look for and helps validate automated findings. </text:span></text:p>
          </draw:text-box>
        </draw:frame>
        <draw:frame draw:style-name="gr278" draw:text-style-name="P277" draw:layer="layout" svg:width="0.461cm" svg:height="0.433cm" svg:x="10.272cm" svg:y="21.705cm">
          <draw:text-box>
            <text:p text:style-name="P261"><text:span text:style-name="T12">🧠</text:span></text:p>
          </draw:text-box>
        </draw:frame>
        <draw:path draw:style-name="gr279" draw:text-style-name="P278" draw:layer="layout" svg:width="2.173cm" svg:height="0.769cm" svg:x="2.027cm" svg:y="24.421cm" svg:viewBox="0 0 2174 770" svg:d="M0 677v-584c0-12 2-24 7-36 5-11 11-21 20-30 9-8 19-15 30-20 12-4 23-7 36-7h1988c13 0 24 3 36 7 11 5 21 12 30 20 9 9 15 19 20 30 5 12 7 24 7 36v584c0 12-2 24-7 35-5 12-11 22-20 31-9 8-19 15-30 20-12 4-23 7-36 7h-1988c-13 0-24-3-36-7-11-5-21-12-30-20-9-9-15-19-20-31-5-11-7-23-7-35z">
          <text:p/>
        </draw:path>
        <draw:path draw:style-name="gr280" draw:text-style-name="P202" draw:layer="layout" svg:width="2.173cm" svg:height="0.769cm" svg:x="2.027cm" svg:y="24.421cm" svg:viewBox="0 0 2174 770" svg:d="M0 677v-584c0-12 2-24 7-36 5-11 11-21 20-30 9-8 19-15 30-20 12-4 23-7 36-7h1988c13 0 24 3 36 7 11 5 21 12 30 20 9 9 15 19 20 30 5 12 7 24 7 36v584c0 12-2 24-7 35-5 12-11 22-20 31-9 8-19 15-30 20-12 4-23 7-36 7h-1988c-13 0-24-3-36-7-11-5-21-12-30-20-9-9-15-19-20-31-5-11-7-23-7-35z">
          <text:p/>
        </draw:path>
        <draw:frame draw:style-name="gr281" draw:text-style-name="P279" draw:layer="layout" svg:width="6.537cm" svg:height="0.725cm" svg:x="2.003cm" svg:y="23.1cm">
          <draw:text-box>
            <text:p text:style-name="P261"><text:span text:style-name="T17">2.1 Finding JavaScript Files</text:span></text:p>
          </draw:text-box>
        </draw:frame>
        <draw:frame draw:style-name="gr268" draw:text-style-name="P266" draw:layer="layout" svg:width="1.336cm" svg:height="0.433cm" svg:x="2.348cm" svg:y="24.572cm">
          <draw:text-box>
            <text:p text:style-name="P261"><text:span text:style-name="T18">MANUAL</text:span></text:p>
          </draw:text-box>
        </draw:frame>
      </draw:page>
      <draw:page draw:name="page4" draw:style-name="dp1" draw:master-page-name="master-page569">
        <draw:frame draw:style-name="gr268" draw:text-style-name="P270" draw:layer="layout" svg:width="4.41cm" svg:height="0.446cm" svg:x="2.088cm" svg:y="0.879cm">
          <draw:text-box>
            <text:p text:style-name="P261"><text:span text:style-name="T8">2. Manual JavaScript Analysis</text:span></text:p>
          </draw:text-box>
        </draw:frame>
        <draw:path draw:style-name="gr282" draw:text-style-name="P280" draw:layer="layout" svg:width="16.988cm" svg:height="4.479cm" svg:x="2.027cm" svg:y="10.163cm" svg:viewBox="0 0 16989 4480" svg:d="M0 4334v-4188c0-10 1-19 3-29 2-9 4-18 8-27s8-17 13-25c6-8 12-15 19-22 6-7 14-13 22-18 8-6 16-10 25-14s18-6 27-8c10-2 19-3 29-3h16697c10 0 19 1 28 3 10 2 19 4 28 8s17 8 25 14c8 5 15 11 22 18s13 14 18 22 10 16 14 25c3 9 6 18 8 27 2 10 3 19 3 29v4188c0 10-1 19-3 29-2 9-5 18-8 27-4 9-9 17-14 25s-11 15-18 22-14 13-22 18c-8 6-16 10-25 14-9 3-18 6-28 8-9 2-18 3-28 3h-16697c-10 0-19-1-29-3-9-2-18-5-27-8-9-4-17-8-25-14-8-5-16-11-22-18-7-7-13-14-19-22-5-8-9-16-13-25s-6-18-8-27c-2-10-3-19-3-29z">
          <text:p/>
        </draw:path>
        <draw:path draw:style-name="gr283" draw:text-style-name="P202" draw:layer="layout" svg:width="16.988cm" svg:height="4.479cm" svg:x="2.027cm" svg:y="10.163cm" svg:viewBox="0 0 16989 4480" svg:d="M0 4334v-4188c0-10 1-19 3-29 2-9 4-18 8-27s8-17 13-25c6-8 12-15 19-22 6-7 14-13 22-18 8-6 16-10 25-14s18-6 27-8c10-2 19-3 29-3h16697c10 0 19 1 28 3 10 2 19 4 28 8s17 8 25 14c8 5 15 11 22 18s13 14 18 22 10 16 14 25c3 9 6 18 8 27 2 10 3 19 3 29v4188c0 10-1 19-3 29-2 9-5 18-8 27-4 9-9 17-14 25s-11 15-18 22-14 13-22 18c-8 6-16 10-25 14-9 3-18 6-28 8-9 2-18 3-28 3h-16697c-10 0-19-1-29-3-9-2-18-5-27-8-9-4-17-8-25-14-8-5-16-11-22-18-7-7-13-14-19-22-5-8-9-16-13-25s-6-18-8-27c-2-10-3-19-3-29z">
          <text:p/>
        </draw:path>
        <draw:path draw:style-name="gr282" draw:text-style-name="P280" draw:layer="layout" svg:width="16.988cm" svg:height="6.387cm" svg:x="2.027cm" svg:y="16.974cm" svg:viewBox="0 0 16989 6388" svg:d="M0 6242v-6096c0-10 1-19 3-29 2-9 4-18 8-27s8-17 13-25c6-8 12-15 19-22 6-7 14-13 22-18 8-6 16-10 25-14 9-3 18-6 27-8 10-2 19-3 29-3h16697c10 0 19 1 28 3 10 2 19 5 28 8 9 4 17 8 25 14 8 5 15 11 22 18s13 14 18 22 10 16 14 25c3 9 6 18 8 27 2 10 3 19 3 29v6096c0 10-1 19-3 29-2 9-5 18-8 27-4 9-9 17-14 25s-11 16-18 22c-7 7-14 13-22 19-8 5-16 9-25 13s-18 6-28 8c-9 2-18 3-28 3h-16697c-10 0-19-1-29-3-9-2-18-4-27-8s-17-8-25-13c-8-6-16-12-22-19-7-6-13-14-19-22-5-8-9-16-13-25s-6-18-8-27c-2-10-3-19-3-29z">
          <text:p/>
        </draw:path>
        <draw:path draw:style-name="gr283" draw:text-style-name="P202" draw:layer="layout" svg:width="16.988cm" svg:height="6.387cm" svg:x="2.027cm" svg:y="16.974cm" svg:viewBox="0 0 16989 6388" svg:d="M0 6242v-6096c0-10 1-19 3-29 2-9 4-18 8-27s8-17 13-25c6-8 12-15 19-22 6-7 14-13 22-18 8-6 16-10 25-14 9-3 18-6 27-8 10-2 19-3 29-3h16697c10 0 19 1 28 3 10 2 19 5 28 8 9 4 17 8 25 14 8 5 15 11 22 18s13 14 18 22 10 16 14 25c3 9 6 18 8 27 2 10 3 19 3 29v6096c0 10-1 19-3 29-2 9-5 18-8 27-4 9-9 17-14 25s-11 16-18 22c-7 7-14 13-22 19-8 5-16 9-25 13s-18 6-28 8c-9 2-18 3-28 3h-16697c-10 0-19-1-29-3-9-2-18-4-27-8s-17-8-25-13c-8-6-16-12-22-19-7-6-13-14-19-22-5-8-9-16-13-25s-6-18-8-27c-2-10-3-19-3-29z">
          <text:p/>
        </draw:path>
        <draw:polygon draw:style-name="gr276" draw:text-style-name="P275" draw:layer="layout" svg:width="17.014cm" svg:height="0.053cm" svg:x="2.014cm" svg:y="25.256cm" svg:viewBox="0 0 17015 54" draw:points="0,0 17015,0 17015,54 0,54">
          <text:p/>
        </draw:polygon>
        <draw:frame draw:style-name="gr268" draw:text-style-name="P266" draw:layer="layout" svg:width="0.317cm" svg:height="0.433cm" svg:x="2.003cm" svg:y="28.256cm">
          <draw:text-box>
            <text:p text:style-name="P261"><text:span text:style-name="T9">4</text:span></text:p>
          </draw:text-box>
        </draw:frame>
        <draw:frame draw:style-name="gr271" draw:text-style-name="P269" draw:layer="layout" svg:width="4.833cm" svg:height="0.53cm" svg:x="2.003cm" svg:y="2.712cm">
          <draw:text-box>
            <text:p text:style-name="P261"><text:span text:style-name="T19">Browser DevTools Method</text:span></text:p>
          </draw:text-box>
        </draw:frame>
        <draw:frame draw:style-name="gr278" draw:text-style-name="P277" draw:layer="layout" svg:width="7.836cm" svg:height="0.501cm" svg:x="2.146cm" svg:y="3.579cm">
          <draw:text-box>
            <text:p text:style-name="P261"><text:span text:style-name="T11">1. Open the target website in Chrome/Firefox</text:span></text:p>
          </draw:text-box>
        </draw:frame>
        <draw:path draw:style-name="gr284" draw:text-style-name="P281" draw:layer="layout" svg:width="0.821cm" svg:height="0.53cm" svg:x="3.657cm" svg:y="4.346cm" svg:viewBox="0 0 822 531" svg:d="M0 451v-372c0-10 2-20 6-30s10-18 17-26c8-7 17-13 27-17s20-6 30-6h663c10 0 21 2 30 6 10 4 19 10 26 17 8 8 13 16 17 26s6 20 6 30v372c0 11-2 21-6 31s-9 18-17 26c-7 7-16 13-26 17-9 4-20 6-30 6h-663c-10 0-20-2-30-6s-19-10-27-17c-7-8-13-16-17-26s-6-20-6-31z">
          <text:p/>
        </draw:path>
        <draw:frame draw:style-name="gr278" draw:text-style-name="P277" draw:layer="layout" svg:width="1.438cm" svg:height="0.501cm" svg:x="2.146cm" svg:y="4.321cm">
          <draw:text-box>
            <text:p text:style-name="P261"><text:span text:style-name="T11">2. Press </text:span></text:p>
          </draw:text-box>
        </draw:frame>
        <draw:frame draw:style-name="gr268" draw:text-style-name="P266" draw:layer="layout" svg:width="0.53cm" svg:height="0.433cm" svg:x="3.789cm" svg:y="4.377cm">
          <draw:text-box>
            <text:p text:style-name="P261"><text:span text:style-name="T20">F12</text:span></text:p>
          </draw:text-box>
        </draw:frame>
        <draw:frame draw:style-name="gr278" draw:text-style-name="P277" draw:layer="layout" svg:width="3.115cm" svg:height="0.501cm" svg:x="4.478cm" svg:y="4.321cm">
          <draw:text-box>
            <text:p text:style-name="P261"><text:span text:style-name="T11"><text:s/>to open DevTools</text:span></text:p>
          </draw:text-box>
        </draw:frame>
        <draw:frame draw:style-name="gr278" draw:text-style-name="P277" draw:layer="layout" svg:width="5.783cm" svg:height="0.501cm" svg:x="2.146cm" svg:y="5.063cm">
          <draw:text-box>
            <text:p text:style-name="P261"><text:span text:style-name="T11">3. Go to </text:span><text:span text:style-name="T21">Sources</text:span><text:span text:style-name="T11"> or </text:span><text:span text:style-name="T21">Debugger</text:span><text:span text:style-name="T11"> tab</text:span></text:p>
          </draw:text-box>
        </draw:frame>
        <draw:path draw:style-name="gr284" draw:text-style-name="P281" draw:layer="layout" svg:width="1.378cm" svg:height="0.53cm" svg:x="7.924cm" svg:y="5.803cm" svg:viewBox="0 0 1379 531" svg:d="M0 80c0-11 2-21 6-30 4-10 9-19 17-26 7-8 16-13 26-17 9-5 20-7 30-7h1220c11 0 21 2 31 7 9 4 18 9 25 17 8 7 14 16 18 26 4 9 6 19 6 30v372c0 11-2 21-6 30-4 10-10 19-18 26-7 8-16 13-25 17-10 4-20 6-31 6h-1220c-10 0-21-2-30-6-10-4-19-9-26-17-8-7-13-16-17-26-4-9-6-19-6-30z">
          <text:p/>
        </draw:path>
        <draw:frame draw:style-name="gr278" draw:text-style-name="P277" draw:layer="layout" svg:width="5.766cm" svg:height="0.501cm" svg:x="2.146cm" svg:y="5.778cm">
          <draw:text-box>
            <text:p text:style-name="P261"><text:span text:style-name="T11">4. Browse the file tree — look for </text:span></text:p>
          </draw:text-box>
        </draw:frame>
        <draw:frame draw:style-name="gr268" draw:text-style-name="P266" draw:layer="layout" svg:width="0.89cm" svg:height="0.433cm" svg:x="8.056cm" svg:y="5.835cm">
          <draw:text-box>
            <text:p text:style-name="P261"><text:span text:style-name="T20">app.js</text:span></text:p>
          </draw:text-box>
        </draw:frame>
        <draw:path draw:style-name="gr284" draw:text-style-name="P281" draw:layer="layout" svg:width="1.934cm" svg:height="0.53cm" svg:x="9.514cm" svg:y="5.803cm" svg:viewBox="0 0 1935 531" svg:d="M0 80c0-11 2-21 6-30 4-10 10-19 17-26 7-8 16-13 26-17 10-5 20-7 30-7h1777c10 0 21 2 30 7 10 4 19 9 26 17 8 7 13 16 17 26 4 9 6 19 6 30v372c0 11-2 21-6 30-4 10-9 19-17 26-7 8-16 13-26 17-9 4-20 6-30 6h-1777c-10 0-20-2-30-6s-19-9-26-17c-7-7-13-16-17-26-4-9-6-19-6-30z">
          <text:p/>
        </draw:path>
        <draw:frame draw:style-name="gr278" draw:text-style-name="P277" draw:layer="layout" svg:width="0.37cm" svg:height="0.501cm" svg:x="9.301cm" svg:y="5.778cm">
          <draw:text-box>
            <text:p text:style-name="P261"><text:span text:style-name="T11">, </text:span></text:p>
          </draw:text-box>
        </draw:frame>
        <draw:frame draw:style-name="gr268" draw:text-style-name="P266" draw:layer="layout" svg:width="1.334cm" svg:height="0.433cm" svg:x="9.646cm" svg:y="5.835cm">
          <draw:text-box>
            <text:p text:style-name="P261"><text:span text:style-name="T20">main.*.js</text:span></text:p>
          </draw:text-box>
        </draw:frame>
        <draw:path draw:style-name="gr284" draw:text-style-name="P281" draw:layer="layout" svg:width="2.121cm" svg:height="0.53cm" svg:x="11.66cm" svg:y="5.803cm" svg:viewBox="0 0 2122 531" svg:d="M0 80c0-11 2-21 6-30 5-10 10-19 18-26 7-8 16-13 25-17 10-5 20-7 31-7h1961c11 0 21 2 31 7 9 4 18 9 25 17 8 7 13 16 18 26 4 9 7 19 7 30v372c0 11-3 21-7 30-5 10-10 19-18 26-7 8-16 13-25 17-10 4-20 6-31 6h-1961c-11 0-21-2-31-6-9-4-18-9-25-17-8-7-13-16-18-26-4-9-6-19-6-30z">
          <text:p/>
        </draw:path>
        <draw:frame draw:style-name="gr278" draw:text-style-name="P277" draw:layer="layout" svg:width="0.37cm" svg:height="0.501cm" svg:x="11.448cm" svg:y="5.778cm">
          <draw:text-box>
            <text:p text:style-name="P261"><text:span text:style-name="T11">, </text:span></text:p>
          </draw:text-box>
        </draw:frame>
        <draw:frame draw:style-name="gr268" draw:text-style-name="P266" draw:layer="layout" svg:width="1.509cm" svg:height="0.433cm" svg:x="11.793cm" svg:y="5.835cm">
          <draw:text-box>
            <text:p text:style-name="P261"><text:span text:style-name="T20">chunk-*.js</text:span></text:p>
          </draw:text-box>
        </draw:frame>
        <draw:path draw:style-name="gr284" draw:text-style-name="P281" draw:layer="layout" svg:width="0.636cm" svg:height="0.53cm" svg:x="7.712cm" svg:y="6.546cm" svg:viewBox="0 0 637 531" svg:d="M0 451v-371c0-12 2-22 6-31 4-10 9-19 17-26 7-8 16-13 26-17 9-4 20-6 30-6h478c11 0 21 2 31 6 9 4 18 9 25 17 8 7 14 16 18 26 4 9 6 19 6 31v371c0 11-2 21-6 30-4 10-10 19-18 26-7 8-16 13-25 18-10 4-20 6-31 6h-478c-10 0-21-2-30-7-10-4-19-9-26-17-8-7-13-16-17-26-4-9-6-19-6-30z">
          <text:p/>
        </draw:path>
        <draw:frame draw:style-name="gr278" draw:text-style-name="P277" draw:layer="layout" svg:width="5.298cm" svg:height="0.501cm" svg:x="2.146cm" svg:y="6.52cm">
          <draw:text-box>
            <text:p text:style-name="P261"><text:span text:style-name="T11">5. Check </text:span><text:span text:style-name="T21">Network</text:span><text:span text:style-name="T11"> tab, filter by </text:span></text:p>
          </draw:text-box>
        </draw:frame>
        <draw:frame draw:style-name="gr268" draw:text-style-name="P266" draw:layer="layout" svg:width="0.317cm" svg:height="0.433cm" svg:x="7.844cm" svg:y="6.577cm">
          <draw:text-box>
            <text:p text:style-name="P261"><text:span text:style-name="T20">JS</text:span></text:p>
          </draw:text-box>
        </draw:frame>
        <draw:frame draw:style-name="gr278" draw:text-style-name="P277" draw:layer="layout" svg:width="4.146cm" svg:height="0.501cm" svg:x="8.347cm" svg:y="6.52cm">
          <draw:text-box>
            <text:p text:style-name="P261"><text:span text:style-name="T11"><text:s/>to see all loaded scripts</text:span></text:p>
          </draw:text-box>
        </draw:frame>
        <draw:path draw:style-name="gr284" draw:text-style-name="P281" draw:layer="layout" svg:width="1.007cm" svg:height="0.53cm" svg:x="4.134cm" svg:y="7.288cm" svg:viewBox="0 0 1008 531" svg:d="M0 451v-372c0-10 2-21 6-30 4-10 10-19 17-26 8-8 16-13 26-17s20-6 30-6h849c11 0 21 2 31 6s18 9 26 17c7 7 13 16 17 26 4 9 6 20 6 30v372c0 11-2 21-6 31-4 9-10 18-17 25-8 8-16 14-26 18s-20 6-30 6h-850c-10 0-20-2-30-6s-18-10-26-18c-7-7-13-16-17-25-4-10-6-20-6-31z">
          <text:p/>
        </draw:path>
        <draw:frame draw:style-name="gr278" draw:text-style-name="P277" draw:layer="layout" svg:width="1.936cm" svg:height="0.501cm" svg:x="2.146cm" svg:y="7.262cm">
          <draw:text-box>
            <text:p text:style-name="P261"><text:span text:style-name="T11">6. Look for </text:span></text:p>
          </draw:text-box>
        </draw:frame>
        <draw:frame draw:style-name="gr268" draw:text-style-name="P266" draw:layer="layout" svg:width="0.757cm" svg:height="0.433cm" svg:x="4.266cm" svg:y="7.319cm">
          <draw:text-box>
            <text:p text:style-name="P261"><text:span text:style-name="T20">.map</text:span></text:p>
          </draw:text-box>
        </draw:frame>
        <draw:frame draw:style-name="gr278" draw:text-style-name="P277" draw:layer="layout" svg:width="4.853cm" svg:height="0.501cm" svg:x="5.141cm" svg:y="7.262cm">
          <draw:text-box>
            <text:p text:style-name="P261"><text:span text:style-name="T11"><text:s/>files in the same directories</text:span></text:p>
          </draw:text-box>
        </draw:frame>
        <draw:path draw:style-name="gr276" draw:text-style-name="P275" draw:layer="layout" svg:width="4.346cm" svg:height="0.609cm" svg:x="2.014cm" svg:y="9.302cm" svg:viewBox="0 0 4347 610" svg:d="M0 610v-504c0-14 2-28 8-41 5-13 13-24 23-34s21-18 34-23c13-6 27-8 41-8h4135c14 0 28 2 41 8 13 5 24 13 34 23s18 21 23 34 8 27 8 41v504z">
          <text:p/>
        </draw:path>
        <draw:frame draw:style-name="gr271" draw:text-style-name="P269" draw:layer="layout" svg:width="3.751cm" svg:height="0.53cm" svg:x="2.003cm" svg:y="8.33cm">
          <draw:text-box>
            <text:p text:style-name="P261"><text:span text:style-name="T19">View Source Method</text:span></text:p>
          </draw:text-box>
        </draw:frame>
        <draw:frame draw:style-name="gr285" draw:text-style-name="P282" draw:layer="layout" svg:width="3.415cm" svg:height="0.391cm" svg:x="2.268cm" svg:y="9.398cm">
          <draw:text-box>
            <text:p text:style-name="P261"><text:span text:style-name="T22">SOURCE CODE GREPPING</text:span></text:p>
          </draw:text-box>
        </draw:frame>
        <draw:frame draw:style-name="gr268" draw:text-style-name="P266" draw:layer="layout" svg:width="6.871cm" svg:height="0.433cm" svg:x="2.401cm" svg:y="10.499cm">
          <draw:text-box>
            <text:p text:style-name="P261"><text:span text:style-name="T23"># View page source and grep for JS references</text:span></text:p>
          </draw:text-box>
        </draw:frame>
        <draw:frame draw:style-name="gr268" draw:text-style-name="P266" draw:layer="layout" svg:width="8.448cm" svg:height="0.433cm" svg:x="2.401cm" svg:y="10.976cm">
          <draw:text-box>
            <text:p text:style-name="P261"><text:span text:style-name="T23">curl -s https://target.com | grep -oE '[^"'\''"]+\.js' | sort -u</text:span></text:p>
          </draw:text-box>
        </draw:frame>
        <draw:frame draw:style-name="gr268" draw:text-style-name="P266" draw:layer="layout" svg:width="3.611cm" svg:height="0.433cm" svg:x="2.401cm" svg:y="11.93cm">
          <draw:text-box>
            <text:p text:style-name="P261"><text:span text:style-name="T23"># Find all script src URLs</text:span></text:p>
          </draw:text-box>
        </draw:frame>
        <draw:frame draw:style-name="gr268" draw:text-style-name="P266" draw:layer="layout" svg:width="10.69cm" svg:height="0.433cm" svg:x="2.401cm" svg:y="12.408cm">
          <draw:text-box>
            <text:p text:style-name="P261"><text:span text:style-name="T23">curl -s https://fazz.com | grep -oP 'src="[^"]*\.js"' | sed 's/src="//g;s/"//g'</text:span></text:p>
          </draw:text-box>
        </draw:frame>
        <draw:frame draw:style-name="gr268" draw:text-style-name="P266" draw:layer="layout" svg:width="6.756cm" svg:height="0.433cm" svg:x="2.401cm" svg:y="13.362cm">
          <draw:text-box>
            <text:p text:style-name="P261"><text:span text:style-name="T23"># Search for common JS file patterns in HTML</text:span></text:p>
          </draw:text-box>
        </draw:frame>
        <draw:frame draw:style-name="gr268" draw:text-style-name="P266" draw:layer="layout" svg:width="9.938cm" svg:height="0.433cm" svg:x="2.401cm" svg:y="13.839cm">
          <draw:text-box>
            <text:p text:style-name="P261"><text:span text:style-name="T23">curl -s https://target.com | grep -iE '(\.js|script|src=.*\/.*\.(js|mjs))'</text:span></text:p>
          </draw:text-box>
        </draw:frame>
        <draw:path draw:style-name="gr276" draw:text-style-name="P275" draw:layer="layout" svg:width="4.717cm" svg:height="0.609cm" svg:x="2.014cm" svg:y="16.113cm" svg:viewBox="0 0 4718 610" svg:d="M0 610v-503c0-14 2-28 8-41 5-13 13-24 23-34 10-11 21-19 34-24 13-6 27-8 41-8h4506c14 0 28 2 41 8 13 5 24 13 34 24 10 10 18 21 23 34s8 27 8 41v503z">
          <text:p/>
        </draw:path>
        <draw:frame draw:style-name="gr271" draw:text-style-name="P269" draw:layer="layout" svg:width="5.598cm" svg:height="0.53cm" svg:x="2.003cm" svg:y="15.141cm">
          <draw:text-box>
            <text:p text:style-name="P261"><text:span text:style-name="T19">Gau / Wayback for Historical JS</text:span></text:p>
          </draw:text-box>
        </draw:frame>
        <draw:frame draw:style-name="gr285" draw:text-style-name="P282" draw:layer="layout" svg:width="3.53cm" svg:height="0.391cm" svg:x="2.268cm" svg:y="16.209cm">
          <draw:text-box>
            <text:p text:style-name="P261"><text:span text:style-name="T22">HISTORICAL JS DISCOVERY</text:span></text:p>
          </draw:text-box>
        </draw:frame>
        <draw:frame draw:style-name="gr268" draw:text-style-name="P266" draw:layer="layout" svg:width="5.381cm" svg:height="0.433cm" svg:x="2.401cm" svg:y="17.31cm">
          <draw:text-box>
            <text:p text:style-name="P261"><text:span text:style-name="T23"># Get historical URLs and filter for JS</text:span></text:p>
          </draw:text-box>
        </draw:frame>
        <draw:frame draw:style-name="gr268" draw:text-style-name="P266" draw:layer="layout" svg:width="7.803cm" svg:height="0.433cm" svg:x="2.401cm" svg:y="17.787cm">
          <draw:text-box>
            <text:p text:style-name="P261"><text:span text:style-name="T23">gau target.com | grep '\.js$' | sort -u | tee js_urls.txt</text:span></text:p>
          </draw:text-box>
        </draw:frame>
        <draw:frame draw:style-name="gr268" draw:text-style-name="P266" draw:layer="layout" svg:width="4.52cm" svg:height="0.433cm" svg:x="2.401cm" svg:y="18.742cm">
          <draw:text-box>
            <text:p text:style-name="P261"><text:span text:style-name="T23"># Wayback Machine for JS files</text:span></text:p>
          </draw:text-box>
        </draw:frame>
        <draw:frame draw:style-name="gr268" draw:text-style-name="P266" draw:layer="layout" svg:width="0.646cm" svg:height="0.433cm" svg:x="2.401cm" svg:y="19.219cm">
          <draw:text-box>
            <text:p text:style-name="P261"><text:span text:style-name="T23">curl </text:span></text:p>
          </draw:text-box>
        </draw:frame>
        <draw:frame draw:style-name="gr268" draw:text-style-name="P266" draw:layer="layout" svg:width="0.339cm" svg:height="0.433cm" svg:x="7.085cm" svg:y="19.219cm">
          <draw:text-box>
            <text:p text:style-name="P261"><text:span text:style-name="T23">-s </text:span></text:p>
          </draw:text-box>
        </draw:frame>
        <draw:frame draw:style-name="gr268" draw:text-style-name="P266" draw:layer="layout" svg:width="5.979cm" svg:height="0.433cm" svg:x="11.398cm" svg:y="19.219cm">
          <draw:text-box>
            <text:p text:style-name="P261"><text:span text:style-name="T23">"http://web.archive.org/cdx/search/cdx?</text:span></text:p>
          </draw:text-box>
        </draw:frame>
        <draw:frame draw:style-name="gr268" draw:text-style-name="P266" draw:layer="layout" svg:width="7.162cm" svg:height="0.433cm" svg:x="2.401cm" svg:y="19.696cm">
          <draw:text-box>
            <text:p text:style-name="P261"><text:span text:style-name="T23">url=*.target.com/*&amp;output=json&amp;fl=original" | \</text:span></text:p>
          </draw:text-box>
        </draw:frame>
        <draw:frame draw:style-name="gr268" draw:text-style-name="P266" draw:layer="layout" svg:width="7.296cm" svg:height="0.433cm" svg:x="3.143cm" svg:y="20.173cm">
          <draw:text-box>
            <text:p text:style-name="P261"><text:span text:style-name="T23">grep '\.js"' | jq -r '.[]' | sort -u | tee wayback_js.txt</text:span></text:p>
          </draw:text-box>
        </draw:frame>
        <draw:frame draw:style-name="gr268" draw:text-style-name="P266" draw:layer="layout" svg:width="4.523cm" svg:height="0.433cm" svg:x="2.401cm" svg:y="21.127cm">
          <draw:text-box>
            <text:p text:style-name="P261"><text:span text:style-name="T23"># Common Crawl JS extraction</text:span></text:p>
          </draw:text-box>
        </draw:frame>
        <draw:frame draw:style-name="gr268" draw:text-style-name="P266" draw:layer="layout" svg:width="0.646cm" svg:height="0.433cm" svg:x="2.401cm" svg:y="21.604cm">
          <draw:text-box>
            <text:p text:style-name="P261"><text:span text:style-name="T23">curl </text:span></text:p>
          </draw:text-box>
        </draw:frame>
        <draw:frame draw:style-name="gr268" draw:text-style-name="P266" draw:layer="layout" svg:width="0.339cm" svg:height="0.433cm" svg:x="5.879cm" svg:y="21.604cm">
          <draw:text-box>
            <text:p text:style-name="P261"><text:span text:style-name="T23">-s </text:span></text:p>
          </draw:text-box>
        </draw:frame>
        <draw:frame draw:style-name="gr268" draw:text-style-name="P266" draw:layer="layout" svg:width="8.518cm" svg:height="0.433cm" svg:x="8.987cm" svg:y="21.604cm">
          <draw:text-box>
            <text:p text:style-name="P261"><text:span text:style-name="T23">"http://index.commoncrawl.org/CC-MAIN-2024-51-index?</text:span></text:p>
          </draw:text-box>
        </draw:frame>
        <draw:frame draw:style-name="gr268" draw:text-style-name="P266" draw:layer="layout" svg:width="5.737cm" svg:height="0.433cm" svg:x="2.401cm" svg:y="22.081cm">
          <draw:text-box>
            <text:p text:style-name="P261"><text:span text:style-name="T23">url=*.target.com/*.js&amp;output=json" | \</text:span></text:p>
          </draw:text-box>
        </draw:frame>
        <draw:frame draw:style-name="gr268" draw:text-style-name="P266" draw:layer="layout" svg:width="2.626cm" svg:height="0.433cm" svg:x="3.143cm" svg:y="22.558cm">
          <draw:text-box>
            <text:p text:style-name="P261"><text:span text:style-name="T23">jq -r '.url' | sort -u</text:span></text:p>
          </draw:text-box>
        </draw:frame>
        <draw:path draw:style-name="gr279" draw:text-style-name="P278" draw:layer="layout" svg:width="2.173cm" svg:height="0.769cm" svg:x="2.027cm" svg:y="25.587cm" svg:viewBox="0 0 2174 770" svg:d="M0 677v-584c0-12 2-24 7-35 5-12 11-22 20-31 9-8 19-15 30-20 12-4 23-7 36-7h1988c13 0 24 3 36 7 11 5 21 12 30 20 9 9 15 19 20 31 5 11 7 23 7 35v584c0 12-2 24-7 36-5 11-11 21-20 30-9 8-19 15-30 20-12 4-23 7-36 7h-1988c-13 0-24-3-36-7-11-5-21-12-30-20-9-9-15-19-20-30-5-12-7-24-7-36z">
          <text:p/>
        </draw:path>
        <draw:path draw:style-name="gr280" draw:text-style-name="P202" draw:layer="layout" svg:width="2.173cm" svg:height="0.769cm" svg:x="2.027cm" svg:y="25.587cm" svg:viewBox="0 0 2174 770" svg:d="M0 677v-584c0-12 2-24 7-35 5-12 11-22 20-31 9-8 19-15 30-20 12-4 23-7 36-7h1988c13 0 24 3 36 7 11 5 21 12 30 20 9 9 15 19 20 31 5 11 7 23 7 35v584c0 12-2 24-7 36-5 11-11 21-20 30-9 8-19 15-30 20-12 4-23 7-36 7h-1988c-13 0-24-3-36-7-11-5-21-12-30-20-9-9-15-19-20-30-5-12-7-24-7-36z">
          <text:p/>
        </draw:path>
        <draw:frame draw:style-name="gr281" draw:text-style-name="P279" draw:layer="layout" svg:width="7.948cm" svg:height="0.725cm" svg:x="2.003cm" svg:y="24.266cm">
          <draw:text-box>
            <text:p text:style-name="P261"><text:span text:style-name="T17">2.2 Extracting Endpoints &amp; URLs</text:span></text:p>
          </draw:text-box>
        </draw:frame>
        <draw:frame draw:style-name="gr268" draw:text-style-name="P266" draw:layer="layout" svg:width="1.336cm" svg:height="0.433cm" svg:x="2.348cm" svg:y="25.738cm">
          <draw:text-box>
            <text:p text:style-name="P261"><text:span text:style-name="T18">MANUAL</text:span></text:p>
          </draw:text-box>
        </draw:frame>
      </draw:page>
      <draw:page draw:name="page5" draw:style-name="dp1" draw:master-page-name="master-page569">
        <draw:frame draw:style-name="gr268" draw:text-style-name="P270" draw:layer="layout" svg:width="4.41cm" svg:height="0.446cm" svg:x="2.088cm" svg:y="0.879cm">
          <draw:text-box>
            <text:p text:style-name="P261"><text:span text:style-name="T8">2. Manual JavaScript Analysis</text:span></text:p>
          </draw:text-box>
        </draw:frame>
        <draw:path draw:style-name="gr282" draw:text-style-name="P280" draw:layer="layout" svg:width="16.988cm" svg:height="8.772cm" svg:x="2.027cm" svg:y="4.863cm" svg:viewBox="0 0 16989 8773" svg:d="M0 8627v-8482c0-9 1-19 3-28s4-19 8-27c4-9 8-18 13-26 6-8 12-15 19-22 6-6 14-12 22-18 8-5 16-10 25-13 9-4 18-7 27-9 10-1 19-2 29-2h16697c10 0 19 1 28 2 10 2 19 5 28 9 9 3 17 8 25 13 8 6 15 12 22 18 7 7 13 14 18 22s10 17 14 26c3 8 6 18 8 27s3 19 3 28v8482c0 10-1 19-3 28-2 10-5 19-8 28-4 9-9 17-14 25s-11 15-18 22-14 13-22 18c-8 6-16 10-25 14-9 3-18 6-28 8-9 2-18 3-28 3h-16697c-10 0-19-1-29-3-9-2-18-5-27-8-9-4-17-8-25-14-8-5-16-11-22-18-7-7-13-14-19-22-5-8-9-16-13-25s-6-18-8-28c-2-9-3-18-3-28z">
          <text:p/>
        </draw:path>
        <draw:path draw:style-name="gr283" draw:text-style-name="P202" draw:layer="layout" svg:width="16.988cm" svg:height="8.772cm" svg:x="2.027cm" svg:y="4.863cm" svg:viewBox="0 0 16989 8773" svg:d="M0 8627v-8482c0-9 1-19 3-28s4-19 8-27c4-9 8-18 13-26 6-8 12-15 19-22 6-6 14-12 22-18 8-5 16-10 25-13 9-4 18-7 27-9 10-1 19-2 29-2h16697c10 0 19 1 28 2 10 2 19 5 28 9 9 3 17 8 25 13 8 6 15 12 22 18 7 7 13 14 18 22s10 17 14 26c3 8 6 18 8 27s3 19 3 28v8482c0 10-1 19-3 28-2 10-5 19-8 28-4 9-9 17-14 25s-11 15-18 22-14 13-22 18c-8 6-16 10-25 14-9 3-18 6-28 8-9 2-18 3-28 3h-16697c-10 0-19-1-29-3-9-2-18-5-27-8-9-4-17-8-25-14-8-5-16-11-22-18-7-7-13-14-19-22-5-8-9-16-13-25s-6-18-8-28c-2-9-3-18-3-28z">
          <text:p/>
        </draw:path>
        <draw:path draw:style-name="gr282" draw:text-style-name="P280" draw:layer="layout" svg:width="16.988cm" svg:height="10.203cm" svg:x="2.027cm" svg:y="14.854cm" svg:viewBox="0 0 16989 10204" svg:d="M0 10058v-9912c0-10 1-19 3-29 2-9 4-18 8-27s8-17 13-25c6-8 12-16 19-22 6-7 14-13 22-19 8-5 16-9 25-13s18-6 27-8c10-2 19-3 29-3h16697c10 0 19 1 28 3 10 2 19 4 28 8s17 8 25 13c8 6 15 12 22 19 7 6 13 14 18 22s10 16 14 25c3 9 6 18 8 27 2 10 3 19 3 29v9912c0 10-1 19-3 29-2 9-5 18-8 27-4 9-9 17-14 25s-11 16-18 23c-7 6-14 12-22 18-8 5-16 9-25 13s-18 7-28 8c-9 2-18 3-28 3h-16697c-10 0-19-1-29-3-9-1-18-4-27-8s-17-8-25-13c-8-6-16-12-22-18-7-7-13-15-19-23-5-8-9-16-13-25s-6-18-8-27c-2-10-3-19-3-29z">
          <text:p/>
        </draw:path>
        <draw:path draw:style-name="gr283" draw:text-style-name="P202" draw:layer="layout" svg:width="16.988cm" svg:height="10.203cm" svg:x="2.027cm" svg:y="14.854cm" svg:viewBox="0 0 16989 10204" svg:d="M0 10058v-9912c0-10 1-19 3-29 2-9 4-18 8-27s8-17 13-25c6-8 12-16 19-22 6-7 14-13 22-19 8-5 16-9 25-13s18-6 27-8c10-2 19-3 29-3h16697c10 0 19 1 28 3 10 2 19 4 28 8s17 8 25 13c8 6 15 12 22 19 7 6 13 14 18 22s10 16 14 25c3 9 6 18 8 27 2 10 3 19 3 29v9912c0 10-1 19-3 29-2 9-5 18-8 27-4 9-9 17-14 25s-11 16-18 23c-7 6-14 12-22 18-8 5-16 9-25 13s-18 7-28 8c-9 2-18 3-28 3h-16697c-10 0-19-1-29-3-9-1-18-4-27-8s-17-8-25-13c-8-6-16-12-22-18-7-7-13-15-19-23-5-8-9-16-13-25s-6-18-8-27c-2-10-3-19-3-29z">
          <text:p/>
        </draw:path>
        <draw:frame draw:style-name="gr268" draw:text-style-name="P266" draw:layer="layout" svg:width="0.317cm" svg:height="0.433cm" svg:x="2.003cm" svg:y="28.256cm">
          <draw:text-box>
            <text:p text:style-name="P261"><text:span text:style-name="T9">5</text:span></text:p>
          </draw:text-box>
        </draw:frame>
        <draw:frame draw:style-name="gr278" draw:text-style-name="P277" draw:layer="layout" svg:width="16.52cm" svg:height="0.501cm" svg:x="2.003cm" svg:y="2.492cm">
          <draw:text-box>
            <text:p text:style-name="P261"><text:span text:style-name="T11">API endpoints are the most valuable findings in JS files. Look for URL patterns, route definitions,</text:span></text:p>
          </draw:text-box>
        </draw:frame>
        <draw:path draw:style-name="gr276" draw:text-style-name="P275" draw:layer="layout" svg:width="5.751cm" svg:height="0.636cm" svg:x="2.014cm" svg:y="4.001cm" svg:viewBox="0 0 5752 637" svg:d="M0 637v-531c0-14 2-27 8-40 5-13 13-25 23-35s21-17 34-23c13-5 27-8 41-8h5540c14 0 27 3 40 8 13 6 25 13 35 23s17 22 23 35c5 13 8 26 8 40v531z">
          <text:p/>
        </draw:path>
        <draw:frame draw:style-name="gr278" draw:text-style-name="P277" draw:layer="layout" svg:width="3.499cm" svg:height="0.501cm" svg:x="2.003cm" svg:y="3.102cm">
          <draw:text-box>
            <text:p text:style-name="P261"><text:span text:style-name="T11">and fetch/AJAX calls.</text:span></text:p>
          </draw:text-box>
        </draw:frame>
        <draw:frame draw:style-name="gr285" draw:text-style-name="P282" draw:layer="layout" svg:width="4.625cm" svg:height="0.391cm" svg:x="2.268cm" svg:y="4.097cm">
          <draw:text-box>
            <text:p text:style-name="P261"><text:span text:style-name="T22">COMMON JS ENDPOINT PATTERNS</text:span></text:p>
          </draw:text-box>
        </draw:frame>
        <draw:frame draw:style-name="gr268" draw:text-style-name="P266" draw:layer="layout" svg:width="3.825cm" svg:height="0.433cm" svg:x="2.401cm" svg:y="5.199cm">
          <draw:text-box>
            <text:p text:style-name="P261"><text:span text:style-name="T23"># Look for fetch/XHR calls</text:span></text:p>
          </draw:text-box>
        </draw:frame>
        <draw:frame draw:style-name="gr268" draw:text-style-name="P266" draw:layer="layout" svg:width="3.166cm" svg:height="0.433cm" svg:x="2.401cm" svg:y="5.676cm">
          <draw:text-box>
            <text:p text:style-name="P261"><text:span text:style-name="T23">fetch("/api/v1/users")</text:span></text:p>
          </draw:text-box>
        </draw:frame>
        <draw:frame draw:style-name="gr268" draw:text-style-name="P266" draw:layer="layout" svg:width="4.694cm" svg:height="0.433cm" svg:x="2.401cm" svg:y="6.153cm">
          <draw:text-box>
            <text:p text:style-name="P261"><text:span text:style-name="T23">axios.get("/api/internal/config")</text:span></text:p>
          </draw:text-box>
        </draw:frame>
        <draw:frame draw:style-name="gr268" draw:text-style-name="P266" draw:layer="layout" svg:width="5.106cm" svg:height="0.433cm" svg:x="2.401cm" svg:y="6.63cm">
          <draw:text-box>
            <text:p text:style-name="P261"><text:span text:style-name="T23">$.ajax({ url: "/admin/dashboard" })</text:span></text:p>
          </draw:text-box>
        </draw:frame>
        <draw:frame draw:style-name="gr268" draw:text-style-name="P266" draw:layer="layout" svg:width="6.847cm" svg:height="0.433cm" svg:x="2.401cm" svg:y="7.584cm">
          <draw:text-box>
            <text:p text:style-name="P261"><text:span text:style-name="T23"># Route definitions (React Router, Vue Router)</text:span></text:p>
          </draw:text-box>
        </draw:frame>
        <draw:frame draw:style-name="gr268" draw:text-style-name="P266" draw:layer="layout" svg:width="6.739cm" svg:height="0.433cm" svg:x="2.401cm" svg:y="8.061cm">
          <draw:text-box>
            <text:p text:style-name="P261"><text:span text:style-name="T23">{ path: "/api/v2/orders", component: Orders }</text:span></text:p>
          </draw:text-box>
        </draw:frame>
        <draw:frame draw:style-name="gr268" draw:text-style-name="P266" draw:layer="layout" svg:width="7.076cm" svg:height="0.433cm" svg:x="2.401cm" svg:y="8.538cm">
          <draw:text-box>
            <text:p text:style-name="P261"><text:span text:style-name="T23">{ path: "/internal/audit", component: AuditLog }</text:span></text:p>
          </draw:text-box>
        </draw:frame>
        <draw:frame draw:style-name="gr268" draw:text-style-name="P266" draw:layer="layout" svg:width="2.417cm" svg:height="0.433cm" svg:x="2.401cm" svg:y="9.492cm">
          <draw:text-box>
            <text:p text:style-name="P261"><text:span text:style-name="T23"># URL constants</text:span></text:p>
          </draw:text-box>
        </draw:frame>
        <draw:frame draw:style-name="gr268" draw:text-style-name="P266" draw:layer="layout" svg:width="6.721cm" svg:height="0.433cm" svg:x="2.401cm" svg:y="9.969cm">
          <draw:text-box>
            <text:p text:style-name="P261"><text:span text:style-name="T23">const API_BASE = "https://api.target.com/v2";</text:span></text:p>
          </draw:text-box>
        </draw:frame>
        <draw:frame draw:style-name="gr268" draw:text-style-name="P266" draw:layer="layout" svg:width="5.935cm" svg:height="0.433cm" svg:x="2.401cm" svg:y="10.446cm">
          <draw:text-box>
            <text:p text:style-name="P261"><text:span text:style-name="T23">const AUTH_URL = "/auth/oauth/token";</text:span></text:p>
          </draw:text-box>
        </draw:frame>
        <draw:frame draw:style-name="gr268" draw:text-style-name="P266" draw:layer="layout" svg:width="6.215cm" svg:height="0.433cm" svg:x="2.401cm" svg:y="10.923cm">
          <draw:text-box>
            <text:p text:style-name="P261"><text:span text:style-name="T23">const ADMIN_API = "/internal/api/admin";</text:span></text:p>
          </draw:text-box>
        </draw:frame>
        <draw:frame draw:style-name="gr268" draw:text-style-name="P266" draw:layer="layout" svg:width="5.698cm" svg:height="0.433cm" svg:x="2.401cm" svg:y="11.877cm">
          <draw:text-box>
            <text:p text:style-name="P261"><text:span text:style-name="T23"># Template strings with dynamic URLs</text:span></text:p>
          </draw:text-box>
        </draw:frame>
        <draw:frame draw:style-name="gr268" draw:text-style-name="P266" draw:layer="layout" svg:width="4.274cm" svg:height="0.433cm" svg:x="2.401cm" svg:y="12.355cm">
          <draw:text-box>
            <text:p text:style-name="P261"><text:span text:style-name="T23">`/api/users/${userId}/profile`</text:span></text:p>
          </draw:text-box>
        </draw:frame>
        <draw:path draw:style-name="gr276" draw:text-style-name="P275" draw:layer="layout" svg:width="4.823cm" svg:height="0.636cm" svg:x="2.014cm" svg:y="13.993cm" svg:viewBox="0 0 4824 637" svg:d="M0 637v-531c0-14 2-28 8-41 5-13 13-24 23-34s21-18 34-23c13-6 27-8 41-8h4612c14 0 28 2 41 8 13 5 24 13 34 23s18 21 23 34 8 27 8 41v531z">
          <text:p/>
        </draw:path>
        <draw:frame draw:style-name="gr268" draw:text-style-name="P266" draw:layer="layout" svg:width="5.346cm" svg:height="0.433cm" svg:x="2.401cm" svg:y="12.832cm">
          <draw:text-box>
            <text:p text:style-name="P261"><text:span text:style-name="T23">`/admin/reports/${reportId}/export`</text:span></text:p>
          </draw:text-box>
        </draw:frame>
        <draw:frame draw:style-name="gr285" draw:text-style-name="P282" draw:layer="layout" svg:width="3.834cm" svg:height="0.391cm" svg:x="2.268cm" svg:y="14.089cm">
          <draw:text-box>
            <text:p text:style-name="P261"><text:span text:style-name="T22">GREP / RIPGREP ONE-LINERS</text:span></text:p>
          </draw:text-box>
        </draw:frame>
        <draw:frame draw:style-name="gr268" draw:text-style-name="P266" draw:layer="layout" svg:width="6.228cm" svg:height="0.433cm" svg:x="2.401cm" svg:y="15.19cm">
          <draw:text-box>
            <text:p text:style-name="P261"><text:span text:style-name="T23"># Extract all URL-like patterns from JS files</text:span></text:p>
          </draw:text-box>
        </draw:frame>
        <draw:frame draw:style-name="gr268" draw:text-style-name="P266" draw:layer="layout" svg:width="6.52cm" svg:height="0.433cm" svg:x="2.401cm" svg:y="15.667cm">
          <draw:text-box>
            <text:p text:style-name="P261"><text:span text:style-name="T23">grep -oP '(/[a-zA-Z0-9_\-/]+)+' app.js | sort -u</text:span></text:p>
          </draw:text-box>
        </draw:frame>
        <draw:frame draw:style-name="gr268" draw:text-style-name="P266" draw:layer="layout" svg:width="4.084cm" svg:height="0.433cm" svg:x="2.401cm" svg:y="16.621cm">
          <draw:text-box>
            <text:p text:style-name="P261"><text:span text:style-name="T23"># Find fetch/XHR endpoints</text:span></text:p>
          </draw:text-box>
        </draw:frame>
        <draw:frame draw:style-name="gr268" draw:text-style-name="P266" draw:layer="layout" svg:width="8.289cm" svg:height="0.433cm" svg:x="2.401cm" svg:y="17.098cm">
          <draw:text-box>
            <text:p text:style-name="P261"><text:span text:style-name="T23">rg 'fetch\(|axios\.|\$\.ajax|XMLHttpRequest' /-type js -o</text:span></text:p>
          </draw:text-box>
        </draw:frame>
        <draw:frame draw:style-name="gr268" draw:text-style-name="P266" draw:layer="layout" svg:width="3.811cm" svg:height="0.433cm" svg:x="2.401cm" svg:y="18.052cm">
          <draw:text-box>
            <text:p text:style-name="P261"><text:span text:style-name="T23"># Find API path constants</text:span></text:p>
          </draw:text-box>
        </draw:frame>
        <draw:frame draw:style-name="gr268" draw:text-style-name="P266" draw:layer="layout" svg:width="7.565cm" svg:height="0.433cm" svg:x="2.401cm" svg:y="18.53cm">
          <draw:text-box>
            <text:p text:style-name="P261"><text:span text:style-name="T23">rg 'api|endpoint|url|base_url|host' /-type js -i -C 2</text:span></text:p>
          </draw:text-box>
        </draw:frame>
        <draw:frame draw:style-name="gr268" draw:text-style-name="P266" draw:layer="layout" svg:width="3.884cm" svg:height="0.433cm" svg:x="2.401cm" svg:y="19.484cm">
          <draw:text-box>
            <text:p text:style-name="P261"><text:span text:style-name="T23"># Extract route definitions</text:span></text:p>
          </draw:text-box>
        </draw:frame>
        <draw:frame draw:style-name="gr268" draw:text-style-name="P266" draw:layer="layout" svg:width="4.403cm" svg:height="0.433cm" svg:x="2.401cm" svg:y="19.961cm">
          <draw:text-box>
            <text:p text:style-name="P261"><text:span text:style-name="T23">rg 'path:\s*["\x27]' /-type js -o</text:span></text:p>
          </draw:text-box>
        </draw:frame>
        <draw:frame draw:style-name="gr268" draw:text-style-name="P266" draw:layer="layout" svg:width="6.281cm" svg:height="0.433cm" svg:x="2.401cm" svg:y="20.915cm">
          <draw:text-box>
            <text:p text:style-name="P261"><text:span text:style-name="T23"># Find URL patterns with version numbers</text:span></text:p>
          </draw:text-box>
        </draw:frame>
        <draw:frame draw:style-name="gr268" draw:text-style-name="P266" draw:layer="layout" svg:width="4.86cm" svg:height="0.433cm" svg:x="2.401cm" svg:y="21.392cm">
          <draw:text-box>
            <text:p text:style-name="P261"><text:span text:style-name="T23">rg '/api/v\d+' /-type js -o | sort -u</text:span></text:p>
          </draw:text-box>
        </draw:frame>
        <draw:frame draw:style-name="gr268" draw:text-style-name="P266" draw:layer="layout" svg:width="3.493cm" svg:height="0.433cm" svg:x="2.401cm" svg:y="22.346cm">
          <draw:text-box>
            <text:p text:style-name="P261"><text:span text:style-name="T23"># Find WebSocket URLs</text:span></text:p>
          </draw:text-box>
        </draw:frame>
        <draw:frame draw:style-name="gr268" draw:text-style-name="P266" draw:layer="layout" svg:width="5.856cm" svg:height="0.433cm" svg:x="2.401cm" svg:y="22.823cm">
          <draw:text-box>
            <text:p text:style-name="P261"><text:span text:style-name="T23">rg 'wss/://[^"\x27]+' /-type js -o | sort -u</text:span></text:p>
          </draw:text-box>
        </draw:frame>
        <draw:frame draw:style-name="gr268" draw:text-style-name="P266" draw:layer="layout" svg:width="3.942cm" svg:height="0.433cm" svg:x="2.401cm" svg:y="23.777cm">
          <draw:text-box>
            <text:p text:style-name="P261"><text:span text:style-name="T23"># Find GraphQL endpoints</text:span></text:p>
          </draw:text-box>
        </draw:frame>
        <draw:frame draw:style-name="gr268" draw:text-style-name="P266" draw:layer="layout" svg:width="5.717cm" svg:height="0.433cm" svg:x="2.401cm" svg:y="24.254cm">
          <draw:text-box>
            <text:p text:style-name="P261"><text:span text:style-name="T23">rg 'graphql|/gql' /-type js -i -o | sort -u</text:span></text:p>
          </draw:text-box>
        </draw:frame>
      </draw:page>
      <draw:page draw:name="page6" draw:style-name="dp1" draw:master-page-name="master-page569">
        <draw:frame draw:style-name="gr268" draw:text-style-name="P270" draw:layer="layout" svg:width="4.41cm" svg:height="0.446cm" svg:x="2.088cm" svg:y="0.879cm">
          <draw:text-box>
            <text:p text:style-name="P261"><text:span text:style-name="T8">2. Manual JavaScript Analysis</text:span></text:p>
          </draw:text-box>
        </draw:frame>
        <draw:polygon draw:style-name="gr276" draw:text-style-name="P275" draw:layer="layout" svg:width="17.014cm" svg:height="0.053cm" svg:x="2.014cm" svg:y="4.081cm" svg:viewBox="0 0 17015 54" draw:points="0,0 17015,0 17015,54 0,54">
          <text:p/>
        </draw:polygon>
        <draw:path draw:style-name="gr282" draw:text-style-name="P280" draw:layer="layout" svg:width="16.988cm" svg:height="13.066cm" svg:x="2.027cm" svg:y="8.175cm" svg:viewBox="0 0 16989 13067" svg:d="M0 12921v-12775c0-9 1-19 3-28 2-10 4-19 8-28 4-8 8-17 13-25 6-8 12-15 19-22 6-7 14-13 22-18s16-10 25-14c9-3 18-6 27-8 10-2 19-3 29-3h16697c10 0 19 1 28 3 10 2 19 5 28 8 9 4 17 9 25 14s15 11 22 18 13 14 18 22 10 17 14 25c3 9 6 18 8 28 2 9 3 19 3 28v12775c0 10-1 19-3 29-2 9-5 18-8 27-4 9-9 17-14 25s-11 15-18 22-14 13-22 18c-8 6-16 10-25 14-9 3-18 6-28 8-9 2-18 3-28 3h-16697c-10 0-19-1-29-3-9-2-18-5-27-8-9-4-17-8-25-14-8-5-16-11-22-18-7-7-13-14-19-22-5-8-9-16-13-25s-6-18-8-27c-2-10-3-19-3-29z">
          <text:p/>
        </draw:path>
        <draw:path draw:style-name="gr283" draw:text-style-name="P202" draw:layer="layout" svg:width="16.988cm" svg:height="13.066cm" svg:x="2.027cm" svg:y="8.175cm" svg:viewBox="0 0 16989 13067" svg:d="M0 12921v-12775c0-9 1-19 3-28 2-10 4-19 8-28 4-8 8-17 13-25 6-8 12-15 19-22 6-7 14-13 22-18s16-10 25-14c9-3 18-6 27-8 10-2 19-3 29-3h16697c10 0 19 1 28 3 10 2 19 5 28 8 9 4 17 9 25 14s15 11 22 18 13 14 18 22 10 17 14 25c3 9 6 18 8 28 2 9 3 19 3 28v12775c0 10-1 19-3 29-2 9-5 18-8 27-4 9-9 17-14 25s-11 15-18 22-14 13-22 18c-8 6-16 10-25 14-9 3-18 6-28 8-9 2-18 3-28 3h-16697c-10 0-19-1-29-3-9-2-18-5-27-8-9-4-17-8-25-14-8-5-16-11-22-18-7-7-13-14-19-22-5-8-9-16-13-25s-6-18-8-27c-2-10-3-19-3-29z">
          <text:p/>
        </draw:path>
        <draw:polygon draw:style-name="gr276" draw:text-style-name="P275" draw:layer="layout" svg:width="17.014cm" svg:height="0.053cm" svg:x="2.014cm" svg:y="23.136cm" svg:viewBox="0 0 17015 54" draw:points="0,0 17015,0 17015,54 0,54">
          <text:p/>
        </draw:polygon>
        <draw:frame draw:style-name="gr268" draw:text-style-name="P266" draw:layer="layout" svg:width="0.317cm" svg:height="0.433cm" svg:x="2.003cm" svg:y="28.256cm">
          <draw:text-box>
            <text:p text:style-name="P261"><text:span text:style-name="T9">6</text:span></text:p>
          </draw:text-box>
        </draw:frame>
        <draw:path draw:style-name="gr279" draw:text-style-name="P278" draw:layer="layout" svg:width="2.2cm" svg:height="0.769cm" svg:x="2.027cm" svg:y="4.412cm" svg:viewBox="0 0 2201 770" svg:d="M0 677v-584c0-12 2-24 7-36 5-11 11-21 20-30 9-8 19-15 30-20 12-5 23-7 36-7h2015c12 0 24 2 35 7 12 5 22 12 30 20 9 9 16 19 21 30 4 12 7 24 7 36v584c0 12-3 24-7 35-5 12-12 22-21 30-8 9-18 16-30 21-11 4-23 7-35 7h-2015c-13 0-24-3-36-7-11-5-21-12-30-21-9-8-15-18-20-30-5-11-7-23-7-35z">
          <text:p/>
        </draw:path>
        <draw:path draw:style-name="gr280" draw:text-style-name="P202" draw:layer="layout" svg:width="2.2cm" svg:height="0.769cm" svg:x="2.027cm" svg:y="4.412cm" svg:viewBox="0 0 2201 770" svg:d="M0 677v-584c0-12 2-24 7-36 5-11 11-21 20-30 9-8 19-15 30-20 12-5 23-7 36-7h2015c12 0 24 2 35 7 12 5 22 12 30 20 9 9 16 19 21 30 4 12 7 24 7 36v584c0 12-3 24-7 35-5 12-12 22-21 30-8 9-18 16-30 21-11 4-23 7-35 7h-2015c-13 0-24-3-36-7-11-5-21-12-30-21-9-8-15-18-20-30-5-11-7-23-7-35z">
          <text:p/>
        </draw:path>
        <draw:frame draw:style-name="gr281" draw:text-style-name="P279" draw:layer="layout" svg:width="7.155cm" svg:height="0.725cm" svg:x="2.003cm" svg:y="3.091cm">
          <draw:text-box>
            <text:p text:style-name="P261"><text:span text:style-name="T17">2.3 Extracting Secrets &amp; Keys</text:span></text:p>
          </draw:text-box>
        </draw:frame>
        <draw:frame draw:style-name="gr268" draw:text-style-name="P266" draw:layer="layout" svg:width="1.278cm" svg:height="0.433cm" svg:x="2.348cm" svg:y="4.563cm">
          <draw:text-box>
            <text:p text:style-name="P261"><text:span text:style-name="T18">SECRETS</text:span></text:p>
          </draw:text-box>
        </draw:frame>
        <draw:frame draw:style-name="gr278" draw:text-style-name="P277" draw:layer="layout" svg:width="16.405cm" svg:height="0.501cm" svg:x="2.003cm" svg:y="5.778cm">
          <draw:text-box>
            <text:p text:style-name="P261"><text:span text:style-name="T11">Developers frequently embed sensitive values directly in JavaScript. These are visible to anyone</text:span></text:p>
          </draw:text-box>
        </draw:frame>
        <draw:path draw:style-name="gr276" draw:text-style-name="P275" draw:layer="layout" svg:width="5.512cm" svg:height="0.61cm" svg:x="2.014cm" svg:y="7.314cm" svg:viewBox="0 0 5513 611" svg:d="M0 611v-505c0-14 2-28 8-40 5-13 13-25 23-35s21-17 34-23c13-5 27-8 41-8h5301c14 0 28 3 41 8 13 6 24 13 34 23s18 22 23 35c5 12 8 26 8 40v505z">
          <text:p/>
        </draw:path>
        <draw:frame draw:style-name="gr278" draw:text-style-name="P277" draw:layer="layout" svg:width="5.242cm" svg:height="0.501cm" svg:x="2.003cm" svg:y="6.388cm">
          <draw:text-box>
            <text:p text:style-name="P261"><text:span text:style-name="T11">who inspects the page source.</text:span></text:p>
          </draw:text-box>
        </draw:frame>
        <draw:frame draw:style-name="gr285" draw:text-style-name="P282" draw:layer="layout" svg:width="4.327cm" svg:height="0.391cm" svg:x="2.268cm" svg:y="7.41cm">
          <draw:text-box>
            <text:p text:style-name="P261"><text:span text:style-name="T22">MANUAL SECRET HUNTING IN JS</text:span></text:p>
          </draw:text-box>
        </draw:frame>
        <draw:frame draw:style-name="gr268" draw:text-style-name="P266" draw:layer="layout" svg:width="6.172cm" svg:height="0.433cm" svg:x="2.401cm" svg:y="8.512cm">
          <draw:text-box>
            <text:p text:style-name="P261"><text:span text:style-name="T23"># Search for common key variable names</text:span></text:p>
          </draw:text-box>
        </draw:frame>
        <draw:frame draw:style-name="gr268" draw:text-style-name="P266" draw:layer="layout" svg:width="12.251cm" svg:height="0.433cm" svg:x="2.401cm" svg:y="8.989cm">
          <draw:text-box>
            <text:p text:style-name="P261"><text:span text:style-name="T23">grep -iE '(api_key|apikey|secret|token|password|auth|credential|private)' app.js</text:span></text:p>
          </draw:text-box>
        </draw:frame>
        <draw:frame draw:style-name="gr268" draw:text-style-name="P266" draw:layer="layout" svg:width="7.922cm" svg:height="0.433cm" svg:x="2.401cm" svg:y="9.943cm">
          <draw:text-box>
            <text:p text:style-name="P261"><text:span text:style-name="T23"># Look for base64-encoded strings (potential secrets)</text:span></text:p>
          </draw:text-box>
        </draw:frame>
        <draw:frame draw:style-name="gr268" draw:text-style-name="P266" draw:layer="layout" svg:width="5.903cm" svg:height="0.433cm" svg:x="2.401cm" svg:y="10.42cm">
          <draw:text-box>
            <text:p text:style-name="P261"><text:span text:style-name="T23">grep -oE '[A-Za-z0-9+/]{40,}={0,2}' app.js</text:span></text:p>
          </draw:text-box>
        </draw:frame>
        <draw:frame draw:style-name="gr268" draw:text-style-name="P266" draw:layer="layout" svg:width="2.655cm" svg:height="0.433cm" svg:x="2.401cm" svg:y="11.374cm">
          <draw:text-box>
            <text:p text:style-name="P261"><text:span text:style-name="T23"># Find JWT tokens</text:span></text:p>
          </draw:text-box>
        </draw:frame>
        <draw:frame draw:style-name="gr268" draw:text-style-name="P266" draw:layer="layout" svg:width="9.74cm" svg:height="0.433cm" svg:x="2.401cm" svg:y="11.851cm">
          <draw:text-box>
            <text:p text:style-name="P261"><text:span text:style-name="T23">grep -oE 'eyJ[A-Za-z0-9_-]*\.eyJ[A-Za-z0-9_-]*\.[A-Za-z0-9_-]*' app.js</text:span></text:p>
          </draw:text-box>
        </draw:frame>
        <draw:frame draw:style-name="gr268" draw:text-style-name="P266" draw:layer="layout" svg:width="5.905cm" svg:height="0.433cm" svg:x="2.401cm" svg:y="12.805cm">
          <draw:text-box>
            <text:p text:style-name="P261"><text:span text:style-name="T23"># Find hardcoded URLs with credentials</text:span></text:p>
          </draw:text-box>
        </draw:frame>
        <draw:frame draw:style-name="gr268" draw:text-style-name="P266" draw:layer="layout" svg:width="3.1cm" svg:height="0.433cm" svg:x="2.401cm" svg:y="13.282cm">
          <draw:text-box>
            <text:p text:style-name="P261"><text:span text:style-name="T23">https/://[^:]+:[^@]+@</text:span></text:p>
          </draw:text-box>
        </draw:frame>
        <draw:frame draw:style-name="gr268" draw:text-style-name="P266" draw:layer="layout" svg:width="2.428cm" svg:height="0.433cm" svg:x="2.401cm" svg:y="14.236cm">
          <draw:text-box>
            <text:p text:style-name="P261"><text:span text:style-name="T23"># Find AWS keys</text:span></text:p>
          </draw:text-box>
        </draw:frame>
        <draw:frame draw:style-name="gr268" draw:text-style-name="P266" draw:layer="layout" svg:width="4.927cm" svg:height="0.433cm" svg:x="2.401cm" svg:y="14.713cm">
          <draw:text-box>
            <text:p text:style-name="P261"><text:span text:style-name="T23">grep -oE 'AKIA[0-9A-Z]{16}' app.js</text:span></text:p>
          </draw:text-box>
        </draw:frame>
        <draw:frame draw:style-name="gr268" draw:text-style-name="P266" draw:layer="layout" svg:width="2.632cm" svg:height="0.433cm" svg:x="2.401cm" svg:y="15.667cm">
          <draw:text-box>
            <text:p text:style-name="P261"><text:span text:style-name="T23"># Find Stripe keys</text:span></text:p>
          </draw:text-box>
        </draw:frame>
        <draw:frame draw:style-name="gr268" draw:text-style-name="P266" draw:layer="layout" svg:width="10.077cm" svg:height="0.433cm" svg:x="2.401cm" svg:y="16.144cm">
          <draw:text-box>
            <text:p text:style-name="P261"><text:span text:style-name="T23">grep -oE '(pk_live_|sk_live_|pk_test_|sk_test_)[0-9a-zA-Z]{24,}' app.js</text:span></text:p>
          </draw:text-box>
        </draw:frame>
        <draw:frame draw:style-name="gr268" draw:text-style-name="P266" draw:layer="layout" svg:width="3.412cm" svg:height="0.433cm" svg:x="2.401cm" svg:y="17.098cm">
          <draw:text-box>
            <text:p text:style-name="P261"><text:span text:style-name="T23"># Find Google API keys</text:span></text:p>
          </draw:text-box>
        </draw:frame>
        <draw:frame draw:style-name="gr268" draw:text-style-name="P266" draw:layer="layout" svg:width="5.528cm" svg:height="0.433cm" svg:x="2.401cm" svg:y="17.575cm">
          <draw:text-box>
            <text:p text:style-name="P261"><text:span text:style-name="T23">grep -oE 'AIza[0-9A-Za-z_-]{35}' app.js</text:span></text:p>
          </draw:text-box>
        </draw:frame>
        <draw:frame draw:style-name="gr268" draw:text-style-name="P266" draw:layer="layout" svg:width="3.375cm" svg:height="0.433cm" svg:x="2.401cm" svg:y="18.53cm">
          <draw:text-box>
            <text:p text:style-name="P261"><text:span text:style-name="T23"># Find Slack webhooks</text:span></text:p>
          </draw:text-box>
        </draw:frame>
        <draw:frame draw:style-name="gr268" draw:text-style-name="P266" draw:layer="layout" svg:width="9.116cm" svg:height="0.433cm" svg:x="2.401cm" svg:y="19.007cm">
          <draw:text-box>
            <text:p text:style-name="P261"><text:span text:style-name="T23">grep -oE 'https://hooks\.slack\.com/services/[A-Z0-9/]+' app.js</text:span></text:p>
          </draw:text-box>
        </draw:frame>
        <draw:frame draw:style-name="gr268" draw:text-style-name="P266" draw:layer="layout" svg:width="3.755cm" svg:height="0.433cm" svg:x="2.401cm" svg:y="19.961cm">
          <draw:text-box>
            <text:p text:style-name="P261"><text:span text:style-name="T23"># Find Discord webhooks</text:span></text:p>
          </draw:text-box>
        </draw:frame>
        <draw:frame draw:style-name="gr268" draw:text-style-name="P266" draw:layer="layout" svg:width="10.816cm" svg:height="0.433cm" svg:x="2.401cm" svg:y="20.438cm">
          <draw:text-box>
            <text:p text:style-name="P261"><text:span text:style-name="T23">grep -oE 'https://discord\.com/api/webhooks/[0-9]+/[A-Za-z0-9_-]+' app.js</text:span></text:p>
          </draw:text-box>
        </draw:frame>
        <draw:path draw:style-name="gr279" draw:text-style-name="P278" draw:layer="layout" svg:width="3.154cm" svg:height="0.769cm" svg:x="2.027cm" svg:y="23.467cm" svg:viewBox="0 0 3155 770" svg:d="M0 676v-583c0-12 2-24 7-36 5-11 11-21 20-30 9-8 19-15 30-20 12-5 23-7 36-7h2969c12 0 24 2 35 7 12 5 22 12 30 20 9 9 16 19 21 30 4 12 7 24 7 36v583c0 12-3 24-7 35-5 12-12 23-21 31-8 9-18 16-30 21-11 4-23 7-35 7h-2969c-13 0-24-3-36-7-11-5-21-12-30-21-9-8-15-19-20-31-5-11-7-23-7-35z">
          <text:p/>
        </draw:path>
        <draw:path draw:style-name="gr280" draw:text-style-name="P202" draw:layer="layout" svg:width="3.154cm" svg:height="0.769cm" svg:x="2.027cm" svg:y="23.467cm" svg:viewBox="0 0 3155 770" svg:d="M0 676v-583c0-12 2-24 7-36 5-11 11-21 20-30 9-8 19-15 30-20 12-5 23-7 36-7h2969c12 0 24 2 35 7 12 5 22 12 30 20 9 9 16 19 21 30 4 12 7 24 7 36v583c0 12-3 24-7 35-5 12-12 23-21 31-8 9-18 16-30 21-11 4-23 7-35 7h-2969c-13 0-24-3-36-7-11-5-21-12-30-21-9-8-15-19-20-31-5-11-7-23-7-35z">
          <text:p/>
        </draw:path>
        <draw:frame draw:style-name="gr281" draw:text-style-name="P279" draw:layer="layout" svg:width="5.985cm" svg:height="0.725cm" svg:x="2.003cm" svg:y="22.146cm">
          <draw:text-box>
            <text:p text:style-name="P261"><text:span text:style-name="T17">2.4 Source Map Analysis</text:span></text:p>
          </draw:text-box>
        </draw:frame>
        <draw:frame draw:style-name="gr268" draw:text-style-name="P266" draw:layer="layout" svg:width="2.171cm" svg:height="0.433cm" svg:x="2.348cm" svg:y="23.618cm">
          <draw:text-box>
            <text:p text:style-name="P261"><text:span text:style-name="T18">SOURCE MAPS</text:span></text:p>
          </draw:text-box>
        </draw:frame>
        <draw:path draw:style-name="gr284" draw:text-style-name="P281" draw:layer="layout" svg:width="1.007cm" svg:height="0.53cm" svg:x="4.717cm" svg:y="24.858cm" svg:viewBox="0 0 1008 531" svg:d="M0 80c0-11 2-21 6-30 4-10 10-19 17-26 8-8 16-13 26-18 9-3 19-5 30-6h850c10 1 20 3 30 6 10 5 18 10 26 18 7 7 13 16 17 26 4 9 6 19 6 30v372c0 11-2 21-6 30-4 10-10 19-17 26-8 8-16 13-26 17s-20 6-31 6h-849c-10 0-20-2-30-6s-18-9-26-17c-7-7-13-16-17-26-4-9-6-19-6-30z">
          <text:p/>
        </draw:path>
        <draw:frame draw:style-name="gr278" draw:text-style-name="P277" draw:layer="layout" svg:width="2.639cm" svg:height="0.501cm" svg:x="2.003cm" svg:y="24.833cm">
          <draw:text-box>
            <text:p text:style-name="P261"><text:span text:style-name="T11">Source <text:s/>maps <text:s/>(</text:span></text:p>
          </draw:text-box>
        </draw:frame>
        <draw:frame draw:style-name="gr268" draw:text-style-name="P266" draw:layer="layout" svg:width="0.757cm" svg:height="0.433cm" svg:x="4.837cm" svg:y="24.89cm">
          <draw:text-box>
            <text:p text:style-name="P261"><text:span text:style-name="T20">.map</text:span></text:p>
          </draw:text-box>
        </draw:frame>
        <draw:frame draw:style-name="gr278" draw:text-style-name="P277" draw:layer="layout" svg:width="13.368cm" svg:height="0.501cm" svg:x="5.712cm" svg:y="24.833cm">
          <draw:text-box>
            <text:p text:style-name="P261"><text:span text:style-name="T11"><text:s text:c="2"/>files) <text:s/>are <text:s/>generated <text:s/>during <text:s/>build <text:s/>to <text:s/>map <text:s/>minified <text:s/>code <text:s/>back <text:s/>to <text:s/>original</text:span></text:p>
          </draw:text-box>
        </draw:frame>
        <draw:frame draw:style-name="gr278" draw:text-style-name="P277" draw:layer="layout" svg:width="17.405cm" svg:height="0.501cm" svg:x="2.003cm" svg:y="25.469cm">
          <draw:text-box>
            <text:p text:style-name="P261"><text:span text:style-name="T11">source. <text:s/>If <text:s/>exposed, <text:s/>they <text:s/>reveal <text:s/>the <text:s/>entire <text:s/>original <text:s/>codebase <text:s/>— <text:s/>comments, <text:s/>variable <text:s/>names, <text:s/>file</text:span></text:p>
          </draw:text-box>
        </draw:frame>
        <draw:frame draw:style-name="gr278" draw:text-style-name="P277" draw:layer="layout" svg:width="7.936cm" svg:height="0.501cm" svg:x="2.003cm" svg:y="26.079cm">
          <draw:text-box>
            <text:p text:style-name="P261"><text:span text:style-name="T11">structure, and sometimes hardcoded secrets. </text:span></text:p>
          </draw:text-box>
        </draw:frame>
        <draw:frame draw:style-name="gr278" draw:text-style-name="P277" draw:layer="layout" svg:width="0.461cm" svg:height="0.433cm" svg:x="10.007cm" svg:y="26.131cm">
          <draw:text-box>
            <text:p text:style-name="P261"><text:span text:style-name="T12">🗺</text:span></text:p>
          </draw:text-box>
        </draw:frame>
      </draw:page>
      <draw:page draw:name="page7" draw:style-name="dp1" draw:master-page-name="master-page569">
        <draw:frame draw:style-name="gr268" draw:text-style-name="P270" draw:layer="layout" svg:width="4.588cm" svg:height="0.446cm" svg:x="2.088cm" svg:y="0.879cm">
          <draw:text-box>
            <text:p text:style-name="P261"><text:span text:style-name="T8">3. Regex Patterns for JS Recon</text:span></text:p>
          </draw:text-box>
        </draw:frame>
        <draw:path draw:style-name="gr282" draw:text-style-name="P280" draw:layer="layout" svg:width="16.988cm" svg:height="11.157cm" svg:x="2.027cm" svg:y="3.432cm" svg:viewBox="0 0 16989 11158" svg:d="M0 11012v-10867c0-9 1-19 3-28 2-10 4-19 8-28 4-8 8-17 13-25 6-8 12-15 19-22 6-7 14-13 22-18s16-10 25-13c9-4 18-7 27-9 10-2 19-2 29-2h16697c10 0 19 0 28 2 10 2 19 5 28 9 9 3 17 8 25 13s15 11 22 18 13 14 18 22 10 17 14 25c3 9 6 18 8 28 2 9 3 19 3 28v10867c0 10-1 19-3 29-2 9-5 18-8 27-4 9-9 17-14 25s-11 15-18 22-14 13-22 18c-8 6-16 10-25 14-9 3-18 6-28 8-9 2-18 3-28 3h-16697c-10 0-19-1-29-3-9-2-18-5-27-8-9-4-17-8-25-14-8-5-16-11-22-18-7-7-13-14-19-22-5-8-9-16-13-25s-6-18-8-27c-2-10-3-19-3-29z">
          <text:p/>
        </draw:path>
        <draw:path draw:style-name="gr283" draw:text-style-name="P202" draw:layer="layout" svg:width="16.988cm" svg:height="11.157cm" svg:x="2.027cm" svg:y="3.432cm" svg:viewBox="0 0 16989 11158" svg:d="M0 11012v-10867c0-9 1-19 3-28 2-10 4-19 8-28 4-8 8-17 13-25 6-8 12-15 19-22 6-7 14-13 22-18s16-10 25-13c9-4 18-7 27-9 10-2 19-2 29-2h16697c10 0 19 0 28 2 10 2 19 5 28 9 9 3 17 8 25 13s15 11 22 18 13 14 18 22 10 17 14 25c3 9 6 18 8 28 2 9 3 19 3 28v10867c0 10-1 19-3 29-2 9-5 18-8 27-4 9-9 17-14 25s-11 15-18 22-14 13-22 18c-8 6-16 10-25 14-9 3-18 6-28 8-9 2-18 3-28 3h-16697c-10 0-19-1-29-3-9-2-18-5-27-8-9-4-17-8-25-14-8-5-16-11-22-18-7-7-13-14-19-22-5-8-9-16-13-25s-6-18-8-27c-2-10-3-19-3-29z">
          <text:p/>
        </draw:path>
        <draw:path draw:style-name="gr279" draw:text-style-name="P278" draw:layer="layout" svg:width="16.961cm" svg:height="3.366cm" svg:x="2.067cm" svg:y="14.973cm" svg:viewBox="0 0 16962 3367" svg:d="M0 3208v-3049c0-21 2-41 8-61 5-19 13-36 23-51s21-27 34-35 27-12 41-12h16697c10 0 21 1 31 3s20 5 30 9c9 4 19 9 27 15 9 6 17 12 24 20 8 7 14 15 20 24s11 18 15 27c4 10 7 20 9 30s3 21 3 31v3049c0 10-1 21-3 31s-5 20-9 30c-4 9-9 19-15 27-6 9-12 17-20 24-7 8-15 14-24 20-8 6-18 11-27 15-10 4-20 7-30 9s-21 3-31 3h-16697c-14 0-28-4-41-12s-24-20-34-35-18-32-23-51c-6-20-8-40-8-61z">
          <text:p/>
        </draw:path>
        <draw:polygon draw:style-name="gr286" draw:text-style-name="P283" draw:layer="layout" svg:width="0.159cm" svg:height="3.366cm" svg:x="2.014cm" svg:y="14.973cm" svg:viewBox="0 0 160 3367" draw:points="0,0 160,0 160,3367 0,3367">
          <text:p/>
        </draw:polygon>
        <draw:polygon draw:style-name="gr276" draw:text-style-name="P275" draw:layer="layout" svg:width="17.014cm" svg:height="0.053cm" svg:x="2.014cm" svg:y="23.56cm" svg:viewBox="0 0 17015 54" draw:points="0,0 17015,0 17015,54 0,54">
          <text:p/>
        </draw:polygon>
        <draw:polygon draw:style-name="gr282" draw:text-style-name="P280" draw:layer="layout" svg:width="5.989cm" svg:height="1.033cm" svg:x="2.014cm" svg:y="26.184cm" svg:viewBox="0 0 5990 1034" draw:points="0,0 5990,0 5990,1034 0,1034">
          <text:p/>
        </draw:polygon>
        <draw:polygon draw:style-name="gr282" draw:text-style-name="P280" draw:layer="layout" svg:width="5.804cm" svg:height="1.033cm" svg:x="8.003cm" svg:y="26.184cm" svg:viewBox="0 0 5805 1034" draw:points="0,0 5805,0 5805,1034 0,1034">
          <text:p/>
        </draw:polygon>
        <draw:polygon draw:style-name="gr282" draw:text-style-name="P280" draw:layer="layout" svg:width="5.221cm" svg:height="1.033cm" svg:x="13.807cm" svg:y="26.184cm" svg:viewBox="0 0 5222 1034" draw:points="0,0 5222,0 5222,1034 0,1034">
          <text:p/>
        </draw:polygon>
        <draw:polygon draw:style-name="gr287" draw:text-style-name="P284" draw:layer="layout" svg:width="5.989cm" svg:height="0.053cm" svg:x="2.014cm" svg:y="26.157cm" svg:viewBox="0 0 5990 54" draw:points="0,0 5990,0 5990,54 0,54">
          <text:p/>
        </draw:polygon>
        <draw:polygon draw:style-name="gr287" draw:text-style-name="P284" draw:layer="layout" svg:width="5.804cm" svg:height="0.053cm" svg:x="8.003cm" svg:y="26.157cm" svg:viewBox="0 0 5805 54" draw:points="0,0 5805,0 5805,54 0,54">
          <text:p/>
        </draw:polygon>
        <draw:polygon draw:style-name="gr287" draw:text-style-name="P284" draw:layer="layout" svg:width="5.221cm" svg:height="0.053cm" svg:x="13.807cm" svg:y="26.157cm" svg:viewBox="0 0 5222 54" draw:points="0,0 5222,0 5222,54 0,54">
          <text:p/>
        </draw:polygon>
        <draw:polygon draw:style-name="gr287" draw:text-style-name="P284" draw:layer="layout" svg:width="5.989cm" svg:height="0.027cm" svg:x="2.014cm" svg:y="27.217cm" svg:viewBox="0 0 5990 28" draw:points="0,0 5990,0 5990,28 0,28">
          <text:p/>
        </draw:polygon>
        <draw:polygon draw:style-name="gr287" draw:text-style-name="P284" draw:layer="layout" svg:width="5.804cm" svg:height="0.027cm" svg:x="8.003cm" svg:y="27.217cm" svg:viewBox="0 0 5805 28" draw:points="0,0 5805,0 5805,28 0,28">
          <text:p/>
        </draw:polygon>
        <draw:polygon draw:style-name="gr287" draw:text-style-name="P284" draw:layer="layout" svg:width="5.221cm" svg:height="0.027cm" svg:x="13.807cm" svg:y="27.217cm" svg:viewBox="0 0 5222 28" draw:points="0,0 5222,0 5222,28 0,28">
          <text:p/>
        </draw:polygon>
        <draw:path draw:style-name="gr276" draw:text-style-name="P275" draw:layer="layout" svg:width="4.85cm" svg:height="0.636cm" svg:x="2.014cm" svg:y="2.544cm" svg:viewBox="0 0 4851 637" svg:d="M0 637v-531c0-14 2-28 8-41 5-13 13-24 23-34s21-18 34-23c13-6 27-8 41-8h4639c14 0 27 2 40 8 13 5 25 13 34 23 10 10 18 21 23 34 6 13 9 27 9 41v531z">
          <text:p/>
        </draw:path>
        <draw:frame draw:style-name="gr268" draw:text-style-name="P266" draw:layer="layout" svg:width="0.317cm" svg:height="0.433cm" svg:x="2.003cm" svg:y="28.256cm">
          <draw:text-box>
            <text:p text:style-name="P261"><text:span text:style-name="T9">7</text:span></text:p>
          </draw:text-box>
        </draw:frame>
        <draw:frame draw:style-name="gr285" draw:text-style-name="P282" draw:layer="layout" svg:width="3.849cm" svg:height="0.391cm" svg:x="2.268cm" svg:y="2.64cm">
          <draw:text-box>
            <text:p text:style-name="P261"><text:span text:style-name="T22">SOURCE MAP EXPLOITATION</text:span></text:p>
          </draw:text-box>
        </draw:frame>
        <draw:frame draw:style-name="gr268" draw:text-style-name="P266" draw:layer="layout" svg:width="5.325cm" svg:height="0.433cm" svg:x="2.401cm" svg:y="3.768cm">
          <draw:text-box>
            <text:p text:style-name="P261"><text:span text:style-name="T23"># Step 1: Check if source map exists</text:span></text:p>
          </draw:text-box>
        </draw:frame>
        <draw:frame draw:style-name="gr268" draw:text-style-name="P266" draw:layer="layout" svg:width="9.116cm" svg:height="0.433cm" svg:x="2.401cm" svg:y="4.245cm">
          <draw:text-box>
            <text:p text:style-name="P261"><text:span text:style-name="T23">curl -sI https://target.com/static/js/app.1234.js.map | head -5</text:span></text:p>
          </draw:text-box>
        </draw:frame>
        <draw:frame draw:style-name="gr268" draw:text-style-name="P266" draw:layer="layout" svg:width="4.708cm" svg:height="0.433cm" svg:x="2.401cm" svg:y="5.199cm">
          <draw:text-box>
            <text:p text:style-name="P261"><text:span text:style-name="T23"># Step 2: Download and inspect</text:span></text:p>
          </draw:text-box>
        </draw:frame>
        <draw:frame draw:style-name="gr268" draw:text-style-name="P266" draw:layer="layout" svg:width="12.62cm" svg:height="0.433cm" svg:x="2.401cm" svg:y="5.676cm">
          <draw:text-box>
            <text:p text:style-name="P261"><text:span text:style-name="T23">curl -s https://target.com/static/js/app.1234.js.map | python3 -m json.tool | head -50</text:span></text:p>
          </draw:text-box>
        </draw:frame>
        <draw:frame draw:style-name="gr268" draw:text-style-name="P266" draw:layer="layout" svg:width="9.093cm" svg:height="0.433cm" svg:x="2.401cm" svg:y="6.63cm">
          <draw:text-box>
            <text:p text:style-name="P261"><text:span text:style-name="T23"># Step 3: Extract original filenames (reveals project structure)</text:span></text:p>
          </draw:text-box>
        </draw:frame>
        <draw:frame draw:style-name="gr268" draw:text-style-name="P266" draw:layer="layout" svg:width="6.417cm" svg:height="0.433cm" svg:x="2.401cm" svg:y="7.107cm">
          <draw:text-box>
            <text:p text:style-name="P261"><text:span text:style-name="T23">cat app.js.map | jq -r '.sources[]' | head -30</text:span></text:p>
          </draw:text-box>
        </draw:frame>
        <draw:frame draw:style-name="gr268" draw:text-style-name="P266" draw:layer="layout" svg:width="7.478cm" svg:height="0.433cm" svg:x="2.401cm" svg:y="8.061cm">
          <draw:text-box>
            <text:p text:style-name="P261"><text:span text:style-name="T23"># Step 4: Use sourcemapper to reconstruct source</text:span></text:p>
          </draw:text-box>
        </draw:frame>
        <draw:frame draw:style-name="gr268" draw:text-style-name="P266" draw:layer="layout" svg:width="7.673cm" svg:height="0.433cm" svg:x="2.401cm" svg:y="8.538cm">
          <draw:text-box>
            <text:p text:style-name="P261"><text:span text:style-name="T23">git clone https://github.com/daeken/sourcemapper</text:span></text:p>
          </draw:text-box>
        </draw:frame>
        <draw:frame draw:style-name="gr268" draw:text-style-name="P266" draw:layer="layout" svg:width="2.611cm" svg:height="0.433cm" svg:x="2.401cm" svg:y="9.015cm">
          <draw:text-box>
            <text:p text:style-name="P261"><text:span text:style-name="T23">cd sourcemapper</text:span></text:p>
          </draw:text-box>
        </draw:frame>
        <draw:frame draw:style-name="gr268" draw:text-style-name="P266" draw:layer="layout" svg:width="4.357cm" svg:height="0.433cm" svg:x="2.401cm" svg:y="9.492cm">
          <draw:text-box>
            <text:p text:style-name="P261"><text:span text:style-name="T23">pip install -r requirements.txt</text:span></text:p>
          </draw:text-box>
        </draw:frame>
        <draw:frame draw:style-name="gr268" draw:text-style-name="P266" draw:layer="layout" svg:width="1.322cm" svg:height="0.433cm" svg:x="2.401cm" svg:y="9.969cm">
          <draw:text-box>
            <text:p text:style-name="P261"><text:span text:style-name="T23">python3 </text:span></text:p>
          </draw:text-box>
        </draw:frame>
        <draw:frame draw:style-name="gr268" draw:text-style-name="P266" draw:layer="layout" svg:width="2.706cm" svg:height="0.433cm" svg:x="4.743cm" svg:y="9.969cm">
          <draw:text-box>
            <text:p text:style-name="P261"><text:span text:style-name="T23">sourcemapper.py </text:span></text:p>
          </draw:text-box>
        </draw:frame>
        <draw:frame draw:style-name="gr268" draw:text-style-name="P266" draw:layer="layout" svg:width="0.317cm" svg:height="0.433cm" svg:x="8.569cm" svg:y="9.969cm">
          <draw:text-box>
            <text:p text:style-name="P261"><text:span text:style-name="T23">-t </text:span></text:p>
          </draw:text-box>
        </draw:frame>
        <draw:frame draw:style-name="gr268" draw:text-style-name="P266" draw:layer="layout" svg:width="5.843cm" svg:height="0.433cm" svg:x="9.984cm" svg:y="9.969cm">
          <draw:text-box>
            <text:p text:style-name="P261"><text:span text:style-name="T23">https://target.com/static/js/app.js.map </text:span></text:p>
          </draw:text-box>
        </draw:frame>
        <draw:frame draw:style-name="gr268" draw:text-style-name="P266" draw:layer="layout" svg:width="0.317cm" svg:height="0.433cm" svg:x="18.262cm" svg:y="9.969cm">
          <draw:text-box>
            <text:p text:style-name="P261"><text:span text:style-name="T23">-o</text:span></text:p>
          </draw:text-box>
        </draw:frame>
        <draw:frame draw:style-name="gr268" draw:text-style-name="P266" draw:layer="layout" svg:width="2.783cm" svg:height="0.433cm" svg:x="2.401cm" svg:y="10.446cm">
          <draw:text-box>
            <text:p text:style-name="P261"><text:span text:style-name="T23">reconstructed_src/</text:span></text:p>
          </draw:text-box>
        </draw:frame>
        <draw:frame draw:style-name="gr268" draw:text-style-name="P266" draw:layer="layout" svg:width="5.565cm" svg:height="0.433cm" svg:x="2.401cm" svg:y="11.4cm">
          <draw:text-box>
            <text:p text:style-name="P261"><text:span text:style-name="T23"># Alternative: unwebpack-sourcemap</text:span></text:p>
          </draw:text-box>
        </draw:frame>
        <draw:frame draw:style-name="gr268" draw:text-style-name="P266" draw:layer="layout" svg:width="5.609cm" svg:height="0.433cm" svg:x="2.401cm" svg:y="11.877cm">
          <draw:text-box>
            <text:p text:style-name="P261"><text:span text:style-name="T23">npm install -g unwebpack-sourcemap</text:span></text:p>
          </draw:text-box>
        </draw:frame>
        <draw:frame draw:style-name="gr268" draw:text-style-name="P266" draw:layer="layout" svg:width="10.619cm" svg:height="0.433cm" svg:x="2.401cm" svg:y="12.355cm">
          <draw:text-box>
            <text:p text:style-name="P261"><text:span text:style-name="T23">unwebpack-sourcemap https://target.com/static/js/app.js.map ./source</text:span></text:p>
          </draw:text-box>
        </draw:frame>
        <draw:frame draw:style-name="gr268" draw:text-style-name="P266" draw:layer="layout" svg:width="7.034cm" svg:height="0.433cm" svg:x="2.401cm" svg:y="13.309cm">
          <draw:text-box>
            <text:p text:style-name="P261"><text:span text:style-name="T23"># Step 5: Grep reconstructed source for secrets</text:span></text:p>
          </draw:text-box>
        </draw:frame>
        <draw:frame draw:style-name="gr268" draw:text-style-name="P266" draw:layer="layout" svg:width="12.364cm" svg:height="0.433cm" svg:x="2.401cm" svg:y="13.786cm">
          <draw:text-box>
            <text:p text:style-name="P261"><text:span text:style-name="T23">grep -riE '(api_key|secret|token|password|internal)' reconstructed_src/ | head -20</text:span></text:p>
          </draw:text-box>
        </draw:frame>
        <draw:frame draw:style-name="gr278" draw:text-style-name="P277" draw:layer="layout" svg:width="3.837cm" svg:height="0.501cm" svg:x="2.533cm" svg:y="15.399cm">
          <draw:text-box>
            <text:p text:style-name="P261"><text:span text:style-name="T24">Source Map Goldmine</text:span></text:p>
          </draw:text-box>
        </draw:frame>
        <draw:frame draw:style-name="gr264" draw:text-style-name="P262" draw:layer="layout" svg:width="15.57cm" svg:height="0.48cm" svg:x="2.533cm" svg:y="16.133cm">
          <draw:text-box>
            <text:p text:style-name="P261"><text:span text:style-name="T15">Source maps often contain </text:span><text:span text:style-name="T14">the entire original source code</text:span><text:span text:style-name="T15"> including developer comments with</text:span></text:p>
          </draw:text-box>
        </draw:frame>
        <draw:frame draw:style-name="gr264" draw:text-style-name="P262" draw:layer="layout" svg:width="15.434cm" svg:height="0.48cm" svg:x="2.533cm" svg:y="16.716cm">
          <draw:text-box>
            <text:p text:style-name="P261"><text:span text:style-name="T15">TODOs, internal URLs, API documentation links, and hardcoded test credentials. Always check</text:span></text:p>
          </draw:text-box>
        </draw:frame>
        <draw:path draw:style-name="gr284" draw:text-style-name="P281" draw:layer="layout" svg:width="4.161cm" svg:height="0.53cm" svg:x="3.127cm" svg:y="17.305cm" svg:viewBox="0 0 4162 531" svg:d="M0 80c0-11 2-21 6-31 4-9 10-18 17-25 7-8 16-14 26-18 9-4 19-6 30-6h4004c10 0 20 2 29 6 10 4 19 10 26 18 8 7 13 16 18 25 4 10 6 20 6 31v372c0 10-2 21-6 30-5 10-10 19-18 26-7 8-16 13-26 17-9 4-19 6-30 6h-4003c-10 0-20-2-30-6s-19-9-26-17c-7-7-13-16-17-26-4-9-6-20-6-30z">
          <text:p/>
        </draw:path>
        <draw:frame draw:style-name="gr264" draw:text-style-name="P262" draw:layer="layout" svg:width="0.572cm" svg:height="0.48cm" svg:x="2.533cm" svg:y="17.299cm">
          <draw:text-box>
            <text:p text:style-name="P261"><text:span text:style-name="T15">for </text:span></text:p>
          </draw:text-box>
        </draw:frame>
        <draw:frame draw:style-name="gr268" draw:text-style-name="P266" draw:layer="layout" svg:width="3.636cm" svg:height="0.433cm" svg:x="3.249cm" svg:y="17.337cm">
          <draw:text-box>
            <text:p text:style-name="P261"><text:span text:style-name="T20">//# sourceMappingURL=</text:span></text:p>
          </draw:text-box>
        </draw:frame>
        <draw:frame draw:style-name="gr264" draw:text-style-name="P262" draw:layer="layout" svg:width="4.025cm" svg:height="0.48cm" svg:x="7.277cm" svg:y="17.299cm">
          <draw:text-box>
            <text:p text:style-name="P261"><text:span text:style-name="T15"><text:s/>at the bottom of JS files.</text:span></text:p>
          </draw:text-box>
        </draw:frame>
        <draw:frame draw:style-name="gr277" draw:text-style-name="P276" draw:layer="layout" svg:width="10.961cm" svg:height="1.064cm" svg:x="2.003cm" svg:y="18.781cm">
          <draw:text-box>
            <text:p text:style-name="P261"><text:span text:style-name="T10">3. Regex Patterns for JS Recon</text:span></text:p>
          </draw:text-box>
        </draw:frame>
        <draw:frame draw:style-name="gr278" draw:text-style-name="P277" draw:layer="layout" svg:width="16.028cm" svg:height="0.501cm" svg:x="2.003cm" svg:y="20.514cm">
          <draw:text-box>
            <text:p text:style-name="P261"><text:span text:style-name="T11">These regex patterns are designed to extract specific artifacts from JavaScript files. Use them</text:span></text:p>
          </draw:text-box>
        </draw:frame>
        <draw:path draw:style-name="gr284" draw:text-style-name="P281" draw:layer="layout" svg:width="1.564cm" svg:height="0.53cm" svg:x="2.835cm" svg:y="21.148cm" svg:viewBox="0 0 1565 531" svg:d="M0 80c0-11 2-21 6-31s10-18 18-26c7-7 16-13 25-17 10-4 19-6 29-6h1409c10 0 19 2 29 6s18 10 26 17c7 8 13 16 17 26s6 20 6 31v372c0 10-2 20-6 30s-10 18-17 26c-8 7-16 13-26 17s-20 6-30 6h-1407c-10 0-20-2-30-6-9-4-18-10-25-17-8-8-14-16-18-26s-6-20-6-30z">
          <text:p/>
        </draw:path>
        <draw:frame draw:style-name="gr278" draw:text-style-name="P277" draw:layer="layout" svg:width="0.843cm" svg:height="0.501cm" svg:x="2.003cm" svg:y="21.123cm">
          <draw:text-box>
            <text:p text:style-name="P261"><text:span text:style-name="T11">with </text:span></text:p>
          </draw:text-box>
        </draw:frame>
        <draw:frame draw:style-name="gr268" draw:text-style-name="P266" draw:layer="layout" svg:width="1.08cm" svg:height="0.433cm" svg:x="2.957cm" svg:y="21.18cm">
          <draw:text-box>
            <text:p text:style-name="P261"><text:span text:style-name="T20">grep -P</text:span></text:p>
          </draw:text-box>
        </draw:frame>
        <draw:path draw:style-name="gr284" draw:text-style-name="P281" draw:layer="layout" svg:width="1.563cm" svg:height="0.53cm" svg:x="4.611cm" svg:y="21.148cm" svg:viewBox="0 0 1564 531" svg:d="M0 452v-372c0-11 2-21 6-31s10-18 17-26c8-7 16-13 26-17 9-4 19-6 29-6h1408c10 0 20 2 29 6 10 4 19 10 26 17 8 8 13 16 17 26s6 20 6 31v372c0 10-2 20-6 30s-9 18-17 26c-7 7-16 13-26 17-9 4-19 6-29 6h-1408c-10 0-20-2-29-6-10-4-18-10-26-17-7-8-13-16-17-26s-6-20-6-30z">
          <text:p/>
        </draw:path>
        <draw:frame draw:style-name="gr278" draw:text-style-name="P277" draw:layer="layout" svg:width="0.37cm" svg:height="0.501cm" svg:x="4.388cm" svg:y="21.123cm">
          <draw:text-box>
            <text:p text:style-name="P261"><text:span text:style-name="T11">, </text:span></text:p>
          </draw:text-box>
        </draw:frame>
        <draw:frame draw:style-name="gr268" draw:text-style-name="P266" draw:layer="layout" svg:width="1.111cm" svg:height="0.433cm" svg:x="4.733cm" svg:y="21.18cm">
          <draw:text-box>
            <text:p text:style-name="P261"><text:span text:style-name="T20">ripgrep</text:span></text:p>
          </draw:text-box>
        </draw:frame>
        <draw:frame draw:style-name="gr278" draw:text-style-name="P277" draw:layer="layout" svg:width="3.793cm" svg:height="0.501cm" svg:x="6.164cm" svg:y="21.123cm">
          <draw:text-box>
            <text:p text:style-name="P261"><text:span text:style-name="T11">, or in custom scripts. </text:span></text:p>
          </draw:text-box>
        </draw:frame>
        <draw:frame draw:style-name="gr278" draw:text-style-name="P277" draw:layer="layout" svg:width="0.461cm" svg:height="0.433cm" svg:x="9.98cm" svg:y="21.175cm">
          <draw:text-box>
            <text:p text:style-name="P261"><text:span text:style-name="T12">🔤</text:span></text:p>
          </draw:text-box>
        </draw:frame>
        <draw:path draw:style-name="gr288" draw:text-style-name="P285" draw:layer="layout" svg:width="1.776cm" svg:height="0.769cm" svg:x="2.027cm" svg:y="23.891cm" svg:viewBox="0 0 1777 770" svg:d="M0 677v-584c0-12 2-24 7-36 5-11 11-21 20-30 9-8 19-15 30-20 12-5 23-7 36-7h1591c12 0 24 2 35 7 12 5 22 12 30 20 9 9 16 19 20 30 5 12 8 24 8 36v584c0 12-3 24-8 35-4 12-11 22-20 31-8 8-18 15-30 20-11 4-23 7-35 7h-1591c-13 0-24-3-36-7-11-5-21-12-30-20-9-9-15-19-20-31-5-11-7-23-7-35z">
          <text:p/>
        </draw:path>
        <draw:path draw:style-name="gr289" draw:text-style-name="P202" draw:layer="layout" svg:width="1.776cm" svg:height="0.769cm" svg:x="2.027cm" svg:y="23.891cm" svg:viewBox="0 0 1777 770" svg:d="M0 677v-584c0-12 2-24 7-36 5-11 11-21 20-30 9-8 19-15 30-20 12-5 23-7 36-7h1591c12 0 24 2 35 7 12 5 22 12 30 20 9 9 16 19 20 30 5 12 8 24 8 36v584c0 12-3 24-8 35-4 12-11 22-20 31-8 8-18 15-30 20-11 4-23 7-35 7h-1591c-13 0-24-3-36-7-11-5-21-12-30-20-9-9-15-19-20-31-5-11-7-23-7-35z">
          <text:p/>
        </draw:path>
        <draw:frame draw:style-name="gr281" draw:text-style-name="P279" draw:layer="layout" svg:width="4.992cm" svg:height="0.725cm" svg:x="2.003cm" svg:y="22.57cm">
          <draw:text-box>
            <text:p text:style-name="P261"><text:span text:style-name="T17">3.1 API Key Patterns</text:span></text:p>
          </draw:text-box>
        </draw:frame>
        <draw:frame draw:style-name="gr268" draw:text-style-name="P266" draw:layer="layout" svg:width="0.97cm" svg:height="0.433cm" svg:x="2.348cm" svg:y="24.042cm">
          <draw:text-box>
            <text:p text:style-name="P261"><text:span text:style-name="T25">REGEX</text:span></text:p>
          </draw:text-box>
        </draw:frame>
        <draw:frame draw:style-name="gr278" draw:text-style-name="P277" draw:layer="layout" svg:width="5.364cm" svg:height="0.501cm" svg:x="2.003cm" svg:y="25.416cm">
          <draw:text-box>
            <text:p text:style-name="P261"><text:span text:style-name="T21">Table 1 </text:span><text:span text:style-name="T26">API Key Regex Patterns</text:span></text:p>
          </draw:text-box>
        </draw:frame>
        <draw:frame draw:style-name="gr264" draw:text-style-name="P262" draw:layer="layout" svg:width="1.174cm" svg:height="0.48cm" svg:x="2.268cm" svg:y="26.442cm">
          <draw:text-box>
            <text:p text:style-name="P261"><text:span text:style-name="T14">Service</text:span></text:p>
          </draw:text-box>
        </draw:frame>
        <draw:frame draw:style-name="gr264" draw:text-style-name="P262" draw:layer="layout" svg:width="1.226cm" svg:height="0.48cm" svg:x="8.257cm" svg:y="26.442cm">
          <draw:text-box>
            <text:p text:style-name="P261"><text:span text:style-name="T14">Pattern</text:span></text:p>
          </draw:text-box>
        </draw:frame>
        <draw:frame draw:style-name="gr264" draw:text-style-name="P262" draw:layer="layout" svg:width="1.019cm" svg:height="0.48cm" svg:x="14.076cm" svg:y="26.442cm">
          <draw:text-box>
            <text:p text:style-name="P261"><text:span text:style-name="T14">Regex</text:span></text:p>
          </draw:text-box>
        </draw:frame>
      </draw:page>
      <draw:page draw:name="page8" draw:style-name="dp1" draw:master-page-name="master-page569">
        <draw:frame draw:style-name="gr268" draw:text-style-name="P270" draw:layer="layout" svg:width="4.588cm" svg:height="0.446cm" svg:x="2.088cm" svg:y="0.879cm">
          <draw:text-box>
            <text:p text:style-name="P261"><text:span text:style-name="T8">3. Regex Patterns for JS Recon</text:span></text:p>
          </draw:text-box>
        </draw:frame>
        <draw:polygon draw:style-name="gr276" draw:text-style-name="P275" draw:layer="layout" svg:width="2.915cm" svg:height="0.027cm" svg:x="2.014cm" svg:y="3.789cm" svg:viewBox="0 0 2916 28" draw:points="0,0 2916,0 2916,28 0,28">
          <text:p/>
        </draw:polygon>
        <draw:polygon draw:style-name="gr276" draw:text-style-name="P275" draw:layer="layout" svg:width="4.32cm" svg:height="0.027cm" svg:x="4.929cm" svg:y="3.789cm" svg:viewBox="0 0 4321 28" draw:points="0,0 4321,0 4321,28 0,28">
          <text:p/>
        </draw:polygon>
        <draw:polygon draw:style-name="gr276" draw:text-style-name="P275" draw:layer="layout" svg:width="9.779cm" svg:height="0.027cm" svg:x="9.249cm" svg:y="3.789cm" svg:viewBox="0 0 9780 28" draw:points="0,0 9780,0 9780,28 0,28">
          <text:p/>
        </draw:polygon>
        <draw:polygon draw:style-name="gr276" draw:text-style-name="P275" draw:layer="layout" svg:width="2.915cm" svg:height="0.026cm" svg:x="2.014cm" svg:y="5.406cm" svg:viewBox="0 0 2916 27" draw:points="0,0 2916,0 2916,27 0,27">
          <text:p/>
        </draw:polygon>
        <draw:polygon draw:style-name="gr276" draw:text-style-name="P275" draw:layer="layout" svg:width="4.32cm" svg:height="0.026cm" svg:x="4.929cm" svg:y="5.406cm" svg:viewBox="0 0 4321 27" draw:points="0,0 4321,0 4321,27 0,27">
          <text:p/>
        </draw:polygon>
        <draw:polygon draw:style-name="gr276" draw:text-style-name="P275" draw:layer="layout" svg:width="9.779cm" svg:height="0.026cm" svg:x="9.249cm" svg:y="5.406cm" svg:viewBox="0 0 9780 27" draw:points="0,0 9780,0 9780,27 0,27">
          <text:p/>
        </draw:polygon>
        <draw:polygon draw:style-name="gr276" draw:text-style-name="P275" draw:layer="layout" svg:width="2.915cm" svg:height="0.026cm" svg:x="2.014cm" svg:y="7.023cm" svg:viewBox="0 0 2916 27" draw:points="0,0 2916,0 2916,27 0,27">
          <text:p/>
        </draw:polygon>
        <draw:polygon draw:style-name="gr276" draw:text-style-name="P275" draw:layer="layout" svg:width="4.32cm" svg:height="0.026cm" svg:x="4.929cm" svg:y="7.023cm" svg:viewBox="0 0 4321 27" draw:points="0,0 4321,0 4321,27 0,27">
          <text:p/>
        </draw:polygon>
        <draw:polygon draw:style-name="gr276" draw:text-style-name="P275" draw:layer="layout" svg:width="9.779cm" svg:height="0.026cm" svg:x="9.249cm" svg:y="7.023cm" svg:viewBox="0 0 9780 27" draw:points="0,0 9780,0 9780,27 0,27">
          <text:p/>
        </draw:polygon>
        <draw:polygon draw:style-name="gr276" draw:text-style-name="P275" draw:layer="layout" svg:width="2.915cm" svg:height="0.027cm" svg:x="2.014cm" svg:y="8.639cm" svg:viewBox="0 0 2916 28" draw:points="0,0 2916,0 2916,28 0,28">
          <text:p/>
        </draw:polygon>
        <draw:polygon draw:style-name="gr276" draw:text-style-name="P275" draw:layer="layout" svg:width="4.32cm" svg:height="0.027cm" svg:x="4.929cm" svg:y="8.639cm" svg:viewBox="0 0 4321 28" draw:points="0,0 4321,0 4321,28 0,28">
          <text:p/>
        </draw:polygon>
        <draw:polygon draw:style-name="gr276" draw:text-style-name="P275" draw:layer="layout" svg:width="9.779cm" svg:height="0.027cm" svg:x="9.249cm" svg:y="8.639cm" svg:viewBox="0 0 9780 28" draw:points="0,0 9780,0 9780,28 0,28">
          <text:p/>
        </draw:polygon>
        <draw:polygon draw:style-name="gr276" draw:text-style-name="P275" draw:layer="layout" svg:width="2.915cm" svg:height="0.026cm" svg:x="2.014cm" svg:y="10.256cm" svg:viewBox="0 0 2916 27" draw:points="0,0 2916,0 2916,27 0,27">
          <text:p/>
        </draw:polygon>
        <draw:polygon draw:style-name="gr276" draw:text-style-name="P275" draw:layer="layout" svg:width="4.32cm" svg:height="0.026cm" svg:x="4.929cm" svg:y="10.256cm" svg:viewBox="0 0 4321 27" draw:points="0,0 4321,0 4321,27 0,27">
          <text:p/>
        </draw:polygon>
        <draw:polygon draw:style-name="gr276" draw:text-style-name="P275" draw:layer="layout" svg:width="9.779cm" svg:height="0.026cm" svg:x="9.249cm" svg:y="10.256cm" svg:viewBox="0 0 9780 27" draw:points="0,0 9780,0 9780,27 0,27">
          <text:p/>
        </draw:polygon>
        <draw:polygon draw:style-name="gr276" draw:text-style-name="P275" draw:layer="layout" svg:width="2.915cm" svg:height="0.027cm" svg:x="2.014cm" svg:y="11.872cm" svg:viewBox="0 0 2916 28" draw:points="0,0 2916,0 2916,28 0,28">
          <text:p/>
        </draw:polygon>
        <draw:polygon draw:style-name="gr276" draw:text-style-name="P275" draw:layer="layout" svg:width="4.32cm" svg:height="0.027cm" svg:x="4.929cm" svg:y="11.872cm" svg:viewBox="0 0 4321 28" draw:points="0,0 4321,0 4321,28 0,28">
          <text:p/>
        </draw:polygon>
        <draw:polygon draw:style-name="gr276" draw:text-style-name="P275" draw:layer="layout" svg:width="9.779cm" svg:height="0.027cm" svg:x="9.249cm" svg:y="11.872cm" svg:viewBox="0 0 9780 28" draw:points="0,0 9780,0 9780,28 0,28">
          <text:p/>
        </draw:polygon>
        <draw:polygon draw:style-name="gr276" draw:text-style-name="P275" draw:layer="layout" svg:width="2.915cm" svg:height="0.027cm" svg:x="2.014cm" svg:y="13.489cm" svg:viewBox="0 0 2916 28" draw:points="0,0 2916,0 2916,28 0,28">
          <text:p/>
        </draw:polygon>
        <draw:polygon draw:style-name="gr276" draw:text-style-name="P275" draw:layer="layout" svg:width="4.32cm" svg:height="0.027cm" svg:x="4.929cm" svg:y="13.489cm" svg:viewBox="0 0 4321 28" draw:points="0,0 4321,0 4321,28 0,28">
          <text:p/>
        </draw:polygon>
        <draw:polygon draw:style-name="gr276" draw:text-style-name="P275" draw:layer="layout" svg:width="9.779cm" svg:height="0.027cm" svg:x="9.249cm" svg:y="13.489cm" svg:viewBox="0 0 9780 28" draw:points="0,0 9780,0 9780,28 0,28">
          <text:p/>
        </draw:polygon>
        <draw:polygon draw:style-name="gr276" draw:text-style-name="P275" draw:layer="layout" svg:width="2.915cm" svg:height="0.026cm" svg:x="2.014cm" svg:y="14.523cm" svg:viewBox="0 0 2916 27" draw:points="0,0 2916,0 2916,27 0,27">
          <text:p/>
        </draw:polygon>
        <draw:polygon draw:style-name="gr276" draw:text-style-name="P275" draw:layer="layout" svg:width="4.32cm" svg:height="0.026cm" svg:x="4.929cm" svg:y="14.523cm" svg:viewBox="0 0 4321 27" draw:points="0,0 4321,0 4321,27 0,27">
          <text:p/>
        </draw:polygon>
        <draw:polygon draw:style-name="gr276" draw:text-style-name="P275" draw:layer="layout" svg:width="9.779cm" svg:height="0.026cm" svg:x="9.249cm" svg:y="14.523cm" svg:viewBox="0 0 9780 27" draw:points="0,0 9780,0 9780,27 0,27">
          <text:p/>
        </draw:polygon>
        <draw:polygon draw:style-name="gr276" draw:text-style-name="P275" draw:layer="layout" svg:width="2.915cm" svg:height="0.027cm" svg:x="2.014cm" svg:y="15.556cm" svg:viewBox="0 0 2916 28" draw:points="0,0 2916,0 2916,28 0,28">
          <text:p/>
        </draw:polygon>
        <draw:polygon draw:style-name="gr276" draw:text-style-name="P275" draw:layer="layout" svg:width="4.32cm" svg:height="0.027cm" svg:x="4.929cm" svg:y="15.556cm" svg:viewBox="0 0 4321 28" draw:points="0,0 4321,0 4321,28 0,28">
          <text:p/>
        </draw:polygon>
        <draw:polygon draw:style-name="gr276" draw:text-style-name="P275" draw:layer="layout" svg:width="9.779cm" svg:height="0.027cm" svg:x="9.249cm" svg:y="15.556cm" svg:viewBox="0 0 9780 28" draw:points="0,0 9780,0 9780,28 0,28">
          <text:p/>
        </draw:polygon>
        <draw:polygon draw:style-name="gr276" draw:text-style-name="P275" draw:layer="layout" svg:width="2.915cm" svg:height="0.026cm" svg:x="2.014cm" svg:y="17.173cm" svg:viewBox="0 0 2916 27" draw:points="0,0 2916,0 2916,27 0,27">
          <text:p/>
        </draw:polygon>
        <draw:polygon draw:style-name="gr276" draw:text-style-name="P275" draw:layer="layout" svg:width="4.32cm" svg:height="0.026cm" svg:x="4.929cm" svg:y="17.173cm" svg:viewBox="0 0 4321 27" draw:points="0,0 4321,0 4321,27 0,27">
          <text:p/>
        </draw:polygon>
        <draw:polygon draw:style-name="gr276" draw:text-style-name="P275" draw:layer="layout" svg:width="9.779cm" svg:height="0.026cm" svg:x="9.249cm" svg:y="17.173cm" svg:viewBox="0 0 9780 27" draw:points="0,0 9780,0 9780,27 0,27">
          <text:p/>
        </draw:polygon>
        <draw:polygon draw:style-name="gr276" draw:text-style-name="P275" draw:layer="layout" svg:width="2.915cm" svg:height="0.027cm" svg:x="2.014cm" svg:y="18.206cm" svg:viewBox="0 0 2916 28" draw:points="0,0 2916,0 2916,28 0,28">
          <text:p/>
        </draw:polygon>
        <draw:polygon draw:style-name="gr276" draw:text-style-name="P275" draw:layer="layout" svg:width="4.32cm" svg:height="0.027cm" svg:x="4.929cm" svg:y="18.206cm" svg:viewBox="0 0 4321 28" draw:points="0,0 4321,0 4321,28 0,28">
          <text:p/>
        </draw:polygon>
        <draw:polygon draw:style-name="gr276" draw:text-style-name="P275" draw:layer="layout" svg:width="9.779cm" svg:height="0.027cm" svg:x="9.249cm" svg:y="18.206cm" svg:viewBox="0 0 9780 28" draw:points="0,0 9780,0 9780,28 0,28">
          <text:p/>
        </draw:polygon>
        <draw:polygon draw:style-name="gr276" draw:text-style-name="P275" draw:layer="layout" svg:width="2.915cm" svg:height="0.027cm" svg:x="2.014cm" svg:y="19.24cm" svg:viewBox="0 0 2916 28" draw:points="0,0 2916,0 2916,28 0,28">
          <text:p/>
        </draw:polygon>
        <draw:polygon draw:style-name="gr276" draw:text-style-name="P275" draw:layer="layout" svg:width="4.32cm" svg:height="0.027cm" svg:x="4.929cm" svg:y="19.24cm" svg:viewBox="0 0 4321 28" draw:points="0,0 4321,0 4321,28 0,28">
          <text:p/>
        </draw:polygon>
        <draw:polygon draw:style-name="gr276" draw:text-style-name="P275" draw:layer="layout" svg:width="9.779cm" svg:height="0.027cm" svg:x="9.249cm" svg:y="19.24cm" svg:viewBox="0 0 9780 28" draw:points="0,0 9780,0 9780,28 0,28">
          <text:p/>
        </draw:polygon>
        <draw:polygon draw:style-name="gr276" draw:text-style-name="P275" draw:layer="layout" svg:width="2.915cm" svg:height="0.026cm" svg:x="2.014cm" svg:y="20.274cm" svg:viewBox="0 0 2916 27" draw:points="0,0 2916,0 2916,27 0,27">
          <text:p/>
        </draw:polygon>
        <draw:polygon draw:style-name="gr276" draw:text-style-name="P275" draw:layer="layout" svg:width="4.32cm" svg:height="0.026cm" svg:x="4.929cm" svg:y="20.274cm" svg:viewBox="0 0 4321 27" draw:points="0,0 4321,0 4321,27 0,27">
          <text:p/>
        </draw:polygon>
        <draw:polygon draw:style-name="gr276" draw:text-style-name="P275" draw:layer="layout" svg:width="9.779cm" svg:height="0.026cm" svg:x="9.249cm" svg:y="20.274cm" svg:viewBox="0 0 9780 27" draw:points="0,0 9780,0 9780,27 0,27">
          <text:p/>
        </draw:polygon>
        <draw:polygon draw:style-name="gr276" draw:text-style-name="P275" draw:layer="layout" svg:width="2.915cm" svg:height="0.027cm" svg:x="2.014cm" svg:y="21.89cm" svg:viewBox="0 0 2916 28" draw:points="0,0 2916,0 2916,28 0,28">
          <text:p/>
        </draw:polygon>
        <draw:polygon draw:style-name="gr276" draw:text-style-name="P275" draw:layer="layout" svg:width="4.32cm" svg:height="0.027cm" svg:x="4.929cm" svg:y="21.89cm" svg:viewBox="0 0 4321 28" draw:points="0,0 4321,0 4321,28 0,28">
          <text:p/>
        </draw:polygon>
        <draw:polygon draw:style-name="gr276" draw:text-style-name="P275" draw:layer="layout" svg:width="9.779cm" svg:height="0.027cm" svg:x="9.249cm" svg:y="21.89cm" svg:viewBox="0 0 9780 28" draw:points="0,0 9780,0 9780,28 0,28">
          <text:p/>
        </draw:polygon>
        <draw:polygon draw:style-name="gr276" draw:text-style-name="P275" draw:layer="layout" svg:width="2.915cm" svg:height="0.026cm" svg:x="2.014cm" svg:y="22.924cm" svg:viewBox="0 0 2916 27" draw:points="0,0 2916,0 2916,27 0,27">
          <text:p/>
        </draw:polygon>
        <draw:polygon draw:style-name="gr276" draw:text-style-name="P275" draw:layer="layout" svg:width="4.32cm" svg:height="0.026cm" svg:x="4.929cm" svg:y="22.924cm" svg:viewBox="0 0 4321 27" draw:points="0,0 4321,0 4321,27 0,27">
          <text:p/>
        </draw:polygon>
        <draw:polygon draw:style-name="gr276" draw:text-style-name="P275" draw:layer="layout" svg:width="9.779cm" svg:height="0.026cm" svg:x="9.249cm" svg:y="22.924cm" svg:viewBox="0 0 9780 27" draw:points="0,0 9780,0 9780,27 0,27">
          <text:p/>
        </draw:polygon>
        <draw:polygon draw:style-name="gr276" draw:text-style-name="P275" draw:layer="layout" svg:width="2.915cm" svg:height="0.027cm" svg:x="2.014cm" svg:y="24.54cm" svg:viewBox="0 0 2916 28" draw:points="0,0 2916,0 2916,28 0,28">
          <text:p/>
        </draw:polygon>
        <draw:polygon draw:style-name="gr276" draw:text-style-name="P275" draw:layer="layout" svg:width="4.32cm" svg:height="0.027cm" svg:x="4.929cm" svg:y="24.54cm" svg:viewBox="0 0 4321 28" draw:points="0,0 4321,0 4321,28 0,28">
          <text:p/>
        </draw:polygon>
        <draw:polygon draw:style-name="gr276" draw:text-style-name="P275" draw:layer="layout" svg:width="9.779cm" svg:height="0.027cm" svg:x="9.249cm" svg:y="24.54cm" svg:viewBox="0 0 9780 28" draw:points="0,0 9780,0 9780,28 0,28">
          <text:p/>
        </draw:polygon>
        <draw:polygon draw:style-name="gr287" draw:text-style-name="P284" draw:layer="layout" svg:width="2.915cm" svg:height="0.053cm" svg:x="2.014cm" svg:y="26.157cm" svg:viewBox="0 0 2916 54" draw:points="0,0 2916,0 2916,54 0,54">
          <text:p/>
        </draw:polygon>
        <draw:polygon draw:style-name="gr287" draw:text-style-name="P284" draw:layer="layout" svg:width="4.32cm" svg:height="0.053cm" svg:x="4.929cm" svg:y="26.157cm" svg:viewBox="0 0 4321 54" draw:points="0,0 4321,0 4321,54 0,54">
          <text:p/>
        </draw:polygon>
        <draw:polygon draw:style-name="gr287" draw:text-style-name="P284" draw:layer="layout" svg:width="9.779cm" svg:height="0.053cm" svg:x="9.249cm" svg:y="26.157cm" svg:viewBox="0 0 9780 54" draw:points="0,0 9780,0 9780,54 0,54">
          <text:p/>
        </draw:polygon>
        <draw:frame draw:style-name="gr268" draw:text-style-name="P266" draw:layer="layout" svg:width="0.317cm" svg:height="0.433cm" svg:x="2.003cm" svg:y="28.256cm">
          <draw:text-box>
            <text:p text:style-name="P261"><text:span text:style-name="T9">8</text:span></text:p>
          </draw:text-box>
        </draw:frame>
        <draw:frame draw:style-name="gr264" draw:text-style-name="P262" draw:layer="layout" svg:width="0.838cm" svg:height="0.48cm" svg:x="2.268cm" svg:y="2.432cm">
          <draw:text-box>
            <text:p text:style-name="P261"><text:span text:style-name="T15">AWS </text:span></text:p>
          </draw:text-box>
        </draw:frame>
        <draw:frame draw:style-name="gr264" draw:text-style-name="P262" draw:layer="layout" svg:width="1.099cm" svg:height="0.48cm" svg:x="3.409cm" svg:y="2.432cm">
          <draw:text-box>
            <text:p text:style-name="P261"><text:span text:style-name="T15">Access</text:span></text:p>
          </draw:text-box>
        </draw:frame>
        <draw:frame draw:style-name="gr264" draw:text-style-name="P262" draw:layer="layout" svg:width="0.597cm" svg:height="0.48cm" svg:x="2.268cm" svg:y="3.015cm">
          <draw:text-box>
            <text:p text:style-name="P261"><text:span text:style-name="T15">Key</text:span></text:p>
          </draw:text-box>
        </draw:frame>
        <draw:path draw:style-name="gr284" draw:text-style-name="P281" draw:layer="layout" svg:width="3.233cm" svg:height="0.53cm" svg:x="9.514cm" svg:y="2.438cm" svg:viewBox="0 0 3234 531" svg:d="M0 79c0-10 2-21 6-30 4-10 10-19 17-26s16-13 26-17c9-4 19-6 29-6h3078c10 0 20 2 29 6 10 4 18 10 26 17 7 7 13 16 17 26 4 9 6 20 6 30v371c0 11-2 21-6 32-4 9-10 18-17 25-8 8-16 14-26 18s-20 6-31 6h-3075c-10 0-20-2-30-6s-19-10-26-18c-7-7-13-16-17-25-4-11-6-21-6-32z">
          <text:p/>
        </draw:path>
        <draw:frame draw:style-name="gr264" draw:text-style-name="P262" draw:layer="layout" svg:width="3.762cm" svg:height="0.48cm" svg:x="5.184cm" svg:y="2.432cm">
          <draw:text-box>
            <text:p text:style-name="P261"><text:span text:style-name="T15">AKIAxxxxxxxxxxxxxxxx</text:span></text:p>
          </draw:text-box>
        </draw:frame>
        <draw:frame draw:style-name="gr268" draw:text-style-name="P266" draw:layer="layout" svg:width="2.478cm" svg:height="0.433cm" svg:x="9.637cm" svg:y="2.469cm">
          <draw:text-box>
            <text:p text:style-name="P261"><text:span text:style-name="T20">AKIA[0-9A-Z]{16}</text:span></text:p>
          </draw:text-box>
        </draw:frame>
        <draw:frame draw:style-name="gr264" draw:text-style-name="P262" draw:layer="layout" svg:width="0.838cm" svg:height="0.48cm" svg:x="2.268cm" svg:y="4.048cm">
          <draw:text-box>
            <text:p text:style-name="P261"><text:span text:style-name="T15">AWS </text:span></text:p>
          </draw:text-box>
        </draw:frame>
        <draw:frame draw:style-name="gr264" draw:text-style-name="P262" draw:layer="layout" svg:width="1.032cm" svg:height="0.48cm" svg:x="3.541cm" svg:y="4.048cm">
          <draw:text-box>
            <text:p text:style-name="P261"><text:span text:style-name="T15">Secret</text:span></text:p>
          </draw:text-box>
        </draw:frame>
        <draw:frame draw:style-name="gr264" draw:text-style-name="P262" draw:layer="layout" svg:width="0.597cm" svg:height="0.48cm" svg:x="2.268cm" svg:y="4.631cm">
          <draw:text-box>
            <text:p text:style-name="P261"><text:span text:style-name="T15">Key</text:span></text:p>
          </draw:text-box>
        </draw:frame>
        <draw:path draw:style-name="gr284" draw:text-style-name="P281" draw:layer="layout" svg:width="3.604cm" svg:height="0.53cm" svg:x="9.514cm" svg:y="4.054cm" svg:viewBox="0 0 3605 531" svg:d="M0 80c0-11 2-21 6-31 4-9 10-18 17-25 7-8 16-14 26-18 9-4 19-6 30-6h3447c10 0 20 2 30 6s18 10 26 18c7 7 13 16 17 25 4 10 6 20 6 31v372c0 10-2 21-6 30-4 10-10 19-17 26-8 8-16 13-26 17s-20 6-30 6h-3447c-10 0-20-2-30-6s-19-9-26-17c-7-7-13-16-17-26-4-9-6-20-6-30z">
          <text:p/>
        </draw:path>
        <draw:frame draw:style-name="gr264" draw:text-style-name="P262" draw:layer="layout" svg:width="3.266cm" svg:height="0.48cm" svg:x="5.184cm" svg:y="4.048cm">
          <draw:text-box>
            <text:p text:style-name="P261"><text:span text:style-name="T15">Base64-ish 40 chars</text:span></text:p>
          </draw:text-box>
        </draw:frame>
        <draw:frame draw:style-name="gr268" draw:text-style-name="P266" draw:layer="layout" svg:width="2.679cm" svg:height="0.433cm" svg:x="9.637cm" svg:y="4.086cm">
          <draw:text-box>
            <text:p text:style-name="P261"><text:span text:style-name="T20">[A-Za-z0-9/+=]{40}</text:span></text:p>
          </draw:text-box>
        </draw:frame>
        <draw:frame draw:style-name="gr264" draw:text-style-name="P262" draw:layer="layout" svg:width="1.279cm" svg:height="0.48cm" svg:x="2.268cm" svg:y="5.665cm">
          <draw:text-box>
            <text:p text:style-name="P261"><text:span text:style-name="T15">Google </text:span></text:p>
          </draw:text-box>
        </draw:frame>
        <draw:frame draw:style-name="gr264" draw:text-style-name="P262" draw:layer="layout" svg:width="0.558cm" svg:height="0.48cm" svg:x="4.071cm" svg:y="5.665cm">
          <draw:text-box>
            <text:p text:style-name="P261"><text:span text:style-name="T15">API</text:span></text:p>
          </draw:text-box>
        </draw:frame>
        <draw:frame draw:style-name="gr264" draw:text-style-name="P262" draw:layer="layout" svg:width="0.597cm" svg:height="0.48cm" svg:x="2.268cm" svg:y="6.248cm">
          <draw:text-box>
            <text:p text:style-name="P261"><text:span text:style-name="T15">Key</text:span></text:p>
          </draw:text-box>
        </draw:frame>
        <draw:path draw:style-name="gr284" draw:text-style-name="P281" draw:layer="layout" svg:width="4.161cm" svg:height="0.53cm" svg:x="9.514cm" svg:y="5.671cm" svg:viewBox="0 0 4162 531" svg:d="M0 79c0-10 2-20 6-30s10-18 17-26c7-7 16-13 26-17s20-6 30-6h4003c11 0 21 2 30 6 10 4 19 10 26 17 8 8 13 16 18 26 4 10 6 20 6 30v373c0 10-2 20-6 30-5 10-10 18-18 26-7 7-16 13-26 17-9 4-19 6-29 6h-4004c-11 0-21-2-30-6-10-4-19-10-26-17-7-8-13-16-17-26s-6-20-6-30z">
          <text:p/>
        </draw:path>
        <draw:frame draw:style-name="gr264" draw:text-style-name="P262" draw:layer="layout" svg:width="0.99cm" svg:height="0.48cm" svg:x="5.184cm" svg:y="5.665cm">
          <draw:text-box>
            <text:p text:style-name="P261"><text:span text:style-name="T15">AIza...</text:span></text:p>
          </draw:text-box>
        </draw:frame>
        <draw:frame draw:style-name="gr268" draw:text-style-name="P266" draw:layer="layout" svg:width="3.078cm" svg:height="0.433cm" svg:x="9.637cm" svg:y="5.703cm">
          <draw:text-box>
            <text:p text:style-name="P261"><text:span text:style-name="T20">AIza[0-9A-Za-z_-]{35}</text:span></text:p>
          </draw:text-box>
        </draw:frame>
        <draw:frame draw:style-name="gr264" draw:text-style-name="P262" draw:layer="layout" svg:width="2.339cm" svg:height="0.48cm" svg:x="2.268cm" svg:y="7.281cm">
          <draw:text-box>
            <text:p text:style-name="P261"><text:span text:style-name="T15">Google OAuth</text:span></text:p>
          </draw:text-box>
        </draw:frame>
        <draw:path draw:style-name="gr284" draw:text-style-name="P281" draw:layer="layout" svg:width="3.657cm" svg:height="0.53cm" svg:x="9.514cm" svg:y="7.288cm" svg:viewBox="0 0 3658 531" svg:d="M0 79c0-10 2-21 6-30 4-10 10-19 17-26 7-8 16-13 26-17 9-4 19-6 29-6h3580v531h-3579c-10 0-20-2-30-6-10-5-19-10-26-18-7-7-13-16-17-25-4-10-6-20-6-31z">
          <text:p/>
        </draw:path>
        <draw:frame draw:style-name="gr264" draw:text-style-name="P262" draw:layer="layout" svg:width="1.414cm" svg:height="0.48cm" svg:x="5.184cm" svg:y="7.281cm">
          <draw:text-box>
            <text:p text:style-name="P261"><text:span text:style-name="T15">Client ID</text:span></text:p>
          </draw:text-box>
        </draw:frame>
        <draw:path draw:style-name="gr284" draw:text-style-name="P281" draw:layer="layout" svg:width="6.44cm" svg:height="0.53cm" svg:x="9.514cm" svg:y="7.871cm" svg:viewBox="0 0 6441 531" svg:d="M0 0h6362c10 0 20 2 30 6 9 4 18 9 25 17 8 7 14 16 18 26 4 9 6 20 6 30v372c0 11-2 21-6 31-4 9-10 18-18 25-7 8-16 14-25 18-10 4-20 6-31 6h-6361z">
          <text:p/>
        </draw:path>
        <draw:frame draw:style-name="gr268" draw:text-style-name="P266" draw:layer="layout" svg:width="2.692cm" svg:height="0.433cm" svg:x="9.637cm" svg:y="7.319cm">
          <draw:text-box>
            <text:p text:style-name="P261"><text:span text:style-name="T20">[0-9]+-[0-9A-Za-z_]</text:span></text:p>
          </draw:text-box>
        </draw:frame>
        <draw:frame draw:style-name="gr268" draw:text-style-name="P266" draw:layer="layout" svg:width="5.418cm" svg:height="0.433cm" svg:x="9.504cm" svg:y="7.902cm">
          <draw:text-box>
            <text:p text:style-name="P261"><text:span text:style-name="T20">{32}\.apps\.googleusercontent\.com</text:span></text:p>
          </draw:text-box>
        </draw:frame>
        <draw:frame draw:style-name="gr264" draw:text-style-name="P262" draw:layer="layout" svg:width="1.941cm" svg:height="0.48cm" svg:x="2.268cm" svg:y="8.898cm">
          <draw:text-box>
            <text:p text:style-name="P261"><text:span text:style-name="T15">Slack Token</text:span></text:p>
          </draw:text-box>
        </draw:frame>
        <draw:path draw:style-name="gr284" draw:text-style-name="P281" draw:layer="layout" svg:width="8.48cm" svg:height="0.53cm" svg:x="9.514cm" svg:y="8.904cm" svg:viewBox="0 0 8481 531" svg:d="M0 80c0-11 2-21 6-31 4-9 10-18 17-26 7-7 16-13 26-17s20-6 30-6h8402v531h-8402c-10 0-20-2-30-6s-19-10-26-17c-7-8-13-16-17-26s-6-20-6-30z">
          <text:p/>
        </draw:path>
        <draw:frame draw:style-name="gr264" draw:text-style-name="P262" draw:layer="layout" svg:width="1.198cm" svg:height="0.48cm" svg:x="5.184cm" svg:y="8.898cm">
          <draw:text-box>
            <text:p text:style-name="P261"><text:span text:style-name="T15">xoxb-...</text:span></text:p>
          </draw:text-box>
        </draw:frame>
        <draw:path draw:style-name="gr284" draw:text-style-name="P281" draw:layer="layout" svg:width="0.874cm" svg:height="0.53cm" svg:x="9.514cm" svg:y="9.487cm" svg:viewBox="0 0 875 531" svg:d="M0 0h796c10 0 20 2 30 6s19 10 26 18c7 7 13 16 17 25 4 10 6 20 6 31v372c0 10-2 20-6 30s-10 19-17 26-16 13-26 17c-9 4-19 6-30 6h-796z">
          <text:p/>
        </draw:path>
        <draw:frame draw:style-name="gr268" draw:text-style-name="P266" draw:layer="layout" svg:width="6.554cm" svg:height="0.433cm" svg:x="9.637cm" svg:y="8.936cm">
          <draw:text-box>
            <text:p text:style-name="P261"><text:span text:style-name="T20">xox[baprs]-[0-9]{10,13}-[0-9]{10,13}[a-zA-Z0-</text:span></text:p>
          </draw:text-box>
        </draw:frame>
        <draw:frame draw:style-name="gr268" draw:text-style-name="P266" draw:layer="layout" svg:width="0.565cm" svg:height="0.433cm" svg:x="9.504cm" svg:y="9.519cm">
          <draw:text-box>
            <text:p text:style-name="P261"><text:span text:style-name="T20">9-]*</text:span></text:p>
          </draw:text-box>
        </draw:frame>
        <draw:frame draw:style-name="gr264" draw:text-style-name="P262" draw:layer="layout" svg:width="0.839cm" svg:height="0.48cm" svg:x="2.268cm" svg:y="10.515cm">
          <draw:text-box>
            <text:p text:style-name="P261"><text:span text:style-name="T15">Slack</text:span></text:p>
          </draw:text-box>
        </draw:frame>
        <draw:frame draw:style-name="gr264" draw:text-style-name="P262" draw:layer="layout" svg:width="1.573cm" svg:height="0.48cm" svg:x="2.268cm" svg:y="11.098cm">
          <draw:text-box>
            <text:p text:style-name="P261"><text:span text:style-name="T15">Webhook</text:span></text:p>
          </draw:text-box>
        </draw:frame>
        <draw:path draw:style-name="gr284" draw:text-style-name="P281" draw:layer="layout" svg:width="8.613cm" svg:height="0.53cm" svg:x="9.514cm" svg:y="10.521cm" svg:viewBox="0 0 8614 531" svg:d="M0 79c0-10 2-20 6-30s10-18 17-26c7-7 16-13 26-17 9-4 19-6 29-6h8458c10 0 19 2 29 6s18 10 26 17c7 8 13 16 17 26s6 20 6 30v372c0 11-2 21-6 31s-10 18-17 26c-8 7-16 13-26 17s-20 6-31 6h-8455c-10 0-20-2-30-6s-19-10-26-17c-7-8-13-16-17-26s-6-20-6-31z">
          <text:p/>
        </draw:path>
        <draw:frame draw:style-name="gr264" draw:text-style-name="P262" draw:layer="layout" svg:width="3.124cm" svg:height="0.48cm" svg:x="5.184cm" svg:y="10.515cm">
          <draw:text-box>
            <text:p text:style-name="P261"><text:span text:style-name="T15">hooks.slack.com/...</text:span></text:p>
          </draw:text-box>
        </draw:frame>
        <draw:frame draw:style-name="gr268" draw:text-style-name="P266" draw:layer="layout" svg:width="6.666cm" svg:height="0.433cm" svg:x="9.637cm" svg:y="10.552cm">
          <draw:text-box>
            <text:p text:style-name="P261"><text:span text:style-name="T20">https://hooks\.slack\.com/services/[A-Z0-9/]+</text:span></text:p>
          </draw:text-box>
        </draw:frame>
        <draw:frame draw:style-name="gr264" draw:text-style-name="P262" draw:layer="layout" svg:width="1.658cm" svg:height="0.48cm" svg:x="2.268cm" svg:y="12.131cm">
          <draw:text-box>
            <text:p text:style-name="P261"><text:span text:style-name="T15">Stripe Key</text:span></text:p>
          </draw:text-box>
        </draw:frame>
        <draw:path draw:style-name="gr284" draw:text-style-name="P281" draw:layer="layout" svg:width="8.48cm" svg:height="0.53cm" svg:x="9.514cm" svg:y="12.137cm" svg:viewBox="0 0 8481 531" svg:d="M0 80c0-11 2-21 6-30 4-10 10-19 17-26 7-8 16-14 26-18 9-3 19-5 30-6h8402v531h-8402c-10 0-20-2-30-6s-19-9-26-17c-7-7-13-16-17-26-4-9-6-19-6-30z">
          <text:p/>
        </draw:path>
        <draw:frame draw:style-name="gr264" draw:text-style-name="P262" draw:layer="layout" svg:width="2.632cm" svg:height="0.48cm" svg:x="5.184cm" svg:y="12.131cm">
          <draw:text-box>
            <text:p text:style-name="P261"><text:span text:style-name="T15">pk_live_/sk_live_</text:span></text:p>
          </draw:text-box>
        </draw:frame>
        <draw:path draw:style-name="gr284" draw:text-style-name="P281" draw:layer="layout" svg:width="1.06cm" svg:height="0.53cm" svg:x="9.514cm" svg:y="12.721cm" svg:viewBox="0 0 1061 531" svg:d="M0 0h981c11 0 21 2 31 6 9 4 18 9 26 17 7 7 13 16 17 26 4 9 6 19 6 30v372c0 11-2 21-6 30-4 10-10 19-17 26-8 8-17 13-26 17-10 5-20 7-31 7h-981z">
          <text:p/>
        </draw:path>
        <draw:frame draw:style-name="gr268" draw:text-style-name="P266" draw:layer="layout" svg:width="6.515cm" svg:height="0.433cm" svg:x="9.637cm" svg:y="12.169cm">
          <draw:text-box>
            <text:p text:style-name="P261"><text:span text:style-name="T20">(pk_live|sk_live|pk_test|sk_test)_[0-9a-zA-Z]</text:span></text:p>
          </draw:text-box>
        </draw:frame>
        <draw:frame draw:style-name="gr268" draw:text-style-name="P266" draw:layer="layout" svg:width="0.692cm" svg:height="0.433cm" svg:x="9.504cm" svg:y="12.752cm">
          <draw:text-box>
            <text:p text:style-name="P261"><text:span text:style-name="T20">{24,}</text:span></text:p>
          </draw:text-box>
        </draw:frame>
        <draw:frame draw:style-name="gr264" draw:text-style-name="P262" draw:layer="layout" svg:width="2.271cm" svg:height="0.48cm" svg:x="2.268cm" svg:y="13.748cm">
          <draw:text-box>
            <text:p text:style-name="P261"><text:span text:style-name="T15">GitHub Token</text:span></text:p>
          </draw:text-box>
        </draw:frame>
        <draw:path draw:style-name="gr284" draw:text-style-name="P281" draw:layer="layout" svg:width="5.274cm" svg:height="0.53cm" svg:x="9.514cm" svg:y="13.754cm" svg:viewBox="0 0 5275 531" svg:d="M0 80c0-11 2-21 6-31s10-18 17-26c7-7 16-13 26-17s20-6 30-6h5116c11 0 21 2 31 6 9 4 18 10 25 17 8 8 14 16 18 26s6 20 6 30v373c0 10-2 20-6 30s-10 18-18 26c-7 7-16 13-25 17-10 4-20 6-30 6h-5117c-11 0-21-2-30-6-10-4-19-10-26-17-7-8-13-16-17-26s-6-20-6-30z">
          <text:p/>
        </draw:path>
        <draw:frame draw:style-name="gr264" draw:text-style-name="P262" draw:layer="layout" svg:width="1.09cm" svg:height="0.48cm" svg:x="5.184cm" svg:y="13.748cm">
          <draw:text-box>
            <text:p text:style-name="P261"><text:span text:style-name="T15">ghp_...</text:span></text:p>
          </draw:text-box>
        </draw:frame>
        <draw:frame draw:style-name="gr268" draw:text-style-name="P266" draw:layer="layout" svg:width="4.031cm" svg:height="0.433cm" svg:x="9.637cm" svg:y="13.786cm">
          <draw:text-box>
            <text:p text:style-name="P261"><text:span text:style-name="T20">gh[pousr]_[A-Za-z0-9_]{36,}</text:span></text:p>
          </draw:text-box>
        </draw:frame>
        <draw:frame draw:style-name="gr264" draw:text-style-name="P262" draw:layer="layout" svg:width="2.175cm" svg:height="0.48cm" svg:x="2.268cm" svg:y="14.782cm">
          <draw:text-box>
            <text:p text:style-name="P261"><text:span text:style-name="T15">GitLab Token</text:span></text:p>
          </draw:text-box>
        </draw:frame>
        <draw:path draw:style-name="gr284" draw:text-style-name="P281" draw:layer="layout" svg:width="4.532cm" svg:height="0.53cm" svg:x="9.514cm" svg:y="14.788cm" svg:viewBox="0 0 4533 531" svg:d="M0 79c0-10 2-21 6-30 4-10 10-19 17-26 7-8 16-13 26-17 9-4 19-6 29-6h4376c10 0 20 2 30 6 9 4 18 9 25 17 8 7 14 16 18 26 4 9 6 20 6 30v372c0 11-2 21-6 31-4 9-10 18-18 25-7 8-16 14-25 18-10 4-20 6-30 6h-4376c-10 0-20-2-29-6-10-4-19-10-26-18-7-7-13-16-17-25-4-10-6-20-6-31z">
          <text:p/>
        </draw:path>
        <draw:frame draw:style-name="gr264" draw:text-style-name="P262" draw:layer="layout" svg:width="1.244cm" svg:height="0.48cm" svg:x="5.184cm" svg:y="14.782cm">
          <draw:text-box>
            <text:p text:style-name="P261"><text:span text:style-name="T15">glpat-...</text:span></text:p>
          </draw:text-box>
        </draw:frame>
        <draw:frame draw:style-name="gr268" draw:text-style-name="P266" draw:layer="layout" svg:width="3.308cm" svg:height="0.433cm" svg:x="9.637cm" svg:y="14.819cm">
          <draw:text-box>
            <text:p text:style-name="P261"><text:span text:style-name="T20">glpat-[A-Za-z0-9_-]{20}</text:span></text:p>
          </draw:text-box>
        </draw:frame>
        <draw:frame draw:style-name="gr264" draw:text-style-name="P262" draw:layer="layout" svg:width="1.871cm" svg:height="0.48cm" svg:x="2.268cm" svg:y="15.815cm">
          <draw:text-box>
            <text:p text:style-name="P261"><text:span text:style-name="T15">Heroku API</text:span></text:p>
          </draw:text-box>
        </draw:frame>
        <draw:path draw:style-name="gr284" draw:text-style-name="P281" draw:layer="layout" svg:width="8.666cm" svg:height="0.53cm" svg:x="9.514cm" svg:y="15.821cm" svg:viewBox="0 0 8667 531" svg:d="M0 80c0-11 2-21 6-31 4-9 10-18 17-25 7-8 16-14 26-18 9-4 19-6 29-6h8589v531h-8588c-10 0-20-2-30-6s-19-10-26-17-13-16-17-26-6-20-6-30z">
          <text:p/>
        </draw:path>
        <draw:frame draw:style-name="gr264" draw:text-style-name="P262" draw:layer="layout" svg:width="1.303cm" svg:height="0.48cm" svg:x="5.184cm" svg:y="15.815cm">
          <draw:text-box>
            <text:p text:style-name="P261"><text:span text:style-name="T15">Hex key</text:span></text:p>
          </draw:text-box>
        </draw:frame>
        <draw:path draw:style-name="gr284" draw:text-style-name="P281" draw:layer="layout" svg:width="7.553cm" svg:height="0.53cm" svg:x="9.514cm" svg:y="16.404cm" svg:viewBox="0 0 7554 531" svg:d="M0 0h7475c10 0 20 2 30 6s18 10 26 18c7 7 13 16 17 25 4 10 6 20 6 31v372c0 10-2 20-6 30s-10 19-17 26c-8 7-16 13-26 17s-20 6-31 6h-7474z">
          <text:p/>
        </draw:path>
        <draw:frame draw:style-name="gr268" draw:text-style-name="P266" draw:layer="layout" svg:width="6.679cm" svg:height="0.433cm" svg:x="9.637cm" svg:y="15.853cm">
          <draw:text-box>
            <text:p text:style-name="P261"><text:span text:style-name="T20">[hH][eE][rR][oO][kK][uU].*[0-9A-F]{8}-[0-9A-F]</text:span></text:p>
          </draw:text-box>
        </draw:frame>
        <draw:frame draw:style-name="gr268" draw:text-style-name="P266" draw:layer="layout" svg:width="5.615cm" svg:height="0.433cm" svg:x="9.504cm" svg:y="16.436cm">
          <draw:text-box>
            <text:p text:style-name="P261"><text:span text:style-name="T20">{4}-[0-9A-F]{4}-[0-9A-F]{4}-[0-9A-F]{12}</text:span></text:p>
          </draw:text-box>
        </draw:frame>
        <draw:frame draw:style-name="gr264" draw:text-style-name="P262" draw:layer="layout" svg:width="2.036cm" svg:height="0.48cm" svg:x="2.268cm" svg:y="17.432cm">
          <draw:text-box>
            <text:p text:style-name="P261"><text:span text:style-name="T15">Mailgun Key</text:span></text:p>
          </draw:text-box>
        </draw:frame>
        <draw:path draw:style-name="gr284" draw:text-style-name="P281" draw:layer="layout" svg:width="3.79cm" svg:height="0.53cm" svg:x="9.514cm" svg:y="17.438cm" svg:viewBox="0 0 3791 531" svg:d="M0 79c0-10 2-20 6-30s10-18 17-26c7-7 16-13 26-17s20-6 30-6h3631c11 0 21 2 30 6 11 4 20 10 27 17 8 8 13 16 17 26 5 10 7 20 7 30v372c0 11-2 21-7 31-4 10-9 18-17 26-7 7-16 13-27 17-9 4-19 6-30 6h-3631c-10 0-20-2-30-6s-19-10-26-17c-7-8-13-16-17-26s-6-20-6-31z">
          <text:p/>
        </draw:path>
        <draw:frame draw:style-name="gr264" draw:text-style-name="P262" draw:layer="layout" svg:width="0.963cm" svg:height="0.48cm" svg:x="5.184cm" svg:y="17.432cm">
          <draw:text-box>
            <text:p text:style-name="P261"><text:span text:style-name="T15">key-...</text:span></text:p>
          </draw:text-box>
        </draw:frame>
        <draw:frame draw:style-name="gr268" draw:text-style-name="P266" draw:layer="layout" svg:width="2.81cm" svg:height="0.433cm" svg:x="9.637cm" svg:y="17.469cm">
          <draw:text-box>
            <text:p text:style-name="P261"><text:span text:style-name="T20">key-[0-9a-zA-Z]{32}</text:span></text:p>
          </draw:text-box>
        </draw:frame>
        <draw:frame draw:style-name="gr264" draw:text-style-name="P262" draw:layer="layout" svg:width="1.618cm" svg:height="0.48cm" svg:x="2.268cm" svg:y="18.465cm">
          <draw:text-box>
            <text:p text:style-name="P261"><text:span text:style-name="T15">Twilio SID</text:span></text:p>
          </draw:text-box>
        </draw:frame>
        <draw:path draw:style-name="gr284" draw:text-style-name="P281" draw:layer="layout" svg:width="2.862cm" svg:height="0.53cm" svg:x="9.514cm" svg:y="18.471cm" svg:viewBox="0 0 2863 531" svg:d="M0 80c0-11 2-21 6-30 4-10 10-19 17-26 7-8 16-14 26-18s20-6 30-6h2704c11 0 21 2 31 6s18 10 26 18c7 7 13 16 17 26 4 9 6 19 6 30v372c0 11-2 21-6 30-4 10-10 19-17 26-8 8-16 13-26 17s-20 6-30 6h-2705c-10 0-21-2-30-6-10-4-19-9-26-17-7-7-13-16-17-26-4-9-6-19-6-30z">
          <text:p/>
        </draw:path>
        <draw:frame draw:style-name="gr264" draw:text-style-name="P262" draw:layer="layout" svg:width="0.731cm" svg:height="0.48cm" svg:x="5.184cm" svg:y="18.465cm">
          <draw:text-box>
            <text:p text:style-name="P261"><text:span text:style-name="T15">AC...</text:span></text:p>
          </draw:text-box>
        </draw:frame>
        <draw:frame draw:style-name="gr268" draw:text-style-name="P266" draw:layer="layout" svg:width="2.114cm" svg:height="0.433cm" svg:x="9.637cm" svg:y="18.503cm">
          <draw:text-box>
            <text:p text:style-name="P261"><text:span text:style-name="T20">AC[a-z0-9]{32}</text:span></text:p>
          </draw:text-box>
        </draw:frame>
        <draw:frame draw:style-name="gr264" draw:text-style-name="P262" draw:layer="layout" svg:width="2.22cm" svg:height="0.48cm" svg:x="2.268cm" svg:y="19.499cm">
          <draw:text-box>
            <text:p text:style-name="P261"><text:span text:style-name="T15">SendGrid Key</text:span></text:p>
          </draw:text-box>
        </draw:frame>
        <draw:path draw:style-name="gr284" draw:text-style-name="P281" draw:layer="layout" svg:width="7.685cm" svg:height="0.53cm" svg:x="9.514cm" svg:y="19.505cm" svg:viewBox="0 0 7686 531" svg:d="M0 80c0-11 2-21 6-31s10-18 17-26c7-7 16-13 26-17 9-4 19-6 29-6h7530c10 0 20 2 29 6 10 4 19 10 26 17 8 8 13 16 17 26s6 20 6 31v372c0 10-2 20-6 30s-9 18-17 26c-7 7-16 13-26 17-9 4-19 6-29 6h-7530c-10 0-20-2-29-6-10-4-19-10-26-17-7-8-13-16-17-26s-6-20-6-30z">
          <text:p/>
        </draw:path>
        <draw:frame draw:style-name="gr264" draw:text-style-name="P262" draw:layer="layout" svg:width="0.545cm" svg:height="0.48cm" svg:x="5.184cm" svg:y="19.499cm">
          <draw:text-box>
            <text:p text:style-name="P261"><text:span text:style-name="T15">SG.</text:span></text:p>
          </draw:text-box>
        </draw:frame>
        <draw:frame draw:style-name="gr268" draw:text-style-name="P266" draw:layer="layout" svg:width="5.691cm" svg:height="0.433cm" svg:x="9.637cm" svg:y="19.537cm">
          <draw:text-box>
            <text:p text:style-name="P261"><text:span text:style-name="T20">SG\.[A-Za-z0-9_-]{22}\.[A-Za-z0-9_-]{43}</text:span></text:p>
          </draw:text-box>
        </draw:frame>
        <draw:frame draw:style-name="gr264" draw:text-style-name="P262" draw:layer="layout" svg:width="1.81cm" svg:height="0.48cm" svg:x="2.268cm" svg:y="20.532cm">
          <draw:text-box>
            <text:p text:style-name="P261"><text:span text:style-name="T15">Algolia Key</text:span></text:p>
          </draw:text-box>
        </draw:frame>
        <draw:path draw:style-name="gr284" draw:text-style-name="P281" draw:layer="layout" svg:width="8.48cm" svg:height="0.53cm" svg:x="9.514cm" svg:y="20.539cm" svg:viewBox="0 0 8481 531" svg:d="M0 79c0-10 2-21 6-30 4-10 10-19 17-26 7-8 16-13 26-17 9-4 19-6 29-6h8403v531h-8402c-10 0-20-2-30-6s-19-10-26-18c-7-7-13-16-17-25-4-10-6-20-6-31z">
          <text:p/>
        </draw:path>
        <draw:frame draw:style-name="gr264" draw:text-style-name="P262" draw:layer="layout" svg:width="2.104cm" svg:height="0.48cm" svg:x="5.184cm" svg:y="20.532cm">
          <draw:text-box>
            <text:p text:style-name="P261"><text:span text:style-name="T15">App ID + Key</text:span></text:p>
          </draw:text-box>
        </draw:frame>
        <draw:path draw:style-name="gr284" draw:text-style-name="P281" draw:layer="layout" svg:width="0.874cm" svg:height="0.53cm" svg:x="9.514cm" svg:y="21.122cm" svg:viewBox="0 0 875 531" svg:d="M0 0h797c10 0 20 2 29 6 10 4 19 9 26 17 7 7 13 16 17 26 4 9 6 20 6 30v372c0 11-2 21-6 31-4 9-10 18-17 25-7 8-16 14-26 18s-20 6-30 6h-796z">
          <text:p/>
        </draw:path>
        <draw:frame draw:style-name="gr268" draw:text-style-name="P266" draw:layer="layout" svg:width="6.477cm" svg:height="0.433cm" svg:x="9.637cm" svg:y="20.57cm">
          <draw:text-box>
            <text:p text:style-name="P261"><text:span text:style-name="T20">algolia.*[a-z0-9]{10}|algoliasearch.*[a-z0-9]</text:span></text:p>
          </draw:text-box>
        </draw:frame>
        <draw:frame draw:style-name="gr268" draw:text-style-name="P266" draw:layer="layout" svg:width="0.607cm" svg:height="0.433cm" svg:x="9.504cm" svg:y="21.153cm">
          <draw:text-box>
            <text:p text:style-name="P261"><text:span text:style-name="T20">{32}</text:span></text:p>
          </draw:text-box>
        </draw:frame>
        <draw:frame draw:style-name="gr264" draw:text-style-name="P262" draw:layer="layout" svg:width="2.084cm" svg:height="0.48cm" svg:x="2.268cm" svg:y="22.149cm">
          <draw:text-box>
            <text:p text:style-name="P261"><text:span text:style-name="T15">Firebase Key</text:span></text:p>
          </draw:text-box>
        </draw:frame>
        <draw:path draw:style-name="gr284" draw:text-style-name="P281" draw:layer="layout" svg:width="6.016cm" svg:height="0.53cm" svg:x="9.514cm" svg:y="22.155cm" svg:viewBox="0 0 6017 531" svg:d="M0 80c0-11 2-21 6-31 4-9 10-18 17-25 7-8 16-14 26-18s20-6 30-6h5858c11 0 21 2 31 6 9 4 18 10 25 18 8 7 14 16 18 25 4 10 6 20 6 31v372c0 10-2 20-6 30s-10 19-18 26c-7 7-16 13-25 17-10 4-20 6-31 6h-5858c-10 0-20-2-30-6s-19-10-26-17-13-16-17-26-6-20-6-30z">
          <text:p/>
        </draw:path>
        <draw:frame draw:style-name="gr264" draw:text-style-name="P262" draw:layer="layout" svg:width="2.731cm" svg:height="0.48cm" svg:x="5.184cm" svg:y="22.149cm">
          <draw:text-box>
            <text:p text:style-name="P261"><text:span text:style-name="T15">API key in config</text:span></text:p>
          </draw:text-box>
        </draw:frame>
        <draw:frame draw:style-name="gr268" draw:text-style-name="P266" draw:layer="layout" svg:width="4.544cm" svg:height="0.433cm" svg:x="9.637cm" svg:y="22.187cm">
          <draw:text-box>
            <text:p text:style-name="P261"><text:span text:style-name="T20">AIza[0-9A-Za-z_-]{35}.*firebase</text:span></text:p>
          </draw:text-box>
        </draw:frame>
        <draw:frame draw:style-name="gr264" draw:text-style-name="P262" draw:layer="layout" svg:width="1.348cm" svg:height="0.48cm" svg:x="2.268cm" svg:y="23.183cm">
          <draw:text-box>
            <text:p text:style-name="P261"><text:span text:style-name="T15">Mapbox</text:span></text:p>
          </draw:text-box>
        </draw:frame>
        <draw:frame draw:style-name="gr264" draw:text-style-name="P262" draw:layer="layout" svg:width="1.013cm" svg:height="0.48cm" svg:x="2.268cm" svg:y="23.766cm">
          <draw:text-box>
            <text:p text:style-name="P261"><text:span text:style-name="T15">Token</text:span></text:p>
          </draw:text-box>
        </draw:frame>
        <draw:path draw:style-name="gr284" draw:text-style-name="P281" draw:layer="layout" svg:width="3.975cm" svg:height="0.53cm" svg:x="9.514cm" svg:y="23.189cm" svg:viewBox="0 0 3976 531" svg:d="M0 79c0-10 2-20 6-30s10-18 17-26c7-7 16-13 26-17s20-6 30-6h3818c10 0 20 2 30 6s18 10 26 17c7 8 13 16 17 26s6 20 6 30v372c0 11-2 21-6 31s-10 18-17 26c-8 7-16 13-26 17s-20 6-30 6h-3818c-10 0-20-2-30-6s-19-10-26-17c-7-8-13-16-17-26s-6-20-6-31z">
          <text:p/>
        </draw:path>
        <draw:frame draw:style-name="gr264" draw:text-style-name="P262" draw:layer="layout" svg:width="1.256cm" svg:height="0.48cm" svg:x="5.184cm" svg:y="23.183cm">
          <draw:text-box>
            <text:p text:style-name="P261"><text:span text:style-name="T15">pk.eyJ...</text:span></text:p>
          </draw:text-box>
        </draw:frame>
        <draw:frame draw:style-name="gr268" draw:text-style-name="P266" draw:layer="layout" svg:width="2.763cm" svg:height="0.433cm" svg:x="9.637cm" svg:y="23.22cm">
          <draw:text-box>
            <text:p text:style-name="P261"><text:span text:style-name="T20">pk\.eyJ1Ijoi[\w-]+.*</text:span></text:p>
          </draw:text-box>
        </draw:frame>
        <draw:frame draw:style-name="gr264" draw:text-style-name="P262" draw:layer="layout" svg:width="1.79cm" svg:height="0.48cm" svg:x="2.268cm" svg:y="24.799cm">
          <draw:text-box>
            <text:p text:style-name="P261"><text:span text:style-name="T15">Cloudinary</text:span></text:p>
          </draw:text-box>
        </draw:frame>
        <draw:frame draw:style-name="gr264" draw:text-style-name="P262" draw:layer="layout" svg:width="0.662cm" svg:height="0.48cm" svg:x="2.268cm" svg:y="25.382cm">
          <draw:text-box>
            <text:p text:style-name="P261"><text:span text:style-name="T15">URL</text:span></text:p>
          </draw:text-box>
        </draw:frame>
        <draw:path draw:style-name="gr284" draw:text-style-name="P281" draw:layer="layout" svg:width="8.295cm" svg:height="0.53cm" svg:x="9.514cm" svg:y="24.805cm" svg:viewBox="0 0 8296 531" svg:d="M0 80c0-11 2-21 6-31 4-9 10-18 17-25 7-8 16-13 26-18 9-3 19-5 29-6h8218v531h-8217c-10 0-20-2-30-6s-19-9-26-17c-7-7-13-16-17-26-4-9-6-19-6-30z">
          <text:p/>
        </draw:path>
        <draw:frame draw:style-name="gr264" draw:text-style-name="P262" draw:layer="layout" svg:width="2.092cm" svg:height="0.48cm" svg:x="5.184cm" svg:y="24.799cm">
          <draw:text-box>
            <text:p text:style-name="P261"><text:span text:style-name="T15">cloudinary://</text:span></text:p>
          </draw:text-box>
        </draw:frame>
        <draw:path draw:style-name="gr284" draw:text-style-name="P281" draw:layer="layout" svg:width="1.06cm" svg:height="0.53cm" svg:x="9.514cm" svg:y="25.389cm" svg:viewBox="0 0 1061 531" svg:d="M0 0h982c10 0 20 2 30 6 9 4 18 9 26 17 7 7 13 16 17 26 4 9 6 19 6 30v372c0 11-2 21-6 30-4 10-10 19-17 26-8 8-17 13-26 17-10 4-20 7-31 7h-981z">
          <text:p/>
        </draw:path>
        <draw:frame draw:style-name="gr268" draw:text-style-name="P266" draw:layer="layout" svg:width="6.437cm" svg:height="0.433cm" svg:x="9.637cm" svg:y="24.837cm">
          <draw:text-box>
            <text:p text:style-name="P261"><text:span text:style-name="T20">cloudinary://[0-9]+:[A-Za-z0-9_-]+@[A-Za-z0-</text:span></text:p>
          </draw:text-box>
        </draw:frame>
        <draw:frame draw:style-name="gr268" draw:text-style-name="P266" draw:layer="layout" svg:width="0.713cm" svg:height="0.433cm" svg:x="9.504cm" svg:y="25.42cm">
          <draw:text-box>
            <text:p text:style-name="P261"><text:span text:style-name="T20">9_-]+</text:span></text:p>
          </draw:text-box>
        </draw:frame>
      </draw:page>
      <draw:page draw:name="page9" draw:style-name="dp1" draw:master-page-name="master-page569">
        <draw:frame draw:style-name="gr268" draw:text-style-name="P270" draw:layer="layout" svg:width="4.588cm" svg:height="0.446cm" svg:x="2.088cm" svg:y="0.879cm">
          <draw:text-box>
            <text:p text:style-name="P261"><text:span text:style-name="T8">3. Regex Patterns for JS Recon</text:span></text:p>
          </draw:text-box>
        </draw:frame>
        <draw:polygon draw:style-name="gr276" draw:text-style-name="P275" draw:layer="layout" svg:width="17.014cm" svg:height="0.053cm" svg:x="2.014cm" svg:y="4.081cm" svg:viewBox="0 0 17015 54" draw:points="0,0 17015,0 17015,54 0,54">
          <text:p/>
        </draw:polygon>
        <draw:polygon draw:style-name="gr282" draw:text-style-name="P280" draw:layer="layout" svg:width="3.71cm" svg:height="1.06cm" svg:x="2.014cm" svg:y="6.678cm" svg:viewBox="0 0 3711 1061" draw:points="0,0 3711,0 3711,1061 0,1061">
          <text:p/>
        </draw:polygon>
        <draw:polygon draw:style-name="gr282" draw:text-style-name="P280" draw:layer="layout" svg:width="13.304cm" svg:height="1.06cm" svg:x="5.724cm" svg:y="6.678cm" svg:viewBox="0 0 13305 1061" draw:points="0,0 13305,0 13305,1061 0,1061">
          <text:p/>
        </draw:polygon>
        <draw:polygon draw:style-name="gr287" draw:text-style-name="P284" draw:layer="layout" svg:width="3.71cm" svg:height="0.053cm" svg:x="2.014cm" svg:y="6.652cm" svg:viewBox="0 0 3711 54" draw:points="0,0 3711,0 3711,54 0,54">
          <text:p/>
        </draw:polygon>
        <draw:polygon draw:style-name="gr287" draw:text-style-name="P284" draw:layer="layout" svg:width="13.304cm" svg:height="0.053cm" svg:x="5.724cm" svg:y="6.652cm" svg:viewBox="0 0 13305 54" draw:points="0,0 13305,0 13305,54 0,54">
          <text:p/>
        </draw:polygon>
        <draw:polygon draw:style-name="gr287" draw:text-style-name="P284" draw:layer="layout" svg:width="3.71cm" svg:height="0.026cm" svg:x="2.014cm" svg:y="7.712cm" svg:viewBox="0 0 3711 27" draw:points="0,0 3711,0 3711,27 0,27">
          <text:p/>
        </draw:polygon>
        <draw:polygon draw:style-name="gr287" draw:text-style-name="P284" draw:layer="layout" svg:width="13.304cm" svg:height="0.026cm" svg:x="5.724cm" svg:y="7.712cm" svg:viewBox="0 0 13305 27" draw:points="0,0 13305,0 13305,27 0,27">
          <text:p/>
        </draw:polygon>
        <draw:polygon draw:style-name="gr276" draw:text-style-name="P275" draw:layer="layout" svg:width="3.71cm" svg:height="0.027cm" svg:x="2.014cm" svg:y="8.745cm" svg:viewBox="0 0 3711 28" draw:points="0,0 3711,0 3711,28 0,28">
          <text:p/>
        </draw:polygon>
        <draw:polygon draw:style-name="gr276" draw:text-style-name="P275" draw:layer="layout" svg:width="13.304cm" svg:height="0.027cm" svg:x="5.724cm" svg:y="8.745cm" svg:viewBox="0 0 13305 28" draw:points="0,0 13305,0 13305,28 0,28">
          <text:p/>
        </draw:polygon>
        <draw:polygon draw:style-name="gr276" draw:text-style-name="P275" draw:layer="layout" svg:width="3.71cm" svg:height="0.026cm" svg:x="2.014cm" svg:y="9.779cm" svg:viewBox="0 0 3711 27" draw:points="0,0 3711,0 3711,27 0,27">
          <text:p/>
        </draw:polygon>
        <draw:polygon draw:style-name="gr276" draw:text-style-name="P275" draw:layer="layout" svg:width="13.304cm" svg:height="0.026cm" svg:x="5.724cm" svg:y="9.779cm" svg:viewBox="0 0 13305 27" draw:points="0,0 13305,0 13305,27 0,27">
          <text:p/>
        </draw:polygon>
        <draw:polygon draw:style-name="gr276" draw:text-style-name="P275" draw:layer="layout" svg:width="3.71cm" svg:height="0.027cm" svg:x="2.014cm" svg:y="10.812cm" svg:viewBox="0 0 3711 28" draw:points="0,0 3711,0 3711,28 0,28">
          <text:p/>
        </draw:polygon>
        <draw:polygon draw:style-name="gr276" draw:text-style-name="P275" draw:layer="layout" svg:width="13.304cm" svg:height="0.027cm" svg:x="5.724cm" svg:y="10.812cm" svg:viewBox="0 0 13305 28" draw:points="0,0 13305,0 13305,28 0,28">
          <text:p/>
        </draw:polygon>
        <draw:polygon draw:style-name="gr276" draw:text-style-name="P275" draw:layer="layout" svg:width="3.71cm" svg:height="0.026cm" svg:x="2.014cm" svg:y="12.429cm" svg:viewBox="0 0 3711 27" draw:points="0,0 3711,0 3711,27 0,27">
          <text:p/>
        </draw:polygon>
        <draw:polygon draw:style-name="gr276" draw:text-style-name="P275" draw:layer="layout" svg:width="13.304cm" svg:height="0.026cm" svg:x="5.724cm" svg:y="12.429cm" svg:viewBox="0 0 13305 27" draw:points="0,0 13305,0 13305,27 0,27">
          <text:p/>
        </draw:polygon>
        <draw:polygon draw:style-name="gr276" draw:text-style-name="P275" draw:layer="layout" svg:width="3.71cm" svg:height="0.026cm" svg:x="2.014cm" svg:y="13.463cm" svg:viewBox="0 0 3711 27" draw:points="0,0 3711,0 3711,27 0,27">
          <text:p/>
        </draw:polygon>
        <draw:polygon draw:style-name="gr276" draw:text-style-name="P275" draw:layer="layout" svg:width="13.304cm" svg:height="0.026cm" svg:x="5.724cm" svg:y="13.463cm" svg:viewBox="0 0 13305 27" draw:points="0,0 13305,0 13305,27 0,27">
          <text:p/>
        </draw:polygon>
        <draw:polygon draw:style-name="gr276" draw:text-style-name="P275" draw:layer="layout" svg:width="3.71cm" svg:height="0.027cm" svg:x="2.014cm" svg:y="14.496cm" svg:viewBox="0 0 3711 28" draw:points="0,0 3711,0 3711,28 0,28">
          <text:p/>
        </draw:polygon>
        <draw:polygon draw:style-name="gr276" draw:text-style-name="P275" draw:layer="layout" svg:width="13.304cm" svg:height="0.027cm" svg:x="5.724cm" svg:y="14.496cm" svg:viewBox="0 0 13305 28" draw:points="0,0 13305,0 13305,28 0,28">
          <text:p/>
        </draw:polygon>
        <draw:polygon draw:style-name="gr276" draw:text-style-name="P275" draw:layer="layout" svg:width="3.71cm" svg:height="0.026cm" svg:x="2.014cm" svg:y="15.53cm" svg:viewBox="0 0 3711 27" draw:points="0,0 3711,0 3711,27 0,27">
          <text:p/>
        </draw:polygon>
        <draw:polygon draw:style-name="gr276" draw:text-style-name="P275" draw:layer="layout" svg:width="13.304cm" svg:height="0.026cm" svg:x="5.724cm" svg:y="15.53cm" svg:viewBox="0 0 13305 27" draw:points="0,0 13305,0 13305,27 0,27">
          <text:p/>
        </draw:polygon>
        <draw:polygon draw:style-name="gr276" draw:text-style-name="P275" draw:layer="layout" svg:width="3.71cm" svg:height="0.028cm" svg:x="2.014cm" svg:y="17.146cm" svg:viewBox="0 0 3711 29" draw:points="0,0 3711,0 3711,29 0,29">
          <text:p/>
        </draw:polygon>
        <draw:polygon draw:style-name="gr276" draw:text-style-name="P275" draw:layer="layout" svg:width="13.304cm" svg:height="0.028cm" svg:x="5.724cm" svg:y="17.146cm" svg:viewBox="0 0 13305 29" draw:points="0,0 13305,0 13305,29 0,29">
          <text:p/>
        </draw:polygon>
        <draw:polygon draw:style-name="gr276" draw:text-style-name="P275" draw:layer="layout" svg:width="3.71cm" svg:height="0.026cm" svg:x="2.014cm" svg:y="18.18cm" svg:viewBox="0 0 3711 27" draw:points="0,0 3711,0 3711,27 0,27">
          <text:p/>
        </draw:polygon>
        <draw:polygon draw:style-name="gr276" draw:text-style-name="P275" draw:layer="layout" svg:width="13.304cm" svg:height="0.026cm" svg:x="5.724cm" svg:y="18.18cm" svg:viewBox="0 0 13305 27" draw:points="0,0 13305,0 13305,27 0,27">
          <text:p/>
        </draw:polygon>
        <draw:polygon draw:style-name="gr287" draw:text-style-name="P284" draw:layer="layout" svg:width="3.71cm" svg:height="0.053cm" svg:x="2.014cm" svg:y="19.214cm" svg:viewBox="0 0 3711 54" draw:points="0,0 3711,0 3711,54 0,54">
          <text:p/>
        </draw:polygon>
        <draw:polygon draw:style-name="gr287" draw:text-style-name="P284" draw:layer="layout" svg:width="13.304cm" svg:height="0.053cm" svg:x="5.724cm" svg:y="19.214cm" svg:viewBox="0 0 13305 54" draw:points="0,0 13305,0 13305,54 0,54">
          <text:p/>
        </draw:polygon>
        <draw:polygon draw:style-name="gr276" draw:text-style-name="P275" draw:layer="layout" svg:width="17.014cm" svg:height="0.053cm" svg:x="2.014cm" svg:y="21.148cm" svg:viewBox="0 0 17015 54" draw:points="0,0 17015,0 17015,54 0,54">
          <text:p/>
        </draw:polygon>
        <draw:polygon draw:style-name="gr282" draw:text-style-name="P280" draw:layer="layout" svg:width="7.129cm" svg:height="1.06cm" svg:x="2.014cm" svg:y="23.745cm" svg:viewBox="0 0 7130 1061" draw:points="0,0 7130,0 7130,1061 0,1061">
          <text:p/>
        </draw:polygon>
        <draw:polygon draw:style-name="gr282" draw:text-style-name="P280" draw:layer="layout" svg:width="9.885cm" svg:height="1.06cm" svg:x="9.143cm" svg:y="23.745cm" svg:viewBox="0 0 9886 1061" draw:points="0,0 9886,0 9886,1061 0,1061">
          <text:p/>
        </draw:polygon>
        <draw:polygon draw:style-name="gr287" draw:text-style-name="P284" draw:layer="layout" svg:width="7.129cm" svg:height="0.053cm" svg:x="2.014cm" svg:y="23.719cm" svg:viewBox="0 0 7130 54" draw:points="0,0 7130,0 7130,54 0,54">
          <text:p/>
        </draw:polygon>
        <draw:polygon draw:style-name="gr287" draw:text-style-name="P284" draw:layer="layout" svg:width="9.885cm" svg:height="0.053cm" svg:x="9.143cm" svg:y="23.719cm" svg:viewBox="0 0 9886 54" draw:points="0,0 9886,0 9886,54 0,54">
          <text:p/>
        </draw:polygon>
        <draw:polygon draw:style-name="gr287" draw:text-style-name="P284" draw:layer="layout" svg:width="7.129cm" svg:height="0.026cm" svg:x="2.014cm" svg:y="24.779cm" svg:viewBox="0 0 7130 27" draw:points="0,0 7130,0 7130,27 0,27">
          <text:p/>
        </draw:polygon>
        <draw:polygon draw:style-name="gr287" draw:text-style-name="P284" draw:layer="layout" svg:width="9.885cm" svg:height="0.026cm" svg:x="9.143cm" svg:y="24.779cm" svg:viewBox="0 0 9886 27" draw:points="0,0 9886,0 9886,27 0,27">
          <text:p/>
        </draw:polygon>
        <draw:polygon draw:style-name="gr276" draw:text-style-name="P275" draw:layer="layout" svg:width="7.129cm" svg:height="0.026cm" svg:x="2.014cm" svg:y="25.813cm" svg:viewBox="0 0 7130 27" draw:points="0,0 7130,0 7130,27 0,27">
          <text:p/>
        </draw:polygon>
        <draw:polygon draw:style-name="gr276" draw:text-style-name="P275" draw:layer="layout" svg:width="9.885cm" svg:height="0.026cm" svg:x="9.143cm" svg:y="25.813cm" svg:viewBox="0 0 9886 27" draw:points="0,0 9886,0 9886,27 0,27">
          <text:p/>
        </draw:polygon>
        <draw:polygon draw:style-name="gr287" draw:text-style-name="P284" draw:layer="layout" svg:width="7.129cm" svg:height="0.053cm" svg:x="2.014cm" svg:y="26.846cm" svg:viewBox="0 0 7130 54" draw:points="0,0 7130,0 7130,54 0,54">
          <text:p/>
        </draw:polygon>
        <draw:polygon draw:style-name="gr287" draw:text-style-name="P284" draw:layer="layout" svg:width="9.885cm" svg:height="0.053cm" svg:x="9.143cm" svg:y="26.846cm" svg:viewBox="0 0 9886 54" draw:points="0,0 9886,0 9886,54 0,54">
          <text:p/>
        </draw:polygon>
        <draw:frame draw:style-name="gr268" draw:text-style-name="P266" draw:layer="layout" svg:width="0.317cm" svg:height="0.433cm" svg:x="2.003cm" svg:y="28.256cm">
          <draw:text-box>
            <text:p text:style-name="P261"><text:span text:style-name="T9">9</text:span></text:p>
          </draw:text-box>
        </draw:frame>
        <draw:path draw:style-name="gr288" draw:text-style-name="P285" draw:layer="layout" svg:width="1.776cm" svg:height="0.769cm" svg:x="2.027cm" svg:y="4.412cm" svg:viewBox="0 0 1777 770" svg:d="M0 677v-584c0-12 2-24 7-36 5-11 11-21 20-30 9-8 19-15 30-20 12-5 23-7 36-7h1591c12 0 24 2 35 7 12 5 22 12 30 20 9 9 16 19 20 30 5 12 8 24 8 36v584c0 12-3 24-8 35-4 12-11 22-20 30-8 9-18 16-30 21-11 4-23 7-35 7h-1591c-13 0-24-3-36-7-11-5-21-12-30-21-9-8-15-18-20-30-5-11-7-23-7-35z">
          <text:p/>
        </draw:path>
        <draw:path draw:style-name="gr289" draw:text-style-name="P202" draw:layer="layout" svg:width="1.776cm" svg:height="0.769cm" svg:x="2.027cm" svg:y="4.412cm" svg:viewBox="0 0 1777 770" svg:d="M0 677v-584c0-12 2-24 7-36 5-11 11-21 20-30 9-8 19-15 30-20 12-5 23-7 36-7h1591c12 0 24 2 35 7 12 5 22 12 30 20 9 9 16 19 20 30 5 12 8 24 8 36v584c0 12-3 24-8 35-4 12-11 22-20 30-8 9-18 16-30 21-11 4-23 7-35 7h-1591c-13 0-24-3-36-7-11-5-21-12-30-21-9-8-15-18-20-30-5-11-7-23-7-35z">
          <text:p/>
        </draw:path>
        <draw:frame draw:style-name="gr281" draw:text-style-name="P279" draw:layer="layout" svg:width="6.857cm" svg:height="0.725cm" svg:x="2.003cm" svg:y="3.091cm">
          <draw:text-box>
            <text:p text:style-name="P261"><text:span text:style-name="T17">3.2 Token &amp; Secret Patterns</text:span></text:p>
          </draw:text-box>
        </draw:frame>
        <draw:frame draw:style-name="gr268" draw:text-style-name="P266" draw:layer="layout" svg:width="0.97cm" svg:height="0.433cm" svg:x="2.348cm" svg:y="4.563cm">
          <draw:text-box>
            <text:p text:style-name="P261"><text:span text:style-name="T25">REGEX</text:span></text:p>
          </draw:text-box>
        </draw:frame>
        <draw:frame draw:style-name="gr278" draw:text-style-name="P277" draw:layer="layout" svg:width="5.5cm" svg:height="0.501cm" svg:x="2.003cm" svg:y="5.911cm">
          <draw:text-box>
            <text:p text:style-name="P261"><text:span text:style-name="T21">Table 2 </text:span><text:span text:style-name="T26">Token &amp; Secret Patterns</text:span></text:p>
          </draw:text-box>
        </draw:frame>
        <draw:frame draw:style-name="gr264" draw:text-style-name="P262" draw:layer="layout" svg:width="0.791cm" svg:height="0.48cm" svg:x="2.268cm" svg:y="6.937cm">
          <draw:text-box>
            <text:p text:style-name="P261"><text:span text:style-name="T14">Type</text:span></text:p>
          </draw:text-box>
        </draw:frame>
        <draw:frame draw:style-name="gr264" draw:text-style-name="P262" draw:layer="layout" svg:width="1.019cm" svg:height="0.48cm" svg:x="5.98cm" svg:y="6.937cm">
          <draw:text-box>
            <text:p text:style-name="P261"><text:span text:style-name="T14">Regex</text:span></text:p>
          </draw:text-box>
        </draw:frame>
        <draw:path draw:style-name="gr284" draw:text-style-name="P281" draw:layer="layout" svg:width="9.912cm" svg:height="0.53cm" svg:x="5.989cm" svg:y="7.977cm" svg:viewBox="0 0 9913 531" svg:d="M0 79c0-10 2-21 6-30 4-10 10-19 17-26 8-8 16-13 26-17 9-4 19-6 29-6h9756c11 0 20 2 30 6 9 4 18 9 25 17 8 7 14 16 18 26 4 9 6 19 6 30v372c0 11-2 21-6 31-4 9-10 18-18 25-7 8-16 14-25 18-10 4-20 6-31 6h-9754c-10 0-20-2-30-6s-18-10-26-18c-7-7-13-16-17-25-4-10-6-20-6-31z">
          <text:p/>
        </draw:path>
        <draw:frame draw:style-name="gr264" draw:text-style-name="P262" draw:layer="layout" svg:width="1.722cm" svg:height="0.48cm" svg:x="2.268cm" svg:y="7.971cm">
          <draw:text-box>
            <text:p text:style-name="P261"><text:span text:style-name="T15">JWT Token</text:span></text:p>
          </draw:text-box>
        </draw:frame>
        <draw:frame draw:style-name="gr268" draw:text-style-name="P266" draw:layer="layout" svg:width="7.29cm" svg:height="0.433cm" svg:x="6.113cm" svg:y="8.008cm">
          <draw:text-box>
            <text:p text:style-name="P261"><text:span text:style-name="T20">eyJ[A-Za-z0-9_-]*\.eyJ[A-Za-z0-9_-]*\.[A-Za-z0-9_-]*</text:span></text:p>
          </draw:text-box>
        </draw:frame>
        <draw:path draw:style-name="gr284" draw:text-style-name="P281" draw:layer="layout" svg:width="5.83cm" svg:height="0.53cm" svg:x="5.989cm" svg:y="9.01cm" svg:viewBox="0 0 5831 531" svg:d="M0 80c0-11 2-21 6-31 4-9 10-18 17-26 8-7 16-13 26-17 9-4 19-6 30-6h5674c10 0 20 2 29 6 10 4 19 10 26 17 8 8 13 17 17 26 4 10 6 20 6 31v372c0 10-2 20-6 30s-9 18-17 26c-7 7-16 13-26 17-9 4-20 6-30 6h-5673c-10 0-20-2-30-6s-18-10-26-17c-7-8-13-16-17-26s-6-20-6-30z">
          <text:p/>
        </draw:path>
        <draw:frame draw:style-name="gr264" draw:text-style-name="P262" draw:layer="layout" svg:width="2.216cm" svg:height="0.48cm" svg:x="2.268cm" svg:y="9.004cm">
          <draw:text-box>
            <text:p text:style-name="P261"><text:span text:style-name="T15">Bearer Token</text:span></text:p>
          </draw:text-box>
        </draw:frame>
        <draw:frame draw:style-name="gr268" draw:text-style-name="P266" draw:layer="layout" svg:width="4.414cm" svg:height="0.433cm" svg:x="6.113cm" svg:y="9.042cm">
          <draw:text-box>
            <text:p text:style-name="P261"><text:span text:style-name="T20">[Bb]earer\s+[a-zA-Z0-9_\-\/=]+</text:span></text:p>
          </draw:text-box>
        </draw:frame>
        <draw:path draw:style-name="gr284" draw:text-style-name="P281" draw:layer="layout" svg:width="5.088cm" svg:height="0.53cm" svg:x="5.989cm" svg:y="10.044cm" svg:viewBox="0 0 5089 531" svg:d="M0 79c0-10 2-20 6-30s10-18 17-26c8-7 16-13 26-17s19-6 30-6h4932c10 0 20 2 29 6 10 4 19 10 26 17 8 8 13 16 17 26s6 20 6 30v372c0 11-2 21-6 31-4 9-9 18-17 26-7 7-16 13-26 17-9 4-20 6-30 6h-4931c-10 0-20-2-30-6s-18-10-26-17c-7-8-13-17-17-26-4-10-6-20-6-31z">
          <text:p/>
        </draw:path>
        <draw:frame draw:style-name="gr264" draw:text-style-name="P262" draw:layer="layout" svg:width="1.732cm" svg:height="0.48cm" svg:x="2.268cm" svg:y="10.038cm">
          <draw:text-box>
            <text:p text:style-name="P261"><text:span text:style-name="T15">Basic Auth</text:span></text:p>
          </draw:text-box>
        </draw:frame>
        <draw:frame draw:style-name="gr268" draw:text-style-name="P266" draw:layer="layout" svg:width="3.882cm" svg:height="0.433cm" svg:x="6.113cm" svg:y="10.075cm">
          <draw:text-box>
            <text:p text:style-name="P261"><text:span text:style-name="T20">[Bb]asic\s+[A-Za-z0-9+/=]+</text:span></text:p>
          </draw:text-box>
        </draw:frame>
        <draw:frame draw:style-name="gr264" draw:text-style-name="P262" draw:layer="layout" svg:width="0.65cm" svg:height="0.48cm" svg:x="2.268cm" svg:y="11.071cm">
          <draw:text-box>
            <text:p text:style-name="P261"><text:span text:style-name="T15">API </text:span></text:p>
          </draw:text-box>
        </draw:frame>
        <draw:frame draw:style-name="gr264" draw:text-style-name="P262" draw:layer="layout" svg:width="1.013cm" svg:height="0.48cm" svg:x="4.417cm" svg:y="11.071cm">
          <draw:text-box>
            <text:p text:style-name="P261"><text:span text:style-name="T15">Token</text:span></text:p>
          </draw:text-box>
        </draw:frame>
        <draw:path draw:style-name="gr284" draw:text-style-name="P281" draw:layer="layout" svg:width="12.191cm" svg:height="0.53cm" svg:x="5.989cm" svg:y="11.077cm" svg:viewBox="0 0 12192 531" svg:d="M0 80c0-11 2-21 6-31 4-9 10-18 17-25 8-8 16-14 26-18s20-6 30-6h12113v531h-12113c-10 0-20-2-30-6s-18-9-26-17c-7-7-13-16-17-26-4-9-6-20-6-30z">
          <text:p/>
        </draw:path>
        <draw:frame draw:style-name="gr264" draw:text-style-name="P262" draw:layer="layout" svg:width="1.447cm" svg:height="0.48cm" svg:x="2.268cm" svg:y="11.654cm">
          <draw:text-box>
            <text:p text:style-name="P261"><text:span text:style-name="T15">(generic)</text:span></text:p>
          </draw:text-box>
        </draw:frame>
        <draw:path draw:style-name="gr284" draw:text-style-name="P281" draw:layer="layout" svg:width="1.988cm" svg:height="0.53cm" svg:x="5.989cm" svg:y="11.66cm" svg:viewBox="0 0 1989 531" svg:d="M0 0h1909c11 0 21 2 31 6 9 4 18 10 25 18 8 7 14 16 18 25 4 10 6 20 6 31v372c0 10-2 21-6 30-4 10-10 19-18 26-7 8-16 13-25 17-10 4-20 6-31 6h-1909z">
          <text:p/>
        </draw:path>
        <draw:frame draw:style-name="gr268" draw:text-style-name="P266" draw:layer="layout" svg:width="9.059cm" svg:height="0.433cm" svg:x="6.113cm" svg:y="11.109cm">
          <draw:text-box>
            <text:p text:style-name="P261"><text:span text:style-name="T20">[aA][pP][iI][_\-]?[tT][oO][kK][eE][nN]\s*[/=]\s*["\x27]?[a-zA-Z0-</text:span></text:p>
          </draw:text-box>
        </draw:frame>
        <draw:frame draw:style-name="gr268" draw:text-style-name="P266" draw:layer="layout" svg:width="1.339cm" svg:height="0.433cm" svg:x="5.98cm" svg:y="11.692cm">
          <draw:text-box>
            <text:p text:style-name="P261"><text:span text:style-name="T20">9_\-]{16,}</text:span></text:p>
          </draw:text-box>
        </draw:frame>
        <draw:path draw:style-name="gr284" draw:text-style-name="P281" draw:layer="layout" svg:width="8.428cm" svg:height="0.53cm" svg:x="5.989cm" svg:y="12.694cm" svg:viewBox="0 0 8429 531" svg:d="M0 79c0-10 2-20 6-30s10-18 17-26c8-7 16-13 26-17 9-4 19-6 29-6h8272c10 0 20 2 30 6 9 4 18 10 25 17 8 8 14 16 18 26s6 20 6 31v372c0 10-2 20-6 30s-10 18-18 26c-7 7-16 13-25 17-10 4-20 6-30 6h-8271c-11 0-20-2-30-6s-18-10-26-17c-7-8-13-16-17-26s-6-20-6-30z">
          <text:p/>
        </draw:path>
        <draw:frame draw:style-name="gr264" draw:text-style-name="P262" draw:layer="layout" svg:width="1.837cm" svg:height="0.48cm" svg:x="2.268cm" svg:y="12.688cm">
          <draw:text-box>
            <text:p text:style-name="P261"><text:span text:style-name="T15">Private Key</text:span></text:p>
          </draw:text-box>
        </draw:frame>
        <draw:frame draw:style-name="gr268" draw:text-style-name="P266" draw:layer="layout" svg:width="7.835cm" svg:height="0.433cm" svg:x="6.113cm" svg:y="12.726cm">
          <draw:text-box>
            <text:p text:style-name="P261"><text:span text:style-name="T20">BEGIN\s+(RSA|OPENSSH|EC|DSA)\s+PRIVATE\s+KEY</text:span></text:p>
          </draw:text-box>
        </draw:frame>
        <draw:path draw:style-name="gr284" draw:text-style-name="P281" draw:layer="layout" svg:width="4.903cm" svg:height="0.53cm" svg:x="5.989cm" svg:y="13.728cm" svg:viewBox="0 0 4904 531" svg:d="M0 79c0-10 2-21 6-30 4-10 10-19 17-26 8-8 16-13 26-17 9-4 19-6 29-6h4747c11 0 20 2 30 6s18 9 26 17c7 7 13 16 17 26 4 9 6 19 6 30v372c0 11-2 21-6 31-4 9-10 18-17 25-8 8-16 14-26 18s-20 6-31 6h-4745c-10 0-20-2-30-6s-18-10-26-18c-7-7-13-16-17-25-4-10-6-20-6-31z">
          <text:p/>
        </draw:path>
        <draw:frame draw:style-name="gr264" draw:text-style-name="P262" draw:layer="layout" svg:width="2.164cm" svg:height="0.48cm" svg:x="2.268cm" svg:y="13.721cm">
          <draw:text-box>
            <text:p text:style-name="P261"><text:span text:style-name="T15">OAuth Token</text:span></text:p>
          </draw:text-box>
        </draw:frame>
        <draw:frame draw:style-name="gr268" draw:text-style-name="P266" draw:layer="layout" svg:width="3.441cm" svg:height="0.433cm" svg:x="6.113cm" svg:y="13.759cm">
          <draw:text-box>
            <text:p text:style-name="P261"><text:span text:style-name="T20">[0-9a-f]{32}-[0-9a-f]{32}</text:span></text:p>
          </draw:text-box>
        </draw:frame>
        <draw:path draw:style-name="gr284" draw:text-style-name="P281" draw:layer="layout" svg:width="11.025cm" svg:height="0.53cm" svg:x="5.989cm" svg:y="14.761cm" svg:viewBox="0 0 11026 531" svg:d="M0 80c0-11 2-21 6-31s10-18 17-26c8-7 16-13 26-17s19-6 30-6h10868c10 0 20 2 30 6 9 4 18 10 26 17 7 8 13 16 17 26s6 20 6 30v373c0 10-2 20-6 30s-10 18-17 26c-8 7-17 13-26 17-10 4-20 6-31 6h-10867c-10 0-20-2-30-6s-18-10-26-17c-7-8-13-16-17-26s-6-20-6-30z">
          <text:p/>
        </draw:path>
        <draw:frame draw:style-name="gr264" draw:text-style-name="P262" draw:layer="layout" svg:width="1.717cm" svg:height="0.48cm" svg:x="2.268cm" svg:y="14.755cm">
          <draw:text-box>
            <text:p text:style-name="P261"><text:span text:style-name="T15">Session ID</text:span></text:p>
          </draw:text-box>
        </draw:frame>
        <draw:frame draw:style-name="gr268" draw:text-style-name="P266" draw:layer="layout" svg:width="8.038cm" svg:height="0.433cm" svg:x="6.113cm" svg:y="14.793cm">
          <draw:text-box>
            <text:p text:style-name="P261"><text:span text:style-name="T20">[Ss]ession[_\-]?[iI][dD]\s*[/=]\s*["\x27]?[a-zA-Z0-9]{16,}</text:span></text:p>
          </draw:text-box>
        </draw:frame>
        <draw:path draw:style-name="gr284" draw:text-style-name="P281" draw:layer="layout" svg:width="12.191cm" svg:height="0.53cm" svg:x="5.989cm" svg:y="15.795cm" svg:viewBox="0 0 12192 531" svg:d="M0 79c0-10 2-20 6-30s10-19 17-26c8-7 16-13 26-17s20-6 30-6h12113v531h-12113c-10 0-20-2-30-6s-18-10-26-18c-7-7-13-16-17-25-4-10-6-20-6-31z">
          <text:p/>
        </draw:path>
        <draw:frame draw:style-name="gr264" draw:text-style-name="P262" draw:layer="layout" svg:width="1.92cm" svg:height="0.48cm" svg:x="2.268cm" svg:y="15.789cm">
          <draw:text-box>
            <text:p text:style-name="P261"><text:span text:style-name="T15">CSRF Token</text:span></text:p>
          </draw:text-box>
        </draw:frame>
        <draw:path draw:style-name="gr284" draw:text-style-name="P281" draw:layer="layout" svg:width="0.875cm" svg:height="0.53cm" svg:x="5.989cm" svg:y="16.378cm" svg:viewBox="0 0 876 531" svg:d="M0 0h796c11 0 21 2 30 6 10 4 19 10 26 17 8 8 13 16 17 26 5 10 7 20 7 30v372c0 11-2 21-7 31-4 9-9 18-17 26-7 7-16 13-26 17-9 4-19 6-30 6h-796z">
          <text:p/>
        </draw:path>
        <draw:frame draw:style-name="gr268" draw:text-style-name="P266" draw:layer="layout" svg:width="9.161cm" svg:height="0.433cm" svg:x="6.113cm" svg:y="15.826cm">
          <draw:text-box>
            <text:p text:style-name="P261"><text:span text:style-name="T20">[Cc][Ss][Rr][Ff].*[tT][oO][kK][eE][nN].*=\s*["\x27]?[a-zA-Z0-9_-]</text:span></text:p>
          </draw:text-box>
        </draw:frame>
        <draw:frame draw:style-name="gr268" draw:text-style-name="P266" draw:layer="layout" svg:width="0.51cm" svg:height="0.433cm" svg:x="5.98cm" svg:y="16.409cm">
          <draw:text-box>
            <text:p text:style-name="P261"><text:span text:style-name="T20">{8,}</text:span></text:p>
          </draw:text-box>
        </draw:frame>
        <draw:path draw:style-name="gr284" draw:text-style-name="P281" draw:layer="layout" svg:width="11.581cm" svg:height="0.53cm" svg:x="5.989cm" svg:y="17.411cm" svg:viewBox="0 0 11582 531" svg:d="M0 80c0-11 2-21 6-31 4-9 10-18 17-25 8-8 16-14 26-18 9-3 19-5 29-6h11426c10 1 20 3 29 6 10 4 19 10 26 18 8 7 13 16 17 25 4 10 6 20 6 31v372c0 10-2 21-6 30-4 10-9 19-17 26-7 8-16 13-26 17-9 4-19 6-29 6h-11425c-10 0-20-2-30-6s-18-9-26-17c-7-7-13-16-17-26-4-9-6-20-6-30z">
          <text:p/>
        </draw:path>
        <draw:frame draw:style-name="gr264" draw:text-style-name="P262" draw:layer="layout" svg:width="3.003cm" svg:height="0.48cm" svg:x="2.268cm" svg:y="17.405cm">
          <draw:text-box>
            <text:p text:style-name="P261"><text:span text:style-name="T15">Password variable</text:span></text:p>
          </draw:text-box>
        </draw:frame>
        <draw:frame draw:style-name="gr268" draw:text-style-name="P266" draw:layer="layout" svg:width="8.899cm" svg:height="0.433cm" svg:x="6.113cm" svg:y="17.443cm">
          <draw:text-box>
            <text:p text:style-name="P261"><text:span text:style-name="T20">[Pp][aA][sS][sS][wW][oO][rR][dD]\s*[/=]\s*["\x27][^"\x27]{4,}</text:span></text:p>
          </draw:text-box>
        </draw:frame>
        <draw:path draw:style-name="gr284" draw:text-style-name="P281" draw:layer="layout" svg:width="11.21cm" svg:height="0.53cm" svg:x="5.989cm" svg:y="18.445cm" svg:viewBox="0 0 11211 531" svg:d="M0 79c0-10 2-20 6-30s10-18 17-26c8-7 16-13 26-17 9-4 19-6 29-6h11055c10 0 20 2 29 6 10 4 19 10 26 17 8 8 13 16 17 26s6 20 6 30v372c0 11-2 21-6 31s-9 18-17 26c-7 7-16 13-26 17-9 4-20 6-30 6h-11053c-10 0-20-2-30-6s-18-10-26-17c-7-8-13-16-17-26s-6-20-6-30z">
          <text:p/>
        </draw:path>
        <draw:frame draw:style-name="gr264" draw:text-style-name="P262" draw:layer="layout" svg:width="2.437cm" svg:height="0.48cm" svg:x="2.268cm" svg:y="18.439cm">
          <draw:text-box>
            <text:p text:style-name="P261"><text:span text:style-name="T15">Secret variable</text:span></text:p>
          </draw:text-box>
        </draw:frame>
        <draw:frame draw:style-name="gr268" draw:text-style-name="P266" draw:layer="layout" svg:width="8.113cm" svg:height="0.433cm" svg:x="6.113cm" svg:y="18.477cm">
          <draw:text-box>
            <text:p text:style-name="P261"><text:span text:style-name="T20">[Ss][eE][cC][rR][eE][tT]\s*[/=]\s*["\x27][a-zA-Z0-9_\-]{8,}</text:span></text:p>
          </draw:text-box>
        </draw:frame>
        <draw:path draw:style-name="gr288" draw:text-style-name="P285" draw:layer="layout" svg:width="1.776cm" svg:height="0.769cm" svg:x="2.027cm" svg:y="21.479cm" svg:viewBox="0 0 1777 770" svg:d="M0 677v-584c0-12 2-24 7-35 5-12 11-22 20-30 9-9 19-16 30-21 12-4 23-7 36-7h1591c12 0 24 3 35 7 12 5 22 12 30 21 9 8 16 18 20 30 5 11 8 23 8 35v584c0 13-3 24-8 36-4 11-11 21-20 30-8 8-18 15-30 20-11 5-23 7-35 7h-1591c-13 0-24-2-36-7-11-5-21-12-30-20-9-9-15-19-20-30-5-12-7-23-7-36z">
          <text:p/>
        </draw:path>
        <draw:path draw:style-name="gr289" draw:text-style-name="P202" draw:layer="layout" svg:width="1.776cm" svg:height="0.769cm" svg:x="2.027cm" svg:y="21.479cm" svg:viewBox="0 0 1777 770" svg:d="M0 677v-584c0-12 2-24 7-35 5-12 11-22 20-30 9-9 19-16 30-21 12-4 23-7 36-7h1591c12 0 24 3 35 7 12 5 22 12 30 21 9 8 16 18 20 30 5 11 8 23 8 35v584c0 13-3 24-8 36-4 11-11 21-20 30-8 8-18 15-30 20-11 5-23 7-35 7h-1591c-13 0-24-2-36-7-11-5-21-12-30-20-9-9-15-19-20-30-5-12-7-23-7-36z">
          <text:p/>
        </draw:path>
        <draw:frame draw:style-name="gr281" draw:text-style-name="P279" draw:layer="layout" svg:width="7.024cm" svg:height="0.725cm" svg:x="2.003cm" svg:y="20.158cm">
          <draw:text-box>
            <text:p text:style-name="P261"><text:span text:style-name="T17">3.3 Endpoint &amp; URL Patterns</text:span></text:p>
          </draw:text-box>
        </draw:frame>
        <draw:frame draw:style-name="gr268" draw:text-style-name="P266" draw:layer="layout" svg:width="0.97cm" svg:height="0.433cm" svg:x="2.348cm" svg:y="21.63cm">
          <draw:text-box>
            <text:p text:style-name="P261"><text:span text:style-name="T25">REGEX</text:span></text:p>
          </draw:text-box>
        </draw:frame>
        <draw:frame draw:style-name="gr278" draw:text-style-name="P277" draw:layer="layout" svg:width="5.616cm" svg:height="0.501cm" svg:x="2.003cm" svg:y="22.978cm">
          <draw:text-box>
            <text:p text:style-name="P261"><text:span text:style-name="T21">Table 3 </text:span><text:span text:style-name="T26">Endpoint &amp; URL Patterns</text:span></text:p>
          </draw:text-box>
        </draw:frame>
        <draw:frame draw:style-name="gr264" draw:text-style-name="P262" draw:layer="layout" svg:width="0.791cm" svg:height="0.48cm" svg:x="2.268cm" svg:y="24.004cm">
          <draw:text-box>
            <text:p text:style-name="P261"><text:span text:style-name="T14">Type</text:span></text:p>
          </draw:text-box>
        </draw:frame>
        <draw:frame draw:style-name="gr264" draw:text-style-name="P262" draw:layer="layout" svg:width="1.019cm" svg:height="0.48cm" svg:x="9.412cm" svg:y="24.004cm">
          <draw:text-box>
            <text:p text:style-name="P261"><text:span text:style-name="T14">Regex</text:span></text:p>
          </draw:text-box>
        </draw:frame>
        <draw:path draw:style-name="gr284" draw:text-style-name="P281" draw:layer="layout" svg:width="4.346cm" svg:height="0.53cm" svg:x="9.408cm" svg:y="25.044cm" svg:viewBox="0 0 4347 531" svg:d="M0 79c0-10 2-20 6-30s10-18 17-26c7-7 16-13 26-17 9-4 19-6 29-6h4191c10 0 20 2 29 6 10 4 18 10 26 17 7 8 13 16 17 26s6 20 6 30v373c0 10-2 20-6 30s-10 18-17 26c-8 7-16 13-26 17s-19 6-30 6h-4189c-11 0-21-2-30-6-10-4-19-10-26-17-7-8-13-16-17-26s-6-20-6-30z">
          <text:p/>
        </draw:path>
        <draw:frame draw:style-name="gr264" draw:text-style-name="P262" draw:layer="layout" svg:width="2.375cm" svg:height="0.48cm" svg:x="2.268cm" svg:y="25.038cm">
          <draw:text-box>
            <text:p text:style-name="P261"><text:span text:style-name="T15">Absolute URLs</text:span></text:p>
          </draw:text-box>
        </draw:frame>
        <draw:frame draw:style-name="gr268" draw:text-style-name="P266" draw:layer="layout" svg:width="3.135cm" svg:height="0.433cm" svg:x="9.544cm" svg:y="25.076cm">
          <draw:text-box>
            <text:p text:style-name="P261"><text:span text:style-name="T20">https/://[^\s"\x27/&gt;]+</text:span></text:p>
          </draw:text-box>
        </draw:frame>
        <draw:path draw:style-name="gr284" draw:text-style-name="P281" draw:layer="layout" svg:width="3.975cm" svg:height="0.53cm" svg:x="9.408cm" svg:y="26.078cm" svg:viewBox="0 0 3976 531" svg:d="M0 79c0-11 2-21 6-30 4-10 10-19 17-26 7-8 16-13 26-17 9-4 19-6 29-6h3820c10 0 20 2 29 6 10 4 18 9 26 17 7 7 13 16 17 26 4 9 6 20 6 30v372c0 11-2 21-6 30-4 10-10 19-17 26-8 8-16 13-26 18-10 4-20 6-30 6h-3818c-10 0-20-2-30-6-10-5-19-10-26-18-7-7-13-16-17-26-4-9-6-19-6-30z">
          <text:p/>
        </draw:path>
        <draw:frame draw:style-name="gr264" draw:text-style-name="P262" draw:layer="layout" svg:width="2.965cm" svg:height="0.48cm" svg:x="2.268cm" svg:y="26.071cm">
          <draw:text-box>
            <text:p text:style-name="P261"><text:span text:style-name="T15">Relative API paths</text:span></text:p>
          </draw:text-box>
        </draw:frame>
        <draw:frame draw:style-name="gr268" draw:text-style-name="P266" draw:layer="layout" svg:width="2.698cm" svg:height="0.433cm" svg:x="9.544cm" svg:y="26.109cm">
          <draw:text-box>
            <text:p text:style-name="P261"><text:span text:style-name="T20">/[a-zA-Z0-9_\-/]{2,}</text:span></text:p>
          </draw:text-box>
        </draw:frame>
      </draw:page>
      <draw:page draw:name="page10" draw:style-name="dp1" draw:master-page-name="master-page569">
        <draw:frame draw:style-name="gr268" draw:text-style-name="P270" draw:layer="layout" svg:width="4.256cm" svg:height="0.446cm" svg:x="2.088cm" svg:y="0.879cm">
          <draw:text-box>
            <text:p text:style-name="P261"><text:span text:style-name="T8">4. Essential Tools Deep Dive</text:span></text:p>
          </draw:text-box>
        </draw:frame>
        <draw:polygon draw:style-name="gr276" draw:text-style-name="P275" draw:layer="layout" svg:width="4.85cm" svg:height="0.027cm" svg:x="2.014cm" svg:y="3.206cm" svg:viewBox="0 0 4851 28" draw:points="0,0 4851,0 4851,28 0,28">
          <text:p/>
        </draw:polygon>
        <draw:polygon draw:style-name="gr276" draw:text-style-name="P275" draw:layer="layout" svg:width="12.164cm" svg:height="0.027cm" svg:x="6.864cm" svg:y="3.206cm" svg:viewBox="0 0 12165 28" draw:points="0,0 12165,0 12165,28 0,28">
          <text:p/>
        </draw:polygon>
        <draw:polygon draw:style-name="gr276" draw:text-style-name="P275" draw:layer="layout" svg:width="4.85cm" svg:height="0.026cm" svg:x="2.014cm" svg:y="4.24cm" svg:viewBox="0 0 4851 27" draw:points="0,0 4851,0 4851,27 0,27">
          <text:p/>
        </draw:polygon>
        <draw:polygon draw:style-name="gr276" draw:text-style-name="P275" draw:layer="layout" svg:width="12.164cm" svg:height="0.026cm" svg:x="6.864cm" svg:y="4.24cm" svg:viewBox="0 0 12165 27" draw:points="0,0 12165,0 12165,27 0,27">
          <text:p/>
        </draw:polygon>
        <draw:polygon draw:style-name="gr276" draw:text-style-name="P275" draw:layer="layout" svg:width="4.85cm" svg:height="0.027cm" svg:x="2.014cm" svg:y="5.273cm" svg:viewBox="0 0 4851 28" draw:points="0,0 4851,0 4851,28 0,28">
          <text:p/>
        </draw:polygon>
        <draw:polygon draw:style-name="gr276" draw:text-style-name="P275" draw:layer="layout" svg:width="12.164cm" svg:height="0.027cm" svg:x="6.864cm" svg:y="5.273cm" svg:viewBox="0 0 12165 28" draw:points="0,0 12165,0 12165,28 0,28">
          <text:p/>
        </draw:polygon>
        <draw:polygon draw:style-name="gr276" draw:text-style-name="P275" draw:layer="layout" svg:width="4.85cm" svg:height="0.026cm" svg:x="2.014cm" svg:y="6.307cm" svg:viewBox="0 0 4851 27" draw:points="0,0 4851,0 4851,27 0,27">
          <text:p/>
        </draw:polygon>
        <draw:polygon draw:style-name="gr276" draw:text-style-name="P275" draw:layer="layout" svg:width="12.164cm" svg:height="0.026cm" svg:x="6.864cm" svg:y="6.307cm" svg:viewBox="0 0 12165 27" draw:points="0,0 12165,0 12165,27 0,27">
          <text:p/>
        </draw:polygon>
        <draw:polygon draw:style-name="gr276" draw:text-style-name="P275" draw:layer="layout" svg:width="4.85cm" svg:height="0.026cm" svg:x="2.014cm" svg:y="7.341cm" svg:viewBox="0 0 4851 27" draw:points="0,0 4851,0 4851,27 0,27">
          <text:p/>
        </draw:polygon>
        <draw:polygon draw:style-name="gr276" draw:text-style-name="P275" draw:layer="layout" svg:width="12.164cm" svg:height="0.026cm" svg:x="6.864cm" svg:y="7.341cm" svg:viewBox="0 0 12165 27" draw:points="0,0 12165,0 12165,27 0,27">
          <text:p/>
        </draw:polygon>
        <draw:polygon draw:style-name="gr276" draw:text-style-name="P275" draw:layer="layout" svg:width="4.85cm" svg:height="0.027cm" svg:x="2.014cm" svg:y="8.374cm" svg:viewBox="0 0 4851 28" draw:points="0,0 4851,0 4851,28 0,28">
          <text:p/>
        </draw:polygon>
        <draw:polygon draw:style-name="gr276" draw:text-style-name="P275" draw:layer="layout" svg:width="12.164cm" svg:height="0.027cm" svg:x="6.864cm" svg:y="8.374cm" svg:viewBox="0 0 12165 28" draw:points="0,0 12165,0 12165,28 0,28">
          <text:p/>
        </draw:polygon>
        <draw:polygon draw:style-name="gr276" draw:text-style-name="P275" draw:layer="layout" svg:width="4.85cm" svg:height="0.026cm" svg:x="2.014cm" svg:y="9.408cm" svg:viewBox="0 0 4851 27" draw:points="0,0 4851,0 4851,27 0,27">
          <text:p/>
        </draw:polygon>
        <draw:polygon draw:style-name="gr276" draw:text-style-name="P275" draw:layer="layout" svg:width="12.164cm" svg:height="0.026cm" svg:x="6.864cm" svg:y="9.408cm" svg:viewBox="0 0 12165 27" draw:points="0,0 12165,0 12165,27 0,27">
          <text:p/>
        </draw:polygon>
        <draw:polygon draw:style-name="gr287" draw:text-style-name="P284" draw:layer="layout" svg:width="4.85cm" svg:height="0.053cm" svg:x="2.014cm" svg:y="10.441cm" svg:viewBox="0 0 4851 54" draw:points="0,0 4851,0 4851,54 0,54">
          <text:p/>
        </draw:polygon>
        <draw:polygon draw:style-name="gr287" draw:text-style-name="P284" draw:layer="layout" svg:width="12.164cm" svg:height="0.053cm" svg:x="6.864cm" svg:y="10.441cm" svg:viewBox="0 0 12165 54" draw:points="0,0 12165,0 12165,54 0,54">
          <text:p/>
        </draw:polygon>
        <draw:path draw:style-name="gr290" draw:text-style-name="P286" draw:layer="layout" svg:width="16.961cm" svg:height="5.221cm" svg:x="2.067cm" svg:y="10.865cm" svg:viewBox="0 0 16962 5222" svg:d="M0 5063v-4904c0-21 2-41 8-61 5-19 13-36 23-51s21-27 34-35 27-12 41-12h16697c10 0 21 1 31 3s20 5 30 9c9 4 19 9 27 15 9 6 17 13 24 20 8 7 14 15 20 24s11 18 15 27c4 10 7 20 9 30 2 11 3 21 3 31v4904c0 11-1 21-3 31s-5 20-9 30-9 19-15 28c-6 8-12 16-20 24-7 7-15 14-24 19-8 6-18 11-27 15-10 4-20 7-30 9s-21 3-31 3h-16697c-14 0-28-4-41-12s-24-19-34-34-18-32-23-52c-6-19-8-40-8-61z">
          <text:p/>
        </draw:path>
        <draw:polygon draw:style-name="gr291" draw:text-style-name="P287" draw:layer="layout" svg:width="0.159cm" svg:height="5.221cm" svg:x="2.014cm" svg:y="10.865cm" svg:viewBox="0 0 160 5222" draw:points="0,0 160,0 160,5222 0,5222">
          <text:p/>
        </draw:polygon>
        <draw:polygon draw:style-name="gr276" draw:text-style-name="P275" draw:layer="layout" svg:width="17.014cm" svg:height="0.053cm" svg:x="2.014cm" svg:y="19.611cm" svg:viewBox="0 0 17015 54" draw:points="0,0 17015,0 17015,54 0,54">
          <text:p/>
        </draw:polygon>
        <draw:frame draw:style-name="gr268" draw:text-style-name="P266" draw:layer="layout" svg:width="0.365cm" svg:height="0.433cm" svg:x="2.003cm" svg:y="28.256cm">
          <draw:text-box>
            <text:p text:style-name="P261"><text:span text:style-name="T9">10</text:span></text:p>
          </draw:text-box>
        </draw:frame>
        <draw:path draw:style-name="gr284" draw:text-style-name="P281" draw:layer="layout" svg:width="5.645cm" svg:height="0.53cm" svg:x="7.129cm" svg:y="2.438cm" svg:viewBox="0 0 5646 531" svg:d="M0 79c0-10 2-21 6-30 4-10 9-19 17-26 7-8 16-13 26-17 9-4 19-6 29-6h5489c10 0 20 2 29 6 10 4 19 9 26 17 8 7 13 16 17 26 4 9 7 20 7 30v371c0 11-3 21-7 32-4 9-9 18-17 25-7 8-16 14-26 18-9 4-19 6-30 6h-5487c-10 0-21-2-30-6-10-4-19-10-26-18-8-7-13-16-17-25-4-11-6-21-6-32z">
          <text:p/>
        </draw:path>
        <draw:frame draw:style-name="gr264" draw:text-style-name="P262" draw:layer="layout" svg:width="3.291cm" svg:height="0.48cm" svg:x="2.268cm" svg:y="2.432cm">
          <draw:text-box>
            <text:p text:style-name="P261"><text:span text:style-name="T15">API versioned paths</text:span></text:p>
          </draw:text-box>
        </draw:frame>
        <draw:frame draw:style-name="gr268" draw:text-style-name="P266" draw:layer="layout" svg:width="4.081cm" svg:height="0.433cm" svg:x="7.256cm" svg:y="2.469cm">
          <draw:text-box>
            <text:p text:style-name="P261"><text:span text:style-name="T20">/api/v[0-9]+/[a-zA-Z0-9_\-/]+</text:span></text:p>
          </draw:text-box>
        </draw:frame>
        <draw:path draw:style-name="gr284" draw:text-style-name="P281" draw:layer="layout" svg:width="5.088cm" svg:height="0.53cm" svg:x="7.129cm" svg:y="3.471cm" svg:viewBox="0 0 5089 531" svg:d="M0 80c0-11 2-21 6-31 4-9 9-18 17-25 7-8 16-14 26-18 9-4 19-6 29-6h4932c11 0 20 2 30 6s18 10 26 18c7 7 13 16 17 25 4 10 6 20 6 31v371c0 10-2 20-6 30s-10 19-17 27c-8 7-16 13-26 17s-20 6-31 6h-4930c-10 0-21-2-30-6-10-4-19-10-26-17-8-8-13-17-17-27s-6-20-6-30z">
          <text:p/>
        </draw:path>
        <draw:frame draw:style-name="gr264" draw:text-style-name="P262" draw:layer="layout" svg:width="3.078cm" svg:height="0.48cm" svg:x="2.268cm" svg:y="3.465cm">
          <draw:text-box>
            <text:p text:style-name="P261"><text:span text:style-name="T15">GraphQL endpoint</text:span></text:p>
          </draw:text-box>
        </draw:frame>
        <draw:frame draw:style-name="gr268" draw:text-style-name="P266" draw:layer="layout" svg:width="4.098cm" svg:height="0.433cm" svg:x="7.256cm" svg:y="3.503cm">
          <draw:text-box>
            <text:p text:style-name="P261"><text:span text:style-name="T20">/graphql|/gql|/api/graphql</text:span></text:p>
          </draw:text-box>
        </draw:frame>
        <draw:path draw:style-name="gr284" draw:text-style-name="P281" draw:layer="layout" svg:width="3.975cm" svg:height="0.53cm" svg:x="7.129cm" svg:y="4.505cm" svg:viewBox="0 0 3976 531" svg:d="M0 79c0-10 2-20 6-30s9-18 17-26c7-7 16-13 26-17 9-4 19-6 29-6h3819c10 0 20 2 30 6s18 10 26 17c7 8 13 16 17 26s6 20 6 30v371c0 11-2 21-6 31s-10 18-17 26c-8 7-16 13-26 17s-20 7-31 7h-3817c-10 0-21-3-30-7-10-4-19-10-26-17-8-8-13-16-17-26s-6-20-6-31z">
          <text:p/>
        </draw:path>
        <draw:frame draw:style-name="gr264" draw:text-style-name="P262" draw:layer="layout" svg:width="2.581cm" svg:height="0.48cm" svg:x="2.268cm" svg:y="4.499cm">
          <draw:text-box>
            <text:p text:style-name="P261"><text:span text:style-name="T15">WebSocket URL</text:span></text:p>
          </draw:text-box>
        </draw:frame>
        <draw:frame draw:style-name="gr268" draw:text-style-name="P266" draw:layer="layout" svg:width="2.916cm" svg:height="0.433cm" svg:x="7.256cm" svg:y="4.536cm">
          <draw:text-box>
            <text:p text:style-name="P261"><text:span text:style-name="T20">wss/://[^\s"\x27/&gt;]+</text:span></text:p>
          </draw:text-box>
        </draw:frame>
        <draw:path draw:style-name="gr284" draw:text-style-name="P281" draw:layer="layout" svg:width="6.572cm" svg:height="0.53cm" svg:x="7.129cm" svg:y="5.538cm" svg:viewBox="0 0 6573 531" svg:d="M0 81c0-11 2-21 6-31 4-9 9-18 17-26 7-8 16-14 26-18 9-4 20-6 30-6h6415c10 0 20 2 30 6s18 10 26 18c7 8 13 17 17 26 4 10 6 20 6 31v371c0 11-2 21-6 30-4 10-10 19-17 26-8 8-16 13-26 17s-20 6-30 6h-6415c-10 0-21-2-30-6-10-4-19-9-26-17-8-7-13-16-17-26-4-9-6-19-6-30z">
          <text:p/>
        </draw:path>
        <draw:frame draw:style-name="gr264" draw:text-style-name="P262" draw:layer="layout" svg:width="2.816cm" svg:height="0.48cm" svg:x="2.268cm" svg:y="5.532cm">
          <draw:text-box>
            <text:p text:style-name="P261"><text:span text:style-name="T15">Route definitions</text:span></text:p>
          </draw:text-box>
        </draw:frame>
        <draw:frame draw:style-name="gr268" draw:text-style-name="P266" draw:layer="layout" svg:width="4.764cm" svg:height="0.433cm" svg:x="7.256cm" svg:y="5.57cm">
          <draw:text-box>
            <text:p text:style-name="P261"><text:span text:style-name="T20">path:\s*["\x27](/[a-zA-Z0-9_\-/]+)</text:span></text:p>
          </draw:text-box>
        </draw:frame>
        <draw:path draw:style-name="gr284" draw:text-style-name="P281" draw:layer="layout" svg:width="9.169cm" svg:height="0.53cm" svg:x="7.129cm" svg:y="6.572cm" svg:viewBox="0 0 9170 531" svg:d="M0 80c0-10 2-20 6-31 4-10 9-18 17-26 7-7 16-13 26-17 9-4 20-6 30-6h9012c10 0 20 2 30 6s19 10 26 17c7 8 13 16 17 26 4 11 6 21 6 31v372c0 10-2 20-6 30s-10 18-17 26c-7 7-16 13-26 17-9 4-19 6-30 6h-9012c-11 0-21-2-30-6-10-4-19-10-26-17-8-8-13-16-17-26s-6-20-6-30z">
          <text:p/>
        </draw:path>
        <draw:frame draw:style-name="gr264" draw:text-style-name="P262" draw:layer="layout" svg:width="2.63cm" svg:height="0.48cm" svg:x="2.268cm" svg:y="6.566cm">
          <draw:text-box>
            <text:p text:style-name="P261"><text:span text:style-name="T15">Fetch/XHR URLs</text:span></text:p>
          </draw:text-box>
        </draw:frame>
        <draw:frame draw:style-name="gr268" draw:text-style-name="P266" draw:layer="layout" svg:width="7.323cm" svg:height="0.433cm" svg:x="7.256cm" svg:y="6.604cm">
          <draw:text-box>
            <text:p text:style-name="P261"><text:span text:style-name="T20">(fetch|axios|XMLHttpRequest)\(["\x27]([^"\x27]+)</text:span></text:p>
          </draw:text-box>
        </draw:frame>
        <draw:path draw:style-name="gr284" draw:text-style-name="P281" draw:layer="layout" svg:width="5.459cm" svg:height="0.53cm" svg:x="7.129cm" svg:y="7.606cm" svg:viewBox="0 0 5460 531" svg:d="M0 80c0-11 2-22 6-31 4-10 9-19 17-26 7-8 16-13 26-17 9-4 19-6 29-6h5304c10 0 20 2 29 6 10 4 18 9 26 17 7 7 13 16 17 26 4 9 6 20 6 31v371c0 11-2 21-6 31-4 9-10 18-17 25-8 8-16 14-26 18s-20 6-31 6h-5301c-10 0-21-2-30-6-10-4-19-10-26-18-8-7-13-16-17-25-4-10-6-20-6-31z">
          <text:p/>
        </draw:path>
        <draw:frame draw:style-name="gr264" draw:text-style-name="P262" draw:layer="layout" svg:width="2.752cm" svg:height="0.48cm" svg:x="2.268cm" svg:y="7.599cm">
          <draw:text-box>
            <text:p text:style-name="P261"><text:span text:style-name="T15">Template literals</text:span></text:p>
          </draw:text-box>
        </draw:frame>
        <draw:frame draw:style-name="gr268" draw:text-style-name="P266" draw:layer="layout" svg:width="3.659cm" svg:height="0.433cm" svg:x="7.256cm" svg:y="7.637cm">
          <draw:text-box>
            <text:p text:style-name="P261"><text:span text:style-name="T20">\`(/[a-zA-Z0-9_$\{\}/_-]+)\`</text:span></text:p>
          </draw:text-box>
        </draw:frame>
        <draw:path draw:style-name="gr284" draw:text-style-name="P281" draw:layer="layout" svg:width="7.685cm" svg:height="0.53cm" svg:x="7.129cm" svg:y="8.639cm" svg:viewBox="0 0 7686 531" svg:d="M0 80c0-11 2-21 6-31s9-18 17-26c7-7 16-13 26-17 9-4 19-6 29-6h7530c10 0 20 2 29 6 10 4 18 10 26 17 7 8 13 16 17 26s6 20 6 31v372c0 10-2 20-6 30s-10 18-17 26c-8 7-16 13-26 17s-20 6-30 6h-7528c-10 0-21-2-30-6-10-4-19-10-26-17-8-8-13-16-17-26s-6-20-6-30z">
          <text:p/>
        </draw:path>
        <draw:frame draw:style-name="gr264" draw:text-style-name="P262" draw:layer="layout" svg:width="3.098cm" svg:height="0.48cm" svg:x="2.268cm" svg:y="8.633cm">
          <draw:text-box>
            <text:p text:style-name="P261"><text:span text:style-name="T15">Import statements</text:span></text:p>
          </draw:text-box>
        </draw:frame>
        <draw:frame draw:style-name="gr268" draw:text-style-name="P266" draw:layer="layout" svg:width="6.026cm" svg:height="0.433cm" svg:x="7.256cm" svg:y="8.671cm">
          <draw:text-box>
            <text:p text:style-name="P261"><text:span text:style-name="T20">import\s+.*?\s+from\s+["\x27]([^"\x27]+)</text:span></text:p>
          </draw:text-box>
        </draw:frame>
        <draw:path draw:style-name="gr284" draw:text-style-name="P281" draw:layer="layout" svg:width="5.273cm" svg:height="0.53cm" svg:x="7.129cm" svg:y="9.673cm" svg:viewBox="0 0 5274 531" svg:d="M0 79c0-10 2-20 6-30s9-19 17-26c7-7 16-13 26-17 9-4 19-6 29-6h5118c10 0 20 2 29 6 10 4 19 10 26 17 8 7 13 16 17 26s6 20 6 30v372c0 11-2 21-6 31-4 9-9 18-17 26-7 7-16 13-26 17-9 4-19 6-29 6h-5118c-10 0-20-2-29-6-10-4-19-10-26-17-8-8-13-17-17-26-4-10-6-20-6-31z">
          <text:p/>
        </draw:path>
        <draw:frame draw:style-name="gr264" draw:text-style-name="P262" draw:layer="layout" svg:width="3.234cm" svg:height="0.48cm" svg:x="2.268cm" svg:y="9.667cm">
          <draw:text-box>
            <text:p text:style-name="P261"><text:span text:style-name="T15">Require statements</text:span></text:p>
          </draw:text-box>
        </draw:frame>
        <draw:frame draw:style-name="gr268" draw:text-style-name="P266" draw:layer="layout" svg:width="3.838cm" svg:height="0.433cm" svg:x="7.256cm" svg:y="9.704cm">
          <draw:text-box>
            <text:p text:style-name="P261"><text:span text:style-name="T20">require\(["\x27]([^"\x27]+)</text:span></text:p>
          </draw:text-box>
        </draw:frame>
        <draw:frame draw:style-name="gr278" draw:text-style-name="P277" draw:layer="layout" svg:width="5.005cm" svg:height="0.501cm" svg:x="2.533cm" svg:y="11.291cm">
          <draw:text-box>
            <text:p text:style-name="P261"><text:span text:style-name="T27">Comprehensive grep Pattern</text:span></text:p>
          </draw:text-box>
        </draw:frame>
        <draw:path draw:style-name="gr284" draw:text-style-name="P281" draw:layer="layout" svg:width="16.06cm" svg:height="0.53cm" svg:x="2.544cm" svg:y="12.721cm" svg:viewBox="0 0 16061 531" svg:d="M0 451v-372c0-11 2-21 6-30 4-10 10-19 17-26 7-8 16-13 26-17s20-6 30-6h15982v531h-15982c-10 0-20-2-30-7-10-4-19-9-26-17-7-7-13-16-17-26-4-9-6-19-6-30z">
          <text:p/>
        </draw:path>
        <draw:frame draw:style-name="gr264" draw:text-style-name="P262" draw:layer="layout" svg:width="9.198cm" svg:height="0.48cm" svg:x="2.533cm" svg:y="12.025cm">
          <draw:text-box>
            <text:p text:style-name="P261"><text:span text:style-name="T15">Save this as a single command to run against any JS file:</text:span></text:p>
          </draw:text-box>
        </draw:frame>
        <draw:frame draw:style-name="gr268" draw:text-style-name="P266" draw:layer="layout" svg:width="0.785cm" svg:height="0.433cm" svg:x="2.666cm" svg:y="12.752cm">
          <draw:text-box>
            <text:p text:style-name="P261"><text:span text:style-name="T20">grep </text:span></text:p>
          </draw:text-box>
        </draw:frame>
        <draw:frame draw:style-name="gr268" draw:text-style-name="P266" draw:layer="layout" svg:width="0.571cm" svg:height="0.433cm" svg:x="3.958cm" svg:y="12.752cm">
          <draw:text-box>
            <text:p text:style-name="P261"><text:span text:style-name="T20">-oP </text:span></text:p>
          </draw:text-box>
        </draw:frame>
        <draw:polygon draw:style-name="gr284" draw:text-style-name="P281" draw:layer="layout" svg:width="14.284cm" svg:height="0.53cm" svg:x="2.544cm" svg:y="13.304cm" svg:viewBox="0 0 14285 531" draw:points="0,0 14285,0 14285,531 0,531">
          <text:p/>
        </draw:polygon>
        <draw:frame draw:style-name="gr268" draw:text-style-name="P266" draw:layer="layout" svg:width="10.566cm" svg:height="0.433cm" svg:x="5.064cm" svg:y="12.752cm">
          <draw:text-box>
            <text:p text:style-name="P261"><text:span text:style-name="T20">'(AKIA[0-9A-Z]{16}|AIza[0-9A-Za-z_-]{35}|(pk_|sk_)(live|test)_[0-9a-zA-Z]</text:span></text:p>
          </draw:text-box>
        </draw:frame>
        <draw:polygon draw:style-name="gr284" draw:text-style-name="P281" draw:layer="layout" svg:width="9.646cm" svg:height="0.53cm" svg:x="2.544cm" svg:y="13.887cm" svg:viewBox="0 0 9647 531" draw:points="0,0 9647,0 9647,531 0,531">
          <text:p/>
        </draw:polygon>
        <draw:frame draw:style-name="gr268" draw:text-style-name="P266" draw:layer="layout" svg:width="11.365cm" svg:height="0.433cm" svg:x="2.533cm" svg:y="13.335cm">
          <draw:text-box>
            <text:p text:style-name="P261"><text:span text:style-name="T20">{24,}|xox[baprs]-[0-9]{10,13}|gh[pousr]_[A-Za-z0-9_]{36,}|glpat-[A-Za-z0-9_-]</text:span></text:p>
          </draw:text-box>
        </draw:frame>
        <draw:polygon draw:style-name="gr284" draw:text-style-name="P281" draw:layer="layout" svg:width="15.954cm" svg:height="0.53cm" svg:x="2.544cm" svg:y="14.47cm" svg:viewBox="0 0 15955 531" draw:points="0,0 15955,0 15955,531 0,531">
          <text:p/>
        </draw:polygon>
        <draw:frame draw:style-name="gr268" draw:text-style-name="P266" draw:layer="layout" svg:width="7.365cm" svg:height="0.433cm" svg:x="2.533cm" svg:y="13.918cm">
          <draw:text-box>
            <text:p text:style-name="P261"><text:span text:style-name="T20">{20}|eyJ[A-Za-z0-9_-]*\.eyJ[A-Za-z0-9_-]*\.[A-Za-z0-</text:span></text:p>
          </draw:text-box>
        </draw:frame>
        <draw:path draw:style-name="gr284" draw:text-style-name="P281" draw:layer="layout" svg:width="7.182cm" svg:height="0.53cm" svg:x="2.544cm" svg:y="15.053cm" svg:viewBox="0 0 7183 531" svg:d="M0 0h7105c10 0 19 2 29 6 9 4 18 9 25 17 8 7 14 16 18 26s6 21 6 31v371c0 11-2 21-6 31-4 9-10 18-18 25-7 8-16 14-25 18-10 4-20 6-31 6h-7103z">
          <text:p/>
        </draw:path>
        <draw:frame draw:style-name="gr268" draw:text-style-name="P266" draw:layer="layout" svg:width="12.07cm" svg:height="0.433cm" svg:x="2.533cm" svg:y="14.501cm">
          <draw:text-box>
            <text:p text:style-name="P261"><text:span text:style-name="T20">9_-]*|https/://[^\s"'/&gt;]+|wss/://[^\s"'/&gt;]+|/api/[a-zA-Z0-9_\-/]+|cloudinary://[0-9]+:</text:span></text:p>
          </draw:text-box>
        </draw:frame>
        <draw:frame draw:style-name="gr268" draw:text-style-name="P266" draw:layer="layout" svg:width="5.455cm" svg:height="0.433cm" svg:x="2.533cm" svg:y="15.084cm">
          <draw:text-box>
            <text:p text:style-name="P261"><text:span text:style-name="T20">[A-Za-z0-9_-]+@[A-Za-z0-9_-]+)' app.js</text:span></text:p>
          </draw:text-box>
        </draw:frame>
        <draw:frame draw:style-name="gr277" draw:text-style-name="P276" draw:layer="layout" svg:width="10.167cm" svg:height="1.064cm" svg:x="2.003cm" svg:y="16.528cm">
          <draw:text-box>
            <text:p text:style-name="P261"><text:span text:style-name="T10">4. Essential Tools Deep Dive</text:span></text:p>
          </draw:text-box>
        </draw:frame>
        <draw:path draw:style-name="gr290" draw:text-style-name="P286" draw:layer="layout" svg:width="4.505cm" svg:height="0.769cm" svg:x="2.027cm" svg:y="19.942cm" svg:viewBox="0 0 4506 770" svg:d="M0 677v-584c0-12 2-24 7-35 5-12 11-22 20-31 9-8 19-15 30-20 12-4 23-7 36-7h4321c12 0 24 3 35 7 11 5 21 12 30 20 9 9 15 19 20 31 5 11 7 23 7 35v584c0 12-2 24-7 36-5 11-11 21-20 30-9 8-19 15-30 20-11 4-23 7-35 7h-4321c-13 0-24-3-36-7-11-5-21-12-30-20-9-9-15-19-20-30-5-12-7-24-7-36z">
          <text:p/>
        </draw:path>
        <draw:path draw:style-name="gr292" draw:text-style-name="P202" draw:layer="layout" svg:width="4.505cm" svg:height="0.769cm" svg:x="2.027cm" svg:y="19.942cm" svg:viewBox="0 0 4506 770" svg:d="M0 677v-584c0-12 2-24 7-35 5-12 11-22 20-31 9-8 19-15 30-20 12-4 23-7 36-7h4321c12 0 24 3 35 7 11 5 21 12 30 20 9 9 15 19 20 31 5 11 7 23 7 35v584c0 12-2 24-7 36-5 11-11 21-20 30-9 8-19 15-30 20-11 4-23 7-35 7h-4321c-13 0-24-3-36-7-11-5-21-12-30-20-9-9-15-19-20-30-5-12-7-24-7-36z">
          <text:p/>
        </draw:path>
        <draw:frame draw:style-name="gr281" draw:text-style-name="P279" draw:layer="layout" svg:width="3.491cm" svg:height="0.725cm" svg:x="2.003cm" svg:y="18.621cm">
          <draw:text-box>
            <text:p text:style-name="P261"><text:span text:style-name="T17">4.1 LinkFinder</text:span></text:p>
          </draw:text-box>
        </draw:frame>
        <draw:frame draw:style-name="gr268" draw:text-style-name="P266" draw:layer="layout" svg:width="3.406cm" svg:height="0.433cm" svg:x="2.348cm" svg:y="20.093cm">
          <draw:text-box>
            <text:p text:style-name="P261"><text:span text:style-name="T28">ENDPOINT DISCOVERY</text:span></text:p>
          </draw:text-box>
        </draw:frame>
        <draw:frame draw:style-name="gr278" draw:text-style-name="P277" draw:layer="layout" svg:width="16.948cm" svg:height="0.501cm" svg:x="2.003cm" svg:y="21.335cm">
          <draw:text-box>
            <text:p text:style-name="P261"><text:span text:style-name="T21">LinkFinder</text:span><text:span text:style-name="T11"> <text:s/>by <text:s/>GerbenJavado <text:s/>is <text:s/>a <text:s/>Python <text:s/>script <text:s/>that <text:s/>discovers <text:s/>endpoints <text:s/>in <text:s/>JavaScript <text:s/>files. <text:s/>It</text:span></text:p>
          </draw:text-box>
        </draw:frame>
        <draw:frame draw:style-name="gr278" draw:text-style-name="P277" draw:layer="layout" svg:width="16.5cm" svg:height="0.501cm" svg:x="2.003cm" svg:y="21.945cm">
          <draw:text-box>
            <text:p text:style-name="P261"><text:span text:style-name="T11">parses JS for URL-like strings, route definitions, and API calls, then outputs a deduplicated list of</text:span></text:p>
          </draw:text-box>
        </draw:frame>
        <draw:path draw:style-name="gr276" draw:text-style-name="P275" draw:layer="layout" svg:width="3.471cm" svg:height="0.636cm" svg:x="2.014cm" svg:y="23.454cm" svg:viewBox="0 0 3472 637" svg:d="M0 637v-531c0-14 2-28 8-41 5-13 13-24 23-34s21-18 34-23 27-8 41-8h3260c14 0 28 3 41 8s24 13 34 23 18 21 23 34c6 13 8 27 8 41v531z">
          <text:p/>
        </draw:path>
        <draw:frame draw:style-name="gr278" draw:text-style-name="P277" draw:layer="layout" svg:width="1.844cm" svg:height="0.501cm" svg:x="2.003cm" svg:y="22.554cm">
          <draw:text-box>
            <text:p text:style-name="P261"><text:span text:style-name="T11">endpoints.</text:span></text:p>
          </draw:text-box>
        </draw:frame>
        <draw:frame draw:style-name="gr285" draw:text-style-name="P282" draw:layer="layout" svg:width="2.62cm" svg:height="0.391cm" svg:x="2.268cm" svg:y="23.55cm">
          <draw:text-box>
            <text:p text:style-name="P261"><text:span text:style-name="T22">LINKFINDER USAGE</text:span></text:p>
          </draw:text-box>
        </draw:frame>
      </draw:page>
      <draw:page draw:name="page11" draw:style-name="dp1" draw:master-page-name="master-page569">
        <draw:frame draw:style-name="gr268" draw:text-style-name="P270" draw:layer="layout" svg:width="4.256cm" svg:height="0.446cm" svg:x="2.088cm" svg:y="0.879cm">
          <draw:text-box>
            <text:p text:style-name="P261"><text:span text:style-name="T8">4. Essential Tools Deep Dive</text:span></text:p>
          </draw:text-box>
        </draw:frame>
        <draw:path draw:style-name="gr282" draw:text-style-name="P280" draw:layer="layout" svg:width="16.988cm" svg:height="9.25cm" svg:x="2.027cm" svg:y="2.477cm" svg:viewBox="0 0 16989 9251" svg:d="M0 9105v-8959c0-9 1-19 3-28 2-10 4-19 8-28 4-8 8-17 13-25 6-8 12-15 19-22 6-7 14-13 22-18s16-10 25-14c9-3 18-6 27-8 10-2 19-3 29-3h16697c10 0 19 1 28 3 10 2 19 5 28 8 9 4 17 9 25 14s15 11 22 18 13 14 18 22 10 17 14 25c3 9 6 18 8 28 2 9 3 19 3 28v8959c0 9-1 19-3 28-2 10-5 19-8 28-4 9-9 17-14 25s-11 15-18 22-14 13-22 18-16 10-25 14c-9 3-18 6-28 8-9 2-18 3-28 3h-16697c-10 0-19-1-29-3-9-2-18-5-27-8-9-4-17-9-25-14s-16-11-22-18c-7-7-13-14-19-22-5-8-9-17-13-25-4-9-6-18-8-28-2-9-3-19-3-28z">
          <text:p/>
        </draw:path>
        <draw:path draw:style-name="gr283" draw:text-style-name="P202" draw:layer="layout" svg:width="16.988cm" svg:height="9.25cm" svg:x="2.027cm" svg:y="2.477cm" svg:viewBox="0 0 16989 9251" svg:d="M0 9105v-8959c0-9 1-19 3-28 2-10 4-19 8-28 4-8 8-17 13-25 6-8 12-15 19-22 6-7 14-13 22-18s16-10 25-14c9-3 18-6 27-8 10-2 19-3 29-3h16697c10 0 19 1 28 3 10 2 19 5 28 8 9 4 17 9 25 14s15 11 22 18 13 14 18 22 10 17 14 25c3 9 6 18 8 28 2 9 3 19 3 28v8959c0 9-1 19-3 28-2 10-5 19-8 28-4 9-9 17-14 25s-11 15-18 22-14 13-22 18-16 10-25 14c-9 3-18 6-28 8-9 2-18 3-28 3h-16697c-10 0-19-1-29-3-9-2-18-5-27-8-9-4-17-9-25-14s-16-11-22-18c-7-7-13-14-19-22-5-8-9-17-13-25-4-9-6-18-8-28-2-9-3-19-3-28z">
          <text:p/>
        </draw:path>
        <draw:polygon draw:style-name="gr276" draw:text-style-name="P275" draw:layer="layout" svg:width="17.014cm" svg:height="0.053cm" svg:x="2.014cm" svg:y="13.622cm" svg:viewBox="0 0 17015 54" draw:points="0,0 17015,0 17015,54 0,54">
          <text:p/>
        </draw:polygon>
        <draw:frame draw:style-name="gr268" draw:text-style-name="P266" draw:layer="layout" svg:width="0.365cm" svg:height="0.433cm" svg:x="2.003cm" svg:y="28.256cm">
          <draw:text-box>
            <text:p text:style-name="P261"><text:span text:style-name="T9">11</text:span></text:p>
          </draw:text-box>
        </draw:frame>
        <draw:frame draw:style-name="gr268" draw:text-style-name="P266" draw:layer="layout" svg:width="1.202cm" svg:height="0.433cm" svg:x="2.401cm" svg:y="2.814cm">
          <draw:text-box>
            <text:p text:style-name="P261"><text:span text:style-name="T23"># Install</text:span></text:p>
          </draw:text-box>
        </draw:frame>
        <draw:frame draw:style-name="gr268" draw:text-style-name="P266" draw:layer="layout" svg:width="2.949cm" svg:height="0.433cm" svg:x="2.401cm" svg:y="3.291cm">
          <draw:text-box>
            <text:p text:style-name="P261"><text:span text:style-name="T23">pip install linkfinder</text:span></text:p>
          </draw:text-box>
        </draw:frame>
        <draw:frame draw:style-name="gr268" draw:text-style-name="P266" draw:layer="layout" svg:width="10.258cm" svg:height="0.433cm" svg:x="2.401cm" svg:y="3.768cm">
          <draw:text-box>
            <text:p text:style-name="P261"><text:span text:style-name="T23"># Or clone: git clone https://github.com/GerbenJavado/LinkFinder.git</text:span></text:p>
          </draw:text-box>
        </draw:frame>
        <draw:frame draw:style-name="gr268" draw:text-style-name="P266" draw:layer="layout" svg:width="3.099cm" svg:height="0.433cm" svg:x="2.401cm" svg:y="4.722cm">
          <draw:text-box>
            <text:p text:style-name="P261"><text:span text:style-name="T23"># Scan a single JS file</text:span></text:p>
          </draw:text-box>
        </draw:frame>
        <draw:frame draw:style-name="gr268" draw:text-style-name="P266" draw:layer="layout" svg:width="8.963cm" svg:height="0.433cm" svg:x="2.401cm" svg:y="5.199cm">
          <draw:text-box>
            <text:p text:style-name="P261"><text:span text:style-name="T23">python3 linkfinder.py -i https://target.com/static/app.js -o cli</text:span></text:p>
          </draw:text-box>
        </draw:frame>
        <draw:frame draw:style-name="gr268" draw:text-style-name="P266" draw:layer="layout" svg:width="5.082cm" svg:height="0.433cm" svg:x="2.401cm" svg:y="6.153cm">
          <draw:text-box>
            <text:p text:style-name="P261"><text:span text:style-name="T23"># Scan multiple JS URLs from a file</text:span></text:p>
          </draw:text-box>
        </draw:frame>
        <draw:frame draw:style-name="gr268" draw:text-style-name="P266" draw:layer="layout" svg:width="5.731cm" svg:height="0.433cm" svg:x="2.401cm" svg:y="6.63cm">
          <draw:text-box>
            <text:p text:style-name="P261"><text:span text:style-name="T23">python3 linkfinder.py -i js_urls.txt -o cli</text:span></text:p>
          </draw:text-box>
        </draw:frame>
        <draw:frame draw:style-name="gr268" draw:text-style-name="P266" draw:layer="layout" svg:width="3.718cm" svg:height="0.433cm" svg:x="2.401cm" svg:y="7.584cm">
          <draw:text-box>
            <text:p text:style-name="P261"><text:span text:style-name="T23"># Output to HTML report</text:span></text:p>
          </draw:text-box>
        </draw:frame>
        <draw:frame draw:style-name="gr268" draw:text-style-name="P266" draw:layer="layout" svg:width="10.431cm" svg:height="0.433cm" svg:x="2.401cm" svg:y="8.061cm">
          <draw:text-box>
            <text:p text:style-name="P261"><text:span text:style-name="T23">python3 linkfinder.py -i https://target.com/static/app.js -o output.html</text:span></text:p>
          </draw:text-box>
        </draw:frame>
        <draw:frame draw:style-name="gr268" draw:text-style-name="P266" draw:layer="layout" svg:width="2.402cm" svg:height="0.433cm" svg:x="2.401cm" svg:y="9.015cm">
          <draw:text-box>
            <text:p text:style-name="P261"><text:span text:style-name="T23"># Pipe from gau</text:span></text:p>
          </draw:text-box>
        </draw:frame>
        <draw:frame draw:style-name="gr268" draw:text-style-name="P266" draw:layer="layout" svg:width="10.984cm" svg:height="0.433cm" svg:x="2.401cm" svg:y="9.492cm">
          <draw:text-box>
            <text:p text:style-name="P261"><text:span text:style-name="T23">python3 linkfinder.py -i \- \-input-type url &lt; &lt;(gau target.com | grep '\.js$')</text:span></text:p>
          </draw:text-box>
        </draw:frame>
        <draw:frame draw:style-name="gr268" draw:text-style-name="P266" draw:layer="layout" svg:width="4.907cm" svg:height="0.433cm" svg:x="2.401cm" svg:y="10.446cm">
          <draw:text-box>
            <text:p text:style-name="P261"><text:span text:style-name="T23"># Domain-wide scan via wayback</text:span></text:p>
          </draw:text-box>
        </draw:frame>
        <draw:frame draw:style-name="gr268" draw:text-style-name="P266" draw:layer="layout" svg:width="6.331cm" svg:height="0.433cm" svg:x="2.401cm" svg:y="10.923cm">
          <draw:text-box>
            <text:p text:style-name="P261"><text:span text:style-name="T23">python3 linkfinder.py -i target.com -d -o cli</text:span></text:p>
          </draw:text-box>
        </draw:frame>
        <draw:path draw:style-name="gr290" draw:text-style-name="P286" draw:layer="layout" svg:width="4.081cm" svg:height="0.768cm" svg:x="2.027cm" svg:y="13.953cm" svg:viewBox="0 0 4082 769" svg:d="M0 677v-584c0-13 2-25 7-36s12-21 21-30 19-15 30-20c12-5 23-7 36-7h3895c13 0 25 2 36 7s21 11 30 20 15 19 20 30 7 23 7 36v584c0 12-2 24-7 35s-11 22-20 30c-9 9-19 16-30 20-11 5-23 7-36 7h-3895c-13 0-24-2-36-7-11-4-21-11-30-20-9-8-16-19-21-30s-7-23-7-35z">
          <text:p/>
        </draw:path>
        <draw:path draw:style-name="gr292" draw:text-style-name="P202" draw:layer="layout" svg:width="4.081cm" svg:height="0.768cm" svg:x="2.027cm" svg:y="13.953cm" svg:viewBox="0 0 4082 769" svg:d="M0 677v-584c0-13 2-25 7-36s12-21 21-30 19-15 30-20c12-5 23-7 36-7h3895c13 0 25 2 36 7s21 11 30 20 15 19 20 30 7 23 7 36v584c0 12-2 24-7 35s-11 22-20 30c-9 9-19 16-30 20-11 5-23 7-36 7h-3895c-13 0-24-2-36-7-11-4-21-11-30-20-9-8-16-19-21-30s-7-23-7-35z">
          <text:p/>
        </draw:path>
        <draw:frame draw:style-name="gr281" draw:text-style-name="P279" draw:layer="layout" svg:width="4.018cm" svg:height="0.725cm" svg:x="2.003cm" svg:y="12.631cm">
          <draw:text-box>
            <text:p text:style-name="P261"><text:span text:style-name="T17">4.2 SecretFinder</text:span></text:p>
          </draw:text-box>
        </draw:frame>
        <draw:frame draw:style-name="gr268" draw:text-style-name="P266" draw:layer="layout" svg:width="2.893cm" svg:height="0.433cm" svg:x="2.348cm" svg:y="14.104cm">
          <draw:text-box>
            <text:p text:style-name="P261"><text:span text:style-name="T28">SECRET DISCOVERY</text:span></text:p>
          </draw:text-box>
        </draw:frame>
        <draw:frame draw:style-name="gr278" draw:text-style-name="P277" draw:layer="layout" svg:width="16.407cm" svg:height="0.501cm" svg:x="2.003cm" svg:y="15.319cm">
          <draw:text-box>
            <text:p text:style-name="P261"><text:span text:style-name="T21">SecretFinder</text:span><text:span text:style-name="T11"> is built on top of LinkFinder and specifically targets API keys, tokens, and sensitive</text:span></text:p>
          </draw:text-box>
        </draw:frame>
        <draw:path draw:style-name="gr276" draw:text-style-name="P275" draw:layer="layout" svg:width="3.922cm" svg:height="0.636cm" svg:x="2.014cm" svg:y="16.828cm" svg:viewBox="0 0 3923 637" svg:d="M0 637v-530c0-14 2-27 8-40 5-13 13-25 23-35 10-11 21-18 34-24 13-5 27-8 41-8h3710c14 0 28 3 41 8 14 6 25 13 35 24 10 10 18 22 23 35s8 26 8 40v530z">
          <text:p/>
        </draw:path>
        <draw:frame draw:style-name="gr278" draw:text-style-name="P277" draw:layer="layout" svg:width="15.945cm" svg:height="0.501cm" svg:x="2.003cm" svg:y="15.929cm">
          <draw:text-box>
            <text:p text:style-name="P261"><text:span text:style-name="T11">strings in JavaScript files. It uses a comprehensive regex database covering 50+ secret types.</text:span></text:p>
          </draw:text-box>
        </draw:frame>
        <draw:frame draw:style-name="gr285" draw:text-style-name="P282" draw:layer="layout" svg:width="2.969cm" svg:height="0.391cm" svg:x="2.268cm" svg:y="16.924cm">
          <draw:text-box>
            <text:p text:style-name="P261"><text:span text:style-name="T22">SECRETFINDER USAGE</text:span></text:p>
          </draw:text-box>
        </draw:frame>
      </draw:page>
      <draw:page draw:name="page12" draw:style-name="dp1" draw:master-page-name="master-page569">
        <draw:frame draw:style-name="gr268" draw:text-style-name="P270" draw:layer="layout" svg:width="4.256cm" svg:height="0.446cm" svg:x="2.088cm" svg:y="0.879cm">
          <draw:text-box>
            <text:p text:style-name="P261"><text:span text:style-name="T8">4. Essential Tools Deep Dive</text:span></text:p>
          </draw:text-box>
        </draw:frame>
        <draw:path draw:style-name="gr282" draw:text-style-name="P280" draw:layer="layout" svg:width="16.988cm" svg:height="10.681cm" svg:x="2.027cm" svg:y="2.477cm" svg:viewBox="0 0 16989 10682" svg:d="M0 10536v-10390c0-9 1-19 3-28 2-10 4-19 8-28 4-8 8-17 13-25 6-8 12-15 19-22 6-7 14-13 22-18s16-10 25-13c9-4 18-7 27-9 10-2 19-3 29-3h16697c10 0 19 1 28 3 10 2 19 5 28 9 9 3 17 8 25 13s15 11 22 18 13 14 18 22 10 17 14 25c3 9 6 18 8 28 2 9 3 19 3 28v10390c0 10-1 19-3 28-2 10-5 19-8 28-4 9-9 17-14 25s-11 15-18 22-14 13-22 18c-8 6-16 10-25 14-9 3-18 6-28 8-9 2-18 3-28 3h-16697c-10 0-19-1-29-3-9-2-18-5-27-8-9-4-17-8-25-14-8-5-16-11-22-18-7-7-13-14-19-22-5-8-9-16-13-25s-6-18-8-28c-2-9-3-18-3-28z">
          <text:p/>
        </draw:path>
        <draw:path draw:style-name="gr283" draw:text-style-name="P202" draw:layer="layout" svg:width="16.988cm" svg:height="10.681cm" svg:x="2.027cm" svg:y="2.477cm" svg:viewBox="0 0 16989 10682" svg:d="M0 10536v-10390c0-9 1-19 3-28 2-10 4-19 8-28 4-8 8-17 13-25 6-8 12-15 19-22 6-7 14-13 22-18s16-10 25-13c9-4 18-7 27-9 10-2 19-3 29-3h16697c10 0 19 1 28 3 10 2 19 5 28 9 9 3 17 8 25 13s15 11 22 18 13 14 18 22 10 17 14 25c3 9 6 18 8 28 2 9 3 19 3 28v10390c0 10-1 19-3 28-2 10-5 19-8 28-4 9-9 17-14 25s-11 15-18 22-14 13-22 18c-8 6-16 10-25 14-9 3-18 6-28 8-9 2-18 3-28 3h-16697c-10 0-19-1-29-3-9-2-18-5-27-8-9-4-17-8-25-14-8-5-16-11-22-18-7-7-13-14-19-22-5-8-9-16-13-25s-6-18-8-28c-2-9-3-18-3-28z">
          <text:p/>
        </draw:path>
        <draw:polygon draw:style-name="gr276" draw:text-style-name="P275" draw:layer="layout" svg:width="17.014cm" svg:height="0.053cm" svg:x="2.014cm" svg:y="15.053cm" svg:viewBox="0 0 17015 54" draw:points="0,0 17015,0 17015,54 0,54">
          <text:p/>
        </draw:polygon>
        <draw:frame draw:style-name="gr268" draw:text-style-name="P266" draw:layer="layout" svg:width="0.365cm" svg:height="0.433cm" svg:x="2.003cm" svg:y="28.256cm">
          <draw:text-box>
            <text:p text:style-name="P261"><text:span text:style-name="T9">12</text:span></text:p>
          </draw:text-box>
        </draw:frame>
        <draw:frame draw:style-name="gr268" draw:text-style-name="P266" draw:layer="layout" svg:width="1.202cm" svg:height="0.433cm" svg:x="2.401cm" svg:y="2.814cm">
          <draw:text-box>
            <text:p text:style-name="P261"><text:span text:style-name="T23"># Install</text:span></text:p>
          </draw:text-box>
        </draw:frame>
        <draw:frame draw:style-name="gr268" draw:text-style-name="P266" draw:layer="layout" svg:width="7.746cm" svg:height="0.433cm" svg:x="2.401cm" svg:y="3.291cm">
          <draw:text-box>
            <text:p text:style-name="P261"><text:span text:style-name="T23">git clone https://github.com/m4ll0k/SecretFinder.git</text:span></text:p>
          </draw:text-box>
        </draw:frame>
        <draw:frame draw:style-name="gr268" draw:text-style-name="P266" draw:layer="layout" svg:width="6.354cm" svg:height="0.433cm" svg:x="2.401cm" svg:y="3.768cm">
          <draw:text-box>
            <text:p text:style-name="P261"><text:span text:style-name="T23">pip install -r SecretFinder/requirements.txt</text:span></text:p>
          </draw:text-box>
        </draw:frame>
        <draw:frame draw:style-name="gr268" draw:text-style-name="P266" draw:layer="layout" svg:width="2.982cm" svg:height="0.433cm" svg:x="2.401cm" svg:y="4.722cm">
          <draw:text-box>
            <text:p text:style-name="P261"><text:span text:style-name="T23"># Scan single JS URL</text:span></text:p>
          </draw:text-box>
        </draw:frame>
        <draw:frame draw:style-name="gr268" draw:text-style-name="P266" draw:layer="layout" svg:width="9.42cm" svg:height="0.433cm" svg:x="2.401cm" svg:y="5.199cm">
          <draw:text-box>
            <text:p text:style-name="P261"><text:span text:style-name="T23">python3 SecretFinder.py -i https://target.com/static/app.js -o cli</text:span></text:p>
          </draw:text-box>
        </draw:frame>
        <draw:frame draw:style-name="gr268" draw:text-style-name="P266" draw:layer="layout" svg:width="2.994cm" svg:height="0.433cm" svg:x="2.401cm" svg:y="6.153cm">
          <draw:text-box>
            <text:p text:style-name="P261"><text:span text:style-name="T23"># Scan from URL list</text:span></text:p>
          </draw:text-box>
        </draw:frame>
        <draw:frame draw:style-name="gr268" draw:text-style-name="P266" draw:layer="layout" svg:width="6.187cm" svg:height="0.433cm" svg:x="2.401cm" svg:y="6.63cm">
          <draw:text-box>
            <text:p text:style-name="P261"><text:span text:style-name="T23">python3 SecretFinder.py -i js_urls.txt -o cli</text:span></text:p>
          </draw:text-box>
        </draw:frame>
        <draw:frame draw:style-name="gr268" draw:text-style-name="P266" draw:layer="layout" svg:width="6.017cm" svg:height="0.433cm" svg:x="2.401cm" svg:y="7.584cm">
          <draw:text-box>
            <text:p text:style-name="P261"><text:span text:style-name="T23"># Output to HTML report with highlights</text:span></text:p>
          </draw:text-box>
        </draw:frame>
        <draw:frame draw:style-name="gr268" draw:text-style-name="P266" draw:layer="layout" svg:width="10.885cm" svg:height="0.433cm" svg:x="2.401cm" svg:y="8.061cm">
          <draw:text-box>
            <text:p text:style-name="P261"><text:span text:style-name="T23">python3 SecretFinder.py -i https://target.com/static/app.js -o results.html</text:span></text:p>
          </draw:text-box>
        </draw:frame>
        <draw:frame draw:style-name="gr268" draw:text-style-name="P266" draw:layer="layout" svg:width="7.198cm" svg:height="0.433cm" svg:x="2.401cm" svg:y="9.015cm">
          <draw:text-box>
            <text:p text:style-name="P261"><text:span text:style-name="T23"># Pipe from gau for domain-wide secret hunting</text:span></text:p>
          </draw:text-box>
        </draw:frame>
        <draw:frame draw:style-name="gr268" draw:text-style-name="P266" draw:layer="layout" svg:width="7.12cm" svg:height="0.433cm" svg:x="2.401cm" svg:y="9.492cm">
          <draw:text-box>
            <text:p text:style-name="P261"><text:span text:style-name="T23">gau target.com | grep '\.js$' | while read url; do</text:span></text:p>
          </draw:text-box>
        </draw:frame>
        <draw:frame draw:style-name="gr268" draw:text-style-name="P266" draw:layer="layout" svg:width="7.392cm" svg:height="0.433cm" svg:x="3.143cm" svg:y="9.969cm">
          <draw:text-box>
            <text:p text:style-name="P261"><text:span text:style-name="T23">python3 SecretFinder.py -i "$url" -o cli 2&gt;/dev/null</text:span></text:p>
          </draw:text-box>
        </draw:frame>
        <draw:frame draw:style-name="gr268" draw:text-style-name="P266" draw:layer="layout" svg:width="3.203cm" svg:height="0.433cm" svg:x="2.401cm" svg:y="10.446cm">
          <draw:text-box>
            <text:p text:style-name="P261"><text:span text:style-name="T23">done | tee secrets.txt</text:span></text:p>
          </draw:text-box>
        </draw:frame>
        <draw:frame draw:style-name="gr268" draw:text-style-name="P266" draw:layer="layout" svg:width="5.985cm" svg:height="0.433cm" svg:x="2.401cm" svg:y="11.4cm">
          <draw:text-box>
            <text:p text:style-name="P261"><text:span text:style-name="T23"># Combine with grep for specific secrets</text:span></text:p>
          </draw:text-box>
        </draw:frame>
        <draw:frame draw:style-name="gr268" draw:text-style-name="P266" draw:layer="layout" svg:width="11.859cm" svg:height="0.433cm" svg:x="2.401cm" svg:y="11.877cm">
          <draw:text-box>
            <text:p text:style-name="P261"><text:span text:style-name="T23">python3 <text:s/>SecretFinder.py <text:s/>-i <text:s/>https://target.com/static/app.js <text:s/>-o <text:s/>cli <text:s/>| <text:s/>grep <text:s/>-iE <text:s/>"</text:span></text:p>
          </draw:text-box>
        </draw:frame>
        <draw:frame draw:style-name="gr268" draw:text-style-name="P266" draw:layer="layout" svg:width="4.05cm" svg:height="0.433cm" svg:x="2.401cm" svg:y="12.355cm">
          <draw:text-box>
            <text:p text:style-name="P261"><text:span text:style-name="T23">(aws|stripe|google|slack)"</text:span></text:p>
          </draw:text-box>
        </draw:frame>
        <draw:path draw:style-name="gr290" draw:text-style-name="P286" draw:layer="layout" svg:width="3.339cm" svg:height="0.769cm" svg:x="2.027cm" svg:y="15.384cm" svg:viewBox="0 0 3340 770" svg:d="M0 677v-584c0-13 2-24 7-36 5-11 11-21 20-30s19-15 30-20c12-5 23-7 36-7h3154c13 0 25 2 36 7s21 11 30 20 15 19 20 30c5 12 7 23 7 36v584c0 12-2 24-7 35-5 12-11 22-20 30-9 9-19 16-30 20-11 5-23 8-36 8h-3154c-13 0-24-3-36-8-11-4-21-11-30-20-9-8-15-18-20-30-5-11-7-23-7-35z">
          <text:p/>
        </draw:path>
        <draw:path draw:style-name="gr292" draw:text-style-name="P202" draw:layer="layout" svg:width="3.339cm" svg:height="0.769cm" svg:x="2.027cm" svg:y="15.384cm" svg:viewBox="0 0 3340 770" svg:d="M0 677v-584c0-13 2-24 7-36 5-11 11-21 20-30s19-15 30-20c12-5 23-7 36-7h3154c13 0 25 2 36 7s21 11 30 20 15 19 20 30c5 12 7 23 7 36v584c0 12-2 24-7 35-5 12-11 22-20 30-9 9-19 16-30 20-11 5-23 8-36 8h-3154c-13 0-24-3-36-8-11-4-21-11-30-20-9-8-15-18-20-30-5-11-7-23-7-35z">
          <text:p/>
        </draw:path>
        <draw:frame draw:style-name="gr281" draw:text-style-name="P279" draw:layer="layout" svg:width="4.231cm" svg:height="0.725cm" svg:x="2.003cm" svg:y="14.063cm">
          <draw:text-box>
            <text:p text:style-name="P261"><text:span text:style-name="T17">4.3 JSMon / GetJS</text:span></text:p>
          </draw:text-box>
        </draw:frame>
        <draw:frame draw:style-name="gr268" draw:text-style-name="P266" draw:layer="layout" svg:width="2.278cm" svg:height="0.433cm" svg:x="2.348cm" svg:y="15.535cm">
          <draw:text-box>
            <text:p text:style-name="P261"><text:span text:style-name="T28">JS COLLECTION</text:span></text:p>
          </draw:text-box>
        </draw:frame>
        <draw:frame draw:style-name="gr278" draw:text-style-name="P277" draw:layer="layout" svg:width="15.965cm" svg:height="0.501cm" svg:x="2.003cm" svg:y="16.75cm">
          <draw:text-box>
            <text:p text:style-name="P261"><text:span text:style-name="T21">GetJS</text:span><text:span text:style-name="T11"> <text:s/>by <text:s/>003random <text:s/>fetches <text:s/>and <text:s/>lists <text:s/>all <text:s/>JavaScript <text:s/>files <text:s/>referenced <text:s/>by <text:s/>a <text:s/>target. </text:span><text:span text:style-name="T21"><text:s/>JSMon</text:span></text:p>
          </draw:text-box>
        </draw:frame>
        <draw:path draw:style-name="gr276" draw:text-style-name="P275" draw:layer="layout" svg:width="4.081cm" svg:height="0.636cm" svg:x="2.014cm" svg:y="18.259cm" svg:viewBox="0 0 4082 637" svg:d="M0 637v-531c0-14 2-27 8-40 5-13 13-25 24-35 10-9 21-17 34-23 13-5 27-8 41-8h3869c14 0 28 3 41 8 13 6 24 14 34 23 10 10 18 22 23 35s8 26 8 40v531z">
          <text:p/>
        </draw:path>
        <draw:frame draw:style-name="gr278" draw:text-style-name="P277" draw:layer="layout" svg:width="16.377cm" svg:height="0.501cm" svg:x="2.003cm" svg:y="17.36cm">
          <draw:text-box>
            <text:p text:style-name="P261"><text:span text:style-name="T11">monitors JavaScript files for changes and alerts when new endpoints or secrets are introduced.</text:span></text:p>
          </draw:text-box>
        </draw:frame>
        <draw:frame draw:style-name="gr285" draw:text-style-name="P282" draw:layer="layout" svg:width="3.022cm" svg:height="0.391cm" svg:x="2.268cm" svg:y="18.355cm">
          <draw:text-box>
            <text:p text:style-name="P261"><text:span text:style-name="T22">GETJS &amp; JSMON USAGE</text:span></text:p>
          </draw:text-box>
        </draw:frame>
      </draw:page>
      <draw:page draw:name="page13" draw:style-name="dp1" draw:master-page-name="master-page569">
        <draw:frame draw:style-name="gr268" draw:text-style-name="P270" draw:layer="layout" svg:width="4.256cm" svg:height="0.446cm" svg:x="2.088cm" svg:y="0.879cm">
          <draw:text-box>
            <text:p text:style-name="P261"><text:span text:style-name="T8">4. Essential Tools Deep Dive</text:span></text:p>
          </draw:text-box>
        </draw:frame>
        <draw:path draw:style-name="gr282" draw:text-style-name="P280" draw:layer="layout" svg:width="16.988cm" svg:height="12.112cm" svg:x="2.027cm" svg:y="2.477cm" svg:viewBox="0 0 16989 12113" svg:d="M0 11967v-11821c0-9 1-19 3-28 2-10 4-19 8-28 4-8 8-17 13-25 6-8 12-15 19-22 6-7 14-13 22-18s16-10 25-14c9-3 18-6 27-8 10-2 19-3 29-3h16697c10 0 19 1 28 3 10 2 19 5 28 8 9 4 17 9 25 14s15 11 22 18 13 14 18 22 10 17 14 25c3 9 6 18 8 28 2 9 3 19 3 28v11821c0 10-1 19-3 29-2 9-5 18-8 27-4 9-9 17-14 25s-11 15-18 22-14 13-22 18c-8 6-16 10-25 14-9 3-18 6-28 8-9 2-18 3-28 3h-16697c-10 0-19-1-29-3-9-2-18-5-27-8-9-4-17-8-25-14-8-5-16-11-22-18-7-7-13-14-19-22-5-8-9-16-13-25s-6-18-8-27c-2-10-3-19-3-29z">
          <text:p/>
        </draw:path>
        <draw:path draw:style-name="gr283" draw:text-style-name="P202" draw:layer="layout" svg:width="16.988cm" svg:height="12.112cm" svg:x="2.027cm" svg:y="2.477cm" svg:viewBox="0 0 16989 12113" svg:d="M0 11967v-11821c0-9 1-19 3-28 2-10 4-19 8-28 4-8 8-17 13-25 6-8 12-15 19-22 6-7 14-13 22-18s16-10 25-14c9-3 18-6 27-8 10-2 19-3 29-3h16697c10 0 19 1 28 3 10 2 19 5 28 8 9 4 17 9 25 14s15 11 22 18 13 14 18 22 10 17 14 25c3 9 6 18 8 28 2 9 3 19 3 28v11821c0 10-1 19-3 29-2 9-5 18-8 27-4 9-9 17-14 25s-11 15-18 22-14 13-22 18c-8 6-16 10-25 14-9 3-18 6-28 8-9 2-18 3-28 3h-16697c-10 0-19-1-29-3-9-2-18-5-27-8-9-4-17-8-25-14-8-5-16-11-22-18-7-7-13-14-19-22-5-8-9-16-13-25s-6-18-8-27c-2-10-3-19-3-29z">
          <text:p/>
        </draw:path>
        <draw:polygon draw:style-name="gr276" draw:text-style-name="P275" draw:layer="layout" svg:width="17.014cm" svg:height="0.053cm" svg:x="2.014cm" svg:y="16.484cm" svg:viewBox="0 0 17015 54" draw:points="0,0 17015,0 17015,54 0,54">
          <text:p/>
        </draw:polygon>
        <draw:frame draw:style-name="gr268" draw:text-style-name="P266" draw:layer="layout" svg:width="0.365cm" svg:height="0.433cm" svg:x="2.003cm" svg:y="28.256cm">
          <draw:text-box>
            <text:p text:style-name="P261"><text:span text:style-name="T9">13</text:span></text:p>
          </draw:text-box>
        </draw:frame>
        <draw:frame draw:style-name="gr268" draw:text-style-name="P266" draw:layer="layout" svg:width="2.071cm" svg:height="0.433cm" svg:x="2.401cm" svg:y="2.814cm">
          <draw:text-box>
            <text:p text:style-name="P261"><text:span text:style-name="T23"># Install GetJS</text:span></text:p>
          </draw:text-box>
        </draw:frame>
        <draw:frame draw:style-name="gr268" draw:text-style-name="P266" draw:layer="layout" svg:width="6.974cm" svg:height="0.433cm" svg:x="2.401cm" svg:y="3.291cm">
          <draw:text-box>
            <text:p text:style-name="P261"><text:span text:style-name="T23">go install github.com/003random/getJS@latest</text:span></text:p>
          </draw:text-box>
        </draw:frame>
        <draw:frame draw:style-name="gr268" draw:text-style-name="P266" draw:layer="layout" svg:width="4.619cm" svg:height="0.433cm" svg:x="2.401cm" svg:y="4.245cm">
          <draw:text-box>
            <text:p text:style-name="P261"><text:span text:style-name="T23"># Fetch all JS files from a target</text:span></text:p>
          </draw:text-box>
        </draw:frame>
        <draw:frame draw:style-name="gr268" draw:text-style-name="P266" draw:layer="layout" svg:width="5.423cm" svg:height="0.433cm" svg:x="2.401cm" svg:y="4.722cm">
          <draw:text-box>
            <text:p text:style-name="P261"><text:span text:style-name="T23">getJS -url https://target.com -resolve</text:span></text:p>
          </draw:text-box>
        </draw:frame>
        <draw:frame draw:style-name="gr268" draw:text-style-name="P266" draw:layer="layout" svg:width="2.278cm" svg:height="0.433cm" svg:x="2.401cm" svg:y="5.676cm">
          <draw:text-box>
            <text:p text:style-name="P261"><text:span text:style-name="T23"># Output to file</text:span></text:p>
          </draw:text-box>
        </draw:frame>
        <draw:frame draw:style-name="gr268" draw:text-style-name="P266" draw:layer="layout" svg:width="5.97cm" svg:height="0.433cm" svg:x="2.401cm" svg:y="6.153cm">
          <draw:text-box>
            <text:p text:style-name="P261"><text:span text:style-name="T23">getJS -url https://target.com &gt; js_files.txt</text:span></text:p>
          </draw:text-box>
        </draw:frame>
        <draw:frame draw:style-name="gr268" draw:text-style-name="P266" draw:layer="layout" svg:width="4.389cm" svg:height="0.433cm" svg:x="2.401cm" svg:y="7.107cm">
          <draw:text-box>
            <text:p text:style-name="P261"><text:span text:style-name="T23"># Resolve and complete URLs</text:span></text:p>
          </draw:text-box>
        </draw:frame>
        <draw:frame draw:style-name="gr268" draw:text-style-name="P266" draw:layer="layout" svg:width="8.113cm" svg:height="0.433cm" svg:x="2.401cm" svg:y="7.584cm">
          <draw:text-box>
            <text:p text:style-name="P261"><text:span text:style-name="T23">getJS -url https://target.com -complete &gt; full_js_urls.txt</text:span></text:p>
          </draw:text-box>
        </draw:frame>
        <draw:frame draw:style-name="gr268" draw:text-style-name="P266" draw:layer="layout" svg:width="2.222cm" svg:height="0.433cm" svg:x="2.401cm" svg:y="8.538cm">
          <draw:text-box>
            <text:p text:style-name="P261"><text:span text:style-name="T23"># Install JSMon</text:span></text:p>
          </draw:text-box>
        </draw:frame>
        <draw:frame draw:style-name="gr268" draw:text-style-name="P266" draw:layer="layout" svg:width="6.622cm" svg:height="0.433cm" svg:x="2.401cm" svg:y="9.015cm">
          <draw:text-box>
            <text:p text:style-name="P261"><text:span text:style-name="T23">git clone https://github.com/robre/jsmon.git</text:span></text:p>
          </draw:text-box>
        </draw:frame>
        <draw:frame draw:style-name="gr268" draw:text-style-name="P266" draw:layer="layout" svg:width="5.394cm" svg:height="0.433cm" svg:x="2.401cm" svg:y="9.492cm">
          <draw:text-box>
            <text:p text:style-name="P261"><text:span text:style-name="T23">pip install -r jsmon/requirements.txt</text:span></text:p>
          </draw:text-box>
        </draw:frame>
        <draw:frame draw:style-name="gr268" draw:text-style-name="P266" draw:layer="layout" svg:width="2.919cm" svg:height="0.433cm" svg:x="2.401cm" svg:y="10.446cm">
          <draw:text-box>
            <text:p text:style-name="P261"><text:span text:style-name="T23"># Configure targets</text:span></text:p>
          </draw:text-box>
        </draw:frame>
        <draw:frame draw:style-name="gr268" draw:text-style-name="P266" draw:layer="layout" svg:width="8.764cm" svg:height="0.433cm" svg:x="2.401cm" svg:y="10.923cm">
          <draw:text-box>
            <text:p text:style-name="P261"><text:span text:style-name="T23">echo "https://target.com/static/app.js" /&gt; jsmon/targets.txt</text:span></text:p>
          </draw:text-box>
        </draw:frame>
        <draw:frame draw:style-name="gr268" draw:text-style-name="P266" draw:layer="layout" svg:width="5.897cm" svg:height="0.433cm" svg:x="2.401cm" svg:y="11.877cm">
          <draw:text-box>
            <text:p text:style-name="P261"><text:span text:style-name="T23"># Run monitoring (alerts on JS changes)</text:span></text:p>
          </draw:text-box>
        </draw:frame>
        <draw:frame draw:style-name="gr268" draw:text-style-name="P266" draw:layer="layout" svg:width="6.587cm" svg:height="0.433cm" svg:x="2.401cm" svg:y="12.355cm">
          <draw:text-box>
            <text:p text:style-name="P261"><text:span text:style-name="T23">python3 jsmon.py /-config jsmon/config.yml</text:span></text:p>
          </draw:text-box>
        </draw:frame>
        <draw:frame draw:style-name="gr268" draw:text-style-name="P266" draw:layer="layout" svg:width="4.814cm" svg:height="0.433cm" svg:x="2.401cm" svg:y="13.309cm">
          <draw:text-box>
            <text:p text:style-name="P261"><text:span text:style-name="T23"># Slack notification on JS change</text:span></text:p>
          </draw:text-box>
        </draw:frame>
        <draw:frame draw:style-name="gr268" draw:text-style-name="P266" draw:layer="layout" svg:width="7.154cm" svg:height="0.433cm" svg:x="2.401cm" svg:y="13.786cm">
          <draw:text-box>
            <text:p text:style-name="P261"><text:span text:style-name="T23"># Edit jsmon/config.yml with your webhook URL</text:span></text:p>
          </draw:text-box>
        </draw:frame>
        <draw:path draw:style-name="gr290" draw:text-style-name="P286" draw:layer="layout" svg:width="3.392cm" svg:height="0.769cm" svg:x="2.027cm" svg:y="16.815cm" svg:viewBox="0 0 3393 770" svg:d="M0 677v-584c0-12 2-24 7-36 5-11 11-21 20-30 9-8 19-15 30-20 12-5 23-7 36-7h3207c13 0 25 2 36 7s21 12 30 20c9 9 15 19 20 30 5 12 7 24 7 36v584c0 12-2 24-7 35-5 12-11 22-20 30-9 9-19 16-30 21-11 4-23 7-36 7h-3207c-13 0-24-3-36-7-11-5-21-12-30-21-9-8-15-18-20-30-5-11-7-23-7-35z">
          <text:p/>
        </draw:path>
        <draw:path draw:style-name="gr292" draw:text-style-name="P202" draw:layer="layout" svg:width="3.392cm" svg:height="0.769cm" svg:x="2.027cm" svg:y="16.815cm" svg:viewBox="0 0 3393 770" svg:d="M0 677v-584c0-12 2-24 7-36 5-11 11-21 20-30 9-8 19-15 30-20 12-5 23-7 36-7h3207c13 0 25 2 36 7s21 12 30 20c9 9 15 19 20 30 5 12 7 24 7 36v584c0 12-2 24-7 35-5 12-11 22-20 30-9 9-19 16-30 21-11 4-23 7-36 7h-3207c-13 0-24-3-36-7-11-5-21-12-30-21-9-8-15-18-20-30-5-11-7-23-7-35z">
          <text:p/>
        </draw:path>
        <draw:frame draw:style-name="gr281" draw:text-style-name="P279" draw:layer="layout" svg:width="5.549cm" svg:height="0.725cm" svg:x="2.003cm" svg:y="15.494cm">
          <draw:text-box>
            <text:p text:style-name="P261"><text:span text:style-name="T17">4.4 Katana &amp; Gospider</text:span></text:p>
          </draw:text-box>
        </draw:frame>
        <draw:frame draw:style-name="gr268" draw:text-style-name="P266" draw:layer="layout" svg:width="2.374cm" svg:height="0.433cm" svg:x="2.348cm" svg:y="16.966cm">
          <draw:text-box>
            <text:p text:style-name="P261"><text:span text:style-name="T28">WEB CRAWLERS</text:span></text:p>
          </draw:text-box>
        </draw:frame>
        <draw:frame draw:style-name="gr278" draw:text-style-name="P277" draw:layer="layout" svg:width="16.661cm" svg:height="0.501cm" svg:x="2.003cm" svg:y="18.181cm">
          <draw:text-box>
            <text:p text:style-name="P261"><text:span text:style-name="T21">Katana</text:span><text:span text:style-name="T11"> <text:s/>(ProjectDiscovery) <text:s/>is <text:s/>a <text:s/>next-generation <text:s/>web <text:s/>crawler <text:s/>with <text:s/>headless <text:s/>browser <text:s/>support.</text:span></text:p>
          </draw:text-box>
        </draw:frame>
        <draw:frame draw:style-name="gr278" draw:text-style-name="P277" draw:layer="layout" svg:width="16.649cm" svg:height="0.501cm" svg:x="2.003cm" svg:y="18.791cm">
          <draw:text-box>
            <text:p text:style-name="P261"><text:span text:style-name="T21">Gospider</text:span><text:span text:style-name="T11"> <text:s/>is <text:s/>a <text:s/>fast <text:s/>multi-threaded <text:s/>Go <text:s/>crawler. <text:s/>Both <text:s/>extract <text:s/>JavaScript <text:s/>URLs, <text:s/>endpoints, <text:s/>and</text:span></text:p>
          </draw:text-box>
        </draw:frame>
        <draw:path draw:style-name="gr276" draw:text-style-name="P275" draw:layer="layout" svg:width="2.941cm" svg:height="0.636cm" svg:x="2.014cm" svg:y="20.3cm" svg:viewBox="0 0 2942 637" svg:d="M0 637v-531c0-14 2-28 8-40 5-13 13-25 23-35s21-17 34-23c13-5 27-8 41-8h2730c14 0 28 3 41 8 13 6 24 13 34 23s18 22 23 35c6 12 8 26 8 40v531z">
          <text:p/>
        </draw:path>
        <draw:frame draw:style-name="gr278" draw:text-style-name="P277" draw:layer="layout" svg:width="4.147cm" svg:height="0.501cm" svg:x="2.003cm" svg:y="19.4cm">
          <draw:text-box>
            <text:p text:style-name="P261"><text:span text:style-name="T11">secrets during crawling.</text:span></text:p>
          </draw:text-box>
        </draw:frame>
        <draw:frame draw:style-name="gr285" draw:text-style-name="P282" draw:layer="layout" svg:width="2.077cm" svg:height="0.391cm" svg:x="2.268cm" svg:y="20.396cm">
          <draw:text-box>
            <text:p text:style-name="P261"><text:span text:style-name="T22">KATANA USAGE</text:span></text:p>
          </draw:text-box>
        </draw:frame>
      </draw:page>
      <draw:page draw:name="page14" draw:style-name="dp1" draw:master-page-name="master-page569">
        <draw:frame draw:style-name="gr268" draw:text-style-name="P270" draw:layer="layout" svg:width="4.256cm" svg:height="0.446cm" svg:x="2.088cm" svg:y="0.879cm">
          <draw:text-box>
            <text:p text:style-name="P261"><text:span text:style-name="T8">4. Essential Tools Deep Dive</text:span></text:p>
          </draw:text-box>
        </draw:frame>
        <draw:path draw:style-name="gr282" draw:text-style-name="P280" draw:layer="layout" svg:width="16.988cm" svg:height="9.25cm" svg:x="2.027cm" svg:y="2.477cm" svg:viewBox="0 0 16989 9251" svg:d="M0 9105v-8959c0-9 1-19 3-28 2-10 4-19 8-28 4-8 8-17 13-25 6-8 12-15 19-22 6-7 14-13 22-18s16-10 25-14c9-3 18-6 27-8 10-2 19-3 29-3h16697c10 0 19 1 28 3 10 2 19 5 28 8 9 4 17 9 25 14s15 11 22 18 13 14 18 22 10 17 14 25c3 9 6 18 8 28 2 9 3 19 3 28v8959c0 9-1 19-3 28-2 10-5 19-8 28-4 9-9 17-14 25s-11 15-18 22-14 13-22 18-16 10-25 14c-9 3-18 6-28 8-9 2-18 3-28 3h-16697c-10 0-19-1-29-3-9-2-18-5-27-8-9-4-17-9-25-14s-16-11-22-18c-7-7-13-14-19-22-5-8-9-16-13-25s-6-18-8-28c-2-9-3-19-3-28z">
          <text:p/>
        </draw:path>
        <draw:path draw:style-name="gr283" draw:text-style-name="P202" draw:layer="layout" svg:width="16.988cm" svg:height="9.25cm" svg:x="2.027cm" svg:y="2.477cm" svg:viewBox="0 0 16989 9251" svg:d="M0 9105v-8959c0-9 1-19 3-28 2-10 4-19 8-28 4-8 8-17 13-25 6-8 12-15 19-22 6-7 14-13 22-18s16-10 25-14c9-3 18-6 27-8 10-2 19-3 29-3h16697c10 0 19 1 28 3 10 2 19 5 28 8 9 4 17 9 25 14s15 11 22 18 13 14 18 22 10 17 14 25c3 9 6 18 8 28 2 9 3 19 3 28v8959c0 9-1 19-3 28-2 10-5 19-8 28-4 9-9 17-14 25s-11 15-18 22-14 13-22 18-16 10-25 14c-9 3-18 6-28 8-9 2-18 3-28 3h-16697c-10 0-19-1-29-3-9-2-18-5-27-8-9-4-17-9-25-14s-16-11-22-18c-7-7-13-14-19-22-5-8-9-16-13-25s-6-18-8-28c-2-9-3-19-3-28z">
          <text:p/>
        </draw:path>
        <draw:path draw:style-name="gr282" draw:text-style-name="P280" draw:layer="layout" svg:width="16.988cm" svg:height="8.772cm" svg:x="2.027cm" svg:y="12.946cm" svg:viewBox="0 0 16989 8773" svg:d="M0 8627v-8481c0-10 1-20 3-29s4-18 8-27 8-18 13-26c6-7 12-15 19-22 6-6 14-12 22-18 8-5 16-10 25-13 9-4 18-7 27-8 10-2 19-3 29-3h16697c10 0 19 1 28 3 10 1 19 4 28 8 9 3 17 8 25 13 8 6 15 12 22 18 7 7 13 15 18 23 5 7 10 16 14 25 3 9 6 18 8 27s3 19 3 29v8481c0 10-1 19-3 29-2 9-5 18-8 27-4 9-9 17-14 25s-11 15-18 22-14 13-22 18c-8 6-16 10-25 14-9 3-18 6-28 8-9 2-18 3-28 3h-16697c-10 0-19-1-29-3-9-2-18-5-27-8-9-4-17-8-25-14-8-5-16-11-22-18-7-7-13-14-19-22-5-8-9-16-13-25s-6-18-8-27c-2-10-3-19-3-29z">
          <text:p/>
        </draw:path>
        <draw:path draw:style-name="gr283" draw:text-style-name="P202" draw:layer="layout" svg:width="16.988cm" svg:height="8.772cm" svg:x="2.027cm" svg:y="12.946cm" svg:viewBox="0 0 16989 8773" svg:d="M0 8627v-8481c0-10 1-20 3-29s4-18 8-27 8-18 13-26c6-7 12-15 19-22 6-6 14-12 22-18 8-5 16-10 25-13 9-4 18-7 27-8 10-2 19-3 29-3h16697c10 0 19 1 28 3 10 1 19 4 28 8 9 3 17 8 25 13 8 6 15 12 22 18 7 7 13 15 18 23 5 7 10 16 14 25 3 9 6 18 8 27s3 19 3 29v8481c0 10-1 19-3 29-2 9-5 18-8 27-4 9-9 17-14 25s-11 15-18 22-14 13-22 18c-8 6-16 10-25 14-9 3-18 6-28 8-9 2-18 3-28 3h-16697c-10 0-19-1-29-3-9-2-18-5-27-8-9-4-17-8-25-14-8-5-16-11-22-18-7-7-13-14-19-22-5-8-9-16-13-25s-6-18-8-27c-2-10-3-19-3-29z">
          <text:p/>
        </draw:path>
        <draw:polygon draw:style-name="gr276" draw:text-style-name="P275" draw:layer="layout" svg:width="17.014cm" svg:height="0.053cm" svg:x="2.014cm" svg:y="23.613cm" svg:viewBox="0 0 17015 54" draw:points="0,0 17015,0 17015,54 0,54">
          <text:p/>
        </draw:polygon>
        <draw:frame draw:style-name="gr268" draw:text-style-name="P266" draw:layer="layout" svg:width="0.365cm" svg:height="0.433cm" svg:x="2.003cm" svg:y="28.256cm">
          <draw:text-box>
            <text:p text:style-name="P261"><text:span text:style-name="T9">14</text:span></text:p>
          </draw:text-box>
        </draw:frame>
        <draw:frame draw:style-name="gr268" draw:text-style-name="P266" draw:layer="layout" svg:width="1.202cm" svg:height="0.433cm" svg:x="2.401cm" svg:y="2.814cm">
          <draw:text-box>
            <text:p text:style-name="P261"><text:span text:style-name="T23"># Install</text:span></text:p>
          </draw:text-box>
        </draw:frame>
        <draw:frame draw:style-name="gr268" draw:text-style-name="P266" draw:layer="layout" svg:width="2.903cm" svg:height="0.433cm" svg:x="2.401cm" svg:y="3.291cm">
          <draw:text-box>
            <text:p text:style-name="P261"><text:span text:style-name="T23">apt install -y katana</text:span></text:p>
          </draw:text-box>
        </draw:frame>
        <draw:frame draw:style-name="gr268" draw:text-style-name="P266" draw:layer="layout" svg:width="10.687cm" svg:height="0.433cm" svg:x="2.401cm" svg:y="3.768cm">
          <draw:text-box>
            <text:p text:style-name="P261"><text:span text:style-name="T23"># Or: go install github.com/projectdiscovery/katana/cmd/katana@latest</text:span></text:p>
          </draw:text-box>
        </draw:frame>
        <draw:frame draw:style-name="gr268" draw:text-style-name="P266" draw:layer="layout" svg:width="4.217cm" svg:height="0.433cm" svg:x="2.401cm" svg:y="4.722cm">
          <draw:text-box>
            <text:p text:style-name="P261"><text:span text:style-name="T23"># Basic crawl with JS parsing</text:span></text:p>
          </draw:text-box>
        </draw:frame>
        <draw:frame draw:style-name="gr268" draw:text-style-name="P266" draw:layer="layout" svg:width="7.739cm" svg:height="0.433cm" svg:x="2.401cm" svg:y="5.199cm">
          <draw:text-box>
            <text:p text:style-name="P261"><text:span text:style-name="T23">katana -u https://target.com -jc -o katana_output.txt</text:span></text:p>
          </draw:text-box>
        </draw:frame>
        <draw:frame draw:style-name="gr268" draw:text-style-name="P266" draw:layer="layout" svg:width="7.377cm" svg:height="0.433cm" svg:x="2.401cm" svg:y="6.153cm">
          <draw:text-box>
            <text:p text:style-name="P261"><text:span text:style-name="T23"># Headless crawl (renders JS, finds dynamic URLs)</text:span></text:p>
          </draw:text-box>
        </draw:frame>
        <draw:frame draw:style-name="gr268" draw:text-style-name="P266" draw:layer="layout" svg:width="8.463cm" svg:height="0.433cm" svg:x="2.401cm" svg:y="6.63cm">
          <draw:text-box>
            <text:p text:style-name="P261"><text:span text:style-name="T23">katana -u https://target.com -headless -jc -o katana_js.txt</text:span></text:p>
          </draw:text-box>
        </draw:frame>
        <draw:frame draw:style-name="gr268" draw:text-style-name="P266" draw:layer="layout" svg:width="5.184cm" svg:height="0.433cm" svg:x="2.401cm" svg:y="7.584cm">
          <draw:text-box>
            <text:p text:style-name="P261"><text:span text:style-name="T23"># Crawl with form filling and scope</text:span></text:p>
          </draw:text-box>
        </draw:frame>
        <draw:frame draw:style-name="gr268" draw:text-style-name="P266" draw:layer="layout" svg:width="8.547cm" svg:height="0.433cm" svg:x="2.401cm" svg:y="8.061cm">
          <draw:text-box>
            <text:p text:style-name="P261"><text:span text:style-name="T23">katana -u https://target.com -jc -headless -aff -scope fqdn</text:span></text:p>
          </draw:text-box>
        </draw:frame>
        <draw:frame draw:style-name="gr268" draw:text-style-name="P266" draw:layer="layout" svg:width="3.07cm" svg:height="0.433cm" svg:x="2.401cm" svg:y="9.015cm">
          <draw:text-box>
            <text:p text:style-name="P261"><text:span text:style-name="T23"># Extract JS files only</text:span></text:p>
          </draw:text-box>
        </draw:frame>
        <draw:frame draw:style-name="gr268" draw:text-style-name="P266" draw:layer="layout" svg:width="9.285cm" svg:height="0.433cm" svg:x="2.401cm" svg:y="9.492cm">
          <draw:text-box>
            <text:p text:style-name="P261"><text:span text:style-name="T23">katana -u https://target.com -jc | grep '\.js$' | tee katana_js.txt</text:span></text:p>
          </draw:text-box>
        </draw:frame>
        <draw:frame draw:style-name="gr268" draw:text-style-name="P266" draw:layer="layout" svg:width="4.046cm" svg:height="0.433cm" svg:x="2.401cm" svg:y="10.446cm">
          <draw:text-box>
            <text:p text:style-name="P261"><text:span text:style-name="T23"># Full crawl with all options</text:span></text:p>
          </draw:text-box>
        </draw:frame>
        <draw:path draw:style-name="gr276" draw:text-style-name="P275" draw:layer="layout" svg:width="3.206cm" svg:height="0.637cm" svg:x="2.014cm" svg:y="12.084cm" svg:viewBox="0 0 3207 638" svg:d="M0 638v-532c0-14 2-27 8-40 5-13 13-25 23-35 10-9 21-17 34-22 13-6 27-9 41-9h2995c14 0 28 3 41 9 13 5 24 13 34 22 10 10 18 22 23 35 6 13 8 26 8 40v532z">
          <text:p/>
        </draw:path>
        <draw:frame draw:style-name="gr268" draw:text-style-name="P266" draw:layer="layout" svg:width="9.364cm" svg:height="0.433cm" svg:x="2.401cm" svg:y="10.923cm">
          <draw:text-box>
            <text:p text:style-name="P261"><text:span text:style-name="T23">katana -u https://target.com -headless -jc -kf all -o full_crawl.txt</text:span></text:p>
          </draw:text-box>
        </draw:frame>
        <draw:frame draw:style-name="gr285" draw:text-style-name="P282" draw:layer="layout" svg:width="2.377cm" svg:height="0.391cm" svg:x="2.268cm" svg:y="12.18cm">
          <draw:text-box>
            <text:p text:style-name="P261"><text:span text:style-name="T22">GOSPIDER USAGE</text:span></text:p>
          </draw:text-box>
        </draw:frame>
        <draw:frame draw:style-name="gr268" draw:text-style-name="P266" draw:layer="layout" svg:width="1.202cm" svg:height="0.433cm" svg:x="2.401cm" svg:y="13.282cm">
          <draw:text-box>
            <text:p text:style-name="P261"><text:span text:style-name="T23"># Install</text:span></text:p>
          </draw:text-box>
        </draw:frame>
        <draw:frame draw:style-name="gr268" draw:text-style-name="P266" draw:layer="layout" svg:width="7.812cm" svg:height="0.433cm" svg:x="2.401cm" svg:y="13.759cm">
          <draw:text-box>
            <text:p text:style-name="P261"><text:span text:style-name="T23">go install github.com/jaeles-project/gospider@latest</text:span></text:p>
          </draw:text-box>
        </draw:frame>
        <draw:frame draw:style-name="gr268" draw:text-style-name="P266" draw:layer="layout" svg:width="4.434cm" svg:height="0.433cm" svg:x="2.401cm" svg:y="14.713cm">
          <draw:text-box>
            <text:p text:style-name="P261"><text:span text:style-name="T23"># Fast crawl with JS extraction</text:span></text:p>
          </draw:text-box>
        </draw:frame>
        <draw:frame draw:style-name="gr268" draw:text-style-name="P266" draw:layer="layout" svg:width="8.588cm" svg:height="0.433cm" svg:x="2.401cm" svg:y="15.19cm">
          <draw:text-box>
            <text:p text:style-name="P261"><text:span text:style-name="T23">gospider -s "https://target.com" -o gospider_out -c 10 -d 3</text:span></text:p>
          </draw:text-box>
        </draw:frame>
        <draw:frame draw:style-name="gr268" draw:text-style-name="P266" draw:layer="layout" svg:width="4.412cm" svg:height="0.433cm" svg:x="2.401cm" svg:y="16.144cm">
          <draw:text-box>
            <text:p text:style-name="P261"><text:span text:style-name="T23"># Extract JS, subs, and secrets</text:span></text:p>
          </draw:text-box>
        </draw:frame>
        <draw:frame draw:style-name="gr268" draw:text-style-name="P266" draw:layer="layout" svg:width="10.275cm" svg:height="0.433cm" svg:x="2.401cm" svg:y="16.621cm">
          <draw:text-box>
            <text:p text:style-name="P261"><text:span text:style-name="T23">gospider -s "https://target.com" /-subs /-sitemap /-robots -a -w -o out</text:span></text:p>
          </draw:text-box>
        </draw:frame>
        <draw:frame draw:style-name="gr268" draw:text-style-name="P266" draw:layer="layout" svg:width="2.906cm" svg:height="0.433cm" svg:x="2.401cm" svg:y="17.575cm">
          <draw:text-box>
            <text:p text:style-name="P261"><text:span text:style-name="T23"># Crawl with cookie</text:span></text:p>
          </draw:text-box>
        </draw:frame>
        <draw:frame draw:style-name="gr268" draw:text-style-name="P266" draw:layer="layout" svg:width="10.001cm" svg:height="0.433cm" svg:x="2.401cm" svg:y="18.052cm">
          <draw:text-box>
            <text:p text:style-name="P261"><text:span text:style-name="T23">gospider -s "https://target.com" -H "Cookie: session=abc123" -o out</text:span></text:p>
          </draw:text-box>
        </draw:frame>
        <draw:frame draw:style-name="gr268" draw:text-style-name="P266" draw:layer="layout" svg:width="4.786cm" svg:height="0.433cm" svg:x="2.401cm" svg:y="19.007cm">
          <draw:text-box>
            <text:p text:style-name="P261"><text:span text:style-name="T23"># The output directory contains:</text:span></text:p>
          </draw:text-box>
        </draw:frame>
        <draw:frame draw:style-name="gr268" draw:text-style-name="P266" draw:layer="layout" svg:width="5.168cm" svg:height="0.433cm" svg:x="2.401cm" svg:y="19.484cm">
          <draw:text-box>
            <text:p text:style-name="P261"><text:span text:style-name="T23"># - javascript: All discovered JS files</text:span></text:p>
          </draw:text-box>
        </draw:frame>
        <draw:frame draw:style-name="gr268" draw:text-style-name="P266" draw:layer="layout" svg:width="6.243cm" svg:height="0.433cm" svg:x="2.401cm" svg:y="19.961cm">
          <draw:text-box>
            <text:p text:style-name="P261"><text:span text:style-name="T23"># - robots.txt, sitemap.xml: Parsed entries</text:span></text:p>
          </draw:text-box>
        </draw:frame>
        <draw:frame draw:style-name="gr268" draw:text-style-name="P266" draw:layer="layout" svg:width="5.901cm" svg:height="0.433cm" svg:x="2.401cm" svg:y="20.438cm">
          <draw:text-box>
            <text:p text:style-name="P261"><text:span text:style-name="T23"># - subdomain: Discovered subdomains</text:span></text:p>
          </draw:text-box>
        </draw:frame>
        <draw:frame draw:style-name="gr268" draw:text-style-name="P266" draw:layer="layout" svg:width="5.376cm" svg:height="0.433cm" svg:x="2.401cm" svg:y="20.915cm">
          <draw:text-box>
            <text:p text:style-name="P261"><text:span text:style-name="T23"># - secrets: Potential secret matches</text:span></text:p>
          </draw:text-box>
        </draw:frame>
        <draw:path draw:style-name="gr290" draw:text-style-name="P286" draw:layer="layout" svg:width="5.115cm" svg:height="0.769cm" svg:x="2.027cm" svg:y="23.944cm" svg:viewBox="0 0 5116 770" svg:d="M0 677v-584c0-12 2-24 7-36 5-11 11-21 20-30 9-8 19-15 30-20 12-5 23-7 36-7h4930c12 0 24 2 36 7 11 5 21 12 30 20 8 9 15 19 20 30 4 12 7 24 7 36v584c0 12-3 24-7 35-5 12-12 22-20 30-9 9-19 16-30 21-12 4-24 7-36 7h-4930c-13 0-24-3-36-7-11-5-21-12-30-21-9-8-15-18-20-30-5-11-7-23-7-35z">
          <text:p/>
        </draw:path>
        <draw:path draw:style-name="gr292" draw:text-style-name="P202" draw:layer="layout" svg:width="5.115cm" svg:height="0.769cm" svg:x="2.027cm" svg:y="23.944cm" svg:viewBox="0 0 5116 770" svg:d="M0 677v-584c0-12 2-24 7-36 5-11 11-21 20-30 9-8 19-15 30-20 12-5 23-7 36-7h4930c12 0 24 2 36 7 11 5 21 12 30 20 8 9 15 19 20 30 4 12 7 24 7 36v584c0 12-3 24-7 35-5 12-12 22-20 30-9 9-19 16-30 21-12 4-24 7-36 7h-4930c-13 0-24-3-36-7-11-5-21-12-30-21-9-8-15-18-20-30-5-11-7-23-7-35z">
          <text:p/>
        </draw:path>
        <draw:frame draw:style-name="gr281" draw:text-style-name="P279" draw:layer="layout" svg:width="6.764cm" svg:height="0.725cm" svg:x="2.003cm" svg:y="22.623cm">
          <draw:text-box>
            <text:p text:style-name="P261"><text:span text:style-name="T17">4.5 Nuclei (Exposed Panels)</text:span></text:p>
          </draw:text-box>
        </draw:frame>
        <draw:frame draw:style-name="gr268" draw:text-style-name="P266" draw:layer="layout" svg:width="3.87cm" svg:height="0.433cm" svg:x="2.348cm" svg:y="24.095cm">
          <draw:text-box>
            <text:p text:style-name="P261"><text:span text:style-name="T28">VULNERABILITY SCANNER</text:span></text:p>
          </draw:text-box>
        </draw:frame>
        <draw:frame draw:style-name="gr278" draw:text-style-name="P277" draw:layer="layout" svg:width="15.946cm" svg:height="0.501cm" svg:x="2.003cm" svg:y="25.31cm">
          <draw:text-box>
            <text:p text:style-name="P261"><text:span text:style-name="T21">Nuclei</text:span><text:span text:style-name="T11"> by ProjectDiscovery has templates specifically for detecting exposed JS panels, source</text:span></text:p>
          </draw:text-box>
        </draw:frame>
        <draw:frame draw:style-name="gr278" draw:text-style-name="P277" draw:layer="layout" svg:width="8.408cm" svg:height="0.501cm" svg:x="2.003cm" svg:y="25.92cm">
          <draw:text-box>
            <text:p text:style-name="P261"><text:span text:style-name="T11">maps, and hardcoded secrets in client-side code.</text:span></text:p>
          </draw:text-box>
        </draw:frame>
      </draw:page>
      <draw:page draw:name="page15" draw:style-name="dp1" draw:master-page-name="master-page569">
        <draw:frame draw:style-name="gr268" draw:text-style-name="P270" draw:layer="layout" svg:width="3.957cm" svg:height="0.446cm" svg:x="2.088cm" svg:y="0.879cm">
          <draw:text-box>
            <text:p text:style-name="P261"><text:span text:style-name="T8">5. Automation &amp; Pipelines</text:span></text:p>
          </draw:text-box>
        </draw:frame>
        <draw:path draw:style-name="gr282" draw:text-style-name="P280" draw:layer="layout" svg:width="16.988cm" svg:height="7.341cm" svg:x="2.027cm" svg:y="3.432cm" svg:viewBox="0 0 16989 7342" svg:d="M0 7196v-7051c0-9 1-19 3-28 2-10 4-19 8-28 4-8 8-17 13-25 6-8 12-15 19-22 6-7 14-13 22-18s16-10 25-13c9-4 18-7 27-9 10-2 19-2 29-2h16697c10 0 19 0 28 2 10 2 19 5 28 9 9 3 17 8 25 13s15 11 22 18 13 14 18 22 10 17 14 25c3 9 6 18 8 28 2 9 3 19 3 28v7051c0 9-1 19-3 28-2 10-5 19-8 28-4 8-9 17-14 25s-11 15-18 22-14 13-22 18-16 10-25 13c-9 4-18 7-28 9-9 2-18 3-28 3h-16697c-10 0-19-1-29-3-9-2-18-5-27-9-9-3-17-8-25-13s-16-11-22-18c-7-7-13-14-19-22-5-8-9-17-13-25-4-9-6-18-8-28-2-9-3-19-3-28z">
          <text:p/>
        </draw:path>
        <draw:path draw:style-name="gr283" draw:text-style-name="P202" draw:layer="layout" svg:width="16.988cm" svg:height="7.341cm" svg:x="2.027cm" svg:y="3.432cm" svg:viewBox="0 0 16989 7342" svg:d="M0 7196v-7051c0-9 1-19 3-28 2-10 4-19 8-28 4-8 8-17 13-25 6-8 12-15 19-22 6-7 14-13 22-18s16-10 25-13c9-4 18-7 27-9 10-2 19-2 29-2h16697c10 0 19 0 28 2 10 2 19 5 28 9 9 3 17 8 25 13s15 11 22 18 13 14 18 22 10 17 14 25c3 9 6 18 8 28 2 9 3 19 3 28v7051c0 9-1 19-3 28-2 10-5 19-8 28-4 8-9 17-14 25s-11 15-18 22-14 13-22 18-16 10-25 13c-9 4-18 7-28 9-9 2-18 3-28 3h-16697c-10 0-19-1-29-3-9-2-18-5-27-9-9-3-17-8-25-13s-16-11-22-18c-7-7-13-14-19-22-5-8-9-17-13-25-4-9-6-18-8-28-2-9-3-19-3-28z">
          <text:p/>
        </draw:path>
        <draw:path draw:style-name="gr276" draw:text-style-name="P275" draw:layer="layout" svg:width="3.975cm" svg:height="0.636cm" svg:x="2.014cm" svg:y="2.544cm" svg:viewBox="0 0 3976 637" svg:d="M0 637v-531c0-14 2-28 8-41 5-13 13-24 23-34s21-18 34-23c13-6 27-8 41-8h3763c14 0 28 2 41 8 13 5 24 13 34 23 11 10 19 21 24 34s8 27 8 41v531z">
          <text:p/>
        </draw:path>
        <draw:frame draw:style-name="gr268" draw:text-style-name="P266" draw:layer="layout" svg:width="0.365cm" svg:height="0.433cm" svg:x="2.003cm" svg:y="28.256cm">
          <draw:text-box>
            <text:p text:style-name="P261"><text:span text:style-name="T9">15</text:span></text:p>
          </draw:text-box>
        </draw:frame>
        <draw:frame draw:style-name="gr285" draw:text-style-name="P282" draw:layer="layout" svg:width="2.932cm" svg:height="0.391cm" svg:x="2.268cm" svg:y="2.64cm">
          <draw:text-box>
            <text:p text:style-name="P261"><text:span text:style-name="T22">NUCLEI JS TEMPLATES</text:span></text:p>
          </draw:text-box>
        </draw:frame>
        <draw:frame draw:style-name="gr268" draw:text-style-name="P266" draw:layer="layout" svg:width="4.874cm" svg:height="0.433cm" svg:x="2.401cm" svg:y="3.768cm">
          <draw:text-box>
            <text:p text:style-name="P261"><text:span text:style-name="T23"># Exposed source map detection</text:span></text:p>
          </draw:text-box>
        </draw:frame>
        <draw:frame draw:style-name="gr268" draw:text-style-name="P266" draw:layer="layout" svg:width="10.172cm" svg:height="0.433cm" svg:x="2.401cm" svg:y="4.245cm">
          <draw:text-box>
            <text:p text:style-name="P261"><text:span text:style-name="T23">nuclei -u https://target.com -t http/exposures/files/source-map.yaml</text:span></text:p>
          </draw:text-box>
        </draw:frame>
        <draw:frame draw:style-name="gr268" draw:text-style-name="P266" draw:layer="layout" svg:width="4.275cm" svg:height="0.433cm" svg:x="2.401cm" svg:y="5.199cm">
          <draw:text-box>
            <text:p text:style-name="P261"><text:span text:style-name="T23"># Exposed .env file detection</text:span></text:p>
          </draw:text-box>
        </draw:frame>
        <draw:frame draw:style-name="gr268" draw:text-style-name="P266" draw:layer="layout" svg:width="9.408cm" svg:height="0.433cm" svg:x="2.401cm" svg:y="5.676cm">
          <draw:text-box>
            <text:p text:style-name="P261"><text:span text:style-name="T23">nuclei -u https://target.com -t http/exposures/configs/env.yaml</text:span></text:p>
          </draw:text-box>
        </draw:frame>
        <draw:frame draw:style-name="gr268" draw:text-style-name="P266" draw:layer="layout" svg:width="4.43cm" svg:height="0.433cm" svg:x="2.401cm" svg:y="6.63cm">
          <draw:text-box>
            <text:p text:style-name="P261"><text:span text:style-name="T23"># General exposure detection</text:span></text:p>
          </draw:text-box>
        </draw:frame>
        <draw:frame draw:style-name="gr268" draw:text-style-name="P266" draw:layer="layout" svg:width="11.968cm" svg:height="0.433cm" svg:x="2.401cm" svg:y="7.107cm">
          <draw:text-box>
            <text:p text:style-name="P261"><text:span text:style-name="T23">nuclei -u https://target.com -t http/exposures/ -severity low,medium,high,critical</text:span></text:p>
          </draw:text-box>
        </draw:frame>
        <draw:frame draw:style-name="gr268" draw:text-style-name="P266" draw:layer="layout" svg:width="3.725cm" svg:height="0.433cm" svg:x="2.401cm" svg:y="8.061cm">
          <draw:text-box>
            <text:p text:style-name="P261"><text:span text:style-name="T23"># Specific JS file scanning</text:span></text:p>
          </draw:text-box>
        </draw:frame>
        <draw:frame draw:style-name="gr268" draw:text-style-name="P266" draw:layer="layout" svg:width="10.449cm" svg:height="0.433cm" svg:x="2.401cm" svg:y="8.538cm">
          <draw:text-box>
            <text:p text:style-name="P261"><text:span text:style-name="T23">cat js_urls.txt | nuclei -t http/exposures/ -severity medium,high,critical</text:span></text:p>
          </draw:text-box>
        </draw:frame>
        <draw:frame draw:style-name="gr268" draw:text-style-name="P266" draw:layer="layout" svg:width="5.826cm" svg:height="0.433cm" svg:x="2.401cm" svg:y="9.492cm">
          <draw:text-box>
            <text:p text:style-name="P261"><text:span text:style-name="T23"># Combined with httpx for JS validation</text:span></text:p>
          </draw:text-box>
        </draw:frame>
        <draw:frame draw:style-name="gr268" draw:text-style-name="P266" draw:layer="layout" svg:width="8.35cm" svg:height="0.433cm" svg:x="2.401cm" svg:y="9.969cm">
          <draw:text-box>
            <text:p text:style-name="P261"><text:span text:style-name="T23">cat js_urls.txt | httpx -mc 200 | nuclei -t http/exposures/</text:span></text:p>
          </draw:text-box>
        </draw:frame>
        <draw:frame draw:style-name="gr277" draw:text-style-name="P276" draw:layer="layout" svg:width="9.452cm" svg:height="1.064cm" svg:x="2.003cm" svg:y="11.148cm">
          <draw:text-box>
            <text:p text:style-name="P261"><text:span text:style-name="T10">5. Automation &amp; Pipelines</text:span></text:p>
          </draw:text-box>
        </draw:frame>
        <draw:frame draw:style-name="gr278" draw:text-style-name="P277" draw:layer="layout" svg:width="17.31cm" svg:height="0.501cm" svg:x="2.003cm" svg:y="12.881cm">
          <draw:text-box>
            <text:p text:style-name="P261"><text:span text:style-name="T11">Manual <text:s/>analysis <text:s/>is <text:s/>great <text:s/>for <text:s/>spot <text:s/>checks, <text:s/>but <text:s/>bug <text:s/>bounty <text:s/>hunters <text:s/>need <text:s/>automation. <text:s/>Here <text:s/>are</text:span></text:p>
          </draw:text-box>
        </draw:frame>
        <draw:frame draw:style-name="gr278" draw:text-style-name="P277" draw:layer="layout" svg:width="8.637cm" svg:height="0.501cm" svg:x="2.003cm" svg:y="13.49cm">
          <draw:text-box>
            <text:p text:style-name="P261"><text:span text:style-name="T11">complete pipelines for JS reconnaissance at scale. </text:span></text:p>
          </draw:text-box>
        </draw:frame>
        <draw:frame draw:style-name="gr278" draw:text-style-name="P277" draw:layer="layout" svg:width="0.461cm" svg:height="0.433cm" svg:x="10.881cm" svg:y="13.543cm">
          <draw:text-box>
            <text:p text:style-name="P261"><text:span text:style-name="T12">🤖</text:span></text:p>
          </draw:text-box>
        </draw:frame>
        <draw:path draw:style-name="gr276" draw:text-style-name="P275" draw:layer="layout" svg:width="3.604cm" svg:height="0.609cm" svg:x="2.014cm" svg:y="15.689cm" svg:viewBox="0 0 3605 610" svg:d="M0 610v-504c0-14 2-28 8-41 5-13 13-24 23-34s21-18 34-23c13-6 27-8 41-8h3393c14 0 28 2 41 8 12 5 24 13 34 23s17 21 23 34c5 13 8 27 8 41v504z">
          <text:p/>
        </draw:path>
        <draw:frame draw:style-name="gr293" draw:text-style-name="P288" draw:layer="layout" svg:width="5.406cm" svg:height="0.577cm" svg:x="2.003cm" svg:y="14.679cm">
          <draw:text-box>
            <text:p text:style-name="P261"><text:span text:style-name="T29">Complete JS Recon Pipeline</text:span></text:p>
          </draw:text-box>
        </draw:frame>
        <draw:frame draw:style-name="gr285" draw:text-style-name="P282" draw:layer="layout" svg:width="2.689cm" svg:height="0.391cm" svg:x="2.268cm" svg:y="15.785cm">
          <draw:text-box>
            <text:p text:style-name="P261"><text:span text:style-name="T22">FULL RECON SCRIPT</text:span></text:p>
          </draw:text-box>
        </draw:frame>
      </draw:page>
      <draw:page draw:name="page16" draw:style-name="dp1" draw:master-page-name="master-page569">
        <draw:frame draw:style-name="gr268" draw:text-style-name="P270" draw:layer="layout" svg:width="3.957cm" svg:height="0.446cm" svg:x="2.088cm" svg:y="0.879cm">
          <draw:text-box>
            <text:p text:style-name="P261"><text:span text:style-name="T8">5. Automation &amp; Pipelines</text:span></text:p>
          </draw:text-box>
        </draw:frame>
        <draw:path draw:style-name="gr282" draw:text-style-name="P280" draw:layer="layout" svg:width="16.988cm" svg:height="24.767cm" svg:x="2.027cm" svg:y="2.477cm" svg:viewBox="0 0 16989 24768" svg:d="M0 24768v-24622c0-9 1-19 3-28 2-10 4-19 8-28 4-8 8-17 13-25 6-8 12-15 19-22 6-7 14-13 22-18s16-10 25-13c9-4 18-7 27-9 10-2 19-3 29-3h16697c10 0 19 1 28 3 10 2 19 5 28 9 9 3 17 8 25 13s15 11 22 18 13 14 18 22 10 17 14 25c3 9 6 18 8 28 2 9 3 19 3 28v24622z">
          <text:p/>
        </draw:path>
        <draw:polygon draw:style-name="gr276" draw:text-style-name="P275" draw:layer="layout" svg:width="17.014cm" svg:height="0.093cm" svg:x="2.014cm" svg:y="2.464cm" svg:viewBox="0 0 17015 94" draw:points="16922,94 92,94 0,0 17015,0">
          <text:p/>
        </draw:polygon>
        <draw:polygon draw:style-name="gr276" draw:text-style-name="P275" draw:layer="layout" svg:width="0.093cm" svg:height="24.78cm" svg:x="18.935cm" svg:y="2.464cm" svg:viewBox="0 0 94 24781" draw:points="94,24781 0,24781 0,90 91,0">
          <text:p/>
        </draw:polygon>
        <draw:polygon draw:style-name="gr276" draw:text-style-name="P275" draw:layer="layout" svg:width="0.092cm" svg:height="24.78cm" svg:x="2.014cm" svg:y="2.464cm" svg:viewBox="0 0 93 24781" draw:points="93,90 93,24781 0,24781 0,0 2,0">
          <text:p/>
        </draw:polygon>
        <draw:frame draw:style-name="gr268" draw:text-style-name="P266" draw:layer="layout" svg:width="0.365cm" svg:height="0.433cm" svg:x="2.003cm" svg:y="28.256cm">
          <draw:text-box>
            <text:p text:style-name="P261"><text:span text:style-name="T9">16</text:span></text:p>
          </draw:text-box>
        </draw:frame>
        <draw:frame draw:style-name="gr268" draw:text-style-name="P266" draw:layer="layout" svg:width="1.637cm" svg:height="0.433cm" svg:x="2.401cm" svg:y="2.814cm">
          <draw:text-box>
            <text:p text:style-name="P261"><text:span text:style-name="T23">/!/bin/bash</text:span></text:p>
          </draw:text-box>
        </draw:frame>
        <draw:frame draw:style-name="gr268" draw:text-style-name="P266" draw:layer="layout" svg:width="8.865cm" svg:height="0.433cm" svg:x="2.401cm" svg:y="3.291cm">
          <draw:text-box>
            <text:p text:style-name="P261"><text:span text:style-name="T23"># js_recon.sh - Complete JavaScript reconnaissance pipeline</text:span></text:p>
          </draw:text-box>
        </draw:frame>
        <draw:frame draw:style-name="gr268" draw:text-style-name="P266" draw:layer="layout" svg:width="3.243cm" svg:height="0.433cm" svg:x="2.401cm" svg:y="4.245cm">
          <draw:text-box>
            <text:p text:style-name="P261"><text:span text:style-name="T23">TARGET="target.com"</text:span></text:p>
          </draw:text-box>
        </draw:frame>
        <draw:frame draw:style-name="gr268" draw:text-style-name="P266" draw:layer="layout" svg:width="4.651cm" svg:height="0.433cm" svg:x="2.401cm" svg:y="4.722cm">
          <draw:text-box>
            <text:p text:style-name="P261"><text:span text:style-name="T23">OUTPUT="js_recon_${TARGET}"</text:span></text:p>
          </draw:text-box>
        </draw:frame>
        <draw:frame draw:style-name="gr268" draw:text-style-name="P266" draw:layer="layout" svg:width="3.037cm" svg:height="0.433cm" svg:x="2.401cm" svg:y="5.199cm">
          <draw:text-box>
            <text:p text:style-name="P261"><text:span text:style-name="T23">mkdir -p "$OUTPUT"</text:span></text:p>
          </draw:text-box>
        </draw:frame>
        <draw:frame draw:style-name="gr268" draw:text-style-name="P266" draw:layer="layout" svg:width="5.837cm" svg:height="0.433cm" svg:x="2.401cm" svg:y="6.153cm">
          <draw:text-box>
            <text:p text:style-name="P261"><text:span text:style-name="T23">echo "[+] Phase 1: Collecting JS URLs//."</text:span></text:p>
          </draw:text-box>
        </draw:frame>
        <draw:frame draw:style-name="gr268" draw:text-style-name="P266" draw:layer="layout" svg:width="1.727cm" svg:height="0.433cm" svg:x="2.401cm" svg:y="6.63cm">
          <draw:text-box>
            <text:p text:style-name="P261"><text:span text:style-name="T23"># From gau</text:span></text:p>
          </draw:text-box>
        </draw:frame>
        <draw:frame draw:style-name="gr268" draw:text-style-name="P266" draw:layer="layout" svg:width="11.783cm" svg:height="0.433cm" svg:x="2.401cm" svg:y="7.107cm">
          <draw:text-box>
            <text:p text:style-name="P261"><text:span text:style-name="T23">gau "$TARGET" | grep -iE '\.(js|mjs|jsx)(\/.*)?$' | sort -u &gt; "$OUTPUT/gau_js.txt"</text:span></text:p>
          </draw:text-box>
        </draw:frame>
        <draw:frame draw:style-name="gr268" draw:text-style-name="P266" draw:layer="layout" svg:width="2.172cm" svg:height="0.433cm" svg:x="2.401cm" svg:y="8.061cm">
          <draw:text-box>
            <text:p text:style-name="P261"><text:span text:style-name="T23"># From katana</text:span></text:p>
          </draw:text-box>
        </draw:frame>
        <draw:frame draw:style-name="gr268" draw:text-style-name="P266" draw:layer="layout" svg:width="11.978cm" svg:height="0.433cm" svg:x="2.401cm" svg:y="8.538cm">
          <draw:text-box>
            <text:p text:style-name="P261"><text:span text:style-name="T23">katana -u "https://$TARGET" -jc -silent 2&gt;/dev/null | grep -iE '\.(js|mjs)' | sort -u &gt;</text:span></text:p>
          </draw:text-box>
        </draw:frame>
        <draw:frame draw:style-name="gr268" draw:text-style-name="P266" draw:layer="layout" svg:width="3.69cm" svg:height="0.433cm" svg:x="2.401cm" svg:y="9.015cm">
          <draw:text-box>
            <text:p text:style-name="P261"><text:span text:style-name="T23">"$OUTPUT/katana_js.txt"</text:span></text:p>
          </draw:text-box>
        </draw:frame>
        <draw:frame draw:style-name="gr268" draw:text-style-name="P266" draw:layer="layout" svg:width="2.479cm" svg:height="0.433cm" svg:x="2.401cm" svg:y="9.969cm">
          <draw:text-box>
            <text:p text:style-name="P261"><text:span text:style-name="T23"># From gospider</text:span></text:p>
          </draw:text-box>
        </draw:frame>
        <draw:frame draw:style-name="gr268" draw:text-style-name="P266" draw:layer="layout" svg:width="11.618cm" svg:height="0.433cm" svg:x="2.401cm" svg:y="10.446cm">
          <draw:text-box>
            <text:p text:style-name="P261"><text:span text:style-name="T23">gospider -s "https://$TARGET" -o "$OUTPUT/gospider" -c 10 -d 2 -q 2&gt;/dev/null</text:span></text:p>
          </draw:text-box>
        </draw:frame>
        <draw:frame draw:style-name="gr268" draw:text-style-name="P266" draw:layer="layout" svg:width="12.815cm" svg:height="0.433cm" svg:x="2.401cm" svg:y="10.923cm">
          <draw:text-box>
            <text:p text:style-name="P261"><text:span text:style-name="T23">cat "$OUTPUT/gospider"/javascript* 2&gt;/dev/null | sort -u &gt; "$OUTPUT/gospider_js.txt"</text:span></text:p>
          </draw:text-box>
        </draw:frame>
        <draw:frame draw:style-name="gr268" draw:text-style-name="P266" draw:layer="layout" svg:width="3.746cm" svg:height="0.433cm" svg:x="2.401cm" svg:y="11.877cm">
          <draw:text-box>
            <text:p text:style-name="P261"><text:span text:style-name="T23"># Merge and deduplicate</text:span></text:p>
          </draw:text-box>
        </draw:frame>
        <draw:frame draw:style-name="gr268" draw:text-style-name="P266" draw:layer="layout" svg:width="11.432cm" svg:height="0.433cm" svg:x="2.401cm" svg:y="12.355cm">
          <draw:text-box>
            <text:p text:style-name="P261"><text:span text:style-name="T23">cat "$OUTPUT"/*_js.txt | sort -u | httpx -mc 200 -silent &gt; "$OUTPUT/all_js.txt"</text:span></text:p>
          </draw:text-box>
        </draw:frame>
        <draw:frame draw:style-name="gr268" draw:text-style-name="P266" draw:layer="layout" svg:width="7.99cm" svg:height="0.433cm" svg:x="2.401cm" svg:y="12.832cm">
          <draw:text-box>
            <text:p text:style-name="P261"><text:span text:style-name="T23">echo "[*] Found $(wc -l &lt; "$OUTPUT/all_js.txt") JS files"</text:span></text:p>
          </draw:text-box>
        </draw:frame>
        <draw:frame draw:style-name="gr268" draw:text-style-name="P266" draw:layer="layout" svg:width="6.281cm" svg:height="0.433cm" svg:x="2.401cm" svg:y="13.786cm">
          <draw:text-box>
            <text:p text:style-name="P261"><text:span text:style-name="T23">echo "[+] Phase 2: Extracting endpoints//."</text:span></text:p>
          </draw:text-box>
        </draw:frame>
        <draw:frame draw:style-name="gr268" draw:text-style-name="P266" draw:layer="layout" svg:width="2.92cm" svg:height="0.433cm" svg:x="2.401cm" svg:y="14.263cm">
          <draw:text-box>
            <text:p text:style-name="P261"><text:span text:style-name="T23">while read -r url; do</text:span></text:p>
          </draw:text-box>
        </draw:frame>
        <draw:frame draw:style-name="gr268" draw:text-style-name="P266" draw:layer="layout" svg:width="6.936cm" svg:height="0.433cm" svg:x="3.143cm" svg:y="14.74cm">
          <draw:text-box>
            <text:p text:style-name="P261"><text:span text:style-name="T23">python3 linkfinder.py -i "$url" -o cli 2&gt;/dev/null</text:span></text:p>
          </draw:text-box>
        </draw:frame>
        <draw:frame draw:style-name="gr268" draw:text-style-name="P266" draw:layer="layout" svg:width="9.585cm" svg:height="0.433cm" svg:x="2.401cm" svg:y="15.217cm">
          <draw:text-box>
            <text:p text:style-name="P261"><text:span text:style-name="T23">done &lt; "$OUTPUT/all_js.txt" | sort -u &gt; "$OUTPUT/endpoints.txt"</text:span></text:p>
          </draw:text-box>
        </draw:frame>
        <draw:frame draw:style-name="gr268" draw:text-style-name="P266" draw:layer="layout" svg:width="10.458cm" svg:height="0.433cm" svg:x="2.401cm" svg:y="15.694cm">
          <draw:text-box>
            <text:p text:style-name="P261"><text:span text:style-name="T23">echo "[*] Found $(wc -l &lt; "$OUTPUT/endpoints.txt") unique endpoints"</text:span></text:p>
          </draw:text-box>
        </draw:frame>
        <draw:frame draw:style-name="gr268" draw:text-style-name="P266" draw:layer="layout" svg:width="5.546cm" svg:height="0.433cm" svg:x="2.401cm" svg:y="16.648cm">
          <draw:text-box>
            <text:p text:style-name="P261"><text:span text:style-name="T23">echo "[+] Phase 3: Hunting secrets//."</text:span></text:p>
          </draw:text-box>
        </draw:frame>
        <draw:frame draw:style-name="gr268" draw:text-style-name="P266" draw:layer="layout" svg:width="2.92cm" svg:height="0.433cm" svg:x="2.401cm" svg:y="17.125cm">
          <draw:text-box>
            <text:p text:style-name="P261"><text:span text:style-name="T23">while read -r url; do</text:span></text:p>
          </draw:text-box>
        </draw:frame>
        <draw:frame draw:style-name="gr268" draw:text-style-name="P266" draw:layer="layout" svg:width="3.666cm" svg:height="0.433cm" svg:x="3.143cm" svg:y="17.602cm">
          <draw:text-box>
            <text:p text:style-name="P261"><text:span text:style-name="T23">echo "[+] Scanning: $url"</text:span></text:p>
          </draw:text-box>
        </draw:frame>
        <draw:frame draw:style-name="gr268" draw:text-style-name="P266" draw:layer="layout" svg:width="7.392cm" svg:height="0.433cm" svg:x="3.143cm" svg:y="18.079cm">
          <draw:text-box>
            <text:p text:style-name="P261"><text:span text:style-name="T23">python3 SecretFinder.py -i "$url" -o cli 2&gt;/dev/null</text:span></text:p>
          </draw:text-box>
        </draw:frame>
        <draw:frame draw:style-name="gr268" draw:text-style-name="P266" draw:layer="layout" svg:width="9.143cm" svg:height="0.433cm" svg:x="2.401cm" svg:y="18.556cm">
          <draw:text-box>
            <text:p text:style-name="P261"><text:span text:style-name="T23">done &lt; "$OUTPUT/all_js.txt" | sort -u &gt; "$OUTPUT/secrets.txt"</text:span></text:p>
          </draw:text-box>
        </draw:frame>
        <draw:frame draw:style-name="gr268" draw:text-style-name="P266" draw:layer="layout" svg:width="9.863cm" svg:height="0.433cm" svg:x="2.401cm" svg:y="19.033cm">
          <draw:text-box>
            <text:p text:style-name="P261"><text:span text:style-name="T23">echo "[*] Found $(wc -l &lt; "$OUTPUT/secrets.txt") potential secrets"</text:span></text:p>
          </draw:text-box>
        </draw:frame>
        <draw:frame draw:style-name="gr268" draw:text-style-name="P266" draw:layer="layout" svg:width="7.064cm" svg:height="0.433cm" svg:x="2.401cm" svg:y="19.987cm">
          <draw:text-box>
            <text:p text:style-name="P261"><text:span text:style-name="T23">echo "[+] Phase 4: Checking for source maps//."</text:span></text:p>
          </draw:text-box>
        </draw:frame>
        <draw:frame draw:style-name="gr268" draw:text-style-name="P266" draw:layer="layout" svg:width="2.92cm" svg:height="0.433cm" svg:x="2.401cm" svg:y="20.464cm">
          <draw:text-box>
            <text:p text:style-name="P261"><text:span text:style-name="T23">while read -r url; do</text:span></text:p>
          </draw:text-box>
        </draw:frame>
        <draw:frame draw:style-name="gr268" draw:text-style-name="P266" draw:layer="layout" svg:width="3.251cm" svg:height="0.433cm" svg:x="3.143cm" svg:y="20.941cm">
          <draw:text-box>
            <text:p text:style-name="P261"><text:span text:style-name="T23">map_url="${url}.map"</text:span></text:p>
          </draw:text-box>
        </draw:frame>
        <draw:frame draw:style-name="gr268" draw:text-style-name="P266" draw:layer="layout" svg:width="8.655cm" svg:height="0.433cm" svg:x="3.143cm" svg:y="21.418cm">
          <draw:text-box>
            <text:p text:style-name="P261"><text:span text:style-name="T23">status=$(curl -s -o /dev/null -w "%{http_code}" "$map_url")</text:span></text:p>
          </draw:text-box>
        </draw:frame>
        <draw:frame draw:style-name="gr268" draw:text-style-name="P266" draw:layer="layout" svg:width="4.003cm" svg:height="0.433cm" svg:x="3.143cm" svg:y="21.895cm">
          <draw:text-box>
            <text:p text:style-name="P261"><text:span text:style-name="T23">if [ "$status" = "200" ]; then</text:span></text:p>
          </draw:text-box>
        </draw:frame>
        <draw:frame draw:style-name="gr268" draw:text-style-name="P266" draw:layer="layout" svg:width="5.93cm" svg:height="0.433cm" svg:x="3.885cm" svg:y="22.372cm">
          <draw:text-box>
            <text:p text:style-name="P261"><text:span text:style-name="T23">echo "[!!!] Source map found: $map_url"</text:span></text:p>
          </draw:text-box>
        </draw:frame>
        <draw:frame draw:style-name="gr268" draw:text-style-name="P266" draw:layer="layout" svg:width="7.054cm" svg:height="0.433cm" svg:x="3.885cm" svg:y="22.849cm">
          <draw:text-box>
            <text:p text:style-name="P261"><text:span text:style-name="T23">echo "$map_url" /&gt; "$OUTPUT/sourcemaps.txt"</text:span></text:p>
          </draw:text-box>
        </draw:frame>
        <draw:frame draw:style-name="gr268" draw:text-style-name="P266" draw:layer="layout" svg:width="0.317cm" svg:height="0.433cm" svg:x="3.143cm" svg:y="23.326cm">
          <draw:text-box>
            <text:p text:style-name="P261"><text:span text:style-name="T23">fi</text:span></text:p>
          </draw:text-box>
        </draw:frame>
        <draw:frame draw:style-name="gr268" draw:text-style-name="P266" draw:layer="layout" svg:width="4.127cm" svg:height="0.433cm" svg:x="2.401cm" svg:y="23.803cm">
          <draw:text-box>
            <text:p text:style-name="P261"><text:span text:style-name="T23">done &lt; "$OUTPUT/all_js.txt"</text:span></text:p>
          </draw:text-box>
        </draw:frame>
        <draw:frame draw:style-name="gr268" draw:text-style-name="P266" draw:layer="layout" svg:width="8.07cm" svg:height="0.433cm" svg:x="2.401cm" svg:y="24.758cm">
          <draw:text-box>
            <text:p text:style-name="P261"><text:span text:style-name="T23">echo "[+] Phase 5: Downloading JS for local analysis//."</text:span></text:p>
          </draw:text-box>
        </draw:frame>
        <draw:frame draw:style-name="gr268" draw:text-style-name="P266" draw:layer="layout" svg:width="4.135cm" svg:height="0.433cm" svg:x="2.401cm" svg:y="25.235cm">
          <draw:text-box>
            <text:p text:style-name="P261"><text:span text:style-name="T23">mkdir -p "$OUTPUT/js_files"</text:span></text:p>
          </draw:text-box>
        </draw:frame>
        <draw:frame draw:style-name="gr268" draw:text-style-name="P266" draw:layer="layout" svg:width="2.92cm" svg:height="0.433cm" svg:x="2.401cm" svg:y="25.712cm">
          <draw:text-box>
            <text:p text:style-name="P261"><text:span text:style-name="T23">while read -r url; do</text:span></text:p>
          </draw:text-box>
        </draw:frame>
        <draw:frame draw:style-name="gr268" draw:text-style-name="P266" draw:layer="layout" svg:width="7.054cm" svg:height="0.433cm" svg:x="3.143cm" svg:y="26.189cm">
          <draw:text-box>
            <text:p text:style-name="P261"><text:span text:style-name="T23">filename=$(echo "$url" | md5sum | cut -d' ' -f1)</text:span></text:p>
          </draw:text-box>
        </draw:frame>
        <draw:frame draw:style-name="gr268" draw:text-style-name="P266" draw:layer="layout" svg:width="9.024cm" svg:height="0.433cm" svg:x="3.143cm" svg:y="26.666cm">
          <draw:text-box>
            <text:p text:style-name="P261"><text:span text:style-name="T23">curl -s "$url" -o "$OUTPUT/js_files/${filename}.js" 2&gt;/dev/null</text:span></text:p>
          </draw:text-box>
        </draw:frame>
      </draw:page>
      <draw:page draw:name="page17" draw:style-name="dp1" draw:master-page-name="master-page662">
        <draw:frame draw:style-name="gr268" draw:text-style-name="P270" draw:layer="layout" svg:width="3.957cm" svg:height="0.446cm" svg:x="2.088cm" svg:y="0.879cm">
          <draw:text-box>
            <text:p text:style-name="P261"><text:span text:style-name="T8">5. Automation &amp; Pipelines</text:span></text:p>
          </draw:text-box>
        </draw:frame>
        <draw:frame draw:style-name="gr268" draw:text-style-name="P266" draw:layer="layout" svg:width="0.365cm" svg:height="0.433cm" svg:x="2.003cm" svg:y="28.256cm">
          <draw:text-box>
            <text:p text:style-name="P261"><text:span text:style-name="T9">17</text:span></text:p>
          </draw:text-box>
        </draw:frame>
        <draw:path draw:style-name="gr276" draw:text-style-name="P275" draw:layer="layout" svg:width="4.081cm" svg:height="0.636cm" svg:x="2.014cm" svg:y="3.842cm" svg:viewBox="0 0 4082 637" svg:d="M0 637v-531c0-14 2-27 8-40 5-13 13-25 24-35 10-10 21-17 34-23 13-5 27-8 41-8h3869c14 0 28 3 41 8 13 6 24 13 34 23s18 22 23 35 8 26 8 40v531z">
          <text:p/>
        </draw:path>
        <draw:frame draw:style-name="gr293" draw:text-style-name="P288" draw:layer="layout" svg:width="5.113cm" svg:height="0.577cm" svg:x="2.003cm" svg:y="2.859cm">
          <draw:text-box>
            <text:p text:style-name="P261"><text:span text:style-name="T29">Python Automation Script</text:span></text:p>
          </draw:text-box>
        </draw:frame>
        <draw:frame draw:style-name="gr285" draw:text-style-name="P282" draw:layer="layout" svg:width="2.979cm" svg:height="0.391cm" svg:x="2.268cm" svg:y="3.938cm">
          <draw:text-box>
            <text:p text:style-name="P261"><text:span text:style-name="T22">PYTHON: JS ANALYZER</text:span></text:p>
          </draw:text-box>
        </draw:frame>
      </draw:page>
      <draw:page draw:name="page18" draw:style-name="dp1" draw:master-page-name="master-page569">
        <draw:frame draw:style-name="gr268" draw:text-style-name="P270" draw:layer="layout" svg:width="3.957cm" svg:height="0.446cm" svg:x="2.088cm" svg:y="0.879cm">
          <draw:text-box>
            <text:p text:style-name="P261"><text:span text:style-name="T8">5. Automation &amp; Pipelines</text:span></text:p>
          </draw:text-box>
        </draw:frame>
        <draw:path draw:style-name="gr282" draw:text-style-name="P280" draw:layer="layout" svg:width="16.988cm" svg:height="24.767cm" svg:x="2.027cm" svg:y="2.477cm" svg:viewBox="0 0 16989 24768" svg:d="M0 24768v-24622c0-9 1-19 3-28 2-10 4-19 8-28 4-8 8-17 13-25 6-8 12-15 19-22 6-7 14-13 22-18s16-10 25-13c9-4 18-7 27-9 10-2 19-2 29-3h16697c10 1 19 1 28 3 10 2 19 5 28 9 9 3 17 8 25 13s15 11 22 18 13 14 18 22 10 17 14 25c3 9 6 18 8 28 2 9 3 19 3 28v24622z">
          <text:p/>
        </draw:path>
        <draw:polygon draw:style-name="gr276" draw:text-style-name="P275" draw:layer="layout" svg:width="17.014cm" svg:height="0.093cm" svg:x="2.014cm" svg:y="2.464cm" svg:viewBox="0 0 17015 94" draw:points="16922,94 92,94 0,0 17015,0">
          <text:p/>
        </draw:polygon>
        <draw:polygon draw:style-name="gr276" draw:text-style-name="P275" draw:layer="layout" svg:width="0.093cm" svg:height="24.78cm" svg:x="18.935cm" svg:y="2.464cm" svg:viewBox="0 0 94 24781" draw:points="94,24781 0,24781 0,90 91,0">
          <text:p/>
        </draw:polygon>
        <draw:polygon draw:style-name="gr276" draw:text-style-name="P275" draw:layer="layout" svg:width="0.092cm" svg:height="24.78cm" svg:x="2.014cm" svg:y="2.464cm" svg:viewBox="0 0 93 24781" draw:points="93,90 93,24781 0,24781 0,0 2,0">
          <text:p/>
        </draw:polygon>
        <draw:frame draw:style-name="gr268" draw:text-style-name="P266" draw:layer="layout" svg:width="0.365cm" svg:height="0.433cm" svg:x="2.003cm" svg:y="28.256cm">
          <draw:text-box>
            <text:p text:style-name="P261"><text:span text:style-name="T9">18</text:span></text:p>
          </draw:text-box>
        </draw:frame>
        <draw:frame draw:style-name="gr268" draw:text-style-name="P266" draw:layer="layout" svg:width="3.37cm" svg:height="0.433cm" svg:x="2.401cm" svg:y="2.814cm">
          <draw:text-box>
            <text:p text:style-name="P261"><text:span text:style-name="T23">/!/usr/bin/env python3</text:span></text:p>
          </draw:text-box>
        </draw:frame>
        <draw:frame draw:style-name="gr268" draw:text-style-name="P266" draw:layer="layout" svg:width="5.908cm" svg:height="0.433cm" svg:x="2.401cm" svg:y="3.291cm">
          <draw:text-box>
            <text:p text:style-name="P261"><text:span text:style-name="T23"># js_analyzer.py - Automated JS analysis</text:span></text:p>
          </draw:text-box>
        </draw:frame>
        <draw:frame draw:style-name="gr268" draw:text-style-name="P266" draw:layer="layout" svg:width="3.508cm" svg:height="0.433cm" svg:x="2.401cm" svg:y="4.245cm">
          <draw:text-box>
            <text:p text:style-name="P261"><text:span text:style-name="T23">import re, requests, sys</text:span></text:p>
          </draw:text-box>
        </draw:frame>
        <draw:frame draw:style-name="gr268" draw:text-style-name="P266" draw:layer="layout" svg:width="6.054cm" svg:height="0.433cm" svg:x="2.401cm" svg:y="4.722cm">
          <draw:text-box>
            <text:p text:style-name="P261"><text:span text:style-name="T23">from urllib.parse import urljoin, urlparse</text:span></text:p>
          </draw:text-box>
        </draw:frame>
        <draw:frame draw:style-name="gr268" draw:text-style-name="P266" draw:layer="layout" svg:width="2.662cm" svg:height="0.433cm" svg:x="2.401cm" svg:y="5.676cm">
          <draw:text-box>
            <text:p text:style-name="P261"><text:span text:style-name="T23"># Regex database</text:span></text:p>
          </draw:text-box>
        </draw:frame>
        <draw:frame draw:style-name="gr268" draw:text-style-name="P266" draw:layer="layout" svg:width="2.007cm" svg:height="0.433cm" svg:x="2.401cm" svg:y="6.153cm">
          <draw:text-box>
            <text:p text:style-name="P261"><text:span text:style-name="T23">PATTERNS = {</text:span></text:p>
          </draw:text-box>
        </draw:frame>
        <draw:frame draw:style-name="gr268" draw:text-style-name="P266" draw:layer="layout" svg:width="4.378cm" svg:height="0.433cm" svg:x="3.143cm" svg:y="6.63cm">
          <draw:text-box>
            <text:p text:style-name="P261"><text:span text:style-name="T23">'aws_key': r'AKIA[0-9A-Z]{16}',</text:span></text:p>
          </draw:text-box>
        </draw:frame>
        <draw:frame draw:style-name="gr268" draw:text-style-name="P266" draw:layer="layout" svg:width="5.38cm" svg:height="0.433cm" svg:x="3.143cm" svg:y="7.107cm">
          <draw:text-box>
            <text:p text:style-name="P261"><text:span text:style-name="T23">'google_api': r'AIza[0-9A-Za-z_-]{35}',</text:span></text:p>
          </draw:text-box>
        </draw:frame>
        <draw:frame draw:style-name="gr268" draw:text-style-name="P266" draw:layer="layout" svg:width="9.38cm" svg:height="0.433cm" svg:x="3.143cm" svg:y="7.584cm">
          <draw:text-box>
            <text:p text:style-name="P261"><text:span text:style-name="T23">'stripe_key': r'(pk_live|sk_live|pk_test|sk_test)_[0-9a-zA-Z]{24,}',</text:span></text:p>
          </draw:text-box>
        </draw:frame>
        <draw:frame draw:style-name="gr268" draw:text-style-name="P266" draw:layer="layout" svg:width="5.816cm" svg:height="0.433cm" svg:x="3.143cm" svg:y="8.061cm">
          <draw:text-box>
            <text:p text:style-name="P261"><text:span text:style-name="T23">'slack_token': r'xox[baprs]-[0-9]{10,13}',</text:span></text:p>
          </draw:text-box>
        </draw:frame>
        <draw:frame draw:style-name="gr268" draw:text-style-name="P266" draw:layer="layout" svg:width="6.673cm" svg:height="0.433cm" svg:x="3.143cm" svg:y="8.538cm">
          <draw:text-box>
            <text:p text:style-name="P261"><text:span text:style-name="T23">'github_token': r'gh[pousr]_[A-Za-z0-9_]{36,}',</text:span></text:p>
          </draw:text-box>
        </draw:frame>
        <draw:frame draw:style-name="gr268" draw:text-style-name="P266" draw:layer="layout" svg:width="8.406cm" svg:height="0.433cm" svg:x="3.143cm" svg:y="9.015cm">
          <draw:text-box>
            <text:p text:style-name="P261"><text:span text:style-name="T23">'jwt': r'eyJ[A-Za-z0-9_-]*\.eyJ[A-Za-z0-9_-]*\.[A-Za-z0-9_-]*',</text:span></text:p>
          </draw:text-box>
        </draw:frame>
        <draw:frame draw:style-name="gr268" draw:text-style-name="P266" draw:layer="layout" svg:width="3.944cm" svg:height="0.433cm" svg:x="3.143cm" svg:y="9.492cm">
          <draw:text-box>
            <text:p text:style-name="P261"><text:span text:style-name="T23">'url': r'https/://[^\s"\'\'/&gt;]+',</text:span></text:p>
          </draw:text-box>
        </draw:frame>
        <draw:frame draw:style-name="gr268" draw:text-style-name="P266" draw:layer="layout" svg:width="4.899cm" svg:height="0.433cm" svg:x="3.143cm" svg:y="9.969cm">
          <draw:text-box>
            <text:p text:style-name="P261"><text:span text:style-name="T23">'websocket': r'wss/://[^\s"\'\'/&gt;]+',</text:span></text:p>
          </draw:text-box>
        </draw:frame>
        <draw:frame draw:style-name="gr268" draw:text-style-name="P266" draw:layer="layout" svg:width="4.895cm" svg:height="0.433cm" svg:x="3.143cm" svg:y="10.446cm">
          <draw:text-box>
            <text:p text:style-name="P261"><text:span text:style-name="T23">'api_path': r'/api/[a-zA-Z0-9_\-/]+',</text:span></text:p>
          </draw:text-box>
        </draw:frame>
        <draw:frame draw:style-name="gr268" draw:text-style-name="P266" draw:layer="layout" svg:width="9.413cm" svg:height="0.433cm" svg:x="3.143cm" svg:y="10.923cm">
          <draw:text-box>
            <text:p text:style-name="P261"><text:span text:style-name="T23">'private_key': r'BEGIN\s+(RSA|OPENSSH|EC)\s+PRIVATE\s+KEY',</text:span></text:p>
          </draw:text-box>
        </draw:frame>
        <draw:frame draw:style-name="gr268" draw:text-style-name="P266" draw:layer="layout" svg:width="0.317cm" svg:height="0.433cm" svg:x="2.401cm" svg:y="11.4cm">
          <draw:text-box>
            <text:p text:style-name="P261"><text:span text:style-name="T23">}</text:span></text:p>
          </draw:text-box>
        </draw:frame>
        <draw:frame draw:style-name="gr268" draw:text-style-name="P266" draw:layer="layout" svg:width="2.753cm" svg:height="0.433cm" svg:x="2.401cm" svg:y="12.355cm">
          <draw:text-box>
            <text:p text:style-name="P261"><text:span text:style-name="T23">def analyze_js(url):</text:span></text:p>
          </draw:text-box>
        </draw:frame>
        <draw:frame draw:style-name="gr268" draw:text-style-name="P266" draw:layer="layout" svg:width="0.495cm" svg:height="0.433cm" svg:x="3.143cm" svg:y="12.832cm">
          <draw:text-box>
            <text:p text:style-name="P261"><text:span text:style-name="T23">try:</text:span></text:p>
          </draw:text-box>
        </draw:frame>
        <draw:frame draw:style-name="gr268" draw:text-style-name="P266" draw:layer="layout" svg:width="10.4cm" svg:height="0.433cm" svg:x="3.885cm" svg:y="13.309cm">
          <draw:text-box>
            <text:p text:style-name="P261"><text:span text:style-name="T23">r = requests.get(url, timeout=15, headers={'User-Agent': 'Mozilla/5.0'})</text:span></text:p>
          </draw:text-box>
        </draw:frame>
        <draw:frame draw:style-name="gr268" draw:text-style-name="P266" draw:layer="layout" svg:width="2.286cm" svg:height="0.433cm" svg:x="3.885cm" svg:y="13.786cm">
          <draw:text-box>
            <text:p text:style-name="P261"><text:span text:style-name="T23">content = r.text</text:span></text:p>
          </draw:text-box>
        </draw:frame>
        <draw:frame draw:style-name="gr268" draw:text-style-name="P266" draw:layer="layout" svg:width="9.732cm" svg:height="0.433cm" svg:x="3.885cm" svg:y="14.263cm">
          <draw:text-box>
            <text:p text:style-name="P261"><text:span text:style-name="T23">results = {k: set(re.findall(v, content)) for k, v in PATTERNS.items()}</text:span></text:p>
          </draw:text-box>
        </draw:frame>
        <draw:frame draw:style-name="gr268" draw:text-style-name="P266" draw:layer="layout" svg:width="5.937cm" svg:height="0.433cm" svg:x="3.885cm" svg:y="14.74cm">
          <draw:text-box>
            <text:p text:style-name="P261"><text:span text:style-name="T23">return {k: v for k, v in results.items() if v}</text:span></text:p>
          </draw:text-box>
        </draw:frame>
        <draw:frame draw:style-name="gr268" draw:text-style-name="P266" draw:layer="layout" svg:width="3.288cm" svg:height="0.433cm" svg:x="3.143cm" svg:y="15.217cm">
          <draw:text-box>
            <text:p text:style-name="P261"><text:span text:style-name="T23">except Exception as e:</text:span></text:p>
          </draw:text-box>
        </draw:frame>
        <draw:frame draw:style-name="gr268" draw:text-style-name="P266" draw:layer="layout" svg:width="3.117cm" svg:height="0.433cm" svg:x="3.885cm" svg:y="15.694cm">
          <draw:text-box>
            <text:p text:style-name="P261"><text:span text:style-name="T23">return {'error': str(e)}</text:span></text:p>
          </draw:text-box>
        </draw:frame>
        <draw:frame draw:style-name="gr268" draw:text-style-name="P266" draw:layer="layout" svg:width="3.608cm" svg:height="0.433cm" svg:x="2.401cm" svg:y="16.648cm">
          <draw:text-box>
            <text:p text:style-name="P261"><text:span text:style-name="T23">if /_name/_ /= '/_main/_':</text:span></text:p>
          </draw:text-box>
        </draw:frame>
        <draw:frame draw:style-name="gr268" draw:text-style-name="P266" draw:layer="layout" svg:width="2.754cm" svg:height="0.433cm" svg:x="3.143cm" svg:y="17.125cm">
          <draw:text-box>
            <text:p text:style-name="P261"><text:span text:style-name="T23">if len(sys.argv) &lt; 2:</text:span></text:p>
          </draw:text-box>
        </draw:frame>
        <draw:frame draw:style-name="gr268" draw:text-style-name="P266" draw:layer="layout" svg:width="6.52cm" svg:height="0.433cm" svg:x="3.885cm" svg:y="17.602cm">
          <draw:text-box>
            <text:p text:style-name="P261"><text:span text:style-name="T23">print(f"Usage: {sys.argv[0]} &lt;js_url_or_file&gt;")</text:span></text:p>
          </draw:text-box>
        </draw:frame>
        <draw:frame draw:style-name="gr268" draw:text-style-name="P266" draw:layer="layout" svg:width="1.469cm" svg:height="0.433cm" svg:x="3.885cm" svg:y="18.079cm">
          <draw:text-box>
            <text:p text:style-name="P261"><text:span text:style-name="T23">sys.exit(1)</text:span></text:p>
          </draw:text-box>
        </draw:frame>
        <draw:frame draw:style-name="gr268" draw:text-style-name="P266" draw:layer="layout" svg:width="2.869cm" svg:height="0.433cm" svg:x="3.143cm" svg:y="19.033cm">
          <draw:text-box>
            <text:p text:style-name="P261"><text:span text:style-name="T23">target = sys.argv[1]</text:span></text:p>
          </draw:text-box>
        </draw:frame>
        <draw:frame draw:style-name="gr268" draw:text-style-name="P266" draw:layer="layout" svg:width="3.798cm" svg:height="0.433cm" svg:x="3.143cm" svg:y="19.51cm">
          <draw:text-box>
            <text:p text:style-name="P261"><text:span text:style-name="T23">if target.startswith('http'):</text:span></text:p>
          </draw:text-box>
        </draw:frame>
        <draw:frame draw:style-name="gr268" draw:text-style-name="P266" draw:layer="layout" svg:width="2.032cm" svg:height="0.433cm" svg:x="3.885cm" svg:y="19.987cm">
          <draw:text-box>
            <text:p text:style-name="P261"><text:span text:style-name="T23">urls = [target]</text:span></text:p>
          </draw:text-box>
        </draw:frame>
        <draw:frame draw:style-name="gr268" draw:text-style-name="P266" draw:layer="layout" svg:width="0.679cm" svg:height="0.433cm" svg:x="3.143cm" svg:y="20.464cm">
          <draw:text-box>
            <text:p text:style-name="P261"><text:span text:style-name="T23">else:</text:span></text:p>
          </draw:text-box>
        </draw:frame>
        <draw:frame draw:style-name="gr268" draw:text-style-name="P266" draw:layer="layout" svg:width="3.282cm" svg:height="0.433cm" svg:x="3.885cm" svg:y="20.941cm">
          <draw:text-box>
            <text:p text:style-name="P261"><text:span text:style-name="T23">with open(target) as f:</text:span></text:p>
          </draw:text-box>
        </draw:frame>
        <draw:frame draw:style-name="gr268" draw:text-style-name="P266" draw:layer="layout" svg:width="6.144cm" svg:height="0.433cm" svg:x="4.627cm" svg:y="21.418cm">
          <draw:text-box>
            <text:p text:style-name="P261"><text:span text:style-name="T23">urls = [line.strip() for line in f if line.strip()]</text:span></text:p>
          </draw:text-box>
        </draw:frame>
        <draw:frame draw:style-name="gr268" draw:text-style-name="P266" draw:layer="layout" svg:width="2.016cm" svg:height="0.433cm" svg:x="3.143cm" svg:y="22.372cm">
          <draw:text-box>
            <text:p text:style-name="P261"><text:span text:style-name="T23">for url in urls:</text:span></text:p>
          </draw:text-box>
        </draw:frame>
        <draw:frame draw:style-name="gr268" draw:text-style-name="P266" draw:layer="layout" svg:width="4.329cm" svg:height="0.433cm" svg:x="3.885cm" svg:y="22.849cm">
          <draw:text-box>
            <text:p text:style-name="P261"><text:span text:style-name="T23">print(f"\n[+] Analyzing: {url}")</text:span></text:p>
          </draw:text-box>
        </draw:frame>
        <draw:frame draw:style-name="gr268" draw:text-style-name="P266" draw:layer="layout" svg:width="3.656cm" svg:height="0.433cm" svg:x="3.885cm" svg:y="23.326cm">
          <draw:text-box>
            <text:p text:style-name="P261"><text:span text:style-name="T23">findings = analyze_js(url)</text:span></text:p>
          </draw:text-box>
        </draw:frame>
        <draw:frame draw:style-name="gr268" draw:text-style-name="P266" draw:layer="layout" svg:width="6.095cm" svg:height="0.433cm" svg:x="3.885cm" svg:y="23.803cm">
          <draw:text-box>
            <text:p text:style-name="P261"><text:span text:style-name="T23">for category, matches in findings.items():</text:span></text:p>
          </draw:text-box>
        </draw:frame>
        <draw:frame draw:style-name="gr268" draw:text-style-name="P266" draw:layer="layout" svg:width="3.038cm" svg:height="0.433cm" svg:x="4.627cm" svg:y="24.28cm">
          <draw:text-box>
            <text:p text:style-name="P261"><text:span text:style-name="T23">if category /= 'error':</text:span></text:p>
          </draw:text-box>
        </draw:frame>
        <draw:frame draw:style-name="gr268" draw:text-style-name="P266" draw:layer="layout" svg:width="4.262cm" svg:height="0.433cm" svg:x="5.369cm" svg:y="24.758cm">
          <draw:text-box>
            <text:p text:style-name="P261"><text:span text:style-name="T23">print(f" <text:s/>[!] Error: {matches}")</text:span></text:p>
          </draw:text-box>
        </draw:frame>
        <draw:frame draw:style-name="gr268" draw:text-style-name="P266" draw:layer="layout" svg:width="1.311cm" svg:height="0.433cm" svg:x="5.369cm" svg:y="25.235cm">
          <draw:text-box>
            <text:p text:style-name="P261"><text:span text:style-name="T23">continue</text:span></text:p>
          </draw:text-box>
        </draw:frame>
        <draw:frame draw:style-name="gr268" draw:text-style-name="P266" draw:layer="layout" svg:width="1.63cm" svg:height="0.433cm" svg:x="4.627cm" svg:y="25.712cm">
          <draw:text-box>
            <text:p text:style-name="P261"><text:span text:style-name="T23">if matches:</text:span></text:p>
          </draw:text-box>
        </draw:frame>
        <draw:frame draw:style-name="gr268" draw:text-style-name="P266" draw:layer="layout" svg:width="9.077cm" svg:height="0.433cm" svg:x="5.369cm" svg:y="26.189cm">
          <draw:text-box>
            <text:p text:style-name="P261"><text:span text:style-name="T23">print(f" <text:s/>[{category.upper()}] Found {len(matches)} matches:")</text:span></text:p>
          </draw:text-box>
        </draw:frame>
      </draw:page>
      <draw:page draw:name="page19" draw:style-name="dp1" draw:master-page-name="master-page569">
        <draw:frame draw:style-name="gr268" draw:text-style-name="P270" draw:layer="layout" svg:width="3.695cm" svg:height="0.446cm" svg:x="2.088cm" svg:y="0.879cm">
          <draw:text-box>
            <text:p text:style-name="P261"><text:span text:style-name="T8">6. Advanced Techniques</text:span></text:p>
          </draw:text-box>
        </draw:frame>
        <draw:path draw:style-name="gr282" draw:text-style-name="P280" draw:layer="layout" svg:width="16.988cm" svg:height="7.341cm" svg:x="2.027cm" svg:y="7.433cm" svg:viewBox="0 0 16989 7342" svg:d="M0 7197v-7051c0-9 1-19 3-28 2-10 4-19 8-28s8-17 13-25c6-8 12-15 19-22 6-7 14-13 22-18s16-10 25-14c9-3 18-6 27-8 10-2 19-3 29-3h16697c10 0 19 1 28 3 10 2 19 5 28 8 9 4 17 9 25 14s15 11 22 18 13 14 18 22 10 16 14 25c3 9 6 18 8 28 2 9 3 19 3 28v7051c0 9-1 19-3 28s-5 19-8 27c-4 9-9 18-14 26-5 7-11 15-18 22-7 6-14 12-22 18-8 5-16 10-25 13-9 4-18 7-28 9-9 1-18 2-28 2h-16697c-10 0-19-1-29-2-9-2-18-5-27-9-9-3-17-8-25-13-8-6-16-12-22-18-7-7-13-15-19-22-5-8-9-17-13-26-4-8-6-18-8-27s-3-19-3-28z">
          <text:p/>
        </draw:path>
        <draw:path draw:style-name="gr283" draw:text-style-name="P202" draw:layer="layout" svg:width="16.988cm" svg:height="7.341cm" svg:x="2.027cm" svg:y="7.433cm" svg:viewBox="0 0 16989 7342" svg:d="M0 7197v-7051c0-9 1-19 3-28 2-10 4-19 8-28s8-17 13-25c6-8 12-15 19-22 6-7 14-13 22-18s16-10 25-14c9-3 18-6 27-8 10-2 19-3 29-3h16697c10 0 19 1 28 3 10 2 19 5 28 8 9 4 17 9 25 14s15 11 22 18 13 14 18 22 10 16 14 25c3 9 6 18 8 28 2 9 3 19 3 28v7051c0 9-1 19-3 28s-5 19-8 27c-4 9-9 18-14 26-5 7-11 15-18 22-7 6-14 12-22 18-8 5-16 10-25 13-9 4-18 7-28 9-9 1-18 2-28 2h-16697c-10 0-19-1-29-2-9-2-18-5-27-9-9-3-17-8-25-13-8-6-16-12-22-18-7-7-13-15-19-22-5-8-9-17-13-26-4-8-6-18-8-27s-3-19-3-28z">
          <text:p/>
        </draw:path>
        <draw:frame draw:style-name="gr268" draw:text-style-name="P266" draw:layer="layout" svg:width="0.365cm" svg:height="0.433cm" svg:x="2.003cm" svg:y="28.256cm">
          <draw:text-box>
            <text:p text:style-name="P261"><text:span text:style-name="T9">19</text:span></text:p>
          </draw:text-box>
        </draw:frame>
        <draw:frame draw:style-name="gr277" draw:text-style-name="P276" draw:layer="layout" svg:width="8.827cm" svg:height="1.064cm" svg:x="2.003cm" svg:y="2.27cm">
          <draw:text-box>
            <text:p text:style-name="P261"><text:span text:style-name="T10">6. Advanced Techniques</text:span></text:p>
          </draw:text-box>
        </draw:frame>
        <draw:frame draw:style-name="gr293" draw:text-style-name="P288" draw:layer="layout" svg:width="4.93cm" svg:height="0.577cm" svg:x="2.003cm" svg:y="4.132cm">
          <draw:text-box>
            <text:p text:style-name="P261"><text:span text:style-name="T29">Webpack Chunk Analysis</text:span></text:p>
          </draw:text-box>
        </draw:frame>
        <draw:frame draw:style-name="gr278" draw:text-style-name="P277" draw:layer="layout" svg:width="16.21cm" svg:height="0.501cm" svg:x="2.003cm" svg:y="5.063cm">
          <draw:text-box>
            <text:p text:style-name="P261"><text:span text:style-name="T11">Modern SPAs built with Webpack split code into "chunks." Each chunk may reference different</text:span></text:p>
          </draw:text-box>
        </draw:frame>
        <draw:path draw:style-name="gr276" draw:text-style-name="P275" draw:layer="layout" svg:width="3.683cm" svg:height="0.636cm" svg:x="2.014cm" svg:y="6.572cm" svg:viewBox="0 0 3684 637" svg:d="M0 637v-530c0-15 2-29 8-42 5-13 13-24 23-34s21-18 34-23 27-8 41-8h3472c14 0 28 3 41 8s24 13 34 23 18 21 23 34c6 13 8 27 8 42v530z">
          <text:p/>
        </draw:path>
        <draw:frame draw:style-name="gr278" draw:text-style-name="P277" draw:layer="layout" svg:width="13.327cm" svg:height="0.501cm" svg:x="2.003cm" svg:y="5.672cm">
          <draw:text-box>
            <text:p text:style-name="P261"><text:span text:style-name="T11">API modules. Analyzing all chunks together reveals the complete API surface.</text:span></text:p>
          </draw:text-box>
        </draw:frame>
        <draw:frame draw:style-name="gr285" draw:text-style-name="P282" draw:layer="layout" svg:width="2.684cm" svg:height="0.391cm" svg:x="2.268cm" svg:y="6.668cm">
          <draw:text-box>
            <text:p text:style-name="P261"><text:span text:style-name="T22">WEBPACK ANALYSIS</text:span></text:p>
          </draw:text-box>
        </draw:frame>
        <draw:frame draw:style-name="gr268" draw:text-style-name="P266" draw:layer="layout" svg:width="3.032cm" svg:height="0.433cm" svg:x="2.401cm" svg:y="7.77cm">
          <draw:text-box>
            <text:p text:style-name="P261"><text:span text:style-name="T23"># Find all chunk files</text:span></text:p>
          </draw:text-box>
        </draw:frame>
        <draw:frame draw:style-name="gr268" draw:text-style-name="P266" draw:layer="layout" svg:width="8.667cm" svg:height="0.433cm" svg:x="2.401cm" svg:y="8.247cm">
          <draw:text-box>
            <text:p text:style-name="P261"><text:span text:style-name="T23">katana -u https://target.com -jc | grep -E 'chunk\.[0-9]+\.js'</text:span></text:p>
          </draw:text-box>
        </draw:frame>
        <draw:frame draw:style-name="gr268" draw:text-style-name="P266" draw:layer="layout" svg:width="6.62cm" svg:height="0.433cm" svg:x="2.401cm" svg:y="9.201cm">
          <draw:text-box>
            <text:p text:style-name="P261"><text:span text:style-name="T23"># Download all chunks and analyze together</text:span></text:p>
          </draw:text-box>
        </draw:frame>
        <draw:frame draw:style-name="gr268" draw:text-style-name="P266" draw:layer="layout" svg:width="8.745cm" svg:height="0.433cm" svg:x="2.401cm" svg:y="9.678cm">
          <draw:text-box>
            <text:p text:style-name="P261"><text:span text:style-name="T23">cat chunk_urls.txt | xargs -P 10 -I {} curl -s {} &gt; all_chunks.js</text:span></text:p>
          </draw:text-box>
        </draw:frame>
        <draw:frame draw:style-name="gr268" draw:text-style-name="P266" draw:layer="layout" svg:width="6.674cm" svg:height="0.433cm" svg:x="2.401cm" svg:y="10.632cm">
          <draw:text-box>
            <text:p text:style-name="P261"><text:span text:style-name="T23"># Search for API definitions across all chunks</text:span></text:p>
          </draw:text-box>
        </draw:frame>
        <draw:frame draw:style-name="gr268" draw:text-style-name="P266" draw:layer="layout" svg:width="11.921cm" svg:height="0.433cm" svg:x="2.401cm" svg:y="11.109cm">
          <draw:text-box>
            <text:p text:style-name="P261"><text:span text:style-name="T23">grep -oP '(get|post|put|delete|patch)\(["\x27](/[^"\x27]+)' all_chunks.js | sort -u</text:span></text:p>
          </draw:text-box>
        </draw:frame>
        <draw:frame draw:style-name="gr268" draw:text-style-name="P266" draw:layer="layout" svg:width="9.146cm" svg:height="0.433cm" svg:x="2.401cm" svg:y="12.063cm">
          <draw:text-box>
            <text:p text:style-name="P261"><text:span text:style-name="T23"># Find React/Vue component names (reveal internal features)</text:span></text:p>
          </draw:text-box>
        </draw:frame>
        <draw:frame draw:style-name="gr268" draw:text-style-name="P266" draw:layer="layout" svg:width="10.114cm" svg:height="0.433cm" svg:x="2.401cm" svg:y="12.54cm">
          <draw:text-box>
            <text:p text:style-name="P261"><text:span text:style-name="T23">grep -oP 'name:\s*["\x27][A-Z][a-zA-Z]+["\x27]' all_chunks.js | sort -u</text:span></text:p>
          </draw:text-box>
        </draw:frame>
        <draw:frame draw:style-name="gr268" draw:text-style-name="P266" draw:layer="layout" svg:width="8.448cm" svg:height="0.433cm" svg:x="2.401cm" svg:y="13.494cm">
          <draw:text-box>
            <text:p text:style-name="P261"><text:span text:style-name="T23"># Find lazy-loaded routes (often admin/internal features)</text:span></text:p>
          </draw:text-box>
        </draw:frame>
        <draw:frame draw:style-name="gr268" draw:text-style-name="P266" draw:layer="layout" svg:width="11.054cm" svg:height="0.433cm" svg:x="2.401cm" svg:y="13.971cm">
          <draw:text-box>
            <text:p text:style-name="P261"><text:span text:style-name="T23">grep -oP 'lazy\s*\(\s*\(\s*\)\s*/&gt;\s*import\(["\x27](/[^"\x27]+)' all_chunks.js</text:span></text:p>
          </draw:text-box>
        </draw:frame>
        <draw:frame draw:style-name="gr293" draw:text-style-name="P288" draw:layer="layout" svg:width="5.758cm" svg:height="0.577cm" svg:x="2.003cm" svg:y="15.448cm">
          <draw:text-box>
            <text:p text:style-name="P261"><text:span text:style-name="T29">Minified Code Deobfuscation</text:span></text:p>
          </draw:text-box>
        </draw:frame>
        <draw:path draw:style-name="gr276" draw:text-style-name="P275" draw:layer="layout" svg:width="5.168cm" svg:height="0.609cm" svg:x="2.014cm" svg:y="17.279cm" svg:viewBox="0 0 5169 610" svg:d="M0 610v-503c0-14 2-28 8-42 5-13 13-24 23-34s21-18 34-23 27-8 41-8h4957c14 0 27 3 40 8s25 13 35 23c9 10 17 21 22 34 6 14 9 28 9 42v503z">
          <text:p/>
        </draw:path>
        <draw:frame draw:style-name="gr278" draw:text-style-name="P277" draw:layer="layout" svg:width="14.582cm" svg:height="0.501cm" svg:x="2.003cm" svg:y="16.353cm">
          <draw:text-box>
            <text:p text:style-name="P261"><text:span text:style-name="T11">Minified JavaScript is hard to read. Use these techniques to make it more analyzable.</text:span></text:p>
          </draw:text-box>
        </draw:frame>
        <draw:frame draw:style-name="gr285" draw:text-style-name="P282" draw:layer="layout" svg:width="4.167cm" svg:height="0.391cm" svg:x="2.268cm" svg:y="17.375cm">
          <draw:text-box>
            <text:p text:style-name="P261"><text:span text:style-name="T22">DEOBFUSCATION TECHNIQUES</text:span></text:p>
          </draw:text-box>
        </draw:frame>
      </draw:page>
      <draw:page draw:name="page20" draw:style-name="dp1" draw:master-page-name="master-page569">
        <draw:frame draw:style-name="gr268" draw:text-style-name="P270" draw:layer="layout" svg:width="3.695cm" svg:height="0.446cm" svg:x="2.088cm" svg:y="0.879cm">
          <draw:text-box>
            <text:p text:style-name="P261"><text:span text:style-name="T8">6. Advanced Techniques</text:span></text:p>
          </draw:text-box>
        </draw:frame>
        <draw:path draw:style-name="gr282" draw:text-style-name="P280" draw:layer="layout" svg:width="16.988cm" svg:height="9.727cm" svg:x="2.027cm" svg:y="2.477cm" svg:viewBox="0 0 16989 9728" svg:d="M0 9582v-9436c0-9 1-19 3-28 2-10 4-19 8-28 4-8 8-17 13-25 6-8 12-15 19-22 6-7 14-13 22-18s16-10 25-13c9-4 18-7 27-9 10-2 19-3 29-3h16697c10 0 19 1 28 3 10 2 19 5 28 9 9 3 17 8 25 13s15 11 22 18 13 14 18 22 10 17 14 25c3 9 6 18 8 28 2 9 3 19 3 28v9436c0 10-1 19-3 28-2 10-5 19-8 28-4 9-9 17-14 25s-11 15-18 22-14 13-22 18-16 10-25 14c-9 3-18 6-28 8-9 2-18 3-28 3h-16697c-10 0-19-1-29-3-9-2-18-5-27-8-9-4-17-9-25-14s-16-11-22-18c-7-7-13-14-19-22-5-8-9-16-13-25s-6-18-8-28c-2-9-3-18-3-28z">
          <text:p/>
        </draw:path>
        <draw:path draw:style-name="gr283" draw:text-style-name="P202" draw:layer="layout" svg:width="16.988cm" svg:height="9.727cm" svg:x="2.027cm" svg:y="2.477cm" svg:viewBox="0 0 16989 9728" svg:d="M0 9582v-9436c0-9 1-19 3-28 2-10 4-19 8-28 4-8 8-17 13-25 6-8 12-15 19-22 6-7 14-13 22-18s16-10 25-13c9-4 18-7 27-9 10-2 19-3 29-3h16697c10 0 19 1 28 3 10 2 19 5 28 9 9 3 17 8 25 13s15 11 22 18 13 14 18 22 10 17 14 25c3 9 6 18 8 28 2 9 3 19 3 28v9436c0 10-1 19-3 28-2 10-5 19-8 28-4 9-9 17-14 25s-11 15-18 22-14 13-22 18-16 10-25 14c-9 3-18 6-28 8-9 2-18 3-28 3h-16697c-10 0-19-1-29-3-9-2-18-5-27-8-9-4-17-9-25-14s-16-11-22-18c-7-7-13-14-19-22-5-8-9-16-13-25s-6-18-8-28c-2-9-3-18-3-28z">
          <text:p/>
        </draw:path>
        <draw:path draw:style-name="gr282" draw:text-style-name="P280" draw:layer="layout" svg:width="16.988cm" svg:height="8.773cm" svg:x="2.027cm" svg:y="14.721cm" svg:viewBox="0 0 16989 8774" svg:d="M0 8628v-8482c0-9 1-19 3-28 2-10 4-19 8-28 4-8 8-17 13-25 6-8 12-15 19-22 6-7 14-13 22-18s16-10 25-14c9-3 18-6 27-8 10-2 19-3 29-3h16697c10 0 19 1 28 3 10 2 19 5 28 8 9 4 17 9 25 14s15 11 22 18 13 14 18 22 10 17 14 25c3 9 6 18 8 28 2 9 3 19 3 28v8482c0 9-1 19-3 28-2 10-5 19-8 28-4 8-9 17-14 25s-11 15-18 22-14 13-22 18-16 10-25 13c-9 4-18 7-28 9-9 2-18 3-28 3h-16697c-10 0-19-1-29-3-9-2-18-5-27-9-9-3-17-8-25-13s-16-11-22-18c-7-7-13-14-19-22-5-8-9-17-13-25-4-9-6-18-8-28-2-9-3-19-3-28z">
          <text:p/>
        </draw:path>
        <draw:path draw:style-name="gr283" draw:text-style-name="P202" draw:layer="layout" svg:width="16.988cm" svg:height="8.773cm" svg:x="2.027cm" svg:y="14.721cm" svg:viewBox="0 0 16989 8774" svg:d="M0 8628v-8482c0-9 1-19 3-28 2-10 4-19 8-28 4-8 8-17 13-25 6-8 12-15 19-22 6-7 14-13 22-18s16-10 25-14c9-3 18-6 27-8 10-2 19-3 29-3h16697c10 0 19 1 28 3 10 2 19 5 28 8 9 4 17 9 25 14s15 11 22 18 13 14 18 22 10 17 14 25c3 9 6 18 8 28 2 9 3 19 3 28v8482c0 9-1 19-3 28-2 10-5 19-8 28-4 8-9 17-14 25s-11 15-18 22-14 13-22 18-16 10-25 13c-9 4-18 7-28 9-9 2-18 3-28 3h-16697c-10 0-19-1-29-3-9-2-18-5-27-9-9-3-17-8-25-13s-16-11-22-18c-7-7-13-14-19-22-5-8-9-17-13-25-4-9-6-18-8-28-2-9-3-19-3-28z">
          <text:p/>
        </draw:path>
        <draw:frame draw:style-name="gr268" draw:text-style-name="P266" draw:layer="layout" svg:width="0.365cm" svg:height="0.433cm" svg:x="2.003cm" svg:y="28.256cm">
          <draw:text-box>
            <text:p text:style-name="P261"><text:span text:style-name="T9">20</text:span></text:p>
          </draw:text-box>
        </draw:frame>
        <draw:frame draw:style-name="gr268" draw:text-style-name="P266" draw:layer="layout" svg:width="5.551cm" svg:height="0.433cm" svg:x="2.401cm" svg:y="2.814cm">
          <draw:text-box>
            <text:p text:style-name="P261"><text:span text:style-name="T23"># 1. Use Prettier to format minified JS</text:span></text:p>
          </draw:text-box>
        </draw:frame>
        <draw:frame draw:style-name="gr268" draw:text-style-name="P266" draw:layer="layout" svg:width="4.46cm" svg:height="0.433cm" svg:x="2.401cm" svg:y="3.291cm">
          <draw:text-box>
            <text:p text:style-name="P261"><text:span text:style-name="T23">npx prettier /-write app.min.js</text:span></text:p>
          </draw:text-box>
        </draw:frame>
        <draw:frame draw:style-name="gr268" draw:text-style-name="P266" draw:layer="layout" svg:width="2.837cm" svg:height="0.433cm" svg:x="2.401cm" svg:y="4.245cm">
          <draw:text-box>
            <text:p text:style-name="P261"><text:span text:style-name="T23"># 2. Use js-beautify</text:span></text:p>
          </draw:text-box>
        </draw:frame>
        <draw:frame draw:style-name="gr268" draw:text-style-name="P266" draw:layer="layout" svg:width="3.207cm" svg:height="0.433cm" svg:x="2.401cm" svg:y="4.722cm">
          <draw:text-box>
            <text:p text:style-name="P261"><text:span text:style-name="T23">pip install jsbeautifier</text:span></text:p>
          </draw:text-box>
        </draw:frame>
        <draw:frame draw:style-name="gr268" draw:text-style-name="P266" draw:layer="layout" svg:width="5.768cm" svg:height="0.433cm" svg:x="2.401cm" svg:y="5.199cm">
          <draw:text-box>
            <text:p text:style-name="P261"><text:span text:style-name="T23">js-beautify -f app.min.js -o formatted.js</text:span></text:p>
          </draw:text-box>
        </draw:frame>
        <draw:frame draw:style-name="gr268" draw:text-style-name="P266" draw:layer="layout" svg:width="7.461cm" svg:height="0.433cm" svg:x="2.401cm" svg:y="6.153cm">
          <draw:text-box>
            <text:p text:style-name="P261"><text:span text:style-name="T23"># 3. Look for webpackJsonp to find module names</text:span></text:p>
          </draw:text-box>
        </draw:frame>
        <draw:frame draw:style-name="gr268" draw:text-style-name="P266" draw:layer="layout" svg:width="7.217cm" svg:height="0.433cm" svg:x="2.401cm" svg:y="6.63cm">
          <draw:text-box>
            <text:p text:style-name="P261"><text:span text:style-name="T23">grep -oP 'webpackJsonp.*\["[^"]+"\]' formatted.js</text:span></text:p>
          </draw:text-box>
        </draw:frame>
        <draw:frame draw:style-name="gr268" draw:text-style-name="P266" draw:layer="layout" svg:width="7.623cm" svg:height="0.433cm" svg:x="2.401cm" svg:y="7.584cm">
          <draw:text-box>
            <text:p text:style-name="P261"><text:span text:style-name="T23"># 4. Search for object keys that reveal API structure</text:span></text:p>
          </draw:text-box>
        </draw:frame>
        <draw:frame draw:style-name="gr268" draw:text-style-name="P266" draw:layer="layout" svg:width="7.938cm" svg:height="0.433cm" svg:x="2.401cm" svg:y="8.061cm">
          <draw:text-box>
            <text:p text:style-name="P261"><text:span text:style-name="T23">grep -oP '[a-zA-Z_]+:\s*function' formatted.js | sort -u</text:span></text:p>
          </draw:text-box>
        </draw:frame>
        <draw:frame draw:style-name="gr268" draw:text-style-name="P266" draw:layer="layout" svg:width="9.026cm" svg:height="0.433cm" svg:x="2.401cm" svg:y="9.015cm">
          <draw:text-box>
            <text:p text:style-name="P261"><text:span text:style-name="T23"># 5. Find constant arrays (often contain endpoint definitions)</text:span></text:p>
          </draw:text-box>
        </draw:frame>
        <draw:frame draw:style-name="gr268" draw:text-style-name="P266" draw:layer="layout" svg:width="7.221cm" svg:height="0.433cm" svg:x="2.401cm" svg:y="9.492cm">
          <draw:text-box>
            <text:p text:style-name="P261"><text:span text:style-name="T23">grep -oP '\[[^]]{50,200}\]' formatted.js | head -20</text:span></text:p>
          </draw:text-box>
        </draw:frame>
        <draw:frame draw:style-name="gr268" draw:text-style-name="P266" draw:layer="layout" svg:width="8.469cm" svg:height="0.433cm" svg:x="2.401cm" svg:y="10.446cm">
          <draw:text-box>
            <text:p text:style-name="P261"><text:span text:style-name="T23"># 6. Use unminify.com or equivalent for quick formatting</text:span></text:p>
          </draw:text-box>
        </draw:frame>
        <draw:frame draw:style-name="gr268" draw:text-style-name="P266" draw:layer="layout" svg:width="12.478cm" svg:height="0.433cm" svg:x="2.401cm" svg:y="10.923cm">
          <draw:text-box>
            <text:p text:style-name="P261"><text:span text:style-name="T23">curl -s -X POST https://unminify.com/ -d "input=$(cat app.min.js | python3 -c 'import</text:span></text:p>
          </draw:text-box>
        </draw:frame>
        <draw:frame draw:style-name="gr268" draw:text-style-name="P266" draw:layer="layout" svg:width="8.626cm" svg:height="0.433cm" svg:x="2.401cm" svg:y="11.4cm">
          <draw:text-box>
            <text:p text:style-name="P261"><text:span text:style-name="T23">sys,urllib.parse;print(urllib.parse.quote(sys.stdin.read()))')"</text:span></text:p>
          </draw:text-box>
        </draw:frame>
        <draw:path draw:style-name="gr276" draw:text-style-name="P275" draw:layer="layout" svg:width="5.088cm" svg:height="0.61cm" svg:x="2.014cm" svg:y="13.86cm" svg:viewBox="0 0 5089 611" svg:d="M0 611v-505c0-14 2-28 8-40 5-13 13-25 23-35s21-17 34-23c13-5 27-8 41-8h4877c14 0 28 3 41 8 13 6 24 13 34 23s18 22 23 35c5 12 8 26 8 40v505z">
          <text:p/>
        </draw:path>
        <draw:frame draw:style-name="gr293" draw:text-style-name="P288" draw:layer="layout" svg:width="8.361cm" svg:height="0.577cm" svg:x="2.003cm" svg:y="12.851cm">
          <draw:text-box>
            <text:p text:style-name="P261"><text:span text:style-name="T29">Third-Party Library Vulnerability Discovery</text:span></text:p>
          </draw:text-box>
        </draw:frame>
        <draw:frame draw:style-name="gr285" draw:text-style-name="P282" draw:layer="layout" svg:width="4.017cm" svg:height="0.391cm" svg:x="2.268cm" svg:y="13.956cm">
          <draw:text-box>
            <text:p text:style-name="P261"><text:span text:style-name="T22">LIBRARY VERSION DETECTION</text:span></text:p>
          </draw:text-box>
        </draw:frame>
        <draw:frame draw:style-name="gr268" draw:text-style-name="P266" draw:layer="layout" svg:width="6.711cm" svg:height="0.433cm" svg:x="2.401cm" svg:y="15.058cm">
          <draw:text-box>
            <text:p text:style-name="P261"><text:span text:style-name="T23"># Find jQuery version (check for known CVEs)</text:span></text:p>
          </draw:text-box>
        </draw:frame>
        <draw:frame draw:style-name="gr268" draw:text-style-name="P266" draw:layer="layout" svg:width="4.651cm" svg:height="0.433cm" svg:x="2.401cm" svg:y="15.535cm">
          <draw:text-box>
            <text:p text:style-name="P261"><text:span text:style-name="T23">grep -oP 'jQuery v[0-9.]+' app.js</text:span></text:p>
          </draw:text-box>
        </draw:frame>
        <draw:frame draw:style-name="gr268" draw:text-style-name="P266" draw:layer="layout" svg:width="3.008cm" svg:height="0.433cm" svg:x="2.401cm" svg:y="16.489cm">
          <draw:text-box>
            <text:p text:style-name="P261"><text:span text:style-name="T23"># Find React version</text:span></text:p>
          </draw:text-box>
        </draw:frame>
        <draw:frame draw:style-name="gr268" draw:text-style-name="P266" draw:layer="layout" svg:width="4.64cm" svg:height="0.433cm" svg:x="2.401cm" svg:y="16.966cm">
          <draw:text-box>
            <text:p text:style-name="P261"><text:span text:style-name="T23">grep -oP 'react@([0-9.]+)' app.js</text:span></text:p>
          </draw:text-box>
        </draw:frame>
        <draw:frame draw:style-name="gr268" draw:text-style-name="P266" draw:layer="layout" svg:width="3.368cm" svg:height="0.433cm" svg:x="2.401cm" svg:y="17.92cm">
          <draw:text-box>
            <text:p text:style-name="P261"><text:span text:style-name="T23"># Find Angular version</text:span></text:p>
          </draw:text-box>
        </draw:frame>
        <draw:frame draw:style-name="gr268" draw:text-style-name="P266" draw:layer="layout" svg:width="5.368cm" svg:height="0.433cm" svg:x="2.401cm" svg:y="18.397cm">
          <draw:text-box>
            <text:p text:style-name="P261"><text:span text:style-name="T23">grep -oP 'angular[/@]([0-9.]+)' app.js</text:span></text:p>
          </draw:text-box>
        </draw:frame>
        <draw:frame draw:style-name="gr268" draw:text-style-name="P266" draw:layer="layout" svg:width="2.753cm" svg:height="0.433cm" svg:x="2.401cm" svg:y="19.351cm">
          <draw:text-box>
            <text:p text:style-name="P261"><text:span text:style-name="T23"># Find Vue version</text:span></text:p>
          </draw:text-box>
        </draw:frame>
        <draw:frame draw:style-name="gr268" draw:text-style-name="P266" draw:layer="layout" svg:width="7.521cm" svg:height="0.433cm" svg:x="2.401cm" svg:y="19.828cm">
          <draw:text-box>
            <text:p text:style-name="P261"><text:span text:style-name="T23">grep -oP 'Vue\.version\s*=\s*["\x27]([0-9.]+)' app.js</text:span></text:p>
          </draw:text-box>
        </draw:frame>
        <draw:frame draw:style-name="gr268" draw:text-style-name="P266" draw:layer="layout" svg:width="3.663cm" svg:height="0.433cm" svg:x="2.401cm" svg:y="20.782cm">
          <draw:text-box>
            <text:p text:style-name="P261"><text:span text:style-name="T23"># Find Bootstrap version</text:span></text:p>
          </draw:text-box>
        </draw:frame>
        <draw:frame draw:style-name="gr268" draw:text-style-name="P266" draw:layer="layout" svg:width="5.319cm" svg:height="0.433cm" svg:x="2.401cm" svg:y="21.259cm">
          <draw:text-box>
            <text:p text:style-name="P261"><text:span text:style-name="T23">grep -oP 'Bootstrap v([0-9.]+)' app.js</text:span></text:p>
          </draw:text-box>
        </draw:frame>
        <draw:frame draw:style-name="gr268" draw:text-style-name="P266" draw:layer="layout" svg:width="7.458cm" svg:height="0.433cm" svg:x="2.401cm" svg:y="22.213cm">
          <draw:text-box>
            <text:p text:style-name="P261"><text:span text:style-name="T23"># Check versions against known CVEs using nuclei</text:span></text:p>
          </draw:text-box>
        </draw:frame>
        <draw:frame draw:style-name="gr268" draw:text-style-name="P266" draw:layer="layout" svg:width="11.361cm" svg:height="0.433cm" svg:x="2.401cm" svg:y="22.69cm">
          <draw:text-box>
            <text:p text:style-name="P261"><text:span text:style-name="T23">cat js_urls.txt | nuclei -t http/fuzzing/ -tags xss -severity medium,high,critical</text:span></text:p>
          </draw:text-box>
        </draw:frame>
      </draw:page>
      <draw:page draw:name="page21" draw:style-name="dp1" draw:master-page-name="master-page569">
        <draw:frame draw:style-name="gr268" draw:text-style-name="P270" draw:layer="layout" svg:width="3.698cm" svg:height="0.446cm" svg:x="2.088cm" svg:y="0.879cm">
          <draw:text-box>
            <text:p text:style-name="P261"><text:span text:style-name="T8">7. Tips, Tricks &amp; Gotchas</text:span></text:p>
          </draw:text-box>
        </draw:frame>
        <draw:path draw:style-name="gr279" draw:text-style-name="P278" draw:layer="layout" svg:width="16.961cm" svg:height="6.281cm" svg:x="2.067cm" svg:y="3.948cm" svg:viewBox="0 0 16962 6282" svg:d="M0 6123v-5964c0-21 2-41 8-61 5-19 13-36 23-51s21-27 34-35 27-12 41-12h16697c10 0 21 1 31 3s20 5 30 9c9 4 19 9 27 15 9 6 17 12 24 20 8 7 14 15 20 24s11 18 15 27c4 10 7 20 9 30 2 11 3 21 3 31v5964c0 11-1 21-3 31-2 11-5 20-9 30s-9 19-15 28c-6 8-12 16-20 24-7 7-15 14-24 19-8 6-18 11-27 15-10 4-20 7-30 9s-21 3-31 3h-16697c-14 0-28-4-41-12s-24-19-34-34-18-32-23-52c-6-19-8-40-8-61z">
          <text:p/>
        </draw:path>
        <draw:polygon draw:style-name="gr286" draw:text-style-name="P283" draw:layer="layout" svg:width="0.159cm" svg:height="6.281cm" svg:x="2.014cm" svg:y="3.948cm" svg:viewBox="0 0 160 6282" draw:points="0,0 160,0 160,6282 0,6282">
          <text:p/>
        </draw:polygon>
        <draw:path draw:style-name="gr274" draw:text-style-name="P273" draw:layer="layout" svg:width="16.961cm" svg:height="5.698cm" svg:x="2.067cm" svg:y="10.6cm" svg:viewBox="0 0 16962 5699" svg:d="M0 5540v-5381c0-21 2-41 8-61 5-19 13-36 23-51s21-27 34-35 27-12 41-12h16697c10 0 21 1 31 3s20 5 30 9c9 4 19 9 27 15 9 6 17 12 24 20 8 7 14 15 20 24s11 18 15 27c4 10 7 20 9 30 2 11 3 21 3 31v5381c0 11-1 21-3 31s-5 20-9 30-9 19-15 28c-6 8-12 16-20 24-7 7-15 14-24 19-8 6-18 11-27 15-10 4-20 7-30 9s-21 3-31 3h-16697c-14 0-28-4-41-12s-24-19-34-34-18-32-23-52c-6-19-8-40-8-61z">
          <text:p/>
        </draw:path>
        <draw:polygon draw:style-name="gr275" draw:text-style-name="P274" draw:layer="layout" svg:width="0.159cm" svg:height="5.698cm" svg:x="2.014cm" svg:y="10.6cm" svg:viewBox="0 0 160 5699" draw:points="0,0 160,0 160,5699 0,5699">
          <text:p/>
        </draw:polygon>
        <draw:polygon draw:style-name="gr282" draw:text-style-name="P280" draw:layer="layout" svg:width="4.505cm" svg:height="1.06cm" svg:x="2.014cm" svg:y="18.763cm" svg:viewBox="0 0 4506 1061" draw:points="0,0 4506,0 4506,1061 0,1061">
          <text:p/>
        </draw:polygon>
        <draw:polygon draw:style-name="gr282" draw:text-style-name="P280" draw:layer="layout" svg:width="7.474cm" svg:height="1.06cm" svg:x="6.519cm" svg:y="18.763cm" svg:viewBox="0 0 7475 1061" draw:points="0,0 7475,0 7475,1061 0,1061">
          <text:p/>
        </draw:polygon>
        <draw:polygon draw:style-name="gr282" draw:text-style-name="P280" draw:layer="layout" svg:width="5.035cm" svg:height="1.06cm" svg:x="13.993cm" svg:y="18.763cm" svg:viewBox="0 0 5036 1061" draw:points="0,0 5036,0 5036,1061 0,1061">
          <text:p/>
        </draw:polygon>
        <draw:polygon draw:style-name="gr287" draw:text-style-name="P284" draw:layer="layout" svg:width="4.505cm" svg:height="0.053cm" svg:x="2.014cm" svg:y="18.736cm" svg:viewBox="0 0 4506 54" draw:points="0,0 4506,0 4506,54 0,54">
          <text:p/>
        </draw:polygon>
        <draw:polygon draw:style-name="gr287" draw:text-style-name="P284" draw:layer="layout" svg:width="7.474cm" svg:height="0.053cm" svg:x="6.519cm" svg:y="18.736cm" svg:viewBox="0 0 7475 54" draw:points="0,0 7475,0 7475,54 0,54">
          <text:p/>
        </draw:polygon>
        <draw:polygon draw:style-name="gr287" draw:text-style-name="P284" draw:layer="layout" svg:width="5.035cm" svg:height="0.053cm" svg:x="13.993cm" svg:y="18.736cm" svg:viewBox="0 0 5036 54" draw:points="0,0 5036,0 5036,54 0,54">
          <text:p/>
        </draw:polygon>
        <draw:polygon draw:style-name="gr287" draw:text-style-name="P284" draw:layer="layout" svg:width="4.505cm" svg:height="0.026cm" svg:x="2.014cm" svg:y="19.797cm" svg:viewBox="0 0 4506 27" draw:points="0,0 4506,0 4506,27 0,27">
          <text:p/>
        </draw:polygon>
        <draw:polygon draw:style-name="gr287" draw:text-style-name="P284" draw:layer="layout" svg:width="7.474cm" svg:height="0.026cm" svg:x="6.519cm" svg:y="19.797cm" svg:viewBox="0 0 7475 27" draw:points="0,0 7475,0 7475,27 0,27">
          <text:p/>
        </draw:polygon>
        <draw:polygon draw:style-name="gr287" draw:text-style-name="P284" draw:layer="layout" svg:width="5.035cm" svg:height="0.026cm" svg:x="13.993cm" svg:y="19.797cm" svg:viewBox="0 0 5036 27" draw:points="0,0 5036,0 5036,27 0,27">
          <text:p/>
        </draw:polygon>
        <draw:polygon draw:style-name="gr276" draw:text-style-name="P275" draw:layer="layout" svg:width="4.505cm" svg:height="0.027cm" svg:x="2.014cm" svg:y="20.83cm" svg:viewBox="0 0 4506 28" draw:points="0,0 4506,0 4506,28 0,28">
          <text:p/>
        </draw:polygon>
        <draw:polygon draw:style-name="gr276" draw:text-style-name="P275" draw:layer="layout" svg:width="7.474cm" svg:height="0.027cm" svg:x="6.519cm" svg:y="20.83cm" svg:viewBox="0 0 7475 28" draw:points="0,0 7475,0 7475,28 0,28">
          <text:p/>
        </draw:polygon>
        <draw:polygon draw:style-name="gr276" draw:text-style-name="P275" draw:layer="layout" svg:width="5.035cm" svg:height="0.027cm" svg:x="13.993cm" svg:y="20.83cm" svg:viewBox="0 0 5036 28" draw:points="0,0 5036,0 5036,28 0,28">
          <text:p/>
        </draw:polygon>
        <draw:polygon draw:style-name="gr276" draw:text-style-name="P275" draw:layer="layout" svg:width="4.505cm" svg:height="0.026cm" svg:x="2.014cm" svg:y="21.864cm" svg:viewBox="0 0 4506 27" draw:points="0,0 4506,0 4506,27 0,27">
          <text:p/>
        </draw:polygon>
        <draw:polygon draw:style-name="gr276" draw:text-style-name="P275" draw:layer="layout" svg:width="7.474cm" svg:height="0.026cm" svg:x="6.519cm" svg:y="21.864cm" svg:viewBox="0 0 7475 27" draw:points="0,0 7475,0 7475,27 0,27">
          <text:p/>
        </draw:polygon>
        <draw:polygon draw:style-name="gr276" draw:text-style-name="P275" draw:layer="layout" svg:width="5.035cm" svg:height="0.026cm" svg:x="13.993cm" svg:y="21.864cm" svg:viewBox="0 0 5036 27" draw:points="0,0 5036,0 5036,27 0,27">
          <text:p/>
        </draw:polygon>
        <draw:polygon draw:style-name="gr276" draw:text-style-name="P275" draw:layer="layout" svg:width="4.505cm" svg:height="0.027cm" svg:x="2.014cm" svg:y="22.897cm" svg:viewBox="0 0 4506 28" draw:points="0,0 4506,0 4506,28 0,28">
          <text:p/>
        </draw:polygon>
        <draw:polygon draw:style-name="gr276" draw:text-style-name="P275" draw:layer="layout" svg:width="7.474cm" svg:height="0.027cm" svg:x="6.519cm" svg:y="22.897cm" svg:viewBox="0 0 7475 28" draw:points="0,0 7475,0 7475,28 0,28">
          <text:p/>
        </draw:polygon>
        <draw:polygon draw:style-name="gr276" draw:text-style-name="P275" draw:layer="layout" svg:width="5.035cm" svg:height="0.027cm" svg:x="13.993cm" svg:y="22.897cm" svg:viewBox="0 0 5036 28" draw:points="0,0 5036,0 5036,28 0,28">
          <text:p/>
        </draw:polygon>
        <draw:polygon draw:style-name="gr276" draw:text-style-name="P275" draw:layer="layout" svg:width="4.505cm" svg:height="0.026cm" svg:x="2.014cm" svg:y="23.931cm" svg:viewBox="0 0 4506 27" draw:points="0,0 4506,0 4506,27 0,27">
          <text:p/>
        </draw:polygon>
        <draw:polygon draw:style-name="gr276" draw:text-style-name="P275" draw:layer="layout" svg:width="7.474cm" svg:height="0.026cm" svg:x="6.519cm" svg:y="23.931cm" svg:viewBox="0 0 7475 27" draw:points="0,0 7475,0 7475,27 0,27">
          <text:p/>
        </draw:polygon>
        <draw:polygon draw:style-name="gr276" draw:text-style-name="P275" draw:layer="layout" svg:width="5.035cm" svg:height="0.026cm" svg:x="13.993cm" svg:y="23.931cm" svg:viewBox="0 0 5036 27" draw:points="0,0 5036,0 5036,27 0,27">
          <text:p/>
        </draw:polygon>
        <draw:polygon draw:style-name="gr276" draw:text-style-name="P275" draw:layer="layout" svg:width="4.505cm" svg:height="0.027cm" svg:x="2.014cm" svg:y="24.964cm" svg:viewBox="0 0 4506 28" draw:points="0,0 4506,0 4506,28 0,28">
          <text:p/>
        </draw:polygon>
        <draw:polygon draw:style-name="gr276" draw:text-style-name="P275" draw:layer="layout" svg:width="7.474cm" svg:height="0.027cm" svg:x="6.519cm" svg:y="24.964cm" svg:viewBox="0 0 7475 28" draw:points="0,0 7475,0 7475,28 0,28">
          <text:p/>
        </draw:polygon>
        <draw:polygon draw:style-name="gr276" draw:text-style-name="P275" draw:layer="layout" svg:width="5.035cm" svg:height="0.027cm" svg:x="13.993cm" svg:y="24.964cm" svg:viewBox="0 0 5036 28" draw:points="0,0 5036,0 5036,28 0,28">
          <text:p/>
        </draw:polygon>
        <draw:polygon draw:style-name="gr276" draw:text-style-name="P275" draw:layer="layout" svg:width="4.505cm" svg:height="0.027cm" svg:x="2.014cm" svg:y="25.998cm" svg:viewBox="0 0 4506 28" draw:points="0,0 4506,0 4506,28 0,28">
          <text:p/>
        </draw:polygon>
        <draw:polygon draw:style-name="gr276" draw:text-style-name="P275" draw:layer="layout" svg:width="7.474cm" svg:height="0.027cm" svg:x="6.519cm" svg:y="25.998cm" svg:viewBox="0 0 7475 28" draw:points="0,0 7475,0 7475,28 0,28">
          <text:p/>
        </draw:polygon>
        <draw:polygon draw:style-name="gr276" draw:text-style-name="P275" draw:layer="layout" svg:width="5.035cm" svg:height="0.027cm" svg:x="13.993cm" svg:y="25.998cm" svg:viewBox="0 0 5036 28" draw:points="0,0 5036,0 5036,28 0,28">
          <text:p/>
        </draw:polygon>
        <draw:polygon draw:style-name="gr287" draw:text-style-name="P284" draw:layer="layout" svg:width="4.505cm" svg:height="0.053cm" svg:x="2.014cm" svg:y="27.032cm" svg:viewBox="0 0 4506 54" draw:points="0,0 4506,0 4506,54 0,54">
          <text:p/>
        </draw:polygon>
        <draw:polygon draw:style-name="gr287" draw:text-style-name="P284" draw:layer="layout" svg:width="7.474cm" svg:height="0.053cm" svg:x="6.519cm" svg:y="27.032cm" svg:viewBox="0 0 7475 54" draw:points="0,0 7475,0 7475,54 0,54">
          <text:p/>
        </draw:polygon>
        <draw:polygon draw:style-name="gr287" draw:text-style-name="P284" draw:layer="layout" svg:width="5.035cm" svg:height="0.053cm" svg:x="13.993cm" svg:y="27.032cm" svg:viewBox="0 0 5036 54" draw:points="0,0 5036,0 5036,54 0,54">
          <text:p/>
        </draw:polygon>
        <draw:frame draw:style-name="gr268" draw:text-style-name="P266" draw:layer="layout" svg:width="0.365cm" svg:height="0.433cm" svg:x="2.003cm" svg:y="28.256cm">
          <draw:text-box>
            <text:p text:style-name="P261"><text:span text:style-name="T9">21</text:span></text:p>
          </draw:text-box>
        </draw:frame>
        <draw:frame draw:style-name="gr277" draw:text-style-name="P276" draw:layer="layout" svg:width="8.835cm" svg:height="1.064cm" svg:x="2.003cm" svg:y="2.27cm">
          <draw:text-box>
            <text:p text:style-name="P261"><text:span text:style-name="T10">7. Tips, Tricks &amp; Gotchas</text:span></text:p>
          </draw:text-box>
        </draw:frame>
        <draw:frame draw:style-name="gr278" draw:text-style-name="P277" draw:layer="layout" svg:width="1.398cm" svg:height="0.501cm" svg:x="2.533cm" svg:y="4.374cm">
          <draw:text-box>
            <text:p text:style-name="P261"><text:span text:style-name="T24">Pro Tips</text:span></text:p>
          </draw:text-box>
        </draw:frame>
        <draw:frame draw:style-name="gr264" draw:text-style-name="P262" draw:layer="layout" svg:width="15.993cm" svg:height="0.48cm" svg:x="2.533cm" svg:y="5.108cm">
          <draw:text-box>
            <text:p text:style-name="P261"><text:span text:style-name="T14">Check <text:s/>all <text:s/>JS <text:s/>files, <text:s/>not <text:s/>just <text:s/>main.js.</text:span><text:span text:style-name="T15"> <text:s/>Chunks, <text:s/>vendors, <text:s/>and <text:s/>polyfills <text:s/>often <text:s/>contain <text:s/>secrets <text:s/>too.</text:span></text:p>
          </draw:text-box>
        </draw:frame>
        <draw:frame draw:style-name="gr264" draw:text-style-name="P262" draw:layer="layout" svg:width="0.89cm" svg:height="0.48cm" svg:x="2.533cm" svg:y="5.691cm">
          <draw:text-box>
            <text:p text:style-name="P261"><text:span text:style-name="T14">Look </text:span></text:p>
          </draw:text-box>
        </draw:frame>
        <draw:frame draw:style-name="gr264" draw:text-style-name="P262" draw:layer="layout" svg:width="0.572cm" svg:height="0.48cm" svg:x="3.621cm" svg:y="5.691cm">
          <draw:text-box>
            <text:p text:style-name="P261"><text:span text:style-name="T14">for </text:span></text:p>
          </draw:text-box>
        </draw:frame>
        <draw:frame draw:style-name="gr264" draw:text-style-name="P262" draw:layer="layout" svg:width="1.202cm" svg:height="0.48cm" svg:x="4.337cm" svg:y="5.691cm">
          <draw:text-box>
            <text:p text:style-name="P261"><text:span text:style-name="T14">?query </text:span></text:p>
          </draw:text-box>
        </draw:frame>
        <draw:frame draw:style-name="gr264" draw:text-style-name="P262" draw:layer="layout" svg:width="2.014cm" svg:height="0.48cm" svg:x="5.743cm" svg:y="5.691cm">
          <draw:text-box>
            <text:p text:style-name="P261"><text:span text:style-name="T14">parameters </text:span></text:p>
          </draw:text-box>
        </draw:frame>
        <draw:frame draw:style-name="gr264" draw:text-style-name="P262" draw:layer="layout" svg:width="0.401cm" svg:height="0.48cm" svg:x="7.944cm" svg:y="5.691cm">
          <draw:text-box>
            <text:p text:style-name="P261"><text:span text:style-name="T14">in </text:span></text:p>
          </draw:text-box>
        </draw:frame>
        <draw:frame draw:style-name="gr264" draw:text-style-name="P262" draw:layer="layout" svg:width="0.382cm" svg:height="0.48cm" svg:x="8.502cm" svg:y="5.691cm">
          <draw:text-box>
            <text:p text:style-name="P261"><text:span text:style-name="T14">JS </text:span></text:p>
          </draw:text-box>
        </draw:frame>
        <draw:path draw:style-name="gr284" draw:text-style-name="P281" draw:layer="layout" svg:width="2.862cm" svg:height="0.53cm" svg:x="10.468cm" svg:y="5.697cm" svg:viewBox="0 0 2863 531" svg:d="M0 80c0-11 2-21 6-31 4-9 10-18 17-25 8-8 16-13 26-18 10-4 20-6 30-6h2705c10 0 20 2 30 6 10 5 18 10 26 18 7 7 13 16 17 25 4 10 6 20 6 31v372c0 10-2 21-6 30-4 10-10 19-17 26-8 8-16 13-26 17s-20 6-30 6h-2705c-10 0-20-2-30-6s-18-9-26-17c-7-7-13-16-17-26-4-9-6-19-6-30z">
          <text:p/>
        </draw:path>
        <draw:frame draw:style-name="gr264" draw:text-style-name="P262" draw:layer="layout" svg:width="0.924cm" svg:height="0.48cm" svg:x="9.192cm" svg:y="5.691cm">
          <draw:text-box>
            <text:p text:style-name="P261"><text:span text:style-name="T14">URLs.</text:span></text:p>
          </draw:text-box>
        </draw:frame>
        <draw:frame draw:style-name="gr268" draw:text-style-name="P266" draw:layer="layout" svg:width="2.085cm" svg:height="0.433cm" svg:x="10.598cm" svg:y="5.729cm">
          <draw:text-box>
            <text:p text:style-name="P261"><text:span text:style-name="T20">app.js?v=1.2.3</text:span></text:p>
          </draw:text-box>
        </draw:frame>
        <draw:frame draw:style-name="gr264" draw:text-style-name="P262" draw:layer="layout" svg:width="0.352cm" svg:height="0.48cm" svg:x="13.328cm" svg:y="5.691cm">
          <draw:text-box>
            <text:p text:style-name="P261"><text:span text:style-name="T15"><text:s/></text:span></text:p>
          </draw:text-box>
        </draw:frame>
        <draw:frame draw:style-name="gr264" draw:text-style-name="P262" draw:layer="layout" svg:width="0.445cm" svg:height="0.48cm" svg:x="13.594cm" svg:y="5.691cm">
          <draw:text-box>
            <text:p text:style-name="P261"><text:span text:style-name="T15">— </text:span></text:p>
          </draw:text-box>
        </draw:frame>
        <draw:frame draw:style-name="gr264" draw:text-style-name="P262" draw:layer="layout" svg:width="1.304cm" svg:height="0.48cm" svg:x="14.204cm" svg:y="5.691cm">
          <draw:text-box>
            <text:p text:style-name="P261"><text:span text:style-name="T15">version </text:span></text:p>
          </draw:text-box>
        </draw:frame>
        <draw:frame draw:style-name="gr264" draw:text-style-name="P262" draw:layer="layout" svg:width="1.584cm" svg:height="0.48cm" svg:x="15.69cm" svg:y="5.691cm">
          <draw:text-box>
            <text:p text:style-name="P261"><text:span text:style-name="T15">numbers </text:span></text:p>
          </draw:text-box>
        </draw:frame>
        <draw:frame draw:style-name="gr264" draw:text-style-name="P262" draw:layer="layout" svg:width="0.745cm" svg:height="0.48cm" svg:x="17.44cm" svg:y="5.691cm">
          <draw:text-box>
            <text:p text:style-name="P261"><text:span text:style-name="T15">hint </text:span></text:p>
          </draw:text-box>
        </draw:frame>
        <draw:frame draw:style-name="gr264" draw:text-style-name="P262" draw:layer="layout" svg:width="0.352cm" svg:height="0.48cm" svg:x="18.316cm" svg:y="5.691cm">
          <draw:text-box>
            <text:p text:style-name="P261"><text:span text:style-name="T15">at</text:span></text:p>
          </draw:text-box>
        </draw:frame>
        <draw:frame draw:style-name="gr264" draw:text-style-name="P262" draw:layer="layout" svg:width="15.669cm" svg:height="0.48cm" svg:x="2.533cm" svg:y="6.274cm">
          <draw:text-box>
            <text:p text:style-name="P261"><text:span text:style-name="T15">deployment <text:s/>patterns. </text:span><text:span text:style-name="T14"><text:s/>Don't <text:s/>forget <text:s/>.mjs <text:s/>and <text:s/>.jsx <text:s/>files.</text:span><text:span text:style-name="T15"> <text:s/>Modern <text:s/>apps <text:s/>use <text:s/>these <text:s/>extensions.</text:span></text:p>
          </draw:text-box>
        </draw:frame>
        <draw:frame draw:style-name="gr264" draw:text-style-name="P262" draw:layer="layout" svg:width="15.12cm" svg:height="0.48cm" svg:x="2.533cm" svg:y="6.857cm">
          <draw:text-box>
            <text:p text:style-name="P261"><text:span text:style-name="T14">Authentication changes JS content.</text:span><text:span text:style-name="T15"> Log in and re-scan — authenticated JS may expose more</text:span></text:p>
          </draw:text-box>
        </draw:frame>
        <draw:frame draw:style-name="gr264" draw:text-style-name="P262" draw:layer="layout" svg:width="15.187cm" svg:height="0.48cm" svg:x="2.533cm" svg:y="7.44cm">
          <draw:text-box>
            <text:p text:style-name="P261"><text:span text:style-name="T15">endpoints. </text:span><text:span text:style-name="T14">Check error pages.</text:span><text:span text:style-name="T15"> 404/500 pages often load different JS bundles. </text:span><text:span text:style-name="T14">Source maps =</text:span></text:p>
          </draw:text-box>
        </draw:frame>
        <draw:frame draw:style-name="gr264" draw:text-style-name="P262" draw:layer="layout" svg:width="15.798cm" svg:height="0.48cm" svg:x="2.533cm" svg:y="8.024cm">
          <draw:text-box>
            <text:p text:style-name="P261"><text:span text:style-name="T14">free <text:s/>source <text:s/>code.</text:span><text:span text:style-name="T15"> <text:s/>Always <text:s/>check <text:s/>for <text:s/>.map <text:s/>files. </text:span><text:span text:style-name="T14"><text:s/>Comments <text:s/>are <text:s/>goldmines.</text:span><text:span text:style-name="T15"> <text:s/>Even <text:s/>minified <text:s/>JS</text:span></text:p>
          </draw:text-box>
        </draw:frame>
        <draw:frame draw:style-name="gr264" draw:text-style-name="P262" draw:layer="layout" svg:width="15.396cm" svg:height="0.48cm" svg:x="2.533cm" svg:y="8.607cm">
          <draw:text-box>
            <text:p text:style-name="P261"><text:span text:style-name="T15">sometimes preserves comments with internal URLs. </text:span><text:span text:style-name="T14">Search for TODO and FIXME.</text:span><text:span text:style-name="T15"> These often</text:span></text:p>
          </draw:text-box>
        </draw:frame>
        <draw:frame draw:style-name="gr264" draw:text-style-name="P262" draw:layer="layout" svg:width="6.174cm" svg:height="0.48cm" svg:x="2.533cm" svg:y="9.19cm">
          <draw:text-box>
            <text:p text:style-name="P261"><text:span text:style-name="T15">mark known issues or test endpoints.</text:span></text:p>
          </draw:text-box>
        </draw:frame>
        <draw:frame draw:style-name="gr278" draw:text-style-name="P277" draw:layer="layout" svg:width="3.104cm" svg:height="0.501cm" svg:x="2.533cm" svg:y="11.026cm">
          <draw:text-box>
            <text:p text:style-name="P261"><text:span text:style-name="T16">Common Gotchas</text:span></text:p>
          </draw:text-box>
        </draw:frame>
        <draw:path draw:style-name="gr284" draw:text-style-name="P281" draw:layer="layout" svg:width="3.074cm" svg:height="0.53cm" svg:x="13.198cm" svg:y="11.766cm" svg:viewBox="0 0 3075 531" svg:d="M0 452v-372c0-11 2-21 6-31 4-9 9-18 17-25 7-8 16-14 26-18 9-3 19-5 29-6h2919c10 1 19 3 29 6 9 4 18 10 25 18 8 7 14 16 18 25 4 10 6 20 6 31v372c0 10-2 21-6 30-4 10-10 19-18 26-7 8-16 13-25 17-10 4-20 6-30 6h-2917c-11 0-21-2-30-6-10-4-19-9-26-17-8-7-13-16-17-26-4-9-6-20-6-30z">
          <text:p/>
        </draw:path>
        <draw:frame draw:style-name="gr264" draw:text-style-name="P262" draw:layer="layout" svg:width="10.115cm" svg:height="0.48cm" svg:x="2.533cm" svg:y="11.76cm">
          <draw:text-box>
            <text:p text:style-name="P261"><text:span text:style-name="T14">False positives on minified code.</text:span><text:span text:style-name="T15"> Minified variable names like </text:span></text:p>
          </draw:text-box>
        </draw:frame>
        <draw:frame draw:style-name="gr268" draw:text-style-name="P266" draw:layer="layout" svg:width="2.206cm" svg:height="0.433cm" svg:x="13.321cm" svg:y="11.798cm">
          <draw:text-box>
            <text:p text:style-name="P261"><text:span text:style-name="T20">var e="AKIA//."</text:span></text:p>
          </draw:text-box>
        </draw:frame>
        <draw:frame draw:style-name="gr264" draw:text-style-name="P262" draw:layer="layout" svg:width="2.251cm" svg:height="0.48cm" svg:x="16.266cm" svg:y="11.76cm">
          <draw:text-box>
            <text:p text:style-name="P261"><text:span text:style-name="T15"><text:s/>may look like</text:span></text:p>
          </draw:text-box>
        </draw:frame>
        <draw:frame draw:style-name="gr264" draw:text-style-name="P262" draw:layer="layout" svg:width="1.267cm" svg:height="0.48cm" svg:x="2.533cm" svg:y="12.343cm">
          <draw:text-box>
            <text:p text:style-name="P261"><text:span text:style-name="T15">secrets </text:span></text:p>
          </draw:text-box>
        </draw:frame>
        <draw:frame draw:style-name="gr264" draw:text-style-name="P262" draw:layer="layout" svg:width="0.653cm" svg:height="0.48cm" svg:x="4.032cm" svg:y="12.343cm">
          <draw:text-box>
            <text:p text:style-name="P261"><text:span text:style-name="T15">but </text:span></text:p>
          </draw:text-box>
        </draw:frame>
        <draw:frame draw:style-name="gr264" draw:text-style-name="P262" draw:layer="layout" svg:width="0.634cm" svg:height="0.48cm" svg:x="4.815cm" svg:y="12.343cm">
          <draw:text-box>
            <text:p text:style-name="P261"><text:span text:style-name="T15">are </text:span></text:p>
          </draw:text-box>
        </draw:frame>
        <draw:frame draw:style-name="gr264" draw:text-style-name="P262" draw:layer="layout" svg:width="0.696cm" svg:height="0.48cm" svg:x="5.598cm" svg:y="12.343cm">
          <draw:text-box>
            <text:p text:style-name="P261"><text:span text:style-name="T15">just </text:span></text:p>
          </draw:text-box>
        </draw:frame>
        <draw:frame draw:style-name="gr264" draw:text-style-name="P262" draw:layer="layout" svg:width="1.446cm" svg:height="0.48cm" svg:x="6.434cm" svg:y="12.343cm">
          <draw:text-box>
            <text:p text:style-name="P261"><text:span text:style-name="T15">minified </text:span></text:p>
          </draw:text-box>
        </draw:frame>
        <draw:frame draw:style-name="gr264" draw:text-style-name="P262" draw:layer="layout" svg:width="0.983cm" svg:height="0.48cm" svg:x="8.013cm" svg:y="12.343cm">
          <draw:text-box>
            <text:p text:style-name="P261"><text:span text:style-name="T15">code. </text:span></text:p>
          </draw:text-box>
        </draw:frame>
        <draw:frame draw:style-name="gr264" draw:text-style-name="P262" draw:layer="layout" svg:width="1.229cm" svg:height="0.48cm" svg:x="9.22cm" svg:y="12.343cm">
          <draw:text-box>
            <text:p text:style-name="P261"><text:span text:style-name="T15">Always </text:span></text:p>
          </draw:text-box>
        </draw:frame>
        <draw:frame draw:style-name="gr264" draw:text-style-name="P262" draw:layer="layout" svg:width="1.006cm" svg:height="0.48cm" svg:x="10.639cm" svg:y="12.343cm">
          <draw:text-box>
            <text:p text:style-name="P261"><text:span text:style-name="T15">verify </text:span></text:p>
          </draw:text-box>
        </draw:frame>
        <draw:frame draw:style-name="gr264" draw:text-style-name="P262" draw:layer="layout" svg:width="1.424cm" svg:height="0.48cm" svg:x="11.82cm" svg:y="12.343cm">
          <draw:text-box>
            <text:p text:style-name="P261"><text:span text:style-name="T15">context. </text:span></text:p>
          </draw:text-box>
        </draw:frame>
        <draw:frame draw:style-name="gr264" draw:text-style-name="P262" draw:layer="layout" svg:width="3.556cm" svg:height="0.48cm" svg:x="13.425cm" svg:y="12.343cm">
          <draw:text-box>
            <text:p text:style-name="P261"><text:span text:style-name="T14">Environment-specific </text:span></text:p>
          </draw:text-box>
        </draw:frame>
        <draw:path draw:style-name="gr284" draw:text-style-name="P281" draw:layer="layout" svg:width="3.789cm" svg:height="0.53cm" svg:x="2.544cm" svg:y="12.933cm" svg:viewBox="0 0 3790 531" svg:d="M0 451v-371c0-11 2-21 6-31s10-19 17-26c7-8 16-13 26-17 9-4 19-6 29-6h3634c10 0 20 2 29 6 10 4 19 9 26 17 8 7 13 16 17 26s6 20 6 31v371c0 11-2 21-6 30-4 10-9 19-17 26-7 8-16 13-26 17-9 4-19 6-29 7h-3634c-10-1-20-3-29-7-10-4-19-9-26-17-7-7-13-16-17-26-4-9-6-19-6-30z">
          <text:p/>
        </draw:path>
        <draw:frame draw:style-name="gr264" draw:text-style-name="P262" draw:layer="layout" svg:width="1.146cm" svg:height="0.48cm" svg:x="17.361cm" svg:y="12.343cm">
          <draw:text-box>
            <text:p text:style-name="P261"><text:span text:style-name="T14">values.</text:span></text:p>
          </draw:text-box>
        </draw:frame>
        <draw:frame draw:style-name="gr268" draw:text-style-name="P266" draw:layer="layout" svg:width="3.059cm" svg:height="0.433cm" svg:x="2.666cm" svg:y="12.964cm">
          <draw:text-box>
            <text:p text:style-name="P261"><text:span text:style-name="T20">process.env.API_KEY</text:span></text:p>
          </draw:text-box>
        </draw:frame>
        <draw:frame draw:style-name="gr264" draw:text-style-name="P262" draw:layer="layout" svg:width="11.593cm" svg:height="0.48cm" svg:x="6.323cm" svg:y="12.926cm">
          <draw:text-box>
            <text:p text:style-name="P261"><text:span text:style-name="T15"><text:s/>in source may be replaced at build time. Check the actual deployed JS.</text:span></text:p>
          </draw:text-box>
        </draw:frame>
        <draw:frame draw:style-name="gr264" draw:text-style-name="P262" draw:layer="layout" svg:width="15.978cm" svg:height="0.48cm" svg:x="2.533cm" svg:y="13.509cm">
          <draw:text-box>
            <text:p text:style-name="P261"><text:span text:style-name="T14">CORS doesn't mean exploitable.</text:span><text:span text:style-name="T15"> <text:s/>Finding <text:s/>an <text:s/>endpoint <text:s/>in <text:s/>JS <text:s/>doesn't <text:s/>mean <text:s/>it's <text:s/>vulnerable. <text:s/>Test</text:span></text:p>
          </draw:text-box>
        </draw:frame>
        <draw:frame draw:style-name="gr264" draw:text-style-name="P262" draw:layer="layout" svg:width="15.369cm" svg:height="0.48cm" svg:x="2.533cm" svg:y="14.092cm">
          <draw:text-box>
            <text:p text:style-name="P261"><text:span text:style-name="T15">properly. </text:span><text:span text:style-name="T14">Rate limiting on JS download.</text:span><text:span text:style-name="T15"> Don't hammer CDNs — they may block your IP. </text:span><text:span text:style-name="T14">Cache</text:span></text:p>
          </draw:text-box>
        </draw:frame>
        <draw:path draw:style-name="gr284" draw:text-style-name="P281" draw:layer="layout" svg:width="2.677cm" svg:height="0.53cm" svg:x="10.441cm" svg:y="14.682cm" svg:viewBox="0 0 2678 531" svg:d="M0 79c0-11 2-21 6-30 4-10 10-19 18-26 7-8 16-13 25-17 10-4 19-6 29-6h2523c9 0 19 2 28 6 10 4 18 9 26 17 7 7 13 16 17 26 4 9 6 20 6 30v372c0 11-2 21-6 31-4 9-10 18-17 25-8 8-16 14-26 18s-20 6-30 6h-2519c-11 0-21-2-31-6-9-4-18-10-25-18-8-7-14-16-18-25-4-10-6-20-6-31z">
          <text:p/>
        </draw:path>
        <draw:frame draw:style-name="gr264" draw:text-style-name="P262" draw:layer="layout" svg:width="7.568cm" svg:height="0.48cm" svg:x="2.533cm" svg:y="14.676cm">
          <draw:text-box>
            <text:p text:style-name="P261"><text:span text:style-name="T14">invalidation.</text:span><text:span text:style-name="T15"> <text:s/>JS <text:s/>URLs <text:s/>with <text:s/>hash <text:s/>fragments <text:s/>(</text:span></text:p>
          </draw:text-box>
        </draw:frame>
        <draw:frame draw:style-name="gr268" draw:text-style-name="P266" draw:layer="layout" svg:width="2.002cm" svg:height="0.433cm" svg:x="10.569cm" svg:y="14.713cm">
          <draw:text-box>
            <text:p text:style-name="P261"><text:span text:style-name="T20">app.a3f2b1.js</text:span></text:p>
          </draw:text-box>
        </draw:frame>
        <draw:frame draw:style-name="gr264" draw:text-style-name="P262" draw:layer="layout" svg:width="5.394cm" svg:height="0.48cm" svg:x="13.113cm" svg:y="14.676cm">
          <draw:text-box>
            <text:p text:style-name="P261"><text:span text:style-name="T15">) <text:s/>change <text:s/>on <text:s/>every <text:s/>deploy. <text:s/>Use</text:span></text:p>
          </draw:text-box>
        </draw:frame>
        <draw:frame draw:style-name="gr264" draw:text-style-name="P262" draw:layer="layout" svg:width="2.083cm" svg:height="0.48cm" svg:x="2.533cm" svg:y="15.259cm">
          <draw:text-box>
            <text:p text:style-name="P261"><text:span text:style-name="T15">fresh crawls.</text:span></text:p>
          </draw:text-box>
        </draw:frame>
        <draw:frame draw:style-name="gr293" draw:text-style-name="P288" draw:layer="layout" svg:width="6.866cm" svg:height="0.577cm" svg:x="2.003cm" svg:y="16.932cm">
          <draw:text-box>
            <text:p text:style-name="P261"><text:span text:style-name="T29">Quick Reference: What to Look For</text:span></text:p>
          </draw:text-box>
        </draw:frame>
        <draw:frame draw:style-name="gr278" draw:text-style-name="P277" draw:layer="layout" svg:width="4.639cm" svg:height="0.501cm" svg:x="2.003cm" svg:y="17.996cm">
          <draw:text-box>
            <text:p text:style-name="P261"><text:span text:style-name="T21">Table 4 </text:span><text:span text:style-name="T26">JS Artifact Checklist</text:span></text:p>
          </draw:text-box>
        </draw:frame>
        <draw:frame draw:style-name="gr264" draw:text-style-name="P262" draw:layer="layout" svg:width="1.203cm" svg:height="0.48cm" svg:x="2.268cm" svg:y="19.022cm">
          <draw:text-box>
            <text:p text:style-name="P261"><text:span text:style-name="T14">Artifact</text:span></text:p>
          </draw:text-box>
        </draw:frame>
        <draw:frame draw:style-name="gr264" draw:text-style-name="P262" draw:layer="layout" svg:width="2.248cm" svg:height="0.48cm" svg:x="6.78cm" svg:y="19.022cm">
          <draw:text-box>
            <text:p text:style-name="P261"><text:span text:style-name="T14">Search Terms</text:span></text:p>
          </draw:text-box>
        </draw:frame>
        <draw:frame draw:style-name="gr264" draw:text-style-name="P262" draw:layer="layout" svg:width="0.713cm" svg:height="0.48cm" svg:x="14.254cm" svg:y="19.022cm">
          <draw:text-box>
            <text:p text:style-name="P261"><text:span text:style-name="T14">Tool</text:span></text:p>
          </draw:text-box>
        </draw:frame>
        <draw:path draw:style-name="gr284" draw:text-style-name="P281" draw:layer="layout" svg:width="3.975cm" svg:height="0.53cm" svg:x="6.784cm" svg:y="20.062cm" svg:viewBox="0 0 3976 531" svg:d="M0 79c0-11 2-21 6-30 4-10 10-19 17-26 8-8 16-13 26-17 9-4 19-6 29-6h3820c10 0 20 2 29 6 10 4 19 9 26 17 8 7 13 16 17 26 4 9 6 19 6 30v372c0 11-2 21-6 30-4 10-9 19-17 26-7 8-16 13-26 18-9 3-19 5-29 6h-3819c-10-1-20-3-30-6-10-5-18-10-26-18-7-7-13-16-17-26-4-9-6-19-6-30z">
          <text:p/>
        </draw:path>
        <draw:frame draw:style-name="gr264" draw:text-style-name="P262" draw:layer="layout" svg:width="2.31cm" svg:height="0.48cm" svg:x="2.268cm" svg:y="20.055cm">
          <draw:text-box>
            <text:p text:style-name="P261"><text:span text:style-name="T15">API Endpoints</text:span></text:p>
          </draw:text-box>
        </draw:frame>
        <draw:frame draw:style-name="gr268" draw:text-style-name="P266" draw:layer="layout" svg:width="2.648cm" svg:height="0.433cm" svg:x="6.913cm" svg:y="20.093cm">
          <draw:text-box>
            <text:p text:style-name="P261"><text:span text:style-name="T20">/api/, fetch(, axios</text:span></text:p>
          </draw:text-box>
        </draw:frame>
        <draw:frame draw:style-name="gr264" draw:text-style-name="P262" draw:layer="layout" svg:width="3.04cm" svg:height="0.48cm" svg:x="14.254cm" svg:y="20.055cm">
          <draw:text-box>
            <text:p text:style-name="P261"><text:span text:style-name="T15">LinkFinder, katana</text:span></text:p>
          </draw:text-box>
        </draw:frame>
        <draw:path draw:style-name="gr284" draw:text-style-name="P281" draw:layer="layout" svg:width="4.346cm" svg:height="0.53cm" svg:x="6.784cm" svg:y="21.095cm" svg:viewBox="0 0 4347 531" svg:d="M0 80c0-11 2-21 6-31s10-18 17-26c8-7 16-13 26-17 9-4 19-6 29-6h4192c10 0 19 2 28 6 10 4 19 10 26 17 8 8 13 16 17 26s6 20 6 31v372c0 10-2 20-6 30s-9 18-17 26c-7 7-16 13-26 17-9 4-20 6-30 6h-4188c-11 0-21-2-31-6s-18-10-26-17c-7-8-13-16-17-26s-6-20-6-30z">
          <text:p/>
        </draw:path>
        <draw:frame draw:style-name="gr264" draw:text-style-name="P262" draw:layer="layout" svg:width="2.094cm" svg:height="0.48cm" svg:x="2.268cm" svg:y="21.089cm">
          <draw:text-box>
            <text:p text:style-name="P261"><text:span text:style-name="T15">Secrets/Keys</text:span></text:p>
          </draw:text-box>
        </draw:frame>
        <draw:frame draw:style-name="gr268" draw:text-style-name="P266" draw:layer="layout" svg:width="3.204cm" svg:height="0.433cm" svg:x="6.913cm" svg:y="21.127cm">
          <draw:text-box>
            <text:p text:style-name="P261"><text:span text:style-name="T20">api_key, token, secret</text:span></text:p>
          </draw:text-box>
        </draw:frame>
        <draw:frame draw:style-name="gr264" draw:text-style-name="P262" draw:layer="layout" svg:width="3.042cm" svg:height="0.48cm" svg:x="14.254cm" svg:y="21.089cm">
          <draw:text-box>
            <text:p text:style-name="P261"><text:span text:style-name="T15">SecretFinder, grep</text:span></text:p>
          </draw:text-box>
        </draw:frame>
        <draw:path draw:style-name="gr284" draw:text-style-name="P281" draw:layer="layout" svg:width="4.903cm" svg:height="0.53cm" svg:x="6.784cm" svg:y="22.129cm" svg:viewBox="0 0 4904 531" svg:d="M0 79c0-10 2-21 6-30 4-10 10-19 17-26 8-8 16-13 26-17s20-6 31-6h4744c11 0 21 2 31 6s18 9 26 17c7 7 13 16 17 26 4 9 6 20 6 30v372c0 11-2 21-6 31-4 9-10 18-17 25-8 8-16 14-26 18s-20 6-31 6h-4744c-11 0-21-2-31-6s-18-10-26-18c-7-7-13-16-17-25-4-10-6-20-6-31z">
          <text:p/>
        </draw:path>
        <draw:frame draw:style-name="gr264" draw:text-style-name="P262" draw:layer="layout" svg:width="2.128cm" svg:height="0.48cm" svg:x="2.268cm" svg:y="22.123cm">
          <draw:text-box>
            <text:p text:style-name="P261"><text:span text:style-name="T15">Source Maps</text:span></text:p>
          </draw:text-box>
        </draw:frame>
        <draw:frame draw:style-name="gr268" draw:text-style-name="P266" draw:layer="layout" svg:width="4.173cm" svg:height="0.433cm" svg:x="6.913cm" svg:y="22.16cm">
          <draw:text-box>
            <text:p text:style-name="P261"><text:span text:style-name="T20">.js.map, sourceMappingURL</text:span></text:p>
          </draw:text-box>
        </draw:frame>
        <draw:frame draw:style-name="gr264" draw:text-style-name="P262" draw:layer="layout" svg:width="3.22cm" svg:height="0.48cm" svg:x="14.254cm" svg:y="22.123cm">
          <draw:text-box>
            <text:p text:style-name="P261"><text:span text:style-name="T15">sourcemapper, curl</text:span></text:p>
          </draw:text-box>
        </draw:frame>
        <draw:path draw:style-name="gr284" draw:text-style-name="P281" draw:layer="layout" svg:width="5.088cm" svg:height="0.53cm" svg:x="6.784cm" svg:y="23.162cm" svg:viewBox="0 0 5089 531" svg:d="M0 80c0-11 2-21 6-31 4-9 10-18 17-25 8-8 16-14 26-18s20-6 31-6h4930c10 0 21 2 30 6 10 4 19 10 26 18 8 7 13 16 17 25 4 10 6 20 6 31v372c0 10-2 20-6 30s-9 19-17 26c-7 7-16 13-26 17-9 4-18 6-28 6h-4934c-10 0-20-2-29-6-10-4-18-10-26-17-7-7-13-16-17-26s-6-20-6-30z">
          <text:p/>
        </draw:path>
        <draw:frame draw:style-name="gr264" draw:text-style-name="P262" draw:layer="layout" svg:width="2.858cm" svg:height="0.48cm" svg:x="2.268cm" svg:y="23.156cm">
          <draw:text-box>
            <text:p text:style-name="P261"><text:span text:style-name="T15">Debug Endpoints</text:span></text:p>
          </draw:text-box>
        </draw:frame>
        <draw:frame draw:style-name="gr268" draw:text-style-name="P266" draw:layer="layout" svg:width="4.114cm" svg:height="0.433cm" svg:x="6.913cm" svg:y="23.194cm">
          <draw:text-box>
            <text:p text:style-name="P261"><text:span text:style-name="T20">debug, test, sandbox, mock</text:span></text:p>
          </draw:text-box>
        </draw:frame>
        <draw:frame draw:style-name="gr264" draw:text-style-name="P262" draw:layer="layout" svg:width="2.19cm" svg:height="0.48cm" svg:x="14.254cm" svg:y="23.156cm">
          <draw:text-box>
            <text:p text:style-name="P261"><text:span text:style-name="T15">grep, ripgrep</text:span></text:p>
          </draw:text-box>
        </draw:frame>
        <draw:path draw:style-name="gr284" draw:text-style-name="P281" draw:layer="layout" svg:width="4.532cm" svg:height="0.53cm" svg:x="6.784cm" svg:y="24.196cm" svg:viewBox="0 0 4533 531" svg:d="M0 79c0-10 2-20 6-30s11-18 18-26c8-7 16-13 26-17s20-6 31-6h4372c11 0 21 2 31 6s18 10 26 17c7 8 13 16 17 26s6 20 6 30v372c0 11-2 21-6 31s-10 18-17 26c-8 7-16 13-26 17-9 4-19 6-29 6h-4376c-10 0-20-2-29-6-10-4-18-10-26-17-7-8-14-16-18-26s-6-20-6-31z">
          <text:p/>
        </draw:path>
        <draw:frame draw:style-name="gr264" draw:text-style-name="P262" draw:layer="layout" svg:width="2.312cm" svg:height="0.48cm" svg:x="2.268cm" svg:y="24.19cm">
          <draw:text-box>
            <text:p text:style-name="P261"><text:span text:style-name="T15">Admin Routes</text:span></text:p>
          </draw:text-box>
        </draw:frame>
        <draw:frame draw:style-name="gr268" draw:text-style-name="P266" draw:layer="layout" svg:width="3.73cm" svg:height="0.433cm" svg:x="6.913cm" svg:y="24.227cm">
          <draw:text-box>
            <text:p text:style-name="P261"><text:span text:style-name="T20">admin, dashboard, panel</text:span></text:p>
          </draw:text-box>
        </draw:frame>
        <draw:frame draw:style-name="gr264" draw:text-style-name="P262" draw:layer="layout" svg:width="1.731cm" svg:height="0.48cm" svg:x="14.254cm" svg:y="24.19cm">
          <draw:text-box>
            <text:p text:style-name="P261"><text:span text:style-name="T15">LinkFinder</text:span></text:p>
          </draw:text-box>
        </draw:frame>
        <draw:path draw:style-name="gr284" draw:text-style-name="P281" draw:layer="layout" svg:width="3.048cm" svg:height="0.53cm" svg:x="6.784cm" svg:y="25.23cm" svg:viewBox="0 0 3049 531" svg:d="M0 79c0-11 2-21 6-31 4-9 10-18 17-25 8-8 16-14 26-17 9-4 19-6 29-6h2893c10 0 19 2 29 6 9 3 18 9 25 17 8 7 14 16 18 25 4 10 6 20 6 31v371c0 11-2 21-6 31s-10 19-18 26c-7 8-16 13-25 17-10 4-20 6-30 7h-2891c-10-1-20-3-30-7s-18-9-26-17c-7-7-13-16-17-26s-6-20-6-31z">
          <text:p/>
        </draw:path>
        <draw:frame draw:style-name="gr264" draw:text-style-name="P262" draw:layer="layout" svg:width="2.763cm" svg:height="0.48cm" svg:x="2.268cm" svg:y="25.223cm">
          <draw:text-box>
            <text:p text:style-name="P261"><text:span text:style-name="T15">Third-party URLs</text:span></text:p>
          </draw:text-box>
        </draw:frame>
        <draw:frame draw:style-name="gr268" draw:text-style-name="P266" draw:layer="layout" svg:width="1.987cm" svg:height="0.433cm" svg:x="6.913cm" svg:y="25.261cm">
          <draw:text-box>
            <text:p text:style-name="P261"><text:span text:style-name="T20">https://, ws://</text:span></text:p>
          </draw:text-box>
        </draw:frame>
        <draw:frame draw:style-name="gr264" draw:text-style-name="P262" draw:layer="layout" svg:width="3.042cm" svg:height="0.48cm" svg:x="14.254cm" svg:y="25.223cm">
          <draw:text-box>
            <text:p text:style-name="P261"><text:span text:style-name="T15">grep, SecretFinder</text:span></text:p>
          </draw:text-box>
        </draw:frame>
        <draw:path draw:style-name="gr284" draw:text-style-name="P281" draw:layer="layout" svg:width="2.677cm" svg:height="0.53cm" svg:x="6.784cm" svg:y="26.263cm" svg:viewBox="0 0 2678 531" svg:d="M0 80c0-11 2-21 6-31s10-18 17-26c8-7 16-13 26-17 9-4 19-6 29-6h2522c10 0 20 2 29 6s18 10 25 17c8 8 14 16 18 26s6 20 6 31v371c0 10-2 20-6 30s-10 18-18 27c-7 7-16 13-25 17-10 4-20 6-31 6h-2518c-11 0-21-2-31-6s-18-10-26-17c-7-9-13-17-17-27s-6-20-6-30z">
          <text:p/>
        </draw:path>
        <draw:frame draw:style-name="gr264" draw:text-style-name="P262" draw:layer="layout" svg:width="1.492cm" svg:height="0.48cm" svg:x="2.268cm" svg:y="26.257cm">
          <draw:text-box>
            <text:p text:style-name="P261"><text:span text:style-name="T15">GraphQL</text:span></text:p>
          </draw:text-box>
        </draw:frame>
        <draw:frame draw:style-name="gr268" draw:text-style-name="P266" draw:layer="layout" svg:width="1.933cm" svg:height="0.433cm" svg:x="6.913cm" svg:y="26.295cm">
          <draw:text-box>
            <text:p text:style-name="P261"><text:span text:style-name="T20">graphql, /gql</text:span></text:p>
          </draw:text-box>
        </draw:frame>
        <draw:frame draw:style-name="gr264" draw:text-style-name="P262" draw:layer="layout" svg:width="2.086cm" svg:height="0.48cm" svg:x="14.254cm" svg:y="26.257cm">
          <draw:text-box>
            <text:p text:style-name="P261"><text:span text:style-name="T15">grep, katana</text:span></text:p>
          </draw:text-box>
        </draw:frame>
      </draw:page>
      <draw:page draw:name="page22" draw:style-name="dp1" draw:master-page-name="master-page569">
        <draw:frame draw:style-name="gr268" draw:text-style-name="P270" draw:layer="layout" svg:width="3.714cm" svg:height="0.446cm" svg:x="2.088cm" svg:y="0.879cm">
          <draw:text-box>
            <text:p text:style-name="P261"><text:span text:style-name="T8">8. Best Practices &amp; Legal</text:span></text:p>
          </draw:text-box>
        </draw:frame>
        <draw:polygon draw:style-name="gr276" draw:text-style-name="P275" draw:layer="layout" svg:width="3.869cm" svg:height="0.027cm" svg:x="2.014cm" svg:y="3.206cm" svg:viewBox="0 0 3870 28" draw:points="0,0 3870,0 3870,28 0,28">
          <text:p/>
        </draw:polygon>
        <draw:polygon draw:style-name="gr276" draw:text-style-name="P275" draw:layer="layout" svg:width="8.242cm" svg:height="0.027cm" svg:x="5.883cm" svg:y="3.206cm" svg:viewBox="0 0 8243 28" draw:points="0,0 8243,0 8243,28 0,28">
          <text:p/>
        </draw:polygon>
        <draw:polygon draw:style-name="gr276" draw:text-style-name="P275" draw:layer="layout" svg:width="4.903cm" svg:height="0.027cm" svg:x="14.125cm" svg:y="3.206cm" svg:viewBox="0 0 4904 28" draw:points="0,0 4904,0 4904,28 0,28">
          <text:p/>
        </draw:polygon>
        <draw:polygon draw:style-name="gr276" draw:text-style-name="P275" draw:layer="layout" svg:width="3.869cm" svg:height="0.026cm" svg:x="2.014cm" svg:y="4.24cm" svg:viewBox="0 0 3870 27" draw:points="0,0 3870,0 3870,27 0,27">
          <text:p/>
        </draw:polygon>
        <draw:polygon draw:style-name="gr276" draw:text-style-name="P275" draw:layer="layout" svg:width="8.242cm" svg:height="0.026cm" svg:x="5.883cm" svg:y="4.24cm" svg:viewBox="0 0 8243 27" draw:points="0,0 8243,0 8243,27 0,27">
          <text:p/>
        </draw:polygon>
        <draw:polygon draw:style-name="gr276" draw:text-style-name="P275" draw:layer="layout" svg:width="4.903cm" svg:height="0.026cm" svg:x="14.125cm" svg:y="4.24cm" svg:viewBox="0 0 4904 27" draw:points="0,0 4904,0 4904,27 0,27">
          <text:p/>
        </draw:polygon>
        <draw:polygon draw:style-name="gr287" draw:text-style-name="P284" draw:layer="layout" svg:width="3.869cm" svg:height="0.053cm" svg:x="2.014cm" svg:y="5.273cm" svg:viewBox="0 0 3870 54" draw:points="0,0 3870,0 3870,54 0,54">
          <text:p/>
        </draw:polygon>
        <draw:polygon draw:style-name="gr287" draw:text-style-name="P284" draw:layer="layout" svg:width="8.242cm" svg:height="0.053cm" svg:x="5.883cm" svg:y="5.273cm" svg:viewBox="0 0 8243 54" draw:points="0,0 8243,0 8243,54 0,54">
          <text:p/>
        </draw:polygon>
        <draw:polygon draw:style-name="gr287" draw:text-style-name="P284" draw:layer="layout" svg:width="4.903cm" svg:height="0.053cm" svg:x="14.125cm" svg:y="5.273cm" svg:viewBox="0 0 4904 54" draw:points="0,0 4904,0 4904,54 0,54">
          <text:p/>
        </draw:polygon>
        <draw:polygon draw:style-name="gr282" draw:text-style-name="P280" draw:layer="layout" svg:width="1.431cm" svg:height="1.06cm" svg:x="2.014cm" svg:y="9.434cm" svg:viewBox="0 0 1432 1061" draw:points="0,0 1432,0 1432,1061 0,1061">
          <text:p/>
        </draw:polygon>
        <draw:polygon draw:style-name="gr282" draw:text-style-name="P280" draw:layer="layout" svg:width="8.321cm" svg:height="1.06cm" svg:x="3.445cm" svg:y="9.434cm" svg:viewBox="0 0 8322 1061" draw:points="0,0 8322,0 8322,1061 0,1061">
          <text:p/>
        </draw:polygon>
        <draw:polygon draw:style-name="gr282" draw:text-style-name="P280" draw:layer="layout" svg:width="7.262cm" svg:height="1.06cm" svg:x="11.766cm" svg:y="9.434cm" svg:viewBox="0 0 7263 1061" draw:points="0,0 7263,0 7263,1061 0,1061">
          <text:p/>
        </draw:polygon>
        <draw:polygon draw:style-name="gr287" draw:text-style-name="P284" draw:layer="layout" svg:width="1.431cm" svg:height="0.053cm" svg:x="2.014cm" svg:y="9.408cm" svg:viewBox="0 0 1432 54" draw:points="0,0 1432,0 1432,54 0,54">
          <text:p/>
        </draw:polygon>
        <draw:polygon draw:style-name="gr287" draw:text-style-name="P284" draw:layer="layout" svg:width="8.321cm" svg:height="0.053cm" svg:x="3.445cm" svg:y="9.408cm" svg:viewBox="0 0 8322 54" draw:points="0,0 8322,0 8322,54 0,54">
          <text:p/>
        </draw:polygon>
        <draw:polygon draw:style-name="gr287" draw:text-style-name="P284" draw:layer="layout" svg:width="7.262cm" svg:height="0.053cm" svg:x="11.766cm" svg:y="9.408cm" svg:viewBox="0 0 7263 54" draw:points="0,0 7263,0 7263,54 0,54">
          <text:p/>
        </draw:polygon>
        <draw:polygon draw:style-name="gr287" draw:text-style-name="P284" draw:layer="layout" svg:width="1.431cm" svg:height="0.026cm" svg:x="2.014cm" svg:y="10.468cm" svg:viewBox="0 0 1432 27" draw:points="0,0 1432,0 1432,27 0,27">
          <text:p/>
        </draw:polygon>
        <draw:polygon draw:style-name="gr287" draw:text-style-name="P284" draw:layer="layout" svg:width="8.321cm" svg:height="0.026cm" svg:x="3.445cm" svg:y="10.468cm" svg:viewBox="0 0 8322 27" draw:points="0,0 8322,0 8322,27 0,27">
          <text:p/>
        </draw:polygon>
        <draw:polygon draw:style-name="gr287" draw:text-style-name="P284" draw:layer="layout" svg:width="7.262cm" svg:height="0.026cm" svg:x="11.766cm" svg:y="10.468cm" svg:viewBox="0 0 7263 27" draw:points="0,0 7263,0 7263,27 0,27">
          <text:p/>
        </draw:polygon>
        <draw:polygon draw:style-name="gr276" draw:text-style-name="P275" draw:layer="layout" svg:width="1.431cm" svg:height="0.027cm" svg:x="2.014cm" svg:y="11.501cm" svg:viewBox="0 0 1432 28" draw:points="0,0 1432,0 1432,28 0,28">
          <text:p/>
        </draw:polygon>
        <draw:polygon draw:style-name="gr276" draw:text-style-name="P275" draw:layer="layout" svg:width="8.321cm" svg:height="0.027cm" svg:x="3.445cm" svg:y="11.501cm" svg:viewBox="0 0 8322 28" draw:points="0,0 8322,0 8322,28 0,28">
          <text:p/>
        </draw:polygon>
        <draw:polygon draw:style-name="gr276" draw:text-style-name="P275" draw:layer="layout" svg:width="7.262cm" svg:height="0.027cm" svg:x="11.766cm" svg:y="11.501cm" svg:viewBox="0 0 7263 28" draw:points="0,0 7263,0 7263,28 0,28">
          <text:p/>
        </draw:polygon>
        <draw:polygon draw:style-name="gr276" draw:text-style-name="P275" draw:layer="layout" svg:width="1.431cm" svg:height="0.026cm" svg:x="2.014cm" svg:y="12.535cm" svg:viewBox="0 0 1432 27" draw:points="0,0 1432,0 1432,27 0,27">
          <text:p/>
        </draw:polygon>
        <draw:polygon draw:style-name="gr276" draw:text-style-name="P275" draw:layer="layout" svg:width="8.321cm" svg:height="0.026cm" svg:x="3.445cm" svg:y="12.535cm" svg:viewBox="0 0 8322 27" draw:points="0,0 8322,0 8322,27 0,27">
          <text:p/>
        </draw:polygon>
        <draw:polygon draw:style-name="gr276" draw:text-style-name="P275" draw:layer="layout" svg:width="7.262cm" svg:height="0.026cm" svg:x="11.766cm" svg:y="12.535cm" svg:viewBox="0 0 7263 27" draw:points="0,0 7263,0 7263,27 0,27">
          <text:p/>
        </draw:polygon>
        <draw:polygon draw:style-name="gr276" draw:text-style-name="P275" draw:layer="layout" svg:width="1.431cm" svg:height="0.026cm" svg:x="2.014cm" svg:y="13.569cm" svg:viewBox="0 0 1432 27" draw:points="0,0 1432,0 1432,27 0,27">
          <text:p/>
        </draw:polygon>
        <draw:polygon draw:style-name="gr276" draw:text-style-name="P275" draw:layer="layout" svg:width="8.321cm" svg:height="0.026cm" svg:x="3.445cm" svg:y="13.569cm" svg:viewBox="0 0 8322 27" draw:points="0,0 8322,0 8322,27 0,27">
          <text:p/>
        </draw:polygon>
        <draw:polygon draw:style-name="gr276" draw:text-style-name="P275" draw:layer="layout" svg:width="7.262cm" svg:height="0.026cm" svg:x="11.766cm" svg:y="13.569cm" svg:viewBox="0 0 7263 27" draw:points="0,0 7263,0 7263,27 0,27">
          <text:p/>
        </draw:polygon>
        <draw:polygon draw:style-name="gr276" draw:text-style-name="P275" draw:layer="layout" svg:width="1.431cm" svg:height="0.027cm" svg:x="2.014cm" svg:y="14.602cm" svg:viewBox="0 0 1432 28" draw:points="0,0 1432,0 1432,28 0,28">
          <text:p/>
        </draw:polygon>
        <draw:polygon draw:style-name="gr276" draw:text-style-name="P275" draw:layer="layout" svg:width="8.321cm" svg:height="0.027cm" svg:x="3.445cm" svg:y="14.602cm" svg:viewBox="0 0 8322 28" draw:points="0,0 8322,0 8322,28 0,28">
          <text:p/>
        </draw:polygon>
        <draw:polygon draw:style-name="gr276" draw:text-style-name="P275" draw:layer="layout" svg:width="7.262cm" svg:height="0.027cm" svg:x="11.766cm" svg:y="14.602cm" svg:viewBox="0 0 7263 28" draw:points="0,0 7263,0 7263,28 0,28">
          <text:p/>
        </draw:polygon>
        <draw:polygon draw:style-name="gr276" draw:text-style-name="P275" draw:layer="layout" svg:width="1.431cm" svg:height="0.026cm" svg:x="2.014cm" svg:y="15.636cm" svg:viewBox="0 0 1432 27" draw:points="0,0 1432,0 1432,27 0,27">
          <text:p/>
        </draw:polygon>
        <draw:polygon draw:style-name="gr276" draw:text-style-name="P275" draw:layer="layout" svg:width="8.321cm" svg:height="0.026cm" svg:x="3.445cm" svg:y="15.636cm" svg:viewBox="0 0 8322 27" draw:points="0,0 8322,0 8322,27 0,27">
          <text:p/>
        </draw:polygon>
        <draw:polygon draw:style-name="gr276" draw:text-style-name="P275" draw:layer="layout" svg:width="7.262cm" svg:height="0.026cm" svg:x="11.766cm" svg:y="15.636cm" svg:viewBox="0 0 7263 27" draw:points="0,0 7263,0 7263,27 0,27">
          <text:p/>
        </draw:polygon>
        <draw:polygon draw:style-name="gr287" draw:text-style-name="P284" draw:layer="layout" svg:width="1.431cm" svg:height="0.053cm" svg:x="2.014cm" svg:y="16.669cm" svg:viewBox="0 0 1432 54" draw:points="0,0 1432,0 1432,54 0,54">
          <text:p/>
        </draw:polygon>
        <draw:polygon draw:style-name="gr287" draw:text-style-name="P284" draw:layer="layout" svg:width="8.321cm" svg:height="0.053cm" svg:x="3.445cm" svg:y="16.669cm" svg:viewBox="0 0 8322 54" draw:points="0,0 8322,0 8322,54 0,54">
          <text:p/>
        </draw:polygon>
        <draw:polygon draw:style-name="gr287" draw:text-style-name="P284" draw:layer="layout" svg:width="7.262cm" svg:height="0.053cm" svg:x="11.766cm" svg:y="16.669cm" svg:viewBox="0 0 7263 54" draw:points="0,0 7263,0 7263,54 0,54">
          <text:p/>
        </draw:polygon>
        <draw:frame draw:style-name="gr268" draw:text-style-name="P266" draw:layer="layout" svg:width="0.365cm" svg:height="0.433cm" svg:x="2.003cm" svg:y="28.256cm">
          <draw:text-box>
            <text:p text:style-name="P261"><text:span text:style-name="T9">22</text:span></text:p>
          </draw:text-box>
        </draw:frame>
        <draw:path draw:style-name="gr284" draw:text-style-name="P281" draw:layer="layout" svg:width="4.717cm" svg:height="0.53cm" svg:x="6.148cm" svg:y="2.438cm" svg:viewBox="0 0 4718 531" svg:d="M0 79c0-10 2-21 6-30 4-10 10-19 17-26 8-8 16-13 26-17s20-6 30-6h4560c10 0 21 2 30 6 10 4 19 9 26 17 8 7 13 16 17 26 4 9 6 20 6 30v371c0 11-2 21-6 32-4 9-9 18-17 25-7 8-16 14-26 18-9 4-20 6-30 6h-4560c-10 0-20-2-30-6s-18-10-26-18c-7-7-13-16-17-25-4-11-6-21-6-32z">
          <text:p/>
        </draw:path>
        <draw:frame draw:style-name="gr264" draw:text-style-name="P262" draw:layer="layout" svg:width="1.998cm" svg:height="0.48cm" svg:x="2.268cm" svg:y="2.432cm">
          <draw:text-box>
            <text:p text:style-name="P261"><text:span text:style-name="T15">WebSockets</text:span></text:p>
          </draw:text-box>
        </draw:frame>
        <draw:frame draw:style-name="gr268" draw:text-style-name="P266" draw:layer="layout" svg:width="3.587cm" svg:height="0.433cm" svg:x="6.286cm" svg:y="2.469cm">
          <draw:text-box>
            <text:p text:style-name="P261"><text:span text:style-name="T20">ws://, wss://, WebSocket</text:span></text:p>
          </draw:text-box>
        </draw:frame>
        <draw:frame draw:style-name="gr264" draw:text-style-name="P262" draw:layer="layout" svg:width="0.777cm" svg:height="0.48cm" svg:x="14.385cm" svg:y="2.432cm">
          <draw:text-box>
            <text:p text:style-name="P261"><text:span text:style-name="T15">grep</text:span></text:p>
          </draw:text-box>
        </draw:frame>
        <draw:path draw:style-name="gr284" draw:text-style-name="P281" draw:layer="layout" svg:width="4.346cm" svg:height="0.53cm" svg:x="6.148cm" svg:y="3.471cm" svg:viewBox="0 0 4347 531" svg:d="M0 80c0-11 2-21 6-31 4-9 10-18 17-26 8-7 16-13 26-17s20-6 30-6h4189c10 0 21 2 30 6 10 4 19 10 26 17 7 8 13 17 17 26 4 10 6 20 6 31v371c0 10-2 20-6 30s-10 18-17 27c-7 7-16 13-26 17-9 4-20 6-30 6h-4189c-10 0-20-2-30-6s-18-10-26-17c-7-9-13-17-17-27s-6-20-6-30z">
          <text:p/>
        </draw:path>
        <draw:frame draw:style-name="gr264" draw:text-style-name="P262" draw:layer="layout" svg:width="2.006cm" svg:height="0.48cm" svg:x="2.268cm" svg:y="3.465cm">
          <draw:text-box>
            <text:p text:style-name="P261"><text:span text:style-name="T15">Version Info</text:span></text:p>
          </draw:text-box>
        </draw:frame>
        <draw:frame draw:style-name="gr268" draw:text-style-name="P266" draw:layer="layout" svg:width="3.035cm" svg:height="0.433cm" svg:x="6.286cm" svg:y="3.503cm">
          <draw:text-box>
            <text:p text:style-name="P261"><text:span text:style-name="T20">v1, v2, version, build</text:span></text:p>
          </draw:text-box>
        </draw:frame>
        <draw:frame draw:style-name="gr264" draw:text-style-name="P262" draw:layer="layout" svg:width="0.777cm" svg:height="0.48cm" svg:x="14.385cm" svg:y="3.465cm">
          <draw:text-box>
            <text:p text:style-name="P261"><text:span text:style-name="T15">grep</text:span></text:p>
          </draw:text-box>
        </draw:frame>
        <draw:path draw:style-name="gr284" draw:text-style-name="P281" draw:layer="layout" svg:width="5.645cm" svg:height="0.53cm" svg:x="6.148cm" svg:y="4.505cm" svg:viewBox="0 0 5646 531" svg:d="M0 79c0-10 2-20 6-30s10-18 17-26c8-7 16-13 26-17s20-6 30-6h5487c11 0 21 2 31 6s18 10 26 17c7 8 13 16 17 26s6 20 6 30v371c0 11-2 21-6 31s-10 18-17 26c-8 7-16 13-26 17-9 4-19 7-29 7h-5490c-10 0-20-3-29-7-10-4-18-10-26-17-7-8-13-16-17-26s-6-20-6-31z">
          <text:p/>
        </draw:path>
        <draw:frame draw:style-name="gr264" draw:text-style-name="P262" draw:layer="layout" svg:width="2.191cm" svg:height="0.48cm" svg:x="2.268cm" svg:y="4.499cm">
          <draw:text-box>
            <text:p text:style-name="P261"><text:span text:style-name="T15">S3/CDN URLs</text:span></text:p>
          </draw:text-box>
        </draw:frame>
        <draw:frame draw:style-name="gr268" draw:text-style-name="P266" draw:layer="layout" svg:width="4.631cm" svg:height="0.433cm" svg:x="6.286cm" svg:y="4.536cm">
          <draw:text-box>
            <text:p text:style-name="P261"><text:span text:style-name="T20">s3.amazonaws, cloudfront, cdn</text:span></text:p>
          </draw:text-box>
        </draw:frame>
        <draw:frame draw:style-name="gr264" draw:text-style-name="P262" draw:layer="layout" svg:width="3.042cm" svg:height="0.48cm" svg:x="14.385cm" svg:y="4.499cm">
          <draw:text-box>
            <text:p text:style-name="P261"><text:span text:style-name="T15">grep, SecretFinder</text:span></text:p>
          </draw:text-box>
        </draw:frame>
        <draw:frame draw:style-name="gr277" draw:text-style-name="P276" draw:layer="layout" svg:width="8.873cm" svg:height="1.064cm" svg:x="2.003cm" svg:y="5.742cm">
          <draw:text-box>
            <text:p text:style-name="P261"><text:span text:style-name="T10">8. Best Practices &amp; Legal</text:span></text:p>
          </draw:text-box>
        </draw:frame>
        <draw:frame draw:style-name="gr293" draw:text-style-name="P288" draw:layer="layout" svg:width="3.871cm" svg:height="0.577cm" svg:x="2.003cm" svg:y="7.603cm">
          <draw:text-box>
            <text:p text:style-name="P261"><text:span text:style-name="T29">Validation Checklist</text:span></text:p>
          </draw:text-box>
        </draw:frame>
        <draw:frame draw:style-name="gr278" draw:text-style-name="P277" draw:layer="layout" svg:width="4.318cm" svg:height="0.501cm" svg:x="2.003cm" svg:y="8.667cm">
          <draw:text-box>
            <text:p text:style-name="P261"><text:span text:style-name="T21">Table 5 </text:span><text:span text:style-name="T26">Before Reporting</text:span></text:p>
          </draw:text-box>
        </draw:frame>
        <draw:frame draw:style-name="gr264" draw:text-style-name="P262" draw:layer="layout" svg:width="0.736cm" svg:height="0.48cm" svg:x="2.268cm" svg:y="9.693cm">
          <draw:text-box>
            <text:p text:style-name="P261"><text:span text:style-name="T14">Step</text:span></text:p>
          </draw:text-box>
        </draw:frame>
        <draw:frame draw:style-name="gr264" draw:text-style-name="P262" draw:layer="layout" svg:width="1.042cm" svg:height="0.48cm" svg:x="3.701cm" svg:y="9.693cm">
          <draw:text-box>
            <text:p text:style-name="P261"><text:span text:style-name="T14">Action</text:span></text:p>
          </draw:text-box>
        </draw:frame>
        <draw:frame draw:style-name="gr264" draw:text-style-name="P262" draw:layer="layout" svg:width="0.725cm" svg:height="0.48cm" svg:x="12.043cm" svg:y="9.693cm">
          <draw:text-box>
            <text:p text:style-name="P261"><text:span text:style-name="T14">Why</text:span></text:p>
          </draw:text-box>
        </draw:frame>
        <draw:frame draw:style-name="gr264" draw:text-style-name="P262" draw:layer="layout" svg:width="0.352cm" svg:height="0.48cm" svg:x="2.268cm" svg:y="10.727cm">
          <draw:text-box>
            <text:p text:style-name="P261"><text:span text:style-name="T15">1</text:span></text:p>
          </draw:text-box>
        </draw:frame>
        <draw:frame draw:style-name="gr264" draw:text-style-name="P262" draw:layer="layout" svg:width="4.968cm" svg:height="0.48cm" svg:x="3.701cm" svg:y="10.727cm">
          <draw:text-box>
            <text:p text:style-name="P261"><text:span text:style-name="T15">Verify secret is valid (carefully)</text:span></text:p>
          </draw:text-box>
        </draw:frame>
        <draw:frame draw:style-name="gr264" draw:text-style-name="P262" draw:layer="layout" svg:width="5.484cm" svg:height="0.48cm" svg:x="12.043cm" svg:y="10.727cm">
          <draw:text-box>
            <text:p text:style-name="P261"><text:span text:style-name="T15">False positives waste triager time</text:span></text:p>
          </draw:text-box>
        </draw:frame>
        <draw:frame draw:style-name="gr264" draw:text-style-name="P262" draw:layer="layout" svg:width="0.352cm" svg:height="0.48cm" svg:x="2.268cm" svg:y="11.76cm">
          <draw:text-box>
            <text:p text:style-name="P261"><text:span text:style-name="T15">2</text:span></text:p>
          </draw:text-box>
        </draw:frame>
        <draw:frame draw:style-name="gr264" draw:text-style-name="P262" draw:layer="layout" svg:width="5.289cm" svg:height="0.48cm" svg:x="3.701cm" svg:y="11.76cm">
          <draw:text-box>
            <text:p text:style-name="P261"><text:span text:style-name="T15">Check if secret is scoped/limited</text:span></text:p>
          </draw:text-box>
        </draw:frame>
        <draw:frame draw:style-name="gr264" draw:text-style-name="P262" draw:layer="layout" svg:width="5.627cm" svg:height="0.48cm" svg:x="12.043cm" svg:y="11.76cm">
          <draw:text-box>
            <text:p text:style-name="P261"><text:span text:style-name="T15">Some keys are intentionally public</text:span></text:p>
          </draw:text-box>
        </draw:frame>
        <draw:frame draw:style-name="gr264" draw:text-style-name="P262" draw:layer="layout" svg:width="0.352cm" svg:height="0.48cm" svg:x="2.268cm" svg:y="12.794cm">
          <draw:text-box>
            <text:p text:style-name="P261"><text:span text:style-name="T15">3</text:span></text:p>
          </draw:text-box>
        </draw:frame>
        <draw:frame draw:style-name="gr264" draw:text-style-name="P262" draw:layer="layout" svg:width="5.661cm" svg:height="0.48cm" svg:x="3.701cm" svg:y="12.794cm">
          <draw:text-box>
            <text:p text:style-name="P261"><text:span text:style-name="T15">Test endpoint exists and responds</text:span></text:p>
          </draw:text-box>
        </draw:frame>
        <draw:frame draw:style-name="gr264" draw:text-style-name="P262" draw:layer="layout" svg:width="6.197cm" svg:height="0.48cm" svg:x="12.043cm" svg:y="12.794cm">
          <draw:text-box>
            <text:p text:style-name="P261"><text:span text:style-name="T15">Dead endpoints are not valid findings</text:span></text:p>
          </draw:text-box>
        </draw:frame>
        <draw:frame draw:style-name="gr264" draw:text-style-name="P262" draw:layer="layout" svg:width="0.352cm" svg:height="0.48cm" svg:x="2.268cm" svg:y="13.827cm">
          <draw:text-box>
            <text:p text:style-name="P261"><text:span text:style-name="T15">4</text:span></text:p>
          </draw:text-box>
        </draw:frame>
        <draw:frame draw:style-name="gr264" draw:text-style-name="P262" draw:layer="layout" svg:width="3.603cm" svg:height="0.48cm" svg:x="3.701cm" svg:y="13.827cm">
          <draw:text-box>
            <text:p text:style-name="P261"><text:span text:style-name="T15">Check program scope</text:span></text:p>
          </draw:text-box>
        </draw:frame>
        <draw:frame draw:style-name="gr264" draw:text-style-name="P262" draw:layer="layout" svg:width="5.654cm" svg:height="0.48cm" svg:x="12.043cm" svg:y="13.827cm">
          <draw:text-box>
            <text:p text:style-name="P261"><text:span text:style-name="T15">Third-party JS may be out of scope</text:span></text:p>
          </draw:text-box>
        </draw:frame>
        <draw:frame draw:style-name="gr264" draw:text-style-name="P262" draw:layer="layout" svg:width="0.352cm" svg:height="0.48cm" svg:x="2.268cm" svg:y="14.861cm">
          <draw:text-box>
            <text:p text:style-name="P261"><text:span text:style-name="T15">5</text:span></text:p>
          </draw:text-box>
        </draw:frame>
        <draw:frame draw:style-name="gr264" draw:text-style-name="P262" draw:layer="layout" svg:width="5.828cm" svg:height="0.48cm" svg:x="3.701cm" svg:y="14.861cm">
          <draw:text-box>
            <text:p text:style-name="P261"><text:span text:style-name="T15">Document exact JS file URL and line</text:span></text:p>
          </draw:text-box>
        </draw:frame>
        <draw:frame draw:style-name="gr264" draw:text-style-name="P262" draw:layer="layout" svg:width="5.705cm" svg:height="0.48cm" svg:x="12.043cm" svg:y="14.861cm">
          <draw:text-box>
            <text:p text:style-name="P261"><text:span text:style-name="T15">Reproducibility strengthens report</text:span></text:p>
          </draw:text-box>
        </draw:frame>
        <draw:frame draw:style-name="gr264" draw:text-style-name="P262" draw:layer="layout" svg:width="0.352cm" svg:height="0.48cm" svg:x="2.268cm" svg:y="15.895cm">
          <draw:text-box>
            <text:p text:style-name="P261"><text:span text:style-name="T15">6</text:span></text:p>
          </draw:text-box>
        </draw:frame>
        <draw:frame draw:style-name="gr264" draw:text-style-name="P262" draw:layer="layout" svg:width="7.1cm" svg:height="0.48cm" svg:x="3.701cm" svg:y="15.895cm">
          <draw:text-box>
            <text:p text:style-name="P261"><text:span text:style-name="T15">Minimize requests to discovered endpoints</text:span></text:p>
          </draw:text-box>
        </draw:frame>
        <draw:frame draw:style-name="gr264" draw:text-style-name="P262" draw:layer="layout" svg:width="5.451cm" svg:height="0.48cm" svg:x="12.043cm" svg:y="15.895cm">
          <draw:text-box>
            <text:p text:style-name="P261"><text:span text:style-name="T15">Aggressive testing violates scope</text:span></text:p>
          </draw:text-box>
        </draw:frame>
      </draw:page>
      <draw:page draw:name="page23" draw:style-name="dp1" draw:master-page-name="master-page569">
        <draw:frame draw:style-name="gr268" draw:text-style-name="P270" draw:layer="layout" svg:width="3.714cm" svg:height="0.446cm" svg:x="2.088cm" svg:y="0.879cm">
          <draw:text-box>
            <text:p text:style-name="P261"><text:span text:style-name="T8">8. Best Practices &amp; Legal</text:span></text:p>
          </draw:text-box>
        </draw:frame>
        <draw:path draw:style-name="gr279" draw:text-style-name="P278" draw:layer="layout" svg:width="16.961cm" svg:height="9.249cm" svg:x="2.067cm" svg:y="3.869cm" svg:viewBox="0 0 16962 9250" svg:d="M0 9091v-8932c0-21 2-42 8-61 5-20 13-37 23-52s21-26 34-34 27-12 41-12h16697c10 0 21 1 31 3s20 5 30 9c9 4 19 9 27 15 9 5 17 12 24 19 8 8 14 16 20 24 6 9 11 18 15 28s7 19 9 30c2 10 3 20 3 31v8932c0 10-1 21-3 31s-5 20-9 30c-4 9-9 19-15 27-6 9-12 17-20 24-7 8-15 14-24 20-8 6-18 11-27 15-10 4-20 7-30 9s-21 3-31 3h-16697c-14 0-28-4-41-12s-24-20-34-35c-10-14-18-32-23-51-6-20-8-40-8-61z">
          <text:p/>
        </draw:path>
        <draw:polygon draw:style-name="gr286" draw:text-style-name="P283" draw:layer="layout" svg:width="0.159cm" svg:height="9.249cm" svg:x="2.014cm" svg:y="3.869cm" svg:viewBox="0 0 160 9250" draw:points="0,0 160,0 160,9250 0,9250">
          <text:p/>
        </draw:polygon>
        <draw:path draw:style-name="gr274" draw:text-style-name="P273" draw:layer="layout" svg:width="16.961cm" svg:height="4.532cm" svg:x="2.067cm" svg:y="13.489cm" svg:viewBox="0 0 16962 4533" svg:d="M0 4374v-4215c0-21 2-41 8-61 5-19 13-36 23-51s21-27 34-35 27-12 41-12h16697c10 0 21 1 31 3s20 5 30 9c9 4 19 9 27 15 9 6 17 12 24 20 8 7 14 15 20 24 6 8 11 18 15 27 4 10 7 20 9 30s3 21 3 31v4215c0 10-1 21-3 31s-5 20-9 30c-4 9-9 18-15 27s-12 17-20 24c-7 8-15 14-24 20-8 6-18 11-27 15-10 4-20 7-30 9s-21 3-31 3h-16697c-14 0-28-4-41-12s-24-20-34-35-18-32-23-51c-6-20-8-40-8-61z">
          <text:p/>
        </draw:path>
        <draw:polygon draw:style-name="gr275" draw:text-style-name="P274" draw:layer="layout" svg:width="0.159cm" svg:height="4.532cm" svg:x="2.014cm" svg:y="13.489cm" svg:viewBox="0 0 160 4533" draw:points="0,0 160,0 160,4533 0,4533">
          <text:p/>
        </draw:polygon>
        <draw:frame draw:style-name="gr268" draw:text-style-name="P266" draw:layer="layout" svg:width="0.365cm" svg:height="0.433cm" svg:x="2.003cm" svg:y="28.256cm">
          <draw:text-box>
            <text:p text:style-name="P261"><text:span text:style-name="T9">23</text:span></text:p>
          </draw:text-box>
        </draw:frame>
        <draw:frame draw:style-name="gr293" draw:text-style-name="P288" draw:layer="layout" svg:width="3.327cm" svg:height="0.577cm" svg:x="2.003cm" svg:y="2.859cm">
          <draw:text-box>
            <text:p text:style-name="P261"><text:span text:style-name="T29">Report Template</text:span></text:p>
          </draw:text-box>
        </draw:frame>
        <draw:frame draw:style-name="gr278" draw:text-style-name="P277" draw:layer="layout" svg:width="6.177cm" svg:height="0.501cm" svg:x="2.533cm" svg:y="4.294cm">
          <draw:text-box>
            <text:p text:style-name="P261"><text:span text:style-name="T24">JS Secret Exposure Report Template</text:span></text:p>
          </draw:text-box>
        </draw:frame>
        <draw:frame draw:style-name="gr264" draw:text-style-name="P262" draw:layer="layout" svg:width="8.918cm" svg:height="0.48cm" svg:x="2.533cm" svg:y="5.029cm">
          <draw:text-box>
            <text:p text:style-name="P261"><text:span text:style-name="T14">Title:</text:span><text:span text:style-name="T15"> [P2] Hardcoded AWS Access Key in JavaScript File</text:span></text:p>
          </draw:text-box>
        </draw:frame>
        <draw:frame draw:style-name="gr264" draw:text-style-name="P262" draw:layer="layout" svg:width="14.96cm" svg:height="0.48cm" svg:x="2.533cm" svg:y="5.718cm">
          <draw:text-box>
            <text:p text:style-name="P261"><text:span text:style-name="T14">Description:</text:span><text:span text:style-name="T15"> An AWS access key ID is hardcoded in a client-side JavaScript file loaded by the</text:span></text:p>
          </draw:text-box>
        </draw:frame>
        <draw:frame draw:style-name="gr264" draw:text-style-name="P262" draw:layer="layout" svg:width="3.834cm" svg:height="0.48cm" svg:x="2.533cm" svg:y="6.301cm">
          <draw:text-box>
            <text:p text:style-name="P261"><text:span text:style-name="T15">production application.</text:span></text:p>
          </draw:text-box>
        </draw:frame>
        <draw:frame draw:style-name="gr264" draw:text-style-name="P262" draw:layer="layout" svg:width="8.268cm" svg:height="0.48cm" svg:x="2.533cm" svg:y="6.99cm">
          <draw:text-box>
            <text:p text:style-name="P261"><text:span text:style-name="T14">File URL:</text:span><text:span text:style-name="T15"> https://target.com/static/js/app.a3f2b1.js</text:span></text:p>
          </draw:text-box>
        </draw:frame>
        <draw:frame draw:style-name="gr264" draw:text-style-name="P262" draw:layer="layout" svg:width="9.55cm" svg:height="0.48cm" svg:x="2.533cm" svg:y="7.679cm">
          <draw:text-box>
            <text:p text:style-name="P261"><text:span text:style-name="T14">Key Found:</text:span><text:span text:style-name="T15"> AKIAxxxxxxxxxxxxxxxx (truncated for security)</text:span></text:p>
          </draw:text-box>
        </draw:frame>
        <draw:frame draw:style-name="gr264" draw:text-style-name="P262" draw:layer="layout" svg:width="14.94cm" svg:height="0.48cm" svg:x="2.533cm" svg:y="8.368cm">
          <draw:text-box>
            <text:p text:style-name="P261"><text:span text:style-name="T14">Discovery Method:</text:span><text:span text:style-name="T15"> Automated JavaScript analysis using SecretFinder + manual verification.</text:span></text:p>
          </draw:text-box>
        </draw:frame>
        <draw:frame draw:style-name="gr264" draw:text-style-name="P262" draw:layer="layout" svg:width="15.14cm" svg:height="0.48cm" svg:x="2.533cm" svg:y="9.057cm">
          <draw:text-box>
            <text:p text:style-name="P261"><text:span text:style-name="T14">Impact:</text:span><text:span text:style-name="T15"> The AWS key is visible to any user who inspects the page source. Depending on IAM</text:span></text:p>
          </draw:text-box>
        </draw:frame>
        <draw:frame draw:style-name="gr264" draw:text-style-name="P262" draw:layer="layout" svg:width="15.329cm" svg:height="0.48cm" svg:x="2.533cm" svg:y="9.64cm">
          <draw:text-box>
            <text:p text:style-name="P261"><text:span text:style-name="T15">permissions, this could allow unauthorized access to S3 buckets, EC2 instances, or other AWS</text:span></text:p>
          </draw:text-box>
        </draw:frame>
        <draw:frame draw:style-name="gr264" draw:text-style-name="P262" draw:layer="layout" svg:width="1.718cm" svg:height="0.48cm" svg:x="2.533cm" svg:y="10.223cm">
          <draw:text-box>
            <text:p text:style-name="P261"><text:span text:style-name="T15">resources.</text:span></text:p>
          </draw:text-box>
        </draw:frame>
        <draw:frame draw:style-name="gr264" draw:text-style-name="P262" draw:layer="layout" svg:width="15.282cm" svg:height="0.48cm" svg:x="2.533cm" svg:y="10.912cm">
          <draw:text-box>
            <text:p text:style-name="P261"><text:span text:style-name="T14">Remediation:</text:span><text:span text:style-name="T15"> Remove the hardcoded key from client-side code. Use server-side environment</text:span></text:p>
          </draw:text-box>
        </draw:frame>
        <draw:frame draw:style-name="gr264" draw:text-style-name="P262" draw:layer="layout" svg:width="1.669cm" svg:height="0.48cm" svg:x="2.533cm" svg:y="11.495cm">
          <draw:text-box>
            <text:p text:style-name="P261"><text:span text:style-name="T15">variables. </text:span></text:p>
          </draw:text-box>
        </draw:frame>
        <draw:frame draw:style-name="gr264" draw:text-style-name="P262" draw:layer="layout" svg:width="1.173cm" svg:height="0.48cm" svg:x="4.403cm" svg:y="11.495cm">
          <draw:text-box>
            <text:p text:style-name="P261"><text:span text:style-name="T15">Rotate </text:span></text:p>
          </draw:text-box>
        </draw:frame>
        <draw:frame draw:style-name="gr264" draw:text-style-name="P262" draw:layer="layout" svg:width="0.636cm" svg:height="0.48cm" svg:x="5.769cm" svg:y="11.495cm">
          <draw:text-box>
            <text:p text:style-name="P261"><text:span text:style-name="T15">the </text:span></text:p>
          </draw:text-box>
        </draw:frame>
        <draw:frame draw:style-name="gr264" draw:text-style-name="P262" draw:layer="layout" svg:width="1.489cm" svg:height="0.48cm" svg:x="6.605cm" svg:y="11.495cm">
          <draw:text-box>
            <text:p text:style-name="P261"><text:span text:style-name="T15">exposed </text:span></text:p>
          </draw:text-box>
        </draw:frame>
        <draw:frame draw:style-name="gr264" draw:text-style-name="P262" draw:layer="layout" svg:width="0.658cm" svg:height="0.48cm" svg:x="8.342cm" svg:y="11.495cm">
          <draw:text-box>
            <text:p text:style-name="P261"><text:span text:style-name="T15">key </text:span></text:p>
          </draw:text-box>
        </draw:frame>
        <draw:frame draw:style-name="gr264" draw:text-style-name="P262" draw:layer="layout" svg:width="2.232cm" svg:height="0.48cm" svg:x="9.232cm" svg:y="11.495cm">
          <draw:text-box>
            <text:p text:style-name="P261"><text:span text:style-name="T15">immediately. </text:span></text:p>
          </draw:text-box>
        </draw:frame>
        <draw:frame draw:style-name="gr264" draw:text-style-name="P262" draw:layer="layout" svg:width="1.917cm" svg:height="0.48cm" svg:x="11.605cm" svg:y="11.495cm">
          <draw:text-box>
            <text:p text:style-name="P261"><text:span text:style-name="T15">Implement </text:span></text:p>
          </draw:text-box>
        </draw:frame>
        <draw:frame draw:style-name="gr264" draw:text-style-name="P262" draw:layer="layout" svg:width="0.756cm" svg:height="0.48cm" svg:x="13.687cm" svg:y="11.495cm">
          <draw:text-box>
            <text:p text:style-name="P261"><text:span text:style-name="T15">IAM </text:span></text:p>
          </draw:text-box>
        </draw:frame>
        <draw:frame draw:style-name="gr264" draw:text-style-name="P262" draw:layer="layout" svg:width="2.412cm" svg:height="0.48cm" svg:x="14.655cm" svg:y="11.495cm">
          <draw:text-box>
            <text:p text:style-name="P261"><text:span text:style-name="T15">least-privilege </text:span></text:p>
          </draw:text-box>
        </draw:frame>
        <draw:frame draw:style-name="gr264" draw:text-style-name="P262" draw:layer="layout" svg:width="0.572cm" svg:height="0.48cm" svg:x="17.294cm" svg:y="11.495cm">
          <draw:text-box>
            <text:p text:style-name="P261"><text:span text:style-name="T15">for </text:span></text:p>
          </draw:text-box>
        </draw:frame>
        <draw:frame draw:style-name="gr264" draw:text-style-name="P262" draw:layer="layout" svg:width="0.544cm" svg:height="0.48cm" svg:x="18.077cm" svg:y="11.495cm">
          <draw:text-box>
            <text:p text:style-name="P261"><text:span text:style-name="T15">the</text:span></text:p>
          </draw:text-box>
        </draw:frame>
        <draw:frame draw:style-name="gr264" draw:text-style-name="P262" draw:layer="layout" svg:width="2.837cm" svg:height="0.48cm" svg:x="2.533cm" svg:y="12.078cm">
          <draw:text-box>
            <text:p text:style-name="P261"><text:span text:style-name="T15">replacement key.</text:span></text:p>
          </draw:text-box>
        </draw:frame>
        <draw:frame draw:style-name="gr278" draw:text-style-name="P277" draw:layer="layout" svg:width="4.453cm" svg:height="0.501cm" svg:x="2.533cm" svg:y="13.915cm">
          <draw:text-box>
            <text:p text:style-name="P261"><text:span text:style-name="T16">Legal &amp; Ethical Guidelines</text:span></text:p>
          </draw:text-box>
        </draw:frame>
        <draw:frame draw:style-name="gr264" draw:text-style-name="P262" draw:layer="layout" svg:width="15.109cm" svg:height="0.48cm" svg:x="2.533cm" svg:y="14.649cm">
          <draw:text-box>
            <text:p text:style-name="P261"><text:span text:style-name="T14">Downloading JS files is normal browser behavior.</text:span><text:span text:style-name="T15"> Analyzing JS is passive reconnaissance. </text:span><text:span text:style-name="T14">Do</text:span></text:p>
          </draw:text-box>
        </draw:frame>
        <draw:frame draw:style-name="gr264" draw:text-style-name="P262" draw:layer="layout" svg:width="15.487cm" svg:height="0.48cm" svg:x="2.533cm" svg:y="15.232cm">
          <draw:text-box>
            <text:p text:style-name="P261"><text:span text:style-name="T14">not use discovered credentials.</text:span><text:span text:style-name="T15"> Making API calls with found keys may be illegal. </text:span><text:span text:style-name="T14">Report only to</text:span></text:p>
          </draw:text-box>
        </draw:frame>
        <draw:frame draw:style-name="gr264" draw:text-style-name="P262" draw:layer="layout" svg:width="1.879cm" svg:height="0.48cm" svg:x="2.533cm" svg:y="15.815cm">
          <draw:text-box>
            <text:p text:style-name="P261"><text:span text:style-name="T14">authorized </text:span></text:p>
          </draw:text-box>
        </draw:frame>
        <draw:frame draw:style-name="gr264" draw:text-style-name="P262" draw:layer="layout" svg:width="1.816cm" svg:height="0.48cm" svg:x="4.61cm" svg:y="15.815cm">
          <draw:text-box>
            <text:p text:style-name="P261"><text:span text:style-name="T14">programs.</text:span><text:span text:style-name="T15"> </text:span></text:p>
          </draw:text-box>
        </draw:frame>
        <draw:frame draw:style-name="gr264" draw:text-style-name="P262" draw:layer="layout" svg:width="1.235cm" svg:height="0.48cm" svg:x="6.582cm" svg:y="15.815cm">
          <draw:text-box>
            <text:p text:style-name="P261"><text:span text:style-name="T15">Ensure </text:span></text:p>
          </draw:text-box>
        </draw:frame>
        <draw:frame draw:style-name="gr264" draw:text-style-name="P262" draw:layer="layout" svg:width="0.636cm" svg:height="0.48cm" svg:x="7.996cm" svg:y="15.815cm">
          <draw:text-box>
            <text:p text:style-name="P261"><text:span text:style-name="T15">the </text:span></text:p>
          </draw:text-box>
        </draw:frame>
        <draw:frame draw:style-name="gr264" draw:text-style-name="P262" draw:layer="layout" svg:width="1.104cm" svg:height="0.48cm" svg:x="8.775cm" svg:y="15.815cm">
          <draw:text-box>
            <text:p text:style-name="P261"><text:span text:style-name="T15">target </text:span></text:p>
          </draw:text-box>
        </draw:frame>
        <draw:frame draw:style-name="gr264" draw:text-style-name="P262" draw:layer="layout" svg:width="0.676cm" svg:height="0.48cm" svg:x="9.977cm" svg:y="15.815cm">
          <draw:text-box>
            <text:p text:style-name="P261"><text:span text:style-name="T15">has </text:span></text:p>
          </draw:text-box>
        </draw:frame>
        <draw:frame draw:style-name="gr264" draw:text-style-name="P262" draw:layer="layout" svg:width="0.508cm" svg:height="0.48cm" svg:x="10.809cm" svg:y="15.815cm">
          <draw:text-box>
            <text:p text:style-name="P261"><text:span text:style-name="T15">an </text:span></text:p>
          </draw:text-box>
        </draw:frame>
        <draw:frame draw:style-name="gr264" draw:text-style-name="P262" draw:layer="layout" svg:width="1.053cm" svg:height="0.48cm" svg:x="11.455cm" svg:y="15.815cm">
          <draw:text-box>
            <text:p text:style-name="P261"><text:span text:style-name="T15">active </text:span></text:p>
          </draw:text-box>
        </draw:frame>
        <draw:frame draw:style-name="gr264" draw:text-style-name="P262" draw:layer="layout" svg:width="0.743cm" svg:height="0.48cm" svg:x="12.684cm" svg:y="15.815cm">
          <draw:text-box>
            <text:p text:style-name="P261"><text:span text:style-name="T15">bug </text:span></text:p>
          </draw:text-box>
        </draw:frame>
        <draw:frame draw:style-name="gr264" draw:text-style-name="P262" draw:layer="layout" svg:width="1.357cm" svg:height="0.48cm" svg:x="13.569cm" svg:y="15.815cm">
          <draw:text-box>
            <text:p text:style-name="P261"><text:span text:style-name="T15">bounty. </text:span></text:p>
          </draw:text-box>
        </draw:frame>
        <draw:frame draw:style-name="gr264" draw:text-style-name="P262" draw:layer="layout" svg:width="1.593cm" svg:height="0.48cm" svg:x="15.036cm" svg:y="15.815cm">
          <draw:text-box>
            <text:p text:style-name="P261"><text:span text:style-name="T14">Minimize </text:span></text:p>
          </draw:text-box>
        </draw:frame>
        <draw:frame draw:style-name="gr264" draw:text-style-name="P262" draw:layer="layout" svg:width="1.237cm" svg:height="0.48cm" svg:x="16.848cm" svg:y="15.815cm">
          <draw:text-box>
            <text:p text:style-name="P261"><text:span text:style-name="T14">testing </text:span></text:p>
          </draw:text-box>
        </draw:frame>
        <draw:frame draw:style-name="gr264" draw:text-style-name="P262" draw:layer="layout" svg:width="0.352cm" svg:height="0.48cm" svg:x="18.263cm" svg:y="15.815cm">
          <draw:text-box>
            <text:p text:style-name="P261"><text:span text:style-name="T14">of</text:span></text:p>
          </draw:text-box>
        </draw:frame>
        <draw:frame draw:style-name="gr264" draw:text-style-name="P262" draw:layer="layout" svg:width="15.804cm" svg:height="0.48cm" svg:x="2.533cm" svg:y="16.398cm">
          <draw:text-box>
            <text:p text:style-name="P261"><text:span text:style-name="T14">discovered endpoints.</text:span><text:span text:style-name="T15"> <text:s/>A <text:s/>single <text:s/>verification <text:s/>request <text:s/>is <text:s/>enough. </text:span><text:span text:style-name="T14"><text:s/>Follow responsible disclosure.</text:span></text:p>
          </draw:text-box>
        </draw:frame>
        <draw:frame draw:style-name="gr264" draw:text-style-name="P262" draw:layer="layout" svg:width="9.639cm" svg:height="0.48cm" svg:x="2.533cm" svg:y="16.981cm">
          <draw:text-box>
            <text:p text:style-name="P261"><text:span text:style-name="T15">Allow time for credential rotation before public discussion.</text:span></text:p>
          </draw:text-box>
        </draw:frame>
        <draw:path draw:style-name="gr294" draw:text-style-name="P289" draw:layer="layout" svg:width="0.132cm" svg:height="0.132cm" svg:x="2.173cm" svg:y="19.797cm" svg:viewBox="0 0 133 133" svg:d="M133 66c0 10-1 18-5 26-3 8-8 15-14 22-6 6-14 11-22 14s-16 5-25 5-17-2-25-5c-9-3-16-8-22-14-6-7-11-14-14-22-5-8-6-16-6-26 0-9 1-18 6-26 3-8 8-15 14-21s13-11 22-14c8-4 16-5 25-5s17 1 25 5c8 3 16 8 22 14s11 13 14 21c4 8 5 17 5 26z">
          <text:p/>
        </draw:path>
        <draw:frame draw:style-name="gr293" draw:text-style-name="P288" draw:layer="layout" svg:width="5.167cm" svg:height="0.577cm" svg:x="2.003cm" svg:y="18.655cm">
          <draw:text-box>
            <text:p text:style-name="P261"><text:span text:style-name="T29">Recommended Resources</text:span></text:p>
          </draw:text-box>
        </draw:frame>
        <draw:path draw:style-name="gr294" draw:text-style-name="P289" draw:layer="layout" svg:width="0.132cm" svg:height="0.133cm" svg:x="2.173cm" svg:y="20.512cm" svg:viewBox="0 0 133 134" svg:d="M133 67c0 9-1 17-5 26-3 8-8 15-14 21s-14 11-22 15c-8 3-16 5-25 5s-17-2-25-5c-9-4-16-9-22-15s-11-13-14-21c-5-9-6-17-6-26 0-8 1-17 6-25 3-8 8-15 14-22s13-12 22-15c8-3 16-5 25-5s17 2 25 5 16 8 22 15 11 14 14 22c4 8 5 17 5 25z">
          <text:p/>
        </draw:path>
        <draw:frame draw:style-name="gr278" draw:text-style-name="P277" draw:layer="layout" svg:width="8.879cm" svg:height="0.501cm" svg:x="2.596cm" svg:y="19.586cm">
          <draw:text-box>
            <text:p text:style-name="P261"><text:span text:style-name="T21">LinkFinder</text:span><text:span text:style-name="T11"> — github.com/GerbenJavado/LinkFinder</text:span></text:p>
          </draw:text-box>
        </draw:frame>
        <draw:path draw:style-name="gr294" draw:text-style-name="P289" draw:layer="layout" svg:width="0.132cm" svg:height="0.133cm" svg:x="2.173cm" svg:y="21.254cm" svg:viewBox="0 0 133 134" svg:d="M133 67c0 9-1 18-5 26-3 8-8 15-14 21s-14 11-22 15c-8 3-16 5-25 5s-17-2-25-5c-9-4-16-9-22-15s-11-13-14-21c-5-8-6-17-6-26s1-18 6-26c3-8 8-15 14-21 6-7 13-11 22-15 8-3 16-5 25-5s17 2 25 5c8 4 16 8 22 15 6 6 11 13 14 21 4 8 5 17 5 26z">
          <text:p/>
        </draw:path>
        <draw:frame draw:style-name="gr278" draw:text-style-name="P277" draw:layer="layout" svg:width="8.327cm" svg:height="0.501cm" svg:x="2.596cm" svg:y="20.302cm">
          <draw:text-box>
            <text:p text:style-name="P261"><text:span text:style-name="T21">SecretFinder</text:span><text:span text:style-name="T11"> — github.com/m4ll0k/SecretFinder</text:span></text:p>
          </draw:text-box>
        </draw:frame>
        <draw:path draw:style-name="gr294" draw:text-style-name="P289" draw:layer="layout" svg:width="0.132cm" svg:height="0.132cm" svg:x="2.173cm" svg:y="21.97cm" svg:viewBox="0 0 133 133" svg:d="M133 67c0 9-1 17-5 25-3 8-8 16-14 22s-14 11-22 14c-8 4-16 5-25 5s-17-1-25-5c-9-3-16-8-22-14s-11-14-14-22c-5-8-6-16-6-25s1-17 6-25c3-9 8-16 14-22s13-11 22-15c8-4 16-5 25-5s17 1 25 5 16 9 22 15 11 13 14 22c4 8 5 16 5 25z">
          <text:p/>
        </draw:path>
        <draw:frame draw:style-name="gr278" draw:text-style-name="P277" draw:layer="layout" svg:width="5.929cm" svg:height="0.501cm" svg:x="2.596cm" svg:y="21.044cm">
          <draw:text-box>
            <text:p text:style-name="P261"><text:span text:style-name="T21">JSMon</text:span><text:span text:style-name="T11"> — github.com/robre/jsmon</text:span></text:p>
          </draw:text-box>
        </draw:frame>
        <draw:path draw:style-name="gr294" draw:text-style-name="P289" draw:layer="layout" svg:width="0.132cm" svg:height="0.133cm" svg:x="2.173cm" svg:y="22.685cm" svg:viewBox="0 0 133 134" svg:d="M133 67c0 8-1 17-5 26-3 8-8 15-14 21-6 7-14 11-22 15-8 3-16 5-25 5s-17-2-25-5c-9-4-16-8-22-15-6-6-11-13-14-21-5-9-6-18-6-26 0-9 1-18 6-26 3-8 8-15 14-21 6-7 13-11 22-15 8-3 16-5 25-5s17 2 25 5c8 4 16 8 22 15 6 6 11 13 14 21 4 8 5 17 5 26z">
          <text:p/>
        </draw:path>
        <draw:frame draw:style-name="gr278" draw:text-style-name="P277" draw:layer="layout" svg:width="6.609cm" svg:height="0.501cm" svg:x="2.596cm" svg:y="21.759cm">
          <draw:text-box>
            <text:p text:style-name="P261"><text:span text:style-name="T21">GetJS</text:span><text:span text:style-name="T11"> — github.com/003random/getJS</text:span></text:p>
          </draw:text-box>
        </draw:frame>
        <draw:path draw:style-name="gr294" draw:text-style-name="P289" draw:layer="layout" svg:width="0.132cm" svg:height="0.132cm" svg:x="2.173cm" svg:y="23.401cm" svg:viewBox="0 0 133 133" svg:d="M133 67c0 9-1 17-5 25-3 8-8 16-14 22s-14 11-22 14c-8 4-16 5-25 5s-17-1-25-5c-9-3-16-8-22-14s-11-14-14-22c-5-8-6-16-6-25s1-17 6-25c3-8 8-17 14-23s13-11 22-14c8-3 16-5 25-5s17 2 25 5 16 8 22 14 11 15 14 23c4 8 5 16 5 25z">
          <text:p/>
        </draw:path>
        <draw:frame draw:style-name="gr278" draw:text-style-name="P277" draw:layer="layout" svg:width="8.046cm" svg:height="0.501cm" svg:x="2.596cm" svg:y="22.475cm">
          <draw:text-box>
            <text:p text:style-name="P261"><text:span text:style-name="T21">Katana</text:span><text:span text:style-name="T11"> — github.com/projectdiscovery/katana</text:span></text:p>
          </draw:text-box>
        </draw:frame>
        <draw:path draw:style-name="gr294" draw:text-style-name="P289" draw:layer="layout" svg:width="0.132cm" svg:height="0.132cm" svg:x="2.173cm" svg:y="24.143cm" svg:viewBox="0 0 133 133" svg:d="M133 66c0 9-1 18-5 26-3 9-8 16-14 22s-14 11-22 14c-8 4-16 5-25 5s-17-1-25-5c-9-3-16-8-22-14s-11-13-14-22c-5-8-6-17-6-26s1-17 6-25c3-8 8-16 14-22s13-11 22-14c8-3 16-5 25-5s17 2 25 5 16 8 22 14 11 14 14 22c4 8 5 16 5 25z">
          <text:p/>
        </draw:path>
        <draw:frame draw:style-name="gr278" draw:text-style-name="P277" draw:layer="layout" svg:width="8.244cm" svg:height="0.501cm" svg:x="2.596cm" svg:y="23.19cm">
          <draw:text-box>
            <text:p text:style-name="P261"><text:span text:style-name="T21">Gospider</text:span><text:span text:style-name="T11"> — github.com/jaeles-project/gospider</text:span></text:p>
          </draw:text-box>
        </draw:frame>
        <draw:path draw:style-name="gr294" draw:text-style-name="P289" draw:layer="layout" svg:width="0.132cm" svg:height="0.133cm" svg:x="2.173cm" svg:y="24.858cm" svg:viewBox="0 0 133 134" svg:d="M133 68c0 8-1 17-5 25-3 8-8 15-14 22-6 6-14 10-22 14-8 3-16 5-25 5s-17-2-25-5c-9-4-16-8-22-14-6-7-11-14-14-22-5-8-6-17-6-25 0-9 1-18 6-26 3-8 8-15 14-22 6-6 13-11 22-15 8-3 16-5 25-5s17 2 25 5c8 4 16 9 22 15 6 7 11 14 14 22 4 8 5 17 5 26z">
          <text:p/>
        </draw:path>
        <draw:frame draw:style-name="gr278" draw:text-style-name="P277" draw:layer="layout" svg:width="9.142cm" svg:height="0.501cm" svg:x="2.596cm" svg:y="23.932cm">
          <draw:text-box>
            <text:p text:style-name="P261"><text:span text:style-name="T21">sourcemapper</text:span><text:span text:style-name="T11"> — github.com/daeken/sourcemapper</text:span></text:p>
          </draw:text-box>
        </draw:frame>
        <draw:path draw:style-name="gr294" draw:text-style-name="P289" draw:layer="layout" svg:width="0.132cm" svg:height="0.133cm" svg:x="2.173cm" svg:y="25.574cm" svg:viewBox="0 0 133 134" svg:d="M133 66c0 9-1 17-5 26-3 9-8 16-14 22s-14 11-22 14c-8 4-16 6-25 6s-17-2-25-6c-9-3-16-8-22-14s-11-13-14-22c-5-9-6-17-6-26s1-17 6-25c3-8 8-16 14-22s13-11 22-14c8-3 16-5 25-5s17 2 25 5 16 8 22 14 11 14 14 22c4 8 5 16 5 25z">
          <text:p/>
        </draw:path>
        <draw:frame draw:style-name="gr278" draw:text-style-name="P277" draw:layer="layout" svg:width="11.111cm" svg:height="0.501cm" svg:x="2.596cm" svg:y="24.648cm">
          <draw:text-box>
            <text:p text:style-name="P261"><text:span text:style-name="T21">unwebpack-sourcemap</text:span><text:span text:style-name="T11"> — npm install -g unwebpack-sourcemap</text:span></text:p>
          </draw:text-box>
        </draw:frame>
        <draw:frame draw:style-name="gr278" draw:text-style-name="P277" draw:layer="layout" svg:width="7.773cm" svg:height="0.501cm" svg:x="2.596cm" svg:y="25.363cm">
          <draw:text-box>
            <text:p text:style-name="P261"><text:span text:style-name="T21">Nuclei</text:span><text:span text:style-name="T11"> — github.com/projectdiscovery/nuclei</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ystem" style:font-pitch="variable"/>
    <style:font-face style:name="Inter" svg:font-family="Inter"/>
    <style:font-face style:name="JetBrainsMono" svg:font-family="JetBrainsMono"/>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ColorEmoji" svg:font-family="NotoColorEmoji"/>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0.988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662"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569"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556"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ate>2026-05-17T04:46:14.816649073</dc:date>
    <meta:editing-duration>PT1M18S</meta:editing-duration>
    <meta:editing-cycles>1</meta:editing-cycles>
    <meta:document-statistic meta:object-count="7896"/>
    <meta:generator>LibreOffice/26.2.2.2$Linux_X86_64 LibreOffice_project/620$Build-2</meta:generator>
  </office:meta>
</office:document-meta>
</file>